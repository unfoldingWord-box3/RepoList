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fo="urn:oasis:names:tc:opendocument:xmlns:xsl-fo-compatible:1.0" xmlns:form="urn:oasis:names:tc:opendocument:xmlns:form:1.0" xmlns:office="urn:oasis:names:tc:opendocument:xmlns:office:1.0" xmlns:style="urn:oasis:names:tc:opendocument:xmlns:style:1.0" xmlns:svg="urn:oasis:names:tc:opendocument:xmlns:svg-compatible:1.0" xmlns:table="urn:oasis:names:tc:opendocument:xmlns:table:1.0" xmlns:text="urn:oasis:names:tc:opendocument:xmlns:text: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929in"/>
    </style:style>
    <style:style style:name="co2" style:family="table-column">
      <style:table-column-properties fo:break-before="auto" style:column-width="0.7083in"/>
    </style:style>
    <style:style style:name="co3" style:family="table-column">
      <style:table-column-properties fo:break-before="auto" style:column-width="0.698in"/>
    </style:style>
    <style:style style:name="co4" style:family="table-column">
      <style:table-column-properties fo:break-before="auto" style:column-width="2.0217in"/>
    </style:style>
    <style:style style:name="co5" style:family="table-column">
      <style:table-column-properties fo:break-before="auto" style:column-width="2.8047in"/>
    </style:style>
    <style:style style:name="co6" style:family="table-column">
      <style:table-column-properties fo:break-before="auto" style:column-width="1.1402in"/>
    </style:style>
    <style:style style:name="co7" style:family="table-column">
      <style:table-column-properties fo:break-before="auto" style:column-width="0.8543in"/>
    </style:style>
    <style:style style:name="co8" style:family="table-column">
      <style:table-column-properties fo:break-before="auto" style:column-width="0.6146in"/>
    </style:style>
    <style:style style:name="co9" style:family="table-column">
      <style:table-column-properties fo:break-before="auto" style:column-width="0.7201in"/>
    </style:style>
    <style:style style:name="co10" style:family="table-column">
      <style:table-column-properties fo:break-before="auto" style:column-width="1.578in"/>
    </style:style>
    <style:style style:name="co11" style:family="table-column">
      <style:table-column-properties fo:break-before="auto" style:column-width="1.6882in"/>
    </style:style>
    <style:style style:name="co12" style:family="table-column">
      <style:table-column-properties fo:break-before="auto" style:column-width="1.5693in"/>
    </style:style>
    <style:style style:name="co13" style:family="table-column">
      <style:table-column-properties fo:break-before="auto" style:column-width="1.8862in"/>
    </style:style>
    <style:style style:name="co14" style:family="table-column">
      <style:table-column-properties fo:break-before="auto" style:column-width="1.3957in"/>
    </style:style>
    <style:style style:name="co15" style:family="table-column">
      <style:table-column-properties fo:break-before="auto" style:column-width="1.4165in"/>
    </style:style>
    <style:style style:name="co16" style:family="table-column">
      <style:table-column-properties fo:break-before="auto" style:column-width="1.428in"/>
    </style:style>
    <style:style style:name="co17" style:family="table-column">
      <style:table-column-properties fo:break-before="auto" style:column-width="1.1252in"/>
    </style:style>
    <style:style style:name="co18" style:family="table-column">
      <style:table-column-properties fo:break-before="auto" style:column-width="1.3646in"/>
    </style:style>
    <style:style style:name="co19" style:family="table-column">
      <style:table-column-properties fo:break-before="auto" style:column-width="1.3752in"/>
    </style:style>
    <style:style style:name="co20" style:family="table-column">
      <style:table-column-properties fo:break-before="auto" style:column-width="1.5528in"/>
    </style:style>
    <style:style style:name="co21" style:family="table-column">
      <style:table-column-properties fo:break-before="auto" style:column-width="1.4591in"/>
    </style:style>
    <style:style style:name="co22" style:family="table-column">
      <style:table-column-properties fo:break-before="auto" style:column-width="1.7299in"/>
    </style:style>
    <style:style style:name="co23" style:family="table-column">
      <style:table-column-properties fo:break-before="auto" style:column-width="1.7071in"/>
    </style:style>
    <style:style style:name="co24" style:family="table-column">
      <style:table-column-properties fo:break-before="auto" style:column-width="1.8547in"/>
    </style:style>
    <style:style style:name="co25" style:family="table-column">
      <style:table-column-properties fo:break-before="auto" style:column-width="2.0008in"/>
    </style:style>
    <style:style style:name="co26" style:family="table-column">
      <style:table-column-properties fo:break-before="auto" style:column-width="1.2437in"/>
    </style:style>
    <style:style style:name="co27" style:family="table-column">
      <style:table-column-properties fo:break-before="auto" style:column-width="1.5346in"/>
    </style:style>
    <style:style style:name="co28" style:family="table-column">
      <style:table-column-properties fo:break-before="auto" style:column-width="2.2472in"/>
    </style:style>
    <style:style style:name="co29" style:family="table-column">
      <style:table-column-properties fo:break-before="auto" style:column-width="1.4236in"/>
    </style:style>
    <style:style style:name="co30" style:family="table-column">
      <style:table-column-properties fo:break-before="auto" style:column-width="2.6673in"/>
    </style:style>
    <style:style style:name="co31" style:family="table-column">
      <style:table-column-properties fo:break-before="auto" style:column-width="2.3071in"/>
    </style:style>
    <style:style style:name="co32" style:family="table-column">
      <style:table-column-properties fo:break-before="auto" style:column-width="2.8866in"/>
    </style:style>
    <style:style style:name="co33" style:family="table-column">
      <style:table-column-properties fo:break-before="auto" style:column-width="6.3465in"/>
    </style:style>
    <style:style style:name="co3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047in" fo:break-before="auto" style:use-optimal-row-height="true"/>
    </style:style>
    <style:style style:name="ro3" style:family="table-row">
      <style:table-row-properties style:row-height="0.7402in" fo:break-before="auto" style:use-optimal-row-height="true"/>
    </style:style>
    <style:style style:name="ro4" style:family="table-row">
      <style:table-row-properties style:row-height="0.380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office:automatic-styles>
  <office:body>
    <office:spreadsheet>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ce1"/>
        <table:table-column table:style-name="co25" table:default-cell-style-name="Default"/>
        <table:table-column table:style-name="co26" table:default-cell-style-name="Default"/>
        <table:table-column table:style-name="co27" table:default-cell-style-name="Default"/>
        <table:table-column table:style-name="co2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row>
          <table:table-cell office:value-type="string" office:string-value="Ask">
            <text:p>Ask</text:p>
          </table:table-cell>
          <table:table-cell office:value-type="string" office:string-value="Archive">
            <text:p>Archive</text:p>
          </table:table-cell>
          <table:table-cell office:value-type="string" office:string-value="Keep">
            <text:p>Keep</text:p>
          </table:table-cell>
          <table:table-cell office:value-type="string" office:string-value="Notes">
            <text:p>Notes</text:p>
          </table:table-cell>
          <table:table-cell office:value-type="string" office:string-value="repo full name">
            <text:p>repo full name</text:p>
          </table:table-cell>
          <table:table-cell office:value-type="string" office:string-value="repo url">
            <text:p>repo url</text:p>
          </table:table-cell>
          <table:table-cell office:value-type="string" office:string-value="language">
            <text:p>language</text:p>
          </table:table-cell>
          <table:table-cell office:value-type="string" office:string-value="archived">
            <text:p>archived</text:p>
          </table:table-cell>
          <table:table-cell office:value-type="string" office:string-value="is fork">
            <text:p>is fork</text:p>
          </table:table-cell>
          <table:table-cell office:value-type="string" office:string-value="pushed at">
            <text:p>pushed at</text:p>
          </table:table-cell>
          <table:table-cell office:value-type="string" office:string-value="last commit date">
            <text:p>last commit date</text:p>
          </table:table-cell>
          <table:table-cell office:value-type="string" office:string-value="last release date">
            <text:p>last release date</text:p>
          </table:table-cell>
          <table:table-cell office:value-type="string" office:string-value="github dependents">
            <text:p>github dependents</text:p>
          </table:table-cell>
          <table:table-cell office:value-type="string" office:string-value="github contributors">
            <text:p>github contributors</text:p>
          </table:table-cell>
          <table:table-cell office:value-type="string" office:string-value="open issues count">
            <text:p>open issues count</text:p>
          </table:table-cell>
          <table:table-cell office:value-type="string" office:string-value="open prs count">
            <text:p>open prs count</text:p>
          </table:table-cell>
          <table:table-cell office:value-type="string" office:string-value="commit count">
            <text:p>commit count</text:p>
          </table:table-cell>
          <table:table-cell office:value-type="string" office:string-value="is submodule of">
            <text:p>is submodule of</text:p>
          </table:table-cell>
          <table:table-cell office:value-type="string" office:string-value="git submodules">
            <text:p>git submodules</text:p>
          </table:table-cell>
          <table:table-cell office:value-type="string" office:string-value="github downloads">
            <text:p>github downloads</text:p>
          </table:table-cell>
          <table:table-cell office:value-type="string" office:string-value="github release count">
            <text:p>github release count</text:p>
          </table:table-cell>
          <table:table-cell office:value-type="string" office:string-value="npmjs package name">
            <text:p>npmjs package name</text:p>
          </table:table-cell>
          <table:table-cell office:value-type="string" office:string-value="npmjs url">
            <text:p>npmjs url</text:p>
          </table:table-cell>
          <table:table-cell office:value-type="string" office:string-value="npm is deprecated">
            <text:p>npm is deprecated</text:p>
          </table:table-cell>
          <table:table-cell office:value-type="string" office:string-value="npmjs downloads last year">
            <text:p>npmjs downloads last year</text:p>
          </table:table-cell>
          <table:table-cell office:value-type="string" office:string-value="npmjs last published">
            <text:p>npmjs last published</text:p>
          </table:table-cell>
          <table:table-cell office:value-type="string" office:string-value="npmjs used by">
            <text:p>npmjs used by</text:p>
          </table:table-cell>
          <table:table-cell office:value-type="string" office:string-value="npmjs uses">
            <text:p>npmjs uses</text:p>
          </table:table-cell>
          <table:table-cell office:value-type="string" office:string-value="last edit date">
            <text:p>last edit date</text:p>
          </table:table-cell>
          <table:table-cell office:value-type="string" office:string-value="repo full name2">
            <text:p>repo full name2</text:p>
          </table:table-cell>
          <table:table-cell office:value-type="string" office:string-value="repo url2">
            <text:p>repo url2</text:p>
          </table:table-cell>
          <table:table-cell office:value-type="string" office:string-value="classification">
            <text:p>classification</text:p>
          </table:table-cell>
          <table:table-cell office:value-type="string" office:string-value="classification reason">
            <text:p>classification reason</text:p>
          </table:table-cell>
          <table:table-cell office:value-type="string" office:string-value="npmjs classification">
            <text:p>npmjs classification</text:p>
          </table:table-cell>
          <table:table-cell office:value-type="string" office:string-value="npmjs classification reason">
            <text:p>npmjs classification reason</text:p>
          </table:table-cell>
          <table:table-cell office:value-type="string" office:string-value="repo name">
            <text:p>repo name</text:p>
          </table:table-cell>
          <table:table-cell office:value-type="string" office:string-value="organization name">
            <text:p>organization name</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anchor-alignment-poc">
            <text:p>unfoldingWord-box3/anchor-alignment-poc</text:p>
          </table:table-cell>
          <table:table-cell office:value-type="string" office:string-value="https://github.com/unfoldingWord-box3/anchor-alignment-poc">
            <text:p>https://github.com/unfoldingWord-box3/anchor-alignment-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7-21T18:55:52Z">
            <text:p>2021-07-21T18:55:52Z</text:p>
          </table:table-cell>
          <table:table-cell office:value-type="string" office:string-value="2021-07-06T04:48:26Z">
            <text:p>2021-07-06T04:48:26Z</text:p>
          </table:table-cell>
          <table:table-cell office:value-type="string" office:string-value="">
            <text:p/>
          </table:table-cell>
          <table:table-cell office:value-type="string" office:string-value="">
            <text:p/>
          </table:table-cell>
          <table:table-cell office:value-type="string" office:string-value="['ancientTexts-net', 'klappy', 'themikejr']">
            <text:p>['ancientTexts-net', 'klappy', 'themikejr']</text:p>
          </table:table-cell>
          <table:table-cell office:value-type="string" office:string-value="2">
            <text:p>2</text:p>
          </table:table-cell>
          <table:table-cell office:value-type="string" office:string-value="2">
            <text:p>2</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nchor-alignment-poc">
            <text:p>anchor-alignment-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bible-reference-rcl', 'gitea-react-toolkit', 'string-punctuation-tokenizer', 'wordmap-lexer', 'markdown-translatable', '@unfoldingword/eslint-config', 'bible-reference-range']">
            <text:p>['alignment-editor-rcl', 'bible-reference-rcl', 'gitea-react-toolkit', 'string-punctuation-tokenizer', 'wordmap-lexer', 'markdown-translatable', '@unfoldingword/eslint-config', 'bible-reference-range']</text:p>
          </table:table-cell>
          <table:table-cell office:value-type="string" office:string-value="2021-08-09T17:50:41Z">
            <text:p>2021-08-09T17:50:41Z</text:p>
          </table:table-cell>
          <table:table-cell office:value-type="string" office:string-value="unfoldingWord-box3/anchor-alignment-poc">
            <text:p>unfoldingWord-box3/anchor-alignment-poc</text:p>
          </table:table-cell>
          <table:table-cell office:value-type="string" office:string-value="https://github.com/unfoldingWord-box3/anchor-alignment-poc">
            <text:p>https://github.com/unfoldingWord-box3/anchor-alignment-poc</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59 months ago).">
            <text:p>Repository name suggests cleanup/test/demo content, it has no detected usage, and the last commit was over 24 months ago (59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anchor-alignment-poc">
            <text:p>anchor-alignment-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event-buffer">
            <text:p>unfoldingWord-dev/android-event-buffer</text:p>
          </table:table-cell>
          <table:table-cell office:value-type="string" office:string-value="https://github.com/unfoldingWord-dev/android-event-buffer">
            <text:p>https://github.com/unfoldingWord-dev/android-event-buffer</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07T23:36:28Z">
            <text:p>2017-02-07T23:36:28Z</text:p>
          </table:table-cell>
          <table:table-cell office:value-type="string" office:string-value="2017-02-07T23:35:53Z">
            <text:p>2017-02-07T23:35:53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1-05T01:22:50Z">
            <text:p>2017-01-05T01:22:50Z</text:p>
          </table:table-cell>
          <table:table-cell office:value-type="string" office:string-value="unfoldingWord-dev/android-event-buffer">
            <text:p>unfoldingWord-dev/android-event-buffer</text:p>
          </table:table-cell>
          <table:table-cell office:value-type="string" office:string-value="https://github.com/unfoldingWord-dev/android-event-buffer">
            <text:p>https://github.com/unfoldingWord-dev/android-event-buffer</text:p>
          </table:table-cell>
          <table:table-cell office:value-type="string" office:string-value="0-No longer used candidate">
            <text:p>0-No longer used candidate</text:p>
          </table:table-cell>
          <table:table-cell office:value-type="string" office:string-value="Repository has had no commits in over 60 months (112 months ago) and has no usage, downloads (0), or releases (0).">
            <text:p>Repository has had no commits in over 60 months (112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android-event-buffer">
            <text:p>android-event-buff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foreground">
            <text:p>unfoldingWord-dev/android-foreground</text:p>
          </table:table-cell>
          <table:table-cell office:value-type="string" office:string-value="https://github.com/unfoldingWord-dev/android-foreground">
            <text:p>https://github.com/unfoldingWord-dev/android-foreground</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23T18:30:54Z">
            <text:p>2017-02-23T18:30:54Z</text:p>
          </table:table-cell>
          <table:table-cell office:value-type="string" office:string-value="2017-02-23T18:30:46Z">
            <text:p>2017-02-23T18:30:46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2-10T22:11:12Z">
            <text:p>2017-02-10T22:11:12Z</text:p>
          </table:table-cell>
          <table:table-cell office:value-type="string" office:string-value="unfoldingWord-dev/android-foreground">
            <text:p>unfoldingWord-dev/android-foreground</text:p>
          </table:table-cell>
          <table:table-cell office:value-type="string" office:string-value="https://github.com/unfoldingWord-dev/android-foreground">
            <text:p>https://github.com/unfoldingWord-dev/android-foreground</text:p>
          </table:table-cell>
          <table:table-cell office:value-type="string" office:string-value="0-No longer used candidate">
            <text:p>0-No longer used candidate</text:p>
          </table:table-cell>
          <table:table-cell office:value-type="string" office:string-value="Repository has very few commits (4) and has had no activity in over 36 months (112 months ago) with no usage, downloads, or releases.">
            <text:p>Repository has very few commits (4) and has had no activity in over 36 months (112 months ago) with no usage, downloads, or releases.</text:p>
          </table:table-cell>
          <table:table-cell office:value-type="string" office:string-value="">
            <text:p/>
          </table:table-cell>
          <table:table-cell office:value-type="string" office:string-value="">
            <text:p/>
          </table:table-cell>
          <table:table-cell office:value-type="string" office:string-value="android-foreground">
            <text:p>android-foregroun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http">
            <text:p>unfoldingWord-dev/android-http</text:p>
          </table:table-cell>
          <table:table-cell office:value-type="string" office:string-value="https://github.com/unfoldingWord-dev/android-http">
            <text:p>https://github.com/unfoldingWord-dev/android-http</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26T20:08:26Z">
            <text:p>2019-04-26T20:08:26Z</text:p>
          </table:table-cell>
          <table:table-cell office:value-type="string" office:string-value="2019-04-26T20:06:51Z">
            <text:p>2019-04-26T20:06:51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4-26T20:08:03Z">
            <text:p>2019-04-26T20:08:03Z</text:p>
          </table:table-cell>
          <table:table-cell office:value-type="string" office:string-value="unfoldingWord-dev/android-http">
            <text:p>unfoldingWord-dev/android-http</text:p>
          </table:table-cell>
          <table:table-cell office:value-type="string" office:string-value="https://github.com/unfoldingWord-dev/android-http">
            <text:p>https://github.com/unfoldingWord-dev/android-http</text:p>
          </table:table-cell>
          <table:table-cell office:value-type="string" office:string-value="0-No longer used candidate">
            <text:p>0-No longer used candidate</text:p>
          </table:table-cell>
          <table:table-cell office:value-type="string" office:string-value="Repository has had no commits in over 60 months (86 months ago) and has no usage, downloads (0), or releases (0).">
            <text:p>Repository has had no commits in over 60 months (86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android-http">
            <text:p>android-htt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logger">
            <text:p>unfoldingWord-dev/android-logger</text:p>
          </table:table-cell>
          <table:table-cell office:value-type="string" office:string-value="https://github.com/unfoldingWord-dev/android-logger">
            <text:p>https://github.com/unfoldingWord-dev/android-logger</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19T22:57:41Z">
            <text:p>2017-04-19T22:57:41Z</text:p>
          </table:table-cell>
          <table:table-cell office:value-type="string" office:string-value="2017-04-19T22:57:33Z">
            <text:p>2017-04-19T22:57:33Z</text:p>
          </table:table-cell>
          <table:table-cell office:value-type="string" office:string-value="">
            <text:p/>
          </table:table-cell>
          <table:table-cell office:value-type="string" office:string-value="">
            <text:p/>
          </table:table-cell>
          <table:table-cell office:value-type="string" office:string-value="['da1nerd', 'jsarabia']">
            <text:p>['da1nerd', 'jsarabia']</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2-27T02:27:42Z">
            <text:p>2016-02-27T02:27:42Z</text:p>
          </table:table-cell>
          <table:table-cell office:value-type="string" office:string-value="unfoldingWord-dev/android-logger">
            <text:p>unfoldingWord-dev/android-logger</text:p>
          </table:table-cell>
          <table:table-cell office:value-type="string" office:string-value="https://github.com/unfoldingWord-dev/android-logger">
            <text:p>https://github.com/unfoldingWord-dev/android-logger</text:p>
          </table:table-cell>
          <table:table-cell office:value-type="string" office:string-value="0-No longer used candidate">
            <text:p>0-No longer used candidate</text:p>
          </table:table-cell>
          <table:table-cell office:value-type="string" office:string-value="Repository has had no commits in over 60 months (110 months ago) and has no usage, downloads (0), or releases (0).">
            <text:p>Repository has had no commits in over 60 months (110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android-logger">
            <text:p>android-log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task-manager">
            <text:p>unfoldingWord-dev/android-task-manager</text:p>
          </table:table-cell>
          <table:table-cell office:value-type="string" office:string-value="https://github.com/unfoldingWord-dev/android-task-manager">
            <text:p>https://github.com/unfoldingWord-dev/android-task-manager</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3-21T21:14:27Z">
            <text:p>2017-03-21T21:14:27Z</text:p>
          </table:table-cell>
          <table:table-cell office:value-type="string" office:string-value="2017-03-21T21:14:14Z">
            <text:p>2017-03-21T21:14:14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6-15T00:18:45Z">
            <text:p>2016-06-15T00:18:45Z</text:p>
          </table:table-cell>
          <table:table-cell office:value-type="string" office:string-value="unfoldingWord-dev/android-task-manager">
            <text:p>unfoldingWord-dev/android-task-manager</text:p>
          </table:table-cell>
          <table:table-cell office:value-type="string" office:string-value="https://github.com/unfoldingWord-dev/android-task-manager">
            <text:p>https://github.com/unfoldingWord-dev/android-task-manager</text:p>
          </table:table-cell>
          <table:table-cell office:value-type="string" office:string-value="0-No longer used candidate">
            <text:p>0-No longer used candidate</text:p>
          </table:table-cell>
          <table:table-cell office:value-type="string" office:string-value="Repository has had no commits in over 60 months (111 months ago) and has no usage, downloads (0), or releases (0).">
            <text:p>Repository has had no commits in over 60 months (111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android-task-manager">
            <text:p>android-task-mana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lank-project-template">
            <text:p>unfoldingWord/blank-project-template</text:p>
          </table:table-cell>
          <table:table-cell office:value-type="string" office:string-value="https://github.com/unfoldingWord/blank-project-template">
            <text:p>https://github.com/unfoldingWord/blank-project-template</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8-23T18:30:41Z">
            <text:p>2022-08-23T18:30:41Z</text:p>
          </table:table-cell>
          <table:table-cell office:value-type="string" office:string-value="2021-12-01T16:36:14Z">
            <text:p>2021-12-01T16:36:14Z</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2">
            <text:p>2</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0T15:23:15Z">
            <text:p>2022-08-20T15:23:15Z</text:p>
          </table:table-cell>
          <table:table-cell office:value-type="string" office:string-value="unfoldingWord/blank-project-template">
            <text:p>unfoldingWord/blank-project-template</text:p>
          </table:table-cell>
          <table:table-cell office:value-type="string" office:string-value="https://github.com/unfoldingWord/blank-project-template">
            <text:p>https://github.com/unfoldingWord/blank-project-template</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54 months ago).">
            <text:p>Repository name suggests cleanup/test/demo content, it has no detected usage, and the last commit was over 24 months ago (54 months ago).</text:p>
          </table:table-cell>
          <table:table-cell office:value-type="string" office:string-value="">
            <text:p/>
          </table:table-cell>
          <table:table-cell office:value-type="string" office:string-value="">
            <text:p/>
          </table:table-cell>
          <table:table-cell office:value-type="string" office:string-value="blank-project-template">
            <text:p>blank-project-templa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book-package-viewer-poc">
            <text:p>unfoldingWord-box3/book-package-viewer-poc</text:p>
          </table:table-cell>
          <table:table-cell office:value-type="string" office:string-value="https://github.com/unfoldingWord-box3/book-package-viewer-poc">
            <text:p>https://github.com/unfoldingWord-box3/book-package-viewer-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19T16:22:36Z">
            <text:p>2020-10-19T16:22:36Z</text:p>
          </table:table-cell>
          <table:table-cell office:value-type="string" office:string-value="2020-10-19T16:21:53Z">
            <text:p>2020-10-19T16:21:53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ook-package-viewer-poc">
            <text:p>book-package-viewer-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unfoldingword/eslint-config', 'bible-reference-range', 'string-punctuation-tokenizer', 'tc-ui-toolkit', 'usfm-js', 'uw-quote-helpers', 'word-aligner', 'wordmap-lexer', 'tsv-groupdata-parser', 'uw-bible-parser', 'uw-tsv-parser']">
            <text:p>['gitea-react-toolkit', 'markdown-translatable', 'scripture-resources-rcl', '@unfoldingword/eslint-config', 'bible-reference-range', 'string-punctuation-tokenizer', 'tc-ui-toolkit', 'usfm-js', 'uw-quote-helpers', 'word-aligner', 'wordmap-lexer', 'tsv-groupdata-parser', 'uw-bible-parser', 'uw-tsv-parser']</text:p>
          </table:table-cell>
          <table:table-cell office:value-type="string" office:string-value="2020-10-21T20:48:29Z">
            <text:p>2020-10-21T20:48:29Z</text:p>
          </table:table-cell>
          <table:table-cell office:value-type="string" office:string-value="unfoldingWord-box3/book-package-viewer-poc">
            <text:p>unfoldingWord-box3/book-package-viewer-poc</text:p>
          </table:table-cell>
          <table:table-cell office:value-type="string" office:string-value="https://github.com/unfoldingWord-box3/book-package-viewer-poc">
            <text:p>https://github.com/unfoldingWord-box3/book-package-viewer-poc</text:p>
          </table:table-cell>
          <table:table-cell office:value-type="string" office:string-value="0-No longer used candidate">
            <text:p>0-No longer used candidate</text:p>
          </table:table-cell>
          <table:table-cell office:value-type="string" office:string-value="Repository has had no commits in over 60 months (68 months ago) and has no usage, downloads (0), or releases (0).">
            <text:p>Repository has had no commits in over 60 months (68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ook-package-viewer-poc">
            <text:p>book-package-viewer-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comment_box">
            <text:p>unfoldingWord-dev/comment_box</text:p>
          </table:table-cell>
          <table:table-cell office:value-type="string" office:string-value="https://github.com/unfoldingWord-dev/comment_box">
            <text:p>https://github.com/unfoldingWord-dev/comment_box</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3-13T15:21:35Z">
            <text:p>2017-03-13T15:21:35Z</text:p>
          </table:table-cell>
          <table:table-cell office:value-type="string" office:string-value="2017-03-13T15:19:36Z">
            <text:p>2017-03-13T15:19:36Z</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ommentBox">
            <text:p>CommentBox</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19:37:22Z">
            <text:p>2019-10-22T19:37:22Z</text:p>
          </table:table-cell>
          <table:table-cell office:value-type="string" office:string-value="unfoldingWord-dev/comment_box">
            <text:p>unfoldingWord-dev/comment_box</text:p>
          </table:table-cell>
          <table:table-cell office:value-type="string" office:string-value="https://github.com/unfoldingWord-dev/comment_box">
            <text:p>https://github.com/unfoldingWord-dev/comment_box</text:p>
          </table:table-cell>
          <table:table-cell office:value-type="string" office:string-value="0-No longer used candidate">
            <text:p>0-No longer used candidate</text:p>
          </table:table-cell>
          <table:table-cell office:value-type="string" office:string-value="Repository has had no commits in over 60 months (111 months ago) and has no usage, downloads (0), or releases (0).">
            <text:p>Repository has had no commits in over 60 months (111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omment_box">
            <text:p>comment_box</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obs-comparer">
            <text:p>unfoldingWord-dev/dokuwiki-obs-comparer</text:p>
          </table:table-cell>
          <table:table-cell office:value-type="string" office:string-value="https://github.com/unfoldingWord-dev/dokuwiki-obs-comparer">
            <text:p>https://github.com/unfoldingWord-dev/dokuwiki-obs-comparer</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23T01:03:31Z">
            <text:p>2015-06-23T01:03:31Z</text:p>
          </table:table-cell>
          <table:table-cell office:value-type="string" office:string-value="2015-06-02T01:42:21Z">
            <text:p>2015-06-02T01:42:21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5-29T18:20:26Z">
            <text:p>2015-05-29T18:20:26Z</text:p>
          </table:table-cell>
          <table:table-cell office:value-type="string" office:string-value="unfoldingWord-dev/dokuwiki-obs-comparer">
            <text:p>unfoldingWord-dev/dokuwiki-obs-comparer</text:p>
          </table:table-cell>
          <table:table-cell office:value-type="string" office:string-value="https://github.com/unfoldingWord-dev/dokuwiki-obs-comparer">
            <text:p>https://github.com/unfoldingWord-dev/dokuwiki-obs-comparer</text:p>
          </table:table-cell>
          <table:table-cell office:value-type="string" office:string-value="0-No longer used candidate">
            <text:p>0-No longer used candidate</text:p>
          </table:table-cell>
          <table:table-cell office:value-type="string" office:string-value="Repository has had no commits in over 60 months (132 months ago) and has no usage, downloads (0), or releases (0).">
            <text:p>Repository has had no commits in over 60 months (132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obs-comparer">
            <text:p>dokuwiki-obs-compar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plugin-obs">
            <text:p>unfoldingWord-dev/dokuwiki-plugin-obs</text:p>
          </table:table-cell>
          <table:table-cell office:value-type="string" office:string-value="https://github.com/unfoldingWord-dev/dokuwiki-plugin-obs">
            <text:p>https://github.com/unfoldingWord-dev/dokuwiki-plugin-obs</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8:35:18Z">
            <text:p>2015-05-23T18:35:18Z</text:p>
          </table:table-cell>
          <table:table-cell office:value-type="string" office:string-value="2015-05-23T18:26:14Z">
            <text:p>2015-05-23T18:26:14Z</text:p>
          </table:table-cell>
          <table:table-cell office:value-type="string" office:string-value="">
            <text:p/>
          </table:table-cell>
          <table:table-cell office:value-type="string" office:string-value="">
            <text:p/>
          </table:table-cell>
          <table:table-cell office:value-type="string" office:string-value="['phillip-hopper', 'Phil Hopper', 'Jesse A. Griffin', 'Apache']">
            <text:p>['phillip-hopper', 'Phil Hopper', 'Jesse A. Griffin', 'Apache']</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18:57:35Z">
            <text:p>2015-06-23T18:57:35Z</text:p>
          </table:table-cell>
          <table:table-cell office:value-type="string" office:string-value="unfoldingWord-dev/dokuwiki-plugin-obs">
            <text:p>unfoldingWord-dev/dokuwiki-plugin-obs</text:p>
          </table:table-cell>
          <table:table-cell office:value-type="string" office:string-value="https://github.com/unfoldingWord-dev/dokuwiki-plugin-obs">
            <text:p>https://github.com/unfoldingWord-dev/dokuwiki-plugin-obs</text:p>
          </table:table-cell>
          <table:table-cell office:value-type="string" office:string-value="0-No longer used candidate">
            <text:p>0-No longer used candidate</text:p>
          </table:table-cell>
          <table:table-cell office:value-type="string" office:string-value="Repository has had no commits in over 60 months (133 months ago) and has no usage, downloads (0), or releases (0).">
            <text:p>Repository has had no commits in over 60 months (13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obs">
            <text:p>dokuwiki-plugin-ob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plugin-obs-audio-upload">
            <text:p>unfoldingWord-dev/dokuwiki-plugin-obs-audio-upload</text:p>
          </table:table-cell>
          <table:table-cell office:value-type="string" office:string-value="https://github.com/unfoldingWord-dev/dokuwiki-plugin-obs-audio-upload">
            <text:p>https://github.com/unfoldingWord-dev/dokuwiki-plugin-obs-audio-uploa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5-05-23T17:13:24Z">
            <text:p>2015-05-23T17:13:24Z</text:p>
          </table:table-cell>
          <table:table-cell office:value-type="string" office:string-value="2015-05-23T17:13:23Z">
            <text:p>2015-05-23T17:13:23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3">
            <text:p>3</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3-19T19:30:11Z">
            <text:p>2015-03-19T19:30:11Z</text:p>
          </table:table-cell>
          <table:table-cell office:value-type="string" office:string-value="unfoldingWord-dev/dokuwiki-plugin-obs-audio-upload">
            <text:p>unfoldingWord-dev/dokuwiki-plugin-obs-audio-upload</text:p>
          </table:table-cell>
          <table:table-cell office:value-type="string" office:string-value="https://github.com/unfoldingWord-dev/dokuwiki-plugin-obs-audio-upload">
            <text:p>https://github.com/unfoldingWord-dev/dokuwiki-plugin-obs-audio-upload</text:p>
          </table:table-cell>
          <table:table-cell office:value-type="string" office:string-value="0-No longer used candidate">
            <text:p>0-No longer used candidate</text:p>
          </table:table-cell>
          <table:table-cell office:value-type="string" office:string-value="Repository has had no commits in over 60 months (133 months ago) and has no usage, downloads (0), or releases (0).">
            <text:p>Repository has had no commits in over 60 months (13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obs-audio-upload">
            <text:p>dokuwiki-plugin-obs-audio-uploa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plugin-obs-review">
            <text:p>unfoldingWord-dev/dokuwiki-plugin-obs-review</text:p>
          </table:table-cell>
          <table:table-cell office:value-type="string" office:string-value="https://github.com/unfoldingWord-dev/dokuwiki-plugin-obs-review">
            <text:p>https://github.com/unfoldingWord-dev/dokuwiki-plugin-obs-review</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1:00Z">
            <text:p>2015-06-10T19:51:00Z</text:p>
          </table:table-cell>
          <table:table-cell office:value-type="string" office:string-value="2015-06-10T19:50:59Z">
            <text:p>2015-06-10T19:50:59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4-13T19:33:48Z">
            <text:p>2015-04-13T19:33:48Z</text:p>
          </table:table-cell>
          <table:table-cell office:value-type="string" office:string-value="unfoldingWord-dev/dokuwiki-plugin-obs-review">
            <text:p>unfoldingWord-dev/dokuwiki-plugin-obs-review</text:p>
          </table:table-cell>
          <table:table-cell office:value-type="string" office:string-value="https://github.com/unfoldingWord-dev/dokuwiki-plugin-obs-review">
            <text:p>https://github.com/unfoldingWord-dev/dokuwiki-plugin-obs-review</text:p>
          </table:table-cell>
          <table:table-cell office:value-type="string" office:string-value="0-No longer used candidate">
            <text:p>0-No longer used candidate</text:p>
          </table:table-cell>
          <table:table-cell office:value-type="string" office:string-value="Repository has had no commits in over 60 months (132 months ago) and has no usage, downloads (0), or releases (0).">
            <text:p>Repository has had no commits in over 60 months (132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obs-review">
            <text:p>dokuwiki-plugin-obs-review</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plugin-register">
            <text:p>unfoldingWord-dev/dokuwiki-plugin-register</text:p>
          </table:table-cell>
          <table:table-cell office:value-type="string" office:string-value="https://github.com/unfoldingWord-dev/dokuwiki-plugin-register">
            <text:p>https://github.com/unfoldingWord-dev/dokuwiki-plugin-register</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6:59:10Z">
            <text:p>2015-05-23T16:59:10Z</text:p>
          </table:table-cell>
          <table:table-cell office:value-type="string" office:string-value="2015-05-23T16:59:09Z">
            <text:p>2015-05-23T16:59:09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3-12T19:17:46Z">
            <text:p>2015-03-12T19:17:46Z</text:p>
          </table:table-cell>
          <table:table-cell office:value-type="string" office:string-value="unfoldingWord-dev/dokuwiki-plugin-register">
            <text:p>unfoldingWord-dev/dokuwiki-plugin-register</text:p>
          </table:table-cell>
          <table:table-cell office:value-type="string" office:string-value="https://github.com/unfoldingWord-dev/dokuwiki-plugin-register">
            <text:p>https://github.com/unfoldingWord-dev/dokuwiki-plugin-register</text:p>
          </table:table-cell>
          <table:table-cell office:value-type="string" office:string-value="0-No longer used candidate">
            <text:p>0-No longer used candidate</text:p>
          </table:table-cell>
          <table:table-cell office:value-type="string" office:string-value="Repository has had no commits in over 60 months (133 months ago) and has no usage, downloads (0), or releases (0).">
            <text:p>Repository has had no commits in over 60 months (13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register">
            <text:p>dokuwiki-plugin-regist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plugin-shared">
            <text:p>unfoldingWord-dev/dokuwiki-plugin-shared</text:p>
          </table:table-cell>
          <table:table-cell office:value-type="string" office:string-value="https://github.com/unfoldingWord-dev/dokuwiki-plugin-shared">
            <text:p>https://github.com/unfoldingWord-dev/dokuwiki-plugin-shared</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0:16Z">
            <text:p>2015-06-10T19:50:16Z</text:p>
          </table:table-cell>
          <table:table-cell office:value-type="string" office:string-value="2015-06-10T19:50:15Z">
            <text:p>2015-06-10T19:50:15Z</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04T20:09:16Z">
            <text:p>2015-06-04T20:09:16Z</text:p>
          </table:table-cell>
          <table:table-cell office:value-type="string" office:string-value="unfoldingWord-dev/dokuwiki-plugin-shared">
            <text:p>unfoldingWord-dev/dokuwiki-plugin-shared</text:p>
          </table:table-cell>
          <table:table-cell office:value-type="string" office:string-value="https://github.com/unfoldingWord-dev/dokuwiki-plugin-shared">
            <text:p>https://github.com/unfoldingWord-dev/dokuwiki-plugin-shared</text:p>
          </table:table-cell>
          <table:table-cell office:value-type="string" office:string-value="0-No longer used candidate">
            <text:p>0-No longer used candidate</text:p>
          </table:table-cell>
          <table:table-cell office:value-type="string" office:string-value="Repository has had no commits in over 60 months (132 months ago) and has no usage, downloads (0), or releases (0).">
            <text:p>Repository has had no commits in over 60 months (132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shared">
            <text:p>dokuwiki-plugin-share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to-rc">
            <text:p>unfoldingWord-dev/dokuwiki-to-rc</text:p>
          </table:table-cell>
          <table:table-cell office:value-type="string" office:string-value="https://github.com/unfoldingWord-dev/dokuwiki-to-rc">
            <text:p>https://github.com/unfoldingWord-dev/dokuwiki-to-rc</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9-29T23:38:30Z">
            <text:p>2017-09-29T23:38:30Z</text:p>
          </table:table-cell>
          <table:table-cell office:value-type="string" office:string-value="2016-12-20T20:45:22Z">
            <text:p>2016-12-20T20:45:22Z</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1">
            <text:p>1</text:p>
          </table:table-cell>
          <table:table-cell office:value-type="string" office:string-value="1">
            <text:p>1</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9-24T19:55:06Z">
            <text:p>2016-09-24T19:55:06Z</text:p>
          </table:table-cell>
          <table:table-cell office:value-type="string" office:string-value="unfoldingWord-dev/dokuwiki-to-rc">
            <text:p>unfoldingWord-dev/dokuwiki-to-rc</text:p>
          </table:table-cell>
          <table:table-cell office:value-type="string" office:string-value="https://github.com/unfoldingWord-dev/dokuwiki-to-rc">
            <text:p>https://github.com/unfoldingWord-dev/dokuwiki-to-rc</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to-rc">
            <text:p>dokuwiki-to-r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usfm-import">
            <text:p>unfoldingWord-dev/dokuwiki-usfm-import</text:p>
          </table:table-cell>
          <table:table-cell office:value-type="string" office:string-value="https://github.com/unfoldingWord-dev/dokuwiki-usfm-import">
            <text:p>https://github.com/unfoldingWord-dev/dokuwiki-usfm-import</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11T18:33:11Z">
            <text:p>2015-05-11T18:33:11Z</text:p>
          </table:table-cell>
          <table:table-cell office:value-type="string" office:string-value="2015-05-11T18:31:01Z">
            <text:p>2015-05-11T18:31:01Z</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4">
            <text:p>4</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19:07:28Z">
            <text:p>2015-06-23T19:07:28Z</text:p>
          </table:table-cell>
          <table:table-cell office:value-type="string" office:string-value="unfoldingWord-dev/dokuwiki-usfm-import">
            <text:p>unfoldingWord-dev/dokuwiki-usfm-import</text:p>
          </table:table-cell>
          <table:table-cell office:value-type="string" office:string-value="https://github.com/unfoldingWord-dev/dokuwiki-usfm-import">
            <text:p>https://github.com/unfoldingWord-dev/dokuwiki-usfm-import</text:p>
          </table:table-cell>
          <table:table-cell office:value-type="string" office:string-value="0-No longer used candidate">
            <text:p>0-No longer used candidate</text:p>
          </table:table-cell>
          <table:table-cell office:value-type="string" office:string-value="Repository has very few commits (3) and has had no activity in over 36 months (133 months ago) with no usage, downloads, or releases.">
            <text:p>Repository has very few commits (3) and has had no activity in over 36 months (133 months ago) with no usage, downloads, or releases.</text:p>
          </table:table-cell>
          <table:table-cell office:value-type="string" office:string-value="">
            <text:p/>
          </table:table-cell>
          <table:table-cell office:value-type="string" office:string-value="">
            <text:p/>
          </table:table-cell>
          <table:table-cell office:value-type="string" office:string-value="dokuwiki-usfm-import">
            <text:p>dokuwiki-usfm-impor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w_redirects">
            <text:p>unfoldingWord/dw_redirects</text:p>
          </table:table-cell>
          <table:table-cell office:value-type="string" office:string-value="https://github.com/unfoldingWord/dw_redirects">
            <text:p>https://github.com/unfoldingWord/dw_redirec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4T14:42:42Z">
            <text:p>2020-05-14T14:42:42Z</text:p>
          </table:table-cell>
          <table:table-cell office:value-type="string" office:string-value="2020-05-14T14:42:41Z">
            <text:p>2020-05-14T14:42:41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5-14T14:42:44Z">
            <text:p>2020-05-14T14:42:44Z</text:p>
          </table:table-cell>
          <table:table-cell office:value-type="string" office:string-value="unfoldingWord/dw_redirects">
            <text:p>unfoldingWord/dw_redirects</text:p>
          </table:table-cell>
          <table:table-cell office:value-type="string" office:string-value="https://github.com/unfoldingWord/dw_redirects">
            <text:p>https://github.com/unfoldingWord/dw_redirects</text:p>
          </table:table-cell>
          <table:table-cell office:value-type="string" office:string-value="0-No longer used candidate">
            <text:p>0-No longer used candidate</text:p>
          </table:table-cell>
          <table:table-cell office:value-type="string" office:string-value="Repository has had no commits in over 60 months (73 months ago) and has no usage, downloads (0), or releases (0).">
            <text:p>Repository has had no commits in over 60 months (7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w_redirects">
            <text:p>dw_redirec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ExampleCheckingApp-tC">
            <text:p>unfoldingWord-dev/ExampleCheckingApp-tC</text:p>
          </table:table-cell>
          <table:table-cell office:value-type="string" office:string-value="https://github.com/unfoldingWord-dev/ExampleCheckingApp-tC">
            <text:p>https://github.com/unfoldingWord-dev/ExampleCheckingApp-tC</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7:50Z">
            <text:p>2016-08-15T16:27:50Z</text:p>
          </table:table-cell>
          <table:table-cell office:value-type="string" office:string-value="2016-08-15T16:27:50Z">
            <text:p>2016-08-15T16:27:50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15T16:27:49Z">
            <text:p>2016-08-15T16:27:49Z</text:p>
          </table:table-cell>
          <table:table-cell office:value-type="string" office:string-value="unfoldingWord-dev/ExampleCheckingApp-tC">
            <text:p>unfoldingWord-dev/ExampleCheckingApp-tC</text:p>
          </table:table-cell>
          <table:table-cell office:value-type="string" office:string-value="https://github.com/unfoldingWord-dev/ExampleCheckingApp-tC">
            <text:p>https://github.com/unfoldingWord-dev/ExampleCheckingApp-tC</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118 months ago) with no usage, downloads, or releases.">
            <text:p>Repository has very few commits (1) and has had no activity in over 36 months (118 months ago) with no usage, downloads, or releases.</text:p>
          </table:table-cell>
          <table:table-cell office:value-type="string" office:string-value="">
            <text:p/>
          </table:table-cell>
          <table:table-cell office:value-type="string" office:string-value="">
            <text:p/>
          </table:table-cell>
          <table:table-cell office:value-type="string" office:string-value="ExampleCheckingApp-tC">
            <text:p>ExampleCheckingApp-t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gitea-offline-poc">
            <text:p>unfoldingWord-box3/gitea-offline-poc</text:p>
          </table:table-cell>
          <table:table-cell office:value-type="string" office:string-value="https://github.com/unfoldingWord-box3/gitea-offline-poc">
            <text:p>https://github.com/unfoldingWord-box3/gitea-offline-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13:35:32Z">
            <text:p>2023-01-06T13:35:32Z</text:p>
          </table:table-cell>
          <table:table-cell office:value-type="string" office:string-value="2020-08-12T19:36:04Z">
            <text:p>2020-08-12T19:36:04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20">
            <text:p>20</text:p>
          </table:table-cell>
          <table:table-cell office:value-type="string" office:string-value="20">
            <text:p>2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itea-offline-poc">
            <text:p>gitea-offlin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unfoldingword/eslint-config', 'markdown-translatable']">
            <text:p>['gitea-react-toolkit', '@unfoldingword/eslint-config', 'markdown-translatable']</text:p>
          </table:table-cell>
          <table:table-cell office:value-type="string" office:string-value="2020-08-12T19:36:13Z">
            <text:p>2020-08-12T19:36:13Z</text:p>
          </table:table-cell>
          <table:table-cell office:value-type="string" office:string-value="unfoldingWord-box3/gitea-offline-poc">
            <text:p>unfoldingWord-box3/gitea-offline-poc</text:p>
          </table:table-cell>
          <table:table-cell office:value-type="string" office:string-value="https://github.com/unfoldingWord-box3/gitea-offline-poc">
            <text:p>https://github.com/unfoldingWord-box3/gitea-offline-poc</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70 months ago) with no usage, downloads, or releases.">
            <text:p>Repository has very few commits (2) and has had no activity in over 36 months (70 months ago) with no usage, downloads, or release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itea-offline-poc">
            <text:p>gitea-offline-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delete">
            <text:p>delete</text:p>
          </table:table-cell>
          <table:table-cell office:value-type="string" office:string-value="">
            <text:p/>
          </table:table-cell>
          <table:table-cell office:value-type="string" office:string-value="">
            <text:p/>
          </table:table-cell>
          <table:table-cell office:value-type="string" office:string-value="unfoldingWord/gl_database">
            <text:p>unfoldingWord/gl_database</text:p>
          </table:table-cell>
          <table:table-cell office:value-type="string" office:string-value="https://github.com/unfoldingWord/gl_database">
            <text:p>https://github.com/unfoldingWord/gl_database</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2-10T15:16:33Z">
            <text:p>2021-02-10T15:16:33Z</text:p>
          </table:table-cell>
          <table:table-cell office:value-type="string" office:string-value="2021-01-21T20:44:46Z">
            <text:p>2021-01-21T20:44:46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1-21T20:44:49Z">
            <text:p>2021-01-21T20:44:49Z</text:p>
          </table:table-cell>
          <table:table-cell office:value-type="string" office:string-value="unfoldingWord/gl_database">
            <text:p>unfoldingWord/gl_database</text:p>
          </table:table-cell>
          <table:table-cell office:value-type="string" office:string-value="https://github.com/unfoldingWord/gl_database">
            <text:p>https://github.com/unfoldingWord/gl_database</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65 months ago) with no usage, downloads, or releases.">
            <text:p>Repository has very few commits (1) and has had no activity in over 36 months (65 months ago) with no usage, downloads, or releases.</text:p>
          </table:table-cell>
          <table:table-cell office:value-type="string" office:string-value="">
            <text:p/>
          </table:table-cell>
          <table:table-cell office:value-type="string" office:string-value="">
            <text:p/>
          </table:table-cell>
          <table:table-cell office:value-type="string" office:string-value="gl_database">
            <text:p>gl_databas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delete">
            <text:p>delete</text:p>
          </table:table-cell>
          <table:table-cell office:value-type="string" office:string-value="">
            <text:p/>
          </table:table-cell>
          <table:table-cell office:value-type="string" office:string-value="">
            <text:p/>
          </table:table-cell>
          <table:table-cell office:value-type="string" office:string-value="unfoldingWord/gl_database_code">
            <text:p>unfoldingWord/gl_database_code</text:p>
          </table:table-cell>
          <table:table-cell office:value-type="string" office:string-value="https://github.com/unfoldingWord/gl_database_code">
            <text:p>https://github.com/unfoldingWord/gl_database_code</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10-14T15:01:43Z">
            <text:p>2021-10-14T15:01:43Z</text:p>
          </table:table-cell>
          <table:table-cell office:value-type="string" office:string-value="2021-10-14T15:01:43Z">
            <text:p>2021-10-14T15:01:43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0-14T15:01:45Z">
            <text:p>2021-10-14T15:01:45Z</text:p>
          </table:table-cell>
          <table:table-cell office:value-type="string" office:string-value="unfoldingWord/gl_database_code">
            <text:p>unfoldingWord/gl_database_code</text:p>
          </table:table-cell>
          <table:table-cell office:value-type="string" office:string-value="https://github.com/unfoldingWord/gl_database_code">
            <text:p>https://github.com/unfoldingWord/gl_database_code</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56 months ago) with no usage, downloads, or releases.">
            <text:p>Repository has very few commits (1) and has had no activity in over 36 months (56 months ago) with no usage, downloads, or releases.</text:p>
          </table:table-cell>
          <table:table-cell office:value-type="string" office:string-value="">
            <text:p/>
          </table:table-cell>
          <table:table-cell office:value-type="string" office:string-value="">
            <text:p/>
          </table:table-cell>
          <table:table-cell office:value-type="string" office:string-value="gl_database_code">
            <text:p>gl_database_cod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hubot">
            <text:p>unfoldingWord-dev/hubot</text:p>
          </table:table-cell>
          <table:table-cell office:value-type="string" office:string-value="https://github.com/unfoldingWord-dev/hubot">
            <text:p>https://github.com/unfoldingWord-dev/hubot</text:p>
          </table:table-cell>
          <table:table-cell office:value-type="string" office:string-value="CoffeeScript">
            <text:p>CoffeeScript</text:p>
          </table:table-cell>
          <table:table-cell office:value-type="string" office:string-value="False">
            <text:p>False</text:p>
          </table:table-cell>
          <table:table-cell office:value-type="string" office:string-value="False">
            <text:p>False</text:p>
          </table:table-cell>
          <table:table-cell office:value-type="string" office:string-value="2016-12-01T19:40:08Z">
            <text:p>2016-12-01T19:40:08Z</text:p>
          </table:table-cell>
          <table:table-cell office:value-type="string" office:string-value="2016-12-01T19:40:00Z">
            <text:p>2016-12-01T19:40:00Z</text:p>
          </table:table-cell>
          <table:table-cell office:value-type="string" office:string-value="">
            <text:p/>
          </table:table-cell>
          <table:table-cell office:value-type="string" office:string-value="">
            <text:p/>
          </table:table-cell>
          <table:table-cell office:value-type="string" office:string-value="['jag3773', 'superdav42', 'Simi Shonowo', 'root', 'Richard Mahn', 'richmahn', 'hubot', 'markalolo', 'richmahn@gmail.com']">
            <text:p>['jag3773', 'superdav42', 'Simi Shonowo', 'root', 'Richard Mahn', 'richmahn', 'hubot', 'markalolo', 'richmahn@gmail.com']</text:p>
          </table:table-cell>
          <table:table-cell office:value-type="string" office:string-value="25">
            <text:p>25</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01T19:33:07Z">
            <text:p>2016-12-01T19:33:07Z</text:p>
          </table:table-cell>
          <table:table-cell office:value-type="string" office:string-value="unfoldingWord-dev/hubot">
            <text:p>unfoldingWord-dev/hubot</text:p>
          </table:table-cell>
          <table:table-cell office:value-type="string" office:string-value="https://github.com/unfoldingWord-dev/hubot">
            <text:p>https://github.com/unfoldingWord-dev/hubot</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hubot">
            <text:p>hubo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Katalon_MD-TSV_Converter_Koz">
            <text:p>unfoldingWord/Katalon_MD-TSV_Converter_Koz</text:p>
          </table:table-cell>
          <table:table-cell office:value-type="string" office:string-value="https://github.com/unfoldingWord/Katalon_MD-TSV_Converter_Koz">
            <text:p>https://github.com/unfoldingWord/Katalon_MD-TSV_Converter_Koz</text:p>
          </table:table-cell>
          <table:table-cell office:value-type="string" office:string-value="Groovy">
            <text:p>Groovy</text:p>
          </table:table-cell>
          <table:table-cell office:value-type="string" office:string-value="False">
            <text:p>False</text:p>
          </table:table-cell>
          <table:table-cell office:value-type="string" office:string-value="False">
            <text:p>False</text:p>
          </table:table-cell>
          <table:table-cell office:value-type="string" office:string-value="2021-07-01T04:35:46Z">
            <text:p>2021-07-01T04:35:46Z</text:p>
          </table:table-cell>
          <table:table-cell office:value-type="string" office:string-value="2021-07-01T04:33:40Z">
            <text:p>2021-07-01T04:33:40Z</text:p>
          </table:table-cell>
          <table:table-cell office:value-type="string" office:string-value="">
            <text:p/>
          </table:table-cell>
          <table:table-cell office:value-type="string" office:string-value="">
            <text:p/>
          </table:table-cell>
          <table:table-cell office:value-type="string" office:string-value="cckozie">
            <text:p>cckozie</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7-01T04:36:22Z">
            <text:p>2021-07-01T04:36:22Z</text:p>
          </table:table-cell>
          <table:table-cell office:value-type="string" office:string-value="unfoldingWord/Katalon_MD-TSV_Converter_Koz">
            <text:p>unfoldingWord/Katalon_MD-TSV_Converter_Koz</text:p>
          </table:table-cell>
          <table:table-cell office:value-type="string" office:string-value="https://github.com/unfoldingWord/Katalon_MD-TSV_Converter_Koz">
            <text:p>https://github.com/unfoldingWord/Katalon_MD-TSV_Converter_Koz</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59 months ago) with no usage, downloads, or releases.">
            <text:p>Repository has very few commits (2) and has had no activity in over 36 months (59 months ago) with no usage, downloads, or releases.</text:p>
          </table:table-cell>
          <table:table-cell office:value-type="string" office:string-value="">
            <text:p/>
          </table:table-cell>
          <table:table-cell office:value-type="string" office:string-value="">
            <text:p/>
          </table:table-cell>
          <table:table-cell office:value-type="string" office:string-value="Katalon_MD-TSV_Converter_Koz">
            <text:p>Katalon_MD-TSV_Converter_Koz</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lang-as-graph">
            <text:p>unfoldingWord-box3/lang-as-graph</text:p>
          </table:table-cell>
          <table:table-cell office:value-type="string" office:string-value="https://github.com/unfoldingWord-box3/lang-as-graph">
            <text:p>https://github.com/unfoldingWord-box3/lang-as-graph</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5T01:22:08Z">
            <text:p>2023-07-15T01:22:08Z</text:p>
          </table:table-cell>
          <table:table-cell office:value-type="string" office:string-value="2020-07-21T13:00:01Z">
            <text:p>2020-07-21T13:00:01Z</text:p>
          </table:table-cell>
          <table:table-cell office:value-type="string" office:string-value="">
            <text:p/>
          </table:table-cell>
          <table:table-cell office:value-type="string" office:string-value="">
            <text:p/>
          </table:table-cell>
          <table:table-cell office:value-type="string" office:string-value="['ivanmhale', 'jag3773']">
            <text:p>['ivanmhale', 'jag3773']</text:p>
          </table:table-cell>
          <table:table-cell office:value-type="string" office:string-value="5">
            <text:p>5</text:p>
          </table:table-cell>
          <table:table-cell office:value-type="string" office:string-value="5">
            <text:p>5</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language-database-poc">
            <text:p>language-databas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7-21T13:00:12Z">
            <text:p>2020-07-21T13:00:12Z</text:p>
          </table:table-cell>
          <table:table-cell office:value-type="string" office:string-value="unfoldingWord-box3/lang-as-graph">
            <text:p>unfoldingWord-box3/lang-as-graph</text:p>
          </table:table-cell>
          <table:table-cell office:value-type="string" office:string-value="https://github.com/unfoldingWord-box3/lang-as-graph">
            <text:p>https://github.com/unfoldingWord-box3/lang-as-graph</text:p>
          </table:table-cell>
          <table:table-cell office:value-type="string" office:string-value="0-No longer used candidate">
            <text:p>0-No longer used candidate</text:p>
          </table:table-cell>
          <table:table-cell office:value-type="string" office:string-value="Repository has had no commits in over 60 months (71 months ago) and has no usage, downloads (0), or releases (0).">
            <text:p>Repository has had no commits in over 60 months (71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lang-as-graph">
            <text:p>lang-as-graph</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media">
            <text:p>unfoldingWord-dev/media</text:p>
          </table:table-cell>
          <table:table-cell office:value-type="string" office:string-value="https://github.com/unfoldingWord-dev/media">
            <text:p>https://github.com/unfoldingWord-dev/media</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7-28T19:30:07Z">
            <text:p>2014-07-28T19:30:07Z</text:p>
          </table:table-cell>
          <table:table-cell office:value-type="string" office:string-value="2014-07-28T19:30:04Z">
            <text:p>2014-07-28T19:30:04Z</text:p>
          </table:table-cell>
          <table:table-cell office:value-type="string" office:string-value="">
            <text:p/>
          </table:table-cell>
          <table:table-cell office:value-type="string" office:string-value="">
            <text:p/>
          </table:table-cell>
          <table:table-cell office:value-type="string" office:string-value="['Door43', 'Distant Shores Media', 'root']">
            <text:p>['Door43', 'Distant Shores Media', 'root']</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21:37:51Z">
            <text:p>2015-06-23T21:37:51Z</text:p>
          </table:table-cell>
          <table:table-cell office:value-type="string" office:string-value="unfoldingWord-dev/media">
            <text:p>unfoldingWord-dev/media</text:p>
          </table:table-cell>
          <table:table-cell office:value-type="string" office:string-value="https://github.com/unfoldingWord-dev/media">
            <text:p>https://github.com/unfoldingWord-dev/media</text:p>
          </table:table-cell>
          <table:table-cell office:value-type="string" office:string-value="0-No longer used candidate">
            <text:p>0-No longer used candidate</text:p>
          </table:table-cell>
          <table:table-cell office:value-type="string" office:string-value="Repository has had no commits in over 60 months (143 months ago) and has no usage, downloads (0), or releases (0).">
            <text:p>Repository has had no commits in over 60 months (14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media">
            <text:p>medi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next-js-template">
            <text:p>unfoldingWord-box3/next-js-template</text:p>
          </table:table-cell>
          <table:table-cell office:value-type="string" office:string-value="https://github.com/unfoldingWord-box3/next-js-template">
            <text:p>https://github.com/unfoldingWord-box3/next-js-templat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9-26T15:07:50Z">
            <text:p>2022-09-26T15:07:50Z</text:p>
          </table:table-cell>
          <table:table-cell office:value-type="string" office:string-value="2022-09-26T15:07:50Z">
            <text:p>2022-09-26T15:07:50Z</text:p>
          </table:table-cell>
          <table:table-cell office:value-type="string" office:string-value="">
            <text:p/>
          </table:table-cell>
          <table:table-cell office:value-type="string" office:string-value="">
            <text:p/>
          </table:table-cell>
          <table:table-cell office:value-type="string" office:string-value="['mandolyte', 'superdav42', 'mannycolon', 'abelpz']">
            <text:p>['mandolyte', 'superdav42', 'mannycolon', 'abelpz']</text:p>
          </table:table-cell>
          <table:table-cell office:value-type="string" office:string-value="20">
            <text:p>20</text:p>
          </table:table-cell>
          <table:table-cell office:value-type="string" office:string-value="0">
            <text:p>0</text:p>
          </table:table-cell>
          <table:table-cell office:value-type="string" office:string-value="42">
            <text:p>4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next-js-template">
            <text:p>next-js-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resource-workspace-rcl', 'scripture-resources-rcl', 'single-scripture-rcl', 'tc-ui-toolkit', 'translation-helps-rcl', 'word-aligner', 'string-punctuation-tokenizer', 'usfm-js', 'wordmap-lexer', '@unfoldingword/eslint-config', 'bible-reference-range', 'uw-quote-helpers', 'word-aligner-rcl', 'word-aligner-lib', 'wordmap', 'uw-tsv-parser', 'dcs-branch-merger', 'tsv-groupdata-parser', 'uw-bible-parser', 'tc-strings', 'dcs-js']">
            <text:p>['gitea-react-toolkit', 'markdown-translatable', 'resource-workspace-rcl', 'scripture-resources-rcl', 'single-scripture-rcl', 'tc-ui-toolkit', 'translation-helps-rcl', 'word-aligner', 'string-punctuation-tokenizer', 'usfm-js', 'wordmap-lexer', '@unfoldingword/eslint-config', 'bible-reference-range', 'uw-quote-helpers', 'word-aligner-rcl', 'word-aligner-lib', 'wordmap', 'uw-tsv-parser', 'dcs-branch-merger', 'tsv-groupdata-parser', 'uw-bible-parser', 'tc-strings', 'dcs-js']</text:p>
          </table:table-cell>
          <table:table-cell office:value-type="string" office:string-value="2022-06-17T15:46:29Z">
            <text:p>2022-06-17T15:46:29Z</text:p>
          </table:table-cell>
          <table:table-cell office:value-type="string" office:string-value="unfoldingWord-box3/next-js-template">
            <text:p>unfoldingWord-box3/next-js-template</text:p>
          </table:table-cell>
          <table:table-cell office:value-type="string" office:string-value="https://github.com/unfoldingWord-box3/next-js-template">
            <text:p>https://github.com/unfoldingWord-box3/next-js-template</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45 months ago).">
            <text:p>Repository name suggests cleanup/test/demo content, it has no detected usage, and the last commit was over 24 months ago (45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next-js-template">
            <text:p>next-js-template</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obs-comparer">
            <text:p>unfoldingWord-dev/obs-comparer</text:p>
          </table:table-cell>
          <table:table-cell office:value-type="string" office:string-value="https://github.com/unfoldingWord-dev/obs-comparer">
            <text:p>https://github.com/unfoldingWord-dev/obs-comparer</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4-11T06:23:30Z">
            <text:p>2015-04-11T06:23:30Z</text:p>
          </table:table-cell>
          <table:table-cell office:value-type="string" office:string-value="2015-04-11T06:23:34Z">
            <text:p>2015-04-11T06:23:34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4-11T06:23:30Z">
            <text:p>2015-04-11T06:23:30Z</text:p>
          </table:table-cell>
          <table:table-cell office:value-type="string" office:string-value="unfoldingWord-dev/obs-comparer">
            <text:p>unfoldingWord-dev/obs-comparer</text:p>
          </table:table-cell>
          <table:table-cell office:value-type="string" office:string-value="https://github.com/unfoldingWord-dev/obs-comparer">
            <text:p>https://github.com/unfoldingWord-dev/obs-comparer</text:p>
          </table:table-cell>
          <table:table-cell office:value-type="string" office:string-value="0-No longer used candidate">
            <text:p>0-No longer used candidate</text:p>
          </table:table-cell>
          <table:table-cell office:value-type="string" office:string-value="Repository has had no commits in over 60 months (134 months ago) and has no usage, downloads (0), or releases (0).">
            <text:p>Repository has had no commits in over 60 months (13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obs-comparer">
            <text:p>obs-compar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obs-data">
            <text:p>unfoldingWord-dev/obs-data</text:p>
          </table:table-cell>
          <table:table-cell office:value-type="string" office:string-value="https://github.com/unfoldingWord-dev/obs-data">
            <text:p>https://github.com/unfoldingWord-dev/obs-data</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3-24T13:00:10Z">
            <text:p>2018-03-24T13:00:10Z</text:p>
          </table:table-cell>
          <table:table-cell office:value-type="string" office:string-value="2018-03-24T12:59:58Z">
            <text:p>2018-03-24T12:59:58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8-03-24T13:00:11Z">
            <text:p>2018-03-24T13:00:11Z</text:p>
          </table:table-cell>
          <table:table-cell office:value-type="string" office:string-value="unfoldingWord-dev/obs-data">
            <text:p>unfoldingWord-dev/obs-data</text:p>
          </table:table-cell>
          <table:table-cell office:value-type="string" office:string-value="https://github.com/unfoldingWord-dev/obs-data">
            <text:p>https://github.com/unfoldingWord-dev/obs-data</text:p>
          </table:table-cell>
          <table:table-cell office:value-type="string" office:string-value="0-No longer used candidate">
            <text:p>0-No longer used candidate</text:p>
          </table:table-cell>
          <table:table-cell office:value-type="string" office:string-value="Repository has very few commits (4) and has had no activity in over 36 months (99 months ago) with no usage, downloads, or releases.">
            <text:p>Repository has very few commits (4) and has had no activity in over 36 months (99 months ago) with no usage, downloads, or releases.</text:p>
          </table:table-cell>
          <table:table-cell office:value-type="string" office:string-value="">
            <text:p/>
          </table:table-cell>
          <table:table-cell office:value-type="string" office:string-value="">
            <text:p/>
          </table:table-cell>
          <table:table-cell office:value-type="string" office:string-value="obs-data">
            <text:p>obs-dat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obs-pdf-poc">
            <text:p>unfoldingWord-box3/obs-pdf-poc</text:p>
          </table:table-cell>
          <table:table-cell office:value-type="string" office:string-value="https://github.com/unfoldingWord-box3/obs-pdf-poc">
            <text:p>https://github.com/unfoldingWord-box3/obs-pdf-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26T01:31:57Z">
            <text:p>2023-04-26T01:31:57Z</text:p>
          </table:table-cell>
          <table:table-cell office:value-type="string" office:string-value="2023-04-26T01:31:54Z">
            <text:p>2023-04-26T01:31:54Z</text:p>
          </table:table-cell>
          <table:table-cell office:value-type="string" office:string-value="">
            <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unfoldingword/eslint-config']">
            <text:p>['markdown-translatable', '@unfoldingword/eslint-config']</text:p>
          </table:table-cell>
          <table:table-cell office:value-type="string" office:string-value="2021-11-03T19:29:18Z">
            <text:p>2021-11-03T19:29:18Z</text:p>
          </table:table-cell>
          <table:table-cell office:value-type="string" office:string-value="unfoldingWord-box3/obs-pdf-poc">
            <text:p>unfoldingWord-box3/obs-pdf-poc</text:p>
          </table:table-cell>
          <table:table-cell office:value-type="string" office:string-value="https://github.com/unfoldingWord-box3/obs-pdf-poc">
            <text:p>https://github.com/unfoldingWord-box3/obs-pdf-poc</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38 months ago).">
            <text:p>Repository name suggests cleanup/test/demo content, it has no detected usage, and the last commit was over 24 months ago (38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bs-pdf-poc">
            <text:p>obs-pdf-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obs-reader">
            <text:p>unfoldingWord-dev/obs-reader</text:p>
          </table:table-cell>
          <table:table-cell office:value-type="string" office:string-value="https://github.com/unfoldingWord-dev/obs-reader">
            <text:p>https://github.com/unfoldingWord-dev/obs-reader</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5-09-24T19:15:38Z">
            <text:p>2015-09-24T19:15:38Z</text:p>
          </table:table-cell>
          <table:table-cell office:value-type="string" office:string-value="2015-09-24T19:15:36Z">
            <text:p>2015-09-24T19:15:36Z</text:p>
          </table:table-cell>
          <table:table-cell office:value-type="string" office:string-value="">
            <text:p/>
          </table:table-cell>
          <table:table-cell office:value-type="string" office:string-value="">
            <text:p/>
          </table:table-cell>
          <table:table-cell office:value-type="string" office:string-value="['newmanr19', 'jag3773', 'phillip-hopper', 'root', 'Phil Hopper']">
            <text:p>['newmanr19', 'jag3773', 'phillip-hopper', 'root', 'Phil Hopper']</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3-09T22:06:24Z">
            <text:p>2015-03-09T22:06:24Z</text:p>
          </table:table-cell>
          <table:table-cell office:value-type="string" office:string-value="unfoldingWord-dev/obs-reader">
            <text:p>unfoldingWord-dev/obs-reader</text:p>
          </table:table-cell>
          <table:table-cell office:value-type="string" office:string-value="https://github.com/unfoldingWord-dev/obs-reader">
            <text:p>https://github.com/unfoldingWord-dev/obs-reader</text:p>
          </table:table-cell>
          <table:table-cell office:value-type="string" office:string-value="0-No longer used candidate">
            <text:p>0-No longer used candidate</text:p>
          </table:table-cell>
          <table:table-cell office:value-type="string" office:string-value="Repository has had no commits in over 60 months (129 months ago) and has no usage, downloads (0), or releases (0).">
            <text:p>Repository has had no commits in over 60 months (129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obs-reader">
            <text:p>obs-read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obs_tools">
            <text:p>unfoldingWord-dev/obs_tools</text:p>
          </table:table-cell>
          <table:table-cell office:value-type="string" office:string-value="https://github.com/unfoldingWord-dev/obs_tools">
            <text:p>https://github.com/unfoldingWord-dev/obs_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11:48:14Z">
            <text:p>2018-06-04T11:48:14Z</text:p>
          </table:table-cell>
          <table:table-cell office:value-type="string" office:string-value="2016-12-20T14:11:44Z">
            <text:p>2016-12-20T14:11:44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29T19:48:09Z">
            <text:p>2016-08-29T19:48:09Z</text:p>
          </table:table-cell>
          <table:table-cell office:value-type="string" office:string-value="unfoldingWord-dev/obs_tools">
            <text:p>unfoldingWord-dev/obs_tools</text:p>
          </table:table-cell>
          <table:table-cell office:value-type="string" office:string-value="https://github.com/unfoldingWord-dev/obs_tools">
            <text:p>https://github.com/unfoldingWord-dev/obs_tools</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obs_tools">
            <text:p>obs_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old-tx-manager-lambda">
            <text:p>unfoldingWord-dev/old-tx-manager-lambda</text:p>
          </table:table-cell>
          <table:table-cell office:value-type="string" office:string-value="https://github.com/unfoldingWord-dev/old-tx-manager-lambda">
            <text:p>https://github.com/unfoldingWord-dev/old-tx-manager-lambda</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19T15:13:30Z">
            <text:p>2016-12-19T15:13:30Z</text:p>
          </table:table-cell>
          <table:table-cell office:value-type="string" office:string-value="2016-12-19T15:13:25Z">
            <text:p>2016-12-19T15:13:25Z</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1-23T14:56:14Z">
            <text:p>2017-01-23T14:56:14Z</text:p>
          </table:table-cell>
          <table:table-cell office:value-type="string" office:string-value="unfoldingWord-dev/old-tx-manager-lambda">
            <text:p>unfoldingWord-dev/old-tx-manager-lambda</text:p>
          </table:table-cell>
          <table:table-cell office:value-type="string" office:string-value="https://github.com/unfoldingWord-dev/old-tx-manager-lambda">
            <text:p>https://github.com/unfoldingWord-dev/old-tx-manager-lambda</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old-tx-manager-lambda">
            <text:p>old-tx-manager-lambd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pdf-generator">
            <text:p>unfoldingWord-box3/pdf-generator</text:p>
          </table:table-cell>
          <table:table-cell office:value-type="string" office:string-value="https://github.com/unfoldingWord-box3/pdf-generator">
            <text:p>https://github.com/unfoldingWord-box3/pdf-generato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09T16:44:00Z">
            <text:p>2020-10-09T16:44:00Z</text:p>
          </table:table-cell>
          <table:table-cell office:value-type="string" office:string-value="2020-10-09T16:43:56Z">
            <text:p>2020-10-09T16:43:5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df-generator">
            <text:p>pdf-gener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string-punctuation-tokenizer', 'tc-source-content-updater', 'tsv-groupdata-parser', 'usfm-js', 'wordmap-lexer', 'bible-reference-range', 'gitea-react-toolkit', 'markdown-translatable', 'tc-ui-toolkit', 'uw-quote-helpers', 'word-aligner', '@unfoldingword/eslint-config', 'uw-tsv-parser', 'uw-bible-parser']">
            <text:p>['scripture-resources-rcl', 'string-punctuation-tokenizer', 'tc-source-content-updater', 'tsv-groupdata-parser', 'usfm-js', 'wordmap-lexer', 'bible-reference-range', 'gitea-react-toolkit', 'markdown-translatable', 'tc-ui-toolkit', 'uw-quote-helpers', 'word-aligner', '@unfoldingword/eslint-config', 'uw-tsv-parser', 'uw-bible-parser']</text:p>
          </table:table-cell>
          <table:table-cell office:value-type="string" office:string-value="2020-10-09T16:44:02Z">
            <text:p>2020-10-09T16:44:02Z</text:p>
          </table:table-cell>
          <table:table-cell office:value-type="string" office:string-value="unfoldingWord-box3/pdf-generator">
            <text:p>unfoldingWord-box3/pdf-generator</text:p>
          </table:table-cell>
          <table:table-cell office:value-type="string" office:string-value="https://github.com/unfoldingWord-box3/pdf-generator">
            <text:p>https://github.com/unfoldingWord-box3/pdf-generator</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68 months ago) with no usage, downloads, or releases.">
            <text:p>Repository has very few commits (2) and has had no activity in over 36 months (68 months ago) with no usage, downloads, or release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pdf-generator">
            <text:p>pdf-generator</text:p>
          </table:table-cell>
          <table:table-cell office:value-type="string" office:string-value="unfoldingWord-box3">
            <text:p>unfoldingWord-box3</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pdf-splitter">
            <text:p>unfoldingWord-box3/pdf-splitter</text:p>
          </table:table-cell>
          <table:table-cell office:value-type="string" office:string-value="https://github.com/unfoldingWord-box3/pdf-splitter">
            <text:p>https://github.com/unfoldingWord-box3/pdf-splitter</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24T13:19:57Z">
            <text:p>2022-02-24T13:19:57Z</text:p>
          </table:table-cell>
          <table:table-cell office:value-type="string" office:string-value="2022-02-24T13:19:55Z">
            <text:p>2022-02-24T13:19:55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2-24T13:17:52Z">
            <text:p>2022-02-24T13:17:52Z</text:p>
          </table:table-cell>
          <table:table-cell office:value-type="string" office:string-value="unfoldingWord-box3/pdf-splitter">
            <text:p>unfoldingWord-box3/pdf-splitter</text:p>
          </table:table-cell>
          <table:table-cell office:value-type="string" office:string-value="https://github.com/unfoldingWord-box3/pdf-splitter">
            <text:p>https://github.com/unfoldingWord-box3/pdf-splitter</text:p>
          </table:table-cell>
          <table:table-cell office:value-type="string" office:string-value="0-No longer used candidate">
            <text:p>0-No longer used candidate</text:p>
          </table:table-cell>
          <table:table-cell office:value-type="string" office:string-value="Repository has very few commits (5) and has had no activity in over 36 months (52 months ago) with no usage, downloads, or releases.">
            <text:p>Repository has very few commits (5) and has had no activity in over 36 months (52 months ago) with no usage, downloads, or releases.</text:p>
          </table:table-cell>
          <table:table-cell office:value-type="string" office:string-value="">
            <text:p/>
          </table:table-cell>
          <table:table-cell office:value-type="string" office:string-value="">
            <text:p/>
          </table:table-cell>
          <table:table-cell office:value-type="string" office:string-value="pdf-splitter">
            <text:p>pdf-splitt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pi-collab">
            <text:p>unfoldingWord-dev/pi-collab</text:p>
          </table:table-cell>
          <table:table-cell office:value-type="string" office:string-value="https://github.com/unfoldingWord-dev/pi-collab">
            <text:p>https://github.com/unfoldingWord-dev/pi-collab</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5-05-24T20:40:08Z">
            <text:p>2015-05-24T20:40:08Z</text:p>
          </table:table-cell>
          <table:table-cell office:value-type="string" office:string-value="2015-05-24T20:40:01Z">
            <text:p>2015-05-24T20:40:01Z</text:p>
          </table:table-cell>
          <table:table-cell office:value-type="string" office:string-value="">
            <text:p/>
          </table:table-cell>
          <table:table-cell office:value-type="string" office:string-value="">
            <text:p/>
          </table:table-cell>
          <table:table-cell office:value-type="string" office:string-value="['knutsenm', 'Jesse A. Griffin', 'jag3773', 'Shay Hayes']">
            <text:p>['knutsenm', 'Jesse A. Griffin', 'jag3773', 'Shay Hayes']</text:p>
          </table:table-cell>
          <table:table-cell office:value-type="string" office:string-value="3">
            <text:p>3</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4-22T10:55:48Z">
            <text:p>2016-04-22T10:55:48Z</text:p>
          </table:table-cell>
          <table:table-cell office:value-type="string" office:string-value="unfoldingWord-dev/pi-collab">
            <text:p>unfoldingWord-dev/pi-collab</text:p>
          </table:table-cell>
          <table:table-cell office:value-type="string" office:string-value="https://github.com/unfoldingWord-dev/pi-collab">
            <text:p>https://github.com/unfoldingWord-dev/pi-collab</text:p>
          </table:table-cell>
          <table:table-cell office:value-type="string" office:string-value="0-No longer used candidate">
            <text:p>0-No longer used candidate</text:p>
          </table:table-cell>
          <table:table-cell office:value-type="string" office:string-value="Repository has had no commits in over 60 months (133 months ago) and has no usage, downloads (0), or releases (0).">
            <text:p>Repository has had no commits in over 60 months (13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pi-collab">
            <text:p>pi-collab</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PublishingBlockchain">
            <text:p>unfoldingWord-dev/PublishingBlockchain</text:p>
          </table:table-cell>
          <table:table-cell office:value-type="string" office:string-value="https://github.com/unfoldingWord-dev/PublishingBlockchain">
            <text:p>https://github.com/unfoldingWord-dev/PublishingBlockchain</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2-22T23:26:11Z">
            <text:p>2015-12-22T23:26:11Z</text:p>
          </table:table-cell>
          <table:table-cell office:value-type="string" office:string-value="2015-12-22T23:26:11Z">
            <text:p>2015-12-22T23:26:11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8-03-11T20:57:04Z">
            <text:p>2018-03-11T20:57:04Z</text:p>
          </table:table-cell>
          <table:table-cell office:value-type="string" office:string-value="unfoldingWord-dev/PublishingBlockchain">
            <text:p>unfoldingWord-dev/PublishingBlockchain</text:p>
          </table:table-cell>
          <table:table-cell office:value-type="string" office:string-value="https://github.com/unfoldingWord-dev/PublishingBlockchain">
            <text:p>https://github.com/unfoldingWord-dev/PublishingBlockchain</text:p>
          </table:table-cell>
          <table:table-cell office:value-type="string" office:string-value="0-No longer used candidate">
            <text:p>0-No longer used candidate</text:p>
          </table:table-cell>
          <table:table-cell office:value-type="string" office:string-value="Repository has very few commits (5) and has had no activity in over 36 months (126 months ago) with no usage, downloads, or releases.">
            <text:p>Repository has very few commits (5) and has had no activity in over 36 months (126 months ago) with no usage, downloads, or releases.</text:p>
          </table:table-cell>
          <table:table-cell office:value-type="string" office:string-value="">
            <text:p/>
          </table:table-cell>
          <table:table-cell office:value-type="string" office:string-value="">
            <text:p/>
          </table:table-cell>
          <table:table-cell office:value-type="string" office:string-value="PublishingBlockchain">
            <text:p>PublishingBlockchai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python-aws-tools">
            <text:p>unfoldingWord-dev/python-aws-tools</text:p>
          </table:table-cell>
          <table:table-cell office:value-type="string" office:string-value="https://github.com/unfoldingWord-dev/python-aws-tools">
            <text:p>https://github.com/unfoldingWord-dev/python-aws-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6-30T18:36:54Z">
            <text:p>2017-06-30T18:36:54Z</text:p>
          </table:table-cell>
          <table:table-cell office:value-type="string" office:string-value="2017-06-30T18:36:02Z">
            <text:p>2017-06-30T18:36:02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8-23T22:31:23Z">
            <text:p>2017-08-23T22:31:23Z</text:p>
          </table:table-cell>
          <table:table-cell office:value-type="string" office:string-value="unfoldingWord-dev/python-aws-tools">
            <text:p>unfoldingWord-dev/python-aws-tools</text:p>
          </table:table-cell>
          <table:table-cell office:value-type="string" office:string-value="https://github.com/unfoldingWord-dev/python-aws-tools">
            <text:p>https://github.com/unfoldingWord-dev/python-aws-tools</text:p>
          </table:table-cell>
          <table:table-cell office:value-type="string" office:string-value="0-No longer used candidate">
            <text:p>0-No longer used candidate</text:p>
          </table:table-cell>
          <table:table-cell office:value-type="string" office:string-value="Repository has had no commits in over 60 months (108 months ago) and has no usage, downloads (0), or releases (0).">
            <text:p>Repository has had no commits in over 60 months (108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python-aws-tools">
            <text:p>python-aws-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s3_list-zip">
            <text:p>unfoldingWord-dev/s3_list-zip</text:p>
          </table:table-cell>
          <table:table-cell office:value-type="string" office:string-value="https://github.com/unfoldingWord-dev/s3_list-zip">
            <text:p>https://github.com/unfoldingWord-dev/s3_list-zi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2-19T22:47:48Z">
            <text:p>2016-02-19T22:47:48Z</text:p>
          </table:table-cell>
          <table:table-cell office:value-type="string" office:string-value="2016-02-19T22:47:37Z">
            <text:p>2016-02-19T22:47:37Z</text:p>
          </table:table-cell>
          <table:table-cell office:value-type="string" office:string-value="">
            <text:p/>
          </table:table-cell>
          <table:table-cell office:value-type="string" office:string-value="">
            <text:p/>
          </table:table-cell>
          <table:table-cell office:value-type="string" office:string-value="codemis">
            <text:p>codemis</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2-19T21:11:59Z">
            <text:p>2016-02-19T21:11:59Z</text:p>
          </table:table-cell>
          <table:table-cell office:value-type="string" office:string-value="unfoldingWord-dev/s3_list-zip">
            <text:p>unfoldingWord-dev/s3_list-zip</text:p>
          </table:table-cell>
          <table:table-cell office:value-type="string" office:string-value="https://github.com/unfoldingWord-dev/s3_list-zip">
            <text:p>https://github.com/unfoldingWord-dev/s3_list-zip</text:p>
          </table:table-cell>
          <table:table-cell office:value-type="string" office:string-value="0-No longer used candidate">
            <text:p>0-No longer used candidate</text:p>
          </table:table-cell>
          <table:table-cell office:value-type="string" office:string-value="Repository has had no commits in over 60 months (124 months ago) and has no usage, downloads (0), or releases (0).">
            <text:p>Repository has had no commits in over 60 months (12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s3_list-zip">
            <text:p>s3_list-zi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ld Manny prototype">
            <text:p>Old Manny prototype</text:p>
          </table:table-cell>
          <table:table-cell office:value-type="string" office:string-value="unfoldingWord-box3/sample-react-component-library">
            <text:p>unfoldingWord-box3/sample-react-component-library</text:p>
          </table:table-cell>
          <table:table-cell office:value-type="string" office:string-value="https://github.com/unfoldingWord-box3/sample-react-component-library">
            <text:p>https://github.com/unfoldingWord-box3/sample-react-component-librar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7-28T16:44:35Z">
            <text:p>2020-07-28T16:44:35Z</text:p>
          </table:table-cell>
          <table:table-cell office:value-type="string" office:string-value="2020-07-28T16:43:21Z">
            <text:p>2020-07-28T16:43:21Z</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ample-react-component-library">
            <text:p>sample-react-component-library</text:p>
          </table:table-cell>
          <table:table-cell office:value-type="string" office:string-value="https://www.npmjs.com/package/sample-react-component-library">
            <text:p>https://www.npmjs.com/package/sample-react-component-library</text:p>
          </table:table-cell>
          <table:table-cell office:value-type="string" office:string-value="False">
            <text:p>False</text:p>
          </table:table-cell>
          <table:table-cell office:value-type="string" office:string-value="60">
            <text:p>60</text:p>
          </table:table-cell>
          <table:table-cell office:value-type="string" office:string-value="2020-07-28T16:44:56.434Z">
            <text:p>2020-07-28T16:44:56.434Z</text:p>
          </table:table-cell>
          <table:table-cell office:value-type="string" office:string-value="">
            <text:p/>
          </table:table-cell>
          <table:table-cell office:value-type="string" office:string-value="">
            <text:p/>
          </table:table-cell>
          <table:table-cell office:value-type="string" office:string-value="2020-07-28T16:44:37Z">
            <text:p>2020-07-28T16:44:37Z</text:p>
          </table:table-cell>
          <table:table-cell office:value-type="string" office:string-value="unfoldingWord-box3/sample-react-component-library">
            <text:p>unfoldingWord-box3/sample-react-component-library</text:p>
          </table:table-cell>
          <table:table-cell office:value-type="string" office:string-value="https://github.com/unfoldingWord-box3/sample-react-component-library">
            <text:p>https://github.com/unfoldingWord-box3/sample-react-component-library</text:p>
          </table:table-cell>
          <table:table-cell office:value-type="string" office:string-value="0-No longer used candidate">
            <text:p>0-No longer used candidate</text:p>
          </table:table-cell>
          <table:table-cell office:value-type="string" office:string-value="Repository has had no commits in over 60 months (71 months ago) and has no usage, downloads (0), or releases (0).">
            <text:p>Repository has had no commits in over 60 months (71 months ago) and has no usage, downloads (0), or releases (0).</text:p>
          </table:table-cell>
          <table:table-cell office:value-type="string" office:string-value="Deprecate npm package candidate">
            <text:p>Deprecate npm package candidate</text:p>
          </table:table-cell>
          <table:table-cell office:value-type="string" office:string-value="Package has not been published in over 24 months (71 months ago), has fewer than 100 downloads in the last year (60), and has no detected local consumers.">
            <text:p>Package has not been published in over 24 months (71 months ago), has fewer than 100 downloads in the last year (60), and has no detected local consumers.</text:p>
          </table:table-cell>
          <table:table-cell office:value-type="string" office:string-value="sample-react-component-library">
            <text:p>sample-react-component-librar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sigadd">
            <text:p>unfoldingWord-dev/sigadd</text:p>
          </table:table-cell>
          <table:table-cell office:value-type="string" office:string-value="https://github.com/unfoldingWord-dev/sigadd">
            <text:p>https://github.com/unfoldingWord-dev/sigad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4-01T22:00:27Z">
            <text:p>2015-04-01T22:00:27Z</text:p>
          </table:table-cell>
          <table:table-cell office:value-type="string" office:string-value="2015-04-01T22:00:25Z">
            <text:p>2015-04-01T22:00:25Z</text:p>
          </table:table-cell>
          <table:table-cell office:value-type="string" office:string-value="">
            <text:p/>
          </table:table-cell>
          <table:table-cell office:value-type="string" office:string-value="">
            <text:p/>
          </table:table-cell>
          <table:table-cell office:value-type="string" office:string-value="['da1nerd', 'Jesse A. Griffin', 'root']">
            <text:p>['da1nerd', 'Jesse A. Griffin', 'root']</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4-01T22:00:28Z">
            <text:p>2015-04-01T22:00:28Z</text:p>
          </table:table-cell>
          <table:table-cell office:value-type="string" office:string-value="unfoldingWord-dev/sigadd">
            <text:p>unfoldingWord-dev/sigadd</text:p>
          </table:table-cell>
          <table:table-cell office:value-type="string" office:string-value="https://github.com/unfoldingWord-dev/sigadd">
            <text:p>https://github.com/unfoldingWord-dev/sigadd</text:p>
          </table:table-cell>
          <table:table-cell office:value-type="string" office:string-value="0-No longer used candidate">
            <text:p>0-No longer used candidate</text:p>
          </table:table-cell>
          <table:table-cell office:value-type="string" office:string-value="Repository has had no commits in over 60 months (134 months ago) and has no usage, downloads (0), or releases (0).">
            <text:p>Repository has had no commits in over 60 months (13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sigadd">
            <text:p>sigad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_pane">
            <text:p>unfoldingWord-dev/t_pane</text:p>
          </table:table-cell>
          <table:table-cell office:value-type="string" office:string-value="https://github.com/unfoldingWord-dev/t_pane">
            <text:p>https://github.com/unfoldingWord-dev/t_pan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09T21:08:27Z">
            <text:p>2016-12-09T21:08:27Z</text:p>
          </table:table-cell>
          <table:table-cell office:value-type="string" office:string-value="2016-11-17T09:19:42Z">
            <text:p>2016-11-17T09:19:42Z</text:p>
          </table:table-cell>
          <table:table-cell office:value-type="string" office:string-value="">
            <text:p/>
          </table:table-cell>
          <table:table-cell office:value-type="string" office:string-value="">
            <text:p/>
          </table:table-cell>
          <table:table-cell office:value-type="string" office:string-value="['ihoegen', 'Sterling (Jay) Scott', 'mannycolon', 'RoyalSix']">
            <text:p>['ihoegen', 'Sterling (Jay) Scott', 'mannycolon', 'RoyalSix']</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Pane">
            <text:p>T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19:34:26Z">
            <text:p>2019-10-22T19:34:26Z</text:p>
          </table:table-cell>
          <table:table-cell office:value-type="string" office:string-value="unfoldingWord-dev/t_pane">
            <text:p>unfoldingWord-dev/t_pane</text:p>
          </table:table-cell>
          <table:table-cell office:value-type="string" office:string-value="https://github.com/unfoldingWord-dev/t_pane">
            <text:p>https://github.com/unfoldingWord-dev/t_pane</text:p>
          </table:table-cell>
          <table:table-cell office:value-type="string" office:string-value="0-No longer used candidate">
            <text:p>0-No longer used candidate</text:p>
          </table:table-cell>
          <table:table-cell office:value-type="string" office:string-value="Repository has had no commits in over 60 months (115 months ago) and has no usage, downloads (0), or releases (0).">
            <text:p>Repository has had no commits in over 60 months (115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_pane">
            <text:p>t_pan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CCreateQA-Daniel">
            <text:p>unfoldingWord/tCCreateQA-Daniel</text:p>
          </table:table-cell>
          <table:table-cell office:value-type="string" office:string-value="https://github.com/unfoldingWord/tCCreateQA-Daniel">
            <text:p>https://github.com/unfoldingWord/tCCreateQA-Daniel</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2-15T18:34:01Z">
            <text:p>2023-02-15T18:34:01Z</text:p>
          </table:table-cell>
          <table:table-cell office:value-type="string" office:string-value="2023-02-15T18:34:00Z">
            <text:p>2023-02-15T18:34:00Z</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2-15T18:34:00Z">
            <text:p>2023-02-15T18:34:00Z</text:p>
          </table:table-cell>
          <table:table-cell office:value-type="string" office:string-value="unfoldingWord/tCCreateQA-Daniel">
            <text:p>unfoldingWord/tCCreateQA-Daniel</text:p>
          </table:table-cell>
          <table:table-cell office:value-type="string" office:string-value="https://github.com/unfoldingWord/tCCreateQA-Daniel">
            <text:p>https://github.com/unfoldingWord/tCCreateQA-Daniel</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40 months ago) with no usage, downloads, or releases.">
            <text:p>Repository has very few commits (1) and has had no activity in over 36 months (40 months ago) with no usage, downloads, or releases.</text:p>
          </table:table-cell>
          <table:table-cell office:value-type="string" office:string-value="">
            <text:p/>
          </table:table-cell>
          <table:table-cell office:value-type="string" office:string-value="">
            <text:p/>
          </table:table-cell>
          <table:table-cell office:value-type="string" office:string-value="tCCreateQA-Daniel">
            <text:p>tCCreateQA-Danie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d-neo4j-poc">
            <text:p>unfoldingWord-box3/td-neo4j-poc</text:p>
          </table:table-cell>
          <table:table-cell office:value-type="string" office:string-value="https://github.com/unfoldingWord-box3/td-neo4j-poc">
            <text:p>https://github.com/unfoldingWord-box3/td-neo4j-poc</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04-25T18:44:28Z">
            <text:p>2019-04-25T18:44:28Z</text:p>
          </table:table-cell>
          <table:table-cell office:value-type="string" office:string-value="2019-04-25T18:44:27Z">
            <text:p>2019-04-25T18:44:27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4-25T18:44:29Z">
            <text:p>2019-04-25T18:44:29Z</text:p>
          </table:table-cell>
          <table:table-cell office:value-type="string" office:string-value="unfoldingWord-box3/td-neo4j-poc">
            <text:p>unfoldingWord-box3/td-neo4j-poc</text:p>
          </table:table-cell>
          <table:table-cell office:value-type="string" office:string-value="https://github.com/unfoldingWord-box3/td-neo4j-poc">
            <text:p>https://github.com/unfoldingWord-box3/td-neo4j-poc</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86 months ago) with no usage, downloads, or releases.">
            <text:p>Repository has very few commits (1) and has had no activity in over 36 months (86 months ago) with no usage, downloads, or releases.</text:p>
          </table:table-cell>
          <table:table-cell office:value-type="string" office:string-value="">
            <text:p/>
          </table:table-cell>
          <table:table-cell office:value-type="string" office:string-value="">
            <text:p/>
          </table:table-cell>
          <table:table-cell office:value-type="string" office:string-value="td-neo4j-poc">
            <text:p>td-neo4j-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oolTemplate">
            <text:p>unfoldingWord-dev/toolTemplate</text:p>
          </table:table-cell>
          <table:table-cell office:value-type="string" office:string-value="https://github.com/unfoldingWord-dev/toolTemplate">
            <text:p>https://github.com/unfoldingWord-dev/toolTemplat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4:11Z">
            <text:p>2019-04-15T16:34:11Z</text:p>
          </table:table-cell>
          <table:table-cell office:value-type="string" office:string-value="2019-04-15T16:34:08Z">
            <text:p>2019-04-15T16:34:08Z</text:p>
          </table:table-cell>
          <table:table-cell office:value-type="string" office:string-value="">
            <text:p/>
          </table:table-cell>
          <table:table-cell office:value-type="string" office:string-value="">
            <text:p/>
          </table:table-cell>
          <table:table-cell office:value-type="string" office:string-value="['klappy', 'da1nerd', 'ImgBotApp', 'mannycolon']">
            <text:p>['klappy', 'da1nerd', 'ImgBotApp', 'mannycolon']</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oolTemplate">
            <text:p>tool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2019-10-22T19:38:20Z">
            <text:p>2019-10-22T19:38:20Z</text:p>
          </table:table-cell>
          <table:table-cell office:value-type="string" office:string-value="unfoldingWord-dev/toolTemplate">
            <text:p>unfoldingWord-dev/toolTemplate</text:p>
          </table:table-cell>
          <table:table-cell office:value-type="string" office:string-value="https://github.com/unfoldingWord-dev/toolTemplate">
            <text:p>https://github.com/unfoldingWord-dev/toolTemplate</text:p>
          </table:table-cell>
          <table:table-cell office:value-type="string" office:string-value="0-No longer used candidate">
            <text:p>0-No longer used candidate</text:p>
          </table:table-cell>
          <table:table-cell office:value-type="string" office:string-value="Repository has had no commits in over 60 months (86 months ago) and has no usage, downloads (0), or releases (0).">
            <text:p>Repository has had no commits in over 60 months (86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oolTemplate">
            <text:p>toolTemplat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delete">
            <text:p>delete</text:p>
          </table:table-cell>
          <table:table-cell office:value-type="string" office:string-value="">
            <text:p/>
          </table:table-cell>
          <table:table-cell office:value-type="string" office:string-value="">
            <text:p/>
          </table:table-cell>
          <table:table-cell office:value-type="string" office:string-value="unfoldingWord-dev/tr-requirements">
            <text:p>unfoldingWord-dev/tr-requirements</text:p>
          </table:table-cell>
          <table:table-cell office:value-type="string" office:string-value="https://github.com/unfoldingWord-dev/tr-requirements">
            <text:p>https://github.com/unfoldingWord-dev/tr-requiremen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6-24T21:33:04Z">
            <text:p>2015-06-24T21:33:04Z</text:p>
          </table:table-cell>
          <table:table-cell office:value-type="string" office:string-value="2015-06-24T21:33:02Z">
            <text:p>2015-06-24T21:33:02Z</text:p>
          </table:table-cell>
          <table:table-cell office:value-type="string" office:string-value="">
            <text:p/>
          </table:table-cell>
          <table:table-cell office:value-type="string" office:string-value="">
            <text:p/>
          </table:table-cell>
          <table:table-cell office:value-type="string" office:string-value="['Jesse A. Griffin', 'jag3773']">
            <text:p>['Jesse A. Griffin', 'jag3773']</text:p>
          </table:table-cell>
          <table:table-cell office:value-type="string" office:string-value="3">
            <text:p>3</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4T21:29:18Z">
            <text:p>2015-06-24T21:29:18Z</text:p>
          </table:table-cell>
          <table:table-cell office:value-type="string" office:string-value="unfoldingWord-dev/tr-requirements">
            <text:p>unfoldingWord-dev/tr-requirements</text:p>
          </table:table-cell>
          <table:table-cell office:value-type="string" office:string-value="https://github.com/unfoldingWord-dev/tr-requirements">
            <text:p>https://github.com/unfoldingWord-dev/tr-requirements</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132 months ago) with no usage, downloads, or releases.">
            <text:p>Repository has very few commits (2) and has had no activity in over 36 months (132 months ago) with no usage, downloads, or releases.</text:p>
          </table:table-cell>
          <table:table-cell office:value-type="string" office:string-value="">
            <text:p/>
          </table:table-cell>
          <table:table-cell office:value-type="string" office:string-value="">
            <text:p/>
          </table:table-cell>
          <table:table-cell office:value-type="string" office:string-value="tr-requirements">
            <text:p>tr-requiremen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ranslate-markdown-poc">
            <text:p>unfoldingWord-box3/translate-markdown-poc</text:p>
          </table:table-cell>
          <table:table-cell office:value-type="string" office:string-value="https://github.com/unfoldingWord-box3/translate-markdown-poc">
            <text:p>https://github.com/unfoldingWord-box3/translate-markdown-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03T17:34:50Z">
            <text:p>2019-04-03T17:34:50Z</text:p>
          </table:table-cell>
          <table:table-cell office:value-type="string" office:string-value="2019-04-03T17:22:30Z">
            <text:p>2019-04-03T17:22:30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67">
            <text:p>6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e-markdown">
            <text:p>translate-markdow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5-20T15:31:34Z">
            <text:p>2023-05-20T15:31:34Z</text:p>
          </table:table-cell>
          <table:table-cell office:value-type="string" office:string-value="unfoldingWord-box3/translate-markdown-poc">
            <text:p>unfoldingWord-box3/translate-markdown-poc</text:p>
          </table:table-cell>
          <table:table-cell office:value-type="string" office:string-value="https://github.com/unfoldingWord-box3/translate-markdown-poc">
            <text:p>https://github.com/unfoldingWord-box3/translate-markdown-poc</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86 months ago).">
            <text:p>Repository name suggests cleanup/test/demo content, it has no detected usage, and the last commit was over 24 months ago (86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e-markdown-poc">
            <text:p>translate-markdown-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ranslation-manager-poc">
            <text:p>unfoldingWord-box3/translation-manager-poc</text:p>
          </table:table-cell>
          <table:table-cell office:value-type="string" office:string-value="https://github.com/unfoldingWord-box3/translation-manager-poc">
            <text:p>https://github.com/unfoldingWord-box3/translation-manager-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11T11:37:33Z">
            <text:p>2022-12-11T11:37:33Z</text:p>
          </table:table-cell>
          <table:table-cell office:value-type="string" office:string-value="2020-01-28T22:33:18Z">
            <text:p>2020-01-28T22:33:18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24">
            <text:p>24</text:p>
          </table:table-cell>
          <table:table-cell office:value-type="string" office:string-value="24">
            <text:p>24</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manager-react-component-library">
            <text:p>translation-manager-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1-28T22:33:45Z">
            <text:p>2020-01-28T22:33:45Z</text:p>
          </table:table-cell>
          <table:table-cell office:value-type="string" office:string-value="unfoldingWord-box3/translation-manager-poc">
            <text:p>unfoldingWord-box3/translation-manager-poc</text:p>
          </table:table-cell>
          <table:table-cell office:value-type="string" office:string-value="https://github.com/unfoldingWord-box3/translation-manager-poc">
            <text:p>https://github.com/unfoldingWord-box3/translation-manager-poc</text:p>
          </table:table-cell>
          <table:table-cell office:value-type="string" office:string-value="0-No longer used candidate">
            <text:p>0-No longer used candidate</text:p>
          </table:table-cell>
          <table:table-cell office:value-type="string" office:string-value="Repository has very few commits (5) and has had no activity in over 36 months (77 months ago) with no usage, downloads, or releases.">
            <text:p>Repository has very few commits (5) and has had no activity in over 36 months (77 months ago) with no usage, downloads, or release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manager-poc">
            <text:p>translation-manager-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ranslation-process">
            <text:p>unfoldingWord-box3/translation-process</text:p>
          </table:table-cell>
          <table:table-cell office:value-type="string" office:string-value="https://github.com/unfoldingWord-box3/translation-process">
            <text:p>https://github.com/unfoldingWord-box3/translation-proces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3-22T14:32:16Z">
            <text:p>2019-03-22T14:32:16Z</text:p>
          </table:table-cell>
          <table:table-cell office:value-type="string" office:string-value="2019-03-22T14:30:55Z">
            <text:p>2019-03-22T14:30:55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process">
            <text:p>translation-proces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3-22T14:32:18Z">
            <text:p>2019-03-22T14:32:18Z</text:p>
          </table:table-cell>
          <table:table-cell office:value-type="string" office:string-value="unfoldingWord-box3/translation-process">
            <text:p>unfoldingWord-box3/translation-process</text:p>
          </table:table-cell>
          <table:table-cell office:value-type="string" office:string-value="https://github.com/unfoldingWord-box3/translation-process">
            <text:p>https://github.com/unfoldingWord-box3/translation-process</text:p>
          </table:table-cell>
          <table:table-cell office:value-type="string" office:string-value="0-No longer used candidate">
            <text:p>0-No longer used candidate</text:p>
          </table:table-cell>
          <table:table-cell office:value-type="string" office:string-value="Repository has had no commits in over 60 months (87 months ago) and has no usage, downloads (0), or releases (0).">
            <text:p>Repository has had no commits in over 60 months (87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process">
            <text:p>translation-proces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delete">
            <text:p>delete</text:p>
          </table:table-cell>
          <table:table-cell office:value-type="string" office:string-value="">
            <text:p/>
          </table:table-cell>
          <table:table-cell office:value-type="string" office:string-value="">
            <text:p/>
          </table:table-cell>
          <table:table-cell office:value-type="string" office:string-value="unfoldingWord-dev/translationWords-tC">
            <text:p>unfoldingWord-dev/translationWords-tC</text:p>
          </table:table-cell>
          <table:table-cell office:value-type="string" office:string-value="https://github.com/unfoldingWord-dev/translationWords-tC">
            <text:p>https://github.com/unfoldingWord-dev/translationWords-tC</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9:12:57Z">
            <text:p>2016-08-15T19:12:57Z</text:p>
          </table:table-cell>
          <table:table-cell office:value-type="string" office:string-value="2016-08-15T16:26:13Z">
            <text:p>2016-08-15T16:26:13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15T16:26:26Z">
            <text:p>2016-08-15T16:26:26Z</text:p>
          </table:table-cell>
          <table:table-cell office:value-type="string" office:string-value="unfoldingWord-dev/translationWords-tC">
            <text:p>unfoldingWord-dev/translationWords-tC</text:p>
          </table:table-cell>
          <table:table-cell office:value-type="string" office:string-value="https://github.com/unfoldingWord-dev/translationWords-tC">
            <text:p>https://github.com/unfoldingWord-dev/translationWords-tC</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118 months ago) with no usage, downloads, or releases.">
            <text:p>Repository has very few commits (2) and has had no activity in over 36 months (118 months ago) with no usage, downloads, or releases.</text:p>
          </table:table-cell>
          <table:table-cell office:value-type="string" office:string-value="">
            <text:p/>
          </table:table-cell>
          <table:table-cell office:value-type="string" office:string-value="">
            <text:p/>
          </table:table-cell>
          <table:table-cell office:value-type="string" office:string-value="translationWords-tC">
            <text:p>translationWords-t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s-exports">
            <text:p>unfoldingWord-dev/ts-exports</text:p>
          </table:table-cell>
          <table:table-cell office:value-type="string" office:string-value="https://github.com/unfoldingWord-dev/ts-exports">
            <text:p>https://github.com/unfoldingWord-dev/ts-expor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6-13T20:29:55Z">
            <text:p>2014-06-13T20:29:55Z</text:p>
          </table:table-cell>
          <table:table-cell office:value-type="string" office:string-value="2014-06-13T20:29:49Z">
            <text:p>2014-06-13T20:29:4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21:38:46Z">
            <text:p>2015-06-23T21:38:46Z</text:p>
          </table:table-cell>
          <table:table-cell office:value-type="string" office:string-value="unfoldingWord-dev/ts-exports">
            <text:p>unfoldingWord-dev/ts-exports</text:p>
          </table:table-cell>
          <table:table-cell office:value-type="string" office:string-value="https://github.com/unfoldingWord-dev/ts-exports">
            <text:p>https://github.com/unfoldingWord-dev/ts-exports</text:p>
          </table:table-cell>
          <table:table-cell office:value-type="string" office:string-value="0-No longer used candidate">
            <text:p>0-No longer used candidate</text:p>
          </table:table-cell>
          <table:table-cell office:value-type="string" office:string-value="Repository has very few commits (3) and has had no activity in over 36 months (144 months ago) with no usage, downloads, or releases.">
            <text:p>Repository has very few commits (3) and has had no activity in over 36 months (144 months ago) with no usage, downloads, or releases.</text:p>
          </table:table-cell>
          <table:table-cell office:value-type="string" office:string-value="">
            <text:p/>
          </table:table-cell>
          <table:table-cell office:value-type="string" office:string-value="">
            <text:p/>
          </table:table-cell>
          <table:table-cell office:value-type="string" office:string-value="ts-exports">
            <text:p>ts-expor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sv-editor">
            <text:p>unfoldingWord-box3/tsv-editor</text:p>
          </table:table-cell>
          <table:table-cell office:value-type="string" office:string-value="https://github.com/unfoldingWord-box3/tsv-editor">
            <text:p>https://github.com/unfoldingWord-box3/tsv-edito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0T00:13:59Z">
            <text:p>2019-04-10T00:13:59Z</text:p>
          </table:table-cell>
          <table:table-cell office:value-type="string" office:string-value="2019-04-10T00:12:52Z">
            <text:p>2019-04-10T00:12:52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36">
            <text:p>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editor">
            <text:p>tsv-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unfoldingword/eslint-config']">
            <text:p>['markdown-translatable', '@unfoldingword/eslint-config']</text:p>
          </table:table-cell>
          <table:table-cell office:value-type="string" office:string-value="2019-04-10T00:14:01Z">
            <text:p>2019-04-10T00:14:01Z</text:p>
          </table:table-cell>
          <table:table-cell office:value-type="string" office:string-value="unfoldingWord-box3/tsv-editor">
            <text:p>unfoldingWord-box3/tsv-editor</text:p>
          </table:table-cell>
          <table:table-cell office:value-type="string" office:string-value="https://github.com/unfoldingWord-box3/tsv-editor">
            <text:p>https://github.com/unfoldingWord-box3/tsv-editor</text:p>
          </table:table-cell>
          <table:table-cell office:value-type="string" office:string-value="0-No longer used candidate">
            <text:p>0-No longer used candidate</text:p>
          </table:table-cell>
          <table:table-cell office:value-type="string" office:string-value="Repository has had no commits in over 60 months (86 months ago) and has no usage, downloads (0), or releases (0).">
            <text:p>Repository has had no commits in over 60 months (86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sv-editor">
            <text:p>tsv-editor</text:p>
          </table:table-cell>
          <table:table-cell office:value-type="string" office:string-value="unfoldingWord-box3">
            <text:p>unfoldingWord-box3</text:p>
          </table:table-cell>
        </table:table-row>
        <table:table-row>
          <table:table-cell office:value-type="string" office:string-value="Jesse Griffin">
            <text:p>Jesse Griffin</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w_consistency">
            <text:p>unfoldingWord-dev/tw_consistency</text:p>
          </table:table-cell>
          <table:table-cell office:value-type="string" office:string-value="https://github.com/unfoldingWord-dev/tw_consistency">
            <text:p>https://github.com/unfoldingWord-dev/tw_consistency</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8-22T12:10:23Z">
            <text:p>2017-08-22T12:10:23Z</text:p>
          </table:table-cell>
          <table:table-cell office:value-type="string" office:string-value="2017-08-22T12:10:13Z">
            <text:p>2017-08-22T12:10:13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6-16T19:00:44Z">
            <text:p>2017-06-16T19:00:44Z</text:p>
          </table:table-cell>
          <table:table-cell office:value-type="string" office:string-value="unfoldingWord-dev/tw_consistency">
            <text:p>unfoldingWord-dev/tw_consistency</text:p>
          </table:table-cell>
          <table:table-cell office:value-type="string" office:string-value="https://github.com/unfoldingWord-dev/tw_consistency">
            <text:p>https://github.com/unfoldingWord-dev/tw_consistency</text:p>
          </table:table-cell>
          <table:table-cell office:value-type="string" office:string-value="0-No longer used candidate">
            <text:p>0-No longer used candidate</text:p>
          </table:table-cell>
          <table:table-cell office:value-type="string" office:string-value="Repository has had no commits in over 60 months (106 months ago) and has no usage, downloads (0), or releases (0).">
            <text:p>Repository has had no commits in over 60 months (106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w_consistency">
            <text:p>tw_consistency</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html2pdf">
            <text:p>unfoldingWord-dev/tx-html2pdf</text:p>
          </table:table-cell>
          <table:table-cell office:value-type="string" office:string-value="https://github.com/unfoldingWord-dev/tx-html2pdf">
            <text:p>https://github.com/unfoldingWord-dev/tx-html2pdf</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20T05:32:39Z">
            <text:p>2016-12-20T05:32:39Z</text:p>
          </table:table-cell>
          <table:table-cell office:value-type="string" office:string-value="2016-12-20T05:32:32Z">
            <text:p>2016-12-20T05:32:32Z</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19T14:55:26Z">
            <text:p>2016-12-19T14:55:26Z</text:p>
          </table:table-cell>
          <table:table-cell office:value-type="string" office:string-value="unfoldingWord-dev/tx-html2pdf">
            <text:p>unfoldingWord-dev/tx-html2pdf</text:p>
          </table:table-cell>
          <table:table-cell office:value-type="string" office:string-value="https://github.com/unfoldingWord-dev/tx-html2pdf">
            <text:p>https://github.com/unfoldingWord-dev/tx-html2pdf</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x-html2pdf">
            <text:p>tx-html2pdf</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x-redis-poc">
            <text:p>unfoldingWord-box3/tx-redis-poc</text:p>
          </table:table-cell>
          <table:table-cell office:value-type="string" office:string-value="https://github.com/unfoldingWord-box3/tx-redis-poc">
            <text:p>https://github.com/unfoldingWord-box3/tx-redis-poc</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10-20T13:53:17Z">
            <text:p>2023-10-20T13:53:17Z</text:p>
          </table:table-cell>
          <table:table-cell office:value-type="string" office:string-value="2023-10-20T13:53:14Z">
            <text:p>2023-10-20T13:53:14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44">
            <text:p>4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0-12T20:54:09Z">
            <text:p>2023-10-12T20:54:09Z</text:p>
          </table:table-cell>
          <table:table-cell office:value-type="string" office:string-value="unfoldingWord-box3/tx-redis-poc">
            <text:p>unfoldingWord-box3/tx-redis-poc</text:p>
          </table:table-cell>
          <table:table-cell office:value-type="string" office:string-value="https://github.com/unfoldingWord-box3/tx-redis-poc">
            <text:p>https://github.com/unfoldingWord-box3/tx-redis-poc</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32 months ago).">
            <text:p>Repository name suggests cleanup/test/demo content, it has no detected usage, and the last commit was over 24 months ago (32 months ago).</text:p>
          </table:table-cell>
          <table:table-cell office:value-type="string" office:string-value="">
            <text:p/>
          </table:table-cell>
          <table:table-cell office:value-type="string" office:string-value="">
            <text:p/>
          </table:table-cell>
          <table:table-cell office:value-type="string" office:string-value="tx-redis-poc">
            <text:p>tx-redis-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sample-client">
            <text:p>unfoldingWord-dev/tx-sample-client</text:p>
          </table:table-cell>
          <table:table-cell office:value-type="string" office:string-value="https://github.com/unfoldingWord-dev/tx-sample-client">
            <text:p>https://github.com/unfoldingWord-dev/tx-sample-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20T05:54:47Z">
            <text:p>2016-12-20T05:54:47Z</text:p>
          </table:table-cell>
          <table:table-cell office:value-type="string" office:string-value="2016-12-20T05:54:38Z">
            <text:p>2016-12-20T05:54:38Z</text:p>
          </table:table-cell>
          <table:table-cell office:value-type="string" office:string-value="">
            <text:p/>
          </table:table-cell>
          <table:table-cell office:value-type="string" office:string-value="">
            <text:p/>
          </table:table-cell>
          <table:table-cell office:value-type="string" office:string-value="['Richard Mahn', 'Gogs']">
            <text:p>['Richard Mahn', 'Gogs']</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19T15:14:47Z">
            <text:p>2016-12-19T15:14:47Z</text:p>
          </table:table-cell>
          <table:table-cell office:value-type="string" office:string-value="unfoldingWord-dev/tx-sample-client">
            <text:p>unfoldingWord-dev/tx-sample-client</text:p>
          </table:table-cell>
          <table:table-cell office:value-type="string" office:string-value="https://github.com/unfoldingWord-dev/tx-sample-client">
            <text:p>https://github.com/unfoldingWord-dev/tx-sample-client</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x-sample-client">
            <text:p>tx-sample-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usfm2html">
            <text:p>unfoldingWord-dev/tx-usfm2html</text:p>
          </table:table-cell>
          <table:table-cell office:value-type="string" office:string-value="https://github.com/unfoldingWord-dev/tx-usfm2html">
            <text:p>https://github.com/unfoldingWord-dev/tx-usfm2html</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23T01:36:55Z">
            <text:p>2016-09-23T01:36:55Z</text:p>
          </table:table-cell>
          <table:table-cell office:value-type="string" office:string-value="2016-09-23T01:36:50Z">
            <text:p>2016-09-23T01:36:50Z</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26">
            <text:p>2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2-19T12:45:43Z">
            <text:p>2019-02-19T12:45:43Z</text:p>
          </table:table-cell>
          <table:table-cell office:value-type="string" office:string-value="unfoldingWord-dev/tx-usfm2html">
            <text:p>unfoldingWord-dev/tx-usfm2html</text:p>
          </table:table-cell>
          <table:table-cell office:value-type="string" office:string-value="https://github.com/unfoldingWord-dev/tx-usfm2html">
            <text:p>https://github.com/unfoldingWord-dev/tx-usfm2html</text:p>
          </table:table-cell>
          <table:table-cell office:value-type="string" office:string-value="0-No longer used candidate">
            <text:p>0-No longer used candidate</text:p>
          </table:table-cell>
          <table:table-cell office:value-type="string" office:string-value="Repository has had no commits in over 60 months (117 months ago) and has no usage, downloads (0), or releases (0).">
            <text:p>Repository has had no commits in over 60 months (117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x-usfm2html">
            <text:p>tx-usfm2htm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webhook-client">
            <text:p>unfoldingWord-dev/tx-webhook-client</text:p>
          </table:table-cell>
          <table:table-cell office:value-type="string" office:string-value="https://github.com/unfoldingWord-dev/tx-webhook-client">
            <text:p>https://github.com/unfoldingWord-dev/tx-webhook-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8:00:19Z">
            <text:p>2017-01-18T18:00:19Z</text:p>
          </table:table-cell>
          <table:table-cell office:value-type="string" office:string-value="2017-01-18T18:00:15Z">
            <text:p>2017-01-18T18:00:15Z</text:p>
          </table:table-cell>
          <table:table-cell office:value-type="string" office:string-value="">
            <text:p/>
          </table:table-cell>
          <table:table-cell office:value-type="string" office:string-value="">
            <text:p/>
          </table:table-cell>
          <table:table-cell office:value-type="string" office:string-value="['Richard Mahn', 'richmahn', 'Gogs', 'Phil Hopper', 'phillip-hopper']">
            <text:p>['Richard Mahn', 'richmahn', 'Gogs', 'Phil Hopper', 'phillip-hopper']</text:p>
          </table:table-cell>
          <table:table-cell office:value-type="string" office:string-value="0">
            <text:p>0</text:p>
          </table:table-cell>
          <table:table-cell office:value-type="string" office:string-value="0">
            <text:p>0</text:p>
          </table:table-cell>
          <table:table-cell office:value-type="string" office:string-value="43">
            <text:p>4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9-22T16:25:43Z">
            <text:p>2016-09-22T16:25:43Z</text:p>
          </table:table-cell>
          <table:table-cell office:value-type="string" office:string-value="unfoldingWord-dev/tx-webhook-client">
            <text:p>unfoldingWord-dev/tx-webhook-client</text:p>
          </table:table-cell>
          <table:table-cell office:value-type="string" office:string-value="https://github.com/unfoldingWord-dev/tx-webhook-client">
            <text:p>https://github.com/unfoldingWord-dev/tx-webhook-client</text:p>
          </table:table-cell>
          <table:table-cell office:value-type="string" office:string-value="0-No longer used candidate">
            <text:p>0-No longer used candidate</text:p>
          </table:table-cell>
          <table:table-cell office:value-type="string" office:string-value="Repository has had no commits in over 60 months (113 months ago) and has no usage, downloads (0), or releases (0).">
            <text:p>Repository has had no commits in over 60 months (11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x-webhook-client">
            <text:p>tx-webhook-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gnt-app">
            <text:p>unfoldingWord-dev/ugnt-app</text:p>
          </table:table-cell>
          <table:table-cell office:value-type="string" office:string-value="https://github.com/unfoldingWord-dev/ugnt-app">
            <text:p>https://github.com/unfoldingWord-dev/ugnt-app</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6-12-12T16:32:12Z">
            <text:p>2016-12-12T16:32:12Z</text:p>
          </table:table-cell>
          <table:table-cell office:value-type="string" office:string-value="2016-12-12T16:30:59Z">
            <text:p>2016-12-12T16:30:59Z</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5">
            <text:p>5</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12T16:32:16Z">
            <text:p>2016-12-12T16:32:16Z</text:p>
          </table:table-cell>
          <table:table-cell office:value-type="string" office:string-value="unfoldingWord-dev/ugnt-app">
            <text:p>unfoldingWord-dev/ugnt-app</text:p>
          </table:table-cell>
          <table:table-cell office:value-type="string" office:string-value="https://github.com/unfoldingWord-dev/ugnt-app">
            <text:p>https://github.com/unfoldingWord-dev/ugnt-app</text:p>
          </table:table-cell>
          <table:table-cell office:value-type="string" office:string-value="0-No longer used candidate">
            <text:p>0-No longer used candidate</text:p>
          </table:table-cell>
          <table:table-cell office:value-type="string" office:string-value="Repository has very few commits (4) and has had no activity in over 36 months (114 months ago) with no usage, downloads, or releases.">
            <text:p>Repository has very few commits (4) and has had no activity in over 36 months (114 months ago) with no usage, downloads, or releases.</text:p>
          </table:table-cell>
          <table:table-cell office:value-type="string" office:string-value="">
            <text:p/>
          </table:table-cell>
          <table:table-cell office:value-type="string" office:string-value="">
            <text:p/>
          </table:table-cell>
          <table:table-cell office:value-type="string" office:string-value="ugnt-app">
            <text:p>ugnt-a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usfm-js-wrapper">
            <text:p>unfoldingWord/usfm-js-wrapper</text:p>
          </table:table-cell>
          <table:table-cell office:value-type="string" office:string-value="https://github.com/unfoldingWord/usfm-js-wrapper">
            <text:p>https://github.com/unfoldingWord/usfm-js-wrapp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5-26T18:46:35Z">
            <text:p>2020-05-26T18:46:35Z</text:p>
          </table:table-cell>
          <table:table-cell office:value-type="string" office:string-value="2020-05-26T18:45:20Z">
            <text:p>2020-05-26T18:45:20Z</text:p>
          </table:table-cell>
          <table:table-cell office:value-type="string" office:string-value="">
            <text:p/>
          </table:table-cell>
          <table:table-cell office:value-type="string" office:string-value="">
            <text:p/>
          </table:table-cell>
          <table:table-cell office:value-type="string" office:string-value="RobH123">
            <text:p>RobH123</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js-wrapper">
            <text:p>usfm-js-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0-05-26T20:17:20Z">
            <text:p>2020-05-26T20:17:20Z</text:p>
          </table:table-cell>
          <table:table-cell office:value-type="string" office:string-value="unfoldingWord/usfm-js-wrapper">
            <text:p>unfoldingWord/usfm-js-wrapper</text:p>
          </table:table-cell>
          <table:table-cell office:value-type="string" office:string-value="https://github.com/unfoldingWord/usfm-js-wrapper">
            <text:p>https://github.com/unfoldingWord/usfm-js-wrapper</text:p>
          </table:table-cell>
          <table:table-cell office:value-type="string" office:string-value="0-No longer used candidate">
            <text:p>0-No longer used candidate</text:p>
          </table:table-cell>
          <table:table-cell office:value-type="string" office:string-value="Repository has had no commits in over 60 months (73 months ago) and has no usage, downloads (0), or releases (0).">
            <text:p>Repository has had no commits in over 60 months (73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usfm-js-wrapper">
            <text:p>usfm-js-wrapp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w-api">
            <text:p>unfoldingWord-dev/uw-api</text:p>
          </table:table-cell>
          <table:table-cell office:value-type="string" office:string-value="https://github.com/unfoldingWord-dev/uw-api">
            <text:p>https://github.com/unfoldingWord-dev/uw-api</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7-07-24T12:47:59Z">
            <text:p>2017-07-24T12:47:59Z</text:p>
          </table:table-cell>
          <table:table-cell office:value-type="string" office:string-value="2017-07-24T12:47:28Z">
            <text:p>2017-07-24T12:47:28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33">
            <text:p>3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1-02T15:00:23Z">
            <text:p>2016-11-02T15:00:23Z</text:p>
          </table:table-cell>
          <table:table-cell office:value-type="string" office:string-value="unfoldingWord-dev/uw-api">
            <text:p>unfoldingWord-dev/uw-api</text:p>
          </table:table-cell>
          <table:table-cell office:value-type="string" office:string-value="https://github.com/unfoldingWord-dev/uw-api">
            <text:p>https://github.com/unfoldingWord-dev/uw-api</text:p>
          </table:table-cell>
          <table:table-cell office:value-type="string" office:string-value="0-No longer used candidate">
            <text:p>0-No longer used candidate</text:p>
          </table:table-cell>
          <table:table-cell office:value-type="string" office:string-value="Repository has had no commits in over 60 months (107 months ago) and has no usage, downloads (0), or releases (0).">
            <text:p>Repository has had no commits in over 60 months (107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uw-api">
            <text:p>uw-api</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uw-metadata-react-component-library">
            <text:p>unfoldingWord-box3/uw-metadata-react-component-library</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0T17:08:07Z">
            <text:p>2023-07-10T17:08:07Z</text:p>
          </table:table-cell>
          <table:table-cell office:value-type="string" office:string-value="2020-05-07T19:30:02Z">
            <text:p>2020-05-07T19:30:02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5">
            <text:p>5</text:p>
          </table:table-cell>
          <table:table-cell office:value-type="string" office:string-value="5">
            <text:p>5</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burrito-react-jsonschema-form">
            <text:p>scripture-burrito-react-jsonschema-for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2020-05-07T19:30:12Z">
            <text:p>2020-05-07T19:30:12Z</text:p>
          </table:table-cell>
          <table:table-cell office:value-type="string" office:string-value="unfoldingWord-box3/uw-metadata-react-component-library">
            <text:p>unfoldingWord-box3/uw-metadata-react-component-library</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0-No longer used candidate">
            <text:p>0-No longer used candidate</text:p>
          </table:table-cell>
          <table:table-cell office:value-type="string" office:string-value="Repository has had no commits in over 60 months (73 months ago) and has no usage, downloads (0), or releases (0).">
            <text:p>Repository has had no commits in over 60 months (73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uw-metadata-react-component-library">
            <text:p>uw-metadata-react-component-librar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W-mobile-app">
            <text:p>unfoldingWord-dev/uW-mobile-app</text:p>
          </table:table-cell>
          <table:table-cell office:value-type="string" office:string-value="https://github.com/unfoldingWord-dev/uW-mobile-app">
            <text:p>https://github.com/unfoldingWord-dev/uW-mobile-app</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5-03-09T22:15:57Z">
            <text:p>2015-03-09T22:15:57Z</text:p>
          </table:table-cell>
          <table:table-cell office:value-type="string" office:string-value="2015-03-09T22:15:57Z">
            <text:p>2015-03-09T22:15:57Z</text:p>
          </table:table-cell>
          <table:table-cell office:value-type="string" office:string-value="">
            <text:p/>
          </table:table-cell>
          <table:table-cell office:value-type="string" office:string-value="">
            <text:p/>
          </table:table-cell>
          <table:table-cell office:value-type="string" office:string-value="['never2ice', 'jag3773', 'timjore']">
            <text:p>['never2ice', 'jag3773', 'timjore']</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9-26T09:51:13Z">
            <text:p>2016-09-26T09:51:13Z</text:p>
          </table:table-cell>
          <table:table-cell office:value-type="string" office:string-value="unfoldingWord-dev/uW-mobile-app">
            <text:p>unfoldingWord-dev/uW-mobile-app</text:p>
          </table:table-cell>
          <table:table-cell office:value-type="string" office:string-value="https://github.com/unfoldingWord-dev/uW-mobile-app">
            <text:p>https://github.com/unfoldingWord-dev/uW-mobile-app</text:p>
          </table:table-cell>
          <table:table-cell office:value-type="string" office:string-value="0-No longer used candidate">
            <text:p>0-No longer used candidate</text:p>
          </table:table-cell>
          <table:table-cell office:value-type="string" office:string-value="Repository has had no commits in over 60 months (135 months ago) and has no usage, downloads (0), or releases (0).">
            <text:p>Repository has had no commits in over 60 months (135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uW-mobile-app">
            <text:p>uW-mobile-a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w-publisher">
            <text:p>unfoldingWord-dev/uw-publisher</text:p>
          </table:table-cell>
          <table:table-cell office:value-type="string" office:string-value="https://github.com/unfoldingWord-dev/uw-publisher">
            <text:p>https://github.com/unfoldingWord-dev/uw-publish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8-29T05:28:04Z">
            <text:p>2015-08-29T05:28:04Z</text:p>
          </table:table-cell>
          <table:table-cell office:value-type="string" office:string-value="2015-08-29T05:28:03Z">
            <text:p>2015-08-29T05:28:03Z</text:p>
          </table:table-cell>
          <table:table-cell office:value-type="string" office:string-value="">
            <text:p/>
          </table:table-cell>
          <table:table-cell office:value-type="string" office:string-value="">
            <text:p/>
          </table:table-cell>
          <table:table-cell office:value-type="string" office:string-value="['da1nerd', 'codemis']">
            <text:p>['da1nerd', 'codemis']</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30T09:37:59Z">
            <text:p>2016-08-30T09:37:59Z</text:p>
          </table:table-cell>
          <table:table-cell office:value-type="string" office:string-value="unfoldingWord-dev/uw-publisher">
            <text:p>unfoldingWord-dev/uw-publisher</text:p>
          </table:table-cell>
          <table:table-cell office:value-type="string" office:string-value="https://github.com/unfoldingWord-dev/uw-publisher">
            <text:p>https://github.com/unfoldingWord-dev/uw-publisher</text:p>
          </table:table-cell>
          <table:table-cell office:value-type="string" office:string-value="0-No longer used candidate">
            <text:p>0-No longer used candidate</text:p>
          </table:table-cell>
          <table:table-cell office:value-type="string" office:string-value="Repository has had no commits in over 60 months (130 months ago) and has no usage, downloads (0), or releases (0).">
            <text:p>Repository has had no commits in over 60 months (130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uw-publisher">
            <text:p>uw-publish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w_tools">
            <text:p>unfoldingWord-dev/uw_tools</text:p>
          </table:table-cell>
          <table:table-cell office:value-type="string" office:string-value="https://github.com/unfoldingWord-dev/uw_tools">
            <text:p>https://github.com/unfoldingWord-dev/uw_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01:18:15Z">
            <text:p>2018-06-04T01:18:15Z</text:p>
          </table:table-cell>
          <table:table-cell office:value-type="string" office:string-value="2017-01-06T18:38:25Z">
            <text:p>2017-01-06T18:38:25Z</text:p>
          </table:table-cell>
          <table:table-cell office:value-type="string" office:string-value="">
            <text:p/>
          </table:table-cell>
          <table:table-cell office:value-type="string" office:string-value="">
            <text:p/>
          </table:table-cell>
          <table:table-cell office:value-type="string" office:string-value="['phillip-hopper', 'Phil Hopper', 'Richard Mahn', 'richmahn']">
            <text:p>['phillip-hopper', 'Phil Hopper', 'Richard Mahn', 'richmahn']</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1-02T15:14:26Z">
            <text:p>2016-11-02T15:14:26Z</text:p>
          </table:table-cell>
          <table:table-cell office:value-type="string" office:string-value="unfoldingWord-dev/uw_tools">
            <text:p>unfoldingWord-dev/uw_tools</text:p>
          </table:table-cell>
          <table:table-cell office:value-type="string" office:string-value="https://github.com/unfoldingWord-dev/uw_tools">
            <text:p>https://github.com/unfoldingWord-dev/uw_tools</text:p>
          </table:table-cell>
          <table:table-cell office:value-type="string" office:string-value="0-No longer used candidate">
            <text:p>0-No longer used candidate</text:p>
          </table:table-cell>
          <table:table-cell office:value-type="string" office:string-value="Repository has had no commits in over 60 months (113 months ago) and has no usage, downloads (0), or releases (0).">
            <text:p>Repository has had no commits in over 60 months (11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uw_tools">
            <text:p>uw_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wordmap-react-toolkit">
            <text:p>unfoldingWord-box3/wordmap-react-toolkit</text:p>
          </table:table-cell>
          <table:table-cell office:value-type="string" office:string-value="https://github.com/unfoldingWord-box3/wordmap-react-toolkit">
            <text:p>https://github.com/unfoldingWord-box3/wordmap-react-toolkit</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7T10:58:07Z">
            <text:p>2023-01-07T10:58:07Z</text:p>
          </table:table-cell>
          <table:table-cell office:value-type="string" office:string-value="2019-11-07T08:12:31Z">
            <text:p>2019-11-07T08:12:31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25">
            <text:p>25</text:p>
          </table:table-cell>
          <table:table-cell office:value-type="string" office:string-value="25">
            <text:p>25</text:p>
          </table:table-cell>
          <table:table-cell office:value-type="string" office:string-value="45">
            <text:p>4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react-toolkit">
            <text:p>wordmap-react-toolkit</text:p>
          </table:table-cell>
          <table:table-cell office:value-type="string" office:string-value="https://www.npmjs.com/package/wordmap-react-toolkit">
            <text:p>https://www.npmjs.com/package/wordmap-react-toolkit</text:p>
          </table:table-cell>
          <table:table-cell office:value-type="string" office:string-value="False">
            <text:p>False</text:p>
          </table:table-cell>
          <table:table-cell office:value-type="string" office:string-value="242">
            <text:p>242</text:p>
          </table:table-cell>
          <table:table-cell office:value-type="string" office:string-value="2019-11-07T08:13:01.981Z">
            <text:p>2019-11-07T08:13:01.981Z</text:p>
          </table:table-cell>
          <table:table-cell office:value-type="string" office:string-value="">
            <text:p/>
          </table:table-cell>
          <table:table-cell office:value-type="string" office:string-value="['wordmap', 'wordmap-lexer', 'string-punctuation-tokenizer']">
            <text:p>['wordmap', 'wordmap-lexer', 'string-punctuation-tokenizer']</text:p>
          </table:table-cell>
          <table:table-cell office:value-type="string" office:string-value="2022-06-17T15:47:04Z">
            <text:p>2022-06-17T15:47:04Z</text:p>
          </table:table-cell>
          <table:table-cell office:value-type="string" office:string-value="unfoldingWord-box3/wordmap-react-toolkit">
            <text:p>unfoldingWord-box3/wordmap-react-toolkit</text:p>
          </table:table-cell>
          <table:table-cell office:value-type="string" office:string-value="https://github.com/unfoldingWord-box3/wordmap-react-toolkit">
            <text:p>https://github.com/unfoldingWord-box3/wordmap-react-toolkit</text:p>
          </table:table-cell>
          <table:table-cell office:value-type="string" office:string-value="0-No longer used candidate">
            <text:p>0-No longer used candidate</text:p>
          </table:table-cell>
          <table:table-cell office:value-type="string" office:string-value="Repository has had no commits in over 60 months (79 months ago) and has no usage, downloads (0), or releases (0).">
            <text:p>Repository has had no commits in over 60 months (79 months ago) and has no usage, downloads (0), or releases (0).</text:p>
          </table:table-cell>
          <table:table-cell office:value-type="string" office:string-value="Manual review - npm package">
            <text:p>Manual review - npm package</text:p>
          </table:table-cell>
          <table:table-cell office:value-type="string" office:string-value="Package has low but nonzero npm usage (242 downloads in the last year) and no detected local consumers.">
            <text:p>Package has low but nonzero npm usage (242 downloads in the last year) and no detected local consumers.</text:p>
          </table:table-cell>
          <table:table-cell office:value-type="string" office:string-value="wordmap-react-toolkit">
            <text:p>wordmap-react-toolki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github">
            <text:p>unfoldingWord/.github</text:p>
          </table:table-cell>
          <table:table-cell office:value-type="string" office:string-value="https://github.com/unfoldingWord/.github">
            <text:p>https://github.com/unfoldingWord/.github</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9-27T02:01:37Z">
            <text:p>2023-09-27T02:01:37Z</text:p>
          </table:table-cell>
          <table:table-cell office:value-type="string" office:string-value="2023-09-27T02:01:37Z">
            <text:p>2023-09-27T02:01:37Z</text:p>
          </table:table-cell>
          <table:table-cell office:value-type="string" office:string-value="">
            <text:p/>
          </table:table-cell>
          <table:table-cell office:value-type="string" office:string-value="">
            <text:p/>
          </table:table-cell>
          <table:table-cell office:value-type="string" office:string-value="['birchamp', 'elsylambert']">
            <text:p>['birchamp', 'elsylambert']</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6-23T17:54:35Z">
            <text:p>2023-06-23T17:54:35Z</text:p>
          </table:table-cell>
          <table:table-cell office:value-type="string" office:string-value="unfoldingWord/.github">
            <text:p>unfoldingWord/.github</text:p>
          </table:table-cell>
          <table:table-cell office:value-type="string" office:string-value="https://github.com/unfoldingWord/.github">
            <text:p>https://github.com/unfoldingWord/.github</text:p>
          </table:table-cell>
          <table:table-cell office:value-type="string" office:string-value="1-Manual review">
            <text:p>1-Manual review</text:p>
          </table:table-cell>
          <table:table-cell office:value-type="string" office:string-value="Stale - Repository has had no commits in over 18 months (33 months ago) and is not archived.">
            <text:p>Stale - Repository has had no commits in over 18 months (33 months ago) and is not archived.</text:p>
          </table:table-cell>
          <table:table-cell office:value-type="string" office:string-value="">
            <text:p/>
          </table:table-cell>
          <table:table-cell office:value-type="string" office:string-value="">
            <text:p/>
          </table:table-cell>
          <table:table-cell office:value-type="string" office:string-value=".github">
            <text:p>.githu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door43-client">
            <text:p>unfoldingWord-dev/android-door43-client</text:p>
          </table:table-cell>
          <table:table-cell office:value-type="string" office:string-value="https://github.com/unfoldingWord-dev/android-door43-client">
            <text:p>https://github.com/unfoldingWord-dev/android-door43-client</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50:09Z">
            <text:p>2017-04-05T23:50:09Z</text:p>
          </table:table-cell>
          <table:table-cell office:value-type="string" office:string-value="2017-04-05T23:50:01Z">
            <text:p>2017-04-05T23:50:01Z</text:p>
          </table:table-cell>
          <table:table-cell office:value-type="string" office:string-value="">
            <text:p/>
          </table:table-cell>
          <table:table-cell office:value-type="string" office:string-value="">
            <text:p/>
          </table:table-cell>
          <table:table-cell office:value-type="string" office:string-value="['da1nerd', 'andreradroid']">
            <text:p>['da1nerd', 'andreradroid']</text:p>
          </table:table-cell>
          <table:table-cell office:value-type="string" office:string-value="0">
            <text:p>0</text:p>
          </table:table-cell>
          <table:table-cell office:value-type="string" office:string-value="0">
            <text:p>0</text:p>
          </table:table-cell>
          <table:table-cell office:value-type="string" office:string-value="226">
            <text:p>22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30T17:57:37Z">
            <text:p>2016-08-30T17:57:37Z</text:p>
          </table:table-cell>
          <table:table-cell office:value-type="string" office:string-value="unfoldingWord-dev/android-door43-client">
            <text:p>unfoldingWord-dev/android-door43-client</text:p>
          </table:table-cell>
          <table:table-cell office:value-type="string" office:string-value="https://github.com/unfoldingWord-dev/android-door43-client">
            <text:p>https://github.com/unfoldingWord-dev/android-door43-clien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android-door43-client">
            <text:p>android-door43-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gogs-client">
            <text:p>unfoldingWord-dev/android-gogs-client</text:p>
          </table:table-cell>
          <table:table-cell office:value-type="string" office:string-value="https://github.com/unfoldingWord-dev/android-gogs-client">
            <text:p>https://github.com/unfoldingWord-dev/android-gogs-client</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30T23:42:39Z">
            <text:p>2019-04-30T23:42:39Z</text:p>
          </table:table-cell>
          <table:table-cell office:value-type="string" office:string-value="2019-04-30T23:42:38Z">
            <text:p>2019-04-30T23:42:38Z</text:p>
          </table:table-cell>
          <table:table-cell office:value-type="string" office:string-value="2016-02-29T21:22:22Z">
            <text:p>2016-02-29T21:22:22Z</text:p>
          </table:table-cell>
          <table:table-cell office:value-type="string" office:string-value="">
            <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41">
            <text:p>4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12-11T07:18:00Z">
            <text:p>2024-12-11T07:18:00Z</text:p>
          </table:table-cell>
          <table:table-cell office:value-type="string" office:string-value="unfoldingWord-dev/android-gogs-client">
            <text:p>unfoldingWord-dev/android-gogs-client</text:p>
          </table:table-cell>
          <table:table-cell office:value-type="string" office:string-value="https://github.com/unfoldingWord-dev/android-gogs-client">
            <text:p>https://github.com/unfoldingWord-dev/android-gogs-client</text:p>
          </table:table-cell>
          <table:table-cell office:value-type="string" office:string-value="1-Manual review">
            <text:p>1-Manual review</text:p>
          </table:table-cell>
          <table:table-cell office:value-type="string" office:string-value="Stale - Repository has had no commits in over 18 months (86 months ago) and is not archived.">
            <text:p>Stale - Repository has had no commits in over 18 months (86 months ago) and is not archived.</text:p>
          </table:table-cell>
          <table:table-cell office:value-type="string" office:string-value="">
            <text:p/>
          </table:table-cell>
          <table:table-cell office:value-type="string" office:string-value="">
            <text:p/>
          </table:table-cell>
          <table:table-cell office:value-type="string" office:string-value="android-gogs-client">
            <text:p>android-gogs-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resource-container">
            <text:p>unfoldingWord-dev/android-resource-container</text:p>
          </table:table-cell>
          <table:table-cell office:value-type="string" office:string-value="https://github.com/unfoldingWord-dev/android-resource-container">
            <text:p>https://github.com/unfoldingWord-dev/android-resource-container</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48:40Z">
            <text:p>2017-04-05T23:48:40Z</text:p>
          </table:table-cell>
          <table:table-cell office:value-type="string" office:string-value="2016-12-29T08:05:21Z">
            <text:p>2016-12-29T08:05:21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66">
            <text:p>6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3-07T23:44:50Z">
            <text:p>2017-03-07T23:44:50Z</text:p>
          </table:table-cell>
          <table:table-cell office:value-type="string" office:string-value="unfoldingWord-dev/android-resource-container">
            <text:p>unfoldingWord-dev/android-resource-container</text:p>
          </table:table-cell>
          <table:table-cell office:value-type="string" office:string-value="https://github.com/unfoldingWord-dev/android-resource-container">
            <text:p>https://github.com/unfoldingWord-dev/android-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android-resource-container">
            <text:p>android-resource-contai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api-index">
            <text:p>unfoldingWord-dev/api-index</text:p>
          </table:table-cell>
          <table:table-cell office:value-type="string" office:string-value="https://github.com/unfoldingWord-dev/api-index">
            <text:p>https://github.com/unfoldingWord-dev/api-index</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0-06T14:56:54Z">
            <text:p>2023-10-06T14:56:54Z</text:p>
          </table:table-cell>
          <table:table-cell office:value-type="string" office:string-value="2023-10-06T14:56:52Z">
            <text:p>2023-10-06T14:56:52Z</text:p>
          </table:table-cell>
          <table:table-cell office:value-type="string" office:string-value="">
            <text:p/>
          </table:table-cell>
          <table:table-cell office:value-type="string" office:string-value="">
            <text:p/>
          </table:table-cell>
          <table:table-cell office:value-type="string" office:string-value="['jag3773', 'codemis', 'yakob-aleksandrovich', 'da1nerd', 'phillip-hopper', 'RoyalSix']">
            <text:p>['jag3773', 'codemis', 'yakob-aleksandrovich', 'da1nerd', 'phillip-hopper', 'RoyalSix']</text:p>
          </table:table-cell>
          <table:table-cell office:value-type="string" office:string-value="0">
            <text:p>0</text:p>
          </table:table-cell>
          <table:table-cell office:value-type="string" office:string-value="0">
            <text:p>0</text:p>
          </table:table-cell>
          <table:table-cell office:value-type="string" office:string-value="28">
            <text:p>2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0-06T14:53:06Z">
            <text:p>2023-10-06T14:53:06Z</text:p>
          </table:table-cell>
          <table:table-cell office:value-type="string" office:string-value="unfoldingWord-dev/api-index">
            <text:p>unfoldingWord-dev/api-index</text:p>
          </table:table-cell>
          <table:table-cell office:value-type="string" office:string-value="https://github.com/unfoldingWord-dev/api-index">
            <text:p>https://github.com/unfoldingWord-dev/api-index</text:p>
          </table:table-cell>
          <table:table-cell office:value-type="string" office:string-value="1-Manual review">
            <text:p>1-Manual review</text:p>
          </table:table-cell>
          <table:table-cell office:value-type="string" office:string-value="Stale - Repository has had no commits in over 18 months (32 months ago) and is not archived.">
            <text:p>Stale - Repository has had no commits in over 18 months (32 months ago) and is not archived.</text:p>
          </table:table-cell>
          <table:table-cell office:value-type="string" office:string-value="">
            <text:p/>
          </table:table-cell>
          <table:table-cell office:value-type="string" office:string-value="">
            <text:p/>
          </table:table-cell>
          <table:table-cell office:value-type="string" office:string-value="api-index">
            <text:p>api-index</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aquifer-to-dcs">
            <text:p>unfoldingWord-box3/aquifer-to-dcs</text:p>
          </table:table-cell>
          <table:table-cell office:value-type="string" office:string-value="https://github.com/unfoldingWord-box3/aquifer-to-dcs">
            <text:p>https://github.com/unfoldingWord-box3/aquifer-to-dc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29T15:49:00Z">
            <text:p>2025-03-29T15:49:00Z</text:p>
          </table:table-cell>
          <table:table-cell office:value-type="string" office:string-value="2025-03-29T15:48:56Z">
            <text:p>2025-03-29T15:48:5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9T15:49:03Z">
            <text:p>2025-03-29T15:49:03Z</text:p>
          </table:table-cell>
          <table:table-cell office:value-type="string" office:string-value="unfoldingWord-box3/aquifer-to-dcs">
            <text:p>unfoldingWord-box3/aquifer-to-dcs</text:p>
          </table:table-cell>
          <table:table-cell office:value-type="string" office:string-value="https://github.com/unfoldingWord-box3/aquifer-to-dcs">
            <text:p>https://github.com/unfoldingWord-box3/aquifer-to-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aquifer-to-dcs">
            <text:p>aquifer-to-dc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audio-obs-navigator">
            <text:p>unfoldingWord-box3/audio-obs-navigator</text:p>
          </table:table-cell>
          <table:table-cell office:value-type="string" office:string-value="https://github.com/unfoldingWord-box3/audio-obs-navigator">
            <text:p>https://github.com/unfoldingWord-box3/audio-obs-navigato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8T13:58:29Z">
            <text:p>2024-03-08T13:58:29Z</text:p>
          </table:table-cell>
          <table:table-cell office:value-type="string" office:string-value="2024-03-08T12:08:48Z">
            <text:p>2024-03-08T12:08:48Z</text:p>
          </table:table-cell>
          <table:table-cell office:value-type="string" office:string-value="">
            <text:p/>
          </table:table-cell>
          <table:table-cell office:value-type="string" office:string-value="">
            <text:p/>
          </table:table-cell>
          <table:table-cell office:value-type="string" office:string-value="['kintsoogi', 'blm', 'bspidel']">
            <text:p>['kintsoogi', 'blm', 'bspidel']</text:p>
          </table:table-cell>
          <table:table-cell office:value-type="string" office:string-value="1">
            <text:p>1</text:p>
          </table:table-cell>
          <table:table-cell office:value-type="string" office:string-value="1">
            <text:p>1</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udio-obs-navigator">
            <text:p>audio-obs-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05T18:54:24Z">
            <text:p>2024-03-05T18:54:24Z</text:p>
          </table:table-cell>
          <table:table-cell office:value-type="string" office:string-value="unfoldingWord-box3/audio-obs-navigator">
            <text:p>unfoldingWord-box3/audio-obs-navigator</text:p>
          </table:table-cell>
          <table:table-cell office:value-type="string" office:string-value="https://github.com/unfoldingWord-box3/audio-obs-navigator">
            <text:p>https://github.com/unfoldingWord-box3/audio-obs-navigator</text:p>
          </table:table-cell>
          <table:table-cell office:value-type="string" office:string-value="1-Manual review">
            <text:p>1-Manual review</text:p>
          </table:table-cell>
          <table:table-cell office:value-type="string" office:string-value="Stale - Repository has had no commits in over 18 months (27 months ago) and is not archived.">
            <text:p>Stale - Repository has had no commits in over 18 months (27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audio-obs-navigator">
            <text:p>audio-obs-navigato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audio-quiz">
            <text:p>unfoldingWord-box3/audio-quiz</text:p>
          </table:table-cell>
          <table:table-cell office:value-type="string" office:string-value="https://github.com/unfoldingWord-box3/audio-quiz">
            <text:p>https://github.com/unfoldingWord-box3/audio-quiz</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9T13:55:01Z">
            <text:p>2024-01-19T13:55:01Z</text:p>
          </table:table-cell>
          <table:table-cell office:value-type="string" office:string-value="2024-01-19T13:53:42Z">
            <text:p>2024-01-19T13:53:42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28T16:05:13Z">
            <text:p>2024-02-28T16:05:13Z</text:p>
          </table:table-cell>
          <table:table-cell office:value-type="string" office:string-value="unfoldingWord-box3/audio-quiz">
            <text:p>unfoldingWord-box3/audio-quiz</text:p>
          </table:table-cell>
          <table:table-cell office:value-type="string" office:string-value="https://github.com/unfoldingWord-box3/audio-quiz">
            <text:p>https://github.com/unfoldingWord-box3/audio-quiz</text:p>
          </table:table-cell>
          <table:table-cell office:value-type="string" office:string-value="1-Manual review">
            <text:p>1-Manual review</text:p>
          </table:table-cell>
          <table:table-cell office:value-type="string" office:string-value="Stale - Repository has had no commits in over 18 months (29 months ago) and is not archived.">
            <text:p>Stale - Repository has had no commits in over 18 months (29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audio-quiz">
            <text:p>audio-quiz</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utographa">
            <text:p>unfoldingWord-dev/Autographa</text:p>
          </table:table-cell>
          <table:table-cell office:value-type="string" office:string-value="https://github.com/unfoldingWord-dev/Autographa">
            <text:p>https://github.com/unfoldingWord-dev/Autographa</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5:21Z">
            <text:p>2019-04-15T16:35:21Z</text:p>
          </table:table-cell>
          <table:table-cell office:value-type="string" office:string-value="2019-04-15T16:35:18Z">
            <text:p>2019-04-15T16:35:18Z</text:p>
          </table:table-cell>
          <table:table-cell office:value-type="string" office:string-value="">
            <text:p/>
          </table:table-cell>
          <table:table-cell office:value-type="string" office:string-value="">
            <text:p/>
          </table:table-cell>
          <table:table-cell office:value-type="string" office:string-value="['nbajpai9', 'ayushnig', 'sandeeponrails', 'klappy', 'ImgBotApp', 'mannycolon']">
            <text:p>['nbajpai9', 'ayushnig', 'sandeeponrails', 'klappy', 'ImgBotApp', 'mannycolon']</text:p>
          </table:table-cell>
          <table:table-cell office:value-type="string" office:string-value="12">
            <text:p>12</text:p>
          </table:table-cell>
          <table:table-cell office:value-type="string" office:string-value="0">
            <text:p>0</text:p>
          </table:table-cell>
          <table:table-cell office:value-type="string" office:string-value="58">
            <text:p>5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utographa">
            <text:p>Autograph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20:35:02Z">
            <text:p>2019-10-22T20:35:02Z</text:p>
          </table:table-cell>
          <table:table-cell office:value-type="string" office:string-value="unfoldingWord-dev/Autographa">
            <text:p>unfoldingWord-dev/Autographa</text:p>
          </table:table-cell>
          <table:table-cell office:value-type="string" office:string-value="https://github.com/unfoldingWord-dev/Autographa">
            <text:p>https://github.com/unfoldingWord-dev/Autographa</text:p>
          </table:table-cell>
          <table:table-cell office:value-type="string" office:string-value="1-Manual review">
            <text:p>1-Manual review</text:p>
          </table:table-cell>
          <table:table-cell office:value-type="string" office:string-value="Stale - Repository has had no commits in over 18 months (86 months ago) and is not archived.">
            <text:p>Stale - Repository has had no commits in over 18 months (86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Autographa">
            <text:p>Autograph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beta-bibel-demo">
            <text:p>unfoldingWord-box3/beta-bibel-demo</text:p>
          </table:table-cell>
          <table:table-cell office:value-type="string" office:string-value="https://github.com/unfoldingWord-box3/beta-bibel-demo">
            <text:p>https://github.com/unfoldingWord-box3/beta-bibel-demo</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08T14:50:24Z">
            <text:p>2024-08-08T14:50:24Z</text:p>
          </table:table-cell>
          <table:table-cell office:value-type="string" office:string-value="2024-07-26T16:13:53Z">
            <text:p>2024-07-26T16:13:53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eta-bibel-wiki">
            <text:p>beta-bibel-wik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2024-08-08T16:43:06Z">
            <text:p>2024-08-08T16:43:06Z</text:p>
          </table:table-cell>
          <table:table-cell office:value-type="string" office:string-value="unfoldingWord-box3/beta-bibel-demo">
            <text:p>unfoldingWord-box3/beta-bibel-demo</text:p>
          </table:table-cell>
          <table:table-cell office:value-type="string" office:string-value="https://github.com/unfoldingWord-box3/beta-bibel-demo">
            <text:p>https://github.com/unfoldingWord-box3/beta-bibel-demo</text:p>
          </table:table-cell>
          <table:table-cell office:value-type="string" office:string-value="1-Manual review">
            <text:p>1-Manual review</text:p>
          </table:table-cell>
          <table:table-cell office:value-type="string" office:string-value="Stale - Repository has had no commits in over 18 months (23 months ago) and is not archived.">
            <text:p>Stale - Repository has had no commits in over 18 months (23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eta-bibel-demo">
            <text:p>beta-bibel-demo</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bible-preview-app">
            <text:p>unfoldingWord-box3/bible-preview-app</text:p>
          </table:table-cell>
          <table:table-cell office:value-type="string" office:string-value="https://github.com/unfoldingWord-box3/bible-preview-app">
            <text:p>https://github.com/unfoldingWord-box3/bible-preview-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0-11T10:48:37Z">
            <text:p>2023-10-11T10:48:37Z</text:p>
          </table:table-cell>
          <table:table-cell office:value-type="string" office:string-value="2023-10-11T10:45:25Z">
            <text:p>2023-10-11T10:45:25Z</text:p>
          </table:table-cell>
          <table:table-cell office:value-type="string" office:string-value="">
            <text:p/>
          </table:table-cell>
          <table:table-cell office:value-type="string" office:string-value="">
            <text:p/>
          </table:table-cell>
          <table:table-cell office:value-type="string" office:string-value="['richmahn', 'mandolyte']">
            <text:p>['richmahn', 'mandolyte']</text:p>
          </table:table-cell>
          <table:table-cell office:value-type="string" office:string-value="0">
            <text:p>0</text:p>
          </table:table-cell>
          <table:table-cell office:value-type="string" office:string-value="0">
            <text:p>0</text:p>
          </table:table-cell>
          <table:table-cell office:value-type="string" office:string-value="63">
            <text:p>6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preview-app">
            <text:p>bible-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bible-reference-range']">
            <text:p>['bible-reference-rcl', 'dcs-js', 'bible-reference-range']</text:p>
          </table:table-cell>
          <table:table-cell office:value-type="string" office:string-value="2023-08-01T17:31:54Z">
            <text:p>2023-08-01T17:31:54Z</text:p>
          </table:table-cell>
          <table:table-cell office:value-type="string" office:string-value="unfoldingWord-box3/bible-preview-app">
            <text:p>unfoldingWord-box3/bible-preview-app</text:p>
          </table:table-cell>
          <table:table-cell office:value-type="string" office:string-value="https://github.com/unfoldingWord-box3/bible-preview-app">
            <text:p>https://github.com/unfoldingWord-box3/bible-preview-app</text:p>
          </table:table-cell>
          <table:table-cell office:value-type="string" office:string-value="1-Manual review">
            <text:p>1-Manual review</text:p>
          </table:table-cell>
          <table:table-cell office:value-type="string" office:string-value="Stale - Repository has had no commits in over 18 months (32 months ago) and is not archived.">
            <text:p>Stale - Repository has had no commits in over 18 months (32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ible-preview-app">
            <text:p>bible-preview-app</text:p>
          </table:table-cell>
          <table:table-cell office:value-type="string" office:string-value="unfoldingWord-box3">
            <text:p>unfoldingWord-box3</text:p>
          </table:table-cell>
        </table:table-row>
        <table:table-row>
          <table:table-cell office:value-type="string" office:string-value="Birch Champeon">
            <text:p>Birch Champeon</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ok-package-app">
            <text:p>unfoldingWord/book-package-app</text:p>
          </table:table-cell>
          <table:table-cell office:value-type="string" office:string-value="https://github.com/unfoldingWord/book-package-app">
            <text:p>https://github.com/unfoldingWord/book-package-ap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6T02:24:43Z">
            <text:p>2023-01-06T02:24:43Z</text:p>
          </table:table-cell>
          <table:table-cell office:value-type="string" office:string-value="2023-01-02T13:23:19Z">
            <text:p>2023-01-02T13:23:19Z</text:p>
          </table:table-cell>
          <table:table-cell office:value-type="string" office:string-value="2020-03-30T14:42:12Z">
            <text:p>2020-03-30T14:42:12Z</text:p>
          </table:table-cell>
          <table:table-cell office:value-type="string" office:string-value="">
            <text:p/>
          </table:table-cell>
          <table:table-cell office:value-type="string" office:string-value="['mandolyte', 'dependabot[bot]', 'jag3773']">
            <text:p>['mandolyte', 'dependabot[bot]', 'jag3773']</text:p>
          </table:table-cell>
          <table:table-cell office:value-type="string" office:string-value="24">
            <text:p>24</text:p>
          </table:table-cell>
          <table:table-cell office:value-type="string" office:string-value="17">
            <text:p>17</text:p>
          </table:table-cell>
          <table:table-cell office:value-type="string" office:string-value="176">
            <text:p>176</text:p>
          </table:table-cell>
          <table:table-cell office:value-type="string" office:string-value="">
            <text:p/>
          </table:table-cell>
          <table:table-cell office:value-type="string" office:string-value="">
            <text:p/>
          </table:table-cell>
          <table:table-cell office:value-type="string" office:string-value="55">
            <text:p>55</text:p>
          </table:table-cell>
          <table:table-cell office:value-type="string" office:string-value="7">
            <text:p>7</text:p>
          </table:table-cell>
          <table:table-cell office:value-type="string" office:string-value="book-package-app">
            <text:p>book-package-app</text:p>
          </table:table-cell>
          <table:table-cell office:value-type="string" office:string-value="https://www.npmjs.com/package/book-package-app">
            <text:p>https://www.npmjs.com/package/book-package-app</text:p>
          </table:table-cell>
          <table:table-cell office:value-type="string" office:string-value="False">
            <text:p>False</text:p>
          </table:table-cell>
          <table:table-cell office:value-type="string" office:string-value="112">
            <text:p>112</text:p>
          </table:table-cell>
          <table:table-cell office:value-type="string" office:string-value="2020-07-15T14:29:05.613Z">
            <text:p>2020-07-15T14:29:05.613Z</text:p>
          </table:table-cell>
          <table:table-cell office:value-type="string" office:string-value="">
            <text:p/>
          </table:table-cell>
          <table:table-cell office:value-type="string" office:string-value="['book-package-rcl', 'usfm-js', 'uw-word-count']">
            <text:p>['book-package-rcl', 'usfm-js', 'uw-word-count']</text:p>
          </table:table-cell>
          <table:table-cell office:value-type="string" office:string-value="2021-12-17T13:15:30Z">
            <text:p>2021-12-17T13:15:30Z</text:p>
          </table:table-cell>
          <table:table-cell office:value-type="string" office:string-value="unfoldingWord/book-package-app">
            <text:p>unfoldingWord/book-package-app</text:p>
          </table:table-cell>
          <table:table-cell office:value-type="string" office:string-value="https://github.com/unfoldingWord/book-package-app">
            <text:p>https://github.com/unfoldingWord/book-package-app</text:p>
          </table:table-cell>
          <table:table-cell office:value-type="string" office:string-value="1-Manual review">
            <text:p>1-Manual review</text:p>
          </table:table-cell>
          <table:table-cell office:value-type="string" office:string-value="Repository has significant release history, GitHub downloads, or commit history (7 releases, 55 downloads, 176 commits).">
            <text:p>Repository has significant release history, GitHub downloads, or commit history (7 releases, 55 downloads, 176 commits).</text:p>
          </table:table-cell>
          <table:table-cell office:value-type="string" office:string-value="Manual review - npm package">
            <text:p>Manual review - npm package</text:p>
          </table:table-cell>
          <table:table-cell office:value-type="string" office:string-value="Package has low but nonzero npm usage (112 downloads in the last year) and no detected local consumers.">
            <text:p>Package has low but nonzero npm usage (112 downloads in the last year) and no detected local consumers.</text:p>
          </table:table-cell>
          <table:table-cell office:value-type="string" office:string-value="book-package-app">
            <text:p>book-package-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rown-Driver-Briggs-Enhanced">
            <text:p>unfoldingWord/Brown-Driver-Briggs-Enhanced</text:p>
          </table:table-cell>
          <table:table-cell office:value-type="string" office:string-value="https://github.com/unfoldingWord/Brown-Driver-Briggs-Enhanced">
            <text:p>https://github.com/unfoldingWord/Brown-Driver-Briggs-Enhance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5-02T13:05:04Z">
            <text:p>2023-05-02T13:05:04Z</text:p>
          </table:table-cell>
          <table:table-cell office:value-type="string" office:string-value="2023-05-02T13:03:35Z">
            <text:p>2023-05-02T13:03:35Z</text:p>
          </table:table-cell>
          <table:table-cell office:value-type="string" office:string-value="">
            <text:p/>
          </table:table-cell>
          <table:table-cell office:value-type="string" office:string-value="">
            <text:p/>
          </table:table-cell>
          <table:table-cell office:value-type="string" office:string-value="['jdejoode', 'IanLindsley']">
            <text:p>['jdejoode', 'IanLindsley']</text:p>
          </table:table-cell>
          <table:table-cell office:value-type="string" office:string-value="3">
            <text:p>3</text:p>
          </table:table-cell>
          <table:table-cell office:value-type="string" office:string-value="1">
            <text:p>1</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7T13:44:58Z">
            <text:p>2026-05-17T13:44:58Z</text:p>
          </table:table-cell>
          <table:table-cell office:value-type="string" office:string-value="unfoldingWord/Brown-Driver-Briggs-Enhanced">
            <text:p>unfoldingWord/Brown-Driver-Briggs-Enhanced</text:p>
          </table:table-cell>
          <table:table-cell office:value-type="string" office:string-value="https://github.com/unfoldingWord/Brown-Driver-Briggs-Enhanced">
            <text:p>https://github.com/unfoldingWord/Brown-Driver-Briggs-Enhanced</text:p>
          </table:table-cell>
          <table:table-cell office:value-type="string" office:string-value="1-Manual review">
            <text:p>1-Manual review</text:p>
          </table:table-cell>
          <table:table-cell office:value-type="string" office:string-value="Repository was edited recently (1 months ago) but has not had a commit in over 36 months (37 months ago).">
            <text:p>Repository was edited recently (1 months ago) but has not had a commit in over 36 months (37 months ago).</text:p>
          </table:table-cell>
          <table:table-cell office:value-type="string" office:string-value="">
            <text:p/>
          </table:table-cell>
          <table:table-cell office:value-type="string" office:string-value="">
            <text:p/>
          </table:table-cell>
          <table:table-cell office:value-type="string" office:string-value="Brown-Driver-Briggs-Enhanced">
            <text:p>Brown-Driver-Briggs-Enhance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catalog-next-toolkit">
            <text:p>unfoldingWord/catalog-next-toolkit</text:p>
          </table:table-cell>
          <table:table-cell office:value-type="string" office:string-value="https://github.com/unfoldingWord/catalog-next-toolkit">
            <text:p>https://github.com/unfoldingWord/catalog-next-toolkit</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15T13:39:30Z">
            <text:p>2021-06-15T13:39:30Z</text:p>
          </table:table-cell>
          <table:table-cell office:value-type="string" office:string-value="2021-06-15T13:39:27Z">
            <text:p>2021-06-15T13:39:27Z</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1">
            <text:p>1</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atalog-next-toolkit">
            <text:p>catalog-next-tool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usfm-js']">
            <text:p>['uw-content-validation', 'usfm-js']</text:p>
          </table:table-cell>
          <table:table-cell office:value-type="string" office:string-value="2021-06-15T13:39:33Z">
            <text:p>2021-06-15T13:39:33Z</text:p>
          </table:table-cell>
          <table:table-cell office:value-type="string" office:string-value="unfoldingWord/catalog-next-toolkit">
            <text:p>unfoldingWord/catalog-next-toolkit</text:p>
          </table:table-cell>
          <table:table-cell office:value-type="string" office:string-value="https://github.com/unfoldingWord/catalog-next-toolkit">
            <text:p>https://github.com/unfoldingWord/catalog-next-toolki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atalog-next-toolkit">
            <text:p>catalog-next-toolki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hamilo2obsidian">
            <text:p>unfoldingWord-box3/chamilo2obsidian</text:p>
          </table:table-cell>
          <table:table-cell office:value-type="string" office:string-value="https://github.com/unfoldingWord-box3/chamilo2obsidian">
            <text:p>https://github.com/unfoldingWord-box3/chamilo2obsidian</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12-13T23:30:29Z">
            <text:p>2022-12-13T23:30:29Z</text:p>
          </table:table-cell>
          <table:table-cell office:value-type="string" office:string-value="2022-12-13T23:30:24Z">
            <text:p>2022-12-13T23:30:24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2-12T20:50:51Z">
            <text:p>2022-12-12T20:50:51Z</text:p>
          </table:table-cell>
          <table:table-cell office:value-type="string" office:string-value="unfoldingWord-box3/chamilo2obsidian">
            <text:p>unfoldingWord-box3/chamilo2obsidian</text:p>
          </table:table-cell>
          <table:table-cell office:value-type="string" office:string-value="https://github.com/unfoldingWord-box3/chamilo2obsidian">
            <text:p>https://github.com/unfoldingWord-box3/chamilo2obsidian</text:p>
          </table:table-cell>
          <table:table-cell office:value-type="string" office:string-value="1-Manual review">
            <text:p>1-Manual review</text:p>
          </table:table-cell>
          <table:table-cell office:value-type="string" office:string-value="Stale - Repository has had no commits in over 18 months (42 months ago) and is not archived.">
            <text:p>Stale - Repository has had no commits in over 18 months (42 months ago) and is not archived.</text:p>
          </table:table-cell>
          <table:table-cell office:value-type="string" office:string-value="">
            <text:p/>
          </table:table-cell>
          <table:table-cell office:value-type="string" office:string-value="">
            <text:p/>
          </table:table-cell>
          <table:table-cell office:value-type="string" office:string-value="chamilo2obsidian">
            <text:p>chamilo2obsidia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hecking-app-theia">
            <text:p>unfoldingWord-box3/checking-app-theia</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
            <text:p>unfoldingWord-box3/checking-app-theia</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cell office:value-type="string" office:string-value="checking-app-theia">
            <text:p>checking-app-theia</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hecking-app-theia/browser-app">
            <text:p>unfoldingWord-box3/checking-app-theia/browser-app</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browser-app">
            <text:p>unfoldingWord-box3/checking-app-theia/browser-app</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app-theia/browser-app">
            <text:p>checking-app-theia/browse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hecking-app-theia/CheckingApp">
            <text:p>unfoldingWord-box3/checking-app-theia/CheckingApp</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App">
            <text:p>Checking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CheckingApp">
            <text:p>unfoldingWord-box3/checking-app-theia/CheckingApp</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app-theia/CheckingApp">
            <text:p>checking-app-theia/Checking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hecking-app-theia/CheckingTool">
            <text:p>unfoldingWord-box3/checking-app-theia/CheckingTool</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Tool">
            <text:p>Checking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CheckingTool">
            <text:p>unfoldingWord-box3/checking-app-theia/CheckingTool</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app-theia/CheckingTool">
            <text:p>checking-app-theia/CheckingToo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hecking-app-theia/startChecking">
            <text:p>unfoldingWord-box3/checking-app-theia/startChecking</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tartChecking">
            <text:p>startCheckin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startChecking">
            <text:p>unfoldingWord-box3/checking-app-theia/startChecking</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app-theia/startChecking">
            <text:p>checking-app-theia/startChecking</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checkingRubric_tool">
            <text:p>unfoldingWord-dev/checkingRubric_tool</text:p>
          </table:table-cell>
          <table:table-cell office:value-type="string" office:string-value="https://github.com/unfoldingWord-dev/checkingRubric_tool">
            <text:p>https://github.com/unfoldingWord-dev/checkingRubric_too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28:23Z">
            <text:p>2019-04-15T16:28:23Z</text:p>
          </table:table-cell>
          <table:table-cell office:value-type="string" office:string-value="2019-04-15T16:28:18Z">
            <text:p>2019-04-15T16:28:18Z</text:p>
          </table:table-cell>
          <table:table-cell office:value-type="string" office:string-value="">
            <text:p/>
          </table:table-cell>
          <table:table-cell office:value-type="string" office:string-value="">
            <text:p/>
          </table:table-cell>
          <table:table-cell office:value-type="string" office:string-value="['mannycolon', 'ihoegen', 'ImgBotApp']">
            <text:p>['mannycolon', 'ihoegen', 'ImgBotApp']</text:p>
          </table:table-cell>
          <table:table-cell office:value-type="string" office:string-value="0">
            <text:p>0</text:p>
          </table:table-cell>
          <table:table-cell office:value-type="string" office:string-value="0">
            <text:p>0</text:p>
          </table:table-cell>
          <table:table-cell office:value-type="string" office:string-value="75">
            <text:p>7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RubricTool">
            <text:p>checkingRubri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19:40:10Z">
            <text:p>2019-10-22T19:40:10Z</text:p>
          </table:table-cell>
          <table:table-cell office:value-type="string" office:string-value="unfoldingWord-dev/checkingRubric_tool">
            <text:p>unfoldingWord-dev/checkingRubric_tool</text:p>
          </table:table-cell>
          <table:table-cell office:value-type="string" office:string-value="https://github.com/unfoldingWord-dev/checkingRubric_tool">
            <text:p>https://github.com/unfoldingWord-dev/checkingRubric_tool</text:p>
          </table:table-cell>
          <table:table-cell office:value-type="string" office:string-value="1-Manual review">
            <text:p>1-Manual review</text:p>
          </table:table-cell>
          <table:table-cell office:value-type="string" office:string-value="Stale - Repository has had no commits in over 18 months (86 months ago) and is not archived.">
            <text:p>Stale - Repository has had no commits in over 18 months (86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Rubric_tool">
            <text:p>checkingRubric_too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odex-sb-handler">
            <text:p>unfoldingWord-box3/codex-sb-handler</text:p>
          </table:table-cell>
          <table:table-cell office:value-type="string" office:string-value="https://github.com/unfoldingWord-box3/codex-sb-handler">
            <text:p>https://github.com/unfoldingWord-box3/codex-sb-handl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12-03T13:53:27Z">
            <text:p>2024-12-03T13:53:27Z</text:p>
          </table:table-cell>
          <table:table-cell office:value-type="string" office:string-value="2024-12-03T13:53:27Z">
            <text:p>2024-12-03T13:53:27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b-handler-sample">
            <text:p>sb-handler-s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12-03T13:57:40Z">
            <text:p>2024-12-03T13:57:40Z</text:p>
          </table:table-cell>
          <table:table-cell office:value-type="string" office:string-value="unfoldingWord-box3/codex-sb-handler">
            <text:p>unfoldingWord-box3/codex-sb-handler</text:p>
          </table:table-cell>
          <table:table-cell office:value-type="string" office:string-value="https://github.com/unfoldingWord-box3/codex-sb-handler">
            <text:p>https://github.com/unfoldingWord-box3/codex-sb-handl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odex-sb-handler">
            <text:p>codex-sb-handl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ontent-validation-app">
            <text:p>unfoldingWord-box3/content-validation-app</text:p>
          </table:table-cell>
          <table:table-cell office:value-type="string" office:string-value="https://github.com/unfoldingWord-box3/content-validation-app">
            <text:p>https://github.com/unfoldingWord-box3/content-validation-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29T11:54:08Z">
            <text:p>2021-03-29T11:54:08Z</text:p>
          </table:table-cell>
          <table:table-cell office:value-type="string" office:string-value="2021-03-29T11:54:05Z">
            <text:p>2021-03-29T11:54:05Z</text:p>
          </table:table-cell>
          <table:table-cell office:value-type="string" office:string-value="">
            <text:p/>
          </table:table-cell>
          <table:table-cell office:value-type="string" office:string-value="">
            <text:p/>
          </table:table-cell>
          <table:table-cell office:value-type="string" office:string-value="['PhotoNomad0', 'mandolyte']">
            <text:p>['PhotoNomad0', 'mandolyte']</text:p>
          </table:table-cell>
          <table:table-cell office:value-type="string" office:string-value="8">
            <text:p>8</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ontent-validation-app">
            <text:p>content-validation-app</text:p>
          </table:table-cell>
          <table:table-cell office:value-type="string" office:string-value="https://www.npmjs.com/package/content-validation-app">
            <text:p>https://www.npmjs.com/package/content-validation-app</text:p>
          </table:table-cell>
          <table:table-cell office:value-type="string" office:string-value="False">
            <text:p>False</text:p>
          </table:table-cell>
          <table:table-cell office:value-type="string" office:string-value="187">
            <text:p>187</text:p>
          </table:table-cell>
          <table:table-cell office:value-type="string" office:string-value="2020-09-16T21:52:51.640Z">
            <text:p>2020-09-16T21:52:51.640Z</text:p>
          </table:table-cell>
          <table:table-cell office:value-type="string" office:string-value="">
            <text:p/>
          </table:table-cell>
          <table:table-cell office:value-type="string" office:string-value="['uw-content-validation', 'usfm-js']">
            <text:p>['uw-content-validation', 'usfm-js']</text:p>
          </table:table-cell>
          <table:table-cell office:value-type="string" office:string-value="2021-03-29T11:54:10Z">
            <text:p>2021-03-29T11:54:10Z</text:p>
          </table:table-cell>
          <table:table-cell office:value-type="string" office:string-value="unfoldingWord-box3/content-validation-app">
            <text:p>unfoldingWord-box3/content-validation-app</text:p>
          </table:table-cell>
          <table:table-cell office:value-type="string" office:string-value="https://github.com/unfoldingWord-box3/content-validation-app">
            <text:p>https://github.com/unfoldingWord-box3/content-validation-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187 downloads in the last year) and no detected local consumers.">
            <text:p>Package has low but nonzero npm usage (187 downloads in the last year) and no detected local consumers.</text:p>
          </table:table-cell>
          <table:table-cell office:value-type="string" office:string-value="content-validation-app">
            <text:p>content-validation-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43-catalog">
            <text:p>unfoldingWord-dev/d43-catalog</text:p>
          </table:table-cell>
          <table:table-cell office:value-type="string" office:string-value="https://github.com/unfoldingWord-dev/d43-catalog">
            <text:p>https://github.com/unfoldingWord-dev/d43-catalog</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10-21T07:58:13Z">
            <text:p>2024-10-21T07:58:13Z</text:p>
          </table:table-cell>
          <table:table-cell office:value-type="string" office:string-value="2024-10-21T07:58:13Z">
            <text:p>2024-10-21T07:58:13Z</text:p>
          </table:table-cell>
          <table:table-cell office:value-type="string" office:string-value="">
            <text:p/>
          </table:table-cell>
          <table:table-cell office:value-type="string" office:string-value="">
            <text:p/>
          </table:table-cell>
          <table:table-cell office:value-type="string" office:string-value="['da1nerd', 'Thomas Klemz', 'Richard Mahn', 'richmahn', 'jag3773', 'phillip-hopper', 'Phil Hopper', 'PhotoNomad0', 'RoyalSix', 'rbnswartz', 'RobH123', 'Sterling (Jay) Scott', 'yakob-aleksandrovich']">
            <text:p>['da1nerd', 'Thomas Klemz', 'Richard Mahn', 'richmahn', 'jag3773', 'phillip-hopper', 'Phil Hopper', 'PhotoNomad0', 'RoyalSix', 'rbnswartz', 'RobH123', 'Sterling (Jay) Scott', 'yakob-aleksandrovich']</text:p>
          </table:table-cell>
          <table:table-cell office:value-type="string" office:string-value="25">
            <text:p>25</text:p>
          </table:table-cell>
          <table:table-cell office:value-type="string" office:string-value="14">
            <text:p>14</text:p>
          </table:table-cell>
          <table:table-cell office:value-type="string" office:string-value="706">
            <text:p>70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10-21T07:58:18Z">
            <text:p>2024-10-21T07:58:18Z</text:p>
          </table:table-cell>
          <table:table-cell office:value-type="string" office:string-value="unfoldingWord-dev/d43-catalog">
            <text:p>unfoldingWord-dev/d43-catalog</text:p>
          </table:table-cell>
          <table:table-cell office:value-type="string" office:string-value="https://github.com/unfoldingWord-dev/d43-catalog">
            <text:p>https://github.com/unfoldingWord-dev/d43-catalo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43-catalog">
            <text:p>d43-catalog</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cs-api-merge-poc">
            <text:p>unfoldingWord-dev/dcs-api-merge-poc</text:p>
          </table:table-cell>
          <table:table-cell office:value-type="string" office:string-value="https://github.com/unfoldingWord-dev/dcs-api-merge-poc">
            <text:p>https://github.com/unfoldingWord-dev/dcs-api-merge-poc</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1-01-06T21:01:02Z">
            <text:p>2021-01-06T21:01:02Z</text:p>
          </table:table-cell>
          <table:table-cell office:value-type="string" office:string-value="2020-11-09T17:00:59Z">
            <text:p>2020-11-09T17:00:59Z</text:p>
          </table:table-cell>
          <table:table-cell office:value-type="string" office:string-value="">
            <text:p/>
          </table:table-cell>
          <table:table-cell office:value-type="string" office:string-value="">
            <text:p/>
          </table:table-cell>
          <table:table-cell office:value-type="string" office:string-value="['richmahn', 'ttury']">
            <text:p>['richmahn', 'ttury']</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11-09T17:01:06Z">
            <text:p>2020-11-09T17:01:06Z</text:p>
          </table:table-cell>
          <table:table-cell office:value-type="string" office:string-value="unfoldingWord-dev/dcs-api-merge-poc">
            <text:p>unfoldingWord-dev/dcs-api-merge-poc</text:p>
          </table:table-cell>
          <table:table-cell office:value-type="string" office:string-value="https://github.com/unfoldingWord-dev/dcs-api-merge-poc">
            <text:p>https://github.com/unfoldingWord-dev/dcs-api-merge-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api-merge-poc">
            <text:p>dcs-api-merge-po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cs-api-resolve-conflicts-poc">
            <text:p>unfoldingWord-dev/dcs-api-resolve-conflicts-poc</text:p>
          </table:table-cell>
          <table:table-cell office:value-type="string" office:string-value="https://github.com/unfoldingWord-dev/dcs-api-resolve-conflicts-poc">
            <text:p>https://github.com/unfoldingWord-dev/dcs-api-resolve-conflicts-poc</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0-11-13T22:23:24Z">
            <text:p>2020-11-13T22:23:24Z</text:p>
          </table:table-cell>
          <table:table-cell office:value-type="string" office:string-value="2020-11-13T22:23:18Z">
            <text:p>2020-11-13T22:23:1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11-13T22:23:27Z">
            <text:p>2020-11-13T22:23:27Z</text:p>
          </table:table-cell>
          <table:table-cell office:value-type="string" office:string-value="unfoldingWord-dev/dcs-api-resolve-conflicts-poc">
            <text:p>unfoldingWord-dev/dcs-api-resolve-conflicts-poc</text:p>
          </table:table-cell>
          <table:table-cell office:value-type="string" office:string-value="https://github.com/unfoldingWord-dev/dcs-api-resolve-conflicts-poc">
            <text:p>https://github.com/unfoldingWord-dev/dcs-api-resolve-conflicts-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api-resolve-conflicts-poc">
            <text:p>dcs-api-resolve-conflicts-po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cs-docker">
            <text:p>unfoldingWord-dev/dcs-docker</text:p>
          </table:table-cell>
          <table:table-cell office:value-type="string" office:string-value="https://github.com/unfoldingWord-dev/dcs-docker">
            <text:p>https://github.com/unfoldingWord-dev/dcs-dock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5-13T21:16:12Z">
            <text:p>2021-05-13T21:16:12Z</text:p>
          </table:table-cell>
          <table:table-cell office:value-type="string" office:string-value="2021-05-13T21:16:06Z">
            <text:p>2021-05-13T21:16:0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git@github.com:unfoldingWord-dev/dcs-profile-default.git', 'git@github.com:unfoldingword-dev/dcs-profile-blank.git', 'git@github.com:unfoldingWord-dev/dcs-profile-unfoldingword-mirrored.git']">
            <text:p>['git@github.com:unfoldingWord-dev/dcs-profile-default.git', 'git@github.com:unfoldingword-dev/dcs-profile-blank.git', 'git@github.com:unfoldingWord-dev/dcs-profile-unfoldingword-mirrored.git']</text:p>
          </table:table-cell>
          <table:table-cell office:value-type="string" office:string-value="0">
            <text:p>0</text:p>
          </table:table-cell>
          <table:table-cell office:value-type="string" office:string-value="0">
            <text:p>0</text:p>
          </table:table-cell>
          <table:table-cell office:value-type="string" office:string-value="dcs-docker">
            <text:p>dcs-do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3T21:16:14Z">
            <text:p>2021-05-13T21:16:14Z</text:p>
          </table:table-cell>
          <table:table-cell office:value-type="string" office:string-value="unfoldingWord-dev/dcs-docker">
            <text:p>unfoldingWord-dev/dcs-docker</text:p>
          </table:table-cell>
          <table:table-cell office:value-type="string" office:string-value="https://github.com/unfoldingWord-dev/dcs-docker">
            <text:p>https://github.com/unfoldingWord-dev/dcs-doc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docker">
            <text:p>dcs-dock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cs-docs">
            <text:p>unfoldingWord/dcs-docs</text:p>
          </table:table-cell>
          <table:table-cell office:value-type="string" office:string-value="https://github.com/unfoldingWord/dcs-docs">
            <text:p>https://github.com/unfoldingWord/dcs-doc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2-25T23:31:19Z">
            <text:p>2022-02-25T23:31:19Z</text:p>
          </table:table-cell>
          <table:table-cell office:value-type="string" office:string-value="2021-07-19T02:07:02Z">
            <text:p>2021-07-19T02:07:02Z</text:p>
          </table:table-cell>
          <table:table-cell office:value-type="string" office:string-value="">
            <text:p/>
          </table:table-cell>
          <table:table-cell office:value-type="string" office:string-value="">
            <text:p/>
          </table:table-cell>
          <table:table-cell office:value-type="string" office:string-value="['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office:string-value="0">
            <text:p>0</text:p>
          </table:table-cell>
          <table:table-cell office:value-type="string" office:string-value="0">
            <text:p>0</text:p>
          </table:table-cell>
          <table:table-cell office:value-type="string" office:string-value="650">
            <text:p>65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2-25T23:02:31Z">
            <text:p>2022-02-25T23:02:31Z</text:p>
          </table:table-cell>
          <table:table-cell office:value-type="string" office:string-value="unfoldingWord/dcs-docs">
            <text:p>unfoldingWord/dcs-docs</text:p>
          </table:table-cell>
          <table:table-cell office:value-type="string" office:string-value="https://github.com/unfoldingWord/dcs-docs">
            <text:p>https://github.com/unfoldingWord/dcs-do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docs">
            <text:p>dcs-doc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dcs-file-version-diff-tool">
            <text:p>unfoldingWord-box3/dcs-file-version-diff-tool</text:p>
          </table:table-cell>
          <table:table-cell office:value-type="string" office:string-value="https://github.com/unfoldingWord-box3/dcs-file-version-diff-tool">
            <text:p>https://github.com/unfoldingWord-box3/dcs-file-version-diff-too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22T17:56:46Z">
            <text:p>2022-08-22T17:56:46Z</text:p>
          </table:table-cell>
          <table:table-cell office:value-type="string" office:string-value="2022-08-19T21:40:58Z">
            <text:p>2022-08-19T21:40:58Z</text:p>
          </table:table-cell>
          <table:table-cell office:value-type="string" office:string-value="">
            <text:p/>
          </table:table-cell>
          <table:table-cell office:value-type="string" office:string-value="">
            <text:p/>
          </table:table-cell>
          <table:table-cell office:value-type="string" office:string-value="['klappy', 'danielklapp', 'jincypjose']">
            <text:p>['klappy', 'danielklapp', 'jincypjose']</text:p>
          </table:table-cell>
          <table:table-cell office:value-type="string" office:string-value="7">
            <text:p>7</text:p>
          </table:table-cell>
          <table:table-cell office:value-type="string" office:string-value="2">
            <text:p>2</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file-version-diff-tool">
            <text:p>dcs-file-version-diff-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0T00:16:31Z">
            <text:p>2022-08-20T00:16:31Z</text:p>
          </table:table-cell>
          <table:table-cell office:value-type="string" office:string-value="unfoldingWord-box3/dcs-file-version-diff-tool">
            <text:p>unfoldingWord-box3/dcs-file-version-diff-tool</text:p>
          </table:table-cell>
          <table:table-cell office:value-type="string" office:string-value="https://github.com/unfoldingWord-box3/dcs-file-version-diff-tool">
            <text:p>https://github.com/unfoldingWord-box3/dcs-file-version-diff-too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file-version-diff-tool">
            <text:p>dcs-file-version-diff-too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cs-home-page-old">
            <text:p>unfoldingWord/dcs-home-page-old</text:p>
          </table:table-cell>
          <table:table-cell office:value-type="string" office:string-value="https://github.com/unfoldingWord/dcs-home-page-old">
            <text:p>https://github.com/unfoldingWord/dcs-home-page-old</text:p>
          </table:table-cell>
          <table:table-cell office:value-type="string" office:string-value="Dockerfile">
            <text:p>Dockerfile</text:p>
          </table:table-cell>
          <table:table-cell office:value-type="string" office:string-value="False">
            <text:p>False</text:p>
          </table:table-cell>
          <table:table-cell office:value-type="string" office:string-value="False">
            <text:p>False</text:p>
          </table:table-cell>
          <table:table-cell office:value-type="string" office:string-value="2023-01-13T23:56:37Z">
            <text:p>2023-01-13T23:56:37Z</text:p>
          </table:table-cell>
          <table:table-cell office:value-type="string" office:string-value="2023-01-13T23:55:56Z">
            <text:p>2023-01-13T23:55:5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31T23:27:02Z">
            <text:p>2023-01-31T23:27:02Z</text:p>
          </table:table-cell>
          <table:table-cell office:value-type="string" office:string-value="unfoldingWord/dcs-home-page-old">
            <text:p>unfoldingWord/dcs-home-page-old</text:p>
          </table:table-cell>
          <table:table-cell office:value-type="string" office:string-value="https://github.com/unfoldingWord/dcs-home-page-old">
            <text:p>https://github.com/unfoldingWord/dcs-home-page-old</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home-page-old">
            <text:p>dcs-home-page-ol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cs-local">
            <text:p>unfoldingWord/dcs-local</text:p>
          </table:table-cell>
          <table:table-cell office:value-type="string" office:string-value="https://github.com/unfoldingWord/dcs-local">
            <text:p>https://github.com/unfoldingWord/dcs-local</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2-01T18:06:35Z">
            <text:p>2023-12-01T18:06:35Z</text:p>
          </table:table-cell>
          <table:table-cell office:value-type="string" office:string-value="2023-12-01T18:06:32Z">
            <text:p>2023-12-01T18:06:32Z</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36">
            <text:p>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0-06T04:52:20Z">
            <text:p>2023-10-06T04:52:20Z</text:p>
          </table:table-cell>
          <table:table-cell office:value-type="string" office:string-value="unfoldingWord/dcs-local">
            <text:p>unfoldingWord/dcs-local</text:p>
          </table:table-cell>
          <table:table-cell office:value-type="string" office:string-value="https://github.com/unfoldingWord/dcs-local">
            <text:p>https://github.com/unfoldingWord/dcs-loca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local">
            <text:p>dcs-loca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dcs-login">
            <text:p>unfoldingWord-box3/dcs-login</text:p>
          </table:table-cell>
          <table:table-cell office:value-type="string" office:string-value="https://github.com/unfoldingWord-box3/dcs-login">
            <text:p>https://github.com/unfoldingWord-box3/dcs-logi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06T18:17:54Z">
            <text:p>2023-04-06T18:17:54Z</text:p>
          </table:table-cell>
          <table:table-cell office:value-type="string" office:string-value="2023-04-06T18:17:50Z">
            <text:p>2023-04-06T18:17:50Z</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login">
            <text:p>dcs-log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2023-04-04T15:43:56Z">
            <text:p>2023-04-04T15:43:56Z</text:p>
          </table:table-cell>
          <table:table-cell office:value-type="string" office:string-value="unfoldingWord-box3/dcs-login">
            <text:p>unfoldingWord-box3/dcs-login</text:p>
          </table:table-cell>
          <table:table-cell office:value-type="string" office:string-value="https://github.com/unfoldingWord-box3/dcs-login">
            <text:p>https://github.com/unfoldingWord-box3/dcs-login</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dcs-login">
            <text:p>dcs-login</text:p>
          </table:table-cell>
          <table:table-cell office:value-type="string" office:string-value="unfoldingWord-box3">
            <text:p>unfoldingWord-box3</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packages">
            <text:p>unfoldingWord/dcs-packages</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packages">
            <text:p>dcs-pack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5T21:38:49Z">
            <text:p>2022-08-25T21:38:49Z</text:p>
          </table:table-cell>
          <table:table-cell office:value-type="string" office:string-value="unfoldingWord/dcs-packages">
            <text:p>unfoldingWord/dcs-packages</text:p>
          </table:table-cell>
          <table:table-cell office:value-type="string" office:string-value="https://github.com/unfoldingWord/dcs-packages">
            <text:p>https://github.com/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packages">
            <text:p>dcs-packages</text:p>
          </table:table-cell>
          <table:table-cell office:value-type="string" office:string-value="unfoldingWord">
            <text:p>unfoldingWord</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packages/dcs-js">
            <text:p>unfoldingWord/dcs-packages/dcs-js</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js">
            <text:p>dcs-js</text:p>
          </table:table-cell>
          <table:table-cell office:value-type="string" office:string-value="https://www.npmjs.com/package/dcs-js">
            <text:p>https://www.npmjs.com/package/dcs-js</text:p>
          </table:table-cell>
          <table:table-cell office:value-type="string" office:string-value="">
            <text:p/>
          </table:table-cell>
          <table:table-cell office:value-type="string" office:string-value="784">
            <text:p>784</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2022-08-25T21:38:49Z">
            <text:p>2022-08-25T21:38:49Z</text:p>
          </table:table-cell>
          <table:table-cell office:value-type="string" office:string-value="unfoldingWord/dcs-packages/dcs-js">
            <text:p>unfoldingWord/dcs-packages/dcs-js</text:p>
          </table:table-cell>
          <table:table-cell office:value-type="string" office:string-value="https://github.com/unfoldingWord/dcs-packages">
            <text:p>https://github.com/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784 downloads in the last year) and no detected local consumers.">
            <text:p>Package has low but nonzero npm usage (784 downloads in the last year) and no detected local consumers.</text:p>
          </table:table-cell>
          <table:table-cell office:value-type="string" office:string-value="dcs-packages/dcs-js">
            <text:p>dcs-packages/dcs-js</text:p>
          </table:table-cell>
          <table:table-cell office:value-type="string" office:string-value="unfoldingWord">
            <text:p>unfoldingWord</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packages/dcs-js-example">
            <text:p>unfoldingWord/dcs-packages/dcs-js-example</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js-example">
            <text:p>dcs-js-ex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2022-08-25T21:38:49Z">
            <text:p>2022-08-25T21:38:49Z</text:p>
          </table:table-cell>
          <table:table-cell office:value-type="string" office:string-value="unfoldingWord/dcs-packages/dcs-js-example">
            <text:p>unfoldingWord/dcs-packages/dcs-js-example</text:p>
          </table:table-cell>
          <table:table-cell office:value-type="string" office:string-value="https://github.com/unfoldingWord/dcs-packages">
            <text:p>https://github.com/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packages/dcs-js-example">
            <text:p>dcs-packages/dcs-js-example</text:p>
          </table:table-cell>
          <table:table-cell office:value-type="string" office:string-value="unfoldingWord">
            <text:p>unfoldingWord</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packages/dcs-ts">
            <text:p>unfoldingWord/dcs-packages/dcs-ts</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ts">
            <text:p>dcs-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5T21:38:49Z">
            <text:p>2022-08-25T21:38:49Z</text:p>
          </table:table-cell>
          <table:table-cell office:value-type="string" office:string-value="unfoldingWord/dcs-packages/dcs-ts">
            <text:p>unfoldingWord/dcs-packages/dcs-ts</text:p>
          </table:table-cell>
          <table:table-cell office:value-type="string" office:string-value="https://github.com/unfoldingWord/dcs-packages">
            <text:p>https://github.com/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packages/dcs-ts">
            <text:p>dcs-packages/dcs-ts</text:p>
          </table:table-cell>
          <table:table-cell office:value-type="string" office:string-value="unfoldingWord">
            <text:p>unfoldingWord</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packages/vite-project">
            <text:p>unfoldingWord/dcs-packages/vite-project</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vite-project">
            <text:p>vite-proje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5T21:38:49Z">
            <text:p>2022-08-25T21:38:49Z</text:p>
          </table:table-cell>
          <table:table-cell office:value-type="string" office:string-value="unfoldingWord/dcs-packages/vite-project">
            <text:p>unfoldingWord/dcs-packages/vite-project</text:p>
          </table:table-cell>
          <table:table-cell office:value-type="string" office:string-value="https://github.com/unfoldingWord/dcs-packages">
            <text:p>https://github.com/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packages/vite-project">
            <text:p>dcs-packages/vite-projec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cs-profile-blank">
            <text:p>unfoldingWord-dev/dcs-profile-blank</text:p>
          </table:table-cell>
          <table:table-cell office:value-type="string" office:string-value="https://github.com/unfoldingWord-dev/dcs-profile-blank">
            <text:p>https://github.com/unfoldingWord-dev/dcs-profile-blank</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05:04Z">
            <text:p>2021-05-11T21:05:04Z</text:p>
          </table:table-cell>
          <table:table-cell office:value-type="string" office:string-value="2021-05-11T21:04:58Z">
            <text:p>2021-05-11T21:04:5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1T21:05:08Z">
            <text:p>2021-05-11T21:05:08Z</text:p>
          </table:table-cell>
          <table:table-cell office:value-type="string" office:string-value="unfoldingWord-dev/dcs-profile-blank">
            <text:p>unfoldingWord-dev/dcs-profile-blank</text:p>
          </table:table-cell>
          <table:table-cell office:value-type="string" office:string-value="https://github.com/unfoldingWord-dev/dcs-profile-blank">
            <text:p>https://github.com/unfoldingWord-dev/dcs-profile-blank</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profile-blank">
            <text:p>dcs-profile-blank</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cs-profile-unfoldingword">
            <text:p>unfoldingWord-dev/dcs-profile-unfoldingword</text:p>
          </table:table-cell>
          <table:table-cell office:value-type="string" office:string-value="https://github.com/unfoldingWord-dev/dcs-profile-unfoldingword">
            <text:p>https://github.com/unfoldingWord-dev/dcs-profile-unfoldingword</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28:28Z">
            <text:p>2021-05-11T21:28:28Z</text:p>
          </table:table-cell>
          <table:table-cell office:value-type="string" office:string-value="2021-05-11T21:04:58Z">
            <text:p>2021-05-11T21:04:5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1T21:28:35Z">
            <text:p>2021-05-11T21:28:35Z</text:p>
          </table:table-cell>
          <table:table-cell office:value-type="string" office:string-value="unfoldingWord-dev/dcs-profile-unfoldingword">
            <text:p>unfoldingWord-dev/dcs-profile-unfoldingword</text:p>
          </table:table-cell>
          <table:table-cell office:value-type="string" office:string-value="https://github.com/unfoldingWord-dev/dcs-profile-unfoldingword">
            <text:p>https://github.com/unfoldingWord-dev/dcs-profile-unfoldingword</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profile-unfoldingword">
            <text:p>dcs-profile-unfoldingwor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cs-profile-unfoldingword-mirrored">
            <text:p>unfoldingWord-dev/dcs-profile-unfoldingword-mirrored</text:p>
          </table:table-cell>
          <table:table-cell office:value-type="string" office:string-value="https://github.com/unfoldingWord-dev/dcs-profile-unfoldingword-mirrored">
            <text:p>https://github.com/unfoldingWord-dev/dcs-profile-unfoldingword-mirrored</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0:44:48Z">
            <text:p>2021-05-11T20:44:48Z</text:p>
          </table:table-cell>
          <table:table-cell office:value-type="string" office:string-value="2021-05-06T17:19:29Z">
            <text:p>2021-05-06T17:19:29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unfoldingWord-dev/dcs-profile-unfoldingword-mirrored">
            <text:p>unfoldingWord-dev/dcs-profile-unfoldingword-mirrored</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1T20:44:52Z">
            <text:p>2021-05-11T20:44:52Z</text:p>
          </table:table-cell>
          <table:table-cell office:value-type="string" office:string-value="unfoldingWord-dev/dcs-profile-unfoldingword-mirrored">
            <text:p>unfoldingWord-dev/dcs-profile-unfoldingword-mirrored</text:p>
          </table:table-cell>
          <table:table-cell office:value-type="string" office:string-value="https://github.com/unfoldingWord-dev/dcs-profile-unfoldingword-mirrored">
            <text:p>https://github.com/unfoldingWord-dev/dcs-profile-unfoldingword-mirrored</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cell office:value-type="string" office:string-value="dcs-profile-unfoldingword-mirrored">
            <text:p>dcs-profile-unfoldingword-mirrore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cs-templates">
            <text:p>unfoldingWord/dcs-templates</text:p>
          </table:table-cell>
          <table:table-cell office:value-type="string" office:string-value="https://github.com/unfoldingWord/dcs-templates">
            <text:p>https://github.com/unfoldingWord/dcs-template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1-27T10:22:11Z">
            <text:p>2023-11-27T10:22:11Z</text:p>
          </table:table-cell>
          <table:table-cell office:value-type="string" office:string-value="2023-11-27T10:22:08Z">
            <text:p>2023-11-27T10:22:08Z</text:p>
          </table:table-cell>
          <table:table-cell office:value-type="string" office:string-value="">
            <text:p/>
          </table:table-cell>
          <table:table-cell office:value-type="string" office:string-value="">
            <text:p/>
          </table:table-cell>
          <table:table-cell office:value-type="string" office:string-value="['richmahn', 'foxprogs']">
            <text:p>['richmahn', 'foxprogs']</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9-27T18:53:50Z">
            <text:p>2023-09-27T18:53:50Z</text:p>
          </table:table-cell>
          <table:table-cell office:value-type="string" office:string-value="unfoldingWord/dcs-templates">
            <text:p>unfoldingWord/dcs-templates</text:p>
          </table:table-cell>
          <table:table-cell office:value-type="string" office:string-value="https://github.com/unfoldingWord/dcs-templates">
            <text:p>https://github.com/unfoldingWord/dcs-templat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templates">
            <text:p>dcs-templat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dcs-vanilla">
            <text:p>unfoldingWord-box3/dcs-vanilla</text:p>
          </table:table-cell>
          <table:table-cell office:value-type="string" office:string-value="https://github.com/unfoldingWord-box3/dcs-vanilla">
            <text:p>https://github.com/unfoldingWord-box3/dcs-vanilla</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1-25T15:47:26Z">
            <text:p>2025-01-25T15:47:26Z</text:p>
          </table:table-cell>
          <table:table-cell office:value-type="string" office:string-value="2025-01-25T15:47:11Z">
            <text:p>2025-01-25T15:47:11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1-25T15:47:15Z">
            <text:p>2025-01-25T15:47:15Z</text:p>
          </table:table-cell>
          <table:table-cell office:value-type="string" office:string-value="unfoldingWord-box3/dcs-vanilla">
            <text:p>unfoldingWord-box3/dcs-vanilla</text:p>
          </table:table-cell>
          <table:table-cell office:value-type="string" office:string-value="https://github.com/unfoldingWord-box3/dcs-vanilla">
            <text:p>https://github.com/unfoldingWord-box3/dcs-vanilla</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vanilla">
            <text:p>dcs-vanilla</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desktop-app-liminal">
            <text:p>unfoldingWord-box3/desktop-app-liminal</text:p>
          </table:table-cell>
          <table:table-cell office:value-type="string" office:string-value="https://github.com/unfoldingWord-box3/desktop-app-liminal">
            <text:p>https://github.com/unfoldingWord-box3/desktop-app-limina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7-15T13:09:17Z">
            <text:p>2025-07-15T13:09:17Z</text:p>
          </table:table-cell>
          <table:table-cell office:value-type="string" office:string-value="2025-05-13T00:55:06Z">
            <text:p>2025-05-13T00:55:06Z</text:p>
          </table:table-cell>
          <table:table-cell office:value-type="string" office:string-value="">
            <text:p/>
          </table:table-cell>
          <table:table-cell office:value-type="string" office:string-value="">
            <text:p/>
          </table:table-cell>
          <table:table-cell office:value-type="string" office:string-value="['RUN-Projects', 'mvahowe', 'PhotoNomad0', 'yakob-aleksandrovich']">
            <text:p>['RUN-Projects', 'mvahowe', 'PhotoNomad0', 'yakob-aleksandrovich']</text:p>
          </table:table-cell>
          <table:table-cell office:value-type="string" office:string-value="2">
            <text:p>2</text:p>
          </table:table-cell>
          <table:table-cell office:value-type="string" office:string-value="2">
            <text:p>2</text:p>
          </table:table-cell>
          <table:table-cell office:value-type="string" office:string-value="58">
            <text:p>5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ankosmia-app-builder">
            <text:p>pankosmia-app-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5-14T14:59:15Z">
            <text:p>2025-05-14T14:59:15Z</text:p>
          </table:table-cell>
          <table:table-cell office:value-type="string" office:string-value="unfoldingWord-box3/desktop-app-liminal">
            <text:p>unfoldingWord-box3/desktop-app-liminal</text:p>
          </table:table-cell>
          <table:table-cell office:value-type="string" office:string-value="https://github.com/unfoldingWord-box3/desktop-app-liminal">
            <text:p>https://github.com/unfoldingWord-box3/desktop-app-limina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desktop-app-liminal">
            <text:p>desktop-app-limina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enhancedindexer">
            <text:p>unfoldingWord-dev/dokuwiki-enhancedindexer</text:p>
          </table:table-cell>
          <table:table-cell office:value-type="string" office:string-value="https://github.com/unfoldingWord-dev/dokuwiki-enhancedindexer">
            <text:p>https://github.com/unfoldingWord-dev/dokuwiki-enhancedindexer</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1-15T12:01:11Z">
            <text:p>2016-01-15T12:01:11Z</text:p>
          </table:table-cell>
          <table:table-cell office:value-type="string" office:string-value="2016-01-15T12:01:04Z">
            <text:p>2016-01-15T12:01:04Z</text:p>
          </table:table-cell>
          <table:table-cell office:value-type="string" office:string-value="">
            <text:p/>
          </table:table-cell>
          <table:table-cell office:value-type="string" office:string-value="">
            <text:p/>
          </table:table-cell>
          <table:table-cell office:value-type="string" office:string-value="['phillip-hopper', 'superdav42', 'Phil Hopper', 'jag3773']">
            <text:p>['phillip-hopper', 'superdav42', 'Phil Hopper', 'jag3773']</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unfoldingWord-dev/dokuwiki-enhancedindexer">
            <text:p>unfoldingWord-dev/dokuwiki-enhancedindexer</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1-14T18:53:56Z">
            <text:p>2016-01-14T18:53:56Z</text:p>
          </table:table-cell>
          <table:table-cell office:value-type="string" office:string-value="unfoldingWord-dev/dokuwiki-enhancedindexer">
            <text:p>unfoldingWord-dev/dokuwiki-enhancedindexer</text:p>
          </table:table-cell>
          <table:table-cell office:value-type="string" office:string-value="https://github.com/unfoldingWord-dev/dokuwiki-enhancedindexer">
            <text:p>https://github.com/unfoldingWord-dev/dokuwiki-enhancedindexer</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cell office:value-type="string" office:string-value="dokuwiki-enhancedindexer">
            <text:p>dokuwiki-enhancedindex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oor43-catalog-job-handler">
            <text:p>unfoldingWord/door43-catalog-job-handler</text:p>
          </table:table-cell>
          <table:table-cell office:value-type="string" office:string-value="https://github.com/unfoldingWord/door43-catalog-job-handler">
            <text:p>https://github.com/unfoldingWord/door43-catalog-job-handl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4-02T14:43:48Z">
            <text:p>2023-04-02T14:43:48Z</text:p>
          </table:table-cell>
          <table:table-cell office:value-type="string" office:string-value="2023-04-02T14:40:57Z">
            <text:p>2023-04-02T14:40:57Z</text:p>
          </table:table-cell>
          <table:table-cell office:value-type="string" office:string-value="2023-04-02T14:43:48Z">
            <text:p>2023-04-02T14:43:48Z</text:p>
          </table:table-cell>
          <table:table-cell office:value-type="string" office:string-value="">
            <text:p/>
          </table:table-cell>
          <table:table-cell office:value-type="string" office:string-value="['richmahn', 'da1nerd']">
            <text:p>['richmahn', 'da1nerd']</text:p>
          </table:table-cell>
          <table:table-cell office:value-type="string" office:string-value="1">
            <text:p>1</text:p>
          </table:table-cell>
          <table:table-cell office:value-type="string" office:string-value="1">
            <text:p>1</text:p>
          </table:table-cell>
          <table:table-cell office:value-type="string" office:string-value="46">
            <text:p>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4T15:44:21Z">
            <text:p>2022-10-04T15:44:21Z</text:p>
          </table:table-cell>
          <table:table-cell office:value-type="string" office:string-value="unfoldingWord/door43-catalog-job-handler">
            <text:p>unfoldingWord/door43-catalog-job-handler</text:p>
          </table:table-cell>
          <table:table-cell office:value-type="string" office:string-value="https://github.com/unfoldingWord/door43-catalog-job-handler">
            <text:p>https://github.com/unfoldingWord/door43-catalog-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oor43-catalog-job-handler">
            <text:p>door43-catalog-job-hand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oor43-job-handler">
            <text:p>unfoldingWord/door43-job-handler</text:p>
          </table:table-cell>
          <table:table-cell office:value-type="string" office:string-value="https://github.com/unfoldingWord/door43-job-handler">
            <text:p>https://github.com/unfoldingWord/door43-job-handl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1-23T20:41:34Z">
            <text:p>2024-01-23T20:41:34Z</text:p>
          </table:table-cell>
          <table:table-cell office:value-type="string" office:string-value="2024-01-23T20:20:22Z">
            <text:p>2024-01-23T20:20:22Z</text:p>
          </table:table-cell>
          <table:table-cell office:value-type="string" office:string-value="2024-01-23T20:41:34Z">
            <text:p>2024-01-23T20:41:34Z</text:p>
          </table:table-cell>
          <table:table-cell office:value-type="string" office:string-value="">
            <text:p/>
          </table:table-cell>
          <table:table-cell office:value-type="string" office:string-value="['RobH123', 'richmahn', 'Robert Hunt', 'jag3773', 'yakob-aleksandrovich']">
            <text:p>['RobH123', 'richmahn', 'Robert Hunt', 'jag3773', 'yakob-aleksandrovich']</text:p>
          </table:table-cell>
          <table:table-cell office:value-type="string" office:string-value="2">
            <text:p>2</text:p>
          </table:table-cell>
          <table:table-cell office:value-type="string" office:string-value="2">
            <text:p>2</text:p>
          </table:table-cell>
          <table:table-cell office:value-type="string" office:string-value="716">
            <text:p>7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06T15:21:33Z">
            <text:p>2024-02-06T15:21:33Z</text:p>
          </table:table-cell>
          <table:table-cell office:value-type="string" office:string-value="unfoldingWord/door43-job-handler">
            <text:p>unfoldingWord/door43-job-handler</text:p>
          </table:table-cell>
          <table:table-cell office:value-type="string" office:string-value="https://github.com/unfoldingWord/door43-job-handler">
            <text:p>https://github.com/unfoldingWord/door43-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oor43-job-handler">
            <text:p>door43-job-hand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door43-preview-rcl">
            <text:p>unfoldingWord-box3/door43-preview-rcl</text:p>
          </table:table-cell>
          <table:table-cell office:value-type="string" office:string-value="https://github.com/unfoldingWord-box3/door43-preview-rcl">
            <text:p>https://github.com/unfoldingWord-box3/door43-preview-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20T16:57:57Z">
            <text:p>2020-10-20T16:57:57Z</text:p>
          </table:table-cell>
          <table:table-cell office:value-type="string" office:string-value="2020-10-20T16:57:17Z">
            <text:p>2020-10-20T16:57:17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df-generator-rcl">
            <text:p>pdf-genera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2022-06-14T15:16:13Z">
            <text:p>2022-06-14T15:16:13Z</text:p>
          </table:table-cell>
          <table:table-cell office:value-type="string" office:string-value="unfoldingWord-box3/door43-preview-rcl">
            <text:p>unfoldingWord-box3/door43-preview-rcl</text:p>
          </table:table-cell>
          <table:table-cell office:value-type="string" office:string-value="https://github.com/unfoldingWord-box3/door43-preview-rcl">
            <text:p>https://github.com/unfoldingWord-box3/door43-preview-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oor43-preview-rcl">
            <text:p>door43-preview-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oor43.org">
            <text:p>unfoldingWord/door43.org</text:p>
          </table:table-cell>
          <table:table-cell office:value-type="string" office:string-value="https://github.com/unfoldingWord/door43.org">
            <text:p>https://github.com/unfoldingWord/door43.org</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4T16:02:14Z">
            <text:p>2026-03-14T16:02:14Z</text:p>
          </table:table-cell>
          <table:table-cell office:value-type="string" office:string-value="2024-04-11T03:45:41Z">
            <text:p>2024-04-11T03:45:41Z</text:p>
          </table:table-cell>
          <table:table-cell office:value-type="string" office:string-value="">
            <text:p/>
          </table:table-cell>
          <table:table-cell office:value-type="string" office:string-value="">
            <text:p/>
          </table:table-cell>
          <table:table-cell office:value-type="string" office:string-value="['richmahn', 'jag3773', 'RobH123', 'PhotoNomad0', 'Phil Hopper', 'codemis', 'Richard Mahn', 'phillip-hopper', 'dependabot[bot]', 'yakob-aleksandrovich', 'bspidel', 'ethantkoenig', 'dependabot-preview[bot]']">
            <text:p>['richmahn', 'jag3773', 'RobH123', 'PhotoNomad0', 'Phil Hopper', 'codemis', 'Richard Mahn', 'phillip-hopper', 'dependabot[bot]', 'yakob-aleksandrovich', 'bspidel', 'ethantkoenig', 'dependabot-preview[bot]']</text:p>
          </table:table-cell>
          <table:table-cell office:value-type="string" office:string-value="103">
            <text:p>103</text:p>
          </table:table-cell>
          <table:table-cell office:value-type="string" office:string-value="18">
            <text:p>18</text:p>
          </table:table-cell>
          <table:table-cell office:value-type="string" office:string-value="644">
            <text:p>64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org">
            <text:p>door43.or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5T03:14:46Z">
            <text:p>2026-03-15T03:14:46Z</text:p>
          </table:table-cell>
          <table:table-cell office:value-type="string" office:string-value="unfoldingWord/door43.org">
            <text:p>unfoldingWord/door43.org</text:p>
          </table:table-cell>
          <table:table-cell office:value-type="string" office:string-value="https://github.com/unfoldingWord/door43.org">
            <text:p>https://github.com/unfoldingWord/door43.or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oor43.org">
            <text:p>door43.org</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w-gitcommit">
            <text:p>unfoldingWord-dev/dw-gitcommit</text:p>
          </table:table-cell>
          <table:table-cell office:value-type="string" office:string-value="https://github.com/unfoldingWord-dev/dw-gitcommit">
            <text:p>https://github.com/unfoldingWord-dev/dw-gitcommit</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4-08T17:34:08Z">
            <text:p>2016-04-08T17:34:08Z</text:p>
          </table:table-cell>
          <table:table-cell office:value-type="string" office:string-value="2016-04-08T17:34:07Z">
            <text:p>2016-04-08T17:34:07Z</text:p>
          </table:table-cell>
          <table:table-cell office:value-type="string" office:string-value="">
            <text:p/>
          </table:table-cell>
          <table:table-cell office:value-type="string" office:string-value="">
            <text:p/>
          </table:table-cell>
          <table:table-cell office:value-type="string" office:string-value="['Jesse A. Griffin', 'woolfg', 'danny0838', 'root', 'richmahn', 'birkirb', 'Dave Pearce']">
            <text:p>['Jesse A. Griffin', 'woolfg', 'danny0838', 'root', 'richmahn', 'birkirb', 'Dave Pearce']</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unfoldingWord-dev/dw-gitcommit">
            <text:p>unfoldingWord-dev/dw-gitcommit</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4-08T13:55:39Z">
            <text:p>2016-04-08T13:55:39Z</text:p>
          </table:table-cell>
          <table:table-cell office:value-type="string" office:string-value="unfoldingWord-dev/dw-gitcommit">
            <text:p>unfoldingWord-dev/dw-gitcommit</text:p>
          </table:table-cell>
          <table:table-cell office:value-type="string" office:string-value="https://github.com/unfoldingWord-dev/dw-gitcommit">
            <text:p>https://github.com/unfoldingWord-dev/dw-gitcommit</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cell office:value-type="string" office:string-value="dw-gitcommit">
            <text:p>dw-gitcommit</text:p>
          </table:table-cell>
          <table:table-cell office:value-type="string" office:string-value="unfoldingWord-dev">
            <text:p>unfoldingWord-dev</text:p>
          </table:table-cell>
        </table:table-row>
        <table:table-row>
          <table:table-cell office:value-type="string" office:string-value="Ian Lindsley">
            <text:p>Ian Lindsley</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en_obs_tf">
            <text:p>unfoldingWord/en_obs_tf</text:p>
          </table:table-cell>
          <table:table-cell office:value-type="string" office:string-value="https://github.com/unfoldingWord/en_obs_tf">
            <text:p>https://github.com/unfoldingWord/en_obs_tf</text:p>
          </table:table-cell>
          <table:table-cell office:value-type="string" office:string-value="SCSS">
            <text:p>SCSS</text:p>
          </table:table-cell>
          <table:table-cell office:value-type="string" office:string-value="False">
            <text:p>False</text:p>
          </table:table-cell>
          <table:table-cell office:value-type="string" office:string-value="False">
            <text:p>False</text:p>
          </table:table-cell>
          <table:table-cell office:value-type="string" office:string-value="2023-08-16T19:50:46Z">
            <text:p>2023-08-16T19:50:46Z</text:p>
          </table:table-cell>
          <table:table-cell office:value-type="string" office:string-value="2023-08-16T19:37:59Z">
            <text:p>2023-08-16T19:37:59Z</text:p>
          </table:table-cell>
          <table:table-cell office:value-type="string" office:string-value="">
            <text:p/>
          </table:table-cell>
          <table:table-cell office:value-type="string" office:string-value="">
            <text:p/>
          </table:table-cell>
          <table:table-cell office:value-type="string" office:string-value="['IanLindsley', 'github-actions[bot]', 'morganrdvs', 'ILindsley']">
            <text:p>['IanLindsley', 'github-actions[bot]', 'morganrdvs', 'ILindsley']</text:p>
          </table:table-cell>
          <table:table-cell office:value-type="string" office:string-value="0">
            <text:p>0</text:p>
          </table:table-cell>
          <table:table-cell office:value-type="string" office:string-value="0">
            <text:p>0</text:p>
          </table:table-cell>
          <table:table-cell office:value-type="string" office:string-value="326">
            <text:p>32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6-07T19:49:43Z">
            <text:p>2023-06-07T19:49:43Z</text:p>
          </table:table-cell>
          <table:table-cell office:value-type="string" office:string-value="unfoldingWord/en_obs_tf">
            <text:p>unfoldingWord/en_obs_tf</text:p>
          </table:table-cell>
          <table:table-cell office:value-type="string" office:string-value="https://github.com/unfoldingWord/en_obs_tf">
            <text:p>https://github.com/unfoldingWord/en_obs_tf</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326 commits).">
            <text:p>Repository has significant release history, GitHub downloads, or commit history (0 releases, 0 downloads, 326 commits).</text:p>
          </table:table-cell>
          <table:table-cell office:value-type="string" office:string-value="">
            <text:p/>
          </table:table-cell>
          <table:table-cell office:value-type="string" office:string-value="">
            <text:p/>
          </table:table-cell>
          <table:table-cell office:value-type="string" office:string-value="en_obs_tf">
            <text:p>en_obs_tf</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exports">
            <text:p>unfoldingWord-dev/exports</text:p>
          </table:table-cell>
          <table:table-cell office:value-type="string" office:string-value="https://github.com/unfoldingWord-dev/exports">
            <text:p>https://github.com/unfoldingWord-dev/expor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8-05T19:30:09Z">
            <text:p>2014-08-05T19:30:09Z</text:p>
          </table:table-cell>
          <table:table-cell office:value-type="string" office:string-value="2014-08-05T19:30:05Z">
            <text:p>2014-08-05T19:30:05Z</text:p>
          </table:table-cell>
          <table:table-cell office:value-type="string" office:string-value="">
            <text:p/>
          </table:table-cell>
          <table:table-cell office:value-type="string" office:string-value="">
            <text:p/>
          </table:table-cell>
          <table:table-cell office:value-type="string" office:string-value="['Door43', 'dsmedia', 'root']">
            <text:p>['Door43', 'dsmedia', 'root']</text:p>
          </table:table-cell>
          <table:table-cell office:value-type="string" office:string-value="0">
            <text:p>0</text:p>
          </table:table-cell>
          <table:table-cell office:value-type="string" office:string-value="0">
            <text:p>0</text:p>
          </table:table-cell>
          <table:table-cell office:value-type="string" office:string-value="789">
            <text:p>78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21:38:19Z">
            <text:p>2015-06-23T21:38:19Z</text:p>
          </table:table-cell>
          <table:table-cell office:value-type="string" office:string-value="unfoldingWord-dev/exports">
            <text:p>unfoldingWord-dev/exports</text:p>
          </table:table-cell>
          <table:table-cell office:value-type="string" office:string-value="https://github.com/unfoldingWord-dev/exports">
            <text:p>https://github.com/unfoldingWord-dev/export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789 commits).">
            <text:p>Repository has significant release history, GitHub downloads, or commit history (0 releases, 0 downloads, 789 commits).</text:p>
          </table:table-cell>
          <table:table-cell office:value-type="string" office:string-value="">
            <text:p/>
          </table:table-cell>
          <table:table-cell office:value-type="string" office:string-value="">
            <text:p/>
          </table:table-cell>
          <table:table-cell office:value-type="string" office:string-value="exports">
            <text:p>expor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gateway-edit-POC">
            <text:p>unfoldingWord-box3/gateway-edit-POC</text:p>
          </table:table-cell>
          <table:table-cell office:value-type="string" office:string-value="https://github.com/unfoldingWord-box3/gateway-edit-POC">
            <text:p>https://github.com/unfoldingWord-box3/gateway-edit-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1-22T13:29:02Z">
            <text:p>2021-11-22T13:29:02Z</text:p>
          </table:table-cell>
          <table:table-cell office:value-type="string" office:string-value="2021-11-22T13:29:02Z">
            <text:p>2021-11-22T13:29:02Z</text:p>
          </table:table-cell>
          <table:table-cell office:value-type="string" office:string-value="">
            <text:p/>
          </table:table-cell>
          <table:table-cell office:value-type="string" office:string-value="">
            <text:p/>
          </table:table-cell>
          <table:table-cell office:value-type="string" office:string-value="['PhotoNomad0', 'mannycolon', 'Joel-C-Johnson', 'jincypjose']">
            <text:p>['PhotoNomad0', 'mannycolon', 'Joel-C-Johnson', 'jincypjose']</text:p>
          </table:table-cell>
          <table:table-cell office:value-type="string" office:string-value="2">
            <text:p>2</text:p>
          </table:table-cell>
          <table:table-cell office:value-type="string" office:string-value="0">
            <text:p>0</text:p>
          </table:table-cell>
          <table:table-cell office:value-type="string" office:string-value="852">
            <text:p>8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ateway-edit">
            <text:p>gateway-edit</text:p>
          </table:table-cell>
          <table:table-cell office:value-type="string" office:string-value="https://www.npmjs.com/package/gateway-edit">
            <text:p>https://www.npmjs.com/package/gateway-edit</text:p>
          </table:table-cell>
          <table:table-cell office:value-type="string" office:string-value="False">
            <text:p>False</text:p>
          </table:table-cell>
          <table:table-cell office:value-type="string" office:string-value="78">
            <text:p>78</text:p>
          </table:table-cell>
          <table:table-cell office:value-type="string" office:string-value="2024-04-25T19:00:31.705Z">
            <text:p>2024-04-25T19:00:31.705Z</text:p>
          </table:table-cell>
          <table:table-cell office:value-type="string" office:string-value="">
            <text:p/>
          </table:table-cell>
          <table:table-cell office:value-type="string" office:string-value="['bible-reference-rcl', 'gitea-react-toolkit', 'markdown-translatable', 'resource-workspace-rcl', 'scripture-resources-rcl', 'single-scripture-rcl', 'tc-ui-toolkit', 'translation-helps-rcl', 'word-aligner']">
            <text:p>['bible-reference-rcl', 'gitea-react-toolkit', 'markdown-translatable', 'resource-workspace-rcl', 'scripture-resources-rcl', 'single-scripture-rcl', 'tc-ui-toolkit', 'translation-helps-rcl', 'word-aligner']</text:p>
          </table:table-cell>
          <table:table-cell office:value-type="string" office:string-value="2021-11-22T13:29:05Z">
            <text:p>2021-11-22T13:29:05Z</text:p>
          </table:table-cell>
          <table:table-cell office:value-type="string" office:string-value="unfoldingWord-box3/gateway-edit-POC">
            <text:p>unfoldingWord-box3/gateway-edit-POC</text:p>
          </table:table-cell>
          <table:table-cell office:value-type="string" office:string-value="https://github.com/unfoldingWord-box3/gateway-edit-POC">
            <text:p>https://github.com/unfoldingWord-box3/gateway-edit-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ackage has not been published in over 24 months (26 months ago), has fewer than 100 downloads in the last year (78), and has no detected local consumers.">
            <text:p>Package has not been published in over 24 months (26 months ago), has fewer than 100 downloads in the last year (78), and has no detected local consumers.</text:p>
          </table:table-cell>
          <table:table-cell office:value-type="string" office:string-value="gateway-edit-POC">
            <text:p>gateway-edit-POC</text:p>
          </table:table-cell>
          <table:table-cell office:value-type="string" office:string-value="unfoldingWord-box3">
            <text:p>unfoldingWord-box3</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x">
            <text:p>x</text:p>
          </table:table-cell>
          <table:table-cell office:value-type="string" office:string-value="Old app but may still be used">
            <text:p>Old app but may still be used</text:p>
          </table:table-cell>
          <table:table-cell office:value-type="string" office:string-value="unfoldingWord/gateway-translate">
            <text:p>unfoldingWord/gateway-translate</text:p>
          </table:table-cell>
          <table:table-cell office:value-type="string" office:string-value="https://github.com/unfoldingWord/gateway-translate">
            <text:p>https://github.com/unfoldingWord/gateway-translat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08:42:40Z">
            <text:p>2024-01-12T08:42:40Z</text:p>
          </table:table-cell>
          <table:table-cell office:value-type="string" office:string-value="2024-01-10T13:38:37Z">
            <text:p>2024-01-10T13:38:37Z</text:p>
          </table:table-cell>
          <table:table-cell office:value-type="string" office:string-value="2024-01-12T13:59:58Z">
            <text:p>2024-01-12T13:59:58Z</text:p>
          </table:table-cell>
          <table:table-cell office:value-type="string" office:string-value="">
            <text:p/>
          </table:table-cell>
          <table:table-cell office:value-type="string" office:string-value="['mandolyte', 'larsgson', 'superdav42', 'abelpz', 'theNerd247', 'richmahn', 'elsylambert', 'jincypjose']">
            <text:p>['mandolyte', 'larsgson', 'superdav42', 'abelpz', 'theNerd247', 'richmahn', 'elsylambert', 'jincypjose']</text:p>
          </table:table-cell>
          <table:table-cell office:value-type="string" office:string-value="35">
            <text:p>35</text:p>
          </table:table-cell>
          <table:table-cell office:value-type="string" office:string-value="5">
            <text:p>5</text:p>
          </table:table-cell>
          <table:table-cell office:value-type="string" office:string-value="352">
            <text:p>3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gateway-translate">
            <text:p>gateway-trans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resource-workspace-rcl', 'scripture-resources-rcl', 'translation-helps-rcl', 'bible-reference-range', 'dcs-branch-merger', 'gitea-react-toolkit', 'markdown-translatable', 'tc-ui-toolkit', 'word-aligner', 'string-punctuation-tokenizer', 'usfm-js', 'wordmap-lexer', '@unfoldingword/eslint-config', 'uw-quote-helpers', 'tsv-groupdata-parser', 'uw-bible-parser', 'uw-tsv-parser']">
            <text:p>['bible-reference-rcl', 'dcs-js', 'resource-workspace-rcl', 'scripture-resources-rcl', 'translation-helps-rcl', 'bible-reference-range', 'dcs-branch-merger', 'gitea-react-toolkit', 'markdown-translatable', 'tc-ui-toolkit', 'word-aligner', 'string-punctuation-tokenizer', 'usfm-js', 'wordmap-lexer', '@unfoldingword/eslint-config', 'uw-quote-helpers', 'tsv-groupdata-parser', 'uw-bible-parser', 'uw-tsv-parser']</text:p>
          </table:table-cell>
          <table:table-cell office:value-type="string" office:string-value="2023-01-21T16:44:36Z">
            <text:p>2023-01-21T16:44:36Z</text:p>
          </table:table-cell>
          <table:table-cell office:value-type="string" office:string-value="unfoldingWord/gateway-translate">
            <text:p>unfoldingWord/gateway-translate</text:p>
          </table:table-cell>
          <table:table-cell office:value-type="string" office:string-value="https://github.com/unfoldingWord/gateway-translate">
            <text:p>https://github.com/unfoldingWord/gateway-translat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ateway-translate">
            <text:p>gateway-transla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gl-database-visualizations">
            <text:p>unfoldingWord-box3/gl-database-visualizations</text:p>
          </table:table-cell>
          <table:table-cell office:value-type="string" office:string-value="https://github.com/unfoldingWord-box3/gl-database-visualizations">
            <text:p>https://github.com/unfoldingWord-box3/gl-database-visualization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27T04:38:12Z">
            <text:p>2024-06-27T04:38:12Z</text:p>
          </table:table-cell>
          <table:table-cell office:value-type="string" office:string-value="2024-06-27T04:38:09Z">
            <text:p>2024-06-27T04:38:09Z</text:p>
          </table:table-cell>
          <table:table-cell office:value-type="string" office:string-value="">
            <text:p/>
          </table:table-cell>
          <table:table-cell office:value-type="string" office:string-value="">
            <text:p/>
          </table:table-cell>
          <table:table-cell office:value-type="string" office:string-value="['binu-alexander', 'jag3773']">
            <text:p>['binu-alexander', 'jag3773']</text:p>
          </table:table-cell>
          <table:table-cell office:value-type="string" office:string-value="0">
            <text:p>0</text:p>
          </table:table-cell>
          <table:table-cell office:value-type="string" office:string-value="0">
            <text:p>0</text:p>
          </table:table-cell>
          <table:table-cell office:value-type="string" office:string-value="77">
            <text:p>7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27T04:38:16Z">
            <text:p>2024-06-27T04:38:16Z</text:p>
          </table:table-cell>
          <table:table-cell office:value-type="string" office:string-value="unfoldingWord-box3/gl-database-visualizations">
            <text:p>unfoldingWord-box3/gl-database-visualizations</text:p>
          </table:table-cell>
          <table:table-cell office:value-type="string" office:string-value="https://github.com/unfoldingWord-box3/gl-database-visualizations">
            <text:p>https://github.com/unfoldingWord-box3/gl-database-visualizations</text:p>
          </table:table-cell>
          <table:table-cell office:value-type="string" office:string-value="1-Manual review">
            <text:p>1-Manual review</text:p>
          </table:table-cell>
          <table:table-cell office:value-type="string" office:string-value="Stale - Repository has had no commits in over 18 months (24 months ago) and is not archived.">
            <text:p>Stale - Repository has had no commits in over 18 months (24 months ago) and is not archived.</text:p>
          </table:table-cell>
          <table:table-cell office:value-type="string" office:string-value="">
            <text:p/>
          </table:table-cell>
          <table:table-cell office:value-type="string" office:string-value="">
            <text:p/>
          </table:table-cell>
          <table:table-cell office:value-type="string" office:string-value="gl-database-visualizations">
            <text:p>gl-database-visualization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gogs-custom">
            <text:p>unfoldingWord-dev/gogs-custom</text:p>
          </table:table-cell>
          <table:table-cell office:value-type="string" office:string-value="https://github.com/unfoldingWord-dev/gogs-custom">
            <text:p>https://github.com/unfoldingWord-dev/gogs-custom</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7-05-01T04:12:23Z">
            <text:p>2017-05-01T04:12:23Z</text:p>
          </table:table-cell>
          <table:table-cell office:value-type="string" office:string-value="2017-05-01T04:09:11Z">
            <text:p>2017-05-01T04:09:11Z</text:p>
          </table:table-cell>
          <table:table-cell office:value-type="string" office:string-value="">
            <text:p/>
          </table:table-cell>
          <table:table-cell office:value-type="string" office:string-value="">
            <text:p/>
          </table:table-cell>
          <table:table-cell office:value-type="string" office:string-value="['Richard Mahn', 'Gogs', 'richmahn', 'bspidel', 'jag3773', 'Root@git']">
            <text:p>['Richard Mahn', 'Gogs', 'richmahn', 'bspidel', 'jag3773', 'Root@git']</text:p>
          </table:table-cell>
          <table:table-cell office:value-type="string" office:string-value="0">
            <text:p>0</text:p>
          </table:table-cell>
          <table:table-cell office:value-type="string" office:string-value="0">
            <text:p>0</text:p>
          </table:table-cell>
          <table:table-cell office:value-type="string" office:string-value="86">
            <text:p>8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4:06Z">
            <text:p>2025-10-02T14:14:06Z</text:p>
          </table:table-cell>
          <table:table-cell office:value-type="string" office:string-value="unfoldingWord-dev/gogs-custom">
            <text:p>unfoldingWord-dev/gogs-custom</text:p>
          </table:table-cell>
          <table:table-cell office:value-type="string" office:string-value="https://github.com/unfoldingWord-dev/gogs-custom">
            <text:p>https://github.com/unfoldingWord-dev/gogs-custom</text:p>
          </table:table-cell>
          <table:table-cell office:value-type="string" office:string-value="1-Manual review">
            <text:p>1-Manual review</text:p>
          </table:table-cell>
          <table:table-cell office:value-type="string" office:string-value="Repository was edited recently (8 months ago) but has not had a commit in over 36 months (109 months ago).">
            <text:p>Repository was edited recently (8 months ago) but has not had a commit in over 36 months (109 months ago).</text:p>
          </table:table-cell>
          <table:table-cell office:value-type="string" office:string-value="">
            <text:p/>
          </table:table-cell>
          <table:table-cell office:value-type="string" office:string-value="">
            <text:p/>
          </table:table-cell>
          <table:table-cell office:value-type="string" office:string-value="gogs-custom">
            <text:p>gogs-custom</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gogs_auto_scaling">
            <text:p>unfoldingWord-dev/gogs_auto_scaling</text:p>
          </table:table-cell>
          <table:table-cell office:value-type="string" office:string-value="https://github.com/unfoldingWord-dev/gogs_auto_scaling">
            <text:p>https://github.com/unfoldingWord-dev/gogs_auto_scaling</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5-20T10:45:38Z">
            <text:p>2022-05-20T10:45:38Z</text:p>
          </table:table-cell>
          <table:table-cell office:value-type="string" office:string-value="2022-05-20T10:45:38Z">
            <text:p>2022-05-20T10:45:38Z</text:p>
          </table:table-cell>
          <table:table-cell office:value-type="string" office:string-value="">
            <text:p/>
          </table:table-cell>
          <table:table-cell office:value-type="string" office:string-value="">
            <text:p/>
          </table:table-cell>
          <table:table-cell office:value-type="string" office:string-value="['jag3773', 'root', 'yakob-aleksandrovich']">
            <text:p>['jag3773', 'root', 'yakob-aleksandrovich']</text:p>
          </table:table-cell>
          <table:table-cell office:value-type="string" office:string-value="0">
            <text:p>0</text:p>
          </table:table-cell>
          <table:table-cell office:value-type="string" office:string-value="0">
            <text:p>0</text:p>
          </table:table-cell>
          <table:table-cell office:value-type="string" office:string-value="147">
            <text:p>1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5-20T10:45:41Z">
            <text:p>2022-05-20T10:45:41Z</text:p>
          </table:table-cell>
          <table:table-cell office:value-type="string" office:string-value="unfoldingWord-dev/gogs_auto_scaling">
            <text:p>unfoldingWord-dev/gogs_auto_scaling</text:p>
          </table:table-cell>
          <table:table-cell office:value-type="string" office:string-value="https://github.com/unfoldingWord-dev/gogs_auto_scaling">
            <text:p>https://github.com/unfoldingWord-dev/gogs_auto_scaling</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47 commits).">
            <text:p>Repository has significant release history, GitHub downloads, or commit history (0 releases, 0 downloads, 147 commits).</text:p>
          </table:table-cell>
          <table:table-cell office:value-type="string" office:string-value="">
            <text:p/>
          </table:table-cell>
          <table:table-cell office:value-type="string" office:string-value="">
            <text:p/>
          </table:table-cell>
          <table:table-cell office:value-type="string" office:string-value="gogs_auto_scaling">
            <text:p>gogs_auto_scaling</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graphql-catalog-next">
            <text:p>unfoldingWord-box3/graphql-catalog-next</text:p>
          </table:table-cell>
          <table:table-cell office:value-type="string" office:string-value="https://github.com/unfoldingWord-box3/graphql-catalog-next">
            <text:p>https://github.com/unfoldingWord-box3/graphql-catalog-nex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6-08T15:35:33Z">
            <text:p>2021-06-08T15:35:33Z</text:p>
          </table:table-cell>
          <table:table-cell office:value-type="string" office:string-value="2021-06-08T15:35:20Z">
            <text:p>2021-06-08T15:35:20Z</text:p>
          </table:table-cell>
          <table:table-cell office:value-type="string" office:string-value="">
            <text:p/>
          </table:table-cell>
          <table:table-cell office:value-type="string" office:string-value="">
            <text:p/>
          </table:table-cell>
          <table:table-cell office:value-type="string" office:string-value="['mannycolon', 'kavitharaju', 'abelpz']">
            <text:p>['mannycolon', 'kavitharaju', 'abelpz']</text:p>
          </table:table-cell>
          <table:table-cell office:value-type="string" office:string-value="3">
            <text:p>3</text:p>
          </table:table-cell>
          <table:table-cell office:value-type="string" office:string-value="0">
            <text:p>0</text:p>
          </table:table-cell>
          <table:table-cell office:value-type="string" office:string-value="86">
            <text:p>8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6-08T15:35:23Z">
            <text:p>2021-06-08T15:35:23Z</text:p>
          </table:table-cell>
          <table:table-cell office:value-type="string" office:string-value="unfoldingWord-box3/graphql-catalog-next">
            <text:p>unfoldingWord-box3/graphql-catalog-next</text:p>
          </table:table-cell>
          <table:table-cell office:value-type="string" office:string-value="https://github.com/unfoldingWord-box3/graphql-catalog-next">
            <text:p>https://github.com/unfoldingWord-box3/graphql-catalog-nex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graphql-catalog-next">
            <text:p>graphql-catalog-nex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greek-apparatus-app">
            <text:p>unfoldingWord-box3/greek-apparatus-app</text:p>
          </table:table-cell>
          <table:table-cell office:value-type="string" office:string-value="https://github.com/unfoldingWord-box3/greek-apparatus-app">
            <text:p>https://github.com/unfoldingWord-box3/greek-apparatus-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2-18T21:03:03Z">
            <text:p>2020-12-18T21:03:03Z</text:p>
          </table:table-cell>
          <table:table-cell office:value-type="string" office:string-value="2020-12-14T15:55:47Z">
            <text:p>2020-12-14T15:55:47Z</text:p>
          </table:table-cell>
          <table:table-cell office:value-type="string" office:string-value="">
            <text:p/>
          </table:table-cell>
          <table:table-cell office:value-type="string" office:string-value="">
            <text:p/>
          </table:table-cell>
          <table:table-cell office:value-type="string" office:string-value="['richmahn', 'mannycolon', 'ancientTexts-net']">
            <text:p>['richmahn', 'mannycolon', 'ancientTexts-net']</text:p>
          </table:table-cell>
          <table:table-cell office:value-type="string" office:string-value="21">
            <text:p>21</text:p>
          </table:table-cell>
          <table:table-cell office:value-type="string" office:string-value="0">
            <text:p>0</text:p>
          </table:table-cell>
          <table:table-cell office:value-type="string" office:string-value="95">
            <text:p>9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reek-apparatus-app">
            <text:p>greek-apparatus-app</text:p>
          </table:table-cell>
          <table:table-cell office:value-type="string" office:string-value="https://www.npmjs.com/package/greek-apparatus-app">
            <text:p>https://www.npmjs.com/package/greek-apparatus-app</text:p>
          </table:table-cell>
          <table:table-cell office:value-type="string" office:string-value="False">
            <text:p>False</text:p>
          </table:table-cell>
          <table:table-cell office:value-type="string" office:string-value="70">
            <text:p>70</text:p>
          </table:table-cell>
          <table:table-cell office:value-type="string" office:string-value="2020-12-11T16:05:46.321Z">
            <text:p>2020-12-11T16:05:46.321Z</text:p>
          </table:table-cell>
          <table:table-cell office:value-type="string" office:string-value="">
            <text:p/>
          </table:table-cell>
          <table:table-cell office:value-type="string" office:string-value="['bible-reference-rcl', 'datatable-translatable', 'gitea-react-toolkit', 'scripture-resources-rcl', 'string-punctuation-tokenizer', 'usfm-js', 'wordmap-lexer', 'markdown-translatable', '@unfoldingword/eslint-config', 'bible-reference-range', 'tc-ui-toolkit', 'uw-quote-helpers', 'word-aligner', 'tsv-groupdata-parser', 'uw-bible-parser', 'uw-tsv-parser']">
            <text:p>['bible-reference-rcl', 'datatable-translatable', 'gitea-react-toolkit', 'scripture-resources-rcl', 'string-punctuation-tokenizer', 'usfm-js', 'wordmap-lexer', 'markdown-translatable', '@unfoldingword/eslint-config', 'bible-reference-range', 'tc-ui-toolkit', 'uw-quote-helpers', 'word-aligner', 'tsv-groupdata-parser', 'uw-bible-parser', 'uw-tsv-parser']</text:p>
          </table:table-cell>
          <table:table-cell office:value-type="string" office:string-value="2021-02-11T13:51:27Z">
            <text:p>2021-02-11T13:51:27Z</text:p>
          </table:table-cell>
          <table:table-cell office:value-type="string" office:string-value="unfoldingWord-box3/greek-apparatus-app">
            <text:p>unfoldingWord-box3/greek-apparatus-app</text:p>
          </table:table-cell>
          <table:table-cell office:value-type="string" office:string-value="https://github.com/unfoldingWord-box3/greek-apparatus-app">
            <text:p>https://github.com/unfoldingWord-box3/greek-apparatus-app</text:p>
          </table:table-cell>
          <table:table-cell office:value-type="string" office:string-value="1-Manual review">
            <text:p>1-Manual review</text:p>
          </table:table-cell>
          <table:table-cell office:value-type="string" office:string-value="Stale but used - Repository has had no commits in over 18 months (66 months ago) but still has detected usage (70 npm downloads in the last year).">
            <text:p>Stale but used - Repository has had no commits in over 18 months (66 months ago) but still has detected usage (70 npm downloads in the last year).</text:p>
          </table:table-cell>
          <table:table-cell office:value-type="string" office:string-value="Deprecate npm package candidate">
            <text:p>Deprecate npm package candidate</text:p>
          </table:table-cell>
          <table:table-cell office:value-type="string" office:string-value="Package has not been published in over 24 months (66 months ago), has fewer than 100 downloads in the last year (70), and has no detected local consumers.">
            <text:p>Package has not been published in over 24 months (66 months ago), has fewer than 100 downloads in the last year (70), and has no detected local consumers.</text:p>
          </table:table-cell>
          <table:table-cell office:value-type="string" office:string-value="greek-apparatus-app">
            <text:p>greek-apparatus-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gutenberg-project">
            <text:p>unfoldingWord-box3/gutenberg-project</text:p>
          </table:table-cell>
          <table:table-cell office:value-type="string" office:string-value="https://github.com/unfoldingWord-box3/gutenberg-project">
            <text:p>https://github.com/unfoldingWord-box3/gutenberg-projec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3-01T21:14:08Z">
            <text:p>2022-03-01T21:14:08Z</text:p>
          </table:table-cell>
          <table:table-cell office:value-type="string" office:string-value="2022-03-01T21:14:05Z">
            <text:p>2022-03-01T21:14:05Z</text:p>
          </table:table-cell>
          <table:table-cell office:value-type="string" office:string-value="">
            <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2022-03-01T21:05:23Z">
            <text:p>2022-03-01T21:05:23Z</text:p>
          </table:table-cell>
          <table:table-cell office:value-type="string" office:string-value="unfoldingWord-box3/gutenberg-project">
            <text:p>unfoldingWord-box3/gutenberg-project</text:p>
          </table:table-cell>
          <table:table-cell office:value-type="string" office:string-value="https://github.com/unfoldingWord-box3/gutenberg-project">
            <text:p>https://github.com/unfoldingWord-box3/gutenberg-project</text:p>
          </table:table-cell>
          <table:table-cell office:value-type="string" office:string-value="1-Manual review">
            <text:p>1-Manual review</text:p>
          </table:table-cell>
          <table:table-cell office:value-type="string" office:string-value="Stale - Repository has had no commits in over 18 months (51 months ago) and is not archived.">
            <text:p>Stale - Repository has had no commits in over 18 months (51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utenberg-project">
            <text:p>gutenberg-projec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GWE-Tests">
            <text:p>unfoldingWord/GWE-Tests</text:p>
          </table:table-cell>
          <table:table-cell office:value-type="string" office:string-value="https://github.com/unfoldingWord/GWE-Tests">
            <text:p>https://github.com/unfoldingWord/GWE-Tes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7-29T13:32:24Z">
            <text:p>2024-07-29T13:32:24Z</text:p>
          </table:table-cell>
          <table:table-cell office:value-type="string" office:string-value="2024-07-29T13:32:24Z">
            <text:p>2024-07-29T13:32:24Z</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29T13:32:27Z">
            <text:p>2024-07-29T13:32:27Z</text:p>
          </table:table-cell>
          <table:table-cell office:value-type="string" office:string-value="unfoldingWord/GWE-Tests">
            <text:p>unfoldingWord/GWE-Tests</text:p>
          </table:table-cell>
          <table:table-cell office:value-type="string" office:string-value="https://github.com/unfoldingWord/GWE-Tests">
            <text:p>https://github.com/unfoldingWord/GWE-Tests</text:p>
          </table:table-cell>
          <table:table-cell office:value-type="string" office:string-value="1-Manual review">
            <text:p>1-Manual review</text:p>
          </table:table-cell>
          <table:table-cell office:value-type="string" office:string-value="Stale - Repository has had no commits in over 18 months (23 months ago) and is not archived.">
            <text:p>Stale - Repository has had no commits in over 18 months (23 months ago) and is not archived.</text:p>
          </table:table-cell>
          <table:table-cell office:value-type="string" office:string-value="">
            <text:p/>
          </table:table-cell>
          <table:table-cell office:value-type="string" office:string-value="">
            <text:p/>
          </table:table-cell>
          <table:table-cell office:value-type="string" office:string-value="GWE-Tests">
            <text:p>GWE-Tes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hello-dcs-react-component-library">
            <text:p>unfoldingWord-box3/hello-dcs-react-component-library</text:p>
          </table:table-cell>
          <table:table-cell office:value-type="string" office:string-value="https://github.com/unfoldingWord-box3/hello-dcs-react-component-library">
            <text:p>https://github.com/unfoldingWord-box3/hello-dcs-react-component-librar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27T00:47:55Z">
            <text:p>2023-01-27T00:47:55Z</text:p>
          </table:table-cell>
          <table:table-cell office:value-type="string" office:string-value="2022-12-16T08:48:26Z">
            <text:p>2022-12-16T08:48:26Z</text:p>
          </table:table-cell>
          <table:table-cell office:value-type="string" office:string-value="">
            <text:p/>
          </table:table-cell>
          <table:table-cell office:value-type="string" office:string-value="">
            <text:p/>
          </table:table-cell>
          <table:table-cell office:value-type="string" office:string-value="['richmahn', 'dependabot[bot]', 'yakob-aleksandrovich']">
            <text:p>['richmahn', 'dependabot[bot]', 'yakob-aleksandrovich']</text:p>
          </table:table-cell>
          <table:table-cell office:value-type="string" office:string-value="6">
            <text:p>6</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ello-dcs-react-component-library">
            <text:p>hello-dcs-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unfoldingword/eslint-config']">
            <text:p>['gitea-react-toolkit', 'markdown-translatable', '@unfoldingword/eslint-config']</text:p>
          </table:table-cell>
          <table:table-cell office:value-type="string" office:string-value="2022-06-14T15:15:13Z">
            <text:p>2022-06-14T15:15:13Z</text:p>
          </table:table-cell>
          <table:table-cell office:value-type="string" office:string-value="unfoldingWord-box3/hello-dcs-react-component-library">
            <text:p>unfoldingWord-box3/hello-dcs-react-component-library</text:p>
          </table:table-cell>
          <table:table-cell office:value-type="string" office:string-value="https://github.com/unfoldingWord-box3/hello-dcs-react-component-library">
            <text:p>https://github.com/unfoldingWord-box3/hello-dcs-react-component-librar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hello-dcs-react-component-library">
            <text:p>hello-dcs-react-component-librar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hello-world-react-component-library">
            <text:p>unfoldingWord-box3/hello-world-react-component-library</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07:49:26Z">
            <text:p>2023-03-02T07:49:26Z</text:p>
          </table:table-cell>
          <table:table-cell office:value-type="string" office:string-value="2022-02-23T21:09:04Z">
            <text:p>2022-02-23T21:09:04Z</text:p>
          </table:table-cell>
          <table:table-cell office:value-type="string" office:string-value="">
            <text:p/>
          </table:table-cell>
          <table:table-cell office:value-type="string" office:string-value="">
            <text:p/>
          </table:table-cell>
          <table:table-cell office:value-type="string" office:string-value="['klappy', 'RoyalSix', 'Sterling (Jay) Scott']">
            <text:p>['klappy', 'RoyalSix', 'Sterling (Jay) Scott']</text:p>
          </table:table-cell>
          <table:table-cell office:value-type="string" office:string-value="32">
            <text:p>32</text:p>
          </table:table-cell>
          <table:table-cell office:value-type="string" office:string-value="27">
            <text:p>27</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ello-world-react-component-library">
            <text:p>hello-world-react-component-library</text:p>
          </table:table-cell>
          <table:table-cell office:value-type="string" office:string-value="https://www.npmjs.com/package/hello-world-react-component-library">
            <text:p>https://www.npmjs.com/package/hello-world-react-component-library</text:p>
          </table:table-cell>
          <table:table-cell office:value-type="string" office:string-value="False">
            <text:p>False</text:p>
          </table:table-cell>
          <table:table-cell office:value-type="string" office:string-value="199">
            <text:p>199</text:p>
          </table:table-cell>
          <table:table-cell office:value-type="string" office:string-value="2019-09-25T16:00:59.747Z">
            <text:p>2019-09-25T16:00:59.747Z</text:p>
          </table:table-cell>
          <table:table-cell office:value-type="string" office:string-value="">
            <text:p/>
          </table:table-cell>
          <table:table-cell office:value-type="string" office:string-value="">
            <text:p/>
          </table:table-cell>
          <table:table-cell office:value-type="string" office:string-value="2022-06-14T15:18:39Z">
            <text:p>2022-06-14T15:18:39Z</text:p>
          </table:table-cell>
          <table:table-cell office:value-type="string" office:string-value="unfoldingWord-box3/hello-world-react-component-library">
            <text:p>unfoldingWord-box3/hello-world-react-component-library</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1-Manual review">
            <text:p>1-Manual review</text:p>
          </table:table-cell>
          <table:table-cell office:value-type="string" office:string-value="Stale but used - Repository has had no commits in over 18 months (52 months ago) but still has detected usage (199 npm downloads in the last year).">
            <text:p>Stale but used - Repository has had no commits in over 18 months (52 months ago) but still has detected usage (199 npm downloads in the last year).</text:p>
          </table:table-cell>
          <table:table-cell office:value-type="string" office:string-value="Manual review - npm package">
            <text:p>Manual review - npm package</text:p>
          </table:table-cell>
          <table:table-cell office:value-type="string" office:string-value="Package has low but nonzero npm usage (199 downloads in the last year) and no detected local consumers.">
            <text:p>Package has low but nonzero npm usage (199 downloads in the last year) and no detected local consumers.</text:p>
          </table:table-cell>
          <table:table-cell office:value-type="string" office:string-value="hello-world-react-component-library">
            <text:p>hello-world-react-component-librar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Katalon-gatewayEdit-Elsy">
            <text:p>unfoldingWord/Katalon-gatewayEdit-Elsy</text:p>
          </table:table-cell>
          <table:table-cell office:value-type="string" office:string-value="https://github.com/unfoldingWord/Katalon-gatewayEdit-Elsy">
            <text:p>https://github.com/unfoldingWord/Katalon-gatewayEdit-Elsy</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9-01T17:44:59Z">
            <text:p>2021-09-01T17:44:59Z</text:p>
          </table:table-cell>
          <table:table-cell office:value-type="string" office:string-value="2021-09-01T17:44:55Z">
            <text:p>2021-09-01T17:44:55Z</text:p>
          </table:table-cell>
          <table:table-cell office:value-type="string" office:string-value="">
            <text:p/>
          </table:table-cell>
          <table:table-cell office:value-type="string" office:string-value="">
            <text:p/>
          </table:table-cell>
          <table:table-cell office:value-type="string" office:string-value="['elsylitsonlambert', 'elsylambert']">
            <text:p>['elsylitsonlambert', 'elsylambert']</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9-01T17:45:03Z">
            <text:p>2021-09-01T17:45:03Z</text:p>
          </table:table-cell>
          <table:table-cell office:value-type="string" office:string-value="unfoldingWord/Katalon-gatewayEdit-Elsy">
            <text:p>unfoldingWord/Katalon-gatewayEdit-Elsy</text:p>
          </table:table-cell>
          <table:table-cell office:value-type="string" office:string-value="https://github.com/unfoldingWord/Katalon-gatewayEdit-Elsy">
            <text:p>https://github.com/unfoldingWord/Katalon-gatewayEdit-Els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Katalon-gatewayEdit-Elsy">
            <text:p>Katalon-gatewayEdit-Els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Katalon-gatewayEdit-Koz">
            <text:p>unfoldingWord/Katalon-gatewayEdit-Koz</text:p>
          </table:table-cell>
          <table:table-cell office:value-type="string" office:string-value="https://github.com/unfoldingWord/Katalon-gatewayEdit-Koz">
            <text:p>https://github.com/unfoldingWord/Katalon-gatewayEdit-Koz</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01T04:27:45Z">
            <text:p>2021-07-01T04:27:45Z</text:p>
          </table:table-cell>
          <table:table-cell office:value-type="string" office:string-value="2021-05-22T18:43:02Z">
            <text:p>2021-05-22T18:43:02Z</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22T18:43:04Z">
            <text:p>2021-05-22T18:43:04Z</text:p>
          </table:table-cell>
          <table:table-cell office:value-type="string" office:string-value="unfoldingWord/Katalon-gatewayEdit-Koz">
            <text:p>unfoldingWord/Katalon-gatewayEdit-Koz</text:p>
          </table:table-cell>
          <table:table-cell office:value-type="string" office:string-value="https://github.com/unfoldingWord/Katalon-gatewayEdit-Koz">
            <text:p>https://github.com/unfoldingWord/Katalon-gatewayEdit-Koz</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Katalon-gatewayEdit-Koz">
            <text:p>Katalon-gatewayEdit-Koz</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Katalon_tC_Create">
            <text:p>unfoldingWord/Katalon_tC_Create</text:p>
          </table:table-cell>
          <table:table-cell office:value-type="string" office:string-value="https://github.com/unfoldingWord/Katalon_tC_Create">
            <text:p>https://github.com/unfoldingWord/Katalon_tC_Create</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7-08T17:16:23Z">
            <text:p>2021-07-08T17:16:23Z</text:p>
          </table:table-cell>
          <table:table-cell office:value-type="string" office:string-value="2021-07-08T17:16:06Z">
            <text:p>2021-07-08T17:16:06Z</text:p>
          </table:table-cell>
          <table:table-cell office:value-type="string" office:string-value="">
            <text:p/>
          </table:table-cell>
          <table:table-cell office:value-type="string" office:string-value="">
            <text:p/>
          </table:table-cell>
          <table:table-cell office:value-type="string" office:string-value="['cckozie', 'cckoz']">
            <text:p>['cckozie', 'cckoz']</text:p>
          </table:table-cell>
          <table:table-cell office:value-type="string" office:string-value="0">
            <text:p>0</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7-08T17:16:26Z">
            <text:p>2021-07-08T17:16:26Z</text:p>
          </table:table-cell>
          <table:table-cell office:value-type="string" office:string-value="unfoldingWord/Katalon_tC_Create">
            <text:p>unfoldingWord/Katalon_tC_Create</text:p>
          </table:table-cell>
          <table:table-cell office:value-type="string" office:string-value="https://github.com/unfoldingWord/Katalon_tC_Create">
            <text:p>https://github.com/unfoldingWord/Katalon_tC_Create</text:p>
          </table:table-cell>
          <table:table-cell office:value-type="string" office:string-value="1-Manual review">
            <text:p>1-Manual review</text:p>
          </table:table-cell>
          <table:table-cell office:value-type="string" office:string-value="Stale - Repository has had no commits in over 18 months (59 months ago) and is not archived.">
            <text:p>Stale - Repository has had no commits in over 18 months (59 months ago) and is not archived.</text:p>
          </table:table-cell>
          <table:table-cell office:value-type="string" office:string-value="">
            <text:p/>
          </table:table-cell>
          <table:table-cell office:value-type="string" office:string-value="">
            <text:p/>
          </table:table-cell>
          <table:table-cell office:value-type="string" office:string-value="Katalon_tC_Create">
            <text:p>Katalon_tC_Create</text:p>
          </table:table-cell>
          <table:table-cell office:value-type="string" office:string-value="unfoldingWord">
            <text:p>unfoldingWord</text:p>
          </table:table-cell>
        </table:table-row>
        <table:table-row>
          <table:table-cell office:value-type="string" office:string-value="Johan de Joode">
            <text:p>Johan de Joode</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lexicon-poc">
            <text:p>unfoldingWord-box3/lexicon-poc</text:p>
          </table:table-cell>
          <table:table-cell office:value-type="string" office:string-value="https://github.com/unfoldingWord-box3/lexicon-poc">
            <text:p>https://github.com/unfoldingWord-box3/lexicon-poc</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10-20T10:56:21Z">
            <text:p>2021-10-20T10:56:21Z</text:p>
          </table:table-cell>
          <table:table-cell office:value-type="string" office:string-value="2021-10-20T10:56:06Z">
            <text:p>2021-10-20T10:56:06Z</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136">
            <text:p>1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0-20T10:56:31Z">
            <text:p>2021-10-20T10:56:31Z</text:p>
          </table:table-cell>
          <table:table-cell office:value-type="string" office:string-value="unfoldingWord-box3/lexicon-poc">
            <text:p>unfoldingWord-box3/lexicon-poc</text:p>
          </table:table-cell>
          <table:table-cell office:value-type="string" office:string-value="https://github.com/unfoldingWord-box3/lexicon-poc">
            <text:p>https://github.com/unfoldingWord-box3/lexicon-poc</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36 commits).">
            <text:p>Repository has significant release history, GitHub downloads, or commit history (0 releases, 0 downloads, 136 commits).</text:p>
          </table:table-cell>
          <table:table-cell office:value-type="string" office:string-value="">
            <text:p/>
          </table:table-cell>
          <table:table-cell office:value-type="string" office:string-value="">
            <text:p/>
          </table:table-cell>
          <table:table-cell office:value-type="string" office:string-value="lexicon-poc">
            <text:p>lexicon-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md-converter-app">
            <text:p>unfoldingWord-box3/md-converter-app</text:p>
          </table:table-cell>
          <table:table-cell office:value-type="string" office:string-value="https://github.com/unfoldingWord-box3/md-converter-app">
            <text:p>https://github.com/unfoldingWord-box3/md-converter-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2-20T19:28:22Z">
            <text:p>2021-12-20T19:28:22Z</text:p>
          </table:table-cell>
          <table:table-cell office:value-type="string" office:string-value="2021-12-20T19:28:22Z">
            <text:p>2021-12-20T19:28:22Z</text:p>
          </table:table-cell>
          <table:table-cell office:value-type="string" office:string-value="">
            <text:p/>
          </table:table-cell>
          <table:table-cell office:value-type="string" office:string-value="">
            <text:p/>
          </table:table-cell>
          <table:table-cell office:value-type="string" office:string-value="['mannycolon', 'PhotoNomad0', 'ImgBotApp']">
            <text:p>['mannycolon', 'PhotoNomad0', 'ImgBotApp']</text:p>
          </table:table-cell>
          <table:table-cell office:value-type="string" office:string-value="30">
            <text:p>30</text:p>
          </table:table-cell>
          <table:table-cell office:value-type="string" office:string-value="0">
            <text:p>0</text:p>
          </table:table-cell>
          <table:table-cell office:value-type="string" office:string-value="213">
            <text:p>2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md-tsv-converter-app">
            <text:p>md-tsv-convert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2021-12-20T19:28:57Z">
            <text:p>2021-12-20T19:28:57Z</text:p>
          </table:table-cell>
          <table:table-cell office:value-type="string" office:string-value="unfoldingWord-box3/md-converter-app">
            <text:p>unfoldingWord-box3/md-converter-app</text:p>
          </table:table-cell>
          <table:table-cell office:value-type="string" office:string-value="https://github.com/unfoldingWord-box3/md-converter-app">
            <text:p>https://github.com/unfoldingWord-box3/md-converter-app</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213 commits).">
            <text:p>Repository has significant release history, GitHub downloads, or commit history (0 releases, 0 downloads, 213 commit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md-converter-app">
            <text:p>md-converte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mini-sb-handler">
            <text:p>unfoldingWord-box3/mini-sb-handler</text:p>
          </table:table-cell>
          <table:table-cell office:value-type="string" office:string-value="https://github.com/unfoldingWord-box3/mini-sb-handler">
            <text:p>https://github.com/unfoldingWord-box3/mini-sb-handl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9-12T09:53:14Z">
            <text:p>2024-09-12T09:53:14Z</text:p>
          </table:table-cell>
          <table:table-cell office:value-type="string" office:string-value="2024-09-12T09:53:09Z">
            <text:p>2024-09-12T09:53:09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False">
            <text:p>Fal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9-12T09:53:19Z">
            <text:p>2024-09-12T09:53:19Z</text:p>
          </table:table-cell>
          <table:table-cell office:value-type="string" office:string-value="unfoldingWord-box3/mini-sb-handler">
            <text:p>unfoldingWord-box3/mini-sb-handler</text:p>
          </table:table-cell>
          <table:table-cell office:value-type="string" office:string-value="https://github.com/unfoldingWord-box3/mini-sb-handler">
            <text:p>https://github.com/unfoldingWord-box3/mini-sb-handler</text:p>
          </table:table-cell>
          <table:table-cell office:value-type="string" office:string-value="1-Manual review">
            <text:p>1-Manual review</text:p>
          </table:table-cell>
          <table:table-cell office:value-type="string" office:string-value="Stale - Repository has had no commits in over 18 months (21 months ago) and is not archived.">
            <text:p>Stale - Repository has had no commits in over 18 months (21 months ago) and is not archived.</text:p>
          </table:table-cell>
          <table:table-cell office:value-type="string" office:string-value="">
            <text:p/>
          </table:table-cell>
          <table:table-cell office:value-type="string" office:string-value="">
            <text:p/>
          </table:table-cell>
          <table:table-cell office:value-type="string" office:string-value="mini-sb-handler">
            <text:p>mini-sb-handl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NotionImport">
            <text:p>unfoldingWord-box3/NotionImport</text:p>
          </table:table-cell>
          <table:table-cell office:value-type="string" office:string-value="https://github.com/unfoldingWord-box3/NotionImport">
            <text:p>https://github.com/unfoldingWord-box3/NotionImport</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0-23T20:23:28Z">
            <text:p>2023-10-23T20:23:28Z</text:p>
          </table:table-cell>
          <table:table-cell office:value-type="string" office:string-value="2023-10-23T20:23:28Z">
            <text:p>2023-10-23T20:23:28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0-23T20:12:59Z">
            <text:p>2023-10-23T20:12:59Z</text:p>
          </table:table-cell>
          <table:table-cell office:value-type="string" office:string-value="unfoldingWord-box3/NotionImport">
            <text:p>unfoldingWord-box3/NotionImport</text:p>
          </table:table-cell>
          <table:table-cell office:value-type="string" office:string-value="https://github.com/unfoldingWord-box3/NotionImport">
            <text:p>https://github.com/unfoldingWord-box3/NotionImport</text:p>
          </table:table-cell>
          <table:table-cell office:value-type="string" office:string-value="1-Manual review">
            <text:p>1-Manual review</text:p>
          </table:table-cell>
          <table:table-cell office:value-type="string" office:string-value="Stale - Repository has had no commits in over 18 months (32 months ago) and is not archived.">
            <text:p>Stale - Repository has had no commits in over 18 months (32 months ago) and is not archived.</text:p>
          </table:table-cell>
          <table:table-cell office:value-type="string" office:string-value="">
            <text:p/>
          </table:table-cell>
          <table:table-cell office:value-type="string" office:string-value="">
            <text:p/>
          </table:table-cell>
          <table:table-cell office:value-type="string" office:string-value="NotionImport">
            <text:p>NotionImpor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nsmsg">
            <text:p>unfoldingWord-dev/nsmsg</text:p>
          </table:table-cell>
          <table:table-cell office:value-type="string" office:string-value="https://github.com/unfoldingWord-dev/nsmsg">
            <text:p>https://github.com/unfoldingWord-dev/nsmsg</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2-24T19:58:22Z">
            <text:p>2015-02-24T19:58:22Z</text:p>
          </table:table-cell>
          <table:table-cell office:value-type="string" office:string-value="2015-02-24T19:55:32Z">
            <text:p>2015-02-24T19:55:32Z</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unfoldingWord-dev/nsmsg">
            <text:p>unfoldingWord-dev/nsmsg</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21:40:04Z">
            <text:p>2015-06-23T21:40:04Z</text:p>
          </table:table-cell>
          <table:table-cell office:value-type="string" office:string-value="unfoldingWord-dev/nsmsg">
            <text:p>unfoldingWord-dev/nsmsg</text:p>
          </table:table-cell>
          <table:table-cell office:value-type="string" office:string-value="https://github.com/unfoldingWord-dev/nsmsg">
            <text:p>https://github.com/unfoldingWord-dev/nsmsg</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cell office:value-type="string" office:string-value="nsmsg">
            <text:p>nsmsg</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obs-audio-navigation">
            <text:p>unfoldingWord-box3/obs-audio-navigation</text:p>
          </table:table-cell>
          <table:table-cell office:value-type="string" office:string-value="https://github.com/unfoldingWord-box3/obs-audio-navigation">
            <text:p>https://github.com/unfoldingWord-box3/obs-audio-navigatio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7-05T11:05:54Z">
            <text:p>2024-07-05T11:05:54Z</text:p>
          </table:table-cell>
          <table:table-cell office:value-type="string" office:string-value="2024-07-05T11:05:54Z">
            <text:p>2024-07-05T11:05:54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audio-navigation">
            <text:p>obs-audio-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05T11:13:09Z">
            <text:p>2024-07-05T11:13:09Z</text:p>
          </table:table-cell>
          <table:table-cell office:value-type="string" office:string-value="unfoldingWord-box3/obs-audio-navigation">
            <text:p>unfoldingWord-box3/obs-audio-navigation</text:p>
          </table:table-cell>
          <table:table-cell office:value-type="string" office:string-value="https://github.com/unfoldingWord-box3/obs-audio-navigation">
            <text:p>https://github.com/unfoldingWord-box3/obs-audio-navigation</text:p>
          </table:table-cell>
          <table:table-cell office:value-type="string" office:string-value="1-Manual review">
            <text:p>1-Manual review</text:p>
          </table:table-cell>
          <table:table-cell office:value-type="string" office:string-value="Stale - Repository has had no commits in over 18 months (23 months ago) and is not archived.">
            <text:p>Stale - Repository has had no commits in over 18 months (23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bs-audio-navigation">
            <text:p>obs-audio-navigation</text:p>
          </table:table-cell>
          <table:table-cell office:value-type="string" office:string-value="unfoldingWord-box3">
            <text:p>unfoldingWord-box3</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obs-web">
            <text:p>unfoldingWord/obs-web</text:p>
          </table:table-cell>
          <table:table-cell office:value-type="string" office:string-value="https://github.com/unfoldingWord/obs-web">
            <text:p>https://github.com/unfoldingWord/obs-web</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1-27T11:32:33Z">
            <text:p>2023-01-27T11:32:33Z</text:p>
          </table:table-cell>
          <table:table-cell office:value-type="string" office:string-value="2023-01-03T21:29:18Z">
            <text:p>2023-01-03T21:29:18Z</text:p>
          </table:table-cell>
          <table:table-cell office:value-type="string" office:string-value="">
            <text:p/>
          </table:table-cell>
          <table:table-cell office:value-type="string" office:string-value="">
            <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3">
            <text:p>3</text:p>
          </table:table-cell>
          <table:table-cell office:value-type="string" office:string-value="2">
            <text:p>2</text:p>
          </table:table-cell>
          <table:table-cell office:value-type="string" office:string-value="163">
            <text:p>16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27T00:53:46Z">
            <text:p>2026-04-27T00:53:46Z</text:p>
          </table:table-cell>
          <table:table-cell office:value-type="string" office:string-value="unfoldingWord/obs-web">
            <text:p>unfoldingWord/obs-web</text:p>
          </table:table-cell>
          <table:table-cell office:value-type="string" office:string-value="https://github.com/unfoldingWord/obs-web">
            <text:p>https://github.com/unfoldingWord/obs-web</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63 commits).">
            <text:p>Repository has significant release history, GitHub downloads, or commit history (0 releases, 0 downloads, 163 commits).</text:p>
          </table:table-cell>
          <table:table-cell office:value-type="string" office:string-value="">
            <text:p/>
          </table:table-cell>
          <table:table-cell office:value-type="string" office:string-value="">
            <text:p/>
          </table:table-cell>
          <table:table-cell office:value-type="string" office:string-value="obs-web">
            <text:p>obs-we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obsidian-uw-rc-link-opener">
            <text:p>unfoldingWord-dev/obsidian-uw-rc-link-opener</text:p>
          </table:table-cell>
          <table:table-cell office:value-type="string" office:string-value="https://github.com/unfoldingWord-dev/obsidian-uw-rc-link-opener">
            <text:p>https://github.com/unfoldingWord-dev/obsidian-uw-rc-link-open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08T17:40:36Z">
            <text:p>2021-06-08T17:40:36Z</text:p>
          </table:table-cell>
          <table:table-cell office:value-type="string" office:string-value="2021-06-08T17:40:33Z">
            <text:p>2021-06-08T17:40:33Z</text:p>
          </table:table-cell>
          <table:table-cell office:value-type="string" office:string-value="2021-06-07T19:26:06Z">
            <text:p>2021-06-07T19:26:06Z</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8">
            <text:p>8</text:p>
          </table:table-cell>
          <table:table-cell office:value-type="string" office:string-value="1">
            <text:p>1</text:p>
          </table:table-cell>
          <table:table-cell office:value-type="string" office:string-value="uw-rc-link-opener">
            <text:p>uw-rc-link-ope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6-08T17:40:39Z">
            <text:p>2021-06-08T17:40:39Z</text:p>
          </table:table-cell>
          <table:table-cell office:value-type="string" office:string-value="unfoldingWord-dev/obsidian-uw-rc-link-opener">
            <text:p>unfoldingWord-dev/obsidian-uw-rc-link-opener</text:p>
          </table:table-cell>
          <table:table-cell office:value-type="string" office:string-value="https://github.com/unfoldingWord-dev/obsidian-uw-rc-link-opener">
            <text:p>https://github.com/unfoldingWord-dev/obsidian-uw-rc-link-opener</text:p>
          </table:table-cell>
          <table:table-cell office:value-type="string" office:string-value="1-Manual review">
            <text:p>1-Manual review</text:p>
          </table:table-cell>
          <table:table-cell office:value-type="string" office:string-value="Stale - Repository has had no commits in over 18 months (60 months ago) and is not archived.">
            <text:p>Stale - Repository has had no commits in over 18 months (60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bsidian-uw-rc-link-opener">
            <text:p>obsidian-uw-rc-link-ope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oce-oak-edit">
            <text:p>unfoldingWord/oce-oak-edit</text:p>
          </table:table-cell>
          <table:table-cell office:value-type="string" office:string-value="https://github.com/unfoldingWord/oce-oak-edit">
            <text:p>https://github.com/unfoldingWord/oce-oak-edi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07:56:18Z">
            <text:p>2024-01-17T07:56:18Z</text:p>
          </table:table-cell>
          <table:table-cell office:value-type="string" office:string-value="2024-01-11T12:01:38Z">
            <text:p>2024-01-11T12:01:38Z</text:p>
          </table:table-cell>
          <table:table-cell office:value-type="string" office:string-value="">
            <text:p/>
          </table:table-cell>
          <table:table-cell office:value-type="string" office:string-value="">
            <text:p/>
          </table:table-cell>
          <table:table-cell office:value-type="string" office:string-value="['larsgson', 'kintsoogi']">
            <text:p>['larsgson', 'kintsoogi']</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 Oak Edit">
            <text:p>OCE Oak 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2023-09-18T05:39:45Z">
            <text:p>2023-09-18T05:39:45Z</text:p>
          </table:table-cell>
          <table:table-cell office:value-type="string" office:string-value="unfoldingWord/oce-oak-edit">
            <text:p>unfoldingWord/oce-oak-edit</text:p>
          </table:table-cell>
          <table:table-cell office:value-type="string" office:string-value="https://github.com/unfoldingWord/oce-oak-edit">
            <text:p>https://github.com/unfoldingWord/oce-oak-edit</text:p>
          </table:table-cell>
          <table:table-cell office:value-type="string" office:string-value="1-Manual review">
            <text:p>1-Manual review</text:p>
          </table:table-cell>
          <table:table-cell office:value-type="string" office:string-value="Stale - Repository has had no commits in over 18 months (29 months ago) and is not archived.">
            <text:p>Stale - Repository has had no commits in over 18 months (29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ce-oak-edit">
            <text:p>oce-oak-edi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oce-oak-render">
            <text:p>unfoldingWord/oce-oak-render</text:p>
          </table:table-cell>
          <table:table-cell office:value-type="string" office:string-value="https://github.com/unfoldingWord/oce-oak-render">
            <text:p>https://github.com/unfoldingWord/oce-oak-rend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14:27:05Z">
            <text:p>2024-01-12T14:27:05Z</text:p>
          </table:table-cell>
          <table:table-cell office:value-type="string" office:string-value="2024-01-12T14:27:05Z">
            <text:p>2024-01-12T14:27:05Z</text:p>
          </table:table-cell>
          <table:table-cell office:value-type="string" office:string-value="">
            <text:p/>
          </table:table-cell>
          <table:table-cell office:value-type="string" office:string-value="">
            <text:p/>
          </table:table-cell>
          <table:table-cell office:value-type="string" office:string-value="['larsgson', 'PhotoNomad0']">
            <text:p>['larsgson', 'PhotoNomad0']</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oak-render">
            <text:p>oce-oak-ren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uw-proskomma']">
            <text:p>['epitelete-html', 'uw-proskomma']</text:p>
          </table:table-cell>
          <table:table-cell office:value-type="string" office:string-value="2023-09-13T16:01:45Z">
            <text:p>2023-09-13T16:01:45Z</text:p>
          </table:table-cell>
          <table:table-cell office:value-type="string" office:string-value="unfoldingWord/oce-oak-render">
            <text:p>unfoldingWord/oce-oak-render</text:p>
          </table:table-cell>
          <table:table-cell office:value-type="string" office:string-value="https://github.com/unfoldingWord/oce-oak-render">
            <text:p>https://github.com/unfoldingWord/oce-oak-render</text:p>
          </table:table-cell>
          <table:table-cell office:value-type="string" office:string-value="1-Manual review">
            <text:p>1-Manual review</text:p>
          </table:table-cell>
          <table:table-cell office:value-type="string" office:string-value="Stale - Repository has had no commits in over 18 months (29 months ago) and is not archived.">
            <text:p>Stale - Repository has had no commits in over 18 months (29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ce-oak-render">
            <text:p>oce-oak-ren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open-languages">
            <text:p>unfoldingWord/open-languages</text:p>
          </table:table-cell>
          <table:table-cell office:value-type="string" office:string-value="https://github.com/unfoldingWord/open-languages">
            <text:p>https://github.com/unfoldingWord/open-langu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06T18:22:40Z">
            <text:p>2025-02-06T18:22:40Z</text:p>
          </table:table-cell>
          <table:table-cell office:value-type="string" office:string-value="2025-02-06T18:22:33Z">
            <text:p>2025-02-06T18:22:33Z</text:p>
          </table:table-cell>
          <table:table-cell office:value-type="string" office:string-value="">
            <text:p/>
          </table:table-cell>
          <table:table-cell office:value-type="string" office:string-value="">
            <text:p/>
          </table:table-cell>
          <table:table-cell office:value-type="string" office:string-value="samueljd">
            <text:p>samueljd</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penlanguages">
            <text:p>openlangu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2-06T18:22:44Z">
            <text:p>2025-02-06T18:22:44Z</text:p>
          </table:table-cell>
          <table:table-cell office:value-type="string" office:string-value="unfoldingWord/open-languages">
            <text:p>unfoldingWord/open-languages</text:p>
          </table:table-cell>
          <table:table-cell office:value-type="string" office:string-value="https://github.com/unfoldingWord/open-languages">
            <text:p>https://github.com/unfoldingWord/open-languag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pen-languages">
            <text:p>open-languag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org-language-resource-hook">
            <text:p>unfoldingWord-box3/org-language-resource-hook</text:p>
          </table:table-cell>
          <table:table-cell office:value-type="string" office:string-value="https://github.com/unfoldingWord-box3/org-language-resource-hook">
            <text:p>https://github.com/unfoldingWord-box3/org-language-resource-hook</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6-14T06:26:31Z">
            <text:p>2022-06-14T06:26:31Z</text:p>
          </table:table-cell>
          <table:table-cell office:value-type="string" office:string-value="2022-06-14T06:26:31Z">
            <text:p>2022-06-14T06:26:31Z</text:p>
          </table:table-cell>
          <table:table-cell office:value-type="string" office:string-value="">
            <text:p/>
          </table:table-cell>
          <table:table-cell office:value-type="string" office:string-value="">
            <text:p/>
          </table:table-cell>
          <table:table-cell office:value-type="string" office:string-value="jincypjose">
            <text:p>jincypjose</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6-14T06:26:30Z">
            <text:p>2022-06-14T06:26:30Z</text:p>
          </table:table-cell>
          <table:table-cell office:value-type="string" office:string-value="unfoldingWord-box3/org-language-resource-hook">
            <text:p>unfoldingWord-box3/org-language-resource-hook</text:p>
          </table:table-cell>
          <table:table-cell office:value-type="string" office:string-value="https://github.com/unfoldingWord-box3/org-language-resource-hook">
            <text:p>https://github.com/unfoldingWord-box3/org-language-resource-hook</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org-language-resource-hook">
            <text:p>org-language-resource-hook</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pages">
            <text:p>unfoldingWord-dev/pages</text:p>
          </table:table-cell>
          <table:table-cell office:value-type="string" office:string-value="https://github.com/unfoldingWord-dev/pages">
            <text:p>https://github.com/unfoldingWord-dev/pages</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4-10-21T15:55:23Z">
            <text:p>2014-10-21T15:55:23Z</text:p>
          </table:table-cell>
          <table:table-cell office:value-type="string" office:string-value="2014-10-21T15:55:20Z">
            <text:p>2014-10-21T15:55:20Z</text:p>
          </table:table-cell>
          <table:table-cell office:value-type="string" office:string-value="">
            <text:p/>
          </table:table-cell>
          <table:table-cell office:value-type="string" office:string-value="">
            <text:p/>
          </table:table-cell>
          <table:table-cell office:value-type="string" office:string-value="['Door43', 'Distant Shores Media', 'Jesse A. Griffin', 'root']">
            <text:p>['Door43', 'Distant Shores Media', 'Jesse A. Griffin', 'root']</text:p>
          </table:table-cell>
          <table:table-cell office:value-type="string" office:string-value="0">
            <text:p>0</text:p>
          </table:table-cell>
          <table:table-cell office:value-type="string" office:string-value="0">
            <text:p>0</text:p>
          </table:table-cell>
          <table:table-cell office:value-type="string" office:string-value="5454">
            <text:p>545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2-28T03:39:24Z">
            <text:p>2019-02-28T03:39:24Z</text:p>
          </table:table-cell>
          <table:table-cell office:value-type="string" office:string-value="unfoldingWord-dev/pages">
            <text:p>unfoldingWord-dev/pages</text:p>
          </table:table-cell>
          <table:table-cell office:value-type="string" office:string-value="https://github.com/unfoldingWord-dev/pages">
            <text:p>https://github.com/unfoldingWord-dev/page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5454 commits).">
            <text:p>Repository has significant release history, GitHub downloads, or commit history (0 releases, 0 downloads, 5454 commits).</text:p>
          </table:table-cell>
          <table:table-cell office:value-type="string" office:string-value="">
            <text:p/>
          </table:table-cell>
          <table:table-cell office:value-type="string" office:string-value="">
            <text:p/>
          </table:table-cell>
          <table:table-cell office:value-type="string" office:string-value="pages">
            <text:p>page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proskomma-scripture-resources-rcl">
            <text:p>unfoldingWord-box3/proskomma-scripture-resources-rcl</text:p>
          </table:table-cell>
          <table:table-cell office:value-type="string" office:string-value="https://github.com/unfoldingWord-box3/proskomma-scripture-resources-rcl">
            <text:p>https://github.com/unfoldingWord-box3/proskomma-scripture-resources-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29T14:02:08Z">
            <text:p>2021-04-29T14:02:08Z</text:p>
          </table:table-cell>
          <table:table-cell office:value-type="string" office:string-value="2021-02-05T16:34:09Z">
            <text:p>2021-02-05T16:34:09Z</text:p>
          </table:table-cell>
          <table:table-cell office:value-type="string" office:string-value="">
            <text:p/>
          </table:table-cell>
          <table:table-cell office:value-type="string" office:string-value="">
            <text:p/>
          </table:table-cell>
          <table:table-cell office:value-type="string" office:string-value="['mvahowe', 'mannycolon']">
            <text:p>['mvahowe', 'mannycolon']</text:p>
          </table:table-cell>
          <table:table-cell office:value-type="string" office:string-value="0">
            <text:p>0</text:p>
          </table:table-cell>
          <table:table-cell office:value-type="string" office:string-value="0">
            <text:p>0</text:p>
          </table:table-cell>
          <table:table-cell office:value-type="string" office:string-value="30">
            <text:p>3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roskomma-scripture-resources-rcl">
            <text:p>proskomma-scripture-resources-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2022-06-14T15:15:43Z">
            <text:p>2022-06-14T15:15:43Z</text:p>
          </table:table-cell>
          <table:table-cell office:value-type="string" office:string-value="unfoldingWord-box3/proskomma-scripture-resources-rcl">
            <text:p>unfoldingWord-box3/proskomma-scripture-resources-rcl</text:p>
          </table:table-cell>
          <table:table-cell office:value-type="string" office:string-value="https://github.com/unfoldingWord-box3/proskomma-scripture-resources-rcl">
            <text:p>https://github.com/unfoldingWord-box3/proskomma-scripture-resources-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proskomma-scripture-resources-rcl">
            <text:p>proskomma-scripture-resources-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python-gitea-client">
            <text:p>unfoldingWord-dev/python-gitea-client</text:p>
          </table:table-cell>
          <table:table-cell office:value-type="string" office:string-value="https://github.com/unfoldingWord-dev/python-gitea-client">
            <text:p>https://github.com/unfoldingWord-dev/python-gitea-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0-10-05T01:46:07Z">
            <text:p>2020-10-05T01:46:07Z</text:p>
          </table:table-cell>
          <table:table-cell office:value-type="string" office:string-value="2020-10-05T01:43:14Z">
            <text:p>2020-10-05T01:43:14Z</text:p>
          </table:table-cell>
          <table:table-cell office:value-type="string" office:string-value="2020-10-02T16:00:43Z">
            <text:p>2020-10-02T16:00:43Z</text:p>
          </table:table-cell>
          <table:table-cell office:value-type="string" office:string-value="">
            <text:p/>
          </table:table-cell>
          <table:table-cell office:value-type="string" office:string-value="['ethantkoenig', 'richmahn', 'da1nerd', 'guyzmo', 'costibleotu', 'evrardjp', 'jag3773', 'Richard Mahn', 'pyhedgehog']">
            <text:p>['ethantkoenig', 'richmahn', 'da1nerd', 'guyzmo', 'costibleotu', 'evrardjp', 'jag3773', 'Richard Mahn', 'pyhedgehog']</text:p>
          </table:table-cell>
          <table:table-cell office:value-type="string" office:string-value="5">
            <text:p>5</text:p>
          </table:table-cell>
          <table:table-cell office:value-type="string" office:string-value="1">
            <text:p>1</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2-23T11:58:32Z">
            <text:p>2025-02-23T11:58:32Z</text:p>
          </table:table-cell>
          <table:table-cell office:value-type="string" office:string-value="unfoldingWord-dev/python-gitea-client">
            <text:p>unfoldingWord-dev/python-gitea-client</text:p>
          </table:table-cell>
          <table:table-cell office:value-type="string" office:string-value="https://github.com/unfoldingWord-dev/python-gitea-client">
            <text:p>https://github.com/unfoldingWord-dev/python-gitea-client</text:p>
          </table:table-cell>
          <table:table-cell office:value-type="string" office:string-value="1-Manual review">
            <text:p>1-Manual review</text:p>
          </table:table-cell>
          <table:table-cell office:value-type="string" office:string-value="Stale - Repository has had no commits in over 18 months (68 months ago) and is not archived.">
            <text:p>Stale - Repository has had no commits in over 18 months (68 months ago) and is not archived.</text:p>
          </table:table-cell>
          <table:table-cell office:value-type="string" office:string-value="">
            <text:p/>
          </table:table-cell>
          <table:table-cell office:value-type="string" office:string-value="">
            <text:p/>
          </table:table-cell>
          <table:table-cell office:value-type="string" office:string-value="python-gitea-client">
            <text:p>python-gitea-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python-resource-container">
            <text:p>unfoldingWord-dev/python-resource-container</text:p>
          </table:table-cell>
          <table:table-cell office:value-type="string" office:string-value="https://github.com/unfoldingWord-dev/python-resource-container">
            <text:p>https://github.com/unfoldingWord-dev/python-resource-contain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2-05T23:06:00Z">
            <text:p>2018-02-05T23:06:00Z</text:p>
          </table:table-cell>
          <table:table-cell office:value-type="string" office:string-value="2018-02-05T23:05:15Z">
            <text:p>2018-02-05T23:05:15Z</text:p>
          </table:table-cell>
          <table:table-cell office:value-type="string" office:string-value="">
            <text:p/>
          </table:table-cell>
          <table:table-cell office:value-type="string" office:string-value="">
            <text:p/>
          </table:table-cell>
          <table:table-cell office:value-type="string" office:string-value="['da1nerd', 'jeremymlane']">
            <text:p>['da1nerd', 'jeremymlane']</text:p>
          </table:table-cell>
          <table:table-cell office:value-type="string" office:string-value="0">
            <text:p>0</text:p>
          </table:table-cell>
          <table:table-cell office:value-type="string" office:string-value="0">
            <text:p>0</text:p>
          </table:table-cell>
          <table:table-cell office:value-type="string" office:string-value="52">
            <text:p>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5-04T19:55:10Z">
            <text:p>2017-05-04T19:55:10Z</text:p>
          </table:table-cell>
          <table:table-cell office:value-type="string" office:string-value="unfoldingWord-dev/python-resource-container">
            <text:p>unfoldingWord-dev/python-resource-container</text:p>
          </table:table-cell>
          <table:table-cell office:value-type="string" office:string-value="https://github.com/unfoldingWord-dev/python-resource-container">
            <text:p>https://github.com/unfoldingWord-dev/python-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python-resource-container">
            <text:p>python-resource-contai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rc-schema">
            <text:p>unfoldingWord/rc-schema</text:p>
          </table:table-cell>
          <table:table-cell office:value-type="string" office:string-value="https://github.com/unfoldingWord/rc-schema">
            <text:p>https://github.com/unfoldingWord/rc-schema</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8-10T21:21:47Z">
            <text:p>2023-08-10T21:21:47Z</text:p>
          </table:table-cell>
          <table:table-cell office:value-type="string" office:string-value="2023-08-10T21:21:47Z">
            <text:p>2023-08-10T21:21:47Z</text:p>
          </table:table-cell>
          <table:table-cell office:value-type="string" office:string-value="">
            <text:p/>
          </table:table-cell>
          <table:table-cell office:value-type="string" office:string-value="">
            <text:p/>
          </table:table-cell>
          <table:table-cell office:value-type="string" office:string-value="['richmahn', 'RobH123']">
            <text:p>['richmahn', 'RobH123']</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1-30T18:22:18Z">
            <text:p>2021-11-30T18:22:18Z</text:p>
          </table:table-cell>
          <table:table-cell office:value-type="string" office:string-value="unfoldingWord/rc-schema">
            <text:p>unfoldingWord/rc-schema</text:p>
          </table:table-cell>
          <table:table-cell office:value-type="string" office:string-value="https://github.com/unfoldingWord/rc-schema">
            <text:p>https://github.com/unfoldingWord/rc-schema</text:p>
          </table:table-cell>
          <table:table-cell office:value-type="string" office:string-value="1-Manual review">
            <text:p>1-Manual review</text:p>
          </table:table-cell>
          <table:table-cell office:value-type="string" office:string-value="Stale - Repository has had no commits in over 18 months (34 months ago) and is not archived.">
            <text:p>Stale - Repository has had no commits in over 18 months (34 months ago) and is not archived.</text:p>
          </table:table-cell>
          <table:table-cell office:value-type="string" office:string-value="">
            <text:p/>
          </table:table-cell>
          <table:table-cell office:value-type="string" office:string-value="">
            <text:p/>
          </table:table-cell>
          <table:table-cell office:value-type="string" office:string-value="rc-schema">
            <text:p>rc-schema</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RecordVoice">
            <text:p>unfoldingWord-box3/RecordVoice</text:p>
          </table:table-cell>
          <table:table-cell office:value-type="string" office:string-value="https://github.com/unfoldingWord-box3/RecordVoice">
            <text:p>https://github.com/unfoldingWord-box3/RecordVoice</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6T14:13:55Z">
            <text:p>2024-03-06T14:13:55Z</text:p>
          </table:table-cell>
          <table:table-cell office:value-type="string" office:string-value="2024-03-06T14:13:51Z">
            <text:p>2024-03-06T14:13:51Z</text:p>
          </table:table-cell>
          <table:table-cell office:value-type="string" office:string-value="">
            <text:p/>
          </table:table-cell>
          <table:table-cell office:value-type="string" office:string-value="">
            <text:p/>
          </table:table-cell>
          <table:table-cell office:value-type="string" office:string-value="blm">
            <text:p>blm</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cord-voice">
            <text:p>record-voi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05T16:10:13Z">
            <text:p>2024-03-05T16:10:13Z</text:p>
          </table:table-cell>
          <table:table-cell office:value-type="string" office:string-value="unfoldingWord-box3/RecordVoice">
            <text:p>unfoldingWord-box3/RecordVoice</text:p>
          </table:table-cell>
          <table:table-cell office:value-type="string" office:string-value="https://github.com/unfoldingWord-box3/RecordVoice">
            <text:p>https://github.com/unfoldingWord-box3/RecordVoice</text:p>
          </table:table-cell>
          <table:table-cell office:value-type="string" office:string-value="1-Manual review">
            <text:p>1-Manual review</text:p>
          </table:table-cell>
          <table:table-cell office:value-type="string" office:string-value="Stale - Repository has had no commits in over 18 months (27 months ago) and is not archived.">
            <text:p>Stale - Repository has had no commits in over 18 months (27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RecordVoice">
            <text:p>RecordVoice</text:p>
          </table:table-cell>
          <table:table-cell office:value-type="string" office:string-value="unfoldingWord-box3">
            <text:p>unfoldingWord-box3</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resource-container-rcl">
            <text:p>unfoldingWord-box3/resource-container-rcl</text:p>
          </table:table-cell>
          <table:table-cell office:value-type="string" office:string-value="https://github.com/unfoldingWord-box3/resource-container-rcl">
            <text:p>https://github.com/unfoldingWord-box3/resource-container-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06:31:27Z">
            <text:p>2023-01-06T06:31:27Z</text:p>
          </table:table-cell>
          <table:table-cell office:value-type="string" office:string-value="2021-03-10T16:03:18Z">
            <text:p>2021-03-10T16:03:1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23">
            <text:p>23</text:p>
          </table:table-cell>
          <table:table-cell office:value-type="string" office:string-value="23">
            <text:p>23</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container-rcl">
            <text:p>resource-containe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unfoldingword/eslint-config']">
            <text:p>['gitea-react-toolkit', 'markdown-translatable', '@unfoldingword/eslint-config']</text:p>
          </table:table-cell>
          <table:table-cell office:value-type="string" office:string-value="2022-06-14T15:16:49Z">
            <text:p>2022-06-14T15:16:49Z</text:p>
          </table:table-cell>
          <table:table-cell office:value-type="string" office:string-value="unfoldingWord-box3/resource-container-rcl">
            <text:p>unfoldingWord-box3/resource-container-rcl</text:p>
          </table:table-cell>
          <table:table-cell office:value-type="string" office:string-value="https://github.com/unfoldingWord-box3/resource-container-rcl">
            <text:p>https://github.com/unfoldingWord-box3/resource-container-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resource-container-rcl">
            <text:p>resource-container-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scripture-as-graph">
            <text:p>unfoldingWord-box3/scripture-as-graph</text:p>
          </table:table-cell>
          <table:table-cell office:value-type="string" office:string-value="https://github.com/unfoldingWord-box3/scripture-as-graph">
            <text:p>https://github.com/unfoldingWord-box3/scripture-as-graph</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30T20:47:55Z">
            <text:p>2022-12-30T20:47:55Z</text:p>
          </table:table-cell>
          <table:table-cell office:value-type="string" office:string-value="2020-07-22T12:31:01Z">
            <text:p>2020-07-22T12:31:01Z</text:p>
          </table:table-cell>
          <table:table-cell office:value-type="string" office:string-value="">
            <text:p/>
          </table:table-cell>
          <table:table-cell office:value-type="string" office:string-value="">
            <text:p/>
          </table:table-cell>
          <table:table-cell office:value-type="string" office:string-value="['mvahowe', 'jag3773']">
            <text:p>['mvahowe', 'jag3773']</text:p>
          </table:table-cell>
          <table:table-cell office:value-type="string" office:string-value="10">
            <text:p>10</text:p>
          </table:table-cell>
          <table:table-cell office:value-type="string" office:string-value="10">
            <text:p>10</text:p>
          </table:table-cell>
          <table:table-cell office:value-type="string" office:string-value="73">
            <text:p>7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as-graph">
            <text:p>scripture-as-grap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0-07-22T12:31:12Z">
            <text:p>2020-07-22T12:31:12Z</text:p>
          </table:table-cell>
          <table:table-cell office:value-type="string" office:string-value="unfoldingWord-box3/scripture-as-graph">
            <text:p>unfoldingWord-box3/scripture-as-graph</text:p>
          </table:table-cell>
          <table:table-cell office:value-type="string" office:string-value="https://github.com/unfoldingWord-box3/scripture-as-graph">
            <text:p>https://github.com/unfoldingWord-box3/scripture-as-graph</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scripture-as-graph">
            <text:p>scripture-as-graph</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SIL_API_loader">
            <text:p>unfoldingWord-box3/SIL_API_loader</text:p>
          </table:table-cell>
          <table:table-cell office:value-type="string" office:string-value="https://github.com/unfoldingWord-box3/SIL_API_loader">
            <text:p>https://github.com/unfoldingWord-box3/SIL_API_load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6-29T18:35:44Z">
            <text:p>2023-06-29T18:35:44Z</text:p>
          </table:table-cell>
          <table:table-cell office:value-type="string" office:string-value="2023-06-29T18:35:34Z">
            <text:p>2023-06-29T18:35:34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6-29T15:32:27Z">
            <text:p>2023-06-29T15:32:27Z</text:p>
          </table:table-cell>
          <table:table-cell office:value-type="string" office:string-value="unfoldingWord-box3/SIL_API_loader">
            <text:p>unfoldingWord-box3/SIL_API_loader</text:p>
          </table:table-cell>
          <table:table-cell office:value-type="string" office:string-value="https://github.com/unfoldingWord-box3/SIL_API_loader">
            <text:p>https://github.com/unfoldingWord-box3/SIL_API_loader</text:p>
          </table:table-cell>
          <table:table-cell office:value-type="string" office:string-value="1-Manual review">
            <text:p>1-Manual review</text:p>
          </table:table-cell>
          <table:table-cell office:value-type="string" office:string-value="Stale - Repository has had no commits in over 18 months (36 months ago) and is not archived.">
            <text:p>Stale - Repository has had no commits in over 18 months (36 months ago) and is not archived.</text:p>
          </table:table-cell>
          <table:table-cell office:value-type="string" office:string-value="">
            <text:p/>
          </table:table-cell>
          <table:table-cell office:value-type="string" office:string-value="">
            <text:p/>
          </table:table-cell>
          <table:table-cell office:value-type="string" office:string-value="SIL_API_loader">
            <text:p>SIL_API_load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simple-text-editor-app">
            <text:p>unfoldingWord-box3/simple-text-editor-app</text:p>
          </table:table-cell>
          <table:table-cell office:value-type="string" office:string-value="https://github.com/unfoldingWord-box3/simple-text-editor-app">
            <text:p>https://github.com/unfoldingWord-box3/simple-text-editor-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23:50:37Z">
            <text:p>2023-03-02T23:50:37Z</text:p>
          </table:table-cell>
          <table:table-cell office:value-type="string" office:string-value="2022-05-09T18:19:08Z">
            <text:p>2022-05-09T18:19:08Z</text:p>
          </table:table-cell>
          <table:table-cell office:value-type="string" office:string-value="">
            <text:p/>
          </table:table-cell>
          <table:table-cell office:value-type="string" office:string-value="">
            <text:p/>
          </table:table-cell>
          <table:table-cell office:value-type="string" office:string-value="['klappy', 'RUN-Projects']">
            <text:p>['klappy', 'RUN-Projects']</text:p>
          </table:table-cell>
          <table:table-cell office:value-type="string" office:string-value="1">
            <text:p>1</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imple-text-editor-app">
            <text:p>simple-text-edito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unfoldingword/eslint-config']">
            <text:p>['simple-text-editor-rcl', '@unfoldingword/eslint-config']</text:p>
          </table:table-cell>
          <table:table-cell office:value-type="string" office:string-value="2021-11-29T20:26:55Z">
            <text:p>2021-11-29T20:26:55Z</text:p>
          </table:table-cell>
          <table:table-cell office:value-type="string" office:string-value="unfoldingWord-box3/simple-text-editor-app">
            <text:p>unfoldingWord-box3/simple-text-editor-app</text:p>
          </table:table-cell>
          <table:table-cell office:value-type="string" office:string-value="https://github.com/unfoldingWord-box3/simple-text-editor-app">
            <text:p>https://github.com/unfoldingWord-box3/simple-text-editor-app</text:p>
          </table:table-cell>
          <table:table-cell office:value-type="string" office:string-value="1-Manual review">
            <text:p>1-Manual review</text:p>
          </table:table-cell>
          <table:table-cell office:value-type="string" office:string-value="Stale - Repository has had no commits in over 18 months (49 months ago) and is not archived.">
            <text:p>Stale - Repository has had no commits in over 18 months (49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simple-text-editor-app">
            <text:p>simple-text-edito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Simplify">
            <text:p>unfoldingWord-box3/Simplify</text:p>
          </table:table-cell>
          <table:table-cell office:value-type="string" office:string-value="https://github.com/unfoldingWord-box3/Simplify">
            <text:p>https://github.com/unfoldingWord-box3/Simplif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5T20:16:37Z">
            <text:p>2024-08-15T20:16:37Z</text:p>
          </table:table-cell>
          <table:table-cell office:value-type="string" office:string-value="2024-08-15T20:16:37Z">
            <text:p>2024-08-15T20:16:37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55">
            <text:p>5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8-15T20:16:40Z">
            <text:p>2024-08-15T20:16:40Z</text:p>
          </table:table-cell>
          <table:table-cell office:value-type="string" office:string-value="unfoldingWord-box3/Simplify">
            <text:p>unfoldingWord-box3/Simplify</text:p>
          </table:table-cell>
          <table:table-cell office:value-type="string" office:string-value="https://github.com/unfoldingWord-box3/Simplify">
            <text:p>https://github.com/unfoldingWord-box3/Simplify</text:p>
          </table:table-cell>
          <table:table-cell office:value-type="string" office:string-value="1-Manual review">
            <text:p>1-Manual review</text:p>
          </table:table-cell>
          <table:table-cell office:value-type="string" office:string-value="Stale - Repository has had no commits in over 18 months (22 months ago) and is not archived.">
            <text:p>Stale - Repository has had no commits in over 18 months (22 months ago) and is not archived.</text:p>
          </table:table-cell>
          <table:table-cell office:value-type="string" office:string-value="">
            <text:p/>
          </table:table-cell>
          <table:table-cell office:value-type="string" office:string-value="">
            <text:p/>
          </table:table-cell>
          <table:table-cell office:value-type="string" office:string-value="Simplify">
            <text:p>Simplif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slack-lambda">
            <text:p>unfoldingWord-dev/slack-lambda</text:p>
          </table:table-cell>
          <table:table-cell office:value-type="string" office:string-value="https://github.com/unfoldingWord-dev/slack-lambda">
            <text:p>https://github.com/unfoldingWord-dev/slack-lambda</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5-23T16:07:31Z">
            <text:p>2017-05-23T16:07:31Z</text:p>
          </table:table-cell>
          <table:table-cell office:value-type="string" office:string-value="2017-05-23T15:38:49Z">
            <text:p>2017-05-23T15:38:49Z</text:p>
          </table:table-cell>
          <table:table-cell office:value-type="string" office:string-value="">
            <text:p/>
          </table:table-cell>
          <table:table-cell office:value-type="string" office:string-value="">
            <text:p/>
          </table:table-cell>
          <table:table-cell office:value-type="string" office:string-value="['Phil Hopper', 'phillip-hopper', 'PhotoNomad0', 'jag3773', 'richmahn']">
            <text:p>['Phil Hopper', 'phillip-hopper', 'PhotoNomad0', 'jag3773', 'richmahn']</text:p>
          </table:table-cell>
          <table:table-cell office:value-type="string" office:string-value="0">
            <text:p>0</text:p>
          </table:table-cell>
          <table:table-cell office:value-type="string" office:string-value="0">
            <text:p>0</text:p>
          </table:table-cell>
          <table:table-cell office:value-type="string" office:string-value="66">
            <text:p>6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3-15T16:22:01Z">
            <text:p>2017-03-15T16:22:01Z</text:p>
          </table:table-cell>
          <table:table-cell office:value-type="string" office:string-value="unfoldingWord-dev/slack-lambda">
            <text:p>unfoldingWord-dev/slack-lambda</text:p>
          </table:table-cell>
          <table:table-cell office:value-type="string" office:string-value="https://github.com/unfoldingWord-dev/slack-lambda">
            <text:p>https://github.com/unfoldingWord-dev/slack-lambda</text:p>
          </table:table-cell>
          <table:table-cell office:value-type="string" office:string-value="1-Manual review">
            <text:p>1-Manual review</text:p>
          </table:table-cell>
          <table:table-cell office:value-type="string" office:string-value="Stale - Repository has had no commits in over 18 months (109 months ago) and is not archived.">
            <text:p>Stale - Repository has had no commits in over 18 months (109 months ago) and is not archived.</text:p>
          </table:table-cell>
          <table:table-cell office:value-type="string" office:string-value="">
            <text:p/>
          </table:table-cell>
          <table:table-cell office:value-type="string" office:string-value="">
            <text:p/>
          </table:table-cell>
          <table:table-cell office:value-type="string" office:string-value="slack-lambda">
            <text:p>slack-lambd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SpeechToText">
            <text:p>unfoldingWord-box3/SpeechToText</text:p>
          </table:table-cell>
          <table:table-cell office:value-type="string" office:string-value="https://github.com/unfoldingWord-box3/SpeechToText">
            <text:p>https://github.com/unfoldingWord-box3/SpeechToTex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3-14T13:49:53Z">
            <text:p>2024-03-14T13:49:53Z</text:p>
          </table:table-cell>
          <table:table-cell office:value-type="string" office:string-value="2024-03-14T13:49:41Z">
            <text:p>2024-03-14T13:49: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13T21:24:03Z">
            <text:p>2024-03-13T21:24:03Z</text:p>
          </table:table-cell>
          <table:table-cell office:value-type="string" office:string-value="unfoldingWord-box3/SpeechToText">
            <text:p>unfoldingWord-box3/SpeechToText</text:p>
          </table:table-cell>
          <table:table-cell office:value-type="string" office:string-value="https://github.com/unfoldingWord-box3/SpeechToText">
            <text:p>https://github.com/unfoldingWord-box3/SpeechToText</text:p>
          </table:table-cell>
          <table:table-cell office:value-type="string" office:string-value="1-Manual review">
            <text:p>1-Manual review</text:p>
          </table:table-cell>
          <table:table-cell office:value-type="string" office:string-value="Stale - Repository has had no commits in over 18 months (27 months ago) and is not archived.">
            <text:p>Stale - Repository has had no commits in over 18 months (27 months ago) and is not archived.</text:p>
          </table:table-cell>
          <table:table-cell office:value-type="string" office:string-value="">
            <text:p/>
          </table:table-cell>
          <table:table-cell office:value-type="string" office:string-value="">
            <text:p/>
          </table:table-cell>
          <table:table-cell office:value-type="string" office:string-value="SpeechToText">
            <text:p>SpeechToTex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SplitAudioByText">
            <text:p>unfoldingWord-box3/SplitAudioByText</text:p>
          </table:table-cell>
          <table:table-cell office:value-type="string" office:string-value="https://github.com/unfoldingWord-box3/SplitAudioByText">
            <text:p>https://github.com/unfoldingWord-box3/SplitAudioByTex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06T20:43:08Z">
            <text:p>2025-03-06T20:43:08Z</text:p>
          </table:table-cell>
          <table:table-cell office:value-type="string" office:string-value="2025-03-06T20:43:03Z">
            <text:p>2025-03-06T20:43:03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06T20:43:12Z">
            <text:p>2025-03-06T20:43:12Z</text:p>
          </table:table-cell>
          <table:table-cell office:value-type="string" office:string-value="unfoldingWord-box3/SplitAudioByText">
            <text:p>unfoldingWord-box3/SplitAudioByText</text:p>
          </table:table-cell>
          <table:table-cell office:value-type="string" office:string-value="https://github.com/unfoldingWord-box3/SplitAudioByText">
            <text:p>https://github.com/unfoldingWord-box3/SplitAudioByTex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cell office:value-type="string" office:string-value="SplitAudioByText">
            <text:p>SplitAudioByText</text:p>
          </table:table-cell>
          <table:table-cell office:value-type="string" office:string-value="unfoldingWord-box3">
            <text:p>unfoldingWord-box3</text:p>
          </table:table-cell>
        </table:table-row>
        <table:table-row>
          <table:table-cell office:value-type="string" office:string-value="Elsy Lambert">
            <text:p>Elsy Lambert</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cCreateQA-elsy">
            <text:p>unfoldingWord/tcCreateQA-elsy</text:p>
          </table:table-cell>
          <table:table-cell office:value-type="string" office:string-value="https://github.com/unfoldingWord/tcCreateQA-elsy">
            <text:p>https://github.com/unfoldingWord/tcCreateQA-elsy</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2-14T15:33:53Z">
            <text:p>2023-02-14T15:33:53Z</text:p>
          </table:table-cell>
          <table:table-cell office:value-type="string" office:string-value="2023-02-14T15:33:53Z">
            <text:p>2023-02-14T15:33:53Z</text:p>
          </table:table-cell>
          <table:table-cell office:value-type="string" office:string-value="">
            <text:p/>
          </table:table-cell>
          <table:table-cell office:value-type="string" office:string-value="">
            <text:p/>
          </table:table-cell>
          <table:table-cell office:value-type="string" office:string-value="['elsylitsonlambert', 'elsylambert', 'Elsy Litson']">
            <text:p>['elsylitsonlambert', 'elsylambert', 'Elsy Litson']</text:p>
          </table:table-cell>
          <table:table-cell office:value-type="string" office:string-value="0">
            <text:p>0</text:p>
          </table:table-cell>
          <table:table-cell office:value-type="string" office:string-value="0">
            <text:p>0</text:p>
          </table:table-cell>
          <table:table-cell office:value-type="string" office:string-value="37">
            <text:p>3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4-21T19:00:59Z">
            <text:p>2022-04-21T19:00:59Z</text:p>
          </table:table-cell>
          <table:table-cell office:value-type="string" office:string-value="unfoldingWord/tcCreateQA-elsy">
            <text:p>unfoldingWord/tcCreateQA-elsy</text:p>
          </table:table-cell>
          <table:table-cell office:value-type="string" office:string-value="https://github.com/unfoldingWord/tcCreateQA-elsy">
            <text:p>https://github.com/unfoldingWord/tcCreateQA-elsy</text:p>
          </table:table-cell>
          <table:table-cell office:value-type="string" office:string-value="1-Manual review">
            <text:p>1-Manual review</text:p>
          </table:table-cell>
          <table:table-cell office:value-type="string" office:string-value="Stale - Repository has had no commits in over 18 months (40 months ago) and is not archived.">
            <text:p>Stale - Repository has had no commits in over 18 months (40 months ago) and is not archived.</text:p>
          </table:table-cell>
          <table:table-cell office:value-type="string" office:string-value="">
            <text:p/>
          </table:table-cell>
          <table:table-cell office:value-type="string" office:string-value="">
            <text:p/>
          </table:table-cell>
          <table:table-cell office:value-type="string" office:string-value="tcCreateQA-elsy">
            <text:p>tcCreateQA-els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d-legacy">
            <text:p>unfoldingWord/td-legacy</text:p>
          </table:table-cell>
          <table:table-cell office:value-type="string" office:string-value="https://github.com/unfoldingWord/td-legacy">
            <text:p>https://github.com/unfoldingWord/td-legacy</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11-29T16:24:41Z">
            <text:p>2023-11-29T16:24:41Z</text:p>
          </table:table-cell>
          <table:table-cell office:value-type="string" office:string-value="2023-11-29T16:24:39Z">
            <text:p>2023-11-29T16:24:39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6-06T09:41:14Z">
            <text:p>2023-06-06T09:41:14Z</text:p>
          </table:table-cell>
          <table:table-cell office:value-type="string" office:string-value="unfoldingWord/td-legacy">
            <text:p>unfoldingWord/td-legacy</text:p>
          </table:table-cell>
          <table:table-cell office:value-type="string" office:string-value="https://github.com/unfoldingWord/td-legacy">
            <text:p>https://github.com/unfoldingWord/td-legacy</text:p>
          </table:table-cell>
          <table:table-cell office:value-type="string" office:string-value="1-Manual review">
            <text:p>1-Manual review</text:p>
          </table:table-cell>
          <table:table-cell office:value-type="string" office:string-value="Stale - Repository has had no commits in over 18 months (31 months ago) and is not archived.">
            <text:p>Stale - Repository has had no commits in over 18 months (31 months ago) and is not archived.</text:p>
          </table:table-cell>
          <table:table-cell office:value-type="string" office:string-value="">
            <text:p/>
          </table:table-cell>
          <table:table-cell office:value-type="string" office:string-value="">
            <text:p/>
          </table:table-cell>
          <table:table-cell office:value-type="string" office:string-value="td-legacy">
            <text:p>td-legac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heia-examples">
            <text:p>unfoldingWord-box3/theia-examples</text:p>
          </table:table-cell>
          <table:table-cell office:value-type="string" office:string-value="https://github.com/unfoldingWord-box3/theia-examples">
            <text:p>https://github.com/unfoldingWord-box3/theia-exampl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1-22T21:00:21Z">
            <text:p>2025-01-22T21:00:21Z</text:p>
          </table:table-cell>
          <table:table-cell office:value-type="string" office:string-value="unfoldingWord-box3/theia-examples">
            <text:p>unfoldingWord-box3/theia-examples</text:p>
          </table:table-cell>
          <table:table-cell office:value-type="string" office:string-value="https://github.com/unfoldingWord-box3/theia-examples">
            <text:p>https://github.com/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cell office:value-type="string" office:string-value="theia-examples">
            <text:p>theia-example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heia-examples/browser-app">
            <text:p>unfoldingWord-box3/theia-examples/browser-app</text:p>
          </table:table-cell>
          <table:table-cell office:value-type="string" office:string-value="https://github.com/unfoldingWord-box3/theia-examples">
            <text:p>https://github.com/unfoldingWord-box3/theia-exampl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1-22T21:00:21Z">
            <text:p>2025-01-22T21:00:21Z</text:p>
          </table:table-cell>
          <table:table-cell office:value-type="string" office:string-value="unfoldingWord-box3/theia-examples/browser-app">
            <text:p>unfoldingWord-box3/theia-examples/browser-app</text:p>
          </table:table-cell>
          <table:table-cell office:value-type="string" office:string-value="https://github.com/unfoldingWord-box3/theia-examples">
            <text:p>https://github.com/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heia-examples/browser-app">
            <text:p>theia-examples/browse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heia-examples/electron-app">
            <text:p>unfoldingWord-box3/theia-examples/electron-app</text:p>
          </table:table-cell>
          <table:table-cell office:value-type="string" office:string-value="https://github.com/unfoldingWord-box3/theia-examples">
            <text:p>https://github.com/unfoldingWord-box3/theia-exampl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lectron-app">
            <text:p>electr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1-22T21:00:21Z">
            <text:p>2025-01-22T21:00:21Z</text:p>
          </table:table-cell>
          <table:table-cell office:value-type="string" office:string-value="unfoldingWord-box3/theia-examples/electron-app">
            <text:p>unfoldingWord-box3/theia-examples/electron-app</text:p>
          </table:table-cell>
          <table:table-cell office:value-type="string" office:string-value="https://github.com/unfoldingWord-box3/theia-examples">
            <text:p>https://github.com/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heia-examples/electron-app">
            <text:p>theia-examples/electron-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heia-examples/empty">
            <text:p>unfoldingWord-box3/theia-examples/empty</text:p>
          </table:table-cell>
          <table:table-cell office:value-type="string" office:string-value="https://github.com/unfoldingWord-box3/theia-examples">
            <text:p>https://github.com/unfoldingWord-box3/theia-exampl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mpty">
            <text:p>empt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1-22T21:00:21Z">
            <text:p>2025-01-22T21:00:21Z</text:p>
          </table:table-cell>
          <table:table-cell office:value-type="string" office:string-value="unfoldingWord-box3/theia-examples/empty">
            <text:p>unfoldingWord-box3/theia-examples/empty</text:p>
          </table:table-cell>
          <table:table-cell office:value-type="string" office:string-value="https://github.com/unfoldingWord-box3/theia-examples">
            <text:p>https://github.com/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heia-examples/empty">
            <text:p>theia-examples/empty</text:p>
          </table:table-cell>
          <table:table-cell office:value-type="string" office:string-value="unfoldingWord-box3">
            <text:p>unfoldingWord-box3</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x">
            <text:p>x</text:p>
          </table:table-cell>
          <table:table-cell office:value-type="string" office:string-value="Used by Door43">
            <text:p>Used by Door43</text:p>
          </table:table-cell>
          <table:table-cell office:value-type="string" office:string-value="unfoldingWord-dev/tools">
            <text:p>unfoldingWord-dev/tools</text:p>
          </table:table-cell>
          <table:table-cell office:value-type="string" office:string-value="https://github.com/unfoldingWord-dev/tools">
            <text:p>https://github.com/unfoldingWord-dev/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9T15:52:11Z">
            <text:p>2024-04-19T15:52:11Z</text:p>
          </table:table-cell>
          <table:table-cell office:value-type="string" office:string-value="2024-04-19T15:51:24Z">
            <text:p>2024-04-19T15:51:24Z</text:p>
          </table:table-cell>
          <table:table-cell office:value-type="string" office:string-value="">
            <text:p/>
          </table:table-cell>
          <table:table-cell office:value-type="string" office:string-value="">
            <text:p/>
          </table:table-cell>
          <table:table-cell office:value-type="string" office:string-value="['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office:string-value="13">
            <text:p>13</text:p>
          </table:table-cell>
          <table:table-cell office:value-type="string" office:string-value="13">
            <text:p>13</text:p>
          </table:table-cell>
          <table:table-cell office:value-type="string" office:string-value="2396">
            <text:p>2396</text:p>
          </table:table-cell>
          <table:table-cell office:value-type="string" office:string-value="">
            <text:p/>
          </table:table-cell>
          <table:table-cell office:value-type="string" office:string-value="git@git.door43.org:unfoldingWord-dev/tx-dev-dcs.git">
            <text:p>git@git.door43.org:unfoldingWord-dev/tx-dev-dcs.git</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5T03:14:48Z">
            <text:p>2026-03-15T03:14:48Z</text:p>
          </table:table-cell>
          <table:table-cell office:value-type="string" office:string-value="unfoldingWord-dev/tools">
            <text:p>unfoldingWord-dev/tools</text:p>
          </table:table-cell>
          <table:table-cell office:value-type="string" office:string-value="https://github.com/unfoldingWord-dev/tools">
            <text:p>https://github.com/unfoldingWord-dev/tool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2396 commits).">
            <text:p>Repository has significant release history, GitHub downloads, or commit history (0 releases, 0 downloads, 2396 commits).</text:p>
          </table:table-cell>
          <table:table-cell office:value-type="string" office:string-value="">
            <text:p/>
          </table:table-cell>
          <table:table-cell office:value-type="string" office:string-value="">
            <text:p/>
          </table:table-cell>
          <table:table-cell office:value-type="string" office:string-value="tools">
            <text:p>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translation-helps">
            <text:p>unfoldingWord-box3/translation-helps</text:p>
          </table:table-cell>
          <table:table-cell office:value-type="string" office:string-value="https://github.com/unfoldingWord-box3/translation-helps">
            <text:p>https://github.com/unfoldingWord-box3/translation-help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5T02:36:16Z">
            <text:p>2025-06-05T02:36:16Z</text:p>
          </table:table-cell>
          <table:table-cell office:value-type="string" office:string-value="2022-11-09T09:01:02Z">
            <text:p>2022-11-09T09:01:02Z</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212">
            <text:p>212</text:p>
          </table:table-cell>
          <table:table-cell office:value-type="string" office:string-value="">
            <text:p/>
          </table:table-cell>
          <table:table-cell office:value-type="string" office:string-value="">
            <text:p/>
          </table:table-cell>
          <table:table-cell office:value-type="string" office:string-value="14">
            <text:p>14</text:p>
          </table:table-cell>
          <table:table-cell office:value-type="string" office:string-value="1">
            <text:p>1</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5-10-02T14:12:21Z">
            <text:p>2025-10-02T14:12:21Z</text:p>
          </table:table-cell>
          <table:table-cell office:value-type="string" office:string-value="unfoldingWord-box3/translation-helps">
            <text:p>unfoldingWord-box3/translation-helps</text:p>
          </table:table-cell>
          <table:table-cell office:value-type="string" office:string-value="https://github.com/unfoldingWord-box3/translation-helps">
            <text:p>https://github.com/unfoldingWord-box3/translation-helps</text:p>
          </table:table-cell>
          <table:table-cell office:value-type="string" office:string-value="1-Manual review">
            <text:p>1-Manual review</text:p>
          </table:table-cell>
          <table:table-cell office:value-type="string" office:string-value="Repository has significant release history, GitHub downloads, or commit history (1 releases, 14 downloads, 212 commits).">
            <text:p>Repository has significant release history, GitHub downloads, or commit history (1 releases, 14 downloads, 212 commit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helps">
            <text:p>translation-helps</text:p>
          </table:table-cell>
          <table:table-cell office:value-type="string" office:string-value="unfoldingWord-box3">
            <text:p>unfoldingWord-box3</text:p>
          </table:table-cell>
        </table:table-row>
        <table:table-row>
          <table:table-cell office:value-type="string" office:string-value="Richard Mahn Christopher Klapp">
            <text:p>Richard Mahn Christopher Kl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ranslation-helps-print-preview">
            <text:p>unfoldingWord-box3/translation-helps-print-preview</text:p>
          </table:table-cell>
          <table:table-cell office:value-type="string" office:string-value="https://github.com/unfoldingWord-box3/translation-helps-print-preview">
            <text:p>https://github.com/unfoldingWord-box3/translation-helps-print-preview</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0T21:25:08Z">
            <text:p>2022-06-20T21:25:08Z</text:p>
          </table:table-cell>
          <table:table-cell office:value-type="string" office:string-value="2022-06-20T21:25:06Z">
            <text:p>2022-06-20T21:25:06Z</text:p>
          </table:table-cell>
          <table:table-cell office:value-type="string" office:string-value="">
            <text:p/>
          </table:table-cell>
          <table:table-cell office:value-type="string" office:string-value="">
            <text:p/>
          </table:table-cell>
          <table:table-cell office:value-type="string" office:string-value="['klappy', 'abelpz', 'richmahn', 'birchamp']">
            <text:p>['klappy', 'abelpz', 'richmahn', 'birchamp']</text:p>
          </table:table-cell>
          <table:table-cell office:value-type="string" office:string-value="7">
            <text:p>7</text:p>
          </table:table-cell>
          <table:table-cell office:value-type="string" office:string-value="0">
            <text:p>0</text:p>
          </table:table-cell>
          <table:table-cell office:value-type="string" office:string-value="53">
            <text:p>5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6-17T15:46:05Z">
            <text:p>2022-06-17T15:46:05Z</text:p>
          </table:table-cell>
          <table:table-cell office:value-type="string" office:string-value="unfoldingWord-box3/translation-helps-print-preview">
            <text:p>unfoldingWord-box3/translation-helps-print-preview</text:p>
          </table:table-cell>
          <table:table-cell office:value-type="string" office:string-value="https://github.com/unfoldingWord-box3/translation-helps-print-preview">
            <text:p>https://github.com/unfoldingWord-box3/translation-helps-print-preview</text:p>
          </table:table-cell>
          <table:table-cell office:value-type="string" office:string-value="1-Manual review">
            <text:p>1-Manual review</text:p>
          </table:table-cell>
          <table:table-cell office:value-type="string" office:string-value="Stale - Repository has had no commits in over 18 months (48 months ago) and is not archived.">
            <text:p>Stale - Repository has had no commits in over 18 months (48 months ago) and is not archived.</text:p>
          </table:table-cell>
          <table:table-cell office:value-type="string" office:string-value="">
            <text:p/>
          </table:table-cell>
          <table:table-cell office:value-type="string" office:string-value="">
            <text:p/>
          </table:table-cell>
          <table:table-cell office:value-type="string" office:string-value="translation-helps-print-preview">
            <text:p>translation-helps-print-preview</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ranslationNotes">
            <text:p>unfoldingWord/translationNotes</text:p>
          </table:table-cell>
          <table:table-cell office:value-type="string" office:string-value="https://github.com/unfoldingWord/translationNotes">
            <text:p>https://github.com/unfoldingWord/translationNote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2:38Z">
            <text:p>2026-06-12T12:12:38Z</text:p>
          </table:table-cell>
          <table:table-cell office:value-type="string" office:string-value="2026-06-12T12:12:38Z">
            <text:p>2026-06-12T12:12:38Z</text:p>
          </table:table-cell>
          <table:table-cell office:value-type="string" office:string-value="">
            <text:p/>
          </table:table-cell>
          <table:table-cell office:value-type="string" office:string-value="">
            <text:p/>
          </table:table-cell>
          <table:table-cell office:value-type="string" office:string-value="['mannycolon', 'da1nerd', 'ihoegen', 'RoyalSix', 'PhotoNomad0', 'klappy', 'cdwhitfield73', 'Sterling (Jay) Scott', 'EllDoubleYew', 'dependabot[bot]', 'ImgBotApp', 'jag3773', 'richmahn']">
            <text:p>['mannycolon', 'da1nerd', 'ihoegen', 'RoyalSix', 'PhotoNomad0', 'klappy', 'cdwhitfield73', 'Sterling (Jay) Scott', 'EllDoubleYew', 'dependabot[bot]', 'ImgBotApp', 'jag3773', 'richmahn']</text:p>
          </table:table-cell>
          <table:table-cell office:value-type="string" office:string-value="16">
            <text:p>16</text:p>
          </table:table-cell>
          <table:table-cell office:value-type="string" office:string-value="15">
            <text:p>15</text:p>
          </table:table-cell>
          <table:table-cell office:value-type="string" office:string-value="523">
            <text:p>523</text:p>
          </table:table-cell>
          <table:table-cell office:value-type="string" office:string-value="unfoldingWord/translationNotes">
            <text:p>unfoldingWord/translationNotes</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Notes">
            <text:p>translationNot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gogs-client', 'selections', 'string-punctuation-tokenizer', 'tc-ui-toolkit', 'usfm-js', 'word-aligner', 'wordmap-lexer', 'tc-strings']">
            <text:p>['checking-tool-wrapper', 'tc-tool', 'gogs-client', 'selections', 'string-punctuation-tokenizer', 'tc-ui-toolkit', 'usfm-js', 'word-aligner', 'wordmap-lexer', 'tc-strings']</text:p>
          </table:table-cell>
          <table:table-cell office:value-type="string" office:string-value="2026-06-12T12:12:56Z">
            <text:p>2026-06-12T12:12:56Z</text:p>
          </table:table-cell>
          <table:table-cell office:value-type="string" office:string-value="unfoldingWord/translationNotes">
            <text:p>unfoldingWord/translationNotes</text:p>
          </table:table-cell>
          <table:table-cell office:value-type="string" office:string-value="https://github.com/unfoldingWord/translationNotes">
            <text:p>https://github.com/unfoldingWord/translationNotes</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Notes">
            <text:p>translationNot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ranslationWords">
            <text:p>unfoldingWord/translationWords</text:p>
          </table:table-cell>
          <table:table-cell office:value-type="string" office:string-value="https://github.com/unfoldingWord/translationWords">
            <text:p>https://github.com/unfoldingWord/translationWord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1:06Z">
            <text:p>2026-06-12T12:11:06Z</text:p>
          </table:table-cell>
          <table:table-cell office:value-type="string" office:string-value="2026-06-12T12:11:06Z">
            <text:p>2026-06-12T12:11:06Z</text:p>
          </table:table-cell>
          <table:table-cell office:value-type="string" office:string-value="2019-02-06T21:36:33Z">
            <text:p>2019-02-06T21:36:33Z</text:p>
          </table:table-cell>
          <table:table-cell office:value-type="string" office:string-value="">
            <text:p/>
          </table:table-cell>
          <table:table-cell office:value-type="string" office:string-value="['mannycolon', 'da1nerd', 'RoyalSix', 'PhotoNomad0', 'ihoegen', 'klappy', 'Sterling (Jay) Scott', 'cdwhitfield73', 'richmahn', 'Richard Mahn', 'dependabot-support', 'EllDoubleYew', 'dependabot[bot]', 'bspidel', 'ImgBotApp', 'jag3773']">
            <text:p>['mannycolon', 'da1nerd', 'RoyalSix', 'PhotoNomad0', 'ihoegen', 'klappy', 'Sterling (Jay) Scott', 'cdwhitfield73', 'richmahn', 'Richard Mahn', 'dependabot-support', 'EllDoubleYew', 'dependabot[bot]', 'bspidel', 'ImgBotApp', 'jag3773']</text:p>
          </table:table-cell>
          <table:table-cell office:value-type="string" office:string-value="17">
            <text:p>17</text:p>
          </table:table-cell>
          <table:table-cell office:value-type="string" office:string-value="16">
            <text:p>16</text:p>
          </table:table-cell>
          <table:table-cell office:value-type="string" office:string-value="1113">
            <text:p>1113</text:p>
          </table:table-cell>
          <table:table-cell office:value-type="string" office:string-value="unfoldingWord/translationWords">
            <text:p>unfoldingWord/translationWords</text:p>
          </table:table-cell>
          <table:table-cell office:value-type="string" office:string-value="">
            <text:p/>
          </table:table-cell>
          <table:table-cell office:value-type="string" office:string-value="0">
            <text:p>0</text:p>
          </table:table-cell>
          <table:table-cell office:value-type="string" office:string-value="5">
            <text:p>5</text:p>
          </table:table-cell>
          <table:table-cell office:value-type="string" office:string-value="translationWords">
            <text:p>translationWord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gogs-client', 'selections', 'string-punctuation-tokenizer', 'tc-ui-toolkit', 'usfm-js', 'word-aligner', 'wordmap-lexer', 'tc-strings']">
            <text:p>['checking-tool-wrapper', 'tc-tool', 'gogs-client', 'selections', 'string-punctuation-tokenizer', 'tc-ui-toolkit', 'usfm-js', 'word-aligner', 'wordmap-lexer', 'tc-strings']</text:p>
          </table:table-cell>
          <table:table-cell office:value-type="string" office:string-value="2026-06-12T12:11:14Z">
            <text:p>2026-06-12T12:11:14Z</text:p>
          </table:table-cell>
          <table:table-cell office:value-type="string" office:string-value="unfoldingWord/translationWords">
            <text:p>unfoldingWord/translationWords</text:p>
          </table:table-cell>
          <table:table-cell office:value-type="string" office:string-value="https://github.com/unfoldingWord/translationWords">
            <text:p>https://github.com/unfoldingWord/translationWords</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Words">
            <text:p>translationWord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s-android">
            <text:p>unfoldingWord-dev/ts-android</text:p>
          </table:table-cell>
          <table:table-cell office:value-type="string" office:string-value="https://github.com/unfoldingWord-dev/ts-android">
            <text:p>https://github.com/unfoldingWord-dev/ts-android</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7-26T16:17:42Z">
            <text:p>2019-07-26T16:17:42Z</text:p>
          </table:table-cell>
          <table:table-cell office:value-type="string" office:string-value="2019-07-26T16:15:31Z">
            <text:p>2019-07-26T16:15:31Z</text:p>
          </table:table-cell>
          <table:table-cell office:value-type="string" office:string-value="2019-07-29T13:45:34Z">
            <text:p>2019-07-29T13:45:34Z</text:p>
          </table:table-cell>
          <table:table-cell office:value-type="string" office:string-value="">
            <text:p/>
          </table:table-cell>
          <table:table-cell office:value-type="string" office:string-value="['da1nerd', 'PhotoNomad0', 'jshuma', 'andreradroid', 'jag3773', 'HannaJaicks', 'benjore', 'mondele', 'sea-liesch']">
            <text:p>['da1nerd', 'PhotoNomad0', 'jshuma', 'andreradroid', 'jag3773', 'HannaJaicks', 'benjore', 'mondele', 'sea-liesch']</text:p>
          </table:table-cell>
          <table:table-cell office:value-type="string" office:string-value="651">
            <text:p>651</text:p>
          </table:table-cell>
          <table:table-cell office:value-type="string" office:string-value="0">
            <text:p>0</text:p>
          </table:table-cell>
          <table:table-cell office:value-type="string" office:string-value="3317">
            <text:p>3317</text:p>
          </table:table-cell>
          <table:table-cell office:value-type="string" office:string-value="">
            <text:p/>
          </table:table-cell>
          <table:table-cell office:value-type="string" office:string-value="">
            <text:p/>
          </table:table-cell>
          <table:table-cell office:value-type="string" office:string-value="2302">
            <text:p>2302</text:p>
          </table:table-cell>
          <table:table-cell office:value-type="string" office:string-value="61">
            <text:p>6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3T06:48:31Z">
            <text:p>2026-06-23T06:48:31Z</text:p>
          </table:table-cell>
          <table:table-cell office:value-type="string" office:string-value="unfoldingWord-dev/ts-android">
            <text:p>unfoldingWord-dev/ts-android</text:p>
          </table:table-cell>
          <table:table-cell office:value-type="string" office:string-value="https://github.com/unfoldingWord-dev/ts-android">
            <text:p>https://github.com/unfoldingWord-dev/ts-android</text:p>
          </table:table-cell>
          <table:table-cell office:value-type="string" office:string-value="1-Manual review">
            <text:p>1-Manual review</text:p>
          </table:table-cell>
          <table:table-cell office:value-type="string" office:string-value="Repository has at least 50 open issues (651 open issues).">
            <text:p>Repository has at least 50 open issues (651 open issues).</text:p>
          </table:table-cell>
          <table:table-cell office:value-type="string" office:string-value="">
            <text:p/>
          </table:table-cell>
          <table:table-cell office:value-type="string" office:string-value="">
            <text:p/>
          </table:table-cell>
          <table:table-cell office:value-type="string" office:string-value="ts-android">
            <text:p>ts-androi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s-desktop">
            <text:p>unfoldingWord-dev/ts-desktop</text:p>
          </table:table-cell>
          <table:table-cell office:value-type="string" office:string-value="https://github.com/unfoldingWord-dev/ts-desktop">
            <text:p>https://github.com/unfoldingWord-dev/ts-desktop</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6-17T00:09:31Z">
            <text:p>2022-06-17T00:09:31Z</text:p>
          </table:table-cell>
          <table:table-cell office:value-type="string" office:string-value="2019-11-11T14:08:52Z">
            <text:p>2019-11-11T14:08:52Z</text:p>
          </table:table-cell>
          <table:table-cell office:value-type="string" office:string-value="2019-11-11T14:16:17Z">
            <text:p>2019-11-11T14:16:17Z</text:p>
          </table:table-cell>
          <table:table-cell office:value-type="string" office:string-value="">
            <text:p/>
          </table:table-cell>
          <table:table-cell office:value-type="string" office:string-value="['cdwhitfield73', 'da1nerd', 'Thomas Klemz', 'vleong2332', 'Travis CI', 'kbuildsyourdotcom', 'EmmittJ', 'Delmar Hager', 'jag3773', 'a-gundy', 'jeremymlane', 'dhager7', 'soccerhand', 'Travis-CI']">
            <text:p>['cdwhitfield73', 'da1nerd', 'Thomas Klemz', 'vleong2332', 'Travis CI', 'kbuildsyourdotcom', 'EmmittJ', 'Delmar Hager', 'jag3773', 'a-gundy', 'jeremymlane', 'dhager7', 'soccerhand', 'Travis-CI']</text:p>
          </table:table-cell>
          <table:table-cell office:value-type="string" office:string-value="182">
            <text:p>182</text:p>
          </table:table-cell>
          <table:table-cell office:value-type="string" office:string-value="11">
            <text:p>11</text:p>
          </table:table-cell>
          <table:table-cell office:value-type="string" office:string-value="2996">
            <text:p>2996</text:p>
          </table:table-cell>
          <table:table-cell office:value-type="string" office:string-value="">
            <text:p/>
          </table:table-cell>
          <table:table-cell office:value-type="string" office:string-value="">
            <text:p/>
          </table:table-cell>
          <table:table-cell office:value-type="string" office:string-value="14398">
            <text:p>14398</text:p>
          </table:table-cell>
          <table:table-cell office:value-type="string" office:string-value="29">
            <text:p>2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22T14:46:49Z">
            <text:p>2026-04-22T14:46:49Z</text:p>
          </table:table-cell>
          <table:table-cell office:value-type="string" office:string-value="unfoldingWord-dev/ts-desktop">
            <text:p>unfoldingWord-dev/ts-desktop</text:p>
          </table:table-cell>
          <table:table-cell office:value-type="string" office:string-value="https://github.com/unfoldingWord-dev/ts-desktop">
            <text:p>https://github.com/unfoldingWord-dev/ts-desktop</text:p>
          </table:table-cell>
          <table:table-cell office:value-type="string" office:string-value="1-Manual review">
            <text:p>1-Manual review</text:p>
          </table:table-cell>
          <table:table-cell office:value-type="string" office:string-value="Repository has at least 50 open issues (182 open issues).">
            <text:p>Repository has at least 50 open issues (182 open issues).</text:p>
          </table:table-cell>
          <table:table-cell office:value-type="string" office:string-value="">
            <text:p/>
          </table:table-cell>
          <table:table-cell office:value-type="string" office:string-value="">
            <text:p/>
          </table:table-cell>
          <table:table-cell office:value-type="string" office:string-value="ts-desktop">
            <text:p>ts-deskto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s-requirements">
            <text:p>unfoldingWord-dev/ts-requirements</text:p>
          </table:table-cell>
          <table:table-cell office:value-type="string" office:string-value="https://github.com/unfoldingWord-dev/ts-requirements">
            <text:p>https://github.com/unfoldingWord-dev/ts-requirements</text:p>
          </table:table-cell>
          <table:table-cell office:value-type="string" office:string-value="Cucumber">
            <text:p>Cucumber</text:p>
          </table:table-cell>
          <table:table-cell office:value-type="string" office:string-value="False">
            <text:p>False</text:p>
          </table:table-cell>
          <table:table-cell office:value-type="string" office:string-value="False">
            <text:p>False</text:p>
          </table:table-cell>
          <table:table-cell office:value-type="string" office:string-value="2016-03-25T20:23:25Z">
            <text:p>2016-03-25T20:23:25Z</text:p>
          </table:table-cell>
          <table:table-cell office:value-type="string" office:string-value="2016-03-25T20:23:25Z">
            <text:p>2016-03-25T20:23:25Z</text:p>
          </table:table-cell>
          <table:table-cell office:value-type="string" office:string-value="">
            <text:p/>
          </table:table-cell>
          <table:table-cell office:value-type="string" office:string-value="">
            <text:p/>
          </table:table-cell>
          <table:table-cell office:value-type="string" office:string-value="['da1nerd', 'RRohrssen']">
            <text:p>['da1nerd', 'RRohrssen']</text:p>
          </table:table-cell>
          <table:table-cell office:value-type="string" office:string-value="131">
            <text:p>131</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07T22:47:45Z">
            <text:p>2016-12-07T22:47:45Z</text:p>
          </table:table-cell>
          <table:table-cell office:value-type="string" office:string-value="unfoldingWord-dev/ts-requirements">
            <text:p>unfoldingWord-dev/ts-requirements</text:p>
          </table:table-cell>
          <table:table-cell office:value-type="string" office:string-value="https://github.com/unfoldingWord-dev/ts-requirements">
            <text:p>https://github.com/unfoldingWord-dev/ts-requirements</text:p>
          </table:table-cell>
          <table:table-cell office:value-type="string" office:string-value="1-Manual review">
            <text:p>1-Manual review</text:p>
          </table:table-cell>
          <table:table-cell office:value-type="string" office:string-value="Repository has at least 50 open issues (131 open issues).">
            <text:p>Repository has at least 50 open issues (131 open issues).</text:p>
          </table:table-cell>
          <table:table-cell office:value-type="string" office:string-value="">
            <text:p/>
          </table:table-cell>
          <table:table-cell office:value-type="string" office:string-value="">
            <text:p/>
          </table:table-cell>
          <table:table-cell office:value-type="string" office:string-value="ts-requirements">
            <text:p>ts-requiremen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s-stats">
            <text:p>unfoldingWord-dev/ts-stats</text:p>
          </table:table-cell>
          <table:table-cell office:value-type="string" office:string-value="https://github.com/unfoldingWord-dev/ts-stats">
            <text:p>https://github.com/unfoldingWord-dev/ts-stat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08-10T11:28:50Z">
            <text:p>2021-08-10T11:28:50Z</text:p>
          </table:table-cell>
          <table:table-cell office:value-type="string" office:string-value="2021-08-10T11:28:46Z">
            <text:p>2021-08-10T11:28:4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8-10T11:28:53Z">
            <text:p>2021-08-10T11:28:53Z</text:p>
          </table:table-cell>
          <table:table-cell office:value-type="string" office:string-value="unfoldingWord-dev/ts-stats">
            <text:p>unfoldingWord-dev/ts-stats</text:p>
          </table:table-cell>
          <table:table-cell office:value-type="string" office:string-value="https://github.com/unfoldingWord-dev/ts-stats">
            <text:p>https://github.com/unfoldingWord-dev/ts-stats</text:p>
          </table:table-cell>
          <table:table-cell office:value-type="string" office:string-value="1-Manual review">
            <text:p>1-Manual review</text:p>
          </table:table-cell>
          <table:table-cell office:value-type="string" office:string-value="Stale - Repository has had no commits in over 18 months (58 months ago) and is not archived.">
            <text:p>Stale - Repository has had no commits in over 18 months (58 months ago) and is not archived.</text:p>
          </table:table-cell>
          <table:table-cell office:value-type="string" office:string-value="">
            <text:p/>
          </table:table-cell>
          <table:table-cell office:value-type="string" office:string-value="">
            <text:p/>
          </table:table-cell>
          <table:table-cell office:value-type="string" office:string-value="ts-stats">
            <text:p>ts-sta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win-ahk">
            <text:p>unfoldingWord-box3/twin-ahk</text:p>
          </table:table-cell>
          <table:table-cell office:value-type="string" office:string-value="https://github.com/unfoldingWord-box3/twin-ahk">
            <text:p>https://github.com/unfoldingWord-box3/twin-ahk</text:p>
          </table:table-cell>
          <table:table-cell office:value-type="string" office:string-value="AutoHotkey">
            <text:p>AutoHotkey</text:p>
          </table:table-cell>
          <table:table-cell office:value-type="string" office:string-value="False">
            <text:p>False</text:p>
          </table:table-cell>
          <table:table-cell office:value-type="string" office:string-value="False">
            <text:p>False</text:p>
          </table:table-cell>
          <table:table-cell office:value-type="string" office:string-value="2024-05-21T01:35:50Z">
            <text:p>2024-05-21T01:35:50Z</text:p>
          </table:table-cell>
          <table:table-cell office:value-type="string" office:string-value="2024-05-21T01:35:50Z">
            <text:p>2024-05-21T01:35:50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5-21T01:35:54Z">
            <text:p>2024-05-21T01:35:54Z</text:p>
          </table:table-cell>
          <table:table-cell office:value-type="string" office:string-value="unfoldingWord-box3/twin-ahk">
            <text:p>unfoldingWord-box3/twin-ahk</text:p>
          </table:table-cell>
          <table:table-cell office:value-type="string" office:string-value="https://github.com/unfoldingWord-box3/twin-ahk">
            <text:p>https://github.com/unfoldingWord-box3/twin-ahk</text:p>
          </table:table-cell>
          <table:table-cell office:value-type="string" office:string-value="1-Manual review">
            <text:p>1-Manual review</text:p>
          </table:table-cell>
          <table:table-cell office:value-type="string" office:string-value="Stale - Repository has had no commits in over 18 months (25 months ago) and is not archived.">
            <text:p>Stale - Repository has had no commits in over 18 months (25 months ago) and is not archived.</text:p>
          </table:table-cell>
          <table:table-cell office:value-type="string" office:string-value="">
            <text:p/>
          </table:table-cell>
          <table:table-cell office:value-type="string" office:string-value="">
            <text:p/>
          </table:table-cell>
          <table:table-cell office:value-type="string" office:string-value="twin-ahk">
            <text:p>twin-ahk</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x-dev">
            <text:p>unfoldingWord/tx-dev</text:p>
          </table:table-cell>
          <table:table-cell office:value-type="string" office:string-value="https://github.com/unfoldingWord/tx-dev">
            <text:p>https://github.com/unfoldingWord/tx-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23-10-18T23:02:42Z">
            <text:p>2023-10-18T23:02:42Z</text:p>
          </table:table-cell>
          <table:table-cell office:value-type="string" office:string-value="2023-10-18T23:02:39Z">
            <text:p>2023-10-18T23:02:39Z</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163">
            <text:p>163</text:p>
          </table:table-cell>
          <table:table-cell office:value-type="string" office:string-value="">
            <text:p/>
          </table:table-cell>
          <table:table-cell office:value-type="string" office:string-value="['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2-12T05:15:44Z">
            <text:p>2022-12-12T05:15:44Z</text:p>
          </table:table-cell>
          <table:table-cell office:value-type="string" office:string-value="unfoldingWord/tx-dev">
            <text:p>unfoldingWord/tx-dev</text:p>
          </table:table-cell>
          <table:table-cell office:value-type="string" office:string-value="https://github.com/unfoldingWord/tx-dev">
            <text:p>https://github.com/unfoldingWord/tx-dev</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63 commits).">
            <text:p>Repository has significant release history, GitHub downloads, or commit history (0 releases, 0 downloads, 163 commits).</text:p>
          </table:table-cell>
          <table:table-cell office:value-type="string" office:string-value="">
            <text:p/>
          </table:table-cell>
          <table:table-cell office:value-type="string" office:string-value="">
            <text:p/>
          </table:table-cell>
          <table:table-cell office:value-type="string" office:string-value="tx-dev">
            <text:p>tx-dev</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x-dev-dcs">
            <text:p>unfoldingWord/tx-dev-dcs</text:p>
          </table:table-cell>
          <table:table-cell office:value-type="string" office:string-value="https://github.com/unfoldingWord/tx-dev-dcs">
            <text:p>https://github.com/unfoldingWord/tx-dev-dcs</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09T21:13:08Z">
            <text:p>2022-02-09T21:13:08Z</text:p>
          </table:table-cell>
          <table:table-cell office:value-type="string" office:string-value="2021-08-25T20:47:08Z">
            <text:p>2021-08-25T20:47:0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5T18:56:57Z">
            <text:p>2022-10-05T18:56:57Z</text:p>
          </table:table-cell>
          <table:table-cell office:value-type="string" office:string-value="unfoldingWord/tx-dev-dcs">
            <text:p>unfoldingWord/tx-dev-dcs</text:p>
          </table:table-cell>
          <table:table-cell office:value-type="string" office:string-value="https://github.com/unfoldingWord/tx-dev-dcs">
            <text:p>https://github.com/unfoldingWord/tx-dev-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tx-dev-dcs">
            <text:p>tx-dev-dc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dev-door43">
            <text:p>unfoldingWord-dev/tx-dev-door43</text:p>
          </table:table-cell>
          <table:table-cell office:value-type="string" office:string-value="https://github.com/unfoldingWord-dev/tx-dev-door43">
            <text:p>https://github.com/unfoldingWord-dev/tx-dev-door4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12T22:01:02Z">
            <text:p>2021-07-12T22:01:02Z</text:p>
          </table:table-cell>
          <table:table-cell office:value-type="string" office:string-value="2021-07-12T21:58:40Z">
            <text:p>2021-07-12T21:58:40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7-12T21:58:43Z">
            <text:p>2021-07-12T21:58:43Z</text:p>
          </table:table-cell>
          <table:table-cell office:value-type="string" office:string-value="unfoldingWord-dev/tx-dev-door43">
            <text:p>unfoldingWord-dev/tx-dev-door43</text:p>
          </table:table-cell>
          <table:table-cell office:value-type="string" office:string-value="https://github.com/unfoldingWord-dev/tx-dev-door43">
            <text:p>https://github.com/unfoldingWord-dev/tx-dev-door43</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tx-dev-door43">
            <text:p>tx-dev-door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door43">
            <text:p>unfoldingWord-dev/tx-door43</text:p>
          </table:table-cell>
          <table:table-cell office:value-type="string" office:string-value="https://github.com/unfoldingWord-dev/tx-door43">
            <text:p>https://github.com/unfoldingWord-dev/tx-door4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6T12:06:34Z">
            <text:p>2017-02-06T12:06:34Z</text:p>
          </table:table-cell>
          <table:table-cell office:value-type="string" office:string-value="2016-12-20T05:51:28Z">
            <text:p>2016-12-20T05:51:28Z</text:p>
          </table:table-cell>
          <table:table-cell office:value-type="string" office:string-value="">
            <text:p/>
          </table:table-cell>
          <table:table-cell office:value-type="string" office:string-value="">
            <text:p/>
          </table:table-cell>
          <table:table-cell office:value-type="string" office:string-value="['Richard Mahn', 'richmahn', 'Gogs']">
            <text:p>['Richard Mahn', 'richmahn', 'Gogs']</text:p>
          </table:table-cell>
          <table:table-cell office:value-type="string" office:string-value="0">
            <text:p>0</text:p>
          </table:table-cell>
          <table:table-cell office:value-type="string" office:string-value="0">
            <text:p>0</text:p>
          </table:table-cell>
          <table:table-cell office:value-type="string" office:string-value="50">
            <text:p>5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5T03:15:10Z">
            <text:p>2026-03-15T03:15:10Z</text:p>
          </table:table-cell>
          <table:table-cell office:value-type="string" office:string-value="unfoldingWord-dev/tx-door43">
            <text:p>unfoldingWord-dev/tx-door43</text:p>
          </table:table-cell>
          <table:table-cell office:value-type="string" office:string-value="https://github.com/unfoldingWord-dev/tx-door43">
            <text:p>https://github.com/unfoldingWord-dev/tx-door43</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tx-door43">
            <text:p>tx-door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x-enqueue-job">
            <text:p>unfoldingWord/tx-enqueue-job</text:p>
          </table:table-cell>
          <table:table-cell office:value-type="string" office:string-value="https://github.com/unfoldingWord/tx-enqueue-job">
            <text:p>https://github.com/unfoldingWord/tx-enqueue-job</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7T01:28:53Z">
            <text:p>2024-04-17T01:28:53Z</text:p>
          </table:table-cell>
          <table:table-cell office:value-type="string" office:string-value="2024-01-25T16:47:13Z">
            <text:p>2024-01-25T16:47:13Z</text:p>
          </table:table-cell>
          <table:table-cell office:value-type="string" office:string-value="2024-01-25T16:51:03Z">
            <text:p>2024-01-25T16:51:03Z</text:p>
          </table:table-cell>
          <table:table-cell office:value-type="string" office:string-value="">
            <text:p/>
          </table:table-cell>
          <table:table-cell office:value-type="string" office:string-value="['RobH123', 'richmahn', 'jag3773', 'yakob-aleksandrovich']">
            <text:p>['RobH123', 'richmahn', 'jag3773', 'yakob-aleksandrovich']</text:p>
          </table:table-cell>
          <table:table-cell office:value-type="string" office:string-value="2">
            <text:p>2</text:p>
          </table:table-cell>
          <table:table-cell office:value-type="string" office:string-value="2">
            <text:p>2</text:p>
          </table:table-cell>
          <table:table-cell office:value-type="string" office:string-value="202">
            <text:p>20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06T15:23:21Z">
            <text:p>2024-02-06T15:23:21Z</text:p>
          </table:table-cell>
          <table:table-cell office:value-type="string" office:string-value="unfoldingWord/tx-enqueue-job">
            <text:p>unfoldingWord/tx-enqueue-job</text:p>
          </table:table-cell>
          <table:table-cell office:value-type="string" office:string-value="https://github.com/unfoldingWord/tx-enqueue-job">
            <text:p>https://github.com/unfoldingWord/tx-enqueue-job</text:p>
          </table:table-cell>
          <table:table-cell office:value-type="string" office:string-value="1-Manual review">
            <text:p>1-Manual review</text:p>
          </table:table-cell>
          <table:table-cell office:value-type="string" office:string-value="Repository has significant release history, GitHub downloads, or commit history (20 releases, 0 downloads, 202 commits).">
            <text:p>Repository has significant release history, GitHub downloads, or commit history (20 releases, 0 downloads, 202 commits).</text:p>
          </table:table-cell>
          <table:table-cell office:value-type="string" office:string-value="">
            <text:p/>
          </table:table-cell>
          <table:table-cell office:value-type="string" office:string-value="">
            <text:p/>
          </table:table-cell>
          <table:table-cell office:value-type="string" office:string-value="tx-enqueue-job">
            <text:p>tx-enqueue-jo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x-job-handler">
            <text:p>unfoldingWord/tx-job-handler</text:p>
          </table:table-cell>
          <table:table-cell office:value-type="string" office:string-value="https://github.com/unfoldingWord/tx-job-handler">
            <text:p>https://github.com/unfoldingWord/tx-job-handl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6-21T20:22:59Z">
            <text:p>2024-06-21T20:22:59Z</text:p>
          </table:table-cell>
          <table:table-cell office:value-type="string" office:string-value="2024-06-21T20:22:59Z">
            <text:p>2024-06-21T20:22:59Z</text:p>
          </table:table-cell>
          <table:table-cell office:value-type="string" office:string-value="2024-01-23T20:41:06Z">
            <text:p>2024-01-23T20:41:06Z</text:p>
          </table:table-cell>
          <table:table-cell office:value-type="string" office:string-value="">
            <text:p/>
          </table:table-cell>
          <table:table-cell office:value-type="string" office:string-value="['RobH123', 'richmahn', 'dependabot[bot]', 'jag3773']">
            <text:p>['RobH123', 'richmahn', 'dependabot[bot]', 'jag3773']</text:p>
          </table:table-cell>
          <table:table-cell office:value-type="string" office:string-value="4">
            <text:p>4</text:p>
          </table:table-cell>
          <table:table-cell office:value-type="string" office:string-value="4">
            <text:p>4</text:p>
          </table:table-cell>
          <table:table-cell office:value-type="string" office:string-value="546">
            <text:p>5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21T20:23:02Z">
            <text:p>2024-06-21T20:23:02Z</text:p>
          </table:table-cell>
          <table:table-cell office:value-type="string" office:string-value="unfoldingWord/tx-job-handler">
            <text:p>unfoldingWord/tx-job-handler</text:p>
          </table:table-cell>
          <table:table-cell office:value-type="string" office:string-value="https://github.com/unfoldingWord/tx-job-handler">
            <text:p>https://github.com/unfoldingWord/tx-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tx-job-handler">
            <text:p>tx-job-hand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md2html">
            <text:p>unfoldingWord-dev/tx-md2html</text:p>
          </table:table-cell>
          <table:table-cell office:value-type="string" office:string-value="https://github.com/unfoldingWord-dev/tx-md2html">
            <text:p>https://github.com/unfoldingWord-dev/tx-md2html</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5T00:42:08Z">
            <text:p>2017-02-05T00:42:08Z</text:p>
          </table:table-cell>
          <table:table-cell office:value-type="string" office:string-value="2017-01-18T18:02:48Z">
            <text:p>2017-01-18T18:02:48Z</text:p>
          </table:table-cell>
          <table:table-cell office:value-type="string" office:string-value="">
            <text:p/>
          </table:table-cell>
          <table:table-cell office:value-type="string" office:string-value="">
            <text:p/>
          </table:table-cell>
          <table:table-cell office:value-type="string" office:string-value="['Richard Mahn', 'richmahn', 'Phil Hopper', 'phillip-hopper', 'Gogs']">
            <text:p>['Richard Mahn', 'richmahn', 'Phil Hopper', 'phillip-hopper', 'Gogs']</text:p>
          </table:table-cell>
          <table:table-cell office:value-type="string" office:string-value="0">
            <text:p>0</text:p>
          </table:table-cell>
          <table:table-cell office:value-type="string" office:string-value="0">
            <text:p>0</text:p>
          </table:table-cell>
          <table:table-cell office:value-type="string" office:string-value="52">
            <text:p>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19T15:03:41Z">
            <text:p>2016-12-19T15:03:41Z</text:p>
          </table:table-cell>
          <table:table-cell office:value-type="string" office:string-value="unfoldingWord-dev/tx-md2html">
            <text:p>unfoldingWord-dev/tx-md2html</text:p>
          </table:table-cell>
          <table:table-cell office:value-type="string" office:string-value="https://github.com/unfoldingWord-dev/tx-md2html">
            <text:p>https://github.com/unfoldingWord-dev/tx-md2html</text:p>
          </table:table-cell>
          <table:table-cell office:value-type="string" office:string-value="1-Manual review">
            <text:p>1-Manual review</text:p>
          </table:table-cell>
          <table:table-cell office:value-type="string" office:string-value="Stale - Repository has had no commits in over 18 months (113 months ago) and is not archived.">
            <text:p>Stale - Repository has had no commits in over 18 months (113 months ago) and is not archived.</text:p>
          </table:table-cell>
          <table:table-cell office:value-type="string" office:string-value="">
            <text:p/>
          </table:table-cell>
          <table:table-cell office:value-type="string" office:string-value="">
            <text:p/>
          </table:table-cell>
          <table:table-cell office:value-type="string" office:string-value="tx-md2html">
            <text:p>tx-md2htm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shared-tools">
            <text:p>unfoldingWord-dev/tx-shared-tools</text:p>
          </table:table-cell>
          <table:table-cell office:value-type="string" office:string-value="https://github.com/unfoldingWord-dev/tx-shared-tools">
            <text:p>https://github.com/unfoldingWord-dev/tx-shared-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4:19:33Z">
            <text:p>2017-01-18T14:19:33Z</text:p>
          </table:table-cell>
          <table:table-cell office:value-type="string" office:string-value="2017-01-18T14:19:20Z">
            <text:p>2017-01-18T14:19:20Z</text:p>
          </table:table-cell>
          <table:table-cell office:value-type="string" office:string-value="">
            <text:p/>
          </table:table-cell>
          <table:table-cell office:value-type="string" office:string-value="">
            <text:p/>
          </table:table-cell>
          <table:table-cell office:value-type="string" office:string-value="['Richard Mahn', 'richmahn', 'ethantkoenig', 'Phil Hopper', 'Gogs', 'bspidel', 'phillip-hopper']">
            <text:p>['Richard Mahn', 'richmahn', 'ethantkoenig', 'Phil Hopper', 'Gogs', 'bspidel', 'phillip-hopper']</text:p>
          </table:table-cell>
          <table:table-cell office:value-type="string" office:string-value="0">
            <text:p>0</text:p>
          </table:table-cell>
          <table:table-cell office:value-type="string" office:string-value="0">
            <text:p>0</text:p>
          </table:table-cell>
          <table:table-cell office:value-type="string" office:string-value="82">
            <text:p>8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9-06T13:14:39Z">
            <text:p>2016-09-06T13:14:39Z</text:p>
          </table:table-cell>
          <table:table-cell office:value-type="string" office:string-value="unfoldingWord-dev/tx-shared-tools">
            <text:p>unfoldingWord-dev/tx-shared-tools</text:p>
          </table:table-cell>
          <table:table-cell office:value-type="string" office:string-value="https://github.com/unfoldingWord-dev/tx-shared-tools">
            <text:p>https://github.com/unfoldingWord-dev/tx-shared-tools</text:p>
          </table:table-cell>
          <table:table-cell office:value-type="string" office:string-value="1-Manual review">
            <text:p>1-Manual review</text:p>
          </table:table-cell>
          <table:table-cell office:value-type="string" office:string-value="Stale - Repository has had no commits in over 18 months (113 months ago) and is not archived.">
            <text:p>Stale - Repository has had no commits in over 18 months (113 months ago) and is not archived.</text:p>
          </table:table-cell>
          <table:table-cell office:value-type="string" office:string-value="">
            <text:p/>
          </table:table-cell>
          <table:table-cell office:value-type="string" office:string-value="">
            <text:p/>
          </table:table-cell>
          <table:table-cell office:value-type="string" office:string-value="tx-shared-tools">
            <text:p>tx-shared-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webhook">
            <text:p>unfoldingWord-dev/tx-webhook</text:p>
          </table:table-cell>
          <table:table-cell office:value-type="string" office:string-value="https://github.com/unfoldingWord-dev/tx-webhook">
            <text:p>https://github.com/unfoldingWord-dev/tx-webhook</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06T19:14:09Z">
            <text:p>2016-09-06T19:14:09Z</text:p>
          </table:table-cell>
          <table:table-cell office:value-type="string" office:string-value="2016-09-06T19:13:03Z">
            <text:p>2016-09-06T19:13:03Z</text:p>
          </table:table-cell>
          <table:table-cell office:value-type="string" office:string-value="">
            <text:p/>
          </table:table-cell>
          <table:table-cell office:value-type="string" office:string-value="">
            <text:p/>
          </table:table-cell>
          <table:table-cell office:value-type="string" office:string-value="['Root Test', 'richmahn', 'Richard Mahn', 'bspidel', 'jag3773']">
            <text:p>['Root Test', 'richmahn', 'Richard Mahn', 'bspidel', 'jag3773']</text:p>
          </table:table-cell>
          <table:table-cell office:value-type="string" office:string-value="0">
            <text:p>0</text:p>
          </table:table-cell>
          <table:table-cell office:value-type="string" office:string-value="0">
            <text:p>0</text:p>
          </table:table-cell>
          <table:table-cell office:value-type="string" office:string-value="160">
            <text:p>16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08T20:49:12Z">
            <text:p>2016-08-08T20:49:12Z</text:p>
          </table:table-cell>
          <table:table-cell office:value-type="string" office:string-value="unfoldingWord-dev/tx-webhook">
            <text:p>unfoldingWord-dev/tx-webhook</text:p>
          </table:table-cell>
          <table:table-cell office:value-type="string" office:string-value="https://github.com/unfoldingWord-dev/tx-webhook">
            <text:p>https://github.com/unfoldingWord-dev/tx-webhook</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60 commits).">
            <text:p>Repository has significant release history, GitHub downloads, or commit history (0 releases, 0 downloads, 160 commits).</text:p>
          </table:table-cell>
          <table:table-cell office:value-type="string" office:string-value="">
            <text:p/>
          </table:table-cell>
          <table:table-cell office:value-type="string" office:string-value="">
            <text:p/>
          </table:table-cell>
          <table:table-cell office:value-type="string" office:string-value="tx-webhook">
            <text:p>tx-webhook</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unfoldingWord">
            <text:p>unfoldingWord/unfoldingWord</text:p>
          </table:table-cell>
          <table:table-cell office:value-type="string" office:string-value="https://github.com/unfoldingWord/unfoldingWord">
            <text:p>https://github.com/unfoldingWord/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10-16T20:09:03Z">
            <text:p>2019-10-16T20:09:03Z</text:p>
          </table:table-cell>
          <table:table-cell office:value-type="string" office:string-value="2019-10-16T20:09:02Z">
            <text:p>2019-10-16T20:09:02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3:18Z">
            <text:p>2025-10-02T14:13:18Z</text:p>
          </table:table-cell>
          <table:table-cell office:value-type="string" office:string-value="unfoldingWord/unfoldingWord">
            <text:p>unfoldingWord/unfoldingWord</text:p>
          </table:table-cell>
          <table:table-cell office:value-type="string" office:string-value="https://github.com/unfoldingWord/unfoldingWord">
            <text:p>https://github.com/unfoldingWord/unfoldingWord</text:p>
          </table:table-cell>
          <table:table-cell office:value-type="string" office:string-value="1-Manual review">
            <text:p>1-Manual review</text:p>
          </table:table-cell>
          <table:table-cell office:value-type="string" office:string-value="Repository was edited recently (8 months ago) but has not had a commit in over 36 months (80 months ago).">
            <text:p>Repository was edited recently (8 months ago) but has not had a commit in over 36 months (80 months ago).</text:p>
          </table:table-cell>
          <table:table-cell office:value-type="string" office:string-value="">
            <text:p/>
          </table:table-cell>
          <table:table-cell office:value-type="string" office:string-value="">
            <text:p/>
          </table:table-cell>
          <table:table-cell office:value-type="string" office:string-value="unfoldingWord">
            <text:p>unfoldingWor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SFM-Utils">
            <text:p>unfoldingWord-dev/USFM-Utils</text:p>
          </table:table-cell>
          <table:table-cell office:value-type="string" office:string-value="https://github.com/unfoldingWord-dev/USFM-Utils">
            <text:p>https://github.com/unfoldingWord-dev/USFM-Uti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1-14T22:01:10Z">
            <text:p>2018-01-14T22:01:10Z</text:p>
          </table:table-cell>
          <table:table-cell office:value-type="string" office:string-value="2016-10-04T01:35:53Z">
            <text:p>2016-10-04T01:35:53Z</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1">
            <text:p>1</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23T14:45:47Z">
            <text:p>2026-02-23T14:45:47Z</text:p>
          </table:table-cell>
          <table:table-cell office:value-type="string" office:string-value="unfoldingWord-dev/USFM-Utils">
            <text:p>unfoldingWord-dev/USFM-Utils</text:p>
          </table:table-cell>
          <table:table-cell office:value-type="string" office:string-value="https://github.com/unfoldingWord-dev/USFM-Utils">
            <text:p>https://github.com/unfoldingWord-dev/USFM-Utils</text:p>
          </table:table-cell>
          <table:table-cell office:value-type="string" office:string-value="1-Manual review">
            <text:p>1-Manual review</text:p>
          </table:table-cell>
          <table:table-cell office:value-type="string" office:string-value="Repository was edited recently (4 months ago) but has not had a commit in over 36 months (116 months ago).">
            <text:p>Repository was edited recently (4 months ago) but has not had a commit in over 36 months (116 months ago).</text:p>
          </table:table-cell>
          <table:table-cell office:value-type="string" office:string-value="">
            <text:p/>
          </table:table-cell>
          <table:table-cell office:value-type="string" office:string-value="">
            <text:p/>
          </table:table-cell>
          <table:table-cell office:value-type="string" office:string-value="USFM-Utils">
            <text:p>USFM-Uti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w-android">
            <text:p>unfoldingWord-dev/uw-android</text:p>
          </table:table-cell>
          <table:table-cell office:value-type="string" office:string-value="https://github.com/unfoldingWord-dev/uw-android">
            <text:p>https://github.com/unfoldingWord-dev/uw-android</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8-06-08T15:14:35Z">
            <text:p>2018-06-08T15:14:35Z</text:p>
          </table:table-cell>
          <table:table-cell office:value-type="string" office:string-value="2018-06-08T15:12:32Z">
            <text:p>2018-06-08T15:12:32Z</text:p>
          </table:table-cell>
          <table:table-cell office:value-type="string" office:string-value="2018-06-08T15:14:36Z">
            <text:p>2018-06-08T15:14:36Z</text:p>
          </table:table-cell>
          <table:table-cell office:value-type="string" office:string-value="">
            <text:p/>
          </table:table-cell>
          <table:table-cell office:value-type="string" office:string-value="['GottaGetSwifty', 'bknatterud', 'jag3773']">
            <text:p>['GottaGetSwifty', 'bknatterud', 'jag3773']</text:p>
          </table:table-cell>
          <table:table-cell office:value-type="string" office:string-value="18">
            <text:p>18</text:p>
          </table:table-cell>
          <table:table-cell office:value-type="string" office:string-value="1">
            <text:p>1</text:p>
          </table:table-cell>
          <table:table-cell office:value-type="string" office:string-value="253">
            <text:p>253</text:p>
          </table:table-cell>
          <table:table-cell office:value-type="string" office:string-value="">
            <text:p/>
          </table:table-cell>
          <table:table-cell office:value-type="string" office:string-value="">
            <text:p/>
          </table:table-cell>
          <table:table-cell office:value-type="string" office:string-value="2302">
            <text:p>2302</text:p>
          </table:table-cell>
          <table:table-cell office:value-type="string" office:string-value="44">
            <text:p>4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1:55Z">
            <text:p>2025-10-02T14:11:55Z</text:p>
          </table:table-cell>
          <table:table-cell office:value-type="string" office:string-value="unfoldingWord-dev/uw-android">
            <text:p>unfoldingWord-dev/uw-android</text:p>
          </table:table-cell>
          <table:table-cell office:value-type="string" office:string-value="https://github.com/unfoldingWord-dev/uw-android">
            <text:p>https://github.com/unfoldingWord-dev/uw-android</text:p>
          </table:table-cell>
          <table:table-cell office:value-type="string" office:string-value="1-Manual review">
            <text:p>1-Manual review</text:p>
          </table:table-cell>
          <table:table-cell office:value-type="string" office:string-value="Repository has significant release history, GitHub downloads, or commit history (44 releases, 2302 downloads, 253 commits).">
            <text:p>Repository has significant release history, GitHub downloads, or commit history (44 releases, 2302 downloads, 253 commits).</text:p>
          </table:table-cell>
          <table:table-cell office:value-type="string" office:string-value="">
            <text:p/>
          </table:table-cell>
          <table:table-cell office:value-type="string" office:string-value="">
            <text:p/>
          </table:table-cell>
          <table:table-cell office:value-type="string" office:string-value="uw-android">
            <text:p>uw-androi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uw-data-tools">
            <text:p>unfoldingWord-box3/uw-data-tools</text:p>
          </table:table-cell>
          <table:table-cell office:value-type="string" office:string-value="https://github.com/unfoldingWord-box3/uw-data-tools">
            <text:p>https://github.com/unfoldingWord-box3/uw-data-tools</text:p>
          </table:table-cell>
          <table:table-cell office:value-type="string" office:string-value="Jupyter Notebook">
            <text:p>Jupyter Notebook</text:p>
          </table:table-cell>
          <table:table-cell office:value-type="string" office:string-value="False">
            <text:p>False</text:p>
          </table:table-cell>
          <table:table-cell office:value-type="string" office:string-value="False">
            <text:p>False</text:p>
          </table:table-cell>
          <table:table-cell office:value-type="string" office:string-value="2021-11-30T10:14:35Z">
            <text:p>2021-11-30T10:14:35Z</text:p>
          </table:table-cell>
          <table:table-cell office:value-type="string" office:string-value="2021-11-30T10:14:19Z">
            <text:p>2021-11-30T10:14:19Z</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1-30T10:14:38Z">
            <text:p>2021-11-30T10:14:38Z</text:p>
          </table:table-cell>
          <table:table-cell office:value-type="string" office:string-value="unfoldingWord-box3/uw-data-tools">
            <text:p>unfoldingWord-box3/uw-data-tools</text:p>
          </table:table-cell>
          <table:table-cell office:value-type="string" office:string-value="https://github.com/unfoldingWord-box3/uw-data-tools">
            <text:p>https://github.com/unfoldingWord-box3/uw-data-tools</text:p>
          </table:table-cell>
          <table:table-cell office:value-type="string" office:string-value="1-Manual review">
            <text:p>1-Manual review</text:p>
          </table:table-cell>
          <table:table-cell office:value-type="string" office:string-value="Stale - Repository has had no commits in over 18 months (55 months ago) and is not archived.">
            <text:p>Stale - Repository has had no commits in over 18 months (55 months ago) and is not archived.</text:p>
          </table:table-cell>
          <table:table-cell office:value-type="string" office:string-value="">
            <text:p/>
          </table:table-cell>
          <table:table-cell office:value-type="string" office:string-value="">
            <text:p/>
          </table:table-cell>
          <table:table-cell office:value-type="string" office:string-value="uw-data-tools">
            <text:p>uw-data-tool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w-ios">
            <text:p>unfoldingWord-dev/uw-ios</text:p>
          </table:table-cell>
          <table:table-cell office:value-type="string" office:string-value="https://github.com/unfoldingWord-dev/uw-ios">
            <text:p>https://github.com/unfoldingWord-dev/uw-ios</text:p>
          </table:table-cell>
          <table:table-cell office:value-type="string" office:string-value="C">
            <text:p>C</text:p>
          </table:table-cell>
          <table:table-cell office:value-type="string" office:string-value="False">
            <text:p>False</text:p>
          </table:table-cell>
          <table:table-cell office:value-type="string" office:string-value="False">
            <text:p>False</text:p>
          </table:table-cell>
          <table:table-cell office:value-type="string" office:string-value="2022-07-08T15:45:27Z">
            <text:p>2022-07-08T15:45:27Z</text:p>
          </table:table-cell>
          <table:table-cell office:value-type="string" office:string-value="2022-07-08T15:45:17Z">
            <text:p>2022-07-08T15:45:17Z</text:p>
          </table:table-cell>
          <table:table-cell office:value-type="string" office:string-value="2014-12-30T20:42:03Z">
            <text:p>2014-12-30T20:42:03Z</text:p>
          </table:table-cell>
          <table:table-cell office:value-type="string" office:string-value="">
            <text:p/>
          </table:table-cell>
          <table:table-cell office:value-type="string" office:string-value="['David Solberg', 'bknatterud', 'dwsolberg', 'jag3773']">
            <text:p>['David Solberg', 'bknatterud', 'dwsolberg', 'jag3773']</text:p>
          </table:table-cell>
          <table:table-cell office:value-type="string" office:string-value="0">
            <text:p>0</text:p>
          </table:table-cell>
          <table:table-cell office:value-type="string" office:string-value="0">
            <text:p>0</text:p>
          </table:table-cell>
          <table:table-cell office:value-type="string" office:string-value="71">
            <text:p>71</text:p>
          </table:table-cell>
          <table:table-cell office:value-type="string" office:string-value="">
            <text:p/>
          </table:table-cell>
          <table:table-cell office:value-type="string" office:string-value="">
            <text:p/>
          </table:table-cell>
          <table:table-cell office:value-type="string" office:string-value="20">
            <text:p>2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2:49Z">
            <text:p>2025-10-02T14:12:49Z</text:p>
          </table:table-cell>
          <table:table-cell office:value-type="string" office:string-value="unfoldingWord-dev/uw-ios">
            <text:p>unfoldingWord-dev/uw-ios</text:p>
          </table:table-cell>
          <table:table-cell office:value-type="string" office:string-value="https://github.com/unfoldingWord-dev/uw-ios">
            <text:p>https://github.com/unfoldingWord-dev/uw-ios</text:p>
          </table:table-cell>
          <table:table-cell office:value-type="string" office:string-value="1-Manual review">
            <text:p>1-Manual review</text:p>
          </table:table-cell>
          <table:table-cell office:value-type="string" office:string-value="Repository was edited recently (8 months ago) but has not had a commit in over 36 months (47 months ago).">
            <text:p>Repository was edited recently (8 months ago) but has not had a commit in over 36 months (47 months ago).</text:p>
          </table:table-cell>
          <table:table-cell office:value-type="string" office:string-value="">
            <text:p/>
          </table:table-cell>
          <table:table-cell office:value-type="string" office:string-value="">
            <text:p/>
          </table:table-cell>
          <table:table-cell office:value-type="string" office:string-value="uw-ios">
            <text:p>uw-ios</text:p>
          </table:table-cell>
          <table:table-cell office:value-type="string" office:string-value="unfoldingWord-dev">
            <text:p>unfoldingWord-dev</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pdf-conversion-tools">
            <text:p>unfoldingWord-dev/uw-pdf-conversion-tools</text:p>
          </table:table-cell>
          <table:table-cell office:value-type="string" office:string-value="https://github.com/unfoldingWord-dev/uw-pdf-conversion-tools">
            <text:p>https://github.com/unfoldingWord-dev/uw-pdf-conversion-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3-05T13:06:26Z">
            <text:p>2023-03-05T13:06:26Z</text:p>
          </table:table-cell>
          <table:table-cell office:value-type="string" office:string-value="2021-06-03T20:21:45Z">
            <text:p>2021-06-03T20:21:45Z</text:p>
          </table:table-cell>
          <table:table-cell office:value-type="string" office:string-value="">
            <text:p/>
          </table:table-cell>
          <table:table-cell office:value-type="string" office:string-value="">
            <text:p/>
          </table:table-cell>
          <table:table-cell office:value-type="string" office:string-value="['richmahn', 'Richard Mahn']">
            <text:p>['richmahn', 'Richard Mahn']</text:p>
          </table:table-cell>
          <table:table-cell office:value-type="string" office:string-value="4">
            <text:p>4</text:p>
          </table:table-cell>
          <table:table-cell office:value-type="string" office:string-value="4">
            <text:p>4</text:p>
          </table:table-cell>
          <table:table-cell office:value-type="string" office:string-value="303">
            <text:p>30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6-03T20:21:52Z">
            <text:p>2021-06-03T20:21:52Z</text:p>
          </table:table-cell>
          <table:table-cell office:value-type="string" office:string-value="unfoldingWord-dev/uw-pdf-conversion-tools">
            <text:p>unfoldingWord-dev/uw-pdf-conversion-tools</text:p>
          </table:table-cell>
          <table:table-cell office:value-type="string" office:string-value="https://github.com/unfoldingWord-dev/uw-pdf-conversion-tools">
            <text:p>https://github.com/unfoldingWord-dev/uw-pdf-conversion-tool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303 commits).">
            <text:p>Repository has significant release history, GitHub downloads, or commit history (0 releases, 0 downloads, 303 commits).</text:p>
          </table:table-cell>
          <table:table-cell office:value-type="string" office:string-value="">
            <text:p/>
          </table:table-cell>
          <table:table-cell office:value-type="string" office:string-value="">
            <text:p/>
          </table:table-cell>
          <table:table-cell office:value-type="string" office:string-value="uw-pdf-conversion-tools">
            <text:p>uw-pdf-conversion-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uw-pdf-preview">
            <text:p>unfoldingWord/uw-pdf-preview</text:p>
          </table:table-cell>
          <table:table-cell office:value-type="string" office:string-value="https://github.com/unfoldingWord/uw-pdf-preview">
            <text:p>https://github.com/unfoldingWord/uw-pdf-preview</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2-22T16:08:39Z">
            <text:p>2023-02-22T16:08:39Z</text:p>
          </table:table-cell>
          <table:table-cell office:value-type="string" office:string-value="2022-11-08T16:01:20Z">
            <text:p>2022-11-08T16:01:20Z</text:p>
          </table:table-cell>
          <table:table-cell office:value-type="string" office:string-value="">
            <text:p/>
          </table:table-cell>
          <table:table-cell office:value-type="string" office:string-value="">
            <text:p/>
          </table:table-cell>
          <table:table-cell office:value-type="string" office:string-value="['superdav42', 'mandolyte', 'larsgson']">
            <text:p>['superdav42', 'mandolyte', 'larsgson']</text:p>
          </table:table-cell>
          <table:table-cell office:value-type="string" office:string-value="0">
            <text:p>0</text:p>
          </table:table-cell>
          <table:table-cell office:value-type="string" office:string-value="0">
            <text:p>0</text:p>
          </table:table-cell>
          <table:table-cell office:value-type="string" office:string-value="74">
            <text:p>7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pdf-preview">
            <text:p>uw-pdf-previe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1-08T15:51:52Z">
            <text:p>2022-11-08T15:51:52Z</text:p>
          </table:table-cell>
          <table:table-cell office:value-type="string" office:string-value="unfoldingWord/uw-pdf-preview">
            <text:p>unfoldingWord/uw-pdf-preview</text:p>
          </table:table-cell>
          <table:table-cell office:value-type="string" office:string-value="https://github.com/unfoldingWord/uw-pdf-preview">
            <text:p>https://github.com/unfoldingWord/uw-pdf-preview</text:p>
          </table:table-cell>
          <table:table-cell office:value-type="string" office:string-value="1-Manual review">
            <text:p>1-Manual review</text:p>
          </table:table-cell>
          <table:table-cell office:value-type="string" office:string-value="Stale - Repository has had no commits in over 18 months (43 months ago) and is not archived.">
            <text:p>Stale - Repository has had no commits in over 18 months (43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uw-pdf-preview">
            <text:p>uw-pdf-preview</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viewer-app-cordova">
            <text:p>unfoldingWord-box3/viewer-app-cordova</text:p>
          </table:table-cell>
          <table:table-cell office:value-type="string" office:string-value="https://github.com/unfoldingWord-box3/viewer-app-cordova">
            <text:p>https://github.com/unfoldingWord-box3/viewer-app-cordova</text:p>
          </table:table-cell>
          <table:table-cell office:value-type="string" office:string-value="Objective-C">
            <text:p>Objective-C</text:p>
          </table:table-cell>
          <table:table-cell office:value-type="string" office:string-value="False">
            <text:p>False</text:p>
          </table:table-cell>
          <table:table-cell office:value-type="string" office:string-value="False">
            <text:p>False</text:p>
          </table:table-cell>
          <table:table-cell office:value-type="string" office:string-value="2022-11-09T09:01:35Z">
            <text:p>2022-11-09T09:01:35Z</text:p>
          </table:table-cell>
          <table:table-cell office:value-type="string" office:string-value="2022-11-09T09:01:35Z">
            <text:p>2022-11-09T09:01:35Z</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21">
            <text:p>2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1-09T09:01:40Z">
            <text:p>2022-11-09T09:01:40Z</text:p>
          </table:table-cell>
          <table:table-cell office:value-type="string" office:string-value="unfoldingWord-box3/viewer-app-cordova">
            <text:p>unfoldingWord-box3/viewer-app-cordova</text:p>
          </table:table-cell>
          <table:table-cell office:value-type="string" office:string-value="https://github.com/unfoldingWord-box3/viewer-app-cordova">
            <text:p>https://github.com/unfoldingWord-box3/viewer-app-cordova</text:p>
          </table:table-cell>
          <table:table-cell office:value-type="string" office:string-value="1-Manual review">
            <text:p>1-Manual review</text:p>
          </table:table-cell>
          <table:table-cell office:value-type="string" office:string-value="Stale - Repository has had no commits in over 18 months (43 months ago) and is not archived.">
            <text:p>Stale - Repository has had no commits in over 18 months (43 months ago) and is not archived.</text:p>
          </table:table-cell>
          <table:table-cell office:value-type="string" office:string-value="">
            <text:p/>
          </table:table-cell>
          <table:table-cell office:value-type="string" office:string-value="">
            <text:p/>
          </table:table-cell>
          <table:table-cell office:value-type="string" office:string-value="viewer-app-cordova">
            <text:p>viewer-app-cordova</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wordAlignment">
            <text:p>unfoldingWord/wordAlignment</text:p>
          </table:table-cell>
          <table:table-cell office:value-type="string" office:string-value="https://github.com/unfoldingWord/wordAlignment">
            <text:p>https://github.com/unfoldingWord/wordAlignme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09:25Z">
            <text:p>2026-06-12T12:09:25Z</text:p>
          </table:table-cell>
          <table:table-cell office:value-type="string" office:string-value="2026-06-12T12:09:25Z">
            <text:p>2026-06-12T12:09:25Z</text:p>
          </table:table-cell>
          <table:table-cell office:value-type="string" office:string-value="2019-02-06T21:37:06Z">
            <text:p>2019-02-06T21:37:06Z</text:p>
          </table:table-cell>
          <table:table-cell office:value-type="string" office:string-value="">
            <text:p/>
          </table:table-cell>
          <table:table-cell office:value-type="string" office:string-value="['da1nerd', 'mannycolon', 'PhotoNomad0', 'RoyalSix', 'richmahn', 'klappy', 'dependabot-support', 'Sterling (Jay) Scott', 'Richard Mahn', 'bspidel', 'ImgBotApp']">
            <text:p>['da1nerd', 'mannycolon', 'PhotoNomad0', 'RoyalSix', 'richmahn', 'klappy', 'dependabot-support', 'Sterling (Jay) Scott', 'Richard Mahn', 'bspidel', 'ImgBotApp']</text:p>
          </table:table-cell>
          <table:table-cell office:value-type="string" office:string-value="15">
            <text:p>15</text:p>
          </table:table-cell>
          <table:table-cell office:value-type="string" office:string-value="13">
            <text:p>13</text:p>
          </table:table-cell>
          <table:table-cell office:value-type="string" office:string-value="1497">
            <text:p>1497</text:p>
          </table:table-cell>
          <table:table-cell office:value-type="string" office:string-value="unfoldingWord/wordAlignment">
            <text:p>unfoldingWord/wordAlignment</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wordAlignment">
            <text:p>wordAlignm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client', 'selections', 'tc-tool', 'tc-ui-toolkit', 'usfm-js', 'word-aligner', 'wordmap', 'wordmap-lexer', 'string-punctuation-tokenizer', 'tc-strings']">
            <text:p>['gogs-client', 'selections', 'tc-tool', 'tc-ui-toolkit', 'usfm-js', 'word-aligner', 'wordmap', 'wordmap-lexer', 'string-punctuation-tokenizer', 'tc-strings']</text:p>
          </table:table-cell>
          <table:table-cell office:value-type="string" office:string-value="2026-06-12T12:09:39Z">
            <text:p>2026-06-12T12:09:39Z</text:p>
          </table:table-cell>
          <table:table-cell office:value-type="string" office:string-value="unfoldingWord/wordAlignment">
            <text:p>unfoldingWord/wordAlignment</text:p>
          </table:table-cell>
          <table:table-cell office:value-type="string" office:string-value="https://github.com/unfoldingWord/wordAlignment">
            <text:p>https://github.com/unfoldingWord/wordAlignment</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wordAlignment">
            <text:p>wordAlignm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wordmap-seed-app">
            <text:p>unfoldingWord-box3/wordmap-seed-app</text:p>
          </table:table-cell>
          <table:table-cell office:value-type="string" office:string-value="https://github.com/unfoldingWord-box3/wordmap-seed-app">
            <text:p>https://github.com/unfoldingWord-box3/wordmap-seed-app</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3-02-23T22:52:06Z">
            <text:p>2023-02-23T22:52:06Z</text:p>
          </table:table-cell>
          <table:table-cell office:value-type="string" office:string-value="2023-02-23T22:52:03Z">
            <text:p>2023-02-23T22:52:03Z</text:p>
          </table:table-cell>
          <table:table-cell office:value-type="string" office:string-value="">
            <text:p/>
          </table:table-cell>
          <table:table-cell office:value-type="string" office:string-value="">
            <text:p/>
          </table:table-cell>
          <table:table-cell office:value-type="string" office:string-value="['jdejoode', 'klappy', 'themikejr', 'bspidel']">
            <text:p>['jdejoode', 'klappy', 'themikejr', 'bspidel']</text:p>
          </table:table-cell>
          <table:table-cell office:value-type="string" office:string-value="0">
            <text:p>0</text:p>
          </table:table-cell>
          <table:table-cell office:value-type="string" office:string-value="0">
            <text:p>0</text:p>
          </table:table-cell>
          <table:table-cell office:value-type="string" office:string-value="54">
            <text:p>5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2-23T22:52:12Z">
            <text:p>2023-02-23T22:52:12Z</text:p>
          </table:table-cell>
          <table:table-cell office:value-type="string" office:string-value="unfoldingWord-box3/wordmap-seed-app">
            <text:p>unfoldingWord-box3/wordmap-seed-app</text:p>
          </table:table-cell>
          <table:table-cell office:value-type="string" office:string-value="https://github.com/unfoldingWord-box3/wordmap-seed-app">
            <text:p>https://github.com/unfoldingWord-box3/wordmap-seed-app</text:p>
          </table:table-cell>
          <table:table-cell office:value-type="string" office:string-value="1-Manual review">
            <text:p>1-Manual review</text:p>
          </table:table-cell>
          <table:table-cell office:value-type="string" office:string-value="Stale - Repository has had no commits in over 18 months (40 months ago) and is not archived.">
            <text:p>Stale - Repository has had no commits in over 18 months (40 months ago) and is not archived.</text:p>
          </table:table-cell>
          <table:table-cell office:value-type="string" office:string-value="">
            <text:p/>
          </table:table-cell>
          <table:table-cell office:value-type="string" office:string-value="">
            <text:p/>
          </table:table-cell>
          <table:table-cell office:value-type="string" office:string-value="wordmap-seed-app">
            <text:p>wordmap-seed-app</text:p>
          </table:table-cell>
          <table:table-cell office:value-type="string" office:string-value="unfoldingWord-box3">
            <text:p>unfoldingWord-box3</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ld-language-map-rcl">
            <text:p>unfoldingWord/world-language-map-rcl</text:p>
          </table:table-cell>
          <table:table-cell office:value-type="string" office:string-value="https://github.com/unfoldingWord/world-language-map-rcl">
            <text:p>https://github.com/unfoldingWord/world-language-map-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3T01:07:52Z">
            <text:p>2024-10-13T01:07:52Z</text:p>
          </table:table-cell>
          <table:table-cell office:value-type="string" office:string-value="2024-10-13T01:07:50Z">
            <text:p>2024-10-13T01:07:50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ld-language-map-rcl">
            <text:p>world-language-map-rcl</text:p>
          </table:table-cell>
          <table:table-cell office:value-type="string" office:string-value="https://www.npmjs.com/package/world-language-map-rcl">
            <text:p>https://www.npmjs.com/package/world-language-map-rcl</text:p>
          </table:table-cell>
          <table:table-cell office:value-type="string" office:string-value="False">
            <text:p>False</text:p>
          </table:table-cell>
          <table:table-cell office:value-type="string" office:string-value="117">
            <text:p>117</text:p>
          </table:table-cell>
          <table:table-cell office:value-type="string" office:string-value="2024-10-13T01:08:01.943Z">
            <text:p>2024-10-13T01:08:01.943Z</text:p>
          </table:table-cell>
          <table:table-cell office:value-type="string" office:string-value="">
            <text:p/>
          </table:table-cell>
          <table:table-cell office:value-type="string" office:string-value="">
            <text:p/>
          </table:table-cell>
          <table:table-cell office:value-type="string" office:string-value="2024-10-13T01:07:56Z">
            <text:p>2024-10-13T01:07:56Z</text:p>
          </table:table-cell>
          <table:table-cell office:value-type="string" office:string-value="unfoldingWord/world-language-map-rcl">
            <text:p>unfoldingWord/world-language-map-rcl</text:p>
          </table:table-cell>
          <table:table-cell office:value-type="string" office:string-value="https://github.com/unfoldingWord/world-language-map-rcl">
            <text:p>https://github.com/unfoldingWord/world-language-map-rcl</text:p>
          </table:table-cell>
          <table:table-cell office:value-type="string" office:string-value="1-Manual review">
            <text:p>1-Manual review</text:p>
          </table:table-cell>
          <table:table-cell office:value-type="string" office:string-value="Stale but used - Repository has had no commits in over 18 months (20 months ago) but still has detected usage (117 npm downloads in the last year).">
            <text:p>Stale but used - Repository has had no commits in over 18 months (20 months ago) but still has detected usage (117 npm downloads in the last year).</text:p>
          </table:table-cell>
          <table:table-cell office:value-type="string" office:string-value="Manual review - npm package">
            <text:p>Manual review - npm package</text:p>
          </table:table-cell>
          <table:table-cell office:value-type="string" office:string-value="Package has low but nonzero npm usage (117 downloads in the last year) and no detected local consumers.">
            <text:p>Package has low but nonzero npm usage (117 downloads in the last year) and no detected local consumers.</text:p>
          </table:table-cell>
          <table:table-cell office:value-type="string" office:string-value="world-language-map-rcl">
            <text:p>world-language-map-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admin-app">
            <text:p>unfoldingWord-box3/admin-app</text:p>
          </table:table-cell>
          <table:table-cell office:value-type="string" office:string-value="https://github.com/unfoldingWord-box3/admin-app">
            <text:p>https://github.com/unfoldingWord-box3/admin-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12T02:03:11Z">
            <text:p>2021-03-12T02:03:11Z</text:p>
          </table:table-cell>
          <table:table-cell office:value-type="string" office:string-value="2021-03-12T02:03:07Z">
            <text:p>2021-03-12T02:03:07Z</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dmin-app">
            <text:p>admin-app</text:p>
          </table:table-cell>
          <table:table-cell office:value-type="string" office:string-value="https://www.npmjs.com/package/admin-app">
            <text:p>https://www.npmjs.com/package/admin-app</text:p>
          </table:table-cell>
          <table:table-cell office:value-type="string" office:string-value="False">
            <text:p>False</text:p>
          </table:table-cell>
          <table:table-cell office:value-type="string" office:string-value="1583">
            <text:p>1583</text:p>
          </table:table-cell>
          <table:table-cell office:value-type="string" office:string-value="2022-10-04T02:18:35.288Z">
            <text:p>2022-10-04T02:18:35.288Z</text:p>
          </table:table-cell>
          <table:table-cell office:value-type="string" office:string-value="">
            <text:p/>
          </table:table-cell>
          <table:table-cell office:value-type="string" office:string-value="['gitea-react-toolkit', 'translation-helps-rcl', 'resource-workspace-rcl', 'markdown-translatable', '@unfoldingword/eslint-config', 'bible-reference-range', 'dcs-branch-merger', 'scripture-resources-rcl', 'tc-ui-toolkit', 'word-aligner', 'string-punctuation-tokenizer', 'usfm-js', 'wordmap-lexer', 'uw-quote-helpers', 'dcs-js', 'tsv-groupdata-parser', 'uw-bible-parser', 'uw-tsv-parser']">
            <text:p>['gitea-react-toolkit', 'translation-helps-rcl', 'resource-workspace-rcl', 'markdown-translatable', '@unfoldingword/eslint-config', 'bible-reference-range', 'dcs-branch-merger', 'scripture-resources-rcl', 'tc-ui-toolkit', 'word-aligner', 'string-punctuation-tokenizer', 'usfm-js', 'wordmap-lexer', 'uw-quote-helpers', 'dcs-js', 'tsv-groupdata-parser', 'uw-bible-parser', 'uw-tsv-parser']</text:p>
          </table:table-cell>
          <table:table-cell office:value-type="string" office:string-value="2021-03-12T02:03:10Z">
            <text:p>2021-03-12T02:03:10Z</text:p>
          </table:table-cell>
          <table:table-cell office:value-type="string" office:string-value="unfoldingWord-box3/admin-app">
            <text:p>unfoldingWord-box3/admin-app</text:p>
          </table:table-cell>
          <table:table-cell office:value-type="string" office:string-value="https://github.com/unfoldingWord-box3/admin-app">
            <text:p>https://github.com/unfoldingWord-box3/admin-app</text:p>
          </table:table-cell>
          <table:table-cell office:value-type="string" office:string-value="2-Keep">
            <text:p>2-Keep</text:p>
          </table:table-cell>
          <table:table-cell office:value-type="string" office:string-value="externally used - Repository has GitHub dependents or at least 1,000 npm downloads in the last year (1583 downloads).">
            <text:p>externally used - Repository has GitHub dependents or at least 1,000 npm downloads in the last year (158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583 downloads in the last year).">
            <text:p>Package has detected local usage, GitHub dependents, or significant npm downloads (1583 downloads in the last year).</text:p>
          </table:table-cell>
          <table:table-cell office:value-type="string" office:string-value="admin-app">
            <text:p>admin-app</text:p>
          </table:table-cell>
          <table:table-cell office:value-type="string" office:string-value="unfoldingWord-box3">
            <text:p>unfoldingWord-box3</text:p>
          </table:table-cell>
        </table:table-row>
        <table:table-row>
          <table:table-cell office:value-type="string" office:string-value="Left off here &lt;==">
            <text:p>Left off here &l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alignment-editor-rcl">
            <text:p>unfoldingWord-box3/alignment-editor-rcl</text:p>
          </table:table-cell>
          <table:table-cell office:value-type="string" office:string-value="https://github.com/unfoldingWord-box3/alignment-editor-rcl">
            <text:p>https://github.com/unfoldingWord-box3/alignment-editor-rcl</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1-06-24T05:19:56Z">
            <text:p>2021-06-24T05:19:56Z</text:p>
          </table:table-cell>
          <table:table-cell office:value-type="string" office:string-value="2021-06-21T20:30:54Z">
            <text:p>2021-06-21T20:30:54Z</text:p>
          </table:table-cell>
          <table:table-cell office:value-type="string" office:string-value="">
            <text:p/>
          </table:table-cell>
          <table:table-cell office:value-type="string" office:string-value="gbin-org/alignment-editor-rcl">
            <text:p>gbin-org/alignment-editor-rcl</text:p>
          </table:table-cell>
          <table:table-cell office:value-type="string" office:string-value="['themikejr', 'ancientTexts-net']">
            <text:p>['themikejr', 'ancientTexts-net']</text:p>
          </table:table-cell>
          <table:table-cell office:value-type="string" office:string-value="0">
            <text:p>0</text:p>
          </table:table-cell>
          <table:table-cell office:value-type="string" office:string-value="0">
            <text:p>0</text:p>
          </table:table-cell>
          <table:table-cell office:value-type="string" office:string-value="176">
            <text:p>17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lignment-editor-rcl">
            <text:p>alignment-editor-rcl</text:p>
          </table:table-cell>
          <table:table-cell office:value-type="string" office:string-value="https://www.npmjs.com/package/alignment-editor-rcl">
            <text:p>https://www.npmjs.com/package/alignment-editor-rcl</text:p>
          </table:table-cell>
          <table:table-cell office:value-type="string" office:string-value="False">
            <text:p>False</text:p>
          </table:table-cell>
          <table:table-cell office:value-type="string" office:string-value="1998">
            <text:p>1998</text:p>
          </table:table-cell>
          <table:table-cell office:value-type="string" office:string-value="2022-01-07T17:04:25.514Z">
            <text:p>2022-01-07T17:04:25.514Z</text:p>
          </table:table-cell>
          <table:table-cell office:value-type="string" office:string-value="anchor-alignment-poc">
            <text:p>anchor-alignment-poc</text:p>
          </table:table-cell>
          <table:table-cell office:value-type="string" office:string-value="">
            <text:p/>
          </table:table-cell>
          <table:table-cell office:value-type="string" office:string-value="2022-06-14T15:15:26Z">
            <text:p>2022-06-14T15:15:26Z</text:p>
          </table:table-cell>
          <table:table-cell office:value-type="string" office:string-value="unfoldingWord-box3/alignment-editor-rcl">
            <text:p>unfoldingWord-box3/alignment-editor-rcl</text:p>
          </table:table-cell>
          <table:table-cell office:value-type="string" office:string-value="https://github.com/unfoldingWord-box3/alignment-editor-rcl">
            <text:p>https://github.com/unfoldingWord-box3/alignment-editor-rcl</text:p>
          </table:table-cell>
          <table:table-cell office:value-type="string" office:string-value="2-Keep">
            <text:p>2-Keep</text:p>
          </table:table-cell>
          <table:table-cell office:value-type="string" office:string-value="externally used - Repository has GitHub dependents or at least 1,000 npm downloads in the last year (1998 downloads).">
            <text:p>externally used - Repository has GitHub dependents or at least 1,000 npm downloads in the last year (199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998 downloads in the last year).">
            <text:p>Package has detected local usage, GitHub dependents, or significant npm downloads (1998 downloads in the last year).</text:p>
          </table:table-cell>
          <table:table-cell office:value-type="string" office:string-value="alignment-editor-rcl">
            <text:p>alignment-editor-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alignment-ml">
            <text:p>unfoldingWord-box3/alignment-ml</text:p>
          </table:table-cell>
          <table:table-cell office:value-type="string" office:string-value="https://github.com/unfoldingWord-box3/alignment-ml">
            <text:p>https://github.com/unfoldingWord-box3/alignment-ml</text:p>
          </table:table-cell>
          <table:table-cell office:value-type="string" office:string-value="Jupyter Notebook">
            <text:p>Jupyter Notebook</text:p>
          </table:table-cell>
          <table:table-cell office:value-type="string" office:string-value="False">
            <text:p>False</text:p>
          </table:table-cell>
          <table:table-cell office:value-type="string" office:string-value="True">
            <text:p>True</text:p>
          </table:table-cell>
          <table:table-cell office:value-type="string" office:string-value="2021-01-08T22:57:49Z">
            <text:p>2021-01-08T22:57:49Z</text:p>
          </table:table-cell>
          <table:table-cell office:value-type="string" office:string-value="2021-01-08T22:57:38Z">
            <text:p>2021-01-08T22:57:38Z</text:p>
          </table:table-cell>
          <table:table-cell office:value-type="string" office:string-value="">
            <text:p/>
          </table:table-cell>
          <table:table-cell office:value-type="string" office:string-value="PhotoNomad0/alignment-ml">
            <text:p>PhotoNomad0/alignment-m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131">
            <text:p>13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1-08T22:57:52Z">
            <text:p>2021-01-08T22:57:52Z</text:p>
          </table:table-cell>
          <table:table-cell office:value-type="string" office:string-value="unfoldingWord-box3/alignment-ml">
            <text:p>unfoldingWord-box3/alignment-ml</text:p>
          </table:table-cell>
          <table:table-cell office:value-type="string" office:string-value="https://github.com/unfoldingWord-box3/alignment-ml">
            <text:p>https://github.com/unfoldingWord-box3/alignment-ml</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alignment-ml">
            <text:p>alignment-m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alignment-playground">
            <text:p>unfoldingWord-box3/alignment-playground</text:p>
          </table:table-cell>
          <table:table-cell office:value-type="string" office:string-value="https://github.com/unfoldingWord-box3/alignment-playground">
            <text:p>https://github.com/unfoldingWord-box3/alignment-playgroun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0T18:39:36Z">
            <text:p>2023-02-10T18:39:36Z</text:p>
          </table:table-cell>
          <table:table-cell office:value-type="string" office:string-value="2023-01-30T14:47:20Z">
            <text:p>2023-01-30T14:47:20Z</text:p>
          </table:table-cell>
          <table:table-cell office:value-type="string" office:string-value="">
            <text:p/>
          </table:table-cell>
          <table:table-cell office:value-type="string" office:string-value="PhotoNomad0/alignment-playground">
            <text:p>PhotoNomad0/alignment-playground</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lignment-playground">
            <text:p>alignment-playgroun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c-ui-toolkit', 'usfm-js', 'word-aligner', 'wordmap-lexer', 'string-punctuation-tokenizer']">
            <text:p>['bible-reference-range', 'tc-ui-toolkit', 'usfm-js', 'word-aligner', 'wordmap-lexer', 'string-punctuation-tokenizer']</text:p>
          </table:table-cell>
          <table:table-cell office:value-type="string" office:string-value="2023-01-30T13:00:02Z">
            <text:p>2023-01-30T13:00:02Z</text:p>
          </table:table-cell>
          <table:table-cell office:value-type="string" office:string-value="unfoldingWord-box3/alignment-playground">
            <text:p>unfoldingWord-box3/alignment-playground</text:p>
          </table:table-cell>
          <table:table-cell office:value-type="string" office:string-value="https://github.com/unfoldingWord-box3/alignment-playground">
            <text:p>https://github.com/unfoldingWord-box3/alignment-playground</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alignment-playground">
            <text:p>alignment-playground</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alignment-transferer">
            <text:p>unfoldingWord-dev/alignment-transferer</text:p>
          </table:table-cell>
          <table:table-cell office:value-type="string" office:string-value="https://github.com/unfoldingWord-dev/alignment-transferer">
            <text:p>https://github.com/unfoldingWord-dev/alignment-transferer</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92">
            <text:p>9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17T18:57:53Z">
            <text:p>2025-06-17T18:57:53Z</text:p>
          </table:table-cell>
          <table:table-cell office:value-type="string" office:string-value="unfoldingWord-dev/alignment-transferer">
            <text:p>unfoldingWord-dev/alignment-transferer</text:p>
          </table:table-cell>
          <table:table-cell office:value-type="string" office:string-value="https://github.com/unfoldingWord-dev/alignment-transferer">
            <text:p>https://github.com/unfoldingWord-dev/alignment-transfer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alignment-transferer">
            <text:p>alignment-transfer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aruch">
            <text:p>unfoldingWord/baruch</text:p>
          </table:table-cell>
          <table:table-cell office:value-type="string" office:string-value="https://github.com/unfoldingWord/baruch">
            <text:p>https://github.com/unfoldingWord/baruch</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20T22:23:08Z">
            <text:p>2026-04-20T22:23:08Z</text:p>
          </table:table-cell>
          <table:table-cell office:value-type="string" office:string-value="2026-04-20T22:22:00Z">
            <text:p>2026-04-20T22:22:00Z</text:p>
          </table:table-cell>
          <table:table-cell office:value-type="string" office:string-value="">
            <text:p/>
          </table:table-cell>
          <table:table-cell office:value-type="string" office:string-value="">
            <text:p/>
          </table:table-cell>
          <table:table-cell office:value-type="string" office:string-value="['IanLindsley', 'ILindsley', 'claude']">
            <text:p>['IanLindsley', 'ILindsley', 'claude']</text:p>
          </table:table-cell>
          <table:table-cell office:value-type="string" office:string-value="6">
            <text:p>6</text:p>
          </table:table-cell>
          <table:table-cell office:value-type="string" office:string-value="1">
            <text:p>1</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aruch">
            <text:p>baruc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20T22:22:05Z">
            <text:p>2026-04-20T22:22:05Z</text:p>
          </table:table-cell>
          <table:table-cell office:value-type="string" office:string-value="unfoldingWord/baruch">
            <text:p>unfoldingWord/baruch</text:p>
          </table:table-cell>
          <table:table-cell office:value-type="string" office:string-value="https://github.com/unfoldingWord/baruch">
            <text:p>https://github.com/unfoldingWord/baruch</text:p>
          </table:table-cell>
          <table:table-cell office:value-type="string" office:string-value="2-Keep">
            <text:p>2-Keep</text:p>
          </table:table-cell>
          <table:table-cell office:value-type="string" office:string-value="Active - Last commit was within the last 12 months (2 months ago).">
            <text:p>Active - Last commit was within the last 12 months (2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aruch">
            <text:p>baruch</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bible-ref-pk-demo">
            <text:p>unfoldingWord-box3/bible-ref-pk-demo</text:p>
          </table:table-cell>
          <table:table-cell office:value-type="string" office:string-value="https://github.com/unfoldingWord-box3/bible-ref-pk-demo">
            <text:p>https://github.com/unfoldingWord-box3/bible-ref-pk-demo</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11-10T17:40:23Z">
            <text:p>2022-11-10T17:40:23Z</text:p>
          </table:table-cell>
          <table:table-cell office:value-type="string" office:string-value="2022-11-10T17:40:19Z">
            <text:p>2022-11-10T17:40:19Z</text:p>
          </table:table-cell>
          <table:table-cell office:value-type="string" office:string-value="">
            <text:p/>
          </table:table-cell>
          <table:table-cell office:value-type="string" office:string-value="mandolyte/bible-ref-pk-demo">
            <text:p>mandolyte/bible-ref-pk-demo</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26">
            <text:p>2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4-09T14:05:23Z">
            <text:p>2022-04-09T14:05:23Z</text:p>
          </table:table-cell>
          <table:table-cell office:value-type="string" office:string-value="unfoldingWord-box3/bible-ref-pk-demo">
            <text:p>unfoldingWord-box3/bible-ref-pk-demo</text:p>
          </table:table-cell>
          <table:table-cell office:value-type="string" office:string-value="https://github.com/unfoldingWord-box3/bible-ref-pk-demo">
            <text:p>https://github.com/unfoldingWord-box3/bible-ref-pk-demo</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bible-ref-pk-demo">
            <text:p>bible-ref-pk-demo</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ible-reference-range">
            <text:p>unfoldingWord/bible-reference-range</text:p>
          </table:table-cell>
          <table:table-cell office:value-type="string" office:string-value="https://github.com/unfoldingWord/bible-reference-range">
            <text:p>https://github.com/unfoldingWord/bible-reference-rang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2-07T19:15:38Z">
            <text:p>2023-12-07T19:15:38Z</text:p>
          </table:table-cell>
          <table:table-cell office:value-type="string" office:string-value="2023-12-07T18:20:14Z">
            <text:p>2023-12-07T18:20:14Z</text:p>
          </table:table-cell>
          <table:table-cell office:value-type="string" office:string-value="">
            <text:p/>
          </table:table-cell>
          <table:table-cell office:value-type="string" office:string-value="">
            <text:p/>
          </table:table-cell>
          <table:table-cell office:value-type="string" office:string-value="['Joel-C-Johnson', 'PhotoNomad0', 'kintsoogi', 'jincypjose']">
            <text:p>['Joel-C-Johnson', 'PhotoNomad0', 'kintsoogi', 'jincypjose']</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reference-range">
            <text:p>bible-reference-range</text:p>
          </table:table-cell>
          <table:table-cell office:value-type="string" office:string-value="https://www.npmjs.com/package/bible-reference-range">
            <text:p>https://www.npmjs.com/package/bible-reference-range</text:p>
          </table:table-cell>
          <table:table-cell office:value-type="string" office:string-value="False">
            <text:p>False</text:p>
          </table:table-cell>
          <table:table-cell office:value-type="string" office:string-value="16689">
            <text:p>16689</text:p>
          </table:table-cell>
          <table:table-cell office:value-type="string" office:string-value="2023-12-07T19:15:35.590Z">
            <text:p>2023-12-07T19:15:35.590Z</text:p>
          </table:table-cell>
          <table:table-cell office:value-type="string" office:string-value="['translationCore', 'enhanced-word-aligner-rcl', 'tc-create-app', 'word-aligner-rcl', 'word-aligner-lib', 'single-scripture-rcl', 'translation-helps-rcl', 'scripture-resources-rcl', 'uw-quote-helpers', 'tsv-groupdata-parser', 'checking-tool-rcl', 'bible-reference-rcl', 'scripture-tsv', 'uw-bible-parser', 'checking-extension', 'alignment-playground']">
            <text:p>['translationCore', 'enhanced-word-aligner-rcl', 'tc-create-app', 'word-aligner-rcl', 'word-aligner-lib', 'single-scripture-rcl', 'translation-helps-rcl', 'scripture-resources-rcl', 'uw-quote-helpers', 'tsv-groupdata-parser', 'checking-tool-rcl', 'bible-reference-rcl', 'scripture-tsv', 'uw-bible-parser', 'checking-extension', 'alignment-playground']</text:p>
          </table:table-cell>
          <table:table-cell office:value-type="string" office:string-value="">
            <text:p/>
          </table:table-cell>
          <table:table-cell office:value-type="string" office:string-value="2023-07-19T04:20:40Z">
            <text:p>2023-07-19T04:20:40Z</text:p>
          </table:table-cell>
          <table:table-cell office:value-type="string" office:string-value="unfoldingWord/bible-reference-range">
            <text:p>unfoldingWord/bible-reference-range</text:p>
          </table:table-cell>
          <table:table-cell office:value-type="string" office:string-value="https://github.com/unfoldingWord/bible-reference-range">
            <text:p>https://github.com/unfoldingWord/bible-reference-range</text:p>
          </table:table-cell>
          <table:table-cell office:value-type="string" office:string-value="2-Keep">
            <text:p>2-Keep</text:p>
          </table:table-cell>
          <table:table-cell office:value-type="string" office:string-value="externally used - Repository has GitHub dependents or at least 1,000 npm downloads in the last year (16689 downloads).">
            <text:p>externally used - Repository has GitHub dependents or at least 1,000 npm downloads in the last year (1668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689 downloads in the last year).">
            <text:p>Package has detected local usage, GitHub dependents, or significant npm downloads (16689 downloads in the last year).</text:p>
          </table:table-cell>
          <table:table-cell office:value-type="string" office:string-value="bible-reference-range">
            <text:p>bible-reference-rang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ible-reference-rcl">
            <text:p>unfoldingWord/bible-reference-rcl</text:p>
          </table:table-cell>
          <table:table-cell office:value-type="string" office:string-value="https://github.com/unfoldingWord/bible-reference-rcl">
            <text:p>https://github.com/unfoldingWord/bible-reference-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04T12:41:01Z">
            <text:p>2024-06-04T12:41:01Z</text:p>
          </table:table-cell>
          <table:table-cell office:value-type="string" office:string-value="2024-06-04T12:38:41Z">
            <text:p>2024-06-04T12:38:41Z</text:p>
          </table:table-cell>
          <table:table-cell office:value-type="string" office:string-value="2024-06-06T22:07:09Z">
            <text:p>2024-06-06T22:07:09Z</text:p>
          </table:table-cell>
          <table:table-cell office:value-type="string" office:string-value="['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office:string-value="['PhotoNomad0', 'mannycolon', 'foxprogs', 'Joel-C-Johnson', 'kintsoogi', 'richmahn']">
            <text:p>['PhotoNomad0', 'mannycolon', 'foxprogs', 'Joel-C-Johnson', 'kintsoogi', 'richmahn']</text:p>
          </table:table-cell>
          <table:table-cell office:value-type="string" office:string-value="6">
            <text:p>6</text:p>
          </table:table-cell>
          <table:table-cell office:value-type="string" office:string-value="0">
            <text:p>0</text:p>
          </table:table-cell>
          <table:table-cell office:value-type="string" office:string-value="124">
            <text:p>1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bible-reference-rcl">
            <text:p>bible-reference-rcl</text:p>
          </table:table-cell>
          <table:table-cell office:value-type="string" office:string-value="https://www.npmjs.com/package/bible-reference-rcl">
            <text:p>https://www.npmjs.com/package/bible-reference-rcl</text:p>
          </table:table-cell>
          <table:table-cell office:value-type="string" office:string-value="False">
            <text:p>False</text:p>
          </table:table-cell>
          <table:table-cell office:value-type="string" office:string-value="5169">
            <text:p>5169</text:p>
          </table:table-cell>
          <table:table-cell office:value-type="string" office:string-value="2024-06-04T12:40:10.075Z">
            <text:p>2024-06-04T12:40:10.075Z</text:p>
          </table:table-cell>
          <table:table-cell office:value-type="string" office:string-value="['door43-preview-app', 'gateway-edit', 'bsa', 'scripture-tsv', 'gateway-translate', 'create-app', 'bible-preview-app', 'anchor-alignment-poc', 'greek-apparatus-app', '@oce-editor-tools/joy-pk', '@oce-editor-tools/mui-pk']">
            <text:p>['door43-preview-app', 'gateway-edit', 'bsa', 'scripture-tsv', 'gateway-translate', 'create-app', 'bible-preview-app', 'anchor-alignment-poc', 'greek-apparatus-app', '@oce-editor-tools/joy-pk', '@oce-editor-tools/mui-pk']</text:p>
          </table:table-cell>
          <table:table-cell office:value-type="string" office:string-value="bible-reference-range">
            <text:p>bible-reference-range</text:p>
          </table:table-cell>
          <table:table-cell office:value-type="string" office:string-value="2024-06-04T12:38:45Z">
            <text:p>2024-06-04T12:38:45Z</text:p>
          </table:table-cell>
          <table:table-cell office:value-type="string" office:string-value="unfoldingWord/bible-reference-rcl">
            <text:p>unfoldingWord/bible-reference-rcl</text:p>
          </table:table-cell>
          <table:table-cell office:value-type="string" office:string-value="https://github.com/unfoldingWord/bible-reference-rcl">
            <text:p>https://github.com/unfoldingWord/bible-reference-rcl</text:p>
          </table:table-cell>
          <table:table-cell office:value-type="string" office:string-value="2-Keep">
            <text:p>2-Keep</text:p>
          </table:table-cell>
          <table:table-cell office:value-type="string" office:string-value="externally used - Repository has GitHub dependents or at least 1,000 npm downloads in the last year (5169 downloads).">
            <text:p>externally used - Repository has GitHub dependents or at least 1,000 npm downloads in the last year (516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169 downloads in the last year).">
            <text:p>Package has detected local usage, GitHub dependents, or significant npm downloads (5169 downloads in the last year).</text:p>
          </table:table-cell>
          <table:table-cell office:value-type="string" office:string-value="bible-reference-rcl">
            <text:p>bible-reference-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ok-package-rcl">
            <text:p>unfoldingWord/book-package-rcl</text:p>
          </table:table-cell>
          <table:table-cell office:value-type="string" office:string-value="https://github.com/unfoldingWord/book-package-rcl">
            <text:p>https://github.com/unfoldingWord/book-package-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2T13:43:17Z">
            <text:p>2023-01-02T13:43:17Z</text:p>
          </table:table-cell>
          <table:table-cell office:value-type="string" office:string-value="2023-01-02T13:22:57Z">
            <text:p>2023-01-02T13:22:57Z</text:p>
          </table:table-cell>
          <table:table-cell office:value-type="string" office:string-value="">
            <text:p/>
          </table:table-cell>
          <table:table-cell office:value-type="string" office:string-value="unfoldingWord/book-package-app">
            <text:p>unfoldingWord/book-package-app</text:p>
          </table:table-cell>
          <table:table-cell office:value-type="string" office:string-value="['mandolyte', 'abelpz', 'dependabot[bot]']">
            <text:p>['mandolyte', 'abelpz', 'dependabot[bot]']</text:p>
          </table:table-cell>
          <table:table-cell office:value-type="string" office:string-value="10">
            <text:p>10</text:p>
          </table:table-cell>
          <table:table-cell office:value-type="string" office:string-value="8">
            <text:p>8</text:p>
          </table:table-cell>
          <table:table-cell office:value-type="string" office:string-value="184">
            <text:p>18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ook-package-rcl">
            <text:p>book-package-rcl</text:p>
          </table:table-cell>
          <table:table-cell office:value-type="string" office:string-value="https://www.npmjs.com/package/book-package-rcl">
            <text:p>https://www.npmjs.com/package/book-package-rcl</text:p>
          </table:table-cell>
          <table:table-cell office:value-type="string" office:string-value="False">
            <text:p>False</text:p>
          </table:table-cell>
          <table:table-cell office:value-type="string" office:string-value="2216">
            <text:p>2216</text:p>
          </table:table-cell>
          <table:table-cell office:value-type="string" office:string-value="2023-01-02T13:16:20.145Z">
            <text:p>2023-01-02T13:16:20.145Z</text:p>
          </table:table-cell>
          <table:table-cell office:value-type="string" office:string-value="book-package-app">
            <text:p>book-package-app</text:p>
          </table:table-cell>
          <table:table-cell office:value-type="string" office:string-value="['usfm-js', 'uw-word-count']">
            <text:p>['usfm-js', 'uw-word-count']</text:p>
          </table:table-cell>
          <table:table-cell office:value-type="string" office:string-value="2022-06-14T14:25:45Z">
            <text:p>2022-06-14T14:25:45Z</text:p>
          </table:table-cell>
          <table:table-cell office:value-type="string" office:string-value="unfoldingWord/book-package-rcl">
            <text:p>unfoldingWord/book-package-rcl</text:p>
          </table:table-cell>
          <table:table-cell office:value-type="string" office:string-value="https://github.com/unfoldingWord/book-package-rcl">
            <text:p>https://github.com/unfoldingWord/book-package-rcl</text:p>
          </table:table-cell>
          <table:table-cell office:value-type="string" office:string-value="2-Keep">
            <text:p>2-Keep</text:p>
          </table:table-cell>
          <table:table-cell office:value-type="string" office:string-value="externally used - Repository has GitHub dependents or at least 1,000 npm downloads in the last year (2216 downloads).">
            <text:p>externally used - Repository has GitHub dependents or at least 1,000 npm downloads in the last year (221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16 downloads in the last year).">
            <text:p>Package has detected local usage, GitHub dependents, or significant npm downloads (2216 downloads in the last year).</text:p>
          </table:table-cell>
          <table:table-cell office:value-type="string" office:string-value="book-package-rcl">
            <text:p>book-package-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p-assistant">
            <text:p>unfoldingWord/bp-assistant</text:p>
          </table:table-cell>
          <table:table-cell office:value-type="string" office:string-value="https://github.com/unfoldingWord/bp-assistant">
            <text:p>https://github.com/unfoldingWord/bp-assista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0T16:42:10Z">
            <text:p>2026-06-20T16:42:10Z</text:p>
          </table:table-cell>
          <table:table-cell office:value-type="string" office:string-value="2026-06-20T16:42:10Z">
            <text:p>2026-06-20T16:42:10Z</text:p>
          </table:table-cell>
          <table:table-cell office:value-type="string" office:string-value="">
            <text:p/>
          </table:table-cell>
          <table:table-cell office:value-type="string" office:string-value="">
            <text:p/>
          </table:table-cell>
          <table:table-cell office:value-type="string" office:string-value="['benjamin-test', 'deferredreward', 'stephenwunrow', 'dependabot[bot]', 'claude', 'bp-assistant bot']">
            <text:p>['benjamin-test', 'deferredreward', 'stephenwunrow', 'dependabot[bot]', 'claude', 'bp-assistant bot']</text:p>
          </table:table-cell>
          <table:table-cell office:value-type="string" office:string-value="0">
            <text:p>0</text:p>
          </table:table-cell>
          <table:table-cell office:value-type="string" office:string-value="0">
            <text:p>0</text:p>
          </table:table-cell>
          <table:table-cell office:value-type="string" office:string-value="507">
            <text:p>50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zulip-bot">
            <text:p>zulip-bo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6-06-20T16:42:15Z">
            <text:p>2026-06-20T16:42:15Z</text:p>
          </table:table-cell>
          <table:table-cell office:value-type="string" office:string-value="unfoldingWord/bp-assistant">
            <text:p>unfoldingWord/bp-assistant</text:p>
          </table:table-cell>
          <table:table-cell office:value-type="string" office:string-value="https://github.com/unfoldingWord/bp-assistant">
            <text:p>https://github.com/unfoldingWord/bp-assistant</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p-assistant">
            <text:p>bp-assista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p-assistant-skills">
            <text:p>unfoldingWord/bp-assistant-skills</text:p>
          </table:table-cell>
          <table:table-cell office:value-type="string" office:string-value="https://github.com/unfoldingWord/bp-assistant-skills">
            <text:p>https://github.com/unfoldingWord/bp-assistant-skil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20:24:02Z">
            <text:p>2026-06-22T20:24:02Z</text:p>
          </table:table-cell>
          <table:table-cell office:value-type="string" office:string-value="2026-06-22T20:24:00Z">
            <text:p>2026-06-22T20:24:00Z</text:p>
          </table:table-cell>
          <table:table-cell office:value-type="string" office:string-value="">
            <text:p/>
          </table:table-cell>
          <table:table-cell office:value-type="string" office:string-value="">
            <text:p/>
          </table:table-cell>
          <table:table-cell office:value-type="string" office:string-value="['BW Bot', 'deferredreward', 'benjamin-test', 'stephenwunrow', 'Nightly Issue Bot']">
            <text:p>['BW Bot', 'deferredreward', 'benjamin-test', 'stephenwunrow', 'Nightly Issue Bot']</text:p>
          </table:table-cell>
          <table:table-cell office:value-type="string" office:string-value="1">
            <text:p>1</text:p>
          </table:table-cell>
          <table:table-cell office:value-type="string" office:string-value="0">
            <text:p>0</text:p>
          </table:table-cell>
          <table:table-cell office:value-type="string" office:string-value="428">
            <text:p>42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skillbp-prompt-over-code">
            <text:p>cskillbp-prompt-over-cod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6-06-23T15:26:35Z">
            <text:p>2026-06-23T15:26:35Z</text:p>
          </table:table-cell>
          <table:table-cell office:value-type="string" office:string-value="unfoldingWord/bp-assistant-skills">
            <text:p>unfoldingWord/bp-assistant-skills</text:p>
          </table:table-cell>
          <table:table-cell office:value-type="string" office:string-value="https://github.com/unfoldingWord/bp-assistant-skills">
            <text:p>https://github.com/unfoldingWord/bp-assistant-skills</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p-assistant-skills">
            <text:p>bp-assistant-skil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admin-portal">
            <text:p>unfoldingWord/bt-servant-admin-portal</text:p>
          </table:table-cell>
          <table:table-cell office:value-type="string" office:string-value="https://github.com/unfoldingWord/bt-servant-admin-portal">
            <text:p>https://github.com/unfoldingWord/bt-servant-admin-portal</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22:11:43Z">
            <text:p>2026-06-13T22:11:43Z</text:p>
          </table:table-cell>
          <table:table-cell office:value-type="string" office:string-value="2026-06-13T22:11:43Z">
            <text:p>2026-06-13T22:11:43Z</text:p>
          </table:table-cell>
          <table:table-cell office:value-type="string" office:string-value="">
            <text:p/>
          </table:table-cell>
          <table:table-cell office:value-type="string" office:string-value="">
            <text:p/>
          </table:table-cell>
          <table:table-cell office:value-type="string" office:string-value="['claude', 'sethstoll3', 'IanLindsley', 'ILindsley', 'deferredreward']">
            <text:p>['claude', 'sethstoll3', 'IanLindsley', 'ILindsley', 'deferredreward']</text:p>
          </table:table-cell>
          <table:table-cell office:value-type="string" office:string-value="56">
            <text:p>56</text:p>
          </table:table-cell>
          <table:table-cell office:value-type="string" office:string-value="0">
            <text:p>0</text:p>
          </table:table-cell>
          <table:table-cell office:value-type="string" office:string-value="144">
            <text:p>14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admin-portal">
            <text:p>bt-servant-admin-porta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3T22:11:48Z">
            <text:p>2026-06-13T22:11:48Z</text:p>
          </table:table-cell>
          <table:table-cell office:value-type="string" office:string-value="unfoldingWord/bt-servant-admin-portal">
            <text:p>unfoldingWord/bt-servant-admin-portal</text:p>
          </table:table-cell>
          <table:table-cell office:value-type="string" office:string-value="https://github.com/unfoldingWord/bt-servant-admin-portal">
            <text:p>https://github.com/unfoldingWord/bt-servant-admin-portal</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t-servant-admin-portal">
            <text:p>bt-servant-admin-porta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engine">
            <text:p>unfoldingWord/bt-servant-engine</text:p>
          </table:table-cell>
          <table:table-cell office:value-type="string" office:string-value="https://github.com/unfoldingWord/bt-servant-engine">
            <text:p>https://github.com/unfoldingWord/bt-servant-engine</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23T20:10:31Z">
            <text:p>2026-03-23T20:10:31Z</text:p>
          </table:table-cell>
          <table:table-cell office:value-type="string" office:string-value="2026-01-16T14:04:11Z">
            <text:p>2026-01-16T14:04:11Z</text:p>
          </table:table-cell>
          <table:table-cell office:value-type="string" office:string-value="2026-04-24T14:42:44Z">
            <text:p>2026-04-24T14:42:44Z</text:p>
          </table:table-cell>
          <table:table-cell office:value-type="string" office:string-value="">
            <text:p/>
          </table:table-cell>
          <table:table-cell office:value-type="string" office:string-value="['ILindsley', 'IanLindsley', 'abiatarprado', 'Claude Assistant', 'claude', 'Gemini', 'yakob-aleksandrovich', 'Ian Lindsley', 'Fly.io']">
            <text:p>['ILindsley', 'IanLindsley', 'abiatarprado', 'Claude Assistant', 'claude', 'Gemini', 'yakob-aleksandrovich', 'Ian Lindsley', 'Fly.io']</text:p>
          </table:table-cell>
          <table:table-cell office:value-type="string" office:string-value="35">
            <text:p>35</text:p>
          </table:table-cell>
          <table:table-cell office:value-type="string" office:string-value="0">
            <text:p>0</text:p>
          </table:table-cell>
          <table:table-cell office:value-type="string" office:string-value="393">
            <text:p>39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1-16T14:04:21Z">
            <text:p>2026-01-16T14:04:21Z</text:p>
          </table:table-cell>
          <table:table-cell office:value-type="string" office:string-value="unfoldingWord/bt-servant-engine">
            <text:p>unfoldingWord/bt-servant-engine</text:p>
          </table:table-cell>
          <table:table-cell office:value-type="string" office:string-value="https://github.com/unfoldingWord/bt-servant-engine">
            <text:p>https://github.com/unfoldingWord/bt-servant-engine</text:p>
          </table:table-cell>
          <table:table-cell office:value-type="string" office:string-value="2-Keep">
            <text:p>2-Keep</text:p>
          </table:table-cell>
          <table:table-cell office:value-type="string" office:string-value="Active - Last commit was within the last 12 months (5 months ago).">
            <text:p>Active - Last commit was within the last 12 months (5 months ago).</text:p>
          </table:table-cell>
          <table:table-cell office:value-type="string" office:string-value="">
            <text:p/>
          </table:table-cell>
          <table:table-cell office:value-type="string" office:string-value="">
            <text:p/>
          </table:table-cell>
          <table:table-cell office:value-type="string" office:string-value="bt-servant-engine">
            <text:p>bt-servant-engin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engine-data-loaders">
            <text:p>unfoldingWord/bt-servant-engine-data-loaders</text:p>
          </table:table-cell>
          <table:table-cell office:value-type="string" office:string-value="https://github.com/unfoldingWord/bt-servant-engine-data-loaders">
            <text:p>https://github.com/unfoldingWord/bt-servant-engine-data-loader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1-15T00:36:38Z">
            <text:p>2026-01-15T00:36:38Z</text:p>
          </table:table-cell>
          <table:table-cell office:value-type="string" office:string-value="2026-01-15T00:36:33Z">
            <text:p>2026-01-15T00:36:33Z</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69">
            <text:p>6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1-15T00:36:42Z">
            <text:p>2026-01-15T00:36:42Z</text:p>
          </table:table-cell>
          <table:table-cell office:value-type="string" office:string-value="unfoldingWord/bt-servant-engine-data-loaders">
            <text:p>unfoldingWord/bt-servant-engine-data-loaders</text:p>
          </table:table-cell>
          <table:table-cell office:value-type="string" office:string-value="https://github.com/unfoldingWord/bt-servant-engine-data-loaders">
            <text:p>https://github.com/unfoldingWord/bt-servant-engine-data-loaders</text:p>
          </table:table-cell>
          <table:table-cell office:value-type="string" office:string-value="2-Keep">
            <text:p>2-Keep</text:p>
          </table:table-cell>
          <table:table-cell office:value-type="string" office:string-value="Active - Last commit was within the last 12 months (5 months ago).">
            <text:p>Active - Last commit was within the last 12 months (5 months ago).</text:p>
          </table:table-cell>
          <table:table-cell office:value-type="string" office:string-value="">
            <text:p/>
          </table:table-cell>
          <table:table-cell office:value-type="string" office:string-value="">
            <text:p/>
          </table:table-cell>
          <table:table-cell office:value-type="string" office:string-value="bt-servant-engine-data-loaders">
            <text:p>bt-servant-engine-data-load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kb-worker">
            <text:p>unfoldingWord/bt-servant-kb-worker</text:p>
          </table:table-cell>
          <table:table-cell office:value-type="string" office:string-value="https://github.com/unfoldingWord/bt-servant-kb-worker">
            <text:p>https://github.com/unfoldingWord/bt-servant-kb-worker</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3-14T00:09:58Z">
            <text:p>2026-03-14T00:09:58Z</text:p>
          </table:table-cell>
          <table:table-cell office:value-type="string" office:string-value="2026-03-14T00:09:58Z">
            <text:p>2026-03-14T00:09:58Z</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4T00:10:02Z">
            <text:p>2026-03-14T00:10:02Z</text:p>
          </table:table-cell>
          <table:table-cell office:value-type="string" office:string-value="unfoldingWord/bt-servant-kb-worker">
            <text:p>unfoldingWord/bt-servant-kb-worker</text:p>
          </table:table-cell>
          <table:table-cell office:value-type="string" office:string-value="https://github.com/unfoldingWord/bt-servant-kb-worker">
            <text:p>https://github.com/unfoldingWord/bt-servant-kb-worker</text:p>
          </table:table-cell>
          <table:table-cell office:value-type="string" office:string-value="2-Keep">
            <text:p>2-Keep</text:p>
          </table:table-cell>
          <table:table-cell office:value-type="string" office:string-value="Active - Last commit was within the last 12 months (3 months ago).">
            <text:p>Active - Last commit was within the last 12 months (3 months ago).</text:p>
          </table:table-cell>
          <table:table-cell office:value-type="string" office:string-value="">
            <text:p/>
          </table:table-cell>
          <table:table-cell office:value-type="string" office:string-value="">
            <text:p/>
          </table:table-cell>
          <table:table-cell office:value-type="string" office:string-value="bt-servant-kb-worker">
            <text:p>bt-servant-kb-wor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log-viewer">
            <text:p>unfoldingWord/bt-servant-log-viewer</text:p>
          </table:table-cell>
          <table:table-cell office:value-type="string" office:string-value="https://github.com/unfoldingWord/bt-servant-log-viewer">
            <text:p>https://github.com/unfoldingWord/bt-servant-log-viewer</text:p>
          </table:table-cell>
          <table:table-cell office:value-type="string" office:string-value="Svelte">
            <text:p>Svelte</text:p>
          </table:table-cell>
          <table:table-cell office:value-type="string" office:string-value="False">
            <text:p>False</text:p>
          </table:table-cell>
          <table:table-cell office:value-type="string" office:string-value="False">
            <text:p>False</text:p>
          </table:table-cell>
          <table:table-cell office:value-type="string" office:string-value="2026-01-16T23:13:39Z">
            <text:p>2026-01-16T23:13:39Z</text:p>
          </table:table-cell>
          <table:table-cell office:value-type="string" office:string-value="2026-01-16T23:13:06Z">
            <text:p>2026-01-16T23:13:06Z</text:p>
          </table:table-cell>
          <table:table-cell office:value-type="string" office:string-value="">
            <text:p/>
          </table:table-cell>
          <table:table-cell office:value-type="string" office:string-value="">
            <text:p/>
          </table:table-cell>
          <table:table-cell office:value-type="string" office:string-value="['claude', 'ILindsley', 'IanLindsley', 'codex', 'Codex Assistant']">
            <text:p>['claude', 'ILindsley', 'IanLindsley', 'codex', 'Codex Assistant']</text:p>
          </table:table-cell>
          <table:table-cell office:value-type="string" office:string-value="2">
            <text:p>2</text:p>
          </table:table-cell>
          <table:table-cell office:value-type="string" office:string-value="0">
            <text:p>0</text:p>
          </table:table-cell>
          <table:table-cell office:value-type="string" office:string-value="148">
            <text:p>14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1-16T23:13:43Z">
            <text:p>2026-01-16T23:13:43Z</text:p>
          </table:table-cell>
          <table:table-cell office:value-type="string" office:string-value="unfoldingWord/bt-servant-log-viewer">
            <text:p>unfoldingWord/bt-servant-log-viewer</text:p>
          </table:table-cell>
          <table:table-cell office:value-type="string" office:string-value="https://github.com/unfoldingWord/bt-servant-log-viewer">
            <text:p>https://github.com/unfoldingWord/bt-servant-log-viewer</text:p>
          </table:table-cell>
          <table:table-cell office:value-type="string" office:string-value="2-Keep">
            <text:p>2-Keep</text:p>
          </table:table-cell>
          <table:table-cell office:value-type="string" office:string-value="Active - Last commit was within the last 12 months (5 months ago).">
            <text:p>Active - Last commit was within the last 12 months (5 months ago).</text:p>
          </table:table-cell>
          <table:table-cell office:value-type="string" office:string-value="">
            <text:p/>
          </table:table-cell>
          <table:table-cell office:value-type="string" office:string-value="">
            <text:p/>
          </table:table-cell>
          <table:table-cell office:value-type="string" office:string-value="bt-servant-log-viewer">
            <text:p>bt-servant-log-view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message-broker">
            <text:p>unfoldingWord/bt-servant-message-broker</text:p>
          </table:table-cell>
          <table:table-cell office:value-type="string" office:string-value="https://github.com/unfoldingWord/bt-servant-message-broker">
            <text:p>https://github.com/unfoldingWord/bt-servant-message-brok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20T00:14:28Z">
            <text:p>2026-02-20T00:14:28Z</text:p>
          </table:table-cell>
          <table:table-cell office:value-type="string" office:string-value="2026-02-20T00:13:37Z">
            <text:p>2026-02-20T00:13:37Z</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1">
            <text:p>1</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20T00:14:18Z">
            <text:p>2026-02-20T00:14:18Z</text:p>
          </table:table-cell>
          <table:table-cell office:value-type="string" office:string-value="unfoldingWord/bt-servant-message-broker">
            <text:p>unfoldingWord/bt-servant-message-broker</text:p>
          </table:table-cell>
          <table:table-cell office:value-type="string" office:string-value="https://github.com/unfoldingWord/bt-servant-message-broker">
            <text:p>https://github.com/unfoldingWord/bt-servant-message-broker</text:p>
          </table:table-cell>
          <table:table-cell office:value-type="string" office:string-value="2-Keep">
            <text:p>2-Keep</text:p>
          </table:table-cell>
          <table:table-cell office:value-type="string" office:string-value="Active - Last commit was within the last 12 months (4 months ago).">
            <text:p>Active - Last commit was within the last 12 months (4 months ago).</text:p>
          </table:table-cell>
          <table:table-cell office:value-type="string" office:string-value="">
            <text:p/>
          </table:table-cell>
          <table:table-cell office:value-type="string" office:string-value="">
            <text:p/>
          </table:table-cell>
          <table:table-cell office:value-type="string" office:string-value="bt-servant-message-broker">
            <text:p>bt-servant-message-bro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report-sender">
            <text:p>unfoldingWord/bt-servant-report-sender</text:p>
          </table:table-cell>
          <table:table-cell office:value-type="string" office:string-value="https://github.com/unfoldingWord/bt-servant-report-sender">
            <text:p>https://github.com/unfoldingWord/bt-servant-report-send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7T16:47:37Z">
            <text:p>2025-12-17T16:47:37Z</text:p>
          </table:table-cell>
          <table:table-cell office:value-type="string" office:string-value="2025-12-17T16:47:32Z">
            <text:p>2025-12-17T16:47:32Z</text:p>
          </table:table-cell>
          <table:table-cell office:value-type="string" office:string-value="">
            <text:p/>
          </table:table-cell>
          <table:table-cell office:value-type="string" office:string-value="">
            <text:p/>
          </table:table-cell>
          <table:table-cell office:value-type="string" office:string-value="['claude', 'IanLindsley', 'ILindsley']">
            <text:p>['claude', 'IanLindsley', 'ILindsley']</text:p>
          </table:table-cell>
          <table:table-cell office:value-type="string" office:string-value="0">
            <text:p>0</text:p>
          </table:table-cell>
          <table:table-cell office:value-type="string" office:string-value="0">
            <text:p>0</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17T16:47:41Z">
            <text:p>2025-12-17T16:47:41Z</text:p>
          </table:table-cell>
          <table:table-cell office:value-type="string" office:string-value="unfoldingWord/bt-servant-report-sender">
            <text:p>unfoldingWord/bt-servant-report-sender</text:p>
          </table:table-cell>
          <table:table-cell office:value-type="string" office:string-value="https://github.com/unfoldingWord/bt-servant-report-sender">
            <text:p>https://github.com/unfoldingWord/bt-servant-report-sender</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
            <text:p/>
          </table:table-cell>
          <table:table-cell office:value-type="string" office:string-value="">
            <text:p/>
          </table:table-cell>
          <table:table-cell office:value-type="string" office:string-value="bt-servant-report-sender">
            <text:p>bt-servant-report-sen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signal-gateway">
            <text:p>unfoldingWord/bt-servant-signal-gateway</text:p>
          </table:table-cell>
          <table:table-cell office:value-type="string" office:string-value="https://github.com/unfoldingWord/bt-servant-signal-gateway">
            <text:p>https://github.com/unfoldingWord/bt-servant-signal-gateway</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23T17:00:04Z">
            <text:p>2026-06-23T17:00:04Z</text:p>
          </table:table-cell>
          <table:table-cell office:value-type="string" office:string-value="2026-06-23T12:41:19Z">
            <text:p>2026-06-23T12:41:19Z</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10">
            <text:p>10</text:p>
          </table:table-cell>
          <table:table-cell office:value-type="string" office:string-value="4">
            <text:p>4</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3T12:41:30Z">
            <text:p>2026-06-23T12:41:30Z</text:p>
          </table:table-cell>
          <table:table-cell office:value-type="string" office:string-value="unfoldingWord/bt-servant-signal-gateway">
            <text:p>unfoldingWord/bt-servant-signal-gateway</text:p>
          </table:table-cell>
          <table:table-cell office:value-type="string" office:string-value="https://github.com/unfoldingWord/bt-servant-signal-gateway">
            <text:p>https://github.com/unfoldingWord/bt-servant-signal-gateway</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bt-servant-signal-gateway">
            <text:p>bt-servant-signal-gatewa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site">
            <text:p>unfoldingWord/bt-servant-site</text:p>
          </table:table-cell>
          <table:table-cell office:value-type="string" office:string-value="https://github.com/unfoldingWord/bt-servant-site">
            <text:p>https://github.com/unfoldingWord/bt-servant-site</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22T13:50:36Z">
            <text:p>2026-06-22T13:50:36Z</text:p>
          </table:table-cell>
          <table:table-cell office:value-type="string" office:string-value="2026-06-22T13:50:35Z">
            <text:p>2026-06-22T13:50:35Z</text:p>
          </table:table-cell>
          <table:table-cell office:value-type="string" office:string-value="">
            <text:p/>
          </table:table-cell>
          <table:table-cell office:value-type="string" office:string-value="">
            <text:p/>
          </table:table-cell>
          <table:table-cell office:value-type="string" office:string-value="['BincyJ', 'sethstoll3']">
            <text:p>['BincyJ', 'sethstoll3']</text:p>
          </table:table-cell>
          <table:table-cell office:value-type="string" office:string-value="1">
            <text:p>1</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2T13:51:05Z">
            <text:p>2026-06-22T13:51:05Z</text:p>
          </table:table-cell>
          <table:table-cell office:value-type="string" office:string-value="unfoldingWord/bt-servant-site">
            <text:p>unfoldingWord/bt-servant-site</text:p>
          </table:table-cell>
          <table:table-cell office:value-type="string" office:string-value="https://github.com/unfoldingWord/bt-servant-site">
            <text:p>https://github.com/unfoldingWord/bt-servant-site</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bt-servant-site">
            <text:p>bt-servant-s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telegram-gateway">
            <text:p>unfoldingWord/bt-servant-telegram-gateway</text:p>
          </table:table-cell>
          <table:table-cell office:value-type="string" office:string-value="https://github.com/unfoldingWord/bt-servant-telegram-gateway">
            <text:p>https://github.com/unfoldingWord/bt-servant-telegram-gateway</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17T21:02:59Z">
            <text:p>2026-06-17T21:02:59Z</text:p>
          </table:table-cell>
          <table:table-cell office:value-type="string" office:string-value="2026-06-17T21:01:39Z">
            <text:p>2026-06-17T21:01:39Z</text:p>
          </table:table-cell>
          <table:table-cell office:value-type="string" office:string-value="">
            <text:p/>
          </table:table-cell>
          <table:table-cell office:value-type="string" office:string-value="DenisArger/bt-servant-telegram-gateway">
            <text:p>DenisArger/bt-servant-telegram-gateway</text:p>
          </table:table-cell>
          <table:table-cell office:value-type="string" office:string-value="['DenisArger', 'IanLindsley', 'claude', 'ILindsley']">
            <text:p>['DenisArger', 'IanLindsley', 'claude', 'ILindsley']</text:p>
          </table:table-cell>
          <table:table-cell office:value-type="string" office:string-value="2">
            <text:p>2</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telegram-gateway">
            <text:p>bt-servant-telegram-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21:01:45Z">
            <text:p>2026-06-17T21:01:45Z</text:p>
          </table:table-cell>
          <table:table-cell office:value-type="string" office:string-value="unfoldingWord/bt-servant-telegram-gateway">
            <text:p>unfoldingWord/bt-servant-telegram-gateway</text:p>
          </table:table-cell>
          <table:table-cell office:value-type="string" office:string-value="https://github.com/unfoldingWord/bt-servant-telegram-gateway">
            <text:p>https://github.com/unfoldingWord/bt-servant-telegram-gatewa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bt-servant-telegram-gateway">
            <text:p>bt-servant-telegram-gatewa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telemetry">
            <text:p>unfoldingWord/bt-servant-telemetry</text:p>
          </table:table-cell>
          <table:table-cell office:value-type="string" office:string-value="https://github.com/unfoldingWord/bt-servant-telemetry">
            <text:p>https://github.com/unfoldingWord/bt-servant-telemetr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4:16:52Z">
            <text:p>2026-06-10T14:16:52Z</text:p>
          </table:table-cell>
          <table:table-cell office:value-type="string" office:string-value="2026-06-10T14:14:55Z">
            <text:p>2026-06-10T14:14:55Z</text:p>
          </table:table-cell>
          <table:table-cell office:value-type="string" office:string-value="">
            <text:p/>
          </table:table-cell>
          <table:table-cell office:value-type="string" office:string-value="">
            <text:p/>
          </table:table-cell>
          <table:table-cell office:value-type="string" office:string-value="['IanLindsley', 'claude', 'ILindsley']">
            <text:p>['IanLindsley', 'claude', 'ILindsley']</text:p>
          </table:table-cell>
          <table:table-cell office:value-type="string" office:string-value="8">
            <text:p>8</text:p>
          </table:table-cell>
          <table:table-cell office:value-type="string" office:string-value="0">
            <text:p>0</text:p>
          </table:table-cell>
          <table:table-cell office:value-type="string" office:string-value="28">
            <text:p>2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telemetry">
            <text:p>bt-servant-telemet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0T14:19:53Z">
            <text:p>2026-06-10T14:19:53Z</text:p>
          </table:table-cell>
          <table:table-cell office:value-type="string" office:string-value="unfoldingWord/bt-servant-telemetry">
            <text:p>unfoldingWord/bt-servant-telemetry</text:p>
          </table:table-cell>
          <table:table-cell office:value-type="string" office:string-value="https://github.com/unfoldingWord/bt-servant-telemetry">
            <text:p>https://github.com/unfoldingWord/bt-servant-telemetry</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t-servant-telemetry">
            <text:p>bt-servant-telemetr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web-client">
            <text:p>unfoldingWord/bt-servant-web-client</text:p>
          </table:table-cell>
          <table:table-cell office:value-type="string" office:string-value="https://github.com/unfoldingWord/bt-servant-web-client">
            <text:p>https://github.com/unfoldingWord/bt-servant-web-client</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4:44:49Z">
            <text:p>2026-06-18T14:44:49Z</text:p>
          </table:table-cell>
          <table:table-cell office:value-type="string" office:string-value="2026-06-18T14:44:06Z">
            <text:p>2026-06-18T14:44:06Z</text:p>
          </table:table-cell>
          <table:table-cell office:value-type="string" office:string-value="">
            <text:p/>
          </table:table-cell>
          <table:table-cell office:value-type="string" office:string-value="">
            <text:p/>
          </table:table-cell>
          <table:table-cell office:value-type="string" office:string-value="['ILindsley', 'IanLindsley', 'claude', 'sethstoll3']">
            <text:p>['ILindsley', 'IanLindsley', 'claude', 'sethstoll3']</text:p>
          </table:table-cell>
          <table:table-cell office:value-type="string" office:string-value="7">
            <text:p>7</text:p>
          </table:table-cell>
          <table:table-cell office:value-type="string" office:string-value="1">
            <text:p>1</text:p>
          </table:table-cell>
          <table:table-cell office:value-type="string" office:string-value="153">
            <text:p>15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web-client">
            <text:p>bt-servant-web-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14:44:48Z">
            <text:p>2026-06-18T14:44:48Z</text:p>
          </table:table-cell>
          <table:table-cell office:value-type="string" office:string-value="unfoldingWord/bt-servant-web-client">
            <text:p>unfoldingWord/bt-servant-web-client</text:p>
          </table:table-cell>
          <table:table-cell office:value-type="string" office:string-value="https://github.com/unfoldingWord/bt-servant-web-client">
            <text:p>https://github.com/unfoldingWord/bt-servant-web-client</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t-servant-web-client">
            <text:p>bt-servant-web-cli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whatsapp-gateway">
            <text:p>unfoldingWord/bt-servant-whatsapp-gateway</text:p>
          </table:table-cell>
          <table:table-cell office:value-type="string" office:string-value="https://github.com/unfoldingWord/bt-servant-whatsapp-gateway">
            <text:p>https://github.com/unfoldingWord/bt-servant-whatsapp-gatewa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7T17:56:52Z">
            <text:p>2026-06-17T17:56:52Z</text:p>
          </table:table-cell>
          <table:table-cell office:value-type="string" office:string-value="2026-06-17T17:56:48Z">
            <text:p>2026-06-17T17:56:48Z</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9">
            <text:p>9</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whatsapp-gateway">
            <text:p>bt-servant-whatsapp-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18:00:01Z">
            <text:p>2026-06-17T18:00:01Z</text:p>
          </table:table-cell>
          <table:table-cell office:value-type="string" office:string-value="unfoldingWord/bt-servant-whatsapp-gateway">
            <text:p>unfoldingWord/bt-servant-whatsapp-gateway</text:p>
          </table:table-cell>
          <table:table-cell office:value-type="string" office:string-value="https://github.com/unfoldingWord/bt-servant-whatsapp-gateway">
            <text:p>https://github.com/unfoldingWord/bt-servant-whatsapp-gateway</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t-servant-whatsapp-gateway">
            <text:p>bt-servant-whatsapp-gatewa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worker">
            <text:p>unfoldingWord/bt-servant-worker</text:p>
          </table:table-cell>
          <table:table-cell office:value-type="string" office:string-value="https://github.com/unfoldingWord/bt-servant-worker">
            <text:p>https://github.com/unfoldingWord/bt-servant-work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5:02:07Z">
            <text:p>2026-06-18T15:02:07Z</text:p>
          </table:table-cell>
          <table:table-cell office:value-type="string" office:string-value="2026-06-18T15:01:38Z">
            <text:p>2026-06-18T15:01:38Z</text:p>
          </table:table-cell>
          <table:table-cell office:value-type="string" office:string-value="">
            <text:p/>
          </table:table-cell>
          <table:table-cell office:value-type="string" office:string-value="">
            <text:p/>
          </table:table-cell>
          <table:table-cell office:value-type="string" office:string-value="['claude', 'IanLindsley', 'ILindsley', 'deferredreward', 'sethstoll3']">
            <text:p>['claude', 'IanLindsley', 'ILindsley', 'deferredreward', 'sethstoll3']</text:p>
          </table:table-cell>
          <table:table-cell office:value-type="string" office:string-value="105">
            <text:p>105</text:p>
          </table:table-cell>
          <table:table-cell office:value-type="string" office:string-value="9">
            <text:p>9</text:p>
          </table:table-cell>
          <table:table-cell office:value-type="string" office:string-value="238">
            <text:p>23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worker">
            <text:p>bt-servan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15:03:36Z">
            <text:p>2026-06-18T15:03:36Z</text:p>
          </table:table-cell>
          <table:table-cell office:value-type="string" office:string-value="unfoldingWord/bt-servant-worker">
            <text:p>unfoldingWord/bt-servant-worker</text:p>
          </table:table-cell>
          <table:table-cell office:value-type="string" office:string-value="https://github.com/unfoldingWord/bt-servant-worker">
            <text:p>https://github.com/unfoldingWord/bt-servant-worker</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t-servant-worker">
            <text:p>bt-servant-wor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checking-extension">
            <text:p>unfoldingWord-box3/checking-extension</text:p>
          </table:table-cell>
          <table:table-cell office:value-type="string" office:string-value="https://github.com/unfoldingWord-box3/checking-extension">
            <text:p>https://github.com/unfoldingWord-box3/checking-extension</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5-10-16T15:12:47Z">
            <text:p>2025-10-16T15:12:47Z</text:p>
          </table:table-cell>
          <table:table-cell office:value-type="string" office:string-value="2025-10-16T15:12:47Z">
            <text:p>2025-10-16T15:12:47Z</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PhotoNomad0', 'kintsoogi']">
            <text:p>['PhotoNomad0', 'kintsoogi']</text:p>
          </table:table-cell>
          <table:table-cell office:value-type="string" office:string-value="2">
            <text:p>2</text:p>
          </table:table-cell>
          <table:table-cell office:value-type="string" office:string-value="2">
            <text:p>2</text:p>
          </table:table-cell>
          <table:table-cell office:value-type="string" office:string-value="160">
            <text:p>160</text:p>
          </table:table-cell>
          <table:table-cell office:value-type="string" office:string-value="">
            <text:p/>
          </table:table-cell>
          <table:table-cell office:value-type="string" office:string-value="">
            <text:p/>
          </table:table-cell>
          <table:table-cell office:value-type="string" office:string-value="66">
            <text:p>66</text:p>
          </table:table-cell>
          <table:table-cell office:value-type="string" office:string-value="4">
            <text:p>4</text:p>
          </table:table-cell>
          <table:table-cell office:value-type="string" office:string-value="checking-extension">
            <text:p>checking-extens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string-punctuation-tokenizer', 'tc-source-content-updater', 'tsv-groupdata-parser', 'usfm-js', 'uw-tsv-parser', 'wordmap-lexer']">
            <text:p>['bible-reference-range', 'string-punctuation-tokenizer', 'tc-source-content-updater', 'tsv-groupdata-parser', 'usfm-js', 'uw-tsv-parser', 'wordmap-lexer']</text:p>
          </table:table-cell>
          <table:table-cell office:value-type="string" office:string-value="2025-10-16T15:12:53Z">
            <text:p>2025-10-16T15:12:53Z</text:p>
          </table:table-cell>
          <table:table-cell office:value-type="string" office:string-value="unfoldingWord-box3/checking-extension">
            <text:p>unfoldingWord-box3/checking-extension</text:p>
          </table:table-cell>
          <table:table-cell office:value-type="string" office:string-value="https://github.com/unfoldingWord-box3/checking-extension">
            <text:p>https://github.com/unfoldingWord-box3/checking-extensi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checking-extension">
            <text:p>checking-extensio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checking-tool-rcl">
            <text:p>unfoldingWord/checking-tool-rcl</text:p>
          </table:table-cell>
          <table:table-cell office:value-type="string" office:string-value="https://github.com/unfoldingWord/checking-tool-rcl">
            <text:p>https://github.com/unfoldingWord/checking-tool-rcl</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5-10-30T11:33:32Z">
            <text:p>2025-10-30T11:33:32Z</text:p>
          </table:table-cell>
          <table:table-cell office:value-type="string" office:string-value="2025-10-20T15:57:27Z">
            <text:p>2025-10-20T15:57:27Z</text:p>
          </table:table-cell>
          <table:table-cell office:value-type="string" office:string-value="">
            <text:p/>
          </table:table-cell>
          <table:table-cell office:value-type="string" office:string-value="unfoldingWord/word-aligner-rcl">
            <text:p>unfoldingWord/word-aligner-rcl</text:p>
          </table:table-cell>
          <table:table-cell office:value-type="string" office:string-value="['PhotoNomad0', 'jincypjose']">
            <text:p>['PhotoNomad0', 'jincypjose']</text:p>
          </table:table-cell>
          <table:table-cell office:value-type="string" office:string-value="15">
            <text:p>15</text:p>
          </table:table-cell>
          <table:table-cell office:value-type="string" office:string-value="4">
            <text:p>4</text:p>
          </table:table-cell>
          <table:table-cell office:value-type="string" office:string-value="108">
            <text:p>10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tool-rcl">
            <text:p>checking-tool-rcl</text:p>
          </table:table-cell>
          <table:table-cell office:value-type="string" office:string-value="https://www.npmjs.com/package/checking-tool-rcl">
            <text:p>https://www.npmjs.com/package/checking-tool-rcl</text:p>
          </table:table-cell>
          <table:table-cell office:value-type="string" office:string-value="False">
            <text:p>False</text:p>
          </table:table-cell>
          <table:table-cell office:value-type="string" office:string-value="6065">
            <text:p>6065</text:p>
          </table:table-cell>
          <table:table-cell office:value-type="string" office:string-value="2025-10-20T15:58:23.259Z">
            <text:p>2025-10-20T15:58:23.259Z</text:p>
          </table:table-cell>
          <table:table-cell office:value-type="string" office:string-value="">
            <text:p/>
          </table:table-cell>
          <table:table-cell office:value-type="string" office:string-value="['bible-reference-range', 'string-punctuation-tokenizer', 'tc-strings', 'usfm-js', 'uw-tsv-parser', 'word-aligner', 'word-aligner-lib', 'wordmap-lexer', 'tc-source-content-updater', 'tsv-groupdata-parser']">
            <text:p>['bible-reference-range', 'string-punctuation-tokenizer', 'tc-strings', 'usfm-js', 'uw-tsv-parser', 'word-aligner', 'word-aligner-lib', 'wordmap-lexer', 'tc-source-content-updater', 'tsv-groupdata-parser']</text:p>
          </table:table-cell>
          <table:table-cell office:value-type="string" office:string-value="2025-10-20T15:57:32Z">
            <text:p>2025-10-20T15:57:32Z</text:p>
          </table:table-cell>
          <table:table-cell office:value-type="string" office:string-value="unfoldingWord/checking-tool-rcl">
            <text:p>unfoldingWord/checking-tool-rcl</text:p>
          </table:table-cell>
          <table:table-cell office:value-type="string" office:string-value="https://github.com/unfoldingWord/checking-tool-rcl">
            <text:p>https://github.com/unfoldingWord/checking-tool-rcl</text:p>
          </table:table-cell>
          <table:table-cell office:value-type="string" office:string-value="2-Keep">
            <text:p>2-Keep</text:p>
          </table:table-cell>
          <table:table-cell office:value-type="string" office:string-value="externally used - Repository has GitHub dependents or at least 1,000 npm downloads in the last year (6065 downloads).">
            <text:p>externally used - Repository has GitHub dependents or at least 1,000 npm downloads in the last year (606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065 downloads in the last year).">
            <text:p>Package has detected local usage, GitHub dependents, or significant npm downloads (6065 downloads in the last year).</text:p>
          </table:table-cell>
          <table:table-cell office:value-type="string" office:string-value="checking-tool-rcl">
            <text:p>checking-tool-rcl</text:p>
          </table:table-cell>
          <table:table-cell office:value-type="string" office:string-value="unfoldingWord">
            <text:p>unfoldingWord</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x">
            <text:p>x</text:p>
          </table:table-cell>
          <table:table-cell office:value-type="string" office:string-value="Used in tCore">
            <text:p>Used in tCore</text:p>
          </table:table-cell>
          <table:table-cell office:value-type="string" office:string-value="unfoldingWord/checking-tool-wrapper">
            <text:p>unfoldingWord/checking-tool-wrapper</text:p>
          </table:table-cell>
          <table:table-cell office:value-type="string" office:string-value="https://github.com/unfoldingWord/checking-tool-wrapper">
            <text:p>https://github.com/unfoldingWord/checking-tool-wrapp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48:38Z">
            <text:p>2026-01-21T23:48:38Z</text:p>
          </table:table-cell>
          <table:table-cell office:value-type="string" office:string-value="2024-12-06T22:02:10Z">
            <text:p>2024-12-06T22:02:10Z</text:p>
          </table:table-cell>
          <table:table-cell office:value-type="string" office:string-value="2021-06-29T21:55:08Z">
            <text:p>2021-06-29T21:55:08Z</text:p>
          </table:table-cell>
          <table:table-cell office:value-type="string" office:string-value="">
            <text:p/>
          </table:table-cell>
          <table:table-cell office:value-type="string" office:string-value="['mannycolon', 'PhotoNomad0', 'RoyalSix', 'da1nerd', 'richmahn', 'Sterling (Jay) Scott', 'dependabot[bot]']">
            <text:p>['mannycolon', 'PhotoNomad0', 'RoyalSix', 'da1nerd', 'richmahn', 'Sterling (Jay) Scott', 'dependabot[bot]']</text:p>
          </table:table-cell>
          <table:table-cell office:value-type="string" office:string-value="18">
            <text:p>18</text:p>
          </table:table-cell>
          <table:table-cell office:value-type="string" office:string-value="18">
            <text:p>18</text:p>
          </table:table-cell>
          <table:table-cell office:value-type="string" office:string-value="1251">
            <text:p>125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checking-tool-wrapper">
            <text:p>checking-tool-wrapper</text:p>
          </table:table-cell>
          <table:table-cell office:value-type="string" office:string-value="https://www.npmjs.com/package/checking-tool-wrapper">
            <text:p>https://www.npmjs.com/package/checking-tool-wrapper</text:p>
          </table:table-cell>
          <table:table-cell office:value-type="string" office:string-value="False">
            <text:p>False</text:p>
          </table:table-cell>
          <table:table-cell office:value-type="string" office:string-value="9447">
            <text:p>9447</text:p>
          </table:table-cell>
          <table:table-cell office:value-type="string" office:string-value="2024-03-19T18:58:55.915Z">
            <text:p>2024-03-19T18:58:55.915Z</text:p>
          </table:table-cell>
          <table:table-cell office:value-type="string" office:string-value="['translationCore', 'translationNotes', 'translationWords']">
            <text:p>['translationCore', 'translationNotes', 'translationWords']</text:p>
          </table:table-cell>
          <table:table-cell office:value-type="string" office:string-value="['gogs-client', 'selections', 'string-punctuation-tokenizer', 'tc-tool', 'tc-ui-toolkit', 'usfm-js', 'word-aligner', 'wordmap-lexer', 'tc-strings']">
            <text:p>['gogs-client', 'selections', 'string-punctuation-tokenizer', 'tc-tool', 'tc-ui-toolkit', 'usfm-js', 'word-aligner', 'wordmap-lexer', 'tc-strings']</text:p>
          </table:table-cell>
          <table:table-cell office:value-type="string" office:string-value="2024-12-06T22:02:15Z">
            <text:p>2024-12-06T22:02:15Z</text:p>
          </table:table-cell>
          <table:table-cell office:value-type="string" office:string-value="unfoldingWord/checking-tool-wrapper">
            <text:p>unfoldingWord/checking-tool-wrapper</text:p>
          </table:table-cell>
          <table:table-cell office:value-type="string" office:string-value="https://github.com/unfoldingWord/checking-tool-wrapper">
            <text:p>https://github.com/unfoldingWord/checking-tool-wrapper</text:p>
          </table:table-cell>
          <table:table-cell office:value-type="string" office:string-value="2-Keep">
            <text:p>2-Keep</text:p>
          </table:table-cell>
          <table:table-cell office:value-type="string" office:string-value="externally used - Repository has GitHub dependents or at least 1,000 npm downloads in the last year (9447 downloads).">
            <text:p>externally used - Repository has GitHub dependents or at least 1,000 npm downloads in the last year (944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447 downloads in the last year).">
            <text:p>Package has detected local usage, GitHub dependents, or significant npm downloads (9447 downloads in the last year).</text:p>
          </table:table-cell>
          <table:table-cell office:value-type="string" office:string-value="checking-tool-wrapper">
            <text:p>checking-tool-wrapp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claude_security_sentinel">
            <text:p>unfoldingWord/claude_security_sentinel</text:p>
          </table:table-cell>
          <table:table-cell office:value-type="string" office:string-value="https://github.com/unfoldingWord/claude_security_sentinel">
            <text:p>https://github.com/unfoldingWord/claude_security_sentinel</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02T19:57:42Z">
            <text:p>2026-03-02T19:57:42Z</text:p>
          </table:table-cell>
          <table:table-cell office:value-type="string" office:string-value="2026-03-02T19:57:32Z">
            <text:p>2026-03-02T19:57:32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22T15:02:16Z">
            <text:p>2026-05-22T15:02:16Z</text:p>
          </table:table-cell>
          <table:table-cell office:value-type="string" office:string-value="unfoldingWord/claude_security_sentinel">
            <text:p>unfoldingWord/claude_security_sentinel</text:p>
          </table:table-cell>
          <table:table-cell office:value-type="string" office:string-value="https://github.com/unfoldingWord/claude_security_sentinel">
            <text:p>https://github.com/unfoldingWord/claude_security_sentinel</text:p>
          </table:table-cell>
          <table:table-cell office:value-type="string" office:string-value="2-Keep">
            <text:p>2-Keep</text:p>
          </table:table-cell>
          <table:table-cell office:value-type="string" office:string-value="Active - Last commit was within the last 12 months (3 months ago).">
            <text:p>Active - Last commit was within the last 12 months (3 months ago).</text:p>
          </table:table-cell>
          <table:table-cell office:value-type="string" office:string-value="">
            <text:p/>
          </table:table-cell>
          <table:table-cell office:value-type="string" office:string-value="">
            <text:p/>
          </table:table-cell>
          <table:table-cell office:value-type="string" office:string-value="claude_security_sentinel">
            <text:p>claude_security_sentine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cloudfront_logprocessor">
            <text:p>unfoldingWord/cloudfront_logprocessor</text:p>
          </table:table-cell>
          <table:table-cell office:value-type="string" office:string-value="https://github.com/unfoldingWord/cloudfront_logprocessor">
            <text:p>https://github.com/unfoldingWord/cloudfront_logprocesso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3:05Z">
            <text:p>2026-06-03T15:53:05Z</text:p>
          </table:table-cell>
          <table:table-cell office:value-type="string" office:string-value="2026-06-03T15:53:04Z">
            <text:p>2026-06-03T15:53:04Z</text:p>
          </table:table-cell>
          <table:table-cell office:value-type="string" office:string-value="">
            <text:p/>
          </table:table-cell>
          <table:table-cell office:value-type="string" office:string-value="">
            <text:p/>
          </table:table-cell>
          <table:table-cell office:value-type="string" office:string-value="['Jaap-Jan Swijnenburg', 'yakob-aleksandrovich', 'elgohr', 'richmahn']">
            <text:p>['Jaap-Jan Swijnenburg', 'yakob-aleksandrovich', 'elgohr', 'richmahn']</text:p>
          </table:table-cell>
          <table:table-cell office:value-type="string" office:string-value="0">
            <text:p>0</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3T15:57:01Z">
            <text:p>2026-06-03T15:57:01Z</text:p>
          </table:table-cell>
          <table:table-cell office:value-type="string" office:string-value="unfoldingWord/cloudfront_logprocessor">
            <text:p>unfoldingWord/cloudfront_logprocessor</text:p>
          </table:table-cell>
          <table:table-cell office:value-type="string" office:string-value="https://github.com/unfoldingWord/cloudfront_logprocessor">
            <text:p>https://github.com/unfoldingWord/cloudfront_logprocessor</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cloudfront_logprocessor">
            <text:p>cloudfront_logprocess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concourse-pipeline">
            <text:p>unfoldingWord-dev/concourse-pipeline</text:p>
          </table:table-cell>
          <table:table-cell office:value-type="string" office:string-value="https://github.com/unfoldingWord-dev/concourse-pipeline">
            <text:p>https://github.com/unfoldingWord-dev/concourse-pipeline</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3-08-12T13:51:37Z">
            <text:p>2023-08-12T13:51:37Z</text:p>
          </table:table-cell>
          <table:table-cell office:value-type="string" office:string-value="2023-08-12T13:51:37Z">
            <text:p>2023-08-12T13:51:37Z</text:p>
          </table:table-cell>
          <table:table-cell office:value-type="string" office:string-value="">
            <text:p/>
          </table:table-cell>
          <table:table-cell office:value-type="string" office:string-value="da1nerd/concourse-tasks">
            <text:p>da1nerd/concourse-tasks</text:p>
          </table:table-cell>
          <table:table-cell office:value-type="string" office:string-value="['da1nerd', 'PhotoNomad0', 'mannycolon', 'jag3773']">
            <text:p>['da1nerd', 'PhotoNomad0', 'mannycolon', 'jag3773']</text:p>
          </table:table-cell>
          <table:table-cell office:value-type="string" office:string-value="0">
            <text:p>0</text:p>
          </table:table-cell>
          <table:table-cell office:value-type="string" office:string-value="0">
            <text:p>0</text:p>
          </table:table-cell>
          <table:table-cell office:value-type="string" office:string-value="254">
            <text:p>25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12T13:51:42Z">
            <text:p>2023-08-12T13:51:42Z</text:p>
          </table:table-cell>
          <table:table-cell office:value-type="string" office:string-value="unfoldingWord-dev/concourse-pipeline">
            <text:p>unfoldingWord-dev/concourse-pipeline</text:p>
          </table:table-cell>
          <table:table-cell office:value-type="string" office:string-value="https://github.com/unfoldingWord-dev/concourse-pipeline">
            <text:p>https://github.com/unfoldingWord-dev/concourse-pipeline</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concourse-pipeline">
            <text:p>concourse-pipelin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cyber-security-report">
            <text:p>unfoldingWord/cyber-security-report</text:p>
          </table:table-cell>
          <table:table-cell office:value-type="string" office:string-value="https://github.com/unfoldingWord/cyber-security-report">
            <text:p>https://github.com/unfoldingWord/cyber-security-repor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8T09:01:31Z">
            <text:p>2026-06-18T09:01:31Z</text:p>
          </table:table-cell>
          <table:table-cell office:value-type="string" office:string-value="2026-06-18T09:01:18Z">
            <text:p>2026-06-18T09:01:18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09:01:44Z">
            <text:p>2026-06-18T09:01:44Z</text:p>
          </table:table-cell>
          <table:table-cell office:value-type="string" office:string-value="unfoldingWord/cyber-security-report">
            <text:p>unfoldingWord/cyber-security-report</text:p>
          </table:table-cell>
          <table:table-cell office:value-type="string" office:string-value="https://github.com/unfoldingWord/cyber-security-report">
            <text:p>https://github.com/unfoldingWord/cyber-security-report</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cyber-security-report">
            <text:p>cyber-security-re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ata_tracking_import">
            <text:p>unfoldingWord/data_tracking_import</text:p>
          </table:table-cell>
          <table:table-cell office:value-type="string" office:string-value="https://github.com/unfoldingWord/data_tracking_import">
            <text:p>https://github.com/unfoldingWord/data_tracking_impor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03T19:14:01Z">
            <text:p>2026-02-03T19:14:01Z</text:p>
          </table:table-cell>
          <table:table-cell office:value-type="string" office:string-value="2026-02-03T19:13:59Z">
            <text:p>2026-02-03T19:13:59Z</text:p>
          </table:table-cell>
          <table:table-cell office:value-type="string" office:string-value="">
            <text:p/>
          </table:table-cell>
          <table:table-cell office:value-type="string" office:string-value="">
            <text:p/>
          </table:table-cell>
          <table:table-cell office:value-type="string" office:string-value="['yakob-aleksandrovich', 'IanLindsley', 'drcox633']">
            <text:p>['yakob-aleksandrovich', 'IanLindsley', 'drcox633']</text:p>
          </table:table-cell>
          <table:table-cell office:value-type="string" office:string-value="1">
            <text:p>1</text:p>
          </table:table-cell>
          <table:table-cell office:value-type="string" office:string-value="0">
            <text:p>0</text:p>
          </table:table-cell>
          <table:table-cell office:value-type="string" office:string-value="34">
            <text:p>3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03T19:14:08Z">
            <text:p>2026-02-03T19:14:08Z</text:p>
          </table:table-cell>
          <table:table-cell office:value-type="string" office:string-value="unfoldingWord/data_tracking_import">
            <text:p>unfoldingWord/data_tracking_import</text:p>
          </table:table-cell>
          <table:table-cell office:value-type="string" office:string-value="https://github.com/unfoldingWord/data_tracking_import">
            <text:p>https://github.com/unfoldingWord/data_tracking_import</text:p>
          </table:table-cell>
          <table:table-cell office:value-type="string" office:string-value="2-Keep">
            <text:p>2-Keep</text:p>
          </table:table-cell>
          <table:table-cell office:value-type="string" office:string-value="Active - Last commit was within the last 12 months (4 months ago).">
            <text:p>Active - Last commit was within the last 12 months (4 months ago).</text:p>
          </table:table-cell>
          <table:table-cell office:value-type="string" office:string-value="">
            <text:p/>
          </table:table-cell>
          <table:table-cell office:value-type="string" office:string-value="">
            <text:p/>
          </table:table-cell>
          <table:table-cell office:value-type="string" office:string-value="data_tracking_import">
            <text:p>data_tracking_im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ata_tracking_wrangler">
            <text:p>unfoldingWord/data_tracking_wrangler</text:p>
          </table:table-cell>
          <table:table-cell office:value-type="string" office:string-value="https://github.com/unfoldingWord/data_tracking_wrangler">
            <text:p>https://github.com/unfoldingWord/data_tracking_wrangler</text:p>
          </table:table-cell>
          <table:table-cell office:value-type="string" office:string-value="R">
            <text:p>R</text:p>
          </table:table-cell>
          <table:table-cell office:value-type="string" office:string-value="False">
            <text:p>False</text:p>
          </table:table-cell>
          <table:table-cell office:value-type="string" office:string-value="False">
            <text:p>False</text:p>
          </table:table-cell>
          <table:table-cell office:value-type="string" office:string-value="2025-12-02T16:38:51Z">
            <text:p>2025-12-02T16:38:51Z</text:p>
          </table:table-cell>
          <table:table-cell office:value-type="string" office:string-value="2025-12-02T16:38:41Z">
            <text:p>2025-12-02T16:38:41Z</text:p>
          </table:table-cell>
          <table:table-cell office:value-type="string" office:string-value="">
            <text:p/>
          </table:table-cell>
          <table:table-cell office:value-type="string" office:string-value="">
            <text:p/>
          </table:table-cell>
          <table:table-cell office:value-type="string" office:string-value="['yakob-aleksandrovich', 'drcox633', 'Derek Cox']">
            <text:p>['yakob-aleksandrovich', 'drcox633', 'Derek Cox']</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2T16:38:55Z">
            <text:p>2025-12-02T16:38:55Z</text:p>
          </table:table-cell>
          <table:table-cell office:value-type="string" office:string-value="unfoldingWord/data_tracking_wrangler">
            <text:p>unfoldingWord/data_tracking_wrangler</text:p>
          </table:table-cell>
          <table:table-cell office:value-type="string" office:string-value="https://github.com/unfoldingWord/data_tracking_wrangler">
            <text:p>https://github.com/unfoldingWord/data_tracking_wrangler</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
            <text:p/>
          </table:table-cell>
          <table:table-cell office:value-type="string" office:string-value="">
            <text:p/>
          </table:table-cell>
          <table:table-cell office:value-type="string" office:string-value="data_tracking_wrangler">
            <text:p>data_tracking_wrang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atatable-translatable">
            <text:p>unfoldingWord/datatable-translatable</text:p>
          </table:table-cell>
          <table:table-cell office:value-type="string" office:string-value="https://github.com/unfoldingWord/datatable-translatable">
            <text:p>https://github.com/unfoldingWord/datatable-translatabl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05T15:19:12Z">
            <text:p>2026-03-05T15:19:12Z</text:p>
          </table:table-cell>
          <table:table-cell office:value-type="string" office:string-value="2026-03-04T13:44:54Z">
            <text:p>2026-03-04T13:44:54Z</text:p>
          </table:table-cell>
          <table:table-cell office:value-type="string" office:string-value="">
            <text:p/>
          </table:table-cell>
          <table:table-cell office:value-type="string" office:string-value="['Bridgeconn/tc-create-offline', 'RevantCI/uw-lab', 'unfoldingWord-box3/greek-apparatus-app', 'unfoldingWord/tc-create-app']">
            <text:p>['Bridgeconn/tc-create-offline', 'RevantCI/uw-lab', 'unfoldingWord-box3/greek-apparatus-app', 'unfoldingWord/tc-create-app']</text:p>
          </table:table-cell>
          <table:table-cell office:value-type="string" office:string-value="['ancientTexts-net', 'mandolyte', 'Joel-C-Johnson', 'klappy', 'RoyalSix', 'superdav42', 'jincypjose', 'abelpz', 'Sterling (Jay) Scott', 'dependabot[bot]', 'Dave', 'eliaspinero']">
            <text:p>['ancientTexts-net', 'mandolyte', 'Joel-C-Johnson', 'klappy', 'RoyalSix', 'superdav42', 'jincypjose', 'abelpz', 'Sterling (Jay) Scott', 'dependabot[bot]', 'Dave', 'eliaspinero']</text:p>
          </table:table-cell>
          <table:table-cell office:value-type="string" office:string-value="10">
            <text:p>10</text:p>
          </table:table-cell>
          <table:table-cell office:value-type="string" office:string-value="9">
            <text:p>9</text:p>
          </table:table-cell>
          <table:table-cell office:value-type="string" office:string-value="447">
            <text:p>4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atatable-translatable">
            <text:p>datatable-translatable</text:p>
          </table:table-cell>
          <table:table-cell office:value-type="string" office:string-value="https://www.npmjs.com/package/datatable-translatable">
            <text:p>https://www.npmjs.com/package/datatable-translatable</text:p>
          </table:table-cell>
          <table:table-cell office:value-type="string" office:string-value="False">
            <text:p>False</text:p>
          </table:table-cell>
          <table:table-cell office:value-type="string" office:string-value="3510">
            <text:p>3510</text:p>
          </table:table-cell>
          <table:table-cell office:value-type="string" office:string-value="2026-02-02T16:12:05.648Z">
            <text:p>2026-02-02T16:12:05.648Z</text:p>
          </table:table-cell>
          <table:table-cell office:value-type="string" office:string-value="['tc-create-app', 'greek-apparatus-app']">
            <text:p>['tc-create-app', 'greek-apparatus-app']</text:p>
          </table:table-cell>
          <table:table-cell office:value-type="string" office:string-value="['markdown-translatable', '@unfoldingword/eslint-config']">
            <text:p>['markdown-translatable', '@unfoldingword/eslint-config']</text:p>
          </table:table-cell>
          <table:table-cell office:value-type="string" office:string-value="2026-03-04T13:45:00Z">
            <text:p>2026-03-04T13:45:00Z</text:p>
          </table:table-cell>
          <table:table-cell office:value-type="string" office:string-value="unfoldingWord/datatable-translatable">
            <text:p>unfoldingWord/datatable-translatable</text:p>
          </table:table-cell>
          <table:table-cell office:value-type="string" office:string-value="https://github.com/unfoldingWord/datatable-translatable">
            <text:p>https://github.com/unfoldingWord/datatable-translatable</text:p>
          </table:table-cell>
          <table:table-cell office:value-type="string" office:string-value="2-Keep">
            <text:p>2-Keep</text:p>
          </table:table-cell>
          <table:table-cell office:value-type="string" office:string-value="externally used - Repository has GitHub dependents or at least 1,000 npm downloads in the last year (3510 downloads).">
            <text:p>externally used - Repository has GitHub dependents or at least 1,000 npm downloads in the last year (351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510 downloads in the last year).">
            <text:p>Package has detected local usage, GitHub dependents, or significant npm downloads (3510 downloads in the last year).</text:p>
          </table:table-cell>
          <table:table-cell office:value-type="string" office:string-value="datatable-translatable">
            <text:p>datatable-translatabl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bbackupr2">
            <text:p>unfoldingWord/dbbackupr2</text:p>
          </table:table-cell>
          <table:table-cell office:value-type="string" office:string-value="https://github.com/unfoldingWord/dbbackupr2">
            <text:p>https://github.com/unfoldingWord/dbbackupr2</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7T12:19:22Z">
            <text:p>2025-11-27T12:19:22Z</text:p>
          </table:table-cell>
          <table:table-cell office:value-type="string" office:string-value="2025-11-27T12:19:17Z">
            <text:p>2025-11-27T12:19:17Z</text:p>
          </table:table-cell>
          <table:table-cell office:value-type="string" office:string-value="2024-07-09T13:34:50Z">
            <text:p>2024-07-09T13:34:50Z</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9">
            <text:p>9</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1-27T12:19:25Z">
            <text:p>2025-11-27T12:19:25Z</text:p>
          </table:table-cell>
          <table:table-cell office:value-type="string" office:string-value="unfoldingWord/dbbackupr2">
            <text:p>unfoldingWord/dbbackupr2</text:p>
          </table:table-cell>
          <table:table-cell office:value-type="string" office:string-value="https://github.com/unfoldingWord/dbbackupr2">
            <text:p>https://github.com/unfoldingWord/dbbackupr2</text:p>
          </table:table-cell>
          <table:table-cell office:value-type="string" office:string-value="2-Keep">
            <text:p>2-Keep</text:p>
          </table:table-cell>
          <table:table-cell office:value-type="string" office:string-value="Active - Last commit was within the last 12 months (7 months ago).">
            <text:p>Active - Last commit was within the last 12 months (7 months ago).</text:p>
          </table:table-cell>
          <table:table-cell office:value-type="string" office:string-value="">
            <text:p/>
          </table:table-cell>
          <table:table-cell office:value-type="string" office:string-value="">
            <text:p/>
          </table:table-cell>
          <table:table-cell office:value-type="string" office:string-value="dbbackupr2">
            <text:p>dbbackupr2</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cs">
            <text:p>unfoldingWord/dcs</text:p>
          </table:table-cell>
          <table:table-cell office:value-type="string" office:string-value="https://github.com/unfoldingWord/dcs">
            <text:p>https://github.com/unfoldingWord/dcs</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6-21T01:08:31Z">
            <text:p>2026-06-21T01:08:31Z</text:p>
          </table:table-cell>
          <table:table-cell office:value-type="string" office:string-value="2026-04-19T02:36:29Z">
            <text:p>2026-04-19T02:36:29Z</text:p>
          </table:table-cell>
          <table:table-cell office:value-type="string" office:string-value="2026-06-03T23:53:30Z">
            <text:p>2026-06-03T23:53:30Z</text:p>
          </table:table-cell>
          <table:table-cell office:value-type="string" office:string-value="">
            <text:p/>
          </table:table-cell>
          <table:table-cell office:value-type="string" office:string-value="['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office:string-value="48">
            <text:p>48</text:p>
          </table:table-cell>
          <table:table-cell office:value-type="string" office:string-value="7">
            <text:p>7</text:p>
          </table:table-cell>
          <table:table-cell office:value-type="string" office:string-value="20774">
            <text:p>20774</text:p>
          </table:table-cell>
          <table:table-cell office:value-type="string" office:string-value="">
            <text:p/>
          </table:table-cell>
          <table:table-cell office:value-type="string" office:string-value="">
            <text:p/>
          </table:table-cell>
          <table:table-cell office:value-type="string" office:string-value="1040">
            <text:p>1040</text:p>
          </table:table-cell>
          <table:table-cell office:value-type="string" office:string-value="104">
            <text:p>10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19T02:36:49Z">
            <text:p>2026-04-19T02:36:49Z</text:p>
          </table:table-cell>
          <table:table-cell office:value-type="string" office:string-value="unfoldingWord/dcs">
            <text:p>unfoldingWord/dcs</text:p>
          </table:table-cell>
          <table:table-cell office:value-type="string" office:string-value="https://github.com/unfoldingWord/dcs">
            <text:p>https://github.com/unfoldingWord/dcs</text:p>
          </table:table-cell>
          <table:table-cell office:value-type="string" office:string-value="2-Keep">
            <text:p>2-Keep</text:p>
          </table:table-cell>
          <table:table-cell office:value-type="string" office:string-value="Active - Last commit was within the last 12 months (2 months ago).">
            <text:p>Active - Last commit was within the last 12 months (2 months ago).</text:p>
          </table:table-cell>
          <table:table-cell office:value-type="string" office:string-value="">
            <text:p/>
          </table:table-cell>
          <table:table-cell office:value-type="string" office:string-value="">
            <text:p/>
          </table:table-cell>
          <table:table-cell office:value-type="string" office:string-value="dcs">
            <text:p>dc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branch-merger">
            <text:p>unfoldingWord/dcs-branch-merger</text:p>
          </table:table-cell>
          <table:table-cell office:value-type="string" office:string-value="https://github.com/unfoldingWord/dcs-branch-merger">
            <text:p>https://github.com/unfoldingWord/dcs-branch-merg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8T01:12:51Z">
            <text:p>2026-03-28T01:12:51Z</text:p>
          </table:table-cell>
          <table:table-cell office:value-type="string" office:string-value="2026-03-27T21:56:40Z">
            <text:p>2026-03-27T21:56:40Z</text:p>
          </table:table-cell>
          <table:table-cell office:value-type="string" office:string-value="">
            <text:p/>
          </table:table-cell>
          <table:table-cell office:value-type="string" office:string-value="['unfoldingWord/single-scripture-rcl', 'unfoldingWord/translation-helps-rcl', 'unfoldingWord/gateway-edit', 'bible-technology/scribe-scripture-editor', 'unfoldingWord/tc-create-app', 'unfoldingWord/gateway-translate', 'friendsofagape/autographa', 'vipinpaul/autographa', 'unfoldingWord/gateway-admin']">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office:string-value="['mandolyte', 'richmahn', 'theNerd247', 'PhotoNomad0']">
            <text:p>['mandolyte', 'richmahn', 'theNerd247', 'PhotoNomad0']</text:p>
          </table:table-cell>
          <table:table-cell office:value-type="string" office:string-value="6">
            <text:p>6</text:p>
          </table:table-cell>
          <table:table-cell office:value-type="string" office:string-value="0">
            <text:p>0</text:p>
          </table:table-cell>
          <table:table-cell office:value-type="string" office:string-value="53">
            <text:p>5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branch-merger">
            <text:p>dcs-branch-merger</text:p>
          </table:table-cell>
          <table:table-cell office:value-type="string" office:string-value="https://www.npmjs.com/package/dcs-branch-merger">
            <text:p>https://www.npmjs.com/package/dcs-branch-merger</text:p>
          </table:table-cell>
          <table:table-cell office:value-type="string" office:string-value="False">
            <text:p>False</text:p>
          </table:table-cell>
          <table:table-cell office:value-type="string" office:string-value="3577">
            <text:p>3577</text:p>
          </table:table-cell>
          <table:table-cell office:value-type="string" office:string-value="2026-03-27T21:57:39.012Z">
            <text:p>2026-03-27T21:57:39.012Z</text:p>
          </table:table-cell>
          <table:table-cell office:value-type="string" office:string-value="['gateway-admin', 'tc-create-app', 'translation-helps-rcl']">
            <text:p>['gateway-admin', 'tc-create-app', 'translation-helps-rcl']</text:p>
          </table:table-cell>
          <table:table-cell office:value-type="string" office:string-value="dcs-js">
            <text:p>dcs-js</text:p>
          </table:table-cell>
          <table:table-cell office:value-type="string" office:string-value="2026-03-27T21:56:46Z">
            <text:p>2026-03-27T21:56:46Z</text:p>
          </table:table-cell>
          <table:table-cell office:value-type="string" office:string-value="unfoldingWord/dcs-branch-merger">
            <text:p>unfoldingWord/dcs-branch-merger</text:p>
          </table:table-cell>
          <table:table-cell office:value-type="string" office:string-value="https://github.com/unfoldingWord/dcs-branch-merger">
            <text:p>https://github.com/unfoldingWord/dcs-branch-merger</text:p>
          </table:table-cell>
          <table:table-cell office:value-type="string" office:string-value="2-Keep">
            <text:p>2-Keep</text:p>
          </table:table-cell>
          <table:table-cell office:value-type="string" office:string-value="externally used - Repository has GitHub dependents or at least 1,000 npm downloads in the last year (3577 downloads).">
            <text:p>externally used - Repository has GitHub dependents or at least 1,000 npm downloads in the last year (357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577 downloads in the last year).">
            <text:p>Package has detected local usage, GitHub dependents, or significant npm downloads (3577 downloads in the last year).</text:p>
          </table:table-cell>
          <table:table-cell office:value-type="string" office:string-value="dcs-branch-merger">
            <text:p>dcs-branch-merg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cs-catalog-accordion-rcl">
            <text:p>unfoldingWord/dcs-catalog-accordion-rcl</text:p>
          </table:table-cell>
          <table:table-cell office:value-type="string" office:string-value="https://github.com/unfoldingWord/dcs-catalog-accordion-rcl">
            <text:p>https://github.com/unfoldingWord/dcs-catalog-accordion-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4T14:08:03Z">
            <text:p>2026-06-04T14:08:03Z</text:p>
          </table:table-cell>
          <table:table-cell office:value-type="string" office:string-value="2026-06-04T14:02:01Z">
            <text:p>2026-06-04T14:02:01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catalog-accordion-rcl">
            <text:p>dcs-catalog-accordion-rcl</text:p>
          </table:table-cell>
          <table:table-cell office:value-type="string" office:string-value="https://www.npmjs.com/package/dcs-catalog-accordion-rcl">
            <text:p>https://www.npmjs.com/package/dcs-catalog-accordion-rcl</text:p>
          </table:table-cell>
          <table:table-cell office:value-type="string" office:string-value="False">
            <text:p>False</text:p>
          </table:table-cell>
          <table:table-cell office:value-type="string" office:string-value="2289">
            <text:p>2289</text:p>
          </table:table-cell>
          <table:table-cell office:value-type="string" office:string-value="2026-06-04T14:12:07.381Z">
            <text:p>2026-06-04T14:12:07.381Z</text:p>
          </table:table-cell>
          <table:table-cell office:value-type="string" office:string-value="">
            <text:p/>
          </table:table-cell>
          <table:table-cell office:value-type="string" office:string-value="">
            <text:p/>
          </table:table-cell>
          <table:table-cell office:value-type="string" office:string-value="2026-06-04T14:09:25Z">
            <text:p>2026-06-04T14:09:25Z</text:p>
          </table:table-cell>
          <table:table-cell office:value-type="string" office:string-value="unfoldingWord/dcs-catalog-accordion-rcl">
            <text:p>unfoldingWord/dcs-catalog-accordion-rcl</text:p>
          </table:table-cell>
          <table:table-cell office:value-type="string" office:string-value="https://github.com/unfoldingWord/dcs-catalog-accordion-rcl">
            <text:p>https://github.com/unfoldingWord/dcs-catalog-accordion-rcl</text:p>
          </table:table-cell>
          <table:table-cell office:value-type="string" office:string-value="2-Keep">
            <text:p>2-Keep</text:p>
          </table:table-cell>
          <table:table-cell office:value-type="string" office:string-value="externally used - Repository has GitHub dependents or at least 1,000 npm downloads in the last year (2289 downloads).">
            <text:p>externally used - Repository has GitHub dependents or at least 1,000 npm downloads in the last year (228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89 downloads in the last year).">
            <text:p>Package has detected local usage, GitHub dependents, or significant npm downloads (2289 downloads in the last year).</text:p>
          </table:table-cell>
          <table:table-cell office:value-type="string" office:string-value="dcs-catalog-accordion-rcl">
            <text:p>dcs-catalog-accordion-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cs-homepage">
            <text:p>unfoldingWord/dcs-homepage</text:p>
          </table:table-cell>
          <table:table-cell office:value-type="string" office:string-value="https://github.com/unfoldingWord/dcs-homepage">
            <text:p>https://github.com/unfoldingWord/dcs-homepage</text:p>
          </table:table-cell>
          <table:table-cell office:value-type="string" office:string-value="Go Template">
            <text:p>Go Template</text:p>
          </table:table-cell>
          <table:table-cell office:value-type="string" office:string-value="False">
            <text:p>False</text:p>
          </table:table-cell>
          <table:table-cell office:value-type="string" office:string-value="False">
            <text:p>False</text:p>
          </table:table-cell>
          <table:table-cell office:value-type="string" office:string-value="2026-06-03T16:01:29Z">
            <text:p>2026-06-03T16:01:29Z</text:p>
          </table:table-cell>
          <table:table-cell office:value-type="string" office:string-value="2026-06-03T16:01:29Z">
            <text:p>2026-06-03T16:01:29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3">
            <text:p>8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3T16:04:29Z">
            <text:p>2026-06-03T16:04:29Z</text:p>
          </table:table-cell>
          <table:table-cell office:value-type="string" office:string-value="unfoldingWord/dcs-homepage">
            <text:p>unfoldingWord/dcs-homepage</text:p>
          </table:table-cell>
          <table:table-cell office:value-type="string" office:string-value="https://github.com/unfoldingWord/dcs-homepage">
            <text:p>https://github.com/unfoldingWord/dcs-homepage</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dcs-homepage">
            <text:p>dcs-homepag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js">
            <text:p>unfoldingWord/dcs-js</text:p>
          </table:table-cell>
          <table:table-cell office:value-type="string" office:string-value="https://github.com/unfoldingWord/dcs-js">
            <text:p>https://github.com/unfoldingWord/dcs-j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1T04:09:41Z">
            <text:p>2023-01-01T04:09:41Z</text:p>
          </table:table-cell>
          <table:table-cell office:value-type="string" office:string-value="2022-11-02T13:14:23Z">
            <text:p>2022-11-02T13:14:23Z</text:p>
          </table:table-cell>
          <table:table-cell office:value-type="string" office:string-value="2022-10-29T20:10:49Z">
            <text:p>2022-10-29T20:10:49Z</text:p>
          </table:table-cell>
          <table:table-cell office:value-type="string" office:string-value="['nishantshah-me/docusaurus', 'unfoldingWord/dcs-branch-merger', 'unfoldingWord-box3/bible-preview-app', 'unfoldingWord/gateway-translate']">
            <text:p>['nishantshah-me/docusaurus', 'unfoldingWord/dcs-branch-merger', 'unfoldingWord-box3/bible-preview-app', 'unfoldingWord/gateway-translate']</text:p>
          </table:table-cell>
          <table:table-cell office:value-type="string" office:string-value="['abelpz', 'richmahn']">
            <text:p>['abelpz', 'richmahn']</text:p>
          </table:table-cell>
          <table:table-cell office:value-type="string" office:string-value="0">
            <text:p>0</text:p>
          </table:table-cell>
          <table:table-cell office:value-type="string" office:string-value="0">
            <text:p>0</text:p>
          </table:table-cell>
          <table:table-cell office:value-type="string" office:string-value="59">
            <text:p>5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dcs-js">
            <text:p>dcs-js</text:p>
          </table:table-cell>
          <table:table-cell office:value-type="string" office:string-value="https://www.npmjs.com/package/dcs-js">
            <text:p>https://www.npmjs.com/package/dcs-js</text:p>
          </table:table-cell>
          <table:table-cell office:value-type="string" office:string-value="False">
            <text:p>False</text:p>
          </table:table-cell>
          <table:table-cell office:value-type="string" office:string-value="784">
            <text:p>784</text:p>
          </table:table-cell>
          <table:table-cell office:value-type="string" office:string-value="2022-11-02T13:18:25.384Z">
            <text:p>2022-11-02T13:18:25.384Z</text:p>
          </table:table-cell>
          <table:table-cell office:value-type="string" office:string-value="['dcs-branch-merger', 'gateway-translate', 'dcs-react-hooks', 'bible-preview-app', 'dcs-login', 'dcs-js-example']">
            <text:p>['dcs-branch-merger', 'gateway-translate', 'dcs-react-hooks', 'bible-preview-app', 'dcs-login', 'dcs-js-example']</text:p>
          </table:table-cell>
          <table:table-cell office:value-type="string" office:string-value="">
            <text:p/>
          </table:table-cell>
          <table:table-cell office:value-type="string" office:string-value="2022-10-29T01:30:37Z">
            <text:p>2022-10-29T01:30:37Z</text:p>
          </table:table-cell>
          <table:table-cell office:value-type="string" office:string-value="unfoldingWord/dcs-js">
            <text:p>unfoldingWord/dcs-js</text:p>
          </table:table-cell>
          <table:table-cell office:value-type="string" office:string-value="https://github.com/unfoldingWord/dcs-js">
            <text:p>https://github.com/unfoldingWord/dcs-js</text:p>
          </table:table-cell>
          <table:table-cell office:value-type="string" office:string-value="2-Keep">
            <text:p>2-Keep</text:p>
          </table:table-cell>
          <table:table-cell office:value-type="string" office:string-value="externally used - Repository has GitHub dependents or at least 1,000 npm downloads in the last year (784 downloads).">
            <text:p>externally used - Repository has GitHub dependents or at least 1,000 npm downloads in the last year (78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84 downloads in the last year).">
            <text:p>Package has detected local usage, GitHub dependents, or significant npm downloads (784 downloads in the last year).</text:p>
          </table:table-cell>
          <table:table-cell office:value-type="string" office:string-value="dcs-js">
            <text:p>dcs-j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cs-migrate-org-repos">
            <text:p>unfoldingWord-dev/dcs-migrate-org-repos</text:p>
          </table:table-cell>
          <table:table-cell office:value-type="string" office:string-value="https://github.com/unfoldingWord-dev/dcs-migrate-org-repos">
            <text:p>https://github.com/unfoldingWord-dev/dcs-migrate-org-repos</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1-05-02T18:04:55Z">
            <text:p>2021-05-02T18:04:55Z</text:p>
          </table:table-cell>
          <table:table-cell office:value-type="string" office:string-value="2021-01-11T22:27:35Z">
            <text:p>2021-01-11T22:27:35Z</text:p>
          </table:table-cell>
          <table:table-cell office:value-type="string" office:string-value="">
            <text:p/>
          </table:table-cell>
          <table:table-cell office:value-type="string" office:string-value="jaedle/mirror-to-gitea">
            <text:p>jaedle/mirror-to-gitea</text:p>
          </table:table-cell>
          <table:table-cell office:value-type="string" office:string-value="['jaedle', 'Dennis Jekubczyk', 'derhuerst', 'nilp0inter', 'dependabot[bot]']">
            <text:p>['jaedle', 'Dennis Jekubczyk', 'derhuerst', 'nilp0inter', 'dependabot[bot]']</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0T13:39:48Z">
            <text:p>2021-05-10T13:39:48Z</text:p>
          </table:table-cell>
          <table:table-cell office:value-type="string" office:string-value="unfoldingWord-dev/dcs-migrate-org-repos">
            <text:p>unfoldingWord-dev/dcs-migrate-org-repos</text:p>
          </table:table-cell>
          <table:table-cell office:value-type="string" office:string-value="https://github.com/unfoldingWord-dev/dcs-migrate-org-repos">
            <text:p>https://github.com/unfoldingWord-dev/dcs-migrate-org-repo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cs-migrate-org-repos">
            <text:p>dcs-migrate-org-repo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react-hooks">
            <text:p>unfoldingWord/dcs-react-hooks</text:p>
          </table:table-cell>
          <table:table-cell office:value-type="string" office:string-value="https://github.com/unfoldingWord/dcs-react-hooks">
            <text:p>https://github.com/unfoldingWord/dcs-react-hook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4T00:19:28Z">
            <text:p>2022-06-24T00:19:28Z</text:p>
          </table:table-cell>
          <table:table-cell office:value-type="string" office:string-value="2022-06-23T20:16:40Z">
            <text:p>2022-06-23T20:16:40Z</text:p>
          </table:table-cell>
          <table:table-cell office:value-type="string" office:string-value="">
            <text:p/>
          </table:table-cell>
          <table:table-cell office:value-type="string" office:string-value="['nishantshah-me/docusaurus', 'unfoldingWord/gateway-translate']">
            <text:p>['nishantshah-me/docusaurus', 'unfoldingWord/gateway-translate']</text:p>
          </table:table-cell>
          <table:table-cell office:value-type="string" office:string-value="['abelpz', 'mandolyte']">
            <text:p>['abelpz', 'mandolyte']</text:p>
          </table:table-cell>
          <table:table-cell office:value-type="string" office:string-value="5">
            <text:p>5</text:p>
          </table:table-cell>
          <table:table-cell office:value-type="string" office:string-value="1">
            <text:p>1</text:p>
          </table:table-cell>
          <table:table-cell office:value-type="string" office:string-value="79">
            <text:p>7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react-hooks">
            <text:p>dcs-react-hooks</text:p>
          </table:table-cell>
          <table:table-cell office:value-type="string" office:string-value="https://www.npmjs.com/package/dcs-react-hooks">
            <text:p>https://www.npmjs.com/package/dcs-react-hooks</text:p>
          </table:table-cell>
          <table:table-cell office:value-type="string" office:string-value="False">
            <text:p>False</text:p>
          </table:table-cell>
          <table:table-cell office:value-type="string" office:string-value="177">
            <text:p>177</text:p>
          </table:table-cell>
          <table:table-cell office:value-type="string" office:string-value="2022-08-19T12:33:49.976Z">
            <text:p>2022-08-19T12:33:49.976Z</text:p>
          </table:table-cell>
          <table:table-cell office:value-type="string" office:string-value="">
            <text:p/>
          </table:table-cell>
          <table:table-cell office:value-type="string" office:string-value="['dcs-js', 'uw-languages-rcl', '@unfoldingword/eslint-config']">
            <text:p>['dcs-js', 'uw-languages-rcl', '@unfoldingword/eslint-config']</text:p>
          </table:table-cell>
          <table:table-cell office:value-type="string" office:string-value="2022-06-17T15:48:50Z">
            <text:p>2022-06-17T15:48:50Z</text:p>
          </table:table-cell>
          <table:table-cell office:value-type="string" office:string-value="unfoldingWord/dcs-react-hooks">
            <text:p>unfoldingWord/dcs-react-hooks</text:p>
          </table:table-cell>
          <table:table-cell office:value-type="string" office:string-value="https://github.com/unfoldingWord/dcs-react-hooks">
            <text:p>https://github.com/unfoldingWord/dcs-react-hooks</text:p>
          </table:table-cell>
          <table:table-cell office:value-type="string" office:string-value="2-Keep">
            <text:p>2-Keep</text:p>
          </table:table-cell>
          <table:table-cell office:value-type="string" office:string-value="externally used - Repository has GitHub dependents or at least 1,000 npm downloads in the last year (177 downloads).">
            <text:p>externally used - Repository has GitHub dependents or at least 1,000 npm downloads in the last year (17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7 downloads in the last year).">
            <text:p>Package has detected local usage, GitHub dependents, or significant npm downloads (177 downloads in the last year).</text:p>
          </table:table-cell>
          <table:table-cell office:value-type="string" office:string-value="dcs-react-hooks">
            <text:p>dcs-react-hook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desktop-app-template">
            <text:p>unfoldingWord-box3/desktop-app-template</text:p>
          </table:table-cell>
          <table:table-cell office:value-type="string" office:string-value="https://github.com/unfoldingWord-box3/desktop-app-template">
            <text:p>https://github.com/unfoldingWord-box3/desktop-app-template</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5-10-29T20:07:04Z">
            <text:p>2025-10-29T20:07:04Z</text:p>
          </table:table-cell>
          <table:table-cell office:value-type="string" office:string-value="2025-07-20T10:57:14Z">
            <text:p>2025-07-20T10:57:14Z</text:p>
          </table:table-cell>
          <table:table-cell office:value-type="string" office:string-value="">
            <text:p/>
          </table:table-cell>
          <table:table-cell office:value-type="string" office:string-value="pankosmia/desktop-app-template">
            <text:p>pankosmia/desktop-app-template</text:p>
          </table:table-cell>
          <table:table-cell office:value-type="string" office:string-value="['RUN-Projects', 'PhotoNomad0', 'mcleanb', 'mvahowe']">
            <text:p>['RUN-Projects', 'PhotoNomad0', 'mcleanb', 'mvahowe']</text:p>
          </table:table-cell>
          <table:table-cell office:value-type="string" office:string-value="0">
            <text:p>0</text:p>
          </table:table-cell>
          <table:table-cell office:value-type="string" office:string-value="0">
            <text:p>0</text:p>
          </table:table-cell>
          <table:table-cell office:value-type="string" office:string-value="142">
            <text:p>14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7-20T10:57:23Z">
            <text:p>2025-07-20T10:57:23Z</text:p>
          </table:table-cell>
          <table:table-cell office:value-type="string" office:string-value="unfoldingWord-box3/desktop-app-template">
            <text:p>unfoldingWord-box3/desktop-app-template</text:p>
          </table:table-cell>
          <table:table-cell office:value-type="string" office:string-value="https://github.com/unfoldingWord-box3/desktop-app-template">
            <text:p>https://github.com/unfoldingWord-box3/desktop-app-template</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esktop-app-template">
            <text:p>desktop-app-template</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plugin-translation">
            <text:p>unfoldingWord-dev/dokuwiki-plugin-translation</text:p>
          </table:table-cell>
          <table:table-cell office:value-type="string" office:string-value="https://github.com/unfoldingWord-dev/dokuwiki-plugin-translation">
            <text:p>https://github.com/unfoldingWord-dev/dokuwiki-plugin-translation</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16T20:44:56Z">
            <text:p>2015-06-16T20:44:56Z</text:p>
          </table:table-cell>
          <table:table-cell office:value-type="string" office:string-value="2015-06-16T20:44:54Z">
            <text:p>2015-06-16T20:44:54Z</text:p>
          </table:table-cell>
          <table:table-cell office:value-type="string" office:string-value="">
            <text:p/>
          </table:table-cell>
          <table:table-cell office:value-type="string" office:string-value="splitbrain/dokuwiki-plugin-translation">
            <text:p>splitbrain/dokuwiki-plugin-translation</text:p>
          </table:table-cell>
          <table:table-cell office:value-type="string" office:string-value="['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office:string-value="0">
            <text:p>0</text:p>
          </table:table-cell>
          <table:table-cell office:value-type="string" office:string-value="0">
            <text:p>0</text:p>
          </table:table-cell>
          <table:table-cell office:value-type="string" office:string-value="152">
            <text:p>1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19:08:59Z">
            <text:p>2015-06-23T19:08:59Z</text:p>
          </table:table-cell>
          <table:table-cell office:value-type="string" office:string-value="unfoldingWord-dev/dokuwiki-plugin-translation">
            <text:p>unfoldingWord-dev/dokuwiki-plugin-translation</text:p>
          </table:table-cell>
          <table:table-cell office:value-type="string" office:string-value="https://github.com/unfoldingWord-dev/dokuwiki-plugin-translation">
            <text:p>https://github.com/unfoldingWord-dev/dokuwiki-plugin-translati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kuwiki-plugin-translation">
            <text:p>dokuwiki-plugin-translatio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USFMTag">
            <text:p>unfoldingWord-dev/Dokuwiki-USFMTag</text:p>
          </table:table-cell>
          <table:table-cell office:value-type="string" office:string-value="https://github.com/unfoldingWord-dev/Dokuwiki-USFMTag">
            <text:p>https://github.com/unfoldingWord-dev/Dokuwiki-USFMTag</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6-01-28T15:18:48Z">
            <text:p>2016-01-28T15:18:48Z</text:p>
          </table:table-cell>
          <table:table-cell office:value-type="string" office:string-value="2016-01-28T15:18:47Z">
            <text:p>2016-01-28T15:18:47Z</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yvonnel098', 'Distant Shores Media', 'jag3773', 'root', 'Door43', 'Phil Hopper', 'phillip-hopper', 'Richard Mahn', 'richmahn']">
            <text:p>['yvonnel098', 'Distant Shores Media', 'jag3773', 'root', 'Door43', 'Phil Hopper', 'phillip-hopper', 'Richard Mahn', 'richmahn']</text:p>
          </table:table-cell>
          <table:table-cell office:value-type="string" office:string-value="0">
            <text:p>0</text:p>
          </table:table-cell>
          <table:table-cell office:value-type="string" office:string-value="0">
            <text:p>0</text:p>
          </table:table-cell>
          <table:table-cell office:value-type="string" office:string-value="30">
            <text:p>30</text:p>
          </table:table-cell>
          <table:table-cell office:value-type="string" office:string-value="unfoldingWord-dev/Dokuwiki-USFMTag">
            <text:p>unfoldingWord-dev/Dokuwiki-USFMTag</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7-27T07:42:16Z">
            <text:p>2022-07-27T07:42:16Z</text:p>
          </table:table-cell>
          <table:table-cell office:value-type="string" office:string-value="unfoldingWord-dev/Dokuwiki-USFMTag">
            <text:p>unfoldingWord-dev/Dokuwiki-USFMTag</text:p>
          </table:table-cell>
          <table:table-cell office:value-type="string" office:string-value="https://github.com/unfoldingWord-dev/Dokuwiki-USFMTag">
            <text:p>https://github.com/unfoldingWord-dev/Dokuwiki-USFMTag</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kuwiki-USFMTag">
            <text:p>Dokuwiki-USFMTag</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https://github.com/unfoldingWord/door43-enqueue-job">
            <text:p>https://github.com/unfoldingWord/door43-enqueue-job</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4-02-29T18:40:06Z">
            <text:p>2024-02-29T18:40:06Z</text:p>
          </table:table-cell>
          <table:table-cell office:value-type="string" office:string-value="2024-02-29T18:39:45Z">
            <text:p>2024-02-29T18:39:45Z</text:p>
          </table:table-cell>
          <table:table-cell office:value-type="string" office:string-value="2024-01-25T16:50:06Z">
            <text:p>2024-01-25T16:50:06Z</text:p>
          </table:table-cell>
          <table:table-cell office:value-type="string" office:string-value="lscsoft/webhook-queue">
            <text:p>lscsoft/webhook-queue</text:p>
          </table:table-cell>
          <table:table-cell office:value-type="string" office:string-value="['richmahn', 'RobH123', 'Robert Hunt', 'jag3773', 'tpdownes']">
            <text:p>['richmahn', 'RobH123', 'Robert Hunt', 'jag3773', 'tpdownes']</text:p>
          </table:table-cell>
          <table:table-cell office:value-type="string" office:string-value="0">
            <text:p>0</text:p>
          </table:table-cell>
          <table:table-cell office:value-type="string" office:string-value="0">
            <text:p>0</text:p>
          </table:table-cell>
          <table:table-cell office:value-type="string" office:string-value="560">
            <text:p>56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4T15:44:46Z">
            <text:p>2022-10-04T15:44:46Z</text:p>
          </table:table-cell>
          <table:table-cell office:value-type="string" office:string-value="unfoldingWord/door43-enqueue-job">
            <text:p>unfoldingWord/door43-enqueue-job</text:p>
          </table:table-cell>
          <table:table-cell office:value-type="string" office:string-value="https://github.com/unfoldingWord/door43-enqueue-job">
            <text:p>https://github.com/unfoldingWord/door43-enqueue-job</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or43-enqueue-job">
            <text:p>door43-enqueue-jo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test">
            <text:p>unfoldingWord/door43-enqueue-job-test</text:p>
          </table:table-cell>
          <table:table-cell office:value-type="string" office:string-value="https://github.com/unfoldingWord/door43-enqueue-job-test">
            <text:p>https://github.com/unfoldingWord/door43-enqueue-job-test</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3-04-19T13:50:56Z">
            <text:p>2023-04-19T13:50:56Z</text:p>
          </table:table-cell>
          <table:table-cell office:value-type="string" office:string-value="2023-04-19T13:50:56Z">
            <text:p>2023-04-19T13:50:56Z</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RobH123', 'richmahn', 'Robert Hunt', 'jag3773', 'tpdownes', 'yakob-aleksandrovich']">
            <text:p>['RobH123', 'richmahn', 'Robert Hunt', 'jag3773', 'tpdownes', 'yakob-aleksandrovich']</text:p>
          </table:table-cell>
          <table:table-cell office:value-type="string" office:string-value="0">
            <text:p>0</text:p>
          </table:table-cell>
          <table:table-cell office:value-type="string" office:string-value="0">
            <text:p>0</text:p>
          </table:table-cell>
          <table:table-cell office:value-type="string" office:string-value="333">
            <text:p>33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4-19T13:51:02Z">
            <text:p>2023-04-19T13:51:02Z</text:p>
          </table:table-cell>
          <table:table-cell office:value-type="string" office:string-value="unfoldingWord/door43-enqueue-job-test">
            <text:p>unfoldingWord/door43-enqueue-job-test</text:p>
          </table:table-cell>
          <table:table-cell office:value-type="string" office:string-value="https://github.com/unfoldingWord/door43-enqueue-job-test">
            <text:p>https://github.com/unfoldingWord/door43-enqueue-job-tes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or43-enqueue-job-test">
            <text:p>door43-enqueue-job-tes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library">
            <text:p>unfoldingWord/door43-library</text:p>
          </table:table-cell>
          <table:table-cell office:value-type="string" office:string-value="https://github.com/unfoldingWord/door43-library">
            <text:p>https://github.com/unfoldingWord/door43-library</text:p>
          </table:table-cell>
          <table:table-cell office:value-type="string" office:string-value="HTML">
            <text:p>HTML</text:p>
          </table:table-cell>
          <table:table-cell office:value-type="string" office:string-value="False">
            <text:p>False</text:p>
          </table:table-cell>
          <table:table-cell office:value-type="string" office:string-value="True">
            <text:p>True</text:p>
          </table:table-cell>
          <table:table-cell office:value-type="string" office:string-value="2023-01-09T22:40:47Z">
            <text:p>2023-01-09T22:40:47Z</text:p>
          </table:table-cell>
          <table:table-cell office:value-type="string" office:string-value="2023-01-09T22:40:39Z">
            <text:p>2023-01-09T22:40:39Z</text:p>
          </table:table-cell>
          <table:table-cell office:value-type="string" office:string-value="">
            <text:p/>
          </table:table-cell>
          <table:table-cell office:value-type="string" office:string-value="unfoldingWord/obs-web">
            <text:p>unfoldingWord/obs-web</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171">
            <text:p>17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08T13:52:06Z">
            <text:p>2023-08-08T13:52:06Z</text:p>
          </table:table-cell>
          <table:table-cell office:value-type="string" office:string-value="unfoldingWord/door43-library">
            <text:p>unfoldingWord/door43-library</text:p>
          </table:table-cell>
          <table:table-cell office:value-type="string" office:string-value="https://github.com/unfoldingWord/door43-library">
            <text:p>https://github.com/unfoldingWord/door43-librar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or43-library">
            <text:p>door43-librar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oor43-preview-actions">
            <text:p>unfoldingWord/door43-preview-actions</text:p>
          </table:table-cell>
          <table:table-cell office:value-type="string" office:string-value="https://github.com/unfoldingWord/door43-preview-actions">
            <text:p>https://github.com/unfoldingWord/door43-preview-action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3T22:32:56Z">
            <text:p>2025-11-23T22:32:56Z</text:p>
          </table:table-cell>
          <table:table-cell office:value-type="string" office:string-value="2025-11-23T22:32:54Z">
            <text:p>2025-11-23T22:32:54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1-23T22:33:00Z">
            <text:p>2025-11-23T22:33:00Z</text:p>
          </table:table-cell>
          <table:table-cell office:value-type="string" office:string-value="unfoldingWord/door43-preview-actions">
            <text:p>unfoldingWord/door43-preview-actions</text:p>
          </table:table-cell>
          <table:table-cell office:value-type="string" office:string-value="https://github.com/unfoldingWord/door43-preview-actions">
            <text:p>https://github.com/unfoldingWord/door43-preview-actions</text:p>
          </table:table-cell>
          <table:table-cell office:value-type="string" office:string-value="2-Keep">
            <text:p>2-Keep</text:p>
          </table:table-cell>
          <table:table-cell office:value-type="string" office:string-value="Active - Last commit was within the last 12 months (7 months ago).">
            <text:p>Active - Last commit was within the last 12 months (7 months ago).</text:p>
          </table:table-cell>
          <table:table-cell office:value-type="string" office:string-value="">
            <text:p/>
          </table:table-cell>
          <table:table-cell office:value-type="string" office:string-value="">
            <text:p/>
          </table:table-cell>
          <table:table-cell office:value-type="string" office:string-value="door43-preview-actions">
            <text:p>door43-preview-action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oor43-preview-app">
            <text:p>unfoldingWord/door43-preview-app</text:p>
          </table:table-cell>
          <table:table-cell office:value-type="string" office:string-value="https://github.com/unfoldingWord/door43-preview-app">
            <text:p>https://github.com/unfoldingWord/door43-preview-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6T13:21:54Z">
            <text:p>2026-06-06T13:21:54Z</text:p>
          </table:table-cell>
          <table:table-cell office:value-type="string" office:string-value="2026-06-06T13:21:08Z">
            <text:p>2026-06-06T13:21:08Z</text:p>
          </table:table-cell>
          <table:table-cell office:value-type="string" office:string-value="2026-06-06T13:21:54Z">
            <text:p>2026-06-06T13:21:54Z</text:p>
          </table:table-cell>
          <table:table-cell office:value-type="string" office:string-value="">
            <text:p/>
          </table:table-cell>
          <table:table-cell office:value-type="string" office:string-value="['richmahn', 'larsgson', 'PhotoNomad0']">
            <text:p>['richmahn', 'larsgson', 'PhotoNomad0']</text:p>
          </table:table-cell>
          <table:table-cell office:value-type="string" office:string-value="5">
            <text:p>5</text:p>
          </table:table-cell>
          <table:table-cell office:value-type="string" office:string-value="0">
            <text:p>0</text:p>
          </table:table-cell>
          <table:table-cell office:value-type="string" office:string-value="530">
            <text:p>53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6">
            <text:p>26</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usfm-alignment-remover', 'usfm-js', 'uw-quote-helpers', 'word-aligner-rcl', 'bible-reference-range', 'string-punctuation-tokenizer', 'word-aligner', 'word-aligner-lib', 'wordmap', 'wordmap-lexer', 'uw-tsv-parser', 'tsv-groupdata-parser', 'uw-bible-parser', 'tc-strings']">
            <text:p>['bible-reference-rcl', 'usfm-alignment-remover', 'usfm-js', 'uw-quote-helpers', 'word-aligner-rcl', 'bible-reference-range', 'string-punctuation-tokenizer', 'word-aligner', 'word-aligner-lib', 'wordmap', 'wordmap-lexer', 'uw-tsv-parser', 'tsv-groupdata-parser', 'uw-bible-parser', 'tc-strings']</text:p>
          </table:table-cell>
          <table:table-cell office:value-type="string" office:string-value="2026-06-06T13:21:13Z">
            <text:p>2026-06-06T13:21:13Z</text:p>
          </table:table-cell>
          <table:table-cell office:value-type="string" office:string-value="unfoldingWord/door43-preview-app">
            <text:p>unfoldingWord/door43-preview-app</text:p>
          </table:table-cell>
          <table:table-cell office:value-type="string" office:string-value="https://github.com/unfoldingWord/door43-preview-app">
            <text:p>https://github.com/unfoldingWord/door43-preview-app</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oor43-preview-app">
            <text:p>door43-preview-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oor43-preview-renderers">
            <text:p>unfoldingWord/door43-preview-renderers</text:p>
          </table:table-cell>
          <table:table-cell office:value-type="string" office:string-value="https://github.com/unfoldingWord/door43-preview-renderers">
            <text:p>https://github.com/unfoldingWord/door43-preview-renderer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2-11T16:15:26Z">
            <text:p>2026-02-11T16:15:26Z</text:p>
          </table:table-cell>
          <table:table-cell office:value-type="string" office:string-value="2026-02-11T16:15:23Z">
            <text:p>2026-02-11T16:15:23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preview-renderers">
            <text:p>door43-preview-render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 'usfm-js']">
            <text:p>['usfm-alignment-remover', 'usfm-js']</text:p>
          </table:table-cell>
          <table:table-cell office:value-type="string" office:string-value="2026-02-11T16:15:30Z">
            <text:p>2026-02-11T16:15:30Z</text:p>
          </table:table-cell>
          <table:table-cell office:value-type="string" office:string-value="unfoldingWord/door43-preview-renderers">
            <text:p>unfoldingWord/door43-preview-renderers</text:p>
          </table:table-cell>
          <table:table-cell office:value-type="string" office:string-value="https://github.com/unfoldingWord/door43-preview-renderers">
            <text:p>https://github.com/unfoldingWord/door43-preview-renderers</text:p>
          </table:table-cell>
          <table:table-cell office:value-type="string" office:string-value="2-Keep">
            <text:p>2-Keep</text:p>
          </table:table-cell>
          <table:table-cell office:value-type="string" office:string-value="Active - Last commit was within the last 12 months (4 months ago).">
            <text:p>Active - Last commit was within the last 12 months (4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oor43-preview-renderers">
            <text:p>door43-preview-render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ownload-link-tracker">
            <text:p>unfoldingWord/download-link-tracker</text:p>
          </table:table-cell>
          <table:table-cell office:value-type="string" office:string-value="https://github.com/unfoldingWord/download-link-tracker">
            <text:p>https://github.com/unfoldingWord/download-link-tracker</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6T21:39:43Z">
            <text:p>2025-06-06T21:39:43Z</text:p>
          </table:table-cell>
          <table:table-cell office:value-type="string" office:string-value="2025-06-06T21:39:41Z">
            <text:p>2025-06-06T21:39:41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06T21:39:46Z">
            <text:p>2025-06-06T21:39:46Z</text:p>
          </table:table-cell>
          <table:table-cell office:value-type="string" office:string-value="unfoldingWord/download-link-tracker">
            <text:p>unfoldingWord/download-link-tracker</text:p>
          </table:table-cell>
          <table:table-cell office:value-type="string" office:string-value="https://github.com/unfoldingWord/download-link-tracker">
            <text:p>https://github.com/unfoldingWord/download-link-tracker</text:p>
          </table:table-cell>
          <table:table-cell office:value-type="string" office:string-value="2-Keep">
            <text:p>2-Keep</text:p>
          </table:table-cell>
          <table:table-cell office:value-type="string" office:string-value="Active - Last commit was within the last 12 months (12 months ago).">
            <text:p>Active - Last commit was within the last 12 months (12 months ago).</text:p>
          </table:table-cell>
          <table:table-cell office:value-type="string" office:string-value="">
            <text:p/>
          </table:table-cell>
          <table:table-cell office:value-type="string" office:string-value="">
            <text:p/>
          </table:table-cell>
          <table:table-cell office:value-type="string" office:string-value="download-link-tracker">
            <text:p>download-link-trac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lectronite">
            <text:p>unfoldingWord/electronite</text:p>
          </table:table-cell>
          <table:table-cell office:value-type="string" office:string-value="https://github.com/unfoldingWord/electronite">
            <text:p>https://github.com/unfoldingWord/electronite</text:p>
          </table:table-cell>
          <table:table-cell office:value-type="string" office:string-value="C++">
            <text:p>C++</text:p>
          </table:table-cell>
          <table:table-cell office:value-type="string" office:string-value="False">
            <text:p>False</text:p>
          </table:table-cell>
          <table:table-cell office:value-type="string" office:string-value="True">
            <text:p>True</text:p>
          </table:table-cell>
          <table:table-cell office:value-type="string" office:string-value="2026-01-22T20:49:18Z">
            <text:p>2026-01-22T20:49:18Z</text:p>
          </table:table-cell>
          <table:table-cell office:value-type="string" office:string-value="2022-12-08T15:12:19Z">
            <text:p>2022-12-08T15:12:19Z</text:p>
          </table:table-cell>
          <table:table-cell office:value-type="string" office:string-value="2026-01-08T18:30:11Z">
            <text:p>2026-01-08T18:30:11Z</text:p>
          </table:table-cell>
          <table:table-cell office:value-type="string" office:string-value="electron/electron">
            <text:p>electron/electron</text:p>
          </table:table-cell>
          <table:table-cell office:value-type="string" office:string-value="['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office:string-value="0">
            <text:p>0</text:p>
          </table:table-cell>
          <table:table-cell office:value-type="string" office:string-value="0">
            <text:p>0</text:p>
          </table:table-cell>
          <table:table-cell office:value-type="string" office:string-value="27558">
            <text:p>27558</text:p>
          </table:table-cell>
          <table:table-cell office:value-type="string" office:string-value="">
            <text:p/>
          </table:table-cell>
          <table:table-cell office:value-type="string" office:string-value="">
            <text:p/>
          </table:table-cell>
          <table:table-cell office:value-type="string" office:string-value="21032">
            <text:p>21032</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15T19:31:44Z">
            <text:p>2026-02-15T19:31:44Z</text:p>
          </table:table-cell>
          <table:table-cell office:value-type="string" office:string-value="unfoldingWord/electronite">
            <text:p>unfoldingWord/electronite</text:p>
          </table:table-cell>
          <table:table-cell office:value-type="string" office:string-value="https://github.com/unfoldingWord/electronite">
            <text:p>https://github.com/unfoldingWord/electronite</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electronite">
            <text:p>electron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lectronite-builder">
            <text:p>unfoldingWord-dev/electronite-builder</text:p>
          </table:table-cell>
          <table:table-cell office:value-type="string" office:string-value="https://github.com/unfoldingWord-dev/electronite-builder">
            <text:p>https://github.com/unfoldingWord-dev/electronite-builder</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09-17T23:39:30Z">
            <text:p>2023-09-17T23:39:30Z</text:p>
          </table:table-cell>
          <table:table-cell office:value-type="string" office:string-value="2023-09-13T22:24:42Z">
            <text:p>2023-09-13T22:24:42Z</text:p>
          </table:table-cell>
          <table:table-cell office:value-type="string" office:string-value="">
            <text:p/>
          </table:table-cell>
          <table:table-cell office:value-type="string" office:string-value="electron-userland/electron-builder">
            <text:p>electron-userland/electron-builder</text:p>
          </table:table-cell>
          <table:table-cell office:value-type="string" office:string-value="['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office:string-value="0">
            <text:p>0</text:p>
          </table:table-cell>
          <table:table-cell office:value-type="string" office:string-value="0">
            <text:p>0</text:p>
          </table:table-cell>
          <table:table-cell office:value-type="string" office:string-value="2861">
            <text:p>286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9-18T17:12:15Z">
            <text:p>2023-09-18T17:12:15Z</text:p>
          </table:table-cell>
          <table:table-cell office:value-type="string" office:string-value="unfoldingWord-dev/electronite-builder">
            <text:p>unfoldingWord-dev/electronite-builder</text:p>
          </table:table-cell>
          <table:table-cell office:value-type="string" office:string-value="https://github.com/unfoldingWord-dev/electronite-builder">
            <text:p>https://github.com/unfoldingWord-dev/electronite-build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electronite-builder">
            <text:p>electronite-build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lectronite-cli">
            <text:p>unfoldingWord-dev/electronite-cli</text:p>
          </table:table-cell>
          <table:table-cell office:value-type="string" office:string-value="https://github.com/unfoldingWord-dev/electronite-cli">
            <text:p>https://github.com/unfoldingWord-dev/electronite-cli</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2T20:59:24Z">
            <text:p>2026-01-22T20:59:24Z</text:p>
          </table:table-cell>
          <table:table-cell office:value-type="string" office:string-value="2022-05-15T19:25:29Z">
            <text:p>2022-05-15T19:25:29Z</text:p>
          </table:table-cell>
          <table:table-cell office:value-type="string" office:string-value="2026-01-08T18:38:22Z">
            <text:p>2026-01-08T18:38:22Z</text:p>
          </table:table-cell>
          <table:table-cell office:value-type="string" office:string-value="['unfoldingWord/gateway-edit', 'Bridgeconn/tc-create-offline', 'Proskomma/proskomma-legacy-projects', 'friendsofagape/autographa', 'gbin-org/alignment-editor-rcl-poc', 'unfoldingWord/translationCore', 'mannycolon/electronite-poc-app']">
            <text:p>['unfoldingWord/gateway-edit', 'Bridgeconn/tc-create-offline', 'Proskomma/proskomma-legacy-projects', 'friendsofagape/autographa', 'gbin-org/alignment-editor-rcl-poc', 'unfoldingWord/translationCore', 'mannycolon/electronite-poc-app']</text:p>
          </table:table-cell>
          <table:table-cell office:value-type="string" office:string-value="['da1nerd', 'PhotoNomad0']">
            <text:p>['da1nerd', 'PhotoNomad0']</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2">
            <text:p>32</text:p>
          </table:table-cell>
          <table:table-cell office:value-type="string" office:string-value="electronite">
            <text:p>electronite</text:p>
          </table:table-cell>
          <table:table-cell office:value-type="string" office:string-value="https://www.npmjs.com/package/electronite">
            <text:p>https://www.npmjs.com/package/electronite</text:p>
          </table:table-cell>
          <table:table-cell office:value-type="string" office:string-value="False">
            <text:p>False</text:p>
          </table:table-cell>
          <table:table-cell office:value-type="string" office:string-value="2606">
            <text:p>2606</text:p>
          </table:table-cell>
          <table:table-cell office:value-type="string" office:string-value="2026-01-22T21:05:02.866Z">
            <text:p>2026-01-22T21:05:02.866Z</text:p>
          </table:table-cell>
          <table:table-cell office:value-type="string" office:string-value="translationCore">
            <text:p>translationCore</text:p>
          </table:table-cell>
          <table:table-cell office:value-type="string" office:string-value="">
            <text:p/>
          </table:table-cell>
          <table:table-cell office:value-type="string" office:string-value="2023-09-04T12:03:41Z">
            <text:p>2023-09-04T12:03:41Z</text:p>
          </table:table-cell>
          <table:table-cell office:value-type="string" office:string-value="unfoldingWord-dev/electronite-cli">
            <text:p>unfoldingWord-dev/electronite-cli</text:p>
          </table:table-cell>
          <table:table-cell office:value-type="string" office:string-value="https://github.com/unfoldingWord-dev/electronite-cli">
            <text:p>https://github.com/unfoldingWord-dev/electronite-cli</text:p>
          </table:table-cell>
          <table:table-cell office:value-type="string" office:string-value="2-Keep">
            <text:p>2-Keep</text:p>
          </table:table-cell>
          <table:table-cell office:value-type="string" office:string-value="externally used - Repository has GitHub dependents or at least 1,000 npm downloads in the last year (2606 downloads).">
            <text:p>externally used - Repository has GitHub dependents or at least 1,000 npm downloads in the last year (260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606 downloads in the last year).">
            <text:p>Package has detected local usage, GitHub dependents, or significant npm downloads (2606 downloads in the last year).</text:p>
          </table:table-cell>
          <table:table-cell office:value-type="string" office:string-value="electronite-cli">
            <text:p>electronite-cli</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lectronite-forge">
            <text:p>unfoldingWord/electronite-forge</text:p>
          </table:table-cell>
          <table:table-cell office:value-type="string" office:string-value="https://github.com/unfoldingWord/electronite-forge">
            <text:p>https://github.com/unfoldingWord/electronite-forge</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10-09T14:20:00Z">
            <text:p>2023-10-09T14:20:00Z</text:p>
          </table:table-cell>
          <table:table-cell office:value-type="string" office:string-value="2023-02-21T19:17:58Z">
            <text:p>2023-02-21T19:17:58Z</text:p>
          </table:table-cell>
          <table:table-cell office:value-type="string" office:string-value="">
            <text:p/>
          </table:table-cell>
          <table:table-cell office:value-type="string" office:string-value="electron/forge">
            <text:p>electron/forge</text:p>
          </table:table-cell>
          <table:table-cell office:value-type="string" office:string-value="['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office:string-value="0">
            <text:p>0</text:p>
          </table:table-cell>
          <table:table-cell office:value-type="string" office:string-value="0">
            <text:p>0</text:p>
          </table:table-cell>
          <table:table-cell office:value-type="string" office:string-value="2947">
            <text:p>29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2-21T17:18:35Z">
            <text:p>2023-02-21T17:18:35Z</text:p>
          </table:table-cell>
          <table:table-cell office:value-type="string" office:string-value="unfoldingWord/electronite-forge">
            <text:p>unfoldingWord/electronite-forge</text:p>
          </table:table-cell>
          <table:table-cell office:value-type="string" office:string-value="https://github.com/unfoldingWord/electronite-forge">
            <text:p>https://github.com/unfoldingWord/electronite-forge</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electronite-forge">
            <text:p>electronite-forg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lectronite-packager">
            <text:p>unfoldingWord-dev/electronite-packager</text:p>
          </table:table-cell>
          <table:table-cell office:value-type="string" office:string-value="https://github.com/unfoldingWord-dev/electronite-packager">
            <text:p>https://github.com/unfoldingWord-dev/electronite-packager</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10-09T13:47:10Z">
            <text:p>2023-10-09T13:47:10Z</text:p>
          </table:table-cell>
          <table:table-cell office:value-type="string" office:string-value="2020-03-23T11:56:26Z">
            <text:p>2020-03-23T11:56:26Z</text:p>
          </table:table-cell>
          <table:table-cell office:value-type="string" office:string-value="">
            <text:p/>
          </table:table-cell>
          <table:table-cell office:value-type="string" office:string-value="['rockybars/atom-shell-packager', 'unfoldingWord/gateway-edit', 'Proskomma/proskomma-legacy-projects', 'gbin-org/alignment-editor-rcl-poc', 'unfoldingWord/translationCore', 'mannycolon/electronite-poc-app']">
            <text:p>['rockybars/atom-shell-packager', 'unfoldingWord/gateway-edit', 'Proskomma/proskomma-legacy-projects', 'gbin-org/alignment-editor-rcl-poc', 'unfoldingWord/translationCore', 'mannycolon/electronite-poc-app']</text:p>
          </table:table-cell>
          <table:table-cell office:value-type="string" office:string-value="['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office:string-value="0">
            <text:p>0</text:p>
          </table:table-cell>
          <table:table-cell office:value-type="string" office:string-value="0">
            <text:p>0</text:p>
          </table:table-cell>
          <table:table-cell office:value-type="string" office:string-value="1043">
            <text:p>104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lectron-packager">
            <text:p>electron-pack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9-18T17:18:06Z">
            <text:p>2023-09-18T17:18:06Z</text:p>
          </table:table-cell>
          <table:table-cell office:value-type="string" office:string-value="unfoldingWord-dev/electronite-packager">
            <text:p>unfoldingWord-dev/electronite-packager</text:p>
          </table:table-cell>
          <table:table-cell office:value-type="string" office:string-value="https://github.com/unfoldingWord-dev/electronite-packager">
            <text:p>https://github.com/unfoldingWord-dev/electronite-packag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electronite-packager">
            <text:p>electronite-packa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nhanced-word-aligner-rcl">
            <text:p>unfoldingWord/enhanced-word-aligner-rcl</text:p>
          </table:table-cell>
          <table:table-cell office:value-type="string" office:string-value="https://github.com/unfoldingWord/enhanced-word-aligner-rcl">
            <text:p>https://github.com/unfoldingWord/enhanced-word-aligner-rcl</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02T13:31:12Z">
            <text:p>2026-06-02T13:31:12Z</text:p>
          </table:table-cell>
          <table:table-cell office:value-type="string" office:string-value="2026-06-02T13:31:12Z">
            <text:p>2026-06-02T13:31:12Z</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PhotoNomad0">
            <text:p>PhotoNomad0</text:p>
          </table:table-cell>
          <table:table-cell office:value-type="string" office:string-value="1">
            <text:p>1</text:p>
          </table:table-cell>
          <table:table-cell office:value-type="string" office:string-value="1">
            <text:p>1</text:p>
          </table:table-cell>
          <table:table-cell office:value-type="string" office:string-value="336">
            <text:p>3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nhanced-word-aligner-rcl">
            <text:p>enhanced-word-aligner-rcl</text:p>
          </table:table-cell>
          <table:table-cell office:value-type="string" office:string-value="https://www.npmjs.com/package/enhanced-word-aligner-rcl">
            <text:p>https://www.npmjs.com/package/enhanced-word-aligner-rcl</text:p>
          </table:table-cell>
          <table:table-cell office:value-type="string" office:string-value="False">
            <text:p>False</text:p>
          </table:table-cell>
          <table:table-cell office:value-type="string" office:string-value="24893">
            <text:p>24893</text:p>
          </table:table-cell>
          <table:table-cell office:value-type="string" office:string-value="2026-06-02T13:32:18.685Z">
            <text:p>2026-06-02T13:32:18.685Z</text:p>
          </table:table-cell>
          <table:table-cell office:value-type="string" office:string-value="gateway-edit">
            <text:p>gateway-edit</text:p>
          </table:table-cell>
          <table:table-cell office:value-type="string" office:string-value="['bible-reference-range', 'uw-wordmapbooster', '@unfoldingword/eslint-config', 'usfm-js', 'word-aligner-rcl', 'string-punctuation-tokenizer', 'word-aligner', 'word-aligner-lib', 'wordmap', 'wordmap-lexer', 'uw-tsv-parser', 'tc-strings']">
            <text:p>['bible-reference-range', 'uw-wordmapbooster', '@unfoldingword/eslint-config', 'usfm-js', 'word-aligner-rcl', 'string-punctuation-tokenizer', 'word-aligner', 'word-aligner-lib', 'wordmap', 'wordmap-lexer', 'uw-tsv-parser', 'tc-strings']</text:p>
          </table:table-cell>
          <table:table-cell office:value-type="string" office:string-value="2026-06-02T13:31:41Z">
            <text:p>2026-06-02T13:31:41Z</text:p>
          </table:table-cell>
          <table:table-cell office:value-type="string" office:string-value="unfoldingWord/enhanced-word-aligner-rcl">
            <text:p>unfoldingWord/enhanced-word-aligner-rcl</text:p>
          </table:table-cell>
          <table:table-cell office:value-type="string" office:string-value="https://github.com/unfoldingWord/enhanced-word-aligner-rcl">
            <text:p>https://github.com/unfoldingWord/enhanced-word-aligner-rcl</text:p>
          </table:table-cell>
          <table:table-cell office:value-type="string" office:string-value="2-Keep">
            <text:p>2-Keep</text:p>
          </table:table-cell>
          <table:table-cell office:value-type="string" office:string-value="externally used - Repository has GitHub dependents or at least 1,000 npm downloads in the last year (24893 downloads).">
            <text:p>externally used - Repository has GitHub dependents or at least 1,000 npm downloads in the last year (2489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4893 downloads in the last year).">
            <text:p>Package has detected local usage, GitHub dependents, or significant npm downloads (24893 downloads in the last year).</text:p>
          </table:table-cell>
          <table:table-cell office:value-type="string" office:string-value="enhanced-word-aligner-rcl">
            <text:p>enhanced-word-aligner-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pitelete-html">
            <text:p>unfoldingWord/epitelete-html</text:p>
          </table:table-cell>
          <table:table-cell office:value-type="string" office:string-value="https://github.com/unfoldingWord/epitelete-html">
            <text:p>https://github.com/unfoldingWord/epitelete-htm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4-18T13:52:37Z">
            <text:p>2024-04-18T13:52:37Z</text:p>
          </table:table-cell>
          <table:table-cell office:value-type="string" office:string-value="2023-02-03T17:24:52Z">
            <text:p>2023-02-03T17:24:52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office:string-value="['abelpz', 'mvahowe', 'mandolyte', 'samueljd', 'klappy']">
            <text:p>['abelpz', 'mvahowe', 'mandolyte', 'samueljd', 'klappy']</text:p>
          </table:table-cell>
          <table:table-cell office:value-type="string" office:string-value="4">
            <text:p>4</text:p>
          </table:table-cell>
          <table:table-cell office:value-type="string" office:string-value="3">
            <text:p>3</text:p>
          </table:table-cell>
          <table:table-cell office:value-type="string" office:string-value="136">
            <text:p>1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pitelete-html">
            <text:p>epitelete-html</text:p>
          </table:table-cell>
          <table:table-cell office:value-type="string" office:string-value="https://www.npmjs.com/package/epitelete-html">
            <text:p>https://www.npmjs.com/package/epitelete-html</text:p>
          </table:table-cell>
          <table:table-cell office:value-type="string" office:string-value="False">
            <text:p>False</text:p>
          </table:table-cell>
          <table:table-cell office:value-type="string" office:string-value="10391">
            <text:p>10391</text:p>
          </table:table-cell>
          <table:table-cell office:value-type="string" office:string-value="2023-07-16T00:28:17.570Z">
            <text:p>2023-07-16T00:28:17.570Z</text:p>
          </table:table-cell>
          <table:table-cell office:value-type="string" office:string-value="['OCE Oak Edit', 'oce-oak-render', 'uw-editor', 'beta-bibel-wiki', '@oce-editor-tools/base-core', '@oce-editor-tools/joy-core', '@oce-editor-tools/joy-pk', '@oce-editor-tools/mui-core', '@oce-editor-tools/mui-pk', '@oce-editor-tools/mui-simple', '@oce-editor-tools/pk-aligner']">
            <text:p>['OCE Oak Edit', 'oce-oak-render', 'uw-editor', 'beta-bibel-wiki', '@oce-editor-tools/base-core', '@oce-editor-tools/joy-core', '@oce-editor-tools/joy-pk', '@oce-editor-tools/mui-core', '@oce-editor-tools/mui-pk', '@oce-editor-tools/mui-simple', '@oce-editor-tools/pk-aligner']</text:p>
          </table:table-cell>
          <table:table-cell office:value-type="string" office:string-value="uw-proskomma">
            <text:p>uw-proskomma</text:p>
          </table:table-cell>
          <table:table-cell office:value-type="string" office:string-value="2023-02-02T13:14:15Z">
            <text:p>2023-02-02T13:14:15Z</text:p>
          </table:table-cell>
          <table:table-cell office:value-type="string" office:string-value="unfoldingWord/epitelete-html">
            <text:p>unfoldingWord/epitelete-html</text:p>
          </table:table-cell>
          <table:table-cell office:value-type="string" office:string-value="https://github.com/unfoldingWord/epitelete-html">
            <text:p>https://github.com/unfoldingWord/epitelete-html</text:p>
          </table:table-cell>
          <table:table-cell office:value-type="string" office:string-value="2-Keep">
            <text:p>2-Keep</text:p>
          </table:table-cell>
          <table:table-cell office:value-type="string" office:string-value="externally used - Repository has GitHub dependents or at least 1,000 npm downloads in the last year (10391 downloads).">
            <text:p>externally used - Repository has GitHub dependents or at least 1,000 npm downloads in the last year (1039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391 downloads in the last year).">
            <text:p>Package has detected local usage, GitHub dependents, or significant npm downloads (10391 downloads in the last year).</text:p>
          </table:table-cell>
          <table:table-cell office:value-type="string" office:string-value="epitelete-html">
            <text:p>epitelete-htm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eslint-config">
            <text:p>unfoldingWord/eslint-config</text:p>
          </table:table-cell>
          <table:table-cell office:value-type="string" office:string-value="https://github.com/unfoldingWord/eslint-config">
            <text:p>https://github.com/unfoldingWord/eslint-config</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7T20:47:13Z">
            <text:p>2023-01-07T20:47:13Z</text:p>
          </table:table-cell>
          <table:table-cell office:value-type="string" office:string-value="2020-12-15T23:29:03Z">
            <text:p>2020-12-15T23:29:03Z</text:p>
          </table:table-cell>
          <table:table-cell office:value-type="string" office:string-value="">
            <text:p/>
          </table:table-cell>
          <table:table-cell office:value-type="string" office:string-value="">
            <text:p/>
          </table:table-cell>
          <table:table-cell office:value-type="string" office:string-value="['RoyalSix', 'Sterling (Jay) Scott']">
            <text:p>['RoyalSix', 'Sterling (Jay) Scott']</text:p>
          </table:table-cell>
          <table:table-cell office:value-type="string" office:string-value="7">
            <text:p>7</text:p>
          </table:table-cell>
          <table:table-cell office:value-type="string" office:string-value="6">
            <text:p>6</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nfoldingword/eslint-config">
            <text:p>@unfoldingword/eslint-config</text:p>
          </table:table-cell>
          <table:table-cell office:value-type="string" office:string-value="https://www.npmjs.com/package/@unfoldingword/eslint-config">
            <text:p>https://www.npmjs.com/package/@unfoldingword/eslint-config</text:p>
          </table:table-cell>
          <table:table-cell office:value-type="string" office:string-value="False">
            <text:p>False</text:p>
          </table:table-cell>
          <table:table-cell office:value-type="string" office:string-value="1384">
            <text:p>1384</text:p>
          </table:table-cell>
          <table:table-cell office:value-type="string" office:string-value="2020-12-10T06:26:46.446Z">
            <text:p>2020-12-10T06:26:46.446Z</text:p>
          </table:table-cell>
          <table:table-cell office:value-type="string" office:string-value="['enhanced-word-aligner-rcl', 'tc-create-app', 'gitea-react-toolkit', 'single-scripture-rcl', 'scripture-resources-rcl', 'datatable-translatable', 'markdown-translatable', 'dcs-react-hooks', 'resource-workspace-rcl', 'simple-text-editor-rcl', 'gitea-offline-poc']">
            <text:p>['enhanced-word-aligner-rcl', 'tc-create-app', 'gitea-react-toolkit', 'single-scripture-rcl', 'scripture-resources-rcl', 'datatable-translatable', 'markdown-translatable', 'dcs-react-hooks', 'resource-workspace-rcl', 'simple-text-editor-rcl', 'gitea-offline-poc']</text:p>
          </table:table-cell>
          <table:table-cell office:value-type="string" office:string-value="">
            <text:p/>
          </table:table-cell>
          <table:table-cell office:value-type="string" office:string-value="2020-12-15T23:29:10Z">
            <text:p>2020-12-15T23:29:10Z</text:p>
          </table:table-cell>
          <table:table-cell office:value-type="string" office:string-value="unfoldingWord/eslint-config">
            <text:p>unfoldingWord/eslint-config</text:p>
          </table:table-cell>
          <table:table-cell office:value-type="string" office:string-value="https://github.com/unfoldingWord/eslint-config">
            <text:p>https://github.com/unfoldingWord/eslint-config</text:p>
          </table:table-cell>
          <table:table-cell office:value-type="string" office:string-value="2-Keep">
            <text:p>2-Keep</text:p>
          </table:table-cell>
          <table:table-cell office:value-type="string" office:string-value="externally used - Repository has GitHub dependents or at least 1,000 npm downloads in the last year (1384 downloads).">
            <text:p>externally used - Repository has GitHub dependents or at least 1,000 npm downloads in the last year (1384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eslint-config">
            <text:p>eslint-config</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fia-kb">
            <text:p>unfoldingWord/fia-kb</text:p>
          </table:table-cell>
          <table:table-cell office:value-type="string" office:string-value="https://github.com/unfoldingWord/fia-kb">
            <text:p>https://github.com/unfoldingWord/fia-kb</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13T19:46:18Z">
            <text:p>2026-03-13T19:46:18Z</text:p>
          </table:table-cell>
          <table:table-cell office:value-type="string" office:string-value="2026-03-13T19:45:51Z">
            <text:p>2026-03-13T19:45:51Z</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3T19:46:02Z">
            <text:p>2026-03-13T19:46:02Z</text:p>
          </table:table-cell>
          <table:table-cell office:value-type="string" office:string-value="unfoldingWord/fia-kb">
            <text:p>unfoldingWord/fia-kb</text:p>
          </table:table-cell>
          <table:table-cell office:value-type="string" office:string-value="https://github.com/unfoldingWord/fia-kb">
            <text:p>https://github.com/unfoldingWord/fia-kb</text:p>
          </table:table-cell>
          <table:table-cell office:value-type="string" office:string-value="2-Keep">
            <text:p>2-Keep</text:p>
          </table:table-cell>
          <table:table-cell office:value-type="string" office:string-value="Active - Last commit was within the last 12 months (3 months ago).">
            <text:p>Active - Last commit was within the last 12 months (3 months ago).</text:p>
          </table:table-cell>
          <table:table-cell office:value-type="string" office:string-value="">
            <text:p/>
          </table:table-cell>
          <table:table-cell office:value-type="string" office:string-value="">
            <text:p/>
          </table:table-cell>
          <table:table-cell office:value-type="string" office:string-value="fia-kb">
            <text:p>fia-k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fia-mcp">
            <text:p>unfoldingWord/fia-mcp</text:p>
          </table:table-cell>
          <table:table-cell office:value-type="string" office:string-value="https://github.com/unfoldingWord/fia-mcp">
            <text:p>https://github.com/unfoldingWord/fia-mc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11T19:28:14Z">
            <text:p>2026-03-11T19:28:14Z</text:p>
          </table:table-cell>
          <table:table-cell office:value-type="string" office:string-value="2026-03-11T19:28:02Z">
            <text:p>2026-03-11T19:28:02Z</text:p>
          </table:table-cell>
          <table:table-cell office:value-type="string" office:string-value="">
            <text:p/>
          </table:table-cell>
          <table:table-cell office:value-type="string" office:string-value="">
            <text:p/>
          </table:table-cell>
          <table:table-cell office:value-type="string" office:string-value="['ILindsley', 'IanLindsley']">
            <text:p>['ILindsley', 'IanLindsley']</text:p>
          </table:table-cell>
          <table:table-cell office:value-type="string" office:string-value="1">
            <text:p>1</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a-mcp">
            <text:p>fia-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1T19:28:18Z">
            <text:p>2026-03-11T19:28:18Z</text:p>
          </table:table-cell>
          <table:table-cell office:value-type="string" office:string-value="unfoldingWord/fia-mcp">
            <text:p>unfoldingWord/fia-mcp</text:p>
          </table:table-cell>
          <table:table-cell office:value-type="string" office:string-value="https://github.com/unfoldingWord/fia-mcp">
            <text:p>https://github.com/unfoldingWord/fia-mcp</text:p>
          </table:table-cell>
          <table:table-cell office:value-type="string" office:string-value="2-Keep">
            <text:p>2-Keep</text:p>
          </table:table-cell>
          <table:table-cell office:value-type="string" office:string-value="Active - Last commit was within the last 12 months (3 months ago).">
            <text:p>Active - Last commit was within the last 12 months (3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fia-mcp">
            <text:p>fia-mc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
            <text:p>unfoldingWord/findr</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
            <text:p>find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
            <text:p>unfoldingWord/findr</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findr">
            <text:p>find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findr/mui">
            <text:p>unfoldingWord/findr/@findr/mui</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mui">
            <text:p>@findr/mui</text:p>
          </table:table-cell>
          <table:table-cell office:value-type="string" office:string-value="https://www.npmjs.com/package/@findr/mui">
            <text:p>https://www.npmjs.com/package/@findr/mui</text:p>
          </table:table-cell>
          <table:table-cell office:value-type="string" office:string-value="">
            <text:p/>
          </table:table-cell>
          <table:table-cell office:value-type="string" office:string-value="716">
            <text:p>716</text:p>
          </table:table-cell>
          <table:table-cell office:value-type="string" office:string-value="2023-06-08T13:43:59.351Z">
            <text:p>2023-06-08T13:43:59.351Z</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findr/mui">
            <text:p>unfoldingWord/findr/@findr/mui</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716 downloads).">
            <text:p>externally used - Repository has GitHub dependents or at least 1,000 npm downloads in the last year (71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16 downloads in the last year).">
            <text:p>Package has detected local usage, GitHub dependents, or significant npm downloads (716 downloads in the last year).</text:p>
          </table:table-cell>
          <table:table-cell office:value-type="string" office:string-value="findr/@findr/mui">
            <text:p>findr/@findr/mu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findr/perf">
            <text:p>unfoldingWord/findr/@findr/perf</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perf">
            <text:p>@findr/perf</text:p>
          </table:table-cell>
          <table:table-cell office:value-type="string" office:string-value="https://www.npmjs.com/package/@findr/perf">
            <text:p>https://www.npmjs.com/package/@findr/perf</text:p>
          </table:table-cell>
          <table:table-cell office:value-type="string" office:string-value="">
            <text:p/>
          </table:table-cell>
          <table:table-cell office:value-type="string" office:string-value="11288">
            <text:p>11288</text:p>
          </table:table-cell>
          <table:table-cell office:value-type="string" office:string-value="2023-06-07T20:24:04.979Z">
            <text:p>2023-06-07T20:24:04.979Z</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findr/perf">
            <text:p>unfoldingWord/findr/@findr/perf</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11288 downloads).">
            <text:p>externally used - Repository has GitHub dependents or at least 1,000 npm downloads in the last year (1128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1288 downloads in the last year).">
            <text:p>Package has detected local usage, GitHub dependents, or significant npm downloads (11288 downloads in the last year).</text:p>
          </table:table-cell>
          <table:table-cell office:value-type="string" office:string-value="findr/@findr/perf">
            <text:p>findr/@findr/perf</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findr/react">
            <text:p>unfoldingWord/findr/@findr/react</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react">
            <text:p>@findr/react</text:p>
          </table:table-cell>
          <table:table-cell office:value-type="string" office:string-value="https://www.npmjs.com/package/@findr/react">
            <text:p>https://www.npmjs.com/package/@findr/react</text:p>
          </table:table-cell>
          <table:table-cell office:value-type="string" office:string-value="">
            <text:p/>
          </table:table-cell>
          <table:table-cell office:value-type="string" office:string-value="552">
            <text:p>552</text:p>
          </table:table-cell>
          <table:table-cell office:value-type="string" office:string-value="2023-06-13T18:39:52.331Z">
            <text:p>2023-06-13T18:39:52.331Z</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findr/react">
            <text:p>unfoldingWord/findr/@findr/react</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552 downloads).">
            <text:p>externally used - Repository has GitHub dependents or at least 1,000 npm downloads in the last year (55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52 downloads in the last year).">
            <text:p>Package has detected local usage, GitHub dependents, or significant npm downloads (552 downloads in the last year).</text:p>
          </table:table-cell>
          <table:table-cell office:value-type="string" office:string-value="findr/@findr/react">
            <text:p>findr/@findr/reac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findr/text">
            <text:p>unfoldingWord/findr/@findr/text</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text">
            <text:p>@findr/tex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findr/text">
            <text:p>unfoldingWord/findr/@findr/text</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findr/@findr/text">
            <text:p>findr/@findr/tex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flask-github-webhook">
            <text:p>unfoldingWord-dev/flask-github-webhook</text:p>
          </table:table-cell>
          <table:table-cell office:value-type="string" office:string-value="https://github.com/unfoldingWord-dev/flask-github-webhook">
            <text:p>https://github.com/unfoldingWord-dev/flask-github-webhook</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6-04-01T16:14:45Z">
            <text:p>2016-04-01T16:14:45Z</text:p>
          </table:table-cell>
          <table:table-cell office:value-type="string" office:string-value="2016-04-01T16:14:44Z">
            <text:p>2016-04-01T16:14:44Z</text:p>
          </table:table-cell>
          <table:table-cell office:value-type="string" office:string-value="">
            <text:p/>
          </table:table-cell>
          <table:table-cell office:value-type="string" office:string-value="razius/github-webhook-handler">
            <text:p>razius/github-webhook-handler</text:p>
          </table:table-cell>
          <table:table-cell office:value-type="string" office:string-value="['razius', 'kcirtapw', 'root', 'Jesse A. Griffin', 'blha303', 'richmahn']">
            <text:p>['razius', 'kcirtapw', 'root', 'Jesse A. Griffin', 'blha303', 'richmahn']</text:p>
          </table:table-cell>
          <table:table-cell office:value-type="string" office:string-value="1">
            <text:p>1</text:p>
          </table:table-cell>
          <table:table-cell office:value-type="string" office:string-value="0">
            <text:p>0</text:p>
          </table:table-cell>
          <table:table-cell office:value-type="string" office:string-value="31">
            <text:p>3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4-01T16:14:45Z">
            <text:p>2016-04-01T16:14:45Z</text:p>
          </table:table-cell>
          <table:table-cell office:value-type="string" office:string-value="unfoldingWord-dev/flask-github-webhook">
            <text:p>unfoldingWord-dev/flask-github-webhook</text:p>
          </table:table-cell>
          <table:table-cell office:value-type="string" office:string-value="https://github.com/unfoldingWord-dev/flask-github-webhook">
            <text:p>https://github.com/unfoldingWord-dev/flask-github-webhook</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flask-github-webhook">
            <text:p>flask-github-webhook</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fred-mcp">
            <text:p>unfoldingWord/fred-mcp</text:p>
          </table:table-cell>
          <table:table-cell office:value-type="string" office:string-value="https://github.com/unfoldingWord/fred-mcp">
            <text:p>https://github.com/unfoldingWord/fred-mcp</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5-07T01:50:37Z">
            <text:p>2026-05-07T01:50:37Z</text:p>
          </table:table-cell>
          <table:table-cell office:value-type="string" office:string-value="2026-05-07T01:50:35Z">
            <text:p>2026-05-07T01:50:35Z</text:p>
          </table:table-cell>
          <table:table-cell office:value-type="string" office:string-value="">
            <text:p/>
          </table:table-cell>
          <table:table-cell office:value-type="string" office:string-value="">
            <text:p/>
          </table:table-cell>
          <table:table-cell office:value-type="string" office:string-value="['IanLindsley', 'claude']">
            <text:p>['IanLindsley', 'claude']</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07T01:50:40Z">
            <text:p>2026-05-07T01:50:40Z</text:p>
          </table:table-cell>
          <table:table-cell office:value-type="string" office:string-value="unfoldingWord/fred-mcp">
            <text:p>unfoldingWord/fred-mcp</text:p>
          </table:table-cell>
          <table:table-cell office:value-type="string" office:string-value="https://github.com/unfoldingWord/fred-mcp">
            <text:p>https://github.com/unfoldingWord/fred-mcp</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
            <text:p/>
          </table:table-cell>
          <table:table-cell office:value-type="string" office:string-value="">
            <text:p/>
          </table:table-cell>
          <table:table-cell office:value-type="string" office:string-value="fred-mcp">
            <text:p>fred-mc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fred-zulip-bot">
            <text:p>unfoldingWord/fred-zulip-bot</text:p>
          </table:table-cell>
          <table:table-cell office:value-type="string" office:string-value="https://github.com/unfoldingWord/fred-zulip-bot">
            <text:p>https://github.com/unfoldingWord/fred-zulip-bo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7T20:31:27Z">
            <text:p>2025-10-07T20:31:27Z</text:p>
          </table:table-cell>
          <table:table-cell office:value-type="string" office:string-value="2025-10-07T20:31:22Z">
            <text:p>2025-10-07T20:31:22Z</text:p>
          </table:table-cell>
          <table:table-cell office:value-type="string" office:string-value="">
            <text:p/>
          </table:table-cell>
          <table:table-cell office:value-type="string" office:string-value="">
            <text:p/>
          </table:table-cell>
          <table:table-cell office:value-type="string" office:string-value="['ijl011', 'Codex Assistant', 'ILindsley', 'abiatarprado', 'IanLindsley', 'drcox633']">
            <text:p>['ijl011', 'Codex Assistant', 'ILindsley', 'abiatarprado', 'IanLindsley', 'drcox633']</text:p>
          </table:table-cell>
          <table:table-cell office:value-type="string" office:string-value="0">
            <text:p>0</text:p>
          </table:table-cell>
          <table:table-cell office:value-type="string" office:string-value="0">
            <text:p>0</text:p>
          </table:table-cell>
          <table:table-cell office:value-type="string" office:string-value="72">
            <text:p>7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7T20:31:31Z">
            <text:p>2025-10-07T20:31:31Z</text:p>
          </table:table-cell>
          <table:table-cell office:value-type="string" office:string-value="unfoldingWord/fred-zulip-bot">
            <text:p>unfoldingWord/fred-zulip-bot</text:p>
          </table:table-cell>
          <table:table-cell office:value-type="string" office:string-value="https://github.com/unfoldingWord/fred-zulip-bot">
            <text:p>https://github.com/unfoldingWord/fred-zulip-bot</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fred-zulip-bot">
            <text:p>fred-zulip-bo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fred-zulip-bot-worker">
            <text:p>unfoldingWord/fred-zulip-bot-worker</text:p>
          </table:table-cell>
          <table:table-cell office:value-type="string" office:string-value="https://github.com/unfoldingWord/fred-zulip-bot-worker">
            <text:p>https://github.com/unfoldingWord/fred-zulip-bot-work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9T16:01:39Z">
            <text:p>2026-05-09T16:01:39Z</text:p>
          </table:table-cell>
          <table:table-cell office:value-type="string" office:string-value="2026-05-09T16:01:39Z">
            <text:p>2026-05-09T16:01:39Z</text:p>
          </table:table-cell>
          <table:table-cell office:value-type="string" office:string-value="">
            <text:p/>
          </table:table-cell>
          <table:table-cell office:value-type="string" office:string-value="">
            <text:p/>
          </table:table-cell>
          <table:table-cell office:value-type="string" office:string-value="['IanLindsley', 'ILindsley']">
            <text:p>['IanLindsley', 'ILindsley']</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red-zulip-bot-worker">
            <text:p>fred-zulip-bo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09T16:01:43Z">
            <text:p>2026-05-09T16:01:43Z</text:p>
          </table:table-cell>
          <table:table-cell office:value-type="string" office:string-value="unfoldingWord/fred-zulip-bot-worker">
            <text:p>unfoldingWord/fred-zulip-bot-worker</text:p>
          </table:table-cell>
          <table:table-cell office:value-type="string" office:string-value="https://github.com/unfoldingWord/fred-zulip-bot-worker">
            <text:p>https://github.com/unfoldingWord/fred-zulip-bot-worker</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fred-zulip-bot-worker">
            <text:p>fred-zulip-bot-wor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gateway-admin">
            <text:p>unfoldingWord/gateway-admin</text:p>
          </table:table-cell>
          <table:table-cell office:value-type="string" office:string-value="https://github.com/unfoldingWord/gateway-admin">
            <text:p>https://github.com/unfoldingWord/gateway-admi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3:54Z">
            <text:p>2026-06-22T04:03:54Z</text:p>
          </table:table-cell>
          <table:table-cell office:value-type="string" office:string-value="2026-06-22T04:03:48Z">
            <text:p>2026-06-22T04:03:48Z</text:p>
          </table:table-cell>
          <table:table-cell office:value-type="string" office:string-value="2024-10-21T20:57:32Z">
            <text:p>2024-10-21T20:57:32Z</text:p>
          </table:table-cell>
          <table:table-cell office:value-type="string" office:string-value="">
            <text:p/>
          </table:table-cell>
          <table:table-cell office:value-type="string" office:string-value="['mandolyte', 'richmahn', 'superdav42', 'theNerd247', 'mannycolon', 'birchamp', 'abelpz', 'Joel-C-Johnson', 'PhotoNomad0']">
            <text:p>['mandolyte', 'richmahn', 'superdav42', 'theNerd247', 'mannycolon', 'birchamp', 'abelpz', 'Joel-C-Johnson', 'PhotoNomad0']</text:p>
          </table:table-cell>
          <table:table-cell office:value-type="string" office:string-value="43">
            <text:p>43</text:p>
          </table:table-cell>
          <table:table-cell office:value-type="string" office:string-value="0">
            <text:p>0</text:p>
          </table:table-cell>
          <table:table-cell office:value-type="string" office:string-value="347">
            <text:p>3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7">
            <text:p>7</text:p>
          </table:table-cell>
          <table:table-cell office:value-type="string" office:string-value="gateway-admin">
            <text:p>gateway-adm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gitea-react-toolkit', 'markdown-translatable', 'resource-workspace-rcl', 'scripture-resources-rcl', 'single-scripture-rcl', 'tc-ui-toolkit', 'translation-helps-rcl', 'uw-content-validation', 'uw-tsv-parser', 'word-aligner', 'usfm-js', 'string-punctuation-tokenizer', 'wordmap-lexer', '@unfoldingword/eslint-config', 'bible-reference-range', 'uw-quote-helpers', 'word-aligner-rcl', 'word-aligner-lib', 'wordmap', 'dcs-js', 'tsv-groupdata-parser', 'uw-bible-parser', 'tc-strings']">
            <text:p>['dcs-branch-merger', 'gitea-react-toolkit', 'markdown-translatable', 'resource-workspace-rcl', 'scripture-resources-rcl', 'single-scripture-rcl', 'tc-ui-toolkit', 'translation-helps-rcl', 'uw-content-validation', 'uw-tsv-parser', 'word-aligner', 'usfm-js', 'string-punctuation-tokenizer', 'wordmap-lexer', '@unfoldingword/eslint-config', 'bible-reference-range', 'uw-quote-helpers', 'word-aligner-rcl', 'word-aligner-lib', 'wordmap', 'dcs-js', 'tsv-groupdata-parser', 'uw-bible-parser', 'tc-strings']</text:p>
          </table:table-cell>
          <table:table-cell office:value-type="string" office:string-value="2026-06-22T04:03:58Z">
            <text:p>2026-06-22T04:03:58Z</text:p>
          </table:table-cell>
          <table:table-cell office:value-type="string" office:string-value="unfoldingWord/gateway-admin">
            <text:p>unfoldingWord/gateway-admin</text:p>
          </table:table-cell>
          <table:table-cell office:value-type="string" office:string-value="https://github.com/unfoldingWord/gateway-admin">
            <text:p>https://github.com/unfoldingWord/gateway-admin</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ateway-admin">
            <text:p>gateway-admi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Published on npmjs by kintsoogii so we cannot deprecate">
            <text:p>Published on npmjs by kintsoogii so we cannot deprecate</text:p>
          </table:table-cell>
          <table:table-cell office:value-type="string" office:string-value="unfoldingWord/gateway-edit">
            <text:p>unfoldingWord/gateway-edit</text:p>
          </table:table-cell>
          <table:table-cell office:value-type="string" office:string-value="https://github.com/unfoldingWord/gateway-edit">
            <text:p>https://github.com/unfoldingWord/gateway-edi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6:31:52Z">
            <text:p>2026-06-10T16:31:52Z</text:p>
          </table:table-cell>
          <table:table-cell office:value-type="string" office:string-value="2026-06-04T14:54:50Z">
            <text:p>2026-06-04T14:54:50Z</text:p>
          </table:table-cell>
          <table:table-cell office:value-type="string" office:string-value="2026-06-10T15:30:42Z">
            <text:p>2026-06-10T15:30:42Z</text:p>
          </table:table-cell>
          <table:table-cell office:value-type="string" office:string-value="">
            <text:p/>
          </table:table-cell>
          <table:table-cell office:value-type="string" office:string-value="['PhotoNomad0', 'mannycolon', 'kintsoogi', 'abelpz', 'Joel-C-Johnson', 'richmahn', 'theNerd247', 'benjamin-test', 'jincypjose', 'larsgson', 'mandolyte', 'claude', 'elsylambert']">
            <text:p>['PhotoNomad0', 'mannycolon', 'kintsoogi', 'abelpz', 'Joel-C-Johnson', 'richmahn', 'theNerd247', 'benjamin-test', 'jincypjose', 'larsgson', 'mandolyte', 'claude', 'elsylambert']</text:p>
          </table:table-cell>
          <table:table-cell office:value-type="string" office:string-value="152">
            <text:p>152</text:p>
          </table:table-cell>
          <table:table-cell office:value-type="string" office:string-value="11">
            <text:p>11</text:p>
          </table:table-cell>
          <table:table-cell office:value-type="string" office:string-value="1532">
            <text:p>1532</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20">
            <text:p>20</text:p>
          </table:table-cell>
          <table:table-cell office:value-type="string" office:string-value="gateway-edit">
            <text:p>gateway-edit</text:p>
          </table:table-cell>
          <table:table-cell office:value-type="string" office:string-value="https://www.npmjs.com/package/gateway-edit">
            <text:p>https://www.npmjs.com/package/gateway-edit</text:p>
          </table:table-cell>
          <table:table-cell office:value-type="string" office:string-value="False">
            <text:p>False</text:p>
          </table:table-cell>
          <table:table-cell office:value-type="string" office:string-value="78">
            <text:p>78</text:p>
          </table:table-cell>
          <table:table-cell office:value-type="string" office:string-value="2024-04-25T19:00:31.705Z">
            <text:p>2024-04-25T19:00:31.705Z</text:p>
          </table:table-cell>
          <table:table-cell office:value-type="string" office:string-value="">
            <text:p/>
          </table:table-cell>
          <table:table-cell office:value-type="string" office:string-value="['bible-reference-rcl', 'enhanced-word-aligner-rcl', 'gitea-react-toolkit', 'markdown-translatable', 'resource-workspace-rcl', 'scripture-resources-rcl', 'scripture-tsv', 'single-scripture-rcl', 'tc-ui-toolkit', 'translation-helps-rcl', 'word-aligner', 'word-aligner-rcl', 'bible-reference-range', 'uw-wordmapbooster', '@unfoldingword/eslint-config', 'usfm-js', 'string-punctuation-tokenizer', 'word-aligner-lib', 'wordmap', 'wordmap-lexer', 'uw-tsv-parser', 'uw-quote-helpers', 'dcs-branch-merger', 'tc-strings', 'tsv-groupdata-parser', 'uw-bible-parser', 'dcs-js']">
            <text:p>['bible-reference-rcl', 'enhanced-word-aligner-rcl', 'gitea-react-toolkit', 'markdown-translatable', 'resource-workspace-rcl', 'scripture-resources-rcl', 'scripture-tsv', 'single-scripture-rcl', 'tc-ui-toolkit', 'translation-helps-rcl', 'word-aligner', 'word-aligner-rcl', 'bible-reference-range', 'uw-wordmapbooster', '@unfoldingword/eslint-config', 'usfm-js', 'string-punctuation-tokenizer', 'word-aligner-lib', 'wordmap', 'wordmap-lexer', 'uw-tsv-parser', 'uw-quote-helpers', 'dcs-branch-merger', 'tc-strings', 'tsv-groupdata-parser', 'uw-bible-parser', 'dcs-js']</text:p>
          </table:table-cell>
          <table:table-cell office:value-type="string" office:string-value="2026-06-04T14:55:14Z">
            <text:p>2026-06-04T14:55:14Z</text:p>
          </table:table-cell>
          <table:table-cell office:value-type="string" office:string-value="unfoldingWord/gateway-edit">
            <text:p>unfoldingWord/gateway-edit</text:p>
          </table:table-cell>
          <table:table-cell office:value-type="string" office:string-value="https://github.com/unfoldingWord/gateway-edit">
            <text:p>https://github.com/unfoldingWord/gateway-edit</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ackage has not been published in over 24 months (26 months ago), has fewer than 100 downloads in the last year (78), and has no detected local consumers.">
            <text:p>Package has not been published in over 24 months (26 months ago), has fewer than 100 downloads in the last year (78), and has no detected local consumers.</text:p>
          </table:table-cell>
          <table:table-cell office:value-type="string" office:string-value="gateway-edit">
            <text:p>gateway-edi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itea-react-toolkit">
            <text:p>unfoldingWord/gitea-react-toolkit</text:p>
          </table:table-cell>
          <table:table-cell office:value-type="string" office:string-value="https://github.com/unfoldingWord/gitea-react-toolkit">
            <text:p>https://github.com/unfoldingWord/gitea-react-toolki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13:12:04Z">
            <text:p>2026-05-12T13:12:04Z</text:p>
          </table:table-cell>
          <table:table-cell office:value-type="string" office:string-value="2026-05-12T13:12:04Z">
            <text:p>2026-05-12T13:12:04Z</text:p>
          </table:table-cell>
          <table:table-cell office:value-type="string" office:string-value="2020-04-23T14:49:23Z">
            <text:p>2020-04-23T14:49:23Z</text:p>
          </table:table-cell>
          <table:table-cell office:value-type="string" office:string-value="['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office:string-value="['klappy', 'RoyalSix', 'ancientTexts-net', 'mannycolon', 'actions-user', 'PhotoNomad0', 'mandolyte', 'Sterling (Jay) Scott', 'superdav42', 'Joel-C-Johnson', 'jincypjose', 'kintsoogi', 'richmahn', 'rady-ben']">
            <text:p>['klappy', 'RoyalSix', 'ancientTexts-net', 'mannycolon', 'actions-user', 'PhotoNomad0', 'mandolyte', 'Sterling (Jay) Scott', 'superdav42', 'Joel-C-Johnson', 'jincypjose', 'kintsoogi', 'richmahn', 'rady-ben']</text:p>
          </table:table-cell>
          <table:table-cell office:value-type="string" office:string-value="27">
            <text:p>27</text:p>
          </table:table-cell>
          <table:table-cell office:value-type="string" office:string-value="21">
            <text:p>21</text:p>
          </table:table-cell>
          <table:table-cell office:value-type="string" office:string-value="922">
            <text:p>9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gitea-react-toolkit">
            <text:p>gitea-react-toolkit</text:p>
          </table:table-cell>
          <table:table-cell office:value-type="string" office:string-value="https://www.npmjs.com/package/gitea-react-toolkit">
            <text:p>https://www.npmjs.com/package/gitea-react-toolkit</text:p>
          </table:table-cell>
          <table:table-cell office:value-type="string" office:string-value="False">
            <text:p>False</text:p>
          </table:table-cell>
          <table:table-cell office:value-type="string" office:string-value="17632">
            <text:p>17632</text:p>
          </table:table-cell>
          <table:table-cell office:value-type="string" office:string-value="2026-05-12T13:15:42.563Z">
            <text:p>2026-05-12T13:15:42.563Z</text:p>
          </table:table-cell>
          <table:table-cell office:value-type="string" office:string-value="['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office:value-type="string" office:string-value="['markdown-translatable', '@unfoldingword/eslint-config']">
            <text:p>['markdown-translatable', '@unfoldingword/eslint-config']</text:p>
          </table:table-cell>
          <table:table-cell office:value-type="string" office:string-value="2026-05-12T13:17:57Z">
            <text:p>2026-05-12T13:17:57Z</text:p>
          </table:table-cell>
          <table:table-cell office:value-type="string" office:string-value="unfoldingWord/gitea-react-toolkit">
            <text:p>unfoldingWord/gitea-react-toolkit</text:p>
          </table:table-cell>
          <table:table-cell office:value-type="string" office:string-value="https://github.com/unfoldingWord/gitea-react-toolkit">
            <text:p>https://github.com/unfoldingWord/gitea-react-toolkit</text:p>
          </table:table-cell>
          <table:table-cell office:value-type="string" office:string-value="2-Keep">
            <text:p>2-Keep</text:p>
          </table:table-cell>
          <table:table-cell office:value-type="string" office:string-value="externally used - Repository has GitHub dependents or at least 1,000 npm downloads in the last year (17632 downloads).">
            <text:p>externally used - Repository has GitHub dependents or at least 1,000 npm downloads in the last year (1763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632 downloads in the last year).">
            <text:p>Package has detected local usage, GitHub dependents, or significant npm downloads (17632 downloads in the last year).</text:p>
          </table:table-cell>
          <table:table-cell office:value-type="string" office:string-value="gitea-react-toolkit">
            <text:p>gitea-react-toolki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go-gogs-client">
            <text:p>unfoldingWord-dev/go-gogs-client</text:p>
          </table:table-cell>
          <table:table-cell office:value-type="string" office:string-value="https://github.com/unfoldingWord-dev/go-gogs-client">
            <text:p>https://github.com/unfoldingWord-dev/go-gogs-client</text:p>
          </table:table-cell>
          <table:table-cell office:value-type="string" office:string-value="Go">
            <text:p>Go</text:p>
          </table:table-cell>
          <table:table-cell office:value-type="string" office:string-value="False">
            <text:p>False</text:p>
          </table:table-cell>
          <table:table-cell office:value-type="string" office:string-value="True">
            <text:p>True</text:p>
          </table:table-cell>
          <table:table-cell office:value-type="string" office:string-value="2016-09-22T23:17:57Z">
            <text:p>2016-09-22T23:17:57Z</text:p>
          </table:table-cell>
          <table:table-cell office:value-type="string" office:string-value="2016-08-30T18:12:39Z">
            <text:p>2016-08-30T18:12:39Z</text:p>
          </table:table-cell>
          <table:table-cell office:value-type="string" office:string-value="">
            <text:p/>
          </table:table-cell>
          <table:table-cell office:value-type="string" office:string-value="gogs/go-gogs-client">
            <text:p>gogs/go-gogs-client</text:p>
          </table:table-cell>
          <table:table-cell office:value-type="string" office:string-value="['unknwon', 'Richard Mahn', 'lstahlman', 'sapk', 'roblabla', 'iwanbk', 'kmadel', 'richmahn', 'rubenv', 'xmonader', 'compressed', 'Josh Frye', 'bkcsoft']">
            <text:p>['unknwon', 'Richard Mahn', 'lstahlman', 'sapk', 'roblabla', 'iwanbk', 'kmadel', 'richmahn', 'rubenv', 'xmonader', 'compressed', 'Josh Frye', 'bkcsoft']</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4-11T22:10:33Z">
            <text:p>2016-04-11T22:10:33Z</text:p>
          </table:table-cell>
          <table:table-cell office:value-type="string" office:string-value="unfoldingWord-dev/go-gogs-client">
            <text:p>unfoldingWord-dev/go-gogs-client</text:p>
          </table:table-cell>
          <table:table-cell office:value-type="string" office:string-value="https://github.com/unfoldingWord-dev/go-gogs-client">
            <text:p>https://github.com/unfoldingWord-dev/go-gogs-clien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go-gogs-client">
            <text:p>go-gogs-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o-rc2sb">
            <text:p>unfoldingWord/go-rc2sb</text:p>
          </table:table-cell>
          <table:table-cell office:value-type="string" office:string-value="https://github.com/unfoldingWord/go-rc2sb">
            <text:p>https://github.com/unfoldingWord/go-rc2sb</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4-28T20:23:11Z">
            <text:p>2026-04-28T20:23:11Z</text:p>
          </table:table-cell>
          <table:table-cell office:value-type="string" office:string-value="2026-04-28T20:21:50Z">
            <text:p>2026-04-28T20:21:50Z</text:p>
          </table:table-cell>
          <table:table-cell office:value-type="string" office:string-value="2026-04-28T20:23:11Z">
            <text:p>2026-04-28T20:23:11Z</text:p>
          </table:table-cell>
          <table:table-cell office:value-type="string" office:string-value="unfoldingWord/dcs">
            <text:p>unfoldingWord/dcs</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28T20:21:57Z">
            <text:p>2026-04-28T20:21:57Z</text:p>
          </table:table-cell>
          <table:table-cell office:value-type="string" office:string-value="unfoldingWord/go-rc2sb">
            <text:p>unfoldingWord/go-rc2sb</text:p>
          </table:table-cell>
          <table:table-cell office:value-type="string" office:string-value="https://github.com/unfoldingWord/go-rc2sb">
            <text:p>https://github.com/unfoldingWord/go-rc2sb</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go-rc2sb">
            <text:p>go-rc2s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hackathon-zpp">
            <text:p>unfoldingWord-dev/hackathon-zpp</text:p>
          </table:table-cell>
          <table:table-cell office:value-type="string" office:string-value="https://github.com/unfoldingWord-dev/hackathon-zpp">
            <text:p>https://github.com/unfoldingWord-dev/hackathon-zpp</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18-02-10T01:07:00Z">
            <text:p>2018-02-10T01:07:00Z</text:p>
          </table:table-cell>
          <table:table-cell office:value-type="string" office:string-value="2018-02-10T01:07:00Z">
            <text:p>2018-02-10T01:07:00Z</text:p>
          </table:table-cell>
          <table:table-cell office:value-type="string" office:string-value="">
            <text:p/>
          </table:table-cell>
          <table:table-cell office:value-type="string" office:string-value="tgrecojs/nextjs-blogger">
            <text:p>tgrecojs/nextjs-blogger</text:p>
          </table:table-cell>
          <table:table-cell office:value-type="string" office:string-value="['Thomas Greco', 'tgrecojs', 'zacjones93']">
            <text:p>['Thomas Greco', 'tgrecojs', 'zacjones93']</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3T19:19:04Z">
            <text:p>2025-12-03T19:19:04Z</text:p>
          </table:table-cell>
          <table:table-cell office:value-type="string" office:string-value="unfoldingWord-dev/hackathon-zpp">
            <text:p>unfoldingWord-dev/hackathon-zpp</text:p>
          </table:table-cell>
          <table:table-cell office:value-type="string" office:string-value="https://github.com/unfoldingWord-dev/hackathon-zpp">
            <text:p>https://github.com/unfoldingWord-dev/hackathon-zpp</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hackathon-zpp">
            <text:p>hackathon-z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HebrewLexicon">
            <text:p>unfoldingWord-dev/HebrewLexicon</text:p>
          </table:table-cell>
          <table:table-cell office:value-type="string" office:string-value="https://github.com/unfoldingWord-dev/HebrewLexicon">
            <text:p>https://github.com/unfoldingWord-dev/HebrewLexicon</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0-01-03T16:24:58Z">
            <text:p>2020-01-03T16:24:58Z</text:p>
          </table:table-cell>
          <table:table-cell office:value-type="string" office:string-value="2020-01-03T16:24:57Z">
            <text:p>2020-01-03T16:24:57Z</text:p>
          </table:table-cell>
          <table:table-cell office:value-type="string" office:string-value="">
            <text:p/>
          </table:table-cell>
          <table:table-cell office:value-type="string" office:string-value="PhotoNomad0/HebrewLexicon">
            <text:p>PhotoNomad0/HebrewLexicon</text:p>
          </table:table-cell>
          <table:table-cell office:value-type="string" office:string-value="['joeldruark', 'DavidTroidl', 'dowens76', 'PhotoNomad0', 'scruffian', 'destatez', 'sinri']">
            <text:p>['joeldruark', 'DavidTroidl', 'dowens76', 'PhotoNomad0', 'scruffian', 'destatez', 'sinri']</text:p>
          </table:table-cell>
          <table:table-cell office:value-type="string" office:string-value="0">
            <text:p>0</text:p>
          </table:table-cell>
          <table:table-cell office:value-type="string" office:string-value="0">
            <text:p>0</text:p>
          </table:table-cell>
          <table:table-cell office:value-type="string" office:string-value="373">
            <text:p>37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trongs-parse">
            <text:p>strongs-par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1-03T16:25:13Z">
            <text:p>2020-01-03T16:25:13Z</text:p>
          </table:table-cell>
          <table:table-cell office:value-type="string" office:string-value="unfoldingWord-dev/HebrewLexicon">
            <text:p>unfoldingWord-dev/HebrewLexicon</text:p>
          </table:table-cell>
          <table:table-cell office:value-type="string" office:string-value="https://github.com/unfoldingWord-dev/HebrewLexicon">
            <text:p>https://github.com/unfoldingWord-dev/HebrewLexic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HebrewLexicon">
            <text:p>HebrewLexico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inventoryst">
            <text:p>unfoldingWord/inventoryst</text:p>
          </table:table-cell>
          <table:table-cell office:value-type="string" office:string-value="https://github.com/unfoldingWord/inventoryst">
            <text:p>https://github.com/unfoldingWord/inventorys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4-02T09:43:44Z">
            <text:p>2026-04-02T09:43:44Z</text:p>
          </table:table-cell>
          <table:table-cell office:value-type="string" office:string-value="2026-04-02T09:43:40Z">
            <text:p>2026-04-02T09:43:40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123">
            <text:p>1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02T09:43:48Z">
            <text:p>2026-04-02T09:43:48Z</text:p>
          </table:table-cell>
          <table:table-cell office:value-type="string" office:string-value="unfoldingWord/inventoryst">
            <text:p>unfoldingWord/inventoryst</text:p>
          </table:table-cell>
          <table:table-cell office:value-type="string" office:string-value="https://github.com/unfoldingWord/inventoryst">
            <text:p>https://github.com/unfoldingWord/inventoryst</text:p>
          </table:table-cell>
          <table:table-cell office:value-type="string" office:string-value="2-Keep">
            <text:p>2-Keep</text:p>
          </table:table-cell>
          <table:table-cell office:value-type="string" office:string-value="Active - Last commit was within the last 12 months (2 months ago).">
            <text:p>Active - Last commit was within the last 12 months (2 months ago).</text:p>
          </table:table-cell>
          <table:table-cell office:value-type="string" office:string-value="">
            <text:p/>
          </table:table-cell>
          <table:table-cell office:value-type="string" office:string-value="">
            <text:p/>
          </table:table-cell>
          <table:table-cell office:value-type="string" office:string-value="inventoryst">
            <text:p>inventorys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keybase_git_backup">
            <text:p>unfoldingWord/keybase_git_backup</text:p>
          </table:table-cell>
          <table:table-cell office:value-type="string" office:string-value="https://github.com/unfoldingWord/keybase_git_backup">
            <text:p>https://github.com/unfoldingWord/keybase_git_backup</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4T15:07:37Z">
            <text:p>2026-06-04T15:07:37Z</text:p>
          </table:table-cell>
          <table:table-cell office:value-type="string" office:string-value="2026-06-04T15:07:34Z">
            <text:p>2026-06-04T15:07:34Z</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31">
            <text:p>3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4T15:11:14Z">
            <text:p>2026-06-04T15:11:14Z</text:p>
          </table:table-cell>
          <table:table-cell office:value-type="string" office:string-value="unfoldingWord/keybase_git_backup">
            <text:p>unfoldingWord/keybase_git_backup</text:p>
          </table:table-cell>
          <table:table-cell office:value-type="string" office:string-value="https://github.com/unfoldingWord/keybase_git_backup">
            <text:p>https://github.com/unfoldingWord/keybase_git_backup</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keybase_git_backup">
            <text:p>keybase_git_backu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kr1-data-scripts">
            <text:p>unfoldingWord/kr1-data-scripts</text:p>
          </table:table-cell>
          <table:table-cell office:value-type="string" office:string-value="https://github.com/unfoldingWord/kr1-data-scripts">
            <text:p>https://github.com/unfoldingWord/kr1-data-script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2T04:31:56Z">
            <text:p>2025-12-12T04:31:56Z</text:p>
          </table:table-cell>
          <table:table-cell office:value-type="string" office:string-value="2025-12-12T04:31:51Z">
            <text:p>2025-12-12T04:31:51Z</text:p>
          </table:table-cell>
          <table:table-cell office:value-type="string" office:string-value="">
            <text:p/>
          </table:table-cell>
          <table:table-cell office:value-type="string" office:string-value="">
            <text:p/>
          </table:table-cell>
          <table:table-cell office:value-type="string" office:string-value="['IanLindsley', 'drcox633']">
            <text:p>['IanLindsley', 'drcox633']</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12T04:31:59Z">
            <text:p>2025-12-12T04:31:59Z</text:p>
          </table:table-cell>
          <table:table-cell office:value-type="string" office:string-value="unfoldingWord/kr1-data-scripts">
            <text:p>unfoldingWord/kr1-data-scripts</text:p>
          </table:table-cell>
          <table:table-cell office:value-type="string" office:string-value="https://github.com/unfoldingWord/kr1-data-scripts">
            <text:p>https://github.com/unfoldingWord/kr1-data-scripts</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
            <text:p/>
          </table:table-cell>
          <table:table-cell office:value-type="string" office:string-value="">
            <text:p/>
          </table:table-cell>
          <table:table-cell office:value-type="string" office:string-value="kr1-data-scripts">
            <text:p>kr1-data-scrip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lambda-tw-strongs-list-generator">
            <text:p>unfoldingWord/lambda-tw-strongs-list-generator</text:p>
          </table:table-cell>
          <table:table-cell office:value-type="string" office:string-value="https://github.com/unfoldingWord/lambda-tw-strongs-list-generator">
            <text:p>https://github.com/unfoldingWord/lambda-tw-strongs-list-generator</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0T12:36:08Z">
            <text:p>2025-09-10T12:36:08Z</text:p>
          </table:table-cell>
          <table:table-cell office:value-type="string" office:string-value="2025-09-10T12:36:07Z">
            <text:p>2025-09-10T12:36:07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10T12:36:11Z">
            <text:p>2025-09-10T12:36:11Z</text:p>
          </table:table-cell>
          <table:table-cell office:value-type="string" office:string-value="unfoldingWord/lambda-tw-strongs-list-generator">
            <text:p>unfoldingWord/lambda-tw-strongs-list-generator</text:p>
          </table:table-cell>
          <table:table-cell office:value-type="string" office:string-value="https://github.com/unfoldingWord/lambda-tw-strongs-list-generator">
            <text:p>https://github.com/unfoldingWord/lambda-tw-strongs-list-generator</text:p>
          </table:table-cell>
          <table:table-cell office:value-type="string" office:string-value="2-Keep">
            <text:p>2-Keep</text:p>
          </table:table-cell>
          <table:table-cell office:value-type="string" office:string-value="Active - Last commit was within the last 12 months (9 months ago).">
            <text:p>Active - Last commit was within the last 12 months (9 months ago).</text:p>
          </table:table-cell>
          <table:table-cell office:value-type="string" office:string-value="">
            <text:p/>
          </table:table-cell>
          <table:table-cell office:value-type="string" office:string-value="">
            <text:p/>
          </table:table-cell>
          <table:table-cell office:value-type="string" office:string-value="lambda-tw-strongs-list-generator">
            <text:p>lambda-tw-strongs-list-genera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language-search">
            <text:p>unfoldingWord/language-search</text:p>
          </table:table-cell>
          <table:table-cell office:value-type="string" office:string-value="https://github.com/unfoldingWord/language-search">
            <text:p>https://github.com/unfoldingWord/language-search</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8T16:25:04Z">
            <text:p>2025-12-18T16:25:04Z</text:p>
          </table:table-cell>
          <table:table-cell office:value-type="string" office:string-value="2025-12-18T16:25:00Z">
            <text:p>2025-12-18T16:25:00Z</text:p>
          </table:table-cell>
          <table:table-cell office:value-type="string" office:string-value="">
            <text:p/>
          </table:table-cell>
          <table:table-cell office:value-type="string" office:string-value="">
            <text:p/>
          </table:table-cell>
          <table:table-cell office:value-type="string" office:string-value="['yakob-aleksandrovich', 'root', 'paltman']">
            <text:p>['yakob-aleksandrovich', 'root', 'paltman']</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18T16:25:08Z">
            <text:p>2025-12-18T16:25:08Z</text:p>
          </table:table-cell>
          <table:table-cell office:value-type="string" office:string-value="unfoldingWord/language-search">
            <text:p>unfoldingWord/language-search</text:p>
          </table:table-cell>
          <table:table-cell office:value-type="string" office:string-value="https://github.com/unfoldingWord/language-search">
            <text:p>https://github.com/unfoldingWord/language-search</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
            <text:p/>
          </table:table-cell>
          <table:table-cell office:value-type="string" office:string-value="">
            <text:p/>
          </table:table-cell>
          <table:table-cell office:value-type="string" office:string-value="language-search">
            <text:p>language-search</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loki-exporter">
            <text:p>unfoldingWord/loki-exporter</text:p>
          </table:table-cell>
          <table:table-cell office:value-type="string" office:string-value="https://github.com/unfoldingWord/loki-exporter">
            <text:p>https://github.com/unfoldingWord/loki-export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8T16:01:29Z">
            <text:p>2026-05-08T16:01:29Z</text:p>
          </table:table-cell>
          <table:table-cell office:value-type="string" office:string-value="2026-05-08T16:01:24Z">
            <text:p>2026-05-08T16:01:24Z</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2T06:33:59Z">
            <text:p>2026-06-22T06:33:59Z</text:p>
          </table:table-cell>
          <table:table-cell office:value-type="string" office:string-value="unfoldingWord/loki-exporter">
            <text:p>unfoldingWord/loki-exporter</text:p>
          </table:table-cell>
          <table:table-cell office:value-type="string" office:string-value="https://github.com/unfoldingWord/loki-exporter">
            <text:p>https://github.com/unfoldingWord/loki-exporter</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
            <text:p/>
          </table:table-cell>
          <table:table-cell office:value-type="string" office:string-value="">
            <text:p/>
          </table:table-cell>
          <table:table-cell office:value-type="string" office:string-value="loki-exporter">
            <text:p>loki-expor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arkdown-translatable">
            <text:p>unfoldingWord/markdown-translatable</text:p>
          </table:table-cell>
          <table:table-cell office:value-type="string" office:string-value="https://github.com/unfoldingWord/markdown-translatable">
            <text:p>https://github.com/unfoldingWord/markdown-translatabl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4-04T20:57:49Z">
            <text:p>2025-04-04T20:57:49Z</text:p>
          </table:table-cell>
          <table:table-cell office:value-type="string" office:string-value="2023-03-08T14:57:07Z">
            <text:p>2023-03-08T14:57:07Z</text:p>
          </table:table-cell>
          <table:table-cell office:value-type="string" office:string-value="">
            <text:p/>
          </table:table-cell>
          <table:table-cell office:value-type="string" office:string-value="['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office:string-value="['klappy', 'ancientTexts-net', 'RoyalSix', 'mannycolon', 'mandolyte', 'superdav42', 'Joel-C-Johnson', 'Sterling (Jay) Scott', 'jincypjose', 'dependabot[bot]', 'PhotoNomad0', 'larsgson']">
            <text:p>['klappy', 'ancientTexts-net', 'RoyalSix', 'mannycolon', 'mandolyte', 'superdav42', 'Joel-C-Johnson', 'Sterling (Jay) Scott', 'jincypjose', 'dependabot[bot]', 'PhotoNomad0', 'larsgson']</text:p>
          </table:table-cell>
          <table:table-cell office:value-type="string" office:string-value="20">
            <text:p>20</text:p>
          </table:table-cell>
          <table:table-cell office:value-type="string" office:string-value="20">
            <text:p>20</text:p>
          </table:table-cell>
          <table:table-cell office:value-type="string" office:string-value="333">
            <text:p>33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markdown-translatable">
            <text:p>markdown-translatable</text:p>
          </table:table-cell>
          <table:table-cell office:value-type="string" office:string-value="https://www.npmjs.com/package/markdown-translatable">
            <text:p>https://www.npmjs.com/package/markdown-translatable</text:p>
          </table:table-cell>
          <table:table-cell office:value-type="string" office:string-value="False">
            <text:p>False</text:p>
          </table:table-cell>
          <table:table-cell office:value-type="string" office:string-value="19649">
            <text:p>19649</text:p>
          </table:table-cell>
          <table:table-cell office:value-type="string" office:string-value="2023-03-07T15:00:29.476Z">
            <text:p>2023-03-07T15:00:29.476Z</text:p>
          </table:table-cell>
          <table:table-cell office:value-type="string" office:string-value="['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office:value-type="string" office:string-value="@unfoldingword/eslint-config">
            <text:p>@unfoldingword/eslint-config</text:p>
          </table:table-cell>
          <table:table-cell office:value-type="string" office:string-value="2025-04-03T14:40:01Z">
            <text:p>2025-04-03T14:40:01Z</text:p>
          </table:table-cell>
          <table:table-cell office:value-type="string" office:string-value="unfoldingWord/markdown-translatable">
            <text:p>unfoldingWord/markdown-translatable</text:p>
          </table:table-cell>
          <table:table-cell office:value-type="string" office:string-value="https://github.com/unfoldingWord/markdown-translatable">
            <text:p>https://github.com/unfoldingWord/markdown-translatable</text:p>
          </table:table-cell>
          <table:table-cell office:value-type="string" office:string-value="2-Keep">
            <text:p>2-Keep</text:p>
          </table:table-cell>
          <table:table-cell office:value-type="string" office:string-value="externally used - Repository has GitHub dependents or at least 1,000 npm downloads in the last year (19649 downloads).">
            <text:p>externally used - Repository has GitHub dependents or at least 1,000 npm downloads in the last year (1964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9649 downloads in the last year).">
            <text:p>Package has detected local usage, GitHub dependents, or significant npm downloads (19649 downloads in the last year).</text:p>
          </table:table-cell>
          <table:table-cell office:value-type="string" office:string-value="markdown-translatable">
            <text:p>markdown-translatabl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metrics">
            <text:p>unfoldingWord/metrics</text:p>
          </table:table-cell>
          <table:table-cell office:value-type="string" office:string-value="https://github.com/unfoldingWord/metrics">
            <text:p>https://github.com/unfoldingWord/metric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18T15:31:33Z">
            <text:p>2026-02-18T15:31:33Z</text:p>
          </table:table-cell>
          <table:table-cell office:value-type="string" office:string-value="2026-02-18T15:31:28Z">
            <text:p>2026-02-18T15:31:28Z</text:p>
          </table:table-cell>
          <table:table-cell office:value-type="string" office:string-value="">
            <text:p/>
          </table:table-cell>
          <table:table-cell office:value-type="string" office:string-value="">
            <text:p/>
          </table:table-cell>
          <table:table-cell office:value-type="string" office:string-value="['jag3773', 'yakob-aleksandrovich', 'richmahn', 'bspidel', 'jesse@unfoldingword.org', 'Jaap-Jan Swijnenburg', 'dependabot[bot]', 'elgohr']">
            <text:p>['jag3773', 'yakob-aleksandrovich', 'richmahn', 'bspidel', 'jesse@unfoldingword.org', 'Jaap-Jan Swijnenburg', 'dependabot[bot]', 'elgohr']</text:p>
          </table:table-cell>
          <table:table-cell office:value-type="string" office:string-value="2">
            <text:p>2</text:p>
          </table:table-cell>
          <table:table-cell office:value-type="string" office:string-value="2">
            <text:p>2</text:p>
          </table:table-cell>
          <table:table-cell office:value-type="string" office:string-value="127">
            <text:p>1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18T15:31:37Z">
            <text:p>2026-02-18T15:31:37Z</text:p>
          </table:table-cell>
          <table:table-cell office:value-type="string" office:string-value="unfoldingWord/metrics">
            <text:p>unfoldingWord/metrics</text:p>
          </table:table-cell>
          <table:table-cell office:value-type="string" office:string-value="https://github.com/unfoldingWord/metrics">
            <text:p>https://github.com/unfoldingWord/metrics</text:p>
          </table:table-cell>
          <table:table-cell office:value-type="string" office:string-value="2-Keep">
            <text:p>2-Keep</text:p>
          </table:table-cell>
          <table:table-cell office:value-type="string" office:string-value="Active - Last commit was within the last 12 months (4 months ago).">
            <text:p>Active - Last commit was within the last 12 months (4 months ago).</text:p>
          </table:table-cell>
          <table:table-cell office:value-type="string" office:string-value="">
            <text:p/>
          </table:table-cell>
          <table:table-cell office:value-type="string" office:string-value="">
            <text:p/>
          </table:table-cell>
          <table:table-cell office:value-type="string" office:string-value="metrics">
            <text:p>metric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minitracker">
            <text:p>unfoldingWord/minitracker</text:p>
          </table:table-cell>
          <table:table-cell office:value-type="string" office:string-value="https://github.com/unfoldingWord/minitracker">
            <text:p>https://github.com/unfoldingWord/minitrack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8:11Z">
            <text:p>2026-06-03T15:58:11Z</text:p>
          </table:table-cell>
          <table:table-cell office:value-type="string" office:string-value="2026-06-03T15:58:10Z">
            <text:p>2026-06-03T15:58:10Z</text:p>
          </table:table-cell>
          <table:table-cell office:value-type="string" office:string-value="">
            <text:p/>
          </table:table-cell>
          <table:table-cell office:value-type="string" office:string-value="">
            <text:p/>
          </table:table-cell>
          <table:table-cell office:value-type="string" office:string-value="['yakob-aleksandrovich', 'richmahn']">
            <text:p>['yakob-aleksandrovich', 'richmahn']</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3T16:02:34Z">
            <text:p>2026-06-03T16:02:34Z</text:p>
          </table:table-cell>
          <table:table-cell office:value-type="string" office:string-value="unfoldingWord/minitracker">
            <text:p>unfoldingWord/minitracker</text:p>
          </table:table-cell>
          <table:table-cell office:value-type="string" office:string-value="https://github.com/unfoldingWord/minitracker">
            <text:p>https://github.com/unfoldingWord/minitracker</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minitracker">
            <text:p>minitrac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node-cli-add-gl-quotes-to-tsv-files">
            <text:p>unfoldingWord/node-cli-add-gl-quotes-to-tsv-files</text:p>
          </table:table-cell>
          <table:table-cell office:value-type="string" office:string-value="https://github.com/unfoldingWord/node-cli-add-gl-quotes-to-tsv-files">
            <text:p>https://github.com/unfoldingWord/node-cli-add-gl-quotes-to-tsv-file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22:53:14Z">
            <text:p>2025-11-03T22:53:14Z</text:p>
          </table:table-cell>
          <table:table-cell office:value-type="string" office:string-value="2025-11-03T22:53:12Z">
            <text:p>2025-11-03T22:53:12Z</text:p>
          </table:table-cell>
          <table:table-cell office:value-type="string" office:string-value="2025-04-23T20:48:30Z">
            <text:p>2025-04-23T20:48:30Z</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29">
            <text:p>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add-gl-quotes-to-tsv-files">
            <text:p>add-gl-quotes-to-tsv-fil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2025-11-03T22:53:18Z">
            <text:p>2025-11-03T22:53:18Z</text:p>
          </table:table-cell>
          <table:table-cell office:value-type="string" office:string-value="unfoldingWord/node-cli-add-gl-quotes-to-tsv-files">
            <text:p>unfoldingWord/node-cli-add-gl-quotes-to-tsv-files</text:p>
          </table:table-cell>
          <table:table-cell office:value-type="string" office:string-value="https://github.com/unfoldingWord/node-cli-add-gl-quotes-to-tsv-files">
            <text:p>https://github.com/unfoldingWord/node-cli-add-gl-quotes-to-tsv-files</text:p>
          </table:table-cell>
          <table:table-cell office:value-type="string" office:string-value="2-Keep">
            <text:p>2-Keep</text:p>
          </table:table-cell>
          <table:table-cell office:value-type="string" office:string-value="Active - Last commit was within the last 12 months (7 months ago).">
            <text:p>Active - Last commit was within the last 12 months (7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node-cli-add-gl-quotes-to-tsv-files">
            <text:p>node-cli-add-gl-quotes-to-tsv-fil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door43-client">
            <text:p>unfoldingWord-dev/node-door43-client</text:p>
          </table:table-cell>
          <table:table-cell office:value-type="string" office:string-value="https://github.com/unfoldingWord-dev/node-door43-client">
            <text:p>https://github.com/unfoldingWord-dev/node-door43-clie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08T17:04:23Z">
            <text:p>2022-12-08T17:04:23Z</text:p>
          </table:table-cell>
          <table:table-cell office:value-type="string" office:string-value="2019-11-06T17:32:07Z">
            <text:p>2019-11-06T17:32:07Z</text:p>
          </table:table-cell>
          <table:table-cell office:value-type="string" office:string-value="2019-11-06T17:30:48Z">
            <text:p>2019-11-06T17:30:48Z</text:p>
          </table:table-cell>
          <table:table-cell office:value-type="string" office:string-value="['Bible-Translation-Tools/BTT-Writer-Desktop', 'WycliffeAssociates/BTT_Writer_Resource_Updater', 'unfoldingWord-dev/ts-desktop']">
            <text:p>['Bible-Translation-Tools/BTT-Writer-Desktop', 'WycliffeAssociates/BTT_Writer_Resource_Updater', 'unfoldingWord-dev/ts-desktop']</text:p>
          </table:table-cell>
          <table:table-cell office:value-type="string" office:string-value="da1nerd">
            <text:p>da1nerd</text:p>
          </table:table-cell>
          <table:table-cell office:value-type="string" office:string-value="13">
            <text:p>13</text:p>
          </table:table-cell>
          <table:table-cell office:value-type="string" office:string-value="13">
            <text:p>13</text:p>
          </table:table-cell>
          <table:table-cell office:value-type="string" office:string-value="214">
            <text:p>2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door43-client">
            <text:p>door43-client</text:p>
          </table:table-cell>
          <table:table-cell office:value-type="string" office:string-value="https://www.npmjs.com/package/door43-client">
            <text:p>https://www.npmjs.com/package/door43-client</text:p>
          </table:table-cell>
          <table:table-cell office:value-type="string" office:string-value="False">
            <text:p>False</text:p>
          </table:table-cell>
          <table:table-cell office:value-type="string" office:string-value="1621">
            <text:p>1621</text:p>
          </table:table-cell>
          <table:table-cell office:value-type="string" office:string-value="2019-11-06T17:33:42.928Z">
            <text:p>2019-11-06T17:33:42.928Z</text:p>
          </table:table-cell>
          <table:table-cell office:value-type="string" office:string-value="">
            <text:p/>
          </table:table-cell>
          <table:table-cell office:value-type="string" office:string-value="resource-container">
            <text:p>resource-container</text:p>
          </table:table-cell>
          <table:table-cell office:value-type="string" office:string-value="2019-11-06T17:32:34Z">
            <text:p>2019-11-06T17:32:34Z</text:p>
          </table:table-cell>
          <table:table-cell office:value-type="string" office:string-value="unfoldingWord-dev/node-door43-client">
            <text:p>unfoldingWord-dev/node-door43-client</text:p>
          </table:table-cell>
          <table:table-cell office:value-type="string" office:string-value="https://github.com/unfoldingWord-dev/node-door43-client">
            <text:p>https://github.com/unfoldingWord-dev/node-door43-client</text:p>
          </table:table-cell>
          <table:table-cell office:value-type="string" office:string-value="2-Keep">
            <text:p>2-Keep</text:p>
          </table:table-cell>
          <table:table-cell office:value-type="string" office:string-value="externally used - Repository has GitHub dependents or at least 1,000 npm downloads in the last year (1621 downloads).">
            <text:p>externally used - Repository has GitHub dependents or at least 1,000 npm downloads in the last year (162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21 downloads in the last year).">
            <text:p>Package has detected local usage, GitHub dependents, or significant npm downloads (1621 downloads in the last year).</text:p>
          </table:table-cell>
          <table:table-cell office:value-type="string" office:string-value="node-door43-client">
            <text:p>node-door43-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door43-rc">
            <text:p>unfoldingWord-dev/node-door43-rc</text:p>
          </table:table-cell>
          <table:table-cell office:value-type="string" office:string-value="https://github.com/unfoldingWord-dev/node-door43-rc">
            <text:p>https://github.com/unfoldingWord-dev/node-door43-r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8-30T17:28:52Z">
            <text:p>2016-08-30T17:28:52Z</text:p>
          </table:table-cell>
          <table:table-cell office:value-type="string" office:string-value="2016-08-30T17:28:49Z">
            <text:p>2016-08-30T17:28:49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rc">
            <text:p>door43-rc</text:p>
          </table:table-cell>
          <table:table-cell office:value-type="string" office:string-value="https://www.npmjs.com/package/door43-rc">
            <text:p>https://www.npmjs.com/package/door43-rc</text:p>
          </table:table-cell>
          <table:table-cell office:value-type="string" office:string-value="True">
            <text:p>True</text:p>
          </table:table-cell>
          <table:table-cell office:value-type="string" office:string-value="1535">
            <text:p>1535</text:p>
          </table:table-cell>
          <table:table-cell office:value-type="string" office:string-value="2016-09-01T18:35:44.393Z">
            <text:p>2016-09-01T18:35:44.393Z</text:p>
          </table:table-cell>
          <table:table-cell office:value-type="string" office:string-value="">
            <text:p/>
          </table:table-cell>
          <table:table-cell office:value-type="string" office:string-value="">
            <text:p/>
          </table:table-cell>
          <table:table-cell office:value-type="string" office:string-value="2016-08-25T18:39:16Z">
            <text:p>2016-08-25T18:39:16Z</text:p>
          </table:table-cell>
          <table:table-cell office:value-type="string" office:string-value="unfoldingWord-dev/node-door43-rc">
            <text:p>unfoldingWord-dev/node-door43-rc</text:p>
          </table:table-cell>
          <table:table-cell office:value-type="string" office:string-value="https://github.com/unfoldingWord-dev/node-door43-rc">
            <text:p>https://github.com/unfoldingWord-dev/node-door43-rc</text:p>
          </table:table-cell>
          <table:table-cell office:value-type="string" office:string-value="2-Keep">
            <text:p>2-Keep</text:p>
          </table:table-cell>
          <table:table-cell office:value-type="string" office:string-value="externally used - Repository has GitHub dependents or at least 1,000 npm downloads in the last year (1535 downloads).">
            <text:p>externally used - Repository has GitHub dependents or at least 1,000 npm downloads in the last year (1535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cell office:value-type="string" office:string-value="node-door43-rc">
            <text:p>node-door43-r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gogs-client">
            <text:p>unfoldingWord-dev/node-gogs-client</text:p>
          </table:table-cell>
          <table:table-cell office:value-type="string" office:string-value="https://github.com/unfoldingWord-dev/node-gogs-client">
            <text:p>https://github.com/unfoldingWord-dev/node-gogs-clie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19T16:22:58Z">
            <text:p>2021-04-19T16:22:58Z</text:p>
          </table:table-cell>
          <table:table-cell office:value-type="string" office:string-value="2018-09-12T17:40:36Z">
            <text:p>2018-09-12T17:40:36Z</text:p>
          </table:table-cell>
          <table:table-cell office:value-type="string" office:string-value="2018-06-05T18:06:48Z">
            <text:p>2018-06-05T18:06:48Z</text:p>
          </table:table-cell>
          <table:table-cell office:value-type="string" office:string-value="['FoustAndrew/wordAlignment', 'aunger/wacs-client', 'Bible-Translation-Tools/BTT-Writer-Desktop', 'unfoldingWord/wordAlignment', 'unfoldingWord/checking-tool-wrapper', 'unfoldingWord-dev/ts-desktop', 'dottgonzo/vue-starter', 'unfoldingWord/translationCore']">
            <text:p>['FoustAndrew/wordAlignment', 'aunger/wacs-client', 'Bible-Translation-Tools/BTT-Writer-Desktop', 'unfoldingWord/wordAlignment', 'unfoldingWord/checking-tool-wrapper', 'unfoldingWord-dev/ts-desktop', 'dottgonzo/vue-starter', 'unfoldingWord/translationCore']</text:p>
          </table:table-cell>
          <table:table-cell office:value-type="string" office:string-value="['da1nerd', 'Thomas Klemz', 'jonasof']">
            <text:p>['da1nerd', 'Thomas Klemz', 'jonasof']</text:p>
          </table:table-cell>
          <table:table-cell office:value-type="string" office:string-value="1">
            <text:p>1</text:p>
          </table:table-cell>
          <table:table-cell office:value-type="string" office:string-value="1">
            <text:p>1</text:p>
          </table:table-cell>
          <table:table-cell office:value-type="string" office:string-value="64">
            <text:p>6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gogs-client">
            <text:p>gogs-client</text:p>
          </table:table-cell>
          <table:table-cell office:value-type="string" office:string-value="https://www.npmjs.com/package/gogs-client">
            <text:p>https://www.npmjs.com/package/gogs-client</text:p>
          </table:table-cell>
          <table:table-cell office:value-type="string" office:string-value="False">
            <text:p>False</text:p>
          </table:table-cell>
          <table:table-cell office:value-type="string" office:string-value="6739">
            <text:p>6739</text:p>
          </table:table-cell>
          <table:table-cell office:value-type="string" office:string-value="2016-07-13T00:07:45.833Z">
            <text:p>2016-07-13T00:07:45.833Z</text:p>
          </table:table-cell>
          <table:table-cell office:value-type="string" office:string-value="['translationCore', 'wordAlignment', 'checking-tool-wrapper']">
            <text:p>['translationCore', 'wordAlignment', 'checking-tool-wrapper']</text:p>
          </table:table-cell>
          <table:table-cell office:value-type="string" office:string-value="">
            <text:p/>
          </table:table-cell>
          <table:table-cell office:value-type="string" office:string-value="2024-06-21T17:58:57Z">
            <text:p>2024-06-21T17:58:57Z</text:p>
          </table:table-cell>
          <table:table-cell office:value-type="string" office:string-value="unfoldingWord-dev/node-gogs-client">
            <text:p>unfoldingWord-dev/node-gogs-client</text:p>
          </table:table-cell>
          <table:table-cell office:value-type="string" office:string-value="https://github.com/unfoldingWord-dev/node-gogs-client">
            <text:p>https://github.com/unfoldingWord-dev/node-gogs-client</text:p>
          </table:table-cell>
          <table:table-cell office:value-type="string" office:string-value="2-Keep">
            <text:p>2-Keep</text:p>
          </table:table-cell>
          <table:table-cell office:value-type="string" office:string-value="externally used - Repository has GitHub dependents or at least 1,000 npm downloads in the last year (6739 downloads).">
            <text:p>externally used - Repository has GitHub dependents or at least 1,000 npm downloads in the last year (673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739 downloads in the last year).">
            <text:p>Package has detected local usage, GitHub dependents, or significant npm downloads (6739 downloads in the last year).</text:p>
          </table:table-cell>
          <table:table-cell office:value-type="string" office:string-value="node-gogs-client">
            <text:p>node-gogs-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resource-container">
            <text:p>unfoldingWord-dev/node-resource-container</text:p>
          </table:table-cell>
          <table:table-cell office:value-type="string" office:string-value="https://github.com/unfoldingWord-dev/node-resource-container">
            <text:p>https://github.com/unfoldingWord-dev/node-resource-contain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5-08T20:11:54Z">
            <text:p>2017-05-08T20:11:54Z</text:p>
          </table:table-cell>
          <table:table-cell office:value-type="string" office:string-value="2017-01-04T01:13:31Z">
            <text:p>2017-01-04T01:13:31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82">
            <text:p>8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container">
            <text:p>resource-container</text:p>
          </table:table-cell>
          <table:table-cell office:value-type="string" office:string-value="https://www.npmjs.com/package/resource-container">
            <text:p>https://www.npmjs.com/package/resource-container</text:p>
          </table:table-cell>
          <table:table-cell office:value-type="string" office:string-value="False">
            <text:p>False</text:p>
          </table:table-cell>
          <table:table-cell office:value-type="string" office:string-value="3253">
            <text:p>3253</text:p>
          </table:table-cell>
          <table:table-cell office:value-type="string" office:string-value="2017-02-28T01:01:07.451Z">
            <text:p>2017-02-28T01:01:07.451Z</text:p>
          </table:table-cell>
          <table:table-cell office:value-type="string" office:string-value="door43-client">
            <text:p>door43-client</text:p>
          </table:table-cell>
          <table:table-cell office:value-type="string" office:string-value="">
            <text:p/>
          </table:table-cell>
          <table:table-cell office:value-type="string" office:string-value="2017-03-07T23:45:06Z">
            <text:p>2017-03-07T23:45:06Z</text:p>
          </table:table-cell>
          <table:table-cell office:value-type="string" office:string-value="unfoldingWord-dev/node-resource-container">
            <text:p>unfoldingWord-dev/node-resource-container</text:p>
          </table:table-cell>
          <table:table-cell office:value-type="string" office:string-value="https://github.com/unfoldingWord-dev/node-resource-container">
            <text:p>https://github.com/unfoldingWord-dev/node-resource-container</text:p>
          </table:table-cell>
          <table:table-cell office:value-type="string" office:string-value="2-Keep">
            <text:p>2-Keep</text:p>
          </table:table-cell>
          <table:table-cell office:value-type="string" office:string-value="externally used - Repository has GitHub dependents or at least 1,000 npm downloads in the last year (3253 downloads).">
            <text:p>externally used - Repository has GitHub dependents or at least 1,000 npm downloads in the last year (325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253 downloads in the last year).">
            <text:p>Package has detected local usage, GitHub dependents, or significant npm downloads (3253 downloads in the last year).</text:p>
          </table:table-cell>
          <table:table-cell office:value-type="string" office:string-value="node-resource-container">
            <text:p>node-resource-contai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node-twl-generator">
            <text:p>unfoldingWord/node-twl-generator</text:p>
          </table:table-cell>
          <table:table-cell office:value-type="string" office:string-value="https://github.com/unfoldingWord/node-twl-generator">
            <text:p>https://github.com/unfoldingWord/node-twl-generato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21:44:49Z">
            <text:p>2026-06-16T21:44:49Z</text:p>
          </table:table-cell>
          <table:table-cell office:value-type="string" office:string-value="2026-06-16T21:44:35Z">
            <text:p>2026-06-16T21:44:35Z</text:p>
          </table:table-cell>
          <table:table-cell office:value-type="string" office:string-value="">
            <text:p/>
          </table:table-cell>
          <table:table-cell office:value-type="string" office:string-value="">
            <text:p/>
          </table:table-cell>
          <table:table-cell office:value-type="string" office:string-value="['richmahn', 'rich.mahn@unfoldingword.org']">
            <text:p>['richmahn', 'rich.mahn@unfoldingword.org']</text:p>
          </table:table-cell>
          <table:table-cell office:value-type="string" office:string-value="0">
            <text:p>0</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wl-generator">
            <text:p>twl-generator</text:p>
          </table:table-cell>
          <table:table-cell office:value-type="string" office:string-value="https://www.npmjs.com/package/twl-generator">
            <text:p>https://www.npmjs.com/package/twl-generator</text:p>
          </table:table-cell>
          <table:table-cell office:value-type="string" office:string-value="False">
            <text:p>False</text:p>
          </table:table-cell>
          <table:table-cell office:value-type="string" office:string-value="5667">
            <text:p>5667</text:p>
          </table:table-cell>
          <table:table-cell office:value-type="string" office:string-value="2026-06-16T10:00:58.589Z">
            <text:p>2026-06-16T10:00:58.589Z</text:p>
          </table:table-cell>
          <table:table-cell office:value-type="string" office:string-value="tsv-twl-creation-app">
            <text:p>tsv-twl-creation-app</text:p>
          </table:table-cell>
          <table:table-cell office:value-type="string" office:string-value="['tsv-quote-converters', 'usfm-alignment-remover']">
            <text:p>['tsv-quote-converters', 'usfm-alignment-remover']</text:p>
          </table:table-cell>
          <table:table-cell office:value-type="string" office:string-value="2026-06-16T21:45:05Z">
            <text:p>2026-06-16T21:45:05Z</text:p>
          </table:table-cell>
          <table:table-cell office:value-type="string" office:string-value="unfoldingWord/node-twl-generator">
            <text:p>unfoldingWord/node-twl-generator</text:p>
          </table:table-cell>
          <table:table-cell office:value-type="string" office:string-value="https://github.com/unfoldingWord/node-twl-generator">
            <text:p>https://github.com/unfoldingWord/node-twl-generator</text:p>
          </table:table-cell>
          <table:table-cell office:value-type="string" office:string-value="2-Keep">
            <text:p>2-Keep</text:p>
          </table:table-cell>
          <table:table-cell office:value-type="string" office:string-value="externally used - Repository has GitHub dependents or at least 1,000 npm downloads in the last year (5667 downloads).">
            <text:p>externally used - Repository has GitHub dependents or at least 1,000 npm downloads in the last year (566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667 downloads in the last year).">
            <text:p>Package has detected local usage, GitHub dependents, or significant npm downloads (5667 downloads in the last year).</text:p>
          </table:table-cell>
          <table:table-cell office:value-type="string" office:string-value="node-twl-generator">
            <text:p>node-twl-genera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totools">
            <text:p>unfoldingWord-dev/nototools</text:p>
          </table:table-cell>
          <table:table-cell office:value-type="string" office:string-value="https://github.com/unfoldingWord-dev/nototools">
            <text:p>https://github.com/unfoldingWord-dev/nototools</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7-04-15T13:09:18Z">
            <text:p>2017-04-15T13:09:18Z</text:p>
          </table:table-cell>
          <table:table-cell office:value-type="string" office:string-value="2017-04-06T20:18:34Z">
            <text:p>2017-04-06T20:18:34Z</text:p>
          </table:table-cell>
          <table:table-cell office:value-type="string" office:string-value="">
            <text:p/>
          </table:table-cell>
          <table:table-cell office:value-type="string" office:string-value="notofonts/nototools">
            <text:p>notofonts/nototools</text:p>
          </table:table-cell>
          <table:table-cell office:value-type="string" office:string-value="['dougfelt', 'roozbehp', 'James Godfrey-Kittle', 'jamesgk', 'behdad', 'thaths', 'zjusbo', 'jungshik', 'Kanjilearner817', 'davelab6', 'adrientetar', 'moyogo', 'marekjez86', 'iverg', 'khaledhosny', 'm4rc1e', 'Marek Jeziorek', 'n7s', 'No Author']">
            <text:p>['dougfelt', 'roozbehp', 'James Godfrey-Kittle', 'jamesgk', 'behdad', 'thaths', 'zjusbo', 'jungshik', 'Kanjilearner817', 'davelab6', 'adrientetar', 'moyogo', 'marekjez86', 'iverg', 'khaledhosny', 'm4rc1e', 'Marek Jeziorek', 'n7s', 'No Author']</text:p>
          </table:table-cell>
          <table:table-cell office:value-type="string" office:string-value="0">
            <text:p>0</text:p>
          </table:table-cell>
          <table:table-cell office:value-type="string" office:string-value="0">
            <text:p>0</text:p>
          </table:table-cell>
          <table:table-cell office:value-type="string" office:string-value="1248">
            <text:p>124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4-16T02:34:59Z">
            <text:p>2019-04-16T02:34:59Z</text:p>
          </table:table-cell>
          <table:table-cell office:value-type="string" office:string-value="unfoldingWord-dev/nototools">
            <text:p>unfoldingWord-dev/nototools</text:p>
          </table:table-cell>
          <table:table-cell office:value-type="string" office:string-value="https://github.com/unfoldingWord-dev/nototools">
            <text:p>https://github.com/unfoldingWord-dev/noto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nototools">
            <text:p>noto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obs-app">
            <text:p>unfoldingWord/obs-app</text:p>
          </table:table-cell>
          <table:table-cell office:value-type="string" office:string-value="https://github.com/unfoldingWord/obs-app">
            <text:p>https://github.com/unfoldingWord/obs-ap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5T15:14:30Z">
            <text:p>2026-05-05T15:14:30Z</text:p>
          </table:table-cell>
          <table:table-cell office:value-type="string" office:string-value="2026-05-05T15:14:21Z">
            <text:p>2026-05-05T15:14:21Z</text:p>
          </table:table-cell>
          <table:table-cell office:value-type="string" office:string-value="2025-06-03T04:28:11Z">
            <text:p>2025-06-03T04:28:11Z</text:p>
          </table:table-cell>
          <table:table-cell office:value-type="string" office:string-value="">
            <text:p/>
          </table:table-cell>
          <table:table-cell office:value-type="string" office:string-value="['abelpz', 'eliaspinero']">
            <text:p>['abelpz', 'eliaspinero']</text:p>
          </table:table-cell>
          <table:table-cell office:value-type="string" office:string-value="7">
            <text:p>7</text:p>
          </table:table-cell>
          <table:table-cell office:value-type="string" office:string-value="0">
            <text:p>0</text:p>
          </table:table-cell>
          <table:table-cell office:value-type="string" office:string-value="101">
            <text:p>101</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1">
            <text:p>1</text:p>
          </table:table-cell>
          <table:table-cell office:value-type="string" office:string-value="obs-app">
            <text:p>obs-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05T15:16:31Z">
            <text:p>2026-05-05T15:16:31Z</text:p>
          </table:table-cell>
          <table:table-cell office:value-type="string" office:string-value="unfoldingWord/obs-app">
            <text:p>unfoldingWord/obs-app</text:p>
          </table:table-cell>
          <table:table-cell office:value-type="string" office:string-value="https://github.com/unfoldingWord/obs-app">
            <text:p>https://github.com/unfoldingWord/obs-app</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bs-app">
            <text:p>obs-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obs-study">
            <text:p>unfoldingWord-box3/obs-study</text:p>
          </table:table-cell>
          <table:table-cell office:value-type="string" office:string-value="https://github.com/unfoldingWord-box3/obs-study">
            <text:p>https://github.com/unfoldingWord-box3/obs-study</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6-25T11:20:36Z">
            <text:p>2024-06-25T11:20:36Z</text:p>
          </table:table-cell>
          <table:table-cell office:value-type="string" office:string-value="2024-06-20T09:34:16Z">
            <text:p>2024-06-20T09:34:16Z</text:p>
          </table:table-cell>
          <table:table-cell office:value-type="string" office:string-value="">
            <text:p/>
          </table:table-cell>
          <table:table-cell office:value-type="string" office:string-value="idiomaspuentes/obs-study">
            <text:p>idiomaspuentes/obs-study</text:p>
          </table:table-cell>
          <table:table-cell office:value-type="string" office:string-value="['abelpz', 'eliaspinero', 'ilich valbuena', 'Jordani77', 'larsgson']">
            <text:p>['abelpz', 'eliaspinero', 'ilich valbuena', 'Jordani77', 'larsgson']</text:p>
          </table:table-cell>
          <table:table-cell office:value-type="string" office:string-value="0">
            <text:p>0</text:p>
          </table:table-cell>
          <table:table-cell office:value-type="string" office:string-value="0">
            <text:p>0</text:p>
          </table:table-cell>
          <table:table-cell office:value-type="string" office:string-value="43">
            <text:p>4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20T09:34:41Z">
            <text:p>2024-06-20T09:34:41Z</text:p>
          </table:table-cell>
          <table:table-cell office:value-type="string" office:string-value="unfoldingWord-box3/obs-study">
            <text:p>unfoldingWord-box3/obs-study</text:p>
          </table:table-cell>
          <table:table-cell office:value-type="string" office:string-value="https://github.com/unfoldingWord-box3/obs-study">
            <text:p>https://github.com/unfoldingWord-box3/obs-stud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obs-study">
            <text:p>obs-stud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t">
            <text:p>unfoldingWord/obt</text:p>
          </table:table-cell>
          <table:table-cell office:value-type="string" office:string-value="https://github.com/unfoldingWord/obt">
            <text:p>https://github.com/unfoldingWord/obt</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3-18T18:36:38Z">
            <text:p>2026-03-18T18:36:38Z</text:p>
          </table:table-cell>
          <table:table-cell office:value-type="string" office:string-value="2026-03-18T14:39:13Z">
            <text:p>2026-03-18T14:39:13Z</text:p>
          </table:table-cell>
          <table:table-cell office:value-type="string" office:string-value="2026-03-18T14:44:36Z">
            <text:p>2026-03-18T14:44:36Z</text:p>
          </table:table-cell>
          <table:table-cell office:value-type="string" office:string-value="hiscoder-com/obt">
            <text:p>hiscoder-com/obt</text:p>
          </table:table-cell>
          <table:table-cell office:value-type="string" office:string-value="['foxprogs', 'Valyukhov', 'Vorobushec', 'Pavel064', 'Birch Champeon', 'dimanya', 'abelpz', 'ancientTexts-net', 'birchamp', 'DenisArger', 'gecraft']">
            <text:p>['foxprogs', 'Valyukhov', 'Vorobushec', 'Pavel064', 'Birch Champeon', 'dimanya', 'abelpz', 'ancientTexts-net', 'birchamp', 'DenisArger', 'gecraft']</text:p>
          </table:table-cell>
          <table:table-cell office:value-type="string" office:string-value="10">
            <text:p>10</text:p>
          </table:table-cell>
          <table:table-cell office:value-type="string" office:string-value="0">
            <text:p>0</text:p>
          </table:table-cell>
          <table:table-cell office:value-type="string" office:string-value="1534">
            <text:p>153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bsa">
            <text:p>bs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resource-workspace-rcl', 'scripture-resources-rcl', 'tc-ui-toolkit', 'translation-helps-rcl', 'word-aligner']">
            <text:p>['bible-reference-rcl', 'resource-workspace-rcl', 'scripture-resources-rcl', 'tc-ui-toolkit', 'translation-helps-rcl', 'word-aligner']</text:p>
          </table:table-cell>
          <table:table-cell office:value-type="string" office:string-value="2026-03-18T14:39:46Z">
            <text:p>2026-03-18T14:39:46Z</text:p>
          </table:table-cell>
          <table:table-cell office:value-type="string" office:string-value="unfoldingWord/obt">
            <text:p>unfoldingWord/obt</text:p>
          </table:table-cell>
          <table:table-cell office:value-type="string" office:string-value="https://github.com/unfoldingWord/obt">
            <text:p>https://github.com/unfoldingWord/ob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bt">
            <text:p>ob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
            <text:p>unfoldingWord/oce-editor-tools</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
            <text:p>oce-editor-to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
            <text:p>unfoldingWord/oce-editor-tools</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
            <text:p>oce-editor-too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base">
            <text:p>unfoldingWord/oce-editor-tools/@oce-editor-tools/bas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base">
            <text:p>@oce-editor-tools/base</text:p>
          </table:table-cell>
          <table:table-cell office:value-type="string" office:string-value="https://www.npmjs.com/package/@oce-editor-tools/base">
            <text:p>https://www.npmjs.com/package/@oce-editor-tools/base</text:p>
          </table:table-cell>
          <table:table-cell office:value-type="string" office:string-value="">
            <text:p/>
          </table:table-cell>
          <table:table-cell office:value-type="string" office:string-value="1870">
            <text:p>1870</text:p>
          </table:table-cell>
          <table:table-cell office:value-type="string" office:string-value="2024-01-10T09:41:28.021Z">
            <text:p>2024-01-10T09:41:28.021Z</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base">
            <text:p>unfoldingWord/oce-editor-tools/@oce-editor-tools/bas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1870 downloads).">
            <text:p>externally used - Repository has GitHub dependents or at least 1,000 npm downloads in the last year (187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70 downloads in the last year).">
            <text:p>Package has detected local usage, GitHub dependents, or significant npm downloads (1870 downloads in the last year).</text:p>
          </table:table-cell>
          <table:table-cell office:value-type="string" office:string-value="oce-editor-tools/@oce-editor-tools/base">
            <text:p>oce-editor-tools/@oce-editor-tools/bas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base-core">
            <text:p>unfoldingWord/oce-editor-tools/@oce-editor-tools/base-cor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base-core">
            <text:p>@oce-editor-tools/base-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2024-07-15T12:12:44Z">
            <text:p>2024-07-15T12:12:44Z</text:p>
          </table:table-cell>
          <table:table-cell office:value-type="string" office:string-value="unfoldingWord/oce-editor-tools/@oce-editor-tools/base-core">
            <text:p>unfoldingWord/oce-editor-tools/@oce-editor-tools/base-cor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oce-editor-tools/base-core">
            <text:p>oce-editor-tools/@oce-editor-tools/base-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joy-core">
            <text:p>unfoldingWord/oce-editor-tools/@oce-editor-tools/joy-cor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joy-core">
            <text:p>@oce-editor-tools/joy-core</text:p>
          </table:table-cell>
          <table:table-cell office:value-type="string" office:string-value="https://www.npmjs.com/package/@oce-editor-tools/joy-core">
            <text:p>https://www.npmjs.com/package/@oce-editor-tools/joy-core</text:p>
          </table:table-cell>
          <table:table-cell office:value-type="string" office:string-value="">
            <text:p/>
          </table:table-cell>
          <table:table-cell office:value-type="string" office:string-value="426">
            <text:p>426</text:p>
          </table:table-cell>
          <table:table-cell office:value-type="string" office:string-value="2024-01-10T09:45:57.004Z">
            <text:p>2024-01-10T09:45:57.004Z</text:p>
          </table:table-cell>
          <table:table-cell office:value-type="string" office:string-value="">
            <text:p/>
          </table:table-cell>
          <table:table-cell office:value-type="string" office:string-value="epitelete-html">
            <text:p>epitelete-html</text:p>
          </table:table-cell>
          <table:table-cell office:value-type="string" office:string-value="2024-07-15T12:12:44Z">
            <text:p>2024-07-15T12:12:44Z</text:p>
          </table:table-cell>
          <table:table-cell office:value-type="string" office:string-value="unfoldingWord/oce-editor-tools/@oce-editor-tools/joy-core">
            <text:p>unfoldingWord/oce-editor-tools/@oce-editor-tools/joy-cor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426 downloads).">
            <text:p>externally used - Repository has GitHub dependents or at least 1,000 npm downloads in the last year (42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26 downloads in the last year).">
            <text:p>Package has detected local usage, GitHub dependents, or significant npm downloads (426 downloads in the last year).</text:p>
          </table:table-cell>
          <table:table-cell office:value-type="string" office:string-value="oce-editor-tools/@oce-editor-tools/joy-core">
            <text:p>oce-editor-tools/@oce-editor-tools/joy-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joy-pk">
            <text:p>unfoldingWord/oce-editor-tools/@oce-editor-tools/joy-pk</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joy-pk">
            <text:p>@oce-editor-tools/joy-pk</text:p>
          </table:table-cell>
          <table:table-cell office:value-type="string" office:string-value="https://www.npmjs.com/package/@oce-editor-tools/joy-pk">
            <text:p>https://www.npmjs.com/package/@oce-editor-tools/joy-pk</text:p>
          </table:table-cell>
          <table:table-cell office:value-type="string" office:string-value="">
            <text:p/>
          </table:table-cell>
          <table:table-cell office:value-type="string" office:string-value="134">
            <text:p>134</text:p>
          </table:table-cell>
          <table:table-cell office:value-type="string" office:string-value="2024-01-10T09:47:45.958Z">
            <text:p>2024-01-10T09:47:45.958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2024-07-15T12:12:44Z">
            <text:p>2024-07-15T12:12:44Z</text:p>
          </table:table-cell>
          <table:table-cell office:value-type="string" office:string-value="unfoldingWord/oce-editor-tools/@oce-editor-tools/joy-pk">
            <text:p>unfoldingWord/oce-editor-tools/@oce-editor-tools/joy-pk</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134 downloads).">
            <text:p>externally used - Repository has GitHub dependents or at least 1,000 npm downloads in the last year (13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34 downloads in the last year).">
            <text:p>Package has detected local usage, GitHub dependents, or significant npm downloads (134 downloads in the last year).</text:p>
          </table:table-cell>
          <table:table-cell office:value-type="string" office:string-value="oce-editor-tools/@oce-editor-tools/joy-pk">
            <text:p>oce-editor-tools/@oce-editor-tools/joy-pk</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joy-verse-navigator">
            <text:p>unfoldingWord/oce-editor-tools/@oce-editor-tools/joy-verse-navigator</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joy-verse-navigator">
            <text:p>@oce-editor-tools/joy-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joy-verse-navigator">
            <text:p>unfoldingWord/oce-editor-tools/@oce-editor-tools/joy-verse-navigator</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oce-editor-tools/joy-verse-navigator">
            <text:p>oce-editor-tools/@oce-editor-tools/joy-verse-naviga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mui-core">
            <text:p>unfoldingWord/oce-editor-tools/@oce-editor-tools/mui-cor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mui-core">
            <text:p>@oce-editor-tools/mui-core</text:p>
          </table:table-cell>
          <table:table-cell office:value-type="string" office:string-value="https://www.npmjs.com/package/@oce-editor-tools/mui-core">
            <text:p>https://www.npmjs.com/package/@oce-editor-tools/mui-core</text:p>
          </table:table-cell>
          <table:table-cell office:value-type="string" office:string-value="">
            <text:p/>
          </table:table-cell>
          <table:table-cell office:value-type="string" office:string-value="665">
            <text:p>665</text:p>
          </table:table-cell>
          <table:table-cell office:value-type="string" office:string-value="2024-01-10T09:42:28.550Z">
            <text:p>2024-01-10T09:42:28.550Z</text:p>
          </table:table-cell>
          <table:table-cell office:value-type="string" office:string-value="">
            <text:p/>
          </table:table-cell>
          <table:table-cell office:value-type="string" office:string-value="epitelete-html">
            <text:p>epitelete-html</text:p>
          </table:table-cell>
          <table:table-cell office:value-type="string" office:string-value="2024-07-15T12:12:44Z">
            <text:p>2024-07-15T12:12:44Z</text:p>
          </table:table-cell>
          <table:table-cell office:value-type="string" office:string-value="unfoldingWord/oce-editor-tools/@oce-editor-tools/mui-core">
            <text:p>unfoldingWord/oce-editor-tools/@oce-editor-tools/mui-cor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665 downloads).">
            <text:p>externally used - Repository has GitHub dependents or at least 1,000 npm downloads in the last year (66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65 downloads in the last year).">
            <text:p>Package has detected local usage, GitHub dependents, or significant npm downloads (665 downloads in the last year).</text:p>
          </table:table-cell>
          <table:table-cell office:value-type="string" office:string-value="oce-editor-tools/@oce-editor-tools/mui-core">
            <text:p>oce-editor-tools/@oce-editor-tools/mui-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mui-pk">
            <text:p>unfoldingWord/oce-editor-tools/@oce-editor-tools/mui-pk</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mui-pk">
            <text:p>@oce-editor-tools/mui-pk</text:p>
          </table:table-cell>
          <table:table-cell office:value-type="string" office:string-value="https://www.npmjs.com/package/@oce-editor-tools/mui-pk">
            <text:p>https://www.npmjs.com/package/@oce-editor-tools/mui-pk</text:p>
          </table:table-cell>
          <table:table-cell office:value-type="string" office:string-value="">
            <text:p/>
          </table:table-cell>
          <table:table-cell office:value-type="string" office:string-value="354">
            <text:p>354</text:p>
          </table:table-cell>
          <table:table-cell office:value-type="string" office:string-value="2024-01-10T09:45:17.176Z">
            <text:p>2024-01-10T09:45:17.176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2024-07-15T12:12:44Z">
            <text:p>2024-07-15T12:12:44Z</text:p>
          </table:table-cell>
          <table:table-cell office:value-type="string" office:string-value="unfoldingWord/oce-editor-tools/@oce-editor-tools/mui-pk">
            <text:p>unfoldingWord/oce-editor-tools/@oce-editor-tools/mui-pk</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354 downloads).">
            <text:p>externally used - Repository has GitHub dependents or at least 1,000 npm downloads in the last year (35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54 downloads in the last year).">
            <text:p>Package has detected local usage, GitHub dependents, or significant npm downloads (354 downloads in the last year).</text:p>
          </table:table-cell>
          <table:table-cell office:value-type="string" office:string-value="oce-editor-tools/@oce-editor-tools/mui-pk">
            <text:p>oce-editor-tools/@oce-editor-tools/mui-pk</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mui-simple">
            <text:p>unfoldingWord/oce-editor-tools/@oce-editor-tools/mui-simpl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mui-simple">
            <text:p>@oce-editor-tools/mui-simple</text:p>
          </table:table-cell>
          <table:table-cell office:value-type="string" office:string-value="https://www.npmjs.com/package/@oce-editor-tools/mui-simple">
            <text:p>https://www.npmjs.com/package/@oce-editor-tools/mui-simple</text:p>
          </table:table-cell>
          <table:table-cell office:value-type="string" office:string-value="">
            <text:p/>
          </table:table-cell>
          <table:table-cell office:value-type="string" office:string-value="401">
            <text:p>401</text:p>
          </table:table-cell>
          <table:table-cell office:value-type="string" office:string-value="2024-01-10T09:45:39.010Z">
            <text:p>2024-01-10T09:45:39.010Z</text:p>
          </table:table-cell>
          <table:table-cell office:value-type="string" office:string-value="">
            <text:p/>
          </table:table-cell>
          <table:table-cell office:value-type="string" office:string-value="epitelete-html">
            <text:p>epitelete-html</text:p>
          </table:table-cell>
          <table:table-cell office:value-type="string" office:string-value="2024-07-15T12:12:44Z">
            <text:p>2024-07-15T12:12:44Z</text:p>
          </table:table-cell>
          <table:table-cell office:value-type="string" office:string-value="unfoldingWord/oce-editor-tools/@oce-editor-tools/mui-simple">
            <text:p>unfoldingWord/oce-editor-tools/@oce-editor-tools/mui-simpl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401 downloads).">
            <text:p>externally used - Repository has GitHub dependents or at least 1,000 npm downloads in the last year (40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01 downloads in the last year).">
            <text:p>Package has detected local usage, GitHub dependents, or significant npm downloads (401 downloads in the last year).</text:p>
          </table:table-cell>
          <table:table-cell office:value-type="string" office:string-value="oce-editor-tools/@oce-editor-tools/mui-simple">
            <text:p>oce-editor-tools/@oce-editor-tools/mui-simpl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mui-verse-navigator">
            <text:p>unfoldingWord/oce-editor-tools/@oce-editor-tools/mui-verse-navigator</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mui-verse-navigator">
            <text:p>@oce-editor-tools/mui-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mui-verse-navigator">
            <text:p>unfoldingWord/oce-editor-tools/@oce-editor-tools/mui-verse-navigator</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oce-editor-tools/mui-verse-navigator">
            <text:p>oce-editor-tools/@oce-editor-tools/mui-verse-naviga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pk-aligner">
            <text:p>unfoldingWord/oce-editor-tools/@oce-editor-tools/pk-aligner</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pk-aligner">
            <text:p>@oce-editor-tools/pk-alig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string-punctuation-tokenizer', 'word-aligner-rcl']">
            <text:p>['epitelete-html', 'string-punctuation-tokenizer', 'word-aligner-rcl']</text:p>
          </table:table-cell>
          <table:table-cell office:value-type="string" office:string-value="2024-07-15T12:12:44Z">
            <text:p>2024-07-15T12:12:44Z</text:p>
          </table:table-cell>
          <table:table-cell office:value-type="string" office:string-value="unfoldingWord/oce-editor-tools/@oce-editor-tools/pk-aligner">
            <text:p>unfoldingWord/oce-editor-tools/@oce-editor-tools/pk-aligner</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oce-editor-tools/pk-aligner">
            <text:p>oce-editor-tools/@oce-editor-tools/pk-align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verse-mapper">
            <text:p>unfoldingWord/oce-editor-tools/@oce-editor-tools/verse-mapper</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verse-mapper">
            <text:p>@oce-editor-tools/verse-mapper</text:p>
          </table:table-cell>
          <table:table-cell office:value-type="string" office:string-value="https://www.npmjs.com/package/@oce-editor-tools/verse-mapper">
            <text:p>https://www.npmjs.com/package/@oce-editor-tools/verse-mapper</text:p>
          </table:table-cell>
          <table:table-cell office:value-type="string" office:string-value="">
            <text:p/>
          </table:table-cell>
          <table:table-cell office:value-type="string" office:string-value="100">
            <text:p>100</text:p>
          </table:table-cell>
          <table:table-cell office:value-type="string" office:string-value="2024-01-10T09:46:28.087Z">
            <text:p>2024-01-10T09:46:28.087Z</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verse-mapper">
            <text:p>unfoldingWord/oce-editor-tools/@oce-editor-tools/verse-mapper</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100 downloads).">
            <text:p>externally used - Repository has GitHub dependents or at least 1,000 npm downloads in the last year (10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0 downloads in the last year).">
            <text:p>Package has detected local usage, GitHub dependents, or significant npm downloads (100 downloads in the last year).</text:p>
          </table:table-cell>
          <table:table-cell office:value-type="string" office:string-value="oce-editor-tools/@oce-editor-tools/verse-mapper">
            <text:p>oce-editor-tools/@oce-editor-tools/verse-mapp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odd-claude-plugin">
            <text:p>unfoldingWord/odd-claude-plugin</text:p>
          </table:table-cell>
          <table:table-cell office:value-type="string" office:string-value="https://github.com/unfoldingWord/odd-claude-plugin">
            <text:p>https://github.com/unfoldingWord/odd-claude-plugin</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1-22T20:16:10Z">
            <text:p>2026-01-22T20:16:10Z</text:p>
          </table:table-cell>
          <table:table-cell office:value-type="string" office:string-value="2026-01-22T20:16:07Z">
            <text:p>2026-01-22T20:16:07Z</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1-22T20:16:13Z">
            <text:p>2026-01-22T20:16:13Z</text:p>
          </table:table-cell>
          <table:table-cell office:value-type="string" office:string-value="unfoldingWord/odd-claude-plugin">
            <text:p>unfoldingWord/odd-claude-plugin</text:p>
          </table:table-cell>
          <table:table-cell office:value-type="string" office:string-value="https://github.com/unfoldingWord/odd-claude-plugin">
            <text:p>https://github.com/unfoldingWord/odd-claude-plugin</text:p>
          </table:table-cell>
          <table:table-cell office:value-type="string" office:string-value="2-Keep">
            <text:p>2-Keep</text:p>
          </table:table-cell>
          <table:table-cell office:value-type="string" office:string-value="Active - Last commit was within the last 12 months (5 months ago).">
            <text:p>Active - Last commit was within the last 12 months (5 months ago).</text:p>
          </table:table-cell>
          <table:table-cell office:value-type="string" office:string-value="">
            <text:p/>
          </table:table-cell>
          <table:table-cell office:value-type="string" office:string-value="">
            <text:p/>
          </table:table-cell>
          <table:table-cell office:value-type="string" office:string-value="odd-claude-plugin">
            <text:p>odd-claude-plugi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pagequery">
            <text:p>unfoldingWord-dev/pagequery</text:p>
          </table:table-cell>
          <table:table-cell office:value-type="string" office:string-value="https://github.com/unfoldingWord-dev/pagequery">
            <text:p>https://github.com/unfoldingWord-dev/pagequery</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22T18:41:28Z">
            <text:p>2015-06-22T18:41:28Z</text:p>
          </table:table-cell>
          <table:table-cell office:value-type="string" office:string-value="2015-06-22T18:41:23Z">
            <text:p>2015-06-22T18:41:23Z</text:p>
          </table:table-cell>
          <table:table-cell office:value-type="string" office:string-value="">
            <text:p/>
          </table:table-cell>
          <table:table-cell office:value-type="string" office:string-value="superdav42/pagequery">
            <text:p>superdav42/pagequery</text:p>
          </table:table-cell>
          <table:table-cell office:value-type="string" office:string-value="['MrBertie', 'superdav42', 'gamma', 'mprins', 'glensc', 'topical', 'sawachan']">
            <text:p>['MrBertie', 'superdav42', 'gamma', 'mprins', 'glensc', 'topical', 'sawachan']</text:p>
          </table:table-cell>
          <table:table-cell office:value-type="string" office:string-value="0">
            <text:p>0</text:p>
          </table:table-cell>
          <table:table-cell office:value-type="string" office:string-value="0">
            <text:p>0</text:p>
          </table:table-cell>
          <table:table-cell office:value-type="string" office:string-value="60">
            <text:p>6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12-11T18:59:22Z">
            <text:p>2015-12-11T18:59:22Z</text:p>
          </table:table-cell>
          <table:table-cell office:value-type="string" office:string-value="unfoldingWord-dev/pagequery">
            <text:p>unfoldingWord-dev/pagequery</text:p>
          </table:table-cell>
          <table:table-cell office:value-type="string" office:string-value="https://github.com/unfoldingWord-dev/pagequery">
            <text:p>https://github.com/unfoldingWord-dev/pagequer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agequery">
            <text:p>pagequery</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pankosmia-web">
            <text:p>unfoldingWord-box3/pankosmia-web</text:p>
          </table:table-cell>
          <table:table-cell office:value-type="string" office:string-value="https://github.com/unfoldingWord-box3/pankosmia-web">
            <text:p>https://github.com/unfoldingWord-box3/pankosmia-web</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5-07T12:53:06Z">
            <text:p>2025-05-07T12:53:06Z</text:p>
          </table:table-cell>
          <table:table-cell office:value-type="string" office:string-value="2025-05-04T16:46:45Z">
            <text:p>2025-05-04T16:46:45Z</text:p>
          </table:table-cell>
          <table:table-cell office:value-type="string" office:string-value="">
            <text:p/>
          </table:table-cell>
          <table:table-cell office:value-type="string" office:string-value="pankosmia/pankosmia-web">
            <text:p>pankosmia/pankosmia-web</text:p>
          </table:table-cell>
          <table:table-cell office:value-type="string" office:string-value="['mvahowe', 'RUN-Projects', 'lmeline']">
            <text:p>['mvahowe', 'RUN-Projects', 'lmeline']</text:p>
          </table:table-cell>
          <table:table-cell office:value-type="string" office:string-value="0">
            <text:p>0</text:p>
          </table:table-cell>
          <table:table-cell office:value-type="string" office:string-value="0">
            <text:p>0</text:p>
          </table:table-cell>
          <table:table-cell office:value-type="string" office:string-value="177">
            <text:p>17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5-05T03:19:17Z">
            <text:p>2025-05-05T03:19:17Z</text:p>
          </table:table-cell>
          <table:table-cell office:value-type="string" office:string-value="unfoldingWord-box3/pankosmia-web">
            <text:p>unfoldingWord-box3/pankosmia-web</text:p>
          </table:table-cell>
          <table:table-cell office:value-type="string" office:string-value="https://github.com/unfoldingWord-box3/pankosmia-web">
            <text:p>https://github.com/unfoldingWord-box3/pankosmia-web</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ankosmia-web">
            <text:p>pankosmia-web</text:p>
          </table:table-cell>
          <table:table-cell office:value-type="string" office:string-value="unfoldingWord-box3">
            <text:p>unfoldingWord-box3</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passage-recorder-app">
            <text:p>unfoldingWord-box3/passage-recorder-app</text:p>
          </table:table-cell>
          <table:table-cell office:value-type="string" office:string-value="https://github.com/unfoldingWord-box3/passage-recorder-app">
            <text:p>https://github.com/unfoldingWord-box3/passage-recorder-ap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6-11T15:50:11Z">
            <text:p>2025-06-11T15:50:11Z</text:p>
          </table:table-cell>
          <table:table-cell office:value-type="string" office:string-value="2025-06-11T15:49:10Z">
            <text:p>2025-06-11T15:49:10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
            <text:p>1</text:p>
          </table:table-cell>
          <table:table-cell office:value-type="string" office:string-value="1">
            <text:p>1</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simple-recorder">
            <text:p>scripture-simple-recor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11T16:03:07Z">
            <text:p>2025-06-11T16:03:07Z</text:p>
          </table:table-cell>
          <table:table-cell office:value-type="string" office:string-value="unfoldingWord-box3/passage-recorder-app">
            <text:p>unfoldingWord-box3/passage-recorder-app</text:p>
          </table:table-cell>
          <table:table-cell office:value-type="string" office:string-value="https://github.com/unfoldingWord-box3/passage-recorder-app">
            <text:p>https://github.com/unfoldingWord-box3/passage-recorder-app</text:p>
          </table:table-cell>
          <table:table-cell office:value-type="string" office:string-value="2-Keep">
            <text:p>2-Keep</text:p>
          </table:table-cell>
          <table:table-cell office:value-type="string" office:string-value="Active - Last commit was within the last 12 months (12 months ago).">
            <text:p>Active - Last commit was within the last 12 months (12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passage-recorder-app">
            <text:p>passage-recorde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proskomma-react-hooks">
            <text:p>unfoldingWord/proskomma-react-hooks</text:p>
          </table:table-cell>
          <table:table-cell office:value-type="string" office:string-value="https://github.com/unfoldingWord/proskomma-react-hooks">
            <text:p>https://github.com/unfoldingWord/proskomma-react-hooks</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8-24T20:05:30Z">
            <text:p>2022-08-24T20:05:30Z</text:p>
          </table:table-cell>
          <table:table-cell office:value-type="string" office:string-value="2022-07-15T18:05:20Z">
            <text:p>2022-07-15T18:05:20Z</text:p>
          </table:table-cell>
          <table:table-cell office:value-type="string" office:string-value="">
            <text:p/>
          </table:table-cell>
          <table:table-cell office:value-type="string" office:string-value="['eten-tech-foundation/scribe-extensions', 'bible-technology/scribe-scripture-editor', 'vipinpaul/autographa', 'unfoldingWord/oce-editor-tools', 'unfoldingWord/translationCore', 'friendsofagape/autographa', 'Proskomma/proskomma-legacy-projects', 'unfoldingWord/uw-editor', 'unfoldingWord/gateway-translate', 'Proskomma/perfidy']">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office:string-value="['klappy', 'mvahowe', 'PhotoNomad0', 'jincypjose', 'mandolyte']">
            <text:p>['klappy', 'mvahowe', 'PhotoNomad0', 'jincypjose', 'mandolyte']</text:p>
          </table:table-cell>
          <table:table-cell office:value-type="string" office:string-value="10">
            <text:p>10</text:p>
          </table:table-cell>
          <table:table-cell office:value-type="string" office:string-value="1">
            <text:p>1</text:p>
          </table:table-cell>
          <table:table-cell office:value-type="string" office:string-value="163">
            <text:p>16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6-17T15:50:39Z">
            <text:p>2022-06-17T15:50:39Z</text:p>
          </table:table-cell>
          <table:table-cell office:value-type="string" office:string-value="unfoldingWord/proskomma-react-hooks">
            <text:p>unfoldingWord/proskomma-react-hooks</text:p>
          </table:table-cell>
          <table:table-cell office:value-type="string" office:string-value="https://github.com/unfoldingWord/proskomma-react-hooks">
            <text:p>https://github.com/unfoldingWord/proskomma-react-hook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roskomma-react-hooks">
            <text:p>proskomma-react-hook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proskomma-render-preview">
            <text:p>unfoldingWord-dev/proskomma-render-preview</text:p>
          </table:table-cell>
          <table:table-cell office:value-type="string" office:string-value="https://github.com/unfoldingWord-dev/proskomma-render-preview">
            <text:p>https://github.com/unfoldingWord-dev/proskomma-render-preview</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03-23T16:51:37Z">
            <text:p>2022-03-23T16:51:37Z</text:p>
          </table:table-cell>
          <table:table-cell office:value-type="string" office:string-value="2021-10-19T09:03:07Z">
            <text:p>2021-10-19T09:03:07Z</text:p>
          </table:table-cell>
          <table:table-cell office:value-type="string" office:string-value="">
            <text:p/>
          </table:table-cell>
          <table:table-cell office:value-type="string" office:string-value="Proskomma/proskomma-render-pdf">
            <text:p>Proskomma/proskomma-render-pdf</text:p>
          </table:table-cell>
          <table:table-cell office:value-type="string" office:string-value="mvahowe">
            <text:p>mvahowe</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3-22T12:58:28Z">
            <text:p>2022-03-22T12:58:28Z</text:p>
          </table:table-cell>
          <table:table-cell office:value-type="string" office:string-value="unfoldingWord-dev/proskomma-render-preview">
            <text:p>unfoldingWord-dev/proskomma-render-preview</text:p>
          </table:table-cell>
          <table:table-cell office:value-type="string" office:string-value="https://github.com/unfoldingWord-dev/proskomma-render-preview">
            <text:p>https://github.com/unfoldingWord-dev/proskomma-render-preview</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roskomma-render-preview">
            <text:p>proskomma-render-preview</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python-dcs-api-client">
            <text:p>unfoldingWord/python-dcs-api-client</text:p>
          </table:table-cell>
          <table:table-cell office:value-type="string" office:string-value="https://github.com/unfoldingWord/python-dcs-api-client">
            <text:p>https://github.com/unfoldingWord/python-dcs-api-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8-23T20:41:15Z">
            <text:p>2023-08-23T20:41:15Z</text:p>
          </table:table-cell>
          <table:table-cell office:value-type="string" office:string-value="2023-08-23T20:40:19Z">
            <text:p>2023-08-23T20:40:19Z</text:p>
          </table:table-cell>
          <table:table-cell office:value-type="string" office:string-value="2023-08-23T20:41:15Z">
            <text:p>2023-08-23T20:41:15Z</text:p>
          </table:table-cell>
          <table:table-cell office:value-type="string" office:string-value="['alphavector/all', 'Lyn4ever29/pipy_server', 'unfoldingWord/door43-job-handler', 'unfoldingWord/tx-job-handler']">
            <text:p>['alphavector/all', 'Lyn4ever29/pipy_server', 'unfoldingWord/door43-job-handler', 'unfoldingWord/tx-job-handler']</text:p>
          </table:table-cell>
          <table:table-cell office:value-type="string" office:string-value="['richmahn', 'RajeshHegde', 'jakobandersen']">
            <text:p>['richmahn', 'RajeshHegde', 'jakobandersen']</text:p>
          </table:table-cell>
          <table:table-cell office:value-type="string" office:string-value="0">
            <text:p>0</text:p>
          </table:table-cell>
          <table:table-cell office:value-type="string" office:string-value="0">
            <text:p>0</text:p>
          </table:table-cell>
          <table:table-cell office:value-type="string" office:string-value="45">
            <text:p>4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4T15:56:11Z">
            <text:p>2022-10-04T15:56:11Z</text:p>
          </table:table-cell>
          <table:table-cell office:value-type="string" office:string-value="unfoldingWord/python-dcs-api-client">
            <text:p>unfoldingWord/python-dcs-api-client</text:p>
          </table:table-cell>
          <table:table-cell office:value-type="string" office:string-value="https://github.com/unfoldingWord/python-dcs-api-client">
            <text:p>https://github.com/unfoldingWord/python-dcs-api-clien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ython-dcs-api-client">
            <text:p>python-dcs-api-cli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python-dcs-catalog-client">
            <text:p>unfoldingWord/python-dcs-catalog-client</text:p>
          </table:table-cell>
          <table:table-cell office:value-type="string" office:string-value="https://github.com/unfoldingWord/python-dcs-catalog-client">
            <text:p>https://github.com/unfoldingWord/python-dcs-catalog-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2-05-25T20:09:27Z">
            <text:p>2022-05-25T20:09:27Z</text:p>
          </table:table-cell>
          <table:table-cell office:value-type="string" office:string-value="2022-05-25T20:09:23Z">
            <text:p>2022-05-25T20:09:23Z</text:p>
          </table:table-cell>
          <table:table-cell office:value-type="string" office:string-value="2022-05-17T17:37:53Z">
            <text:p>2022-05-17T17:37:53Z</text:p>
          </table:table-cell>
          <table:table-cell office:value-type="string" office:string-value="['alphavector/all', 'Lyn4ever29/pipy_server', 'unfoldingWord/tx-job-handler']">
            <text:p>['alphavector/all', 'Lyn4ever29/pipy_server', 'unfoldingWord/tx-job-handler']</text:p>
          </table:table-cell>
          <table:table-cell office:value-type="string" office:string-value="['RajeshHegde', 'richmahn', 'jakobandersen']">
            <text:p>['RajeshHegde', 'richmahn', 'jakobandersen']</text:p>
          </table:table-cell>
          <table:table-cell office:value-type="string" office:string-value="0">
            <text:p>0</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4T15:55:38Z">
            <text:p>2022-10-04T15:55:38Z</text:p>
          </table:table-cell>
          <table:table-cell office:value-type="string" office:string-value="unfoldingWord/python-dcs-catalog-client">
            <text:p>unfoldingWord/python-dcs-catalog-client</text:p>
          </table:table-cell>
          <table:table-cell office:value-type="string" office:string-value="https://github.com/unfoldingWord/python-dcs-catalog-client">
            <text:p>https://github.com/unfoldingWord/python-dcs-catalog-clien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ython-dcs-catalog-client">
            <text:p>python-dcs-catalog-cli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react-library-starter">
            <text:p>unfoldingWord-box3/react-library-starter</text:p>
          </table:table-cell>
          <table:table-cell office:value-type="string" office:string-value="https://github.com/unfoldingWord-box3/react-library-starter">
            <text:p>https://github.com/unfoldingWord-box3/react-library-starter</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6T23:27:40Z">
            <text:p>2023-02-16T23:27:40Z</text:p>
          </table:table-cell>
          <table:table-cell office:value-type="string" office:string-value="2023-02-16T23:27:40Z">
            <text:p>2023-02-16T23:27:40Z</text:p>
          </table:table-cell>
          <table:table-cell office:value-type="string" office:string-value="">
            <text:p/>
          </table:table-cell>
          <table:table-cell office:value-type="string" office:string-value="abelpz/react-library">
            <text:p>abelpz/react-library</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my-lib">
            <text:p>my-li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2-16T14:47:55Z">
            <text:p>2023-02-16T14:47:55Z</text:p>
          </table:table-cell>
          <table:table-cell office:value-type="string" office:string-value="unfoldingWord-box3/react-library-starter">
            <text:p>unfoldingWord-box3/react-library-starter</text:p>
          </table:table-cell>
          <table:table-cell office:value-type="string" office:string-value="https://github.com/unfoldingWord-box3/react-library-starter">
            <text:p>https://github.com/unfoldingWord-box3/react-library-start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react-library-starter">
            <text:p>react-library-start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react-to-electron-action">
            <text:p>unfoldingWord-box3/react-to-electron-action</text:p>
          </table:table-cell>
          <table:table-cell office:value-type="string" office:string-value="https://github.com/unfoldingWord-box3/react-to-electron-action">
            <text:p>https://github.com/unfoldingWord-box3/react-to-electron-actio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18T19:24:40Z">
            <text:p>2022-08-18T19:24:40Z</text:p>
          </table:table-cell>
          <table:table-cell office:value-type="string" office:string-value="2020-05-06T12:37:26Z">
            <text:p>2020-05-06T12:37:26Z</text:p>
          </table:table-cell>
          <table:table-cell office:value-type="string" office:string-value="">
            <text:p/>
          </table:table-cell>
          <table:table-cell office:value-type="string" office:string-value="['unfoldingWord/book-package-app', 'mandolyte/rrouter']">
            <text:p>['unfoldingWord/book-package-app', 'mandolyte/rrouter']</text:p>
          </table:table-cell>
          <table:table-cell office:value-type="string" office:string-value="['mandolyte', 'dependabot[bot]']">
            <text:p>['mandolyte', 'dependabot[bot]']</text:p>
          </table:table-cell>
          <table:table-cell office:value-type="string" office:string-value="2">
            <text:p>2</text:p>
          </table:table-cell>
          <table:table-cell office:value-type="string" office:string-value="2">
            <text:p>2</text:p>
          </table:table-cell>
          <table:table-cell office:value-type="string" office:string-value="29">
            <text:p>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act-to-electron-action">
            <text:p>react-to-electron-a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5-06T12:37:30Z">
            <text:p>2020-05-06T12:37:30Z</text:p>
          </table:table-cell>
          <table:table-cell office:value-type="string" office:string-value="unfoldingWord-box3/react-to-electron-action">
            <text:p>unfoldingWord-box3/react-to-electron-action</text:p>
          </table:table-cell>
          <table:table-cell office:value-type="string" office:string-value="https://github.com/unfoldingWord-box3/react-to-electron-action">
            <text:p>https://github.com/unfoldingWord-box3/react-to-electron-acti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react-to-electron-action">
            <text:p>react-to-electron-actio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RepoList">
            <text:p>unfoldingWord-box3/RepoList</text:p>
          </table:table-cell>
          <table:table-cell office:value-type="string" office:string-value="https://github.com/unfoldingWord-box3/RepoList">
            <text:p>https://github.com/unfoldingWord-box3/RepoList</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6-06-23T17:35:09Z">
            <text:p>2026-06-23T17:35:09Z</text:p>
          </table:table-cell>
          <table:table-cell office:value-type="string" office:string-value="2026-06-23T17:35:06Z">
            <text:p>2026-06-23T17:35:06Z</text:p>
          </table:table-cell>
          <table:table-cell office:value-type="string" office:string-value="">
            <text:p/>
          </table:table-cell>
          <table:table-cell office:value-type="string" office:string-value="PhotoNomad0/RepoList">
            <text:p>PhotoNomad0/RepoLis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98">
            <text:p>9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3T17:35:22Z">
            <text:p>2026-06-23T17:35:22Z</text:p>
          </table:table-cell>
          <table:table-cell office:value-type="string" office:string-value="unfoldingWord-box3/RepoList">
            <text:p>unfoldingWord-box3/RepoList</text:p>
          </table:table-cell>
          <table:table-cell office:value-type="string" office:string-value="https://github.com/unfoldingWord-box3/RepoList">
            <text:p>https://github.com/unfoldingWord-box3/RepoLis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RepoList">
            <text:p>RepoLis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Resource-Container">
            <text:p>unfoldingWord-dev/Resource-Container</text:p>
          </table:table-cell>
          <table:table-cell office:value-type="string" office:string-value="https://github.com/unfoldingWord-dev/Resource-Container">
            <text:p>https://github.com/unfoldingWord-dev/Resource-Container</text:p>
          </table:table-cell>
          <table:table-cell office:value-type="string" office:string-value="Makefile">
            <text:p>Makefile</text:p>
          </table:table-cell>
          <table:table-cell office:value-type="string" office:string-value="False">
            <text:p>False</text:p>
          </table:table-cell>
          <table:table-cell office:value-type="string" office:string-value="False">
            <text:p>False</text:p>
          </table:table-cell>
          <table:table-cell office:value-type="string" office:string-value="2025-10-09T10:27:34Z">
            <text:p>2025-10-09T10:27:34Z</text:p>
          </table:table-cell>
          <table:table-cell office:value-type="string" office:string-value="2025-10-09T10:27:33Z">
            <text:p>2025-10-09T10:27:33Z</text:p>
          </table:table-cell>
          <table:table-cell office:value-type="string" office:string-value="">
            <text:p/>
          </table:table-cell>
          <table:table-cell office:value-type="string" office:string-value="">
            <text:p/>
          </table:table-cell>
          <table:table-cell office:value-type="string" office:string-value="['da1nerd', 'jag3773', 'yakob-aleksandrovich', 'PhotoNomad0', 'RobH123', 'timjore']">
            <text:p>['da1nerd', 'jag3773', 'yakob-aleksandrovich', 'PhotoNomad0', 'RobH123', 'timjore']</text:p>
          </table:table-cell>
          <table:table-cell office:value-type="string" office:string-value="6">
            <text:p>6</text:p>
          </table:table-cell>
          <table:table-cell office:value-type="string" office:string-value="0">
            <text:p>0</text:p>
          </table:table-cell>
          <table:table-cell office:value-type="string" office:string-value="174">
            <text:p>17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27:37Z">
            <text:p>2025-10-09T10:27:37Z</text:p>
          </table:table-cell>
          <table:table-cell office:value-type="string" office:string-value="unfoldingWord-dev/Resource-Container">
            <text:p>unfoldingWord-dev/Resource-Container</text:p>
          </table:table-cell>
          <table:table-cell office:value-type="string" office:string-value="https://github.com/unfoldingWord-dev/Resource-Container">
            <text:p>https://github.com/unfoldingWord-dev/Resource-Container</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Resource-Container">
            <text:p>Resource-Contai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resource-workspace-rcl">
            <text:p>unfoldingWord/resource-workspace-rcl</text:p>
          </table:table-cell>
          <table:table-cell office:value-type="string" office:string-value="https://github.com/unfoldingWord/resource-workspace-rcl">
            <text:p>https://github.com/unfoldingWord/resource-workspace-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3T13:45:24Z">
            <text:p>2023-06-13T13:45:24Z</text:p>
          </table:table-cell>
          <table:table-cell office:value-type="string" office:string-value="2023-06-13T13:45:21Z">
            <text:p>2023-06-13T13:45:21Z</text:p>
          </table:table-cell>
          <table:table-cell office:value-type="string" office:string-value="">
            <text:p/>
          </table:table-cell>
          <table:table-cell office:value-type="string" office:string-value="['unfoldingWord/obt', 'unfoldingWord/gateway-edit', 'unfoldingWord/gateway-translate', 'unfoldingWord/gateway-admin', 'hiscoder-com/obt']">
            <text:p>['unfoldingWord/obt', 'unfoldingWord/gateway-edit', 'unfoldingWord/gateway-translate', 'unfoldingWord/gateway-admin', 'hiscoder-com/obt']</text:p>
          </table:table-cell>
          <table:table-cell office:value-type="string" office:string-value="['mannycolon', 'RoyalSix', 'PhotoNomad0', 'Sterling (Jay) Scott', 'foxprogs', 'mandolyte', 'Joel-C-Johnson']">
            <text:p>['mannycolon', 'RoyalSix', 'PhotoNomad0', 'Sterling (Jay) Scott', 'foxprogs', 'mandolyte', 'Joel-C-Johnson']</text:p>
          </table:table-cell>
          <table:table-cell office:value-type="string" office:string-value="3">
            <text:p>3</text:p>
          </table:table-cell>
          <table:table-cell office:value-type="string" office:string-value="0">
            <text:p>0</text:p>
          </table:table-cell>
          <table:table-cell office:value-type="string" office:string-value="159">
            <text:p>15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workspace-rcl">
            <text:p>resource-workspace-rcl</text:p>
          </table:table-cell>
          <table:table-cell office:value-type="string" office:string-value="https://www.npmjs.com/package/resource-workspace-rcl">
            <text:p>https://www.npmjs.com/package/resource-workspace-rcl</text:p>
          </table:table-cell>
          <table:table-cell office:value-type="string" office:string-value="False">
            <text:p>False</text:p>
          </table:table-cell>
          <table:table-cell office:value-type="string" office:string-value="3174">
            <text:p>3174</text:p>
          </table:table-cell>
          <table:table-cell office:value-type="string" office:string-value="2023-06-13T13:51:03.803Z">
            <text:p>2023-06-13T13:51:03.803Z</text:p>
          </table:table-cell>
          <table:table-cell office:value-type="string" office:string-value="['gateway-admin', 'gateway-edit', 'bsa', 'gateway-translate', 'create-app', 'next-js-template', 'admin-app']">
            <text:p>['gateway-admin', 'gateway-edit', 'bsa', 'gateway-translate', 'create-app', 'next-js-template', 'admin-app']</text:p>
          </table:table-cell>
          <table:table-cell office:value-type="string" office:string-value="['@unfoldingword/eslint-config', 'gitea-react-toolkit', 'markdown-translatable', 'scripture-resources-rcl', 'translation-helps-rcl', 'bible-reference-range', 'dcs-branch-merger', 'tc-ui-toolkit', 'word-aligner', 'string-punctuation-tokenizer', 'usfm-js', 'wordmap-lexer', 'uw-quote-helpers', 'dcs-js', 'tsv-groupdata-parser', 'uw-bible-parser', 'uw-tsv-parser']">
            <text:p>['@unfoldingword/eslint-config', 'gitea-react-toolkit', 'markdown-translatable', 'scripture-resources-rcl', 'translation-helps-rcl', 'bible-reference-range', 'dcs-branch-merger', 'tc-ui-toolkit', 'word-aligner', 'string-punctuation-tokenizer', 'usfm-js', 'wordmap-lexer', 'uw-quote-helpers', 'dcs-js', 'tsv-groupdata-parser', 'uw-bible-parser', 'uw-tsv-parser']</text:p>
          </table:table-cell>
          <table:table-cell office:value-type="string" office:string-value="2022-06-01T15:53:36Z">
            <text:p>2022-06-01T15:53:36Z</text:p>
          </table:table-cell>
          <table:table-cell office:value-type="string" office:string-value="unfoldingWord/resource-workspace-rcl">
            <text:p>unfoldingWord/resource-workspace-rcl</text:p>
          </table:table-cell>
          <table:table-cell office:value-type="string" office:string-value="https://github.com/unfoldingWord/resource-workspace-rcl">
            <text:p>https://github.com/unfoldingWord/resource-workspace-rcl</text:p>
          </table:table-cell>
          <table:table-cell office:value-type="string" office:string-value="2-Keep">
            <text:p>2-Keep</text:p>
          </table:table-cell>
          <table:table-cell office:value-type="string" office:string-value="externally used - Repository has GitHub dependents or at least 1,000 npm downloads in the last year (3174 downloads).">
            <text:p>externally used - Repository has GitHub dependents or at least 1,000 npm downloads in the last year (317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74 downloads in the last year).">
            <text:p>Package has detected local usage, GitHub dependents, or significant npm downloads (3174 downloads in the last year).</text:p>
          </table:table-cell>
          <table:table-cell office:value-type="string" office:string-value="resource-workspace-rcl">
            <text:p>resource-workspace-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cripture-resources-rcl">
            <text:p>unfoldingWord/scripture-resources-rcl</text:p>
          </table:table-cell>
          <table:table-cell office:value-type="string" office:string-value="https://github.com/unfoldingWord/scripture-resources-rcl">
            <text:p>https://github.com/unfoldingWord/scripture-resources-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23:22Z">
            <text:p>2026-03-19T13:23:22Z</text:p>
          </table:table-cell>
          <table:table-cell office:value-type="string" office:string-value="2026-03-19T13:23:22Z">
            <text:p>2026-03-19T13:23:22Z</text:p>
          </table:table-cell>
          <table:table-cell office:value-type="string" office:string-value="">
            <text:p/>
          </table:table-cell>
          <table:table-cell office:value-type="string" office:string-value="['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office:string-value="['klappy', 'ancientTexts-net', 'PhotoNomad0', 'RoyalSix', 'mandolyte', 'mannycolon', 'larsgson', 'Joel-C-Johnson', 'abelpz', 'jincypjose', 'Sterling (Jay) Scott', 'superdav42', 'actions-user', 'dependabot[bot]', 'Christopher Klapp', 'richmahn', 'kintsoogi']">
            <text:p>['klappy', 'ancientTexts-net', 'PhotoNomad0', 'RoyalSix', 'mandolyte', 'mannycolon', 'larsgson', 'Joel-C-Johnson', 'abelpz', 'jincypjose', 'Sterling (Jay) Scott', 'superdav42', 'actions-user', 'dependabot[bot]', 'Christopher Klapp', 'richmahn', 'kintsoogi']</text:p>
          </table:table-cell>
          <table:table-cell office:value-type="string" office:string-value="14">
            <text:p>14</text:p>
          </table:table-cell>
          <table:table-cell office:value-type="string" office:string-value="6">
            <text:p>6</text:p>
          </table:table-cell>
          <table:table-cell office:value-type="string" office:string-value="817">
            <text:p>8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resources-rcl">
            <text:p>scripture-resources-rcl</text:p>
          </table:table-cell>
          <table:table-cell office:value-type="string" office:string-value="https://www.npmjs.com/package/scripture-resources-rcl">
            <text:p>https://www.npmjs.com/package/scripture-resources-rcl</text:p>
          </table:table-cell>
          <table:table-cell office:value-type="string" office:string-value="False">
            <text:p>False</text:p>
          </table:table-cell>
          <table:table-cell office:value-type="string" office:string-value="16923">
            <text:p>16923</text:p>
          </table:table-cell>
          <table:table-cell office:value-type="string" office:string-value="2026-03-19T13:24:25.124Z">
            <text:p>2026-03-19T13:24:25.124Z</text:p>
          </table:table-cell>
          <table:table-cell office:value-type="string" office:string-value="['gateway-admin', 'gateway-edit', 'tc-create-app', 'single-scripture-rcl', 'translation-helps-rcl', 'bsa', 'gateway-translate', 'resource-workspace-rcl', 'resource-checker', 'create-app', 'next-js-template', 'pdf-generator-rcl', 'greek-apparatus-app', 'book-package-viewer-poc', 'pdf-generator']">
            <text:p>['gateway-admin', 'gateway-edit', 'tc-create-app', 'single-scripture-rcl', 'translation-helps-rcl', 'bsa', 'gateway-translate', 'resource-workspace-rcl', 'resource-checker', 'create-app', 'next-js-template', 'pdf-generator-rcl', 'greek-apparatus-app', 'book-package-viewer-poc', 'pdf-generator']</text:p>
          </table:table-cell>
          <table:table-cell office:value-type="string" office:string-value="['bible-reference-range', 'gitea-react-toolkit', 'markdown-translatable', 'string-punctuation-tokenizer', 'tc-ui-toolkit', 'usfm-js', 'uw-quote-helpers', 'word-aligner', '@unfoldingword/eslint-config', 'wordmap-lexer', 'tsv-groupdata-parser', 'uw-bible-parser', 'uw-tsv-parser']">
            <text:p>['bible-reference-range', 'gitea-react-toolkit', 'markdown-translatable', 'string-punctuation-tokenizer', 'tc-ui-toolkit', 'usfm-js', 'uw-quote-helpers', 'word-aligner', '@unfoldingword/eslint-config', 'wordmap-lexer', 'tsv-groupdata-parser', 'uw-bible-parser', 'uw-tsv-parser']</text:p>
          </table:table-cell>
          <table:table-cell office:value-type="string" office:string-value="2026-03-19T13:23:28Z">
            <text:p>2026-03-19T13:23:28Z</text:p>
          </table:table-cell>
          <table:table-cell office:value-type="string" office:string-value="unfoldingWord/scripture-resources-rcl">
            <text:p>unfoldingWord/scripture-resources-rcl</text:p>
          </table:table-cell>
          <table:table-cell office:value-type="string" office:string-value="https://github.com/unfoldingWord/scripture-resources-rcl">
            <text:p>https://github.com/unfoldingWord/scripture-resources-rcl</text:p>
          </table:table-cell>
          <table:table-cell office:value-type="string" office:string-value="2-Keep">
            <text:p>2-Keep</text:p>
          </table:table-cell>
          <table:table-cell office:value-type="string" office:string-value="externally used - Repository has GitHub dependents or at least 1,000 npm downloads in the last year (16923 downloads).">
            <text:p>externally used - Repository has GitHub dependents or at least 1,000 npm downloads in the last year (1692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923 downloads in the last year).">
            <text:p>Package has detected local usage, GitHub dependents, or significant npm downloads (16923 downloads in the last year).</text:p>
          </table:table-cell>
          <table:table-cell office:value-type="string" office:string-value="scripture-resources-rcl">
            <text:p>scripture-resources-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cripture-tsv">
            <text:p>unfoldingWord/scripture-tsv</text:p>
          </table:table-cell>
          <table:table-cell office:value-type="string" office:string-value="https://github.com/unfoldingWord/scripture-tsv">
            <text:p>https://github.com/unfoldingWord/scripture-tsv</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8T19:09:17Z">
            <text:p>2024-05-08T19:09:17Z</text:p>
          </table:table-cell>
          <table:table-cell office:value-type="string" office:string-value="2024-05-07T12:40:32Z">
            <text:p>2024-05-07T12:40:32Z</text:p>
          </table:table-cell>
          <table:table-cell office:value-type="string" office:string-value="2024-05-08T19:09:17Z">
            <text:p>2024-05-08T19:09:17Z</text:p>
          </table:table-cell>
          <table:table-cell office:value-type="string" office:string-value="['unfoldingWord/gateway-edit', 'kintsoogi/translation-notes-extension']">
            <text:p>['unfoldingWord/gateway-edit', 'kintsoogi/translation-notes-extension']</text:p>
          </table:table-cell>
          <table:table-cell office:value-type="string" office:string-value="['kintsoogi', 'PhotoNomad0']">
            <text:p>['kintsoogi', 'PhotoNomad0']</text:p>
          </table:table-cell>
          <table:table-cell office:value-type="string" office:string-value="2">
            <text:p>2</text:p>
          </table:table-cell>
          <table:table-cell office:value-type="string" office:string-value="0">
            <text:p>0</text:p>
          </table:table-cell>
          <table:table-cell office:value-type="string" office:string-value="51">
            <text:p>5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scripture-tsv">
            <text:p>scripture-tsv</text:p>
          </table:table-cell>
          <table:table-cell office:value-type="string" office:string-value="https://www.npmjs.com/package/scripture-tsv">
            <text:p>https://www.npmjs.com/package/scripture-tsv</text:p>
          </table:table-cell>
          <table:table-cell office:value-type="string" office:string-value="False">
            <text:p>False</text:p>
          </table:table-cell>
          <table:table-cell office:value-type="string" office:string-value="2660">
            <text:p>2660</text:p>
          </table:table-cell>
          <table:table-cell office:value-type="string" office:string-value="2024-05-02T21:03:03.412Z">
            <text:p>2024-05-02T21:03:03.412Z</text:p>
          </table:table-cell>
          <table:table-cell office:value-type="string" office:string-value="gateway-edit">
            <text:p>gateway-edit</text:p>
          </table:table-cell>
          <table:table-cell office:value-type="string" office:string-value="['bible-reference-range', 'bible-reference-rcl']">
            <text:p>['bible-reference-range', 'bible-reference-rcl']</text:p>
          </table:table-cell>
          <table:table-cell office:value-type="string" office:string-value="2024-05-07T12:40:37Z">
            <text:p>2024-05-07T12:40:37Z</text:p>
          </table:table-cell>
          <table:table-cell office:value-type="string" office:string-value="unfoldingWord/scripture-tsv">
            <text:p>unfoldingWord/scripture-tsv</text:p>
          </table:table-cell>
          <table:table-cell office:value-type="string" office:string-value="https://github.com/unfoldingWord/scripture-tsv">
            <text:p>https://github.com/unfoldingWord/scripture-tsv</text:p>
          </table:table-cell>
          <table:table-cell office:value-type="string" office:string-value="2-Keep">
            <text:p>2-Keep</text:p>
          </table:table-cell>
          <table:table-cell office:value-type="string" office:string-value="externally used - Repository has GitHub dependents or at least 1,000 npm downloads in the last year (2660 downloads).">
            <text:p>externally used - Repository has GitHub dependents or at least 1,000 npm downloads in the last year (266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660 downloads in the last year).">
            <text:p>Package has detected local usage, GitHub dependents, or significant npm downloads (2660 downloads in the last year).</text:p>
          </table:table-cell>
          <table:table-cell office:value-type="string" office:string-value="scripture-tsv">
            <text:p>scripture-tsv</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elections">
            <text:p>unfoldingWord/selections</text:p>
          </table:table-cell>
          <table:table-cell office:value-type="string" office:string-value="https://github.com/unfoldingWord/selections">
            <text:p>https://github.com/unfoldingWord/selection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3:33Z">
            <text:p>2018-05-03T21:23:33Z</text:p>
          </table:table-cell>
          <table:table-cell office:value-type="string" office:string-value="2018-05-03T21:23:29Z">
            <text:p>2018-05-03T21:23:29Z</text:p>
          </table:table-cell>
          <table:table-cell office:value-type="string" office:string-value="">
            <text:p/>
          </table:table-cell>
          <table:table-cell office:value-type="string" office:string-value="['FoustAndrew/wordAlignment', 'unfoldingWord/wordAlignment', 'unfoldingWord/checking-tool-wrapper', 'unfoldingWord/translationNotes', 'unfoldingWord/translationWords', 'unfoldingWord/translationCore']">
            <text:p>['FoustAndrew/wordAlignment', 'unfoldingWord/wordAlignment', 'unfoldingWord/checking-tool-wrapper', 'unfoldingWord/translationNotes', 'unfoldingWord/translationWords', 'unfoldingWord/translationCore']</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elections">
            <text:p>selections</text:p>
          </table:table-cell>
          <table:table-cell office:value-type="string" office:string-value="https://www.npmjs.com/package/selections">
            <text:p>https://www.npmjs.com/package/selections</text:p>
          </table:table-cell>
          <table:table-cell office:value-type="string" office:string-value="False">
            <text:p>False</text:p>
          </table:table-cell>
          <table:table-cell office:value-type="string" office:string-value="8177">
            <text:p>8177</text:p>
          </table:table-cell>
          <table:table-cell office:value-type="string" office:string-value="2018-05-03T21:23:02.005Z">
            <text:p>2018-05-03T21:23:02.005Z</text:p>
          </table:table-cell>
          <table:table-cell office:value-type="string" office:string-value="['translationCore', 'wordAlignment', 'checking-tool-wrapper', 'VerseCheck']">
            <text:p>['translationCore', 'wordAlignment', 'checking-tool-wrapper', 'VerseCheck']</text:p>
          </table:table-cell>
          <table:table-cell office:value-type="string" office:string-value="tc-strings">
            <text:p>tc-strings</text:p>
          </table:table-cell>
          <table:table-cell office:value-type="string" office:string-value="2019-10-22T19:45:39Z">
            <text:p>2019-10-22T19:45:39Z</text:p>
          </table:table-cell>
          <table:table-cell office:value-type="string" office:string-value="unfoldingWord/selections">
            <text:p>unfoldingWord/selections</text:p>
          </table:table-cell>
          <table:table-cell office:value-type="string" office:string-value="https://github.com/unfoldingWord/selections">
            <text:p>https://github.com/unfoldingWord/selections</text:p>
          </table:table-cell>
          <table:table-cell office:value-type="string" office:string-value="2-Keep">
            <text:p>2-Keep</text:p>
          </table:table-cell>
          <table:table-cell office:value-type="string" office:string-value="externally used - Repository has GitHub dependents or at least 1,000 npm downloads in the last year (8177 downloads).">
            <text:p>externally used - Repository has GitHub dependents or at least 1,000 npm downloads in the last year (817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8177 downloads in the last year).">
            <text:p>Package has detected local usage, GitHub dependents, or significant npm downloads (8177 downloads in the last year).</text:p>
          </table:table-cell>
          <table:table-cell office:value-type="string" office:string-value="selections">
            <text:p>selection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simple-text-editor-rcl">
            <text:p>unfoldingWord-box3/simple-text-editor-rcl</text:p>
          </table:table-cell>
          <table:table-cell office:value-type="string" office:string-value="https://github.com/unfoldingWord-box3/simple-text-editor-rcl">
            <text:p>https://github.com/unfoldingWord-box3/simple-text-editor-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6T21:09:12Z">
            <text:p>2025-06-06T21:09:12Z</text:p>
          </table:table-cell>
          <table:table-cell office:value-type="string" office:string-value="2025-06-06T21:09:10Z">
            <text:p>2025-06-06T21:09:10Z</text:p>
          </table:table-cell>
          <table:table-cell office:value-type="string" office:string-value="">
            <text:p/>
          </table:table-cell>
          <table:table-cell office:value-type="string" office:string-value="['md-jishan-ansari/Editors', 'RUN-Collaborations/translatable', 'klappy/scripture-puzzle-game-poc']">
            <text:p>['md-jishan-ansari/Editors', 'RUN-Collaborations/translatable', 'klappy/scripture-puzzle-game-poc']</text:p>
          </table:table-cell>
          <table:table-cell office:value-type="string" office:string-value="['klappy', 'RUN-Projects']">
            <text:p>['klappy', 'RUN-Projects']</text:p>
          </table:table-cell>
          <table:table-cell office:value-type="string" office:string-value="5">
            <text:p>5</text:p>
          </table:table-cell>
          <table:table-cell office:value-type="string" office:string-value="1">
            <text:p>1</text:p>
          </table:table-cell>
          <table:table-cell office:value-type="string" office:string-value="240">
            <text:p>24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imple-text-editor-rcl">
            <text:p>simple-text-editor-rcl</text:p>
          </table:table-cell>
          <table:table-cell office:value-type="string" office:string-value="https://www.npmjs.com/package/simple-text-editor-rcl">
            <text:p>https://www.npmjs.com/package/simple-text-editor-rcl</text:p>
          </table:table-cell>
          <table:table-cell office:value-type="string" office:string-value="False">
            <text:p>False</text:p>
          </table:table-cell>
          <table:table-cell office:value-type="string" office:string-value="3893">
            <text:p>3893</text:p>
          </table:table-cell>
          <table:table-cell office:value-type="string" office:string-value="2022-06-09T23:15:38.322Z">
            <text:p>2022-06-09T23:15:38.322Z</text:p>
          </table:table-cell>
          <table:table-cell office:value-type="string" office:string-value="simple-text-editor-app">
            <text:p>simple-text-editor-app</text:p>
          </table:table-cell>
          <table:table-cell office:value-type="string" office:string-value="@unfoldingword/eslint-config">
            <text:p>@unfoldingword/eslint-config</text:p>
          </table:table-cell>
          <table:table-cell office:value-type="string" office:string-value="2025-06-06T21:09:14Z">
            <text:p>2025-06-06T21:09:14Z</text:p>
          </table:table-cell>
          <table:table-cell office:value-type="string" office:string-value="unfoldingWord-box3/simple-text-editor-rcl">
            <text:p>unfoldingWord-box3/simple-text-editor-rcl</text:p>
          </table:table-cell>
          <table:table-cell office:value-type="string" office:string-value="https://github.com/unfoldingWord-box3/simple-text-editor-rcl">
            <text:p>https://github.com/unfoldingWord-box3/simple-text-editor-rcl</text:p>
          </table:table-cell>
          <table:table-cell office:value-type="string" office:string-value="2-Keep">
            <text:p>2-Keep</text:p>
          </table:table-cell>
          <table:table-cell office:value-type="string" office:string-value="externally used - Repository has GitHub dependents or at least 1,000 npm downloads in the last year (3893 downloads).">
            <text:p>externally used - Repository has GitHub dependents or at least 1,000 npm downloads in the last year (389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893 downloads in the last year).">
            <text:p>Package has detected local usage, GitHub dependents, or significant npm downloads (3893 downloads in the last year).</text:p>
          </table:table-cell>
          <table:table-cell office:value-type="string" office:string-value="simple-text-editor-rcl">
            <text:p>simple-text-editor-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ingle-scripture-rcl">
            <text:p>unfoldingWord/single-scripture-rcl</text:p>
          </table:table-cell>
          <table:table-cell office:value-type="string" office:string-value="https://github.com/unfoldingWord/single-scripture-rcl">
            <text:p>https://github.com/unfoldingWord/single-scripture-rcl</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16T17:24:40Z">
            <text:p>2026-04-16T17:24:40Z</text:p>
          </table:table-cell>
          <table:table-cell office:value-type="string" office:string-value="2026-04-16T17:24:40Z">
            <text:p>2026-04-16T17:24:40Z</text:p>
          </table:table-cell>
          <table:table-cell office:value-type="string" office:string-value="">
            <text:p/>
          </table:table-cell>
          <table:table-cell office:value-type="string" office:string-value="['unfoldingWord/gateway-edit', 'unfoldingWord/gateway-translate', 'unfoldingWord/gateway-admin']">
            <text:p>['unfoldingWord/gateway-edit', 'unfoldingWord/gateway-translate', 'unfoldingWord/gateway-admin']</text:p>
          </table:table-cell>
          <table:table-cell office:value-type="string" office:string-value="['PhotoNomad0', 'kintsoogi', 'mannycolon', 'Joel-C-Johnson', 'jincypjose', 'abelpz', 'RoyalSix', 'theNerd247', 'Sterling (Jay) Scott', 'richmahn']">
            <text:p>['PhotoNomad0', 'kintsoogi', 'mannycolon', 'Joel-C-Johnson', 'jincypjose', 'abelpz', 'RoyalSix', 'theNerd247', 'Sterling (Jay) Scott', 'richmahn']</text:p>
          </table:table-cell>
          <table:table-cell office:value-type="string" office:string-value="3">
            <text:p>3</text:p>
          </table:table-cell>
          <table:table-cell office:value-type="string" office:string-value="3">
            <text:p>3</text:p>
          </table:table-cell>
          <table:table-cell office:value-type="string" office:string-value="639">
            <text:p>63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ingle-scripture-rcl">
            <text:p>single-scripture-rcl</text:p>
          </table:table-cell>
          <table:table-cell office:value-type="string" office:string-value="https://www.npmjs.com/package/single-scripture-rcl">
            <text:p>https://www.npmjs.com/package/single-scripture-rcl</text:p>
          </table:table-cell>
          <table:table-cell office:value-type="string" office:string-value="False">
            <text:p>False</text:p>
          </table:table-cell>
          <table:table-cell office:value-type="string" office:string-value="10071">
            <text:p>10071</text:p>
          </table:table-cell>
          <table:table-cell office:value-type="string" office:string-value="2026-04-16T17:29:58.529Z">
            <text:p>2026-04-16T17:29:58.529Z</text:p>
          </table:table-cell>
          <table:table-cell office:value-type="string" office:string-value="['gateway-admin', 'gateway-edit', 'create-app', 'next-js-template']">
            <text:p>['gateway-admin', 'gateway-edit', 'create-app', 'next-js-template']</text:p>
          </table:table-cell>
          <table:table-cell office:value-type="string" office:string-value="['@unfoldingword/eslint-config', 'bible-reference-range', 'gitea-react-toolkit', 'scripture-resources-rcl', 'tc-ui-toolkit', 'translation-helps-rcl', 'usfm-js', 'uw-quote-helpers', 'word-aligner', 'word-aligner-rcl', 'string-punctuation-tokenizer', 'word-aligner-lib', 'wordmap', 'wordmap-lexer', 'uw-tsv-parser', 'markdown-translatable', 'dcs-branch-merger', 'tsv-groupdata-parser', 'uw-bible-parser', 'tc-strings', 'dcs-js']">
            <text:p>['@unfoldingword/eslint-config', 'bible-reference-range', 'gitea-react-toolkit', 'scripture-resources-rcl', 'tc-ui-toolkit', 'translation-helps-rcl', 'usfm-js', 'uw-quote-helpers', 'word-aligner', 'word-aligner-rcl', 'string-punctuation-tokenizer', 'word-aligner-lib', 'wordmap', 'wordmap-lexer', 'uw-tsv-parser', 'markdown-translatable', 'dcs-branch-merger', 'tsv-groupdata-parser', 'uw-bible-parser', 'tc-strings', 'dcs-js']</text:p>
          </table:table-cell>
          <table:table-cell office:value-type="string" office:string-value="2026-04-16T17:24:46Z">
            <text:p>2026-04-16T17:24:46Z</text:p>
          </table:table-cell>
          <table:table-cell office:value-type="string" office:string-value="unfoldingWord/single-scripture-rcl">
            <text:p>unfoldingWord/single-scripture-rcl</text:p>
          </table:table-cell>
          <table:table-cell office:value-type="string" office:string-value="https://github.com/unfoldingWord/single-scripture-rcl">
            <text:p>https://github.com/unfoldingWord/single-scripture-rcl</text:p>
          </table:table-cell>
          <table:table-cell office:value-type="string" office:string-value="2-Keep">
            <text:p>2-Keep</text:p>
          </table:table-cell>
          <table:table-cell office:value-type="string" office:string-value="externally used - Repository has GitHub dependents or at least 1,000 npm downloads in the last year (10071 downloads).">
            <text:p>externally used - Repository has GitHub dependents or at least 1,000 npm downloads in the last year (1007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071 downloads in the last year).">
            <text:p>Package has detected local usage, GitHub dependents, or significant npm downloads (10071 downloads in the last year).</text:p>
          </table:table-cell>
          <table:table-cell office:value-type="string" office:string-value="single-scripture-rcl">
            <text:p>single-scripture-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StableTTS_Editing">
            <text:p>unfoldingWord-box3/StableTTS_Editing</text:p>
          </table:table-cell>
          <table:table-cell office:value-type="string" office:string-value="https://github.com/unfoldingWord-box3/StableTTS_Editing">
            <text:p>https://github.com/unfoldingWord-box3/StableTTS_Editing</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3-07T13:20:53Z">
            <text:p>2025-03-07T13:20:53Z</text:p>
          </table:table-cell>
          <table:table-cell office:value-type="string" office:string-value="2025-03-06T13:50:35Z">
            <text:p>2025-03-06T13:50:35Z</text:p>
          </table:table-cell>
          <table:table-cell office:value-type="string" office:string-value="">
            <text:p/>
          </table:table-cell>
          <table:table-cell office:value-type="string" office:string-value="JEdward7777/StableTTS_Editing">
            <text:p>JEdward7777/StableTTS_Editing</text:p>
          </table:table-cell>
          <table:table-cell office:value-type="string" office:string-value="['Joshua Lansford', 'KdaiP']">
            <text:p>['Joshua Lansford', 'KdaiP']</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06T14:31:54Z">
            <text:p>2025-03-06T14:31:54Z</text:p>
          </table:table-cell>
          <table:table-cell office:value-type="string" office:string-value="unfoldingWord-box3/StableTTS_Editing">
            <text:p>unfoldingWord-box3/StableTTS_Editing</text:p>
          </table:table-cell>
          <table:table-cell office:value-type="string" office:string-value="https://github.com/unfoldingWord-box3/StableTTS_Editing">
            <text:p>https://github.com/unfoldingWord-box3/StableTTS_Editing</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StableTTS_Editing">
            <text:p>StableTTS_Editing</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tring-punctuation-tokenizer">
            <text:p>unfoldingWord/string-punctuation-tokenizer</text:p>
          </table:table-cell>
          <table:table-cell office:value-type="string" office:string-value="https://github.com/unfoldingWord/string-punctuation-tokenizer">
            <text:p>https://github.com/unfoldingWord/string-punctuation-tokeniz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8-09T14:35:40Z">
            <text:p>2023-08-09T14:35:40Z</text:p>
          </table:table-cell>
          <table:table-cell office:value-type="string" office:string-value="2021-08-25T21:53:55Z">
            <text:p>2021-08-25T21:53:55Z</text:p>
          </table:table-cell>
          <table:table-cell office:value-type="string" office:string-value="2021-08-25T21:56:43Z">
            <text:p>2021-08-25T21:56:43Z</text:p>
          </table:table-cell>
          <table:table-cell office:value-type="string" office:string-value="['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office:string-value="['mannycolon', 'klappy', 'ancientTexts-net', 'dependabot-support', 'PhotoNomad0', 'RoyalSix', 'da1nerd', 'richmahn', 'mandolyte', 'bspidel', 'Sterling (Jay) Scott', 'birchamp']">
            <text:p>['mannycolon', 'klappy', 'ancientTexts-net', 'dependabot-support', 'PhotoNomad0', 'RoyalSix', 'da1nerd', 'richmahn', 'mandolyte', 'bspidel', 'Sterling (Jay) Scott', 'birchamp']</text:p>
          </table:table-cell>
          <table:table-cell office:value-type="string" office:string-value="21">
            <text:p>21</text:p>
          </table:table-cell>
          <table:table-cell office:value-type="string" office:string-value="18">
            <text:p>18</text:p>
          </table:table-cell>
          <table:table-cell office:value-type="string" office:string-value="146">
            <text:p>1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string-punctuation-tokenizer">
            <text:p>string-punctuation-tokenizer</text:p>
          </table:table-cell>
          <table:table-cell office:value-type="string" office:string-value="https://www.npmjs.com/package/string-punctuation-tokenizer">
            <text:p>https://www.npmjs.com/package/string-punctuation-tokenizer</text:p>
          </table:table-cell>
          <table:table-cell office:value-type="string" office:string-value="False">
            <text:p>False</text:p>
          </table:table-cell>
          <table:table-cell office:value-type="string" office:string-value="101614">
            <text:p>101614</text:p>
          </table:table-cell>
          <table:table-cell office:value-type="string" office:string-value="2021-08-25T21:55:46.406Z">
            <text:p>2021-08-25T21:55:46.406Z</text:p>
          </table:table-cell>
          <table:table-cell office:value-type="string" office:string-value="['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office:value-type="string" office:string-value="['string-punctuation-tokenizer', 'wordmap-lexer']">
            <text:p>['string-punctuation-tokenizer', 'wordmap-lexer']</text:p>
          </table:table-cell>
          <table:table-cell office:value-type="string" office:string-value="2026-05-27T23:23:55Z">
            <text:p>2026-05-27T23:23:55Z</text:p>
          </table:table-cell>
          <table:table-cell office:value-type="string" office:string-value="unfoldingWord/string-punctuation-tokenizer">
            <text:p>unfoldingWord/string-punctuation-tokenizer</text:p>
          </table:table-cell>
          <table:table-cell office:value-type="string" office:string-value="https://github.com/unfoldingWord/string-punctuation-tokenizer">
            <text:p>https://github.com/unfoldingWord/string-punctuation-tokenizer</text:p>
          </table:table-cell>
          <table:table-cell office:value-type="string" office:string-value="2-Keep">
            <text:p>2-Keep</text:p>
          </table:table-cell>
          <table:table-cell office:value-type="string" office:string-value="externally used - Repository has GitHub dependents or at least 1,000 npm downloads in the last year (101614 downloads).">
            <text:p>externally used - Repository has GitHub dependents or at least 1,000 npm downloads in the last year (10161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1614 downloads in the last year).">
            <text:p>Package has detected local usage, GitHub dependents, or significant npm downloads (101614 downloads in the last year).</text:p>
          </table:table-cell>
          <table:table-cell office:value-type="string" office:string-value="string-punctuation-tokenizer">
            <text:p>string-punctuation-tokeniz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suggesting-word-aligner">
            <text:p>unfoldingWord-box3/suggesting-word-aligner</text:p>
          </table:table-cell>
          <table:table-cell office:value-type="string" office:string-value="https://github.com/unfoldingWord-box3/suggesting-word-aligner">
            <text:p>https://github.com/unfoldingWord-box3/suggesting-word-aligner</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92">
            <text:p>9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19T19:45:56Z">
            <text:p>2025-06-19T19:45:56Z</text:p>
          </table:table-cell>
          <table:table-cell office:value-type="string" office:string-value="unfoldingWord-box3/suggesting-word-aligner">
            <text:p>unfoldingWord-box3/suggesting-word-aligner</text:p>
          </table:table-cell>
          <table:table-cell office:value-type="string" office:string-value="https://github.com/unfoldingWord-box3/suggesting-word-aligner">
            <text:p>https://github.com/unfoldingWord-box3/suggesting-word-align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suggesting-word-aligner">
            <text:p>suggesting-word-align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ore-submodule-updater">
            <text:p>unfoldingWord/t-core-submodule-updater</text:p>
          </table:table-cell>
          <table:table-cell office:value-type="string" office:string-value="https://github.com/unfoldingWord/t-core-submodule-updater">
            <text:p>https://github.com/unfoldingWord/t-core-submodule-updater</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9-10-22T20:22:22Z">
            <text:p>2019-10-22T20:22:22Z</text:p>
          </table:table-cell>
          <table:table-cell office:value-type="string" office:string-value="2019-10-22T20:22:20Z">
            <text:p>2019-10-22T20:22:20Z</text:p>
          </table:table-cell>
          <table:table-cell office:value-type="string" office:string-value="">
            <text:p/>
          </table:table-cell>
          <table:table-cell office:value-type="string" office:string-value="ihoegen/translationCore-submodule-updater">
            <text:p>ihoegen/translationCore-submodule-updater</text:p>
          </table:table-cell>
          <table:table-cell office:value-type="string" office:string-value="['ihoegen', 'mannycolon']">
            <text:p>['ihoegen', 'mannycolon']</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ubmodule-manager">
            <text:p>tc-submodule-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20:22:23Z">
            <text:p>2019-10-22T20:22:23Z</text:p>
          </table:table-cell>
          <table:table-cell office:value-type="string" office:string-value="unfoldingWord/t-core-submodule-updater">
            <text:p>unfoldingWord/t-core-submodule-updater</text:p>
          </table:table-cell>
          <table:table-cell office:value-type="string" office:string-value="https://github.com/unfoldingWord/t-core-submodule-updater">
            <text:p>https://github.com/unfoldingWord/t-core-submodule-updat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t-core-submodule-updater">
            <text:p>t-core-submodule-upda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act">
            <text:p>unfoldingWord-box3/tact</text:p>
          </table:table-cell>
          <table:table-cell office:value-type="string" office:string-value="https://github.com/unfoldingWord-box3/tact">
            <text:p>https://github.com/unfoldingWord-box3/tac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19:01:07Z">
            <text:p>2025-11-03T19:01:07Z</text:p>
          </table:table-cell>
          <table:table-cell office:value-type="string" office:string-value="2025-11-03T19:01:07Z">
            <text:p>2025-11-03T19:01:07Z</text:p>
          </table:table-cell>
          <table:table-cell office:value-type="string" office:string-value="">
            <text:p/>
          </table:table-cell>
          <table:table-cell office:value-type="string" office:string-value="['graymoonlight/CRBank', 'magistrigusti/Dominum_DOM', 'singhyash05/BitTonica', 'jubbslineu/contract-test']">
            <text:p>['graymoonlight/CRBank', 'magistrigusti/Dominum_DOM', 'singhyash05/BitTonica', 'jubbslineu/contract-test']</text:p>
          </table:table-cell>
          <table:table-cell office:value-type="string" office:string-value="['klappy', 'yakob-aleksandrovich']">
            <text:p>['klappy', 'yakob-aleksandrovich']</text:p>
          </table:table-cell>
          <table:table-cell office:value-type="string" office:string-value="24">
            <text:p>24</text:p>
          </table:table-cell>
          <table:table-cell office:value-type="string" office:string-value="1">
            <text:p>1</text:p>
          </table:table-cell>
          <table:table-cell office:value-type="string" office:string-value="75">
            <text:p>7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act">
            <text:p>t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1-03T19:01:10Z">
            <text:p>2025-11-03T19:01:10Z</text:p>
          </table:table-cell>
          <table:table-cell office:value-type="string" office:string-value="unfoldingWord-box3/tact">
            <text:p>unfoldingWord-box3/tact</text:p>
          </table:table-cell>
          <table:table-cell office:value-type="string" office:string-value="https://github.com/unfoldingWord-box3/tact">
            <text:p>https://github.com/unfoldingWord-box3/tac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tact">
            <text:p>tac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create-app">
            <text:p>unfoldingWord/tc-create-app</text:p>
          </table:table-cell>
          <table:table-cell office:value-type="string" office:string-value="https://github.com/unfoldingWord/tc-create-app">
            <text:p>https://github.com/unfoldingWord/tc-create-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4:35Z">
            <text:p>2026-06-22T04:04:35Z</text:p>
          </table:table-cell>
          <table:table-cell office:value-type="string" office:string-value="2026-05-28T16:04:14Z">
            <text:p>2026-05-28T16:04:14Z</text:p>
          </table:table-cell>
          <table:table-cell office:value-type="string" office:string-value="2026-06-10T15:01:15Z">
            <text:p>2026-06-10T15:01:15Z</text:p>
          </table:table-cell>
          <table:table-cell office:value-type="string" office:string-value="">
            <text:p/>
          </table:table-cell>
          <table:table-cell office:value-type="string" office:string-value="['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office:string-value="291">
            <text:p>291</text:p>
          </table:table-cell>
          <table:table-cell office:value-type="string" office:string-value="20">
            <text:p>20</text:p>
          </table:table-cell>
          <table:table-cell office:value-type="string" office:string-value="1637">
            <text:p>163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6">
            <text:p>36</text:p>
          </table:table-cell>
          <table:table-cell office:value-type="string" office:string-value="tc-create-app">
            <text:p>tc-create-app</text:p>
          </table:table-cell>
          <table:table-cell office:value-type="string" office:string-value="https://www.npmjs.com/package/tc-create-app">
            <text:p>https://www.npmjs.com/package/tc-create-app</text:p>
          </table:table-cell>
          <table:table-cell office:value-type="string" office:string-value="False">
            <text:p>False</text:p>
          </table:table-cell>
          <table:table-cell office:value-type="string" office:string-value="71">
            <text:p>71</text:p>
          </table:table-cell>
          <table:table-cell office:value-type="string" office:string-value="2022-02-22T21:12:10.659Z">
            <text:p>2022-02-22T21:12:10.659Z</text:p>
          </table:table-cell>
          <table:table-cell office:value-type="string" office:string-value="">
            <text:p/>
          </table:table-cell>
          <table:table-cell office:value-type="string" office:string-value="['bible-reference-range', 'datatable-translatable', 'dcs-branch-merger', 'gitea-react-toolkit', 'markdown-translatable', 'scripture-resources-rcl', 'tc-ui-toolkit', 'usfm-js', 'uw-content-validation', 'uw-languages-rcl', 'uw-tsv-parser', 'word-aligner', '@unfoldingword/eslint-config', 'string-punctuation-tokenizer', 'wordmap-lexer', 'dcs-js', 'uw-quote-helpers', 'tsv-groupdata-parser', 'uw-bible-parser']">
            <text:p>['bible-reference-range', 'datatable-translatable', 'dcs-branch-merger', 'gitea-react-toolkit', 'markdown-translatable', 'scripture-resources-rcl', 'tc-ui-toolkit', 'usfm-js', 'uw-content-validation', 'uw-languages-rcl', 'uw-tsv-parser', 'word-aligner', '@unfoldingword/eslint-config', 'string-punctuation-tokenizer', 'wordmap-lexer', 'dcs-js', 'uw-quote-helpers', 'tsv-groupdata-parser', 'uw-bible-parser']</text:p>
          </table:table-cell>
          <table:table-cell office:value-type="string" office:string-value="2026-05-28T16:04:51Z">
            <text:p>2026-05-28T16:04:51Z</text:p>
          </table:table-cell>
          <table:table-cell office:value-type="string" office:string-value="unfoldingWord/tc-create-app">
            <text:p>unfoldingWord/tc-create-app</text:p>
          </table:table-cell>
          <table:table-cell office:value-type="string" office:string-value="https://github.com/unfoldingWord/tc-create-app">
            <text:p>https://github.com/unfoldingWord/tc-create-app</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ackage has not been published in over 24 months (52 months ago), has fewer than 100 downloads in the last year (71), and has no detected local consumers.">
            <text:p>Package has not been published in over 24 months (52 months ago), has fewer than 100 downloads in the last year (71), and has no detected local consumers.</text:p>
          </table:table-cell>
          <table:table-cell office:value-type="string" office:string-value="tc-create-app">
            <text:p>tc-create-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c-create-poc">
            <text:p>unfoldingWord-box3/tc-create-poc</text:p>
          </table:table-cell>
          <table:table-cell office:value-type="string" office:string-value="https://github.com/unfoldingWord-box3/tc-create-poc">
            <text:p>https://github.com/unfoldingWord-box3/tc-create-poc</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7-05T17:42:04Z">
            <text:p>2021-07-05T17:42:04Z</text:p>
          </table:table-cell>
          <table:table-cell office:value-type="string" office:string-value="2021-07-05T17:41:59Z">
            <text:p>2021-07-05T17:41:59Z</text:p>
          </table:table-cell>
          <table:table-cell office:value-type="string" office:string-value="">
            <text:p/>
          </table:table-cell>
          <table:table-cell office:value-type="string" office:string-value="unfoldingWord/tc-create-app">
            <text:p>unfoldingWord/tc-create-app</text:p>
          </table:table-cell>
          <table:table-cell office:value-type="string" office:string-value="['ancientTexts-net', 'RoyalSix', 'klappy', 'dependabot[bot]', 'mandolyte', 'Sterling (Jay) Scott', 'actions-user', 'dependabot-preview[bot]', 'jag3773', 'PhotoNomad0', 'birchamp']">
            <text:p>['ancientTexts-net', 'RoyalSix', 'klappy', 'dependabot[bot]', 'mandolyte', 'Sterling (Jay) Scott', 'actions-user', 'dependabot-preview[bot]', 'jag3773', 'PhotoNomad0', 'birchamp']</text:p>
          </table:table-cell>
          <table:table-cell office:value-type="string" office:string-value="0">
            <text:p>0</text:p>
          </table:table-cell>
          <table:table-cell office:value-type="string" office:string-value="0">
            <text:p>0</text:p>
          </table:table-cell>
          <table:table-cell office:value-type="string" office:string-value="948">
            <text:p>94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create-app">
            <text:p>tc-create-app</text:p>
          </table:table-cell>
          <table:table-cell office:value-type="string" office:string-value="https://www.npmjs.com/package/tc-create-app">
            <text:p>https://www.npmjs.com/package/tc-create-app</text:p>
          </table:table-cell>
          <table:table-cell office:value-type="string" office:string-value="False">
            <text:p>False</text:p>
          </table:table-cell>
          <table:table-cell office:value-type="string" office:string-value="71">
            <text:p>71</text:p>
          </table:table-cell>
          <table:table-cell office:value-type="string" office:string-value="2022-02-22T21:12:10.659Z">
            <text:p>2022-02-22T21:12:10.659Z</text:p>
          </table:table-cell>
          <table:table-cell office:value-type="string" office:string-value="">
            <text:p/>
          </table:table-cell>
          <table:table-cell office:value-type="string" office:string-value="['datatable-translatable', 'gitea-react-toolkit', 'markdown-translatable', 'scripture-resources-rcl', 'usfm-js', 'uw-content-validation', '@unfoldingword/eslint-config']">
            <text:p>['datatable-translatable', 'gitea-react-toolkit', 'markdown-translatable', 'scripture-resources-rcl', 'usfm-js', 'uw-content-validation', '@unfoldingword/eslint-config']</text:p>
          </table:table-cell>
          <table:table-cell office:value-type="string" office:string-value="2021-12-03T15:55:03Z">
            <text:p>2021-12-03T15:55:03Z</text:p>
          </table:table-cell>
          <table:table-cell office:value-type="string" office:string-value="unfoldingWord-box3/tc-create-poc">
            <text:p>unfoldingWord-box3/tc-create-poc</text:p>
          </table:table-cell>
          <table:table-cell office:value-type="string" office:string-value="https://github.com/unfoldingWord-box3/tc-create-poc">
            <text:p>https://github.com/unfoldingWord-box3/tc-create-poc</text:p>
          </table:table-cell>
          <table:table-cell office:value-type="string" office:string-value="2-Keep">
            <text:p>2-Keep</text:p>
          </table:table-cell>
          <table:table-cell office:value-type="string" office:string-value="externally used - Repository has GitHub dependents or at least 1,000 npm downloads in the last year (71 downloads).">
            <text:p>externally used - Repository has GitHub dependents or at least 1,000 npm downloads in the last year (7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1 downloads in the last year).">
            <text:p>Package has detected local usage, GitHub dependents, or significant npm downloads (71 downloads in the last year).</text:p>
          </table:table-cell>
          <table:table-cell office:value-type="string" office:string-value="tc-create-poc">
            <text:p>tc-create-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electron-env">
            <text:p>unfoldingWord/tc-electron-env</text:p>
          </table:table-cell>
          <table:table-cell office:value-type="string" office:string-value="https://github.com/unfoldingWord/tc-electron-env">
            <text:p>https://github.com/unfoldingWord/tc-electron-en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3-15T16:52:56Z">
            <text:p>2022-03-15T16:52:56Z</text:p>
          </table:table-cell>
          <table:table-cell office:value-type="string" office:string-value="2020-03-23T19:09:54Z">
            <text:p>2020-03-23T19:09:54Z</text:p>
          </table:table-cell>
          <table:table-cell office:value-type="string" office:string-value="">
            <text:p/>
          </table:table-cell>
          <table:table-cell office:value-type="string" office:string-value="['FoustAndrew/wordAlignment', 'mannycolon/electronite-poc-app', 'unfoldingWord/translationCore', 'unfoldingWord/wordAlignment', 'unfoldingWord/checking-tool-wrapper']">
            <text:p>['FoustAndrew/wordAlignment', 'mannycolon/electronite-poc-app', 'unfoldingWord/translationCore', 'unfoldingWord/wordAlignment', 'unfoldingWord/checking-tool-wrapper']</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3-23T19:09:57Z">
            <text:p>2020-03-23T19:09:57Z</text:p>
          </table:table-cell>
          <table:table-cell office:value-type="string" office:string-value="unfoldingWord/tc-electron-env">
            <text:p>unfoldingWord/tc-electron-env</text:p>
          </table:table-cell>
          <table:table-cell office:value-type="string" office:string-value="https://github.com/unfoldingWord/tc-electron-env">
            <text:p>https://github.com/unfoldingWord/tc-electron-env</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tc-electron-env">
            <text:p>tc-electron-env</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helps-skills">
            <text:p>unfoldingWord/tc-helps-skills</text:p>
          </table:table-cell>
          <table:table-cell office:value-type="string" office:string-value="https://github.com/unfoldingWord/tc-helps-skills">
            <text:p>https://github.com/unfoldingWord/tc-helps-skill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4-07T21:29:21Z">
            <text:p>2026-04-07T21:29:21Z</text:p>
          </table:table-cell>
          <table:table-cell office:value-type="string" office:string-value="2026-04-07T21:29:01Z">
            <text:p>2026-04-07T21:29:01Z</text:p>
          </table:table-cell>
          <table:table-cell office:value-type="string" office:string-value="">
            <text:p/>
          </table:table-cell>
          <table:table-cell office:value-type="string" office:string-value="">
            <text:p/>
          </table:table-cell>
          <table:table-cell office:value-type="string" office:string-value="['birchamp', 'Birch Champeon']">
            <text:p>['birchamp', 'Birch Champeon']</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07T21:29:27Z">
            <text:p>2026-04-07T21:29:27Z</text:p>
          </table:table-cell>
          <table:table-cell office:value-type="string" office:string-value="unfoldingWord/tc-helps-skills">
            <text:p>unfoldingWord/tc-helps-skills</text:p>
          </table:table-cell>
          <table:table-cell office:value-type="string" office:string-value="https://github.com/unfoldingWord/tc-helps-skills">
            <text:p>https://github.com/unfoldingWord/tc-helps-skills</text:p>
          </table:table-cell>
          <table:table-cell office:value-type="string" office:string-value="2-Keep">
            <text:p>2-Keep</text:p>
          </table:table-cell>
          <table:table-cell office:value-type="string" office:string-value="Active - Last commit was within the last 12 months (2 months ago).">
            <text:p>Active - Last commit was within the last 12 months (2 months ago).</text:p>
          </table:table-cell>
          <table:table-cell office:value-type="string" office:string-value="">
            <text:p/>
          </table:table-cell>
          <table:table-cell office:value-type="string" office:string-value="">
            <text:p/>
          </table:table-cell>
          <table:table-cell office:value-type="string" office:string-value="tc-helps-skills">
            <text:p>tc-helps-skil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ource-content-updater">
            <text:p>unfoldingWord/tc-source-content-updater</text:p>
          </table:table-cell>
          <table:table-cell office:value-type="string" office:string-value="https://github.com/unfoldingWord/tc-source-content-updater">
            <text:p>https://github.com/unfoldingWord/tc-source-content-updat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0-28T18:40:43Z">
            <text:p>2025-10-28T18:40:43Z</text:p>
          </table:table-cell>
          <table:table-cell office:value-type="string" office:string-value="2025-10-28T18:14:38Z">
            <text:p>2025-10-28T18:14:38Z</text:p>
          </table:table-cell>
          <table:table-cell office:value-type="string" office:string-value="2021-08-27T21:43:21Z">
            <text:p>2021-08-27T21:43:21Z</text:p>
          </table:table-cell>
          <table:table-cell office:value-type="string" office:string-value="['FoustAndrew/wordAlignment', 'unfoldingWord/tx-job-handler', 'unfoldingWord/wordAlignment', 'unfoldingWord/checking-tool-wrapper', 'unfoldingWord-dev/uw-pdf-conversion-tools', 'unfoldingWord-dev/tools', 'unfoldingWord/translationCore']">
            <text:p>['FoustAndrew/wordAlignment', 'unfoldingWord/tx-job-handler', 'unfoldingWord/wordAlignment', 'unfoldingWord/checking-tool-wrapper', 'unfoldingWord-dev/uw-pdf-conversion-tools', 'unfoldingWord-dev/tools', 'unfoldingWord/translationCore']</text:p>
          </table:table-cell>
          <table:table-cell office:value-type="string" office:string-value="['PhotoNomad0', 'mannycolon', 'richmahn', 'RoyalSix', 'dependabot-support', 'Sterling (Jay) Scott', 'da1nerd', 'bspidel']">
            <text:p>['PhotoNomad0', 'mannycolon', 'richmahn', 'RoyalSix', 'dependabot-support', 'Sterling (Jay) Scott', 'da1nerd', 'bspidel']</text:p>
          </table:table-cell>
          <table:table-cell office:value-type="string" office:string-value="0">
            <text:p>0</text:p>
          </table:table-cell>
          <table:table-cell office:value-type="string" office:string-value="0">
            <text:p>0</text:p>
          </table:table-cell>
          <table:table-cell office:value-type="string" office:string-value="721">
            <text:p>7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tc-source-content-updater">
            <text:p>tc-source-content-updater</text:p>
          </table:table-cell>
          <table:table-cell office:value-type="string" office:string-value="https://www.npmjs.com/package/tc-source-content-updater">
            <text:p>https://www.npmjs.com/package/tc-source-content-updater</text:p>
          </table:table-cell>
          <table:table-cell office:value-type="string" office:string-value="False">
            <text:p>False</text:p>
          </table:table-cell>
          <table:table-cell office:value-type="string" office:string-value="7859">
            <text:p>7859</text:p>
          </table:table-cell>
          <table:table-cell office:value-type="string" office:string-value="2025-10-28T18:16:22.466Z">
            <text:p>2025-10-28T18:16:22.466Z</text:p>
          </table:table-cell>
          <table:table-cell office:value-type="string" office:string-value="['translationCore', 'checking-tool-rcl', 'checking-extension', 'pdf-generator']">
            <text:p>['translationCore', 'checking-tool-rcl', 'checking-extension', 'pdf-generator']</text:p>
          </table:table-cell>
          <table:table-cell office:value-type="string" office:string-value="['string-punctuation-tokenizer', 'tsv-groupdata-parser', 'usfm-js', 'wordmap-lexer', 'bible-reference-range', 'uw-tsv-parser']">
            <text:p>['string-punctuation-tokenizer', 'tsv-groupdata-parser', 'usfm-js', 'wordmap-lexer', 'bible-reference-range', 'uw-tsv-parser']</text:p>
          </table:table-cell>
          <table:table-cell office:value-type="string" office:string-value="2025-10-28T18:14:43Z">
            <text:p>2025-10-28T18:14:43Z</text:p>
          </table:table-cell>
          <table:table-cell office:value-type="string" office:string-value="unfoldingWord/tc-source-content-updater">
            <text:p>unfoldingWord/tc-source-content-updater</text:p>
          </table:table-cell>
          <table:table-cell office:value-type="string" office:string-value="https://github.com/unfoldingWord/tc-source-content-updater">
            <text:p>https://github.com/unfoldingWord/tc-source-content-updater</text:p>
          </table:table-cell>
          <table:table-cell office:value-type="string" office:string-value="2-Keep">
            <text:p>2-Keep</text:p>
          </table:table-cell>
          <table:table-cell office:value-type="string" office:string-value="externally used - Repository has GitHub dependents or at least 1,000 npm downloads in the last year (7859 downloads).">
            <text:p>externally used - Repository has GitHub dependents or at least 1,000 npm downloads in the last year (785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859 downloads in the last year).">
            <text:p>Package has detected local usage, GitHub dependents, or significant npm downloads (7859 downloads in the last year).</text:p>
          </table:table-cell>
          <table:table-cell office:value-type="string" office:string-value="tc-source-content-updater">
            <text:p>tc-source-content-updater</text:p>
          </table:table-cell>
          <table:table-cell office:value-type="string" office:string-value="unfoldingWord">
            <text:p>unfoldingWord</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rings">
            <text:p>unfoldingWord/tc-strings</text:p>
          </table:table-cell>
          <table:table-cell office:value-type="string" office:string-value="https://github.com/unfoldingWord/tc-strings">
            <text:p>https://github.com/unfoldingWord/tc-string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5:11Z">
            <text:p>2018-05-03T21:25:11Z</text:p>
          </table:table-cell>
          <table:table-cell office:value-type="string" office:string-value="2018-05-03T21:25:02Z">
            <text:p>2018-05-03T21:25:02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trings">
            <text:p>tc-strings</text:p>
          </table:table-cell>
          <table:table-cell office:value-type="string" office:string-value="https://www.npmjs.com/package/tc-strings">
            <text:p>https://www.npmjs.com/package/tc-strings</text:p>
          </table:table-cell>
          <table:table-cell office:value-type="string" office:string-value="False">
            <text:p>False</text:p>
          </table:table-cell>
          <table:table-cell office:value-type="string" office:string-value="12327">
            <text:p>12327</text:p>
          </table:table-cell>
          <table:table-cell office:value-type="string" office:string-value="2018-05-03T21:24:53.169Z">
            <text:p>2018-05-03T21:24:53.169Z</text:p>
          </table:table-cell>
          <table:table-cell office:value-type="string" office:string-value="['translationCore', 'word-aligner-lib', 'checking-tool-rcl', 'selections', 'VerseCheck']">
            <text:p>['translationCore', 'word-aligner-lib', 'checking-tool-rcl', 'selections', 'VerseCheck']</text:p>
          </table:table-cell>
          <table:table-cell office:value-type="string" office:string-value="">
            <text:p/>
          </table:table-cell>
          <table:table-cell office:value-type="string" office:string-value="2019-10-22T19:46:14Z">
            <text:p>2019-10-22T19:46:14Z</text:p>
          </table:table-cell>
          <table:table-cell office:value-type="string" office:string-value="unfoldingWord/tc-strings">
            <text:p>unfoldingWord/tc-strings</text:p>
          </table:table-cell>
          <table:table-cell office:value-type="string" office:string-value="https://github.com/unfoldingWord/tc-strings">
            <text:p>https://github.com/unfoldingWord/tc-strings</text:p>
          </table:table-cell>
          <table:table-cell office:value-type="string" office:string-value="2-Keep">
            <text:p>2-Keep</text:p>
          </table:table-cell>
          <table:table-cell office:value-type="string" office:string-value="externally used - Repository has GitHub dependents or at least 1,000 npm downloads in the last year (12327 downloads).">
            <text:p>externally used - Repository has GitHub dependents or at least 1,000 npm downloads in the last year (1232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327 downloads in the last year).">
            <text:p>Package has detected local usage, GitHub dependents, or significant npm downloads (12327 downloads in the last year).</text:p>
          </table:table-cell>
          <table:table-cell office:value-type="string" office:string-value="tc-strings">
            <text:p>tc-string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
            <text:p>unfoldingWord/tc-study</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monorepo">
            <text:p>bt-synergy-monorep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
            <text:p>unfoldingWord/tc-study</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
            <text:p>tc-stud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che-adapter-indexeddb">
            <text:p>unfoldingWord/tc-study/@bt-synergy/cache-adapter-indexedd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che-adapter-indexeddb">
            <text:p>@bt-synergy/cache-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che-adapter-indexeddb">
            <text:p>unfoldingWord/tc-study/@bt-synergy/cache-adapter-indexedd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che-adapter-indexeddb">
            <text:p>tc-study/@bt-synergy/cache-adapter-indexedd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che-adapter-memory">
            <text:p>unfoldingWord/tc-study/@bt-synergy/cache-adapter-memory</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che-adapter-memory">
            <text:p>@bt-synergy/cache-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che-adapter-memory">
            <text:p>unfoldingWord/tc-study/@bt-synergy/cache-adapter-memory</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che-adapter-memory">
            <text:p>tc-study/@bt-synergy/cache-adapter-memor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che-adapter-sqlite">
            <text:p>unfoldingWord/tc-study/@bt-synergy/cache-adapter-sqlit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che-adapter-sqlite">
            <text:p>@bt-synergy/cache-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che-adapter-sqlite">
            <text:p>unfoldingWord/tc-study/@bt-synergy/cache-adapter-sqlit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che-adapter-sqlite">
            <text:p>tc-study/@bt-synergy/cache-adapter-sql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talog-adapter-indexeddb">
            <text:p>unfoldingWord/tc-study/@bt-synergy/catalog-adapter-indexedd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adapter-indexeddb">
            <text:p>@bt-synergy/catalog-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adapter-indexeddb">
            <text:p>unfoldingWord/tc-study/@bt-synergy/catalog-adapter-indexedd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talog-adapter-indexeddb">
            <text:p>tc-study/@bt-synergy/catalog-adapter-indexedd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talog-adapter-memory">
            <text:p>unfoldingWord/tc-study/@bt-synergy/catalog-adapter-memory</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adapter-memory">
            <text:p>@bt-synergy/catalog-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adapter-memory">
            <text:p>unfoldingWord/tc-study/@bt-synergy/catalog-adapter-memory</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talog-adapter-memory">
            <text:p>tc-study/@bt-synergy/catalog-adapter-memor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talog-adapter-sqlite">
            <text:p>unfoldingWord/tc-study/@bt-synergy/catalog-adapter-sqlit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adapter-sqlite">
            <text:p>@bt-synergy/catalog-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adapter-sqlite">
            <text:p>unfoldingWord/tc-study/@bt-synergy/catalog-adapter-sqlit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talog-adapter-sqlite">
            <text:p>tc-study/@bt-synergy/catalog-adapter-sql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talog-cli">
            <text:p>unfoldingWord/tc-study/@bt-synergy/catalog-cl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cli">
            <text:p>@bt-synergy/catalog-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cli">
            <text:p>unfoldingWord/tc-study/@bt-synergy/catalog-cl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talog-cli">
            <text:p>tc-study/@bt-synergy/catalog-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talog-manager">
            <text:p>unfoldingWord/tc-study/@bt-synergy/catalog-manag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manager">
            <text:p>@bt-synergy/catalog-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manager">
            <text:p>unfoldingWord/tc-study/@bt-synergy/catalog-manag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talog-manager">
            <text:p>tc-study/@bt-synergy/catalog-manag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door43-api">
            <text:p>unfoldingWord/tc-study/@bt-synergy/door43-ap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door43-api">
            <text:p>@bt-synergy/door43-ap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door43-api">
            <text:p>unfoldingWord/tc-study/@bt-synergy/door43-ap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door43-api">
            <text:p>tc-study/@bt-synergy/door43-ap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linked-panels">
            <text:p>unfoldingWord/tc-study/@bt-synergy/linked-panel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linked-panels">
            <text:p>@bt-synergy/linked-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linked-panels">
            <text:p>unfoldingWord/tc-study/@bt-synergy/linked-panel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linked-panels">
            <text:p>tc-study/@bt-synergy/linked-pane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mobile">
            <text:p>unfoldingWord/tc-study/@bt-synergy/mobil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mobile">
            <text:p>@bt-synergy/mobi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6-05-11T19:02:48Z">
            <text:p>2026-05-11T19:02:48Z</text:p>
          </table:table-cell>
          <table:table-cell office:value-type="string" office:string-value="unfoldingWord/tc-study/@bt-synergy/mobile">
            <text:p>unfoldingWord/tc-study/@bt-synergy/mobil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mobile">
            <text:p>tc-study/@bt-synergy/mobil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navigation">
            <text:p>unfoldingWord/tc-study/@bt-synergy/navigation</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navigation">
            <text:p>@bt-synergy/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navigation">
            <text:p>unfoldingWord/tc-study/@bt-synergy/navigation</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navigation">
            <text:p>tc-study/@bt-synergy/navigati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builder">
            <text:p>unfoldingWord/tc-study/@bt-synergy/package-buil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builder">
            <text:p>@bt-synergy/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builder">
            <text:p>unfoldingWord/tc-study/@bt-synergy/package-buil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package-builder">
            <text:p>tc-study/@bt-synergy/package-buil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builder-engine">
            <text:p>unfoldingWord/tc-study/@bt-synergy/package-builder-engin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builder-engine">
            <text:p>@bt-synergy/package-builder-engi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builder-engine">
            <text:p>unfoldingWord/tc-study/@bt-synergy/package-builder-engin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package-builder-engine">
            <text:p>tc-study/@bt-synergy/package-builder-engin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creator-core">
            <text:p>unfoldingWord/tc-study/@bt-synergy/package-creator-cor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creator-core">
            <text:p>@bt-synergy/package-creator-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creator-core">
            <text:p>unfoldingWord/tc-study/@bt-synergy/package-creator-cor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creator-core">
            <text:p>tc-study/@bt-synergy/package-creator-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creator-state">
            <text:p>unfoldingWord/tc-study/@bt-synergy/package-creator-stat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creator-state">
            <text:p>@bt-synergy/package-creator-st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creator-state">
            <text:p>unfoldingWord/tc-study/@bt-synergy/package-creator-stat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creator-state">
            <text:p>tc-study/@bt-synergy/package-creator-sta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creator-web">
            <text:p>unfoldingWord/tc-study/@bt-synergy/package-creator-we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creator-web">
            <text:p>@bt-synergy/package-cre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creator-web">
            <text:p>unfoldingWord/tc-study/@bt-synergy/package-creator-we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creator-web">
            <text:p>tc-study/@bt-synergy/package-creator-we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creator-workflow">
            <text:p>unfoldingWord/tc-study/@bt-synergy/package-creator-workflow</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creator-workflow">
            <text:p>@bt-synergy/package-creator-workfl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creator-workflow">
            <text:p>unfoldingWord/tc-study/@bt-synergy/package-creator-workflow</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creator-workflow">
            <text:p>tc-study/@bt-synergy/package-creator-workflow</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storage">
            <text:p>unfoldingWord/tc-study/@bt-synergy/package-storag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storage">
            <text:p>@bt-synergy/package-storag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storage">
            <text:p>unfoldingWord/tc-study/@bt-synergy/package-storag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storage">
            <text:p>tc-study/@bt-synergy/package-storag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ssage-sets">
            <text:p>unfoldingWord/tc-study/@bt-synergy/passage-set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ssage-sets">
            <text:p>@bt-synergy/passage-se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ssage-sets">
            <text:p>unfoldingWord/tc-study/@bt-synergy/passage-set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ssage-sets">
            <text:p>tc-study/@bt-synergy/passage-se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ssage-sets-cli">
            <text:p>unfoldingWord/tc-study/@bt-synergy/passage-sets-cl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ssage-sets-cli">
            <text:p>@bt-synergy/passage-sets-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ssage-sets-cli">
            <text:p>unfoldingWord/tc-study/@bt-synergy/passage-sets-cl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ssage-sets-cli">
            <text:p>tc-study/@bt-synergy/passage-sets-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actions">
            <text:p>unfoldingWord/tc-study/@bt-synergy/resource-action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actions">
            <text:p>@bt-synergy/resource-a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actions">
            <text:p>unfoldingWord/tc-study/@bt-synergy/resource-action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actions">
            <text:p>tc-study/@bt-synergy/resource-action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adapters">
            <text:p>unfoldingWord/tc-study/@bt-synergy/resource-adapter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adapters">
            <text:p>@bt-synergy/resource-adap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adapters">
            <text:p>unfoldingWord/tc-study/@bt-synergy/resource-adapter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adapters">
            <text:p>tc-study/@bt-synergy/resource-adapt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bundler">
            <text:p>unfoldingWord/tc-study/@bt-synergy/resource-bundl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bundler">
            <text:p>@bt-synergy/resource-bundl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bundler">
            <text:p>unfoldingWord/tc-study/@bt-synergy/resource-bundl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bundler">
            <text:p>tc-study/@bt-synergy/resource-bund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cache">
            <text:p>unfoldingWord/tc-study/@bt-synergy/resource-cach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cache">
            <text:p>@bt-synergy/resource-cach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cache">
            <text:p>unfoldingWord/tc-study/@bt-synergy/resource-cach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cache">
            <text:p>tc-study/@bt-synergy/resource-cach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catalog">
            <text:p>unfoldingWord/tc-study/@bt-synergy/resource-catalog</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catalog">
            <text:p>@bt-synergy/resource-catal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catalog">
            <text:p>unfoldingWord/tc-study/@bt-synergy/resource-catalog</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catalog">
            <text:p>tc-study/@bt-synergy/resource-catalog</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cli">
            <text:p>unfoldingWord/tc-study/@bt-synergy/resource-cl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cli">
            <text:p>@bt-synergy/resource-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cli">
            <text:p>unfoldingWord/tc-study/@bt-synergy/resource-cl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cli">
            <text:p>tc-study/@bt-synergy/resource-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package-builder">
            <text:p>unfoldingWord/tc-study/@bt-synergy/resource-package-buil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package-builder">
            <text:p>@bt-synergy/resource-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package-builder">
            <text:p>unfoldingWord/tc-study/@bt-synergy/resource-package-buil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resource-package-builder">
            <text:p>tc-study/@bt-synergy/resource-package-buil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panels">
            <text:p>unfoldingWord/tc-study/@bt-synergy/resource-panel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panels">
            <text:p>@bt-synergy/resource-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panels">
            <text:p>unfoldingWord/tc-study/@bt-synergy/resource-panel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panels">
            <text:p>tc-study/@bt-synergy/resource-pane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parsers">
            <text:p>unfoldingWord/tc-study/@bt-synergy/resource-parser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parsers">
            <text:p>@bt-synergy/resource-pars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6-05-11T19:02:48Z">
            <text:p>2026-05-11T19:02:48Z</text:p>
          </table:table-cell>
          <table:table-cell office:value-type="string" office:string-value="unfoldingWord/tc-study/@bt-synergy/resource-parsers">
            <text:p>unfoldingWord/tc-study/@bt-synergy/resource-parser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parsers">
            <text:p>tc-study/@bt-synergy/resource-pars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selection">
            <text:p>unfoldingWord/tc-study/@bt-synergy/resource-selection</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selection">
            <text:p>@bt-synergy/resource-sele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selection">
            <text:p>unfoldingWord/tc-study/@bt-synergy/resource-selection</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selection">
            <text:p>tc-study/@bt-synergy/resource-selecti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signals">
            <text:p>unfoldingWord/tc-study/@bt-synergy/resource-signal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signals">
            <text:p>@bt-synergy/resource-signa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signals">
            <text:p>unfoldingWord/tc-study/@bt-synergy/resource-signal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signals">
            <text:p>tc-study/@bt-synergy/resource-signa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types">
            <text:p>unfoldingWord/tc-study/@bt-synergy/resource-type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types">
            <text:p>@bt-synergy/resource-typ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types">
            <text:p>unfoldingWord/tc-study/@bt-synergy/resource-type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types">
            <text:p>tc-study/@bt-synergy/resource-typ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scripture-loader">
            <text:p>unfoldingWord/tc-study/@bt-synergy/scripture-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cripture-loader">
            <text:p>@bt-synergy/scripture-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cripture-loader">
            <text:p>unfoldingWord/tc-study/@bt-synergy/scripture-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cripture-loader">
            <text:p>tc-study/@bt-synergy/scripture-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cripture-resource">
            <text:p>unfoldingWord/tc-study/@bt-synergy/scripture-resourc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cripture-resource">
            <text:p>unfoldingWord/tc-study/@bt-synergy/scripture-resourc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shared">
            <text:p>unfoldingWord/tc-study/@bt-synergy/shared</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hared">
            <text:p>@bt-synergy/share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hared">
            <text:p>unfoldingWord/tc-study/@bt-synergy/shared</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hared">
            <text:p>tc-study/@bt-synergy/share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study-store">
            <text:p>unfoldingWord/tc-study/@bt-synergy/study-stor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tudy-store">
            <text:p>@bt-synergy/study-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tudy-store">
            <text:p>unfoldingWord/tc-study/@bt-synergy/study-stor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tudy-store">
            <text:p>tc-study/@bt-synergy/study-st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toc-generator-cli">
            <text:p>unfoldingWord/tc-study/@bt-synergy/toc-generator-cl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oc-generator-cli">
            <text:p>@bt-synergy/toc-generator-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oc-generator-cli">
            <text:p>unfoldingWord/tc-study/@bt-synergy/toc-generator-cl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oc-generator-cli">
            <text:p>tc-study/@bt-synergy/toc-generator-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translation-academy-loader">
            <text:p>unfoldingWord/tc-study/@bt-synergy/translation-academy-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academy-loader">
            <text:p>@bt-synergy/translation-academy-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academy-loader">
            <text:p>unfoldingWord/tc-study/@bt-synergy/translation-academy-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academy-loader">
            <text:p>tc-study/@bt-synergy/translation-academy-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translation-notes-loader">
            <text:p>unfoldingWord/tc-study/@bt-synergy/translation-notes-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notes-loader">
            <text:p>@bt-synergy/translation-note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notes-loader">
            <text:p>unfoldingWord/tc-study/@bt-synergy/translation-notes-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notes-loader">
            <text:p>tc-study/@bt-synergy/translation-notes-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translation-questions-loader">
            <text:p>unfoldingWord/tc-study/@bt-synergy/translation-questions-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questions-loader">
            <text:p>@bt-synergy/translation-question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questions-loader">
            <text:p>unfoldingWord/tc-study/@bt-synergy/translation-questions-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questions-loader">
            <text:p>tc-study/@bt-synergy/translation-questions-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translation-words-links-loader">
            <text:p>unfoldingWord/tc-study/@bt-synergy/translation-words-links-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words-links-loader">
            <text:p>@bt-synergy/translation-words-link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words-links-loader">
            <text:p>unfoldingWord/tc-study/@bt-synergy/translation-words-links-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words-links-loader">
            <text:p>tc-study/@bt-synergy/translation-words-links-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translation-words-loader">
            <text:p>unfoldingWord/tc-study/@bt-synergy/translation-words-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words-loader">
            <text:p>@bt-synergy/translation-word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words-loader">
            <text:p>unfoldingWord/tc-study/@bt-synergy/translation-words-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words-loader">
            <text:p>tc-study/@bt-synergy/translation-words-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ui-controls">
            <text:p>unfoldingWord/tc-study/@bt-synergy/ui-control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ui-controls">
            <text:p>@bt-synergy/ui-contr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ui-controls">
            <text:p>unfoldingWord/tc-study/@bt-synergy/ui-control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ui-controls">
            <text:p>tc-study/@bt-synergy/ui-contro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unified-catalog-store">
            <text:p>unfoldingWord/tc-study/@bt-synergy/unified-catalog-stor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unified-catalog-store">
            <text:p>@bt-synergy/unified-catalog-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unified-catalog-store">
            <text:p>unfoldingWord/tc-study/@bt-synergy/unified-catalog-stor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unified-catalog-store">
            <text:p>tc-study/@bt-synergy/unified-catalog-st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usfm-processor">
            <text:p>unfoldingWord/tc-study/@bt-synergy/usfm-processo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usfm-processor">
            <text:p>@bt-synergy/usfm-process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6-05-11T19:02:48Z">
            <text:p>2026-05-11T19:02:48Z</text:p>
          </table:table-cell>
          <table:table-cell office:value-type="string" office:string-value="unfoldingWord/tc-study/@bt-synergy/usfm-processor">
            <text:p>unfoldingWord/tc-study/@bt-synergy/usfm-processo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usfm-processor">
            <text:p>tc-study/@bt-synergy/usfm-process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toolkit/resource-downloader">
            <text:p>unfoldingWord/tc-study/@bt-toolkit/resource-down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toolkit/resource-downloader">
            <text:p>@bt-toolkit/resource-down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toolkit/resource-downloader">
            <text:p>unfoldingWord/tc-study/@bt-toolkit/resource-down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toolkit/resource-downloader">
            <text:p>tc-study/@bt-toolkit/resource-down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ible-web">
            <text:p>unfoldingWord/tc-study/bible-we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web">
            <text:p>bible-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ible-web">
            <text:p>unfoldingWord/tc-study/bible-we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ible-web">
            <text:p>tc-study/bible-we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linked-panels-spike">
            <text:p>unfoldingWord/tc-study/linked-panels-spik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linked-panels-spike">
            <text:p>linked-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linked-panels-spike">
            <text:p>unfoldingWord/tc-study/linked-panels-spik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linked-panels-spike">
            <text:p>tc-study/linked-panels-spik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resource-panels-spike">
            <text:p>unfoldingWord/tc-study/resource-panels-spik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panels-spike">
            <text:p>resource-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resource-panels-spike">
            <text:p>unfoldingWord/tc-study/resource-panels-spik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resource-panels-spike">
            <text:p>tc-study/resource-panels-spik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tc-study">
            <text:p>unfoldingWord/tc-study/tc-study</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tudy">
            <text:p>tc-stud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6-05-11T19:02:48Z">
            <text:p>2026-05-11T19:02:48Z</text:p>
          </table:table-cell>
          <table:table-cell office:value-type="string" office:string-value="unfoldingWord/tc-study/tc-study">
            <text:p>unfoldingWord/tc-study/tc-study</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tc-study">
            <text:p>tc-study/tc-stud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toc-generator-web">
            <text:p>unfoldingWord/tc-study/toc-generator-we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oc-generator-web">
            <text:p>toc-gener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toc-generator-web">
            <text:p>unfoldingWord/tc-study/toc-generator-we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toc-generator-web">
            <text:p>tc-study/toc-generator-we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tool">
            <text:p>unfoldingWord/tc-tool</text:p>
          </table:table-cell>
          <table:table-cell office:value-type="string" office:string-value="https://github.com/unfoldingWord/tc-tool">
            <text:p>https://github.com/unfoldingWord/tc-too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8-11T15:36:38Z">
            <text:p>2020-08-11T15:36:38Z</text:p>
          </table:table-cell>
          <table:table-cell office:value-type="string" office:string-value="2020-04-16T01:20:11Z">
            <text:p>2020-04-16T01:20:11Z</text:p>
          </table:table-cell>
          <table:table-cell office:value-type="string" office:string-value="2019-01-10T06:26:02Z">
            <text:p>2019-01-10T06:26:02Z</text:p>
          </table:table-cell>
          <table:table-cell office:value-type="string" office:string-value="['FoustAndrew/wordAlignment', 'unfoldingWord/checking-tool-wrapper', 'unfoldingWord/translationNotes', 'unfoldingWord/translationWords', 'unfoldingWord/wordAlignment', 'unfoldingWord/translationCore']">
            <text:p>['FoustAndrew/wordAlignment', 'unfoldingWord/checking-tool-wrapper', 'unfoldingWord/translationNotes', 'unfoldingWord/translationWords', 'unfoldingWord/wordAlignment', 'unfoldingWord/translationCore']</text:p>
          </table:table-cell>
          <table:table-cell office:value-type="string" office:string-value="['da1nerd', 'mannycolon', 'dependabot-support', 'PhotoNomad0', 'RoyalSix', 'bspidel']">
            <text:p>['da1nerd', 'mannycolon', 'dependabot-support', 'PhotoNomad0', 'RoyalSix', 'bspidel']</text:p>
          </table:table-cell>
          <table:table-cell office:value-type="string" office:string-value="0">
            <text:p>0</text:p>
          </table:table-cell>
          <table:table-cell office:value-type="string" office:string-value="0">
            <text:p>0</text:p>
          </table:table-cell>
          <table:table-cell office:value-type="string" office:string-value="180">
            <text:p>18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tc-tool">
            <text:p>tc-tool</text:p>
          </table:table-cell>
          <table:table-cell office:value-type="string" office:string-value="https://www.npmjs.com/package/tc-tool">
            <text:p>https://www.npmjs.com/package/tc-tool</text:p>
          </table:table-cell>
          <table:table-cell office:value-type="string" office:string-value="False">
            <text:p>False</text:p>
          </table:table-cell>
          <table:table-cell office:value-type="string" office:string-value="21331">
            <text:p>21331</text:p>
          </table:table-cell>
          <table:table-cell office:value-type="string" office:string-value="2020-04-16T04:30:54.949Z">
            <text:p>2020-04-16T04:30:54.949Z</text:p>
          </table:table-cell>
          <table:table-cell office:value-type="string" office:string-value="['translationCore', 'translationNotes', 'translationWords', 'wordAlignment', 'checking-tool-wrapper', 'ScripturePane', 'VerseCheck', 'toolTemplate']">
            <text:p>['translationCore', 'translationNotes', 'translationWords', 'wordAlignment', 'checking-tool-wrapper', 'ScripturePane', 'VerseCheck', 'toolTemplate']</text:p>
          </table:table-cell>
          <table:table-cell office:value-type="string" office:string-value="">
            <text:p/>
          </table:table-cell>
          <table:table-cell office:value-type="string" office:string-value="2020-04-16T01:20:15Z">
            <text:p>2020-04-16T01:20:15Z</text:p>
          </table:table-cell>
          <table:table-cell office:value-type="string" office:string-value="unfoldingWord/tc-tool">
            <text:p>unfoldingWord/tc-tool</text:p>
          </table:table-cell>
          <table:table-cell office:value-type="string" office:string-value="https://github.com/unfoldingWord/tc-tool">
            <text:p>https://github.com/unfoldingWord/tc-tool</text:p>
          </table:table-cell>
          <table:table-cell office:value-type="string" office:string-value="2-Keep">
            <text:p>2-Keep</text:p>
          </table:table-cell>
          <table:table-cell office:value-type="string" office:string-value="externally used - Repository has GitHub dependents or at least 1,000 npm downloads in the last year (21331 downloads).">
            <text:p>externally used - Repository has GitHub dependents or at least 1,000 npm downloads in the last year (2133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1331 downloads in the last year).">
            <text:p>Package has detected local usage, GitHub dependents, or significant npm downloads (21331 downloads in the last year).</text:p>
          </table:table-cell>
          <table:table-cell office:value-type="string" office:string-value="tc-tool">
            <text:p>tc-too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ui-toolkit">
            <text:p>unfoldingWord/tc-ui-toolkit</text:p>
          </table:table-cell>
          <table:table-cell office:value-type="string" office:string-value="https://github.com/unfoldingWord/tc-ui-toolkit">
            <text:p>https://github.com/unfoldingWord/tc-ui-toolki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31T18:53:36Z">
            <text:p>2024-12-31T18:53:36Z</text:p>
          </table:table-cell>
          <table:table-cell office:value-type="string" office:string-value="2024-12-31T18:52:39Z">
            <text:p>2024-12-31T18:52:39Z</text:p>
          </table:table-cell>
          <table:table-cell office:value-type="string" office:string-value="2019-02-06T21:38:09Z">
            <text:p>2019-02-06T21:38:09Z</text:p>
          </table:table-cell>
          <table:table-cell office:value-type="string" office:string-value="['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office:string-value="['mannycolon', 'PhotoNomad0', 'RoyalSix', 'da1nerd', 'richmahn', 'Sterling (Jay) Scott', 'bspidel', 'dependabot-support']">
            <text:p>['mannycolon', 'PhotoNomad0', 'RoyalSix', 'da1nerd', 'richmahn', 'Sterling (Jay) Scott', 'bspidel', 'dependabot-support']</text:p>
          </table:table-cell>
          <table:table-cell office:value-type="string" office:string-value="34">
            <text:p>34</text:p>
          </table:table-cell>
          <table:table-cell office:value-type="string" office:string-value="33">
            <text:p>33</text:p>
          </table:table-cell>
          <table:table-cell office:value-type="string" office:string-value="1973">
            <text:p>197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9">
            <text:p>9</text:p>
          </table:table-cell>
          <table:table-cell office:value-type="string" office:string-value="tc-ui-toolkit">
            <text:p>tc-ui-toolkit</text:p>
          </table:table-cell>
          <table:table-cell office:value-type="string" office:string-value="https://www.npmjs.com/package/tc-ui-toolkit">
            <text:p>https://www.npmjs.com/package/tc-ui-toolkit</text:p>
          </table:table-cell>
          <table:table-cell office:value-type="string" office:string-value="False">
            <text:p>False</text:p>
          </table:table-cell>
          <table:table-cell office:value-type="string" office:string-value="29580">
            <text:p>29580</text:p>
          </table:table-cell>
          <table:table-cell office:value-type="string" office:string-value="2024-12-31T18:53:34.752Z">
            <text:p>2024-12-31T18:53:34.752Z</text:p>
          </table:table-cell>
          <table:table-cell office:value-type="string" office:string-value="['gateway-admin', 'translationCore', 'wordAlignment', 'gateway-edit', 'tc-create-app', 'single-scripture-rcl', 'translation-helps-rcl', 'scripture-resources-rcl', 'bsa', 'checking-tool-wrapper', 'alignment-playground', 'next-js-template']">
            <text:p>['gateway-admin', 'translationCore', 'wordAlignment', 'gateway-edit', 'tc-create-app', 'single-scripture-rcl', 'translation-helps-rcl', 'scripture-resources-rcl', 'bsa', 'checking-tool-wrapper', 'alignment-playground', 'next-js-template']</text:p>
          </table:table-cell>
          <table:table-cell office:value-type="string" office:string-value="['string-punctuation-tokenizer', 'word-aligner', 'usfm-js', 'wordmap-lexer']">
            <text:p>['string-punctuation-tokenizer', 'word-aligner', 'usfm-js', 'wordmap-lexer']</text:p>
          </table:table-cell>
          <table:table-cell office:value-type="string" office:string-value="2024-12-31T18:52:44Z">
            <text:p>2024-12-31T18:52:44Z</text:p>
          </table:table-cell>
          <table:table-cell office:value-type="string" office:string-value="unfoldingWord/tc-ui-toolkit">
            <text:p>unfoldingWord/tc-ui-toolkit</text:p>
          </table:table-cell>
          <table:table-cell office:value-type="string" office:string-value="https://github.com/unfoldingWord/tc-ui-toolkit">
            <text:p>https://github.com/unfoldingWord/tc-ui-toolkit</text:p>
          </table:table-cell>
          <table:table-cell office:value-type="string" office:string-value="2-Keep">
            <text:p>2-Keep</text:p>
          </table:table-cell>
          <table:table-cell office:value-type="string" office:string-value="externally used - Repository has GitHub dependents or at least 1,000 npm downloads in the last year (29580 downloads).">
            <text:p>externally used - Repository has GitHub dependents or at least 1,000 npm downloads in the last year (2958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9580 downloads in the last year).">
            <text:p>Package has detected local usage, GitHub dependents, or significant npm downloads (29580 downloads in the last year).</text:p>
          </table:table-cell>
          <table:table-cell office:value-type="string" office:string-value="tc-ui-toolkit">
            <text:p>tc-ui-toolkit</text:p>
          </table:table-cell>
          <table:table-cell office:value-type="string" office:string-value="unfoldingWord">
            <text:p>unfoldingWord</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n_add_scripture_links">
            <text:p>unfoldingWord-dev/tn_add_scripture_links</text:p>
          </table:table-cell>
          <table:table-cell office:value-type="string" office:string-value="https://github.com/unfoldingWord-dev/tn_add_scripture_links">
            <text:p>https://github.com/unfoldingWord-dev/tn_add_scripture_link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7-29T19:11:11Z">
            <text:p>2025-07-29T19:11:11Z</text:p>
          </table:table-cell>
          <table:table-cell office:value-type="string" office:string-value="2025-07-29T19:11:09Z">
            <text:p>2025-07-29T19:11:09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7-29T19:12:09Z">
            <text:p>2025-07-29T19:12:09Z</text:p>
          </table:table-cell>
          <table:table-cell office:value-type="string" office:string-value="unfoldingWord-dev/tn_add_scripture_links">
            <text:p>unfoldingWord-dev/tn_add_scripture_links</text:p>
          </table:table-cell>
          <table:table-cell office:value-type="string" office:string-value="https://github.com/unfoldingWord-dev/tn_add_scripture_links">
            <text:p>https://github.com/unfoldingWord-dev/tn_add_scripture_links</text:p>
          </table:table-cell>
          <table:table-cell office:value-type="string" office:string-value="2-Keep">
            <text:p>2-Keep</text:p>
          </table:table-cell>
          <table:table-cell office:value-type="string" office:string-value="Active - Last commit was within the last 12 months (11 months ago).">
            <text:p>Active - Last commit was within the last 12 months (11 months ago).</text:p>
          </table:table-cell>
          <table:table-cell office:value-type="string" office:string-value="">
            <text:p/>
          </table:table-cell>
          <table:table-cell office:value-type="string" office:string-value="">
            <text:p/>
          </table:table-cell>
          <table:table-cell office:value-type="string" office:string-value="tn_add_scripture_links">
            <text:p>tn_add_scripture_links</text:p>
          </table:table-cell>
          <table:table-cell office:value-type="string" office:string-value="unfoldingWord-dev">
            <text:p>unfoldingWord-dev</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tq-app">
            <text:p>unfoldingWord-box3/tq-app</text:p>
          </table:table-cell>
          <table:table-cell office:value-type="string" office:string-value="https://github.com/unfoldingWord-box3/tq-app">
            <text:p>https://github.com/unfoldingWord-box3/tq-ap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7-28T12:54:36Z">
            <text:p>2025-07-28T12:54:36Z</text:p>
          </table:table-cell>
          <table:table-cell office:value-type="string" office:string-value="2025-07-28T12:54:32Z">
            <text:p>2025-07-28T12:54:3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6">
            <text:p>6</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qa-app">
            <text:p>qa-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5-07-30T15:49:01Z">
            <text:p>2025-07-30T15:49:01Z</text:p>
          </table:table-cell>
          <table:table-cell office:value-type="string" office:string-value="unfoldingWord-box3/tq-app">
            <text:p>unfoldingWord-box3/tq-app</text:p>
          </table:table-cell>
          <table:table-cell office:value-type="string" office:string-value="https://github.com/unfoldingWord-box3/tq-app">
            <text:p>https://github.com/unfoldingWord-box3/tq-app</text:p>
          </table:table-cell>
          <table:table-cell office:value-type="string" office:string-value="2-Keep">
            <text:p>2-Keep</text:p>
          </table:table-cell>
          <table:table-cell office:value-type="string" office:string-value="Active - Last commit was within the last 12 months (11 months ago).">
            <text:p>Active - Last commit was within the last 12 months (1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q-app">
            <text:p>tq-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ranslation-helps-mcp">
            <text:p>unfoldingWord/translation-helps-mcp</text:p>
          </table:table-cell>
          <table:table-cell office:value-type="string" office:string-value="https://github.com/unfoldingWord/translation-helps-mcp">
            <text:p>https://github.com/unfoldingWord/translation-helps-mcp</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23T14:15:05Z">
            <text:p>2026-06-23T14:15:05Z</text:p>
          </table:table-cell>
          <table:table-cell office:value-type="string" office:string-value="2026-06-23T14:15:02Z">
            <text:p>2026-06-23T14:15:02Z</text:p>
          </table:table-cell>
          <table:table-cell office:value-type="string" office:string-value="">
            <text:p/>
          </table:table-cell>
          <table:table-cell office:value-type="string" office:string-value="klappy/translation-helps-mcp">
            <text:p>klappy/translation-helps-mcp</text:p>
          </table:table-cell>
          <table:table-cell office:value-type="string" office:string-value="['klappy', 'azrasgdc', 'abelpz', 'cursoragent', 'ILindsley', 'IanLindsley']">
            <text:p>['klappy', 'azrasgdc', 'abelpz', 'cursoragent', 'ILindsley', 'IanLindsley']</text:p>
          </table:table-cell>
          <table:table-cell office:value-type="string" office:string-value="9">
            <text:p>9</text:p>
          </table:table-cell>
          <table:table-cell office:value-type="string" office:string-value="1">
            <text:p>1</text:p>
          </table:table-cell>
          <table:table-cell office:value-type="string" office:string-value="840">
            <text:p>84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mcp">
            <text:p>translation-helps-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3T15:29:34Z">
            <text:p>2026-06-23T15:29:34Z</text:p>
          </table:table-cell>
          <table:table-cell office:value-type="string" office:string-value="unfoldingWord/translation-helps-mcp">
            <text:p>unfoldingWord/translation-helps-mcp</text:p>
          </table:table-cell>
          <table:table-cell office:value-type="string" office:string-value="https://github.com/unfoldingWord/translation-helps-mcp">
            <text:p>https://github.com/unfoldingWord/translation-helps-mcp</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translation-helps-mcp">
            <text:p>translation-helps-mc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ranslation-helps-rcl">
            <text:p>unfoldingWord/translation-helps-rcl</text:p>
          </table:table-cell>
          <table:table-cell office:value-type="string" office:string-value="https://github.com/unfoldingWord/translation-helps-rcl">
            <text:p>https://github.com/unfoldingWord/translation-helps-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7T22:01:48Z">
            <text:p>2026-03-27T22:01:48Z</text:p>
          </table:table-cell>
          <table:table-cell office:value-type="string" office:string-value="2026-03-27T22:00:54Z">
            <text:p>2026-03-27T22:00:54Z</text:p>
          </table:table-cell>
          <table:table-cell office:value-type="string" office:string-value="">
            <text:p/>
          </table:table-cell>
          <table:table-cell office:value-type="string" office:string-value="['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office:string-value="['mannycolon', 'PhotoNomad0', 'kintsoogi', 'superdav42', 'larsgson', 'abelpz', 'jincypjose', 'theNerd247', 'Joel-C-Johnson', 'richmahn', 'klappy', 'RoyalSix', 'mandolyte']">
            <text:p>['mannycolon', 'PhotoNomad0', 'kintsoogi', 'superdav42', 'larsgson', 'abelpz', 'jincypjose', 'theNerd247', 'Joel-C-Johnson', 'richmahn', 'klappy', 'RoyalSix', 'mandolyte']</text:p>
          </table:table-cell>
          <table:table-cell office:value-type="string" office:string-value="8">
            <text:p>8</text:p>
          </table:table-cell>
          <table:table-cell office:value-type="string" office:string-value="2">
            <text:p>2</text:p>
          </table:table-cell>
          <table:table-cell office:value-type="string" office:string-value="829">
            <text:p>8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rcl">
            <text:p>translation-helps-rcl</text:p>
          </table:table-cell>
          <table:table-cell office:value-type="string" office:string-value="https://www.npmjs.com/package/translation-helps-rcl">
            <text:p>https://www.npmjs.com/package/translation-helps-rcl</text:p>
          </table:table-cell>
          <table:table-cell office:value-type="string" office:string-value="False">
            <text:p>False</text:p>
          </table:table-cell>
          <table:table-cell office:value-type="string" office:string-value="16090">
            <text:p>16090</text:p>
          </table:table-cell>
          <table:table-cell office:value-type="string" office:string-value="2026-03-27T22:01:47.002Z">
            <text:p>2026-03-27T22:01:47.002Z</text:p>
          </table:table-cell>
          <table:table-cell office:value-type="string" office:string-value="['gateway-admin', 'gateway-edit', 'single-scripture-rcl', 'bsa', 'gateway-translate', 'uw-editor', 'resource-workspace-rcl', 'create-app', 'next-js-template', 'admin-app']">
            <text:p>['gateway-admin', 'gateway-edit', 'single-scripture-rcl', 'bsa', 'gateway-translate', 'uw-editor', 'resource-workspace-rcl', 'create-app', 'next-js-template', 'admin-app']</text:p>
          </table:table-cell>
          <table:table-cell office:value-type="string" office:string-value="['bible-reference-range', 'dcs-branch-merger', 'gitea-react-toolkit', 'markdown-translatable', 'scripture-resources-rcl', 'tc-ui-toolkit', 'word-aligner', 'string-punctuation-tokenizer', 'usfm-js', 'wordmap-lexer', '@unfoldingword/eslint-config', 'dcs-js', 'uw-quote-helpers', 'tsv-groupdata-parser', 'uw-bible-parser', 'uw-tsv-parser']">
            <text:p>['bible-reference-range', 'dcs-branch-merger', 'gitea-react-toolkit', 'markdown-translatable', 'scripture-resources-rcl', 'tc-ui-toolkit', 'word-aligner', 'string-punctuation-tokenizer', 'usfm-js', 'wordmap-lexer', '@unfoldingword/eslint-config', 'dcs-js', 'uw-quote-helpers', 'tsv-groupdata-parser', 'uw-bible-parser', 'uw-tsv-parser']</text:p>
          </table:table-cell>
          <table:table-cell office:value-type="string" office:string-value="2026-03-27T22:00:59Z">
            <text:p>2026-03-27T22:00:59Z</text:p>
          </table:table-cell>
          <table:table-cell office:value-type="string" office:string-value="unfoldingWord/translation-helps-rcl">
            <text:p>unfoldingWord/translation-helps-rcl</text:p>
          </table:table-cell>
          <table:table-cell office:value-type="string" office:string-value="https://github.com/unfoldingWord/translation-helps-rcl">
            <text:p>https://github.com/unfoldingWord/translation-helps-rcl</text:p>
          </table:table-cell>
          <table:table-cell office:value-type="string" office:string-value="2-Keep">
            <text:p>2-Keep</text:p>
          </table:table-cell>
          <table:table-cell office:value-type="string" office:string-value="externally used - Repository has GitHub dependents or at least 1,000 npm downloads in the last year (16090 downloads).">
            <text:p>externally used - Repository has GitHub dependents or at least 1,000 npm downloads in the last year (1609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090 downloads in the last year).">
            <text:p>Package has detected local usage, GitHub dependents, or significant npm downloads (16090 downloads in the last year).</text:p>
          </table:table-cell>
          <table:table-cell office:value-type="string" office:string-value="translation-helps-rcl">
            <text:p>translation-helps-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ranslation-notes-extension">
            <text:p>unfoldingWord-box3/translation-notes-extension</text:p>
          </table:table-cell>
          <table:table-cell office:value-type="string" office:string-value="https://github.com/unfoldingWord-box3/translation-notes-extension">
            <text:p>https://github.com/unfoldingWord-box3/translation-notes-extension</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7T18:28:19Z">
            <text:p>2024-03-27T18:28:19Z</text:p>
          </table:table-cell>
          <table:table-cell office:value-type="string" office:string-value="2024-03-27T18:28:00Z">
            <text:p>2024-03-27T18:28:00Z</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kintsoogi">
            <text:p>kintsoogi</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10T15:18:59Z">
            <text:p>2024-06-10T15:18:59Z</text:p>
          </table:table-cell>
          <table:table-cell office:value-type="string" office:string-value="unfoldingWord-box3/translation-notes-extension">
            <text:p>unfoldingWord-box3/translation-notes-extension</text:p>
          </table:table-cell>
          <table:table-cell office:value-type="string" office:string-value="https://github.com/unfoldingWord-box3/translation-notes-extension">
            <text:p>https://github.com/unfoldingWord-box3/translation-notes-extensi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translation-notes-extension">
            <text:p>translation-notes-extensio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ranslation-project">
            <text:p>unfoldingWord-box3/translation-project</text:p>
          </table:table-cell>
          <table:table-cell office:value-type="string" office:string-value="https://github.com/unfoldingWord-box3/translation-project">
            <text:p>https://github.com/unfoldingWord-box3/translation-project</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0T17:43:25Z">
            <text:p>2024-03-20T17:43:25Z</text:p>
          </table:table-cell>
          <table:table-cell office:value-type="string" office:string-value="2024-03-20T17:43:20Z">
            <text:p>2024-03-20T17:43:20Z</text:p>
          </table:table-cell>
          <table:table-cell office:value-type="string" office:string-value="">
            <text:p/>
          </table:table-cell>
          <table:table-cell office:value-type="string" office:string-value="ryderwishart/translation-project">
            <text:p>ryderwishart/translation-project</text:p>
          </table:table-cell>
          <table:table-cell office:value-type="string" office:string-value="ryderwishart">
            <text:p>ryderwishart</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10T15:22:27Z">
            <text:p>2024-06-10T15:22:27Z</text:p>
          </table:table-cell>
          <table:table-cell office:value-type="string" office:string-value="unfoldingWord-box3/translation-project">
            <text:p>unfoldingWord-box3/translation-project</text:p>
          </table:table-cell>
          <table:table-cell office:value-type="string" office:string-value="https://github.com/unfoldingWord-box3/translation-project">
            <text:p>https://github.com/unfoldingWord-box3/translation-projec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translation-project">
            <text:p>translation-projec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ranslationCore">
            <text:p>unfoldingWord/translationCore</text:p>
          </table:table-cell>
          <table:table-cell office:value-type="string" office:string-value="https://github.com/unfoldingWord/translationCore">
            <text:p>https://github.com/unfoldingWord/translationCor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3T19:05:56Z">
            <text:p>2026-06-13T19:05:56Z</text:p>
          </table:table-cell>
          <table:table-cell office:value-type="string" office:string-value="2026-06-13T19:05:56Z">
            <text:p>2026-06-13T19:05:56Z</text:p>
          </table:table-cell>
          <table:table-cell office:value-type="string" office:string-value="2026-01-12T14:46:30Z">
            <text:p>2026-01-12T14:46:30Z</text:p>
          </table:table-cell>
          <table:table-cell office:value-type="string" office:string-value="">
            <text:p/>
          </table:table-cell>
          <table:table-cell office:value-type="string" office:string-value="['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office:string-value="642">
            <text:p>642</text:p>
          </table:table-cell>
          <table:table-cell office:value-type="string" office:string-value="13">
            <text:p>13</text:p>
          </table:table-cell>
          <table:table-cell office:value-type="string" office:string-value="13287">
            <text:p>13287</text:p>
          </table:table-cell>
          <table:table-cell office:value-type="string" office:string-value="">
            <text:p/>
          </table:table-cell>
          <table:table-cell office:value-type="string" office:string-value="['https://github.com/unfoldingWord/translationWords.git', 'https://github.com/unfoldingWord/wordAlignment.git', 'https://github.com/unfoldingWord/translationNotes.git']">
            <text:p>['https://github.com/unfoldingWord/translationWords.git', 'https://github.com/unfoldingWord/wordAlignment.git', 'https://github.com/unfoldingWord/translationNotes.git']</text:p>
          </table:table-cell>
          <table:table-cell office:value-type="string" office:string-value="13588">
            <text:p>13588</text:p>
          </table:table-cell>
          <table:table-cell office:value-type="string" office:string-value="89">
            <text:p>89</text:p>
          </table:table-cell>
          <table:table-cell office:value-type="string" office:string-value="translationCore">
            <text:p>translation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checking-tool-wrapper', 'gogs-client', 'selections', 'string-punctuation-tokenizer', 'tc-source-content-updater', 'tc-strings', 'tc-tool', 'tc-ui-toolkit', 'tsv-groupdata-parser', 'usfm-js', 'word-aligner', 'wordmap', 'wordmap-lexer', 'electronite', 'uw-tsv-parser']">
            <text:p>['bible-reference-range', 'checking-tool-wrapper', 'gogs-client', 'selections', 'string-punctuation-tokenizer', 'tc-source-content-updater', 'tc-strings', 'tc-tool', 'tc-ui-toolkit', 'tsv-groupdata-parser', 'usfm-js', 'word-aligner', 'wordmap', 'wordmap-lexer', 'electronite', 'uw-tsv-parser']</text:p>
          </table:table-cell>
          <table:table-cell office:value-type="string" office:string-value="2026-06-13T19:06:00Z">
            <text:p>2026-06-13T19:06:00Z</text:p>
          </table:table-cell>
          <table:table-cell office:value-type="string" office:string-value="unfoldingWord/translationCore">
            <text:p>unfoldingWord/translationCore</text:p>
          </table:table-cell>
          <table:table-cell office:value-type="string" office:string-value="https://github.com/unfoldingWord/translationCore">
            <text:p>https://github.com/unfoldingWord/translationCore</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Core">
            <text:p>translation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ranslationRecorder-Info">
            <text:p>unfoldingWord-dev/translationRecorder-Info</text:p>
          </table:table-cell>
          <table:table-cell office:value-type="string" office:string-value="https://github.com/unfoldingWord-dev/translationRecorder-Info">
            <text:p>https://github.com/unfoldingWord-dev/translationRecorder-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37:00Z">
            <text:p>2025-10-09T10:37:00Z</text:p>
          </table:table-cell>
          <table:table-cell office:value-type="string" office:string-value="2025-10-09T10:37:00Z">
            <text:p>2025-10-09T10:37:00Z</text:p>
          </table:table-cell>
          <table:table-cell office:value-type="string" office:string-value="2017-05-10T20:33:49Z">
            <text:p>2017-05-10T20:33:49Z</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129">
            <text:p>1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37:04Z">
            <text:p>2025-10-09T10:37:04Z</text:p>
          </table:table-cell>
          <table:table-cell office:value-type="string" office:string-value="unfoldingWord-dev/translationRecorder-Info">
            <text:p>unfoldingWord-dev/translationRecorder-Info</text:p>
          </table:table-cell>
          <table:table-cell office:value-type="string" office:string-value="https://github.com/unfoldingWord-dev/translationRecorder-Info">
            <text:p>https://github.com/unfoldingWord-dev/translationRecorder-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translationRecorder-Info">
            <text:p>translationRecorder-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ranslationStudio-Info">
            <text:p>unfoldingWord-dev/translationStudio-Info</text:p>
          </table:table-cell>
          <table:table-cell office:value-type="string" office:string-value="https://github.com/unfoldingWord-dev/translationStudio-Info">
            <text:p>https://github.com/unfoldingWord-dev/translationStudio-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40:03Z">
            <text:p>2025-10-09T10:40:03Z</text:p>
          </table:table-cell>
          <table:table-cell office:value-type="string" office:string-value="2025-10-09T10:40:03Z">
            <text:p>2025-10-09T10:40:03Z</text:p>
          </table:table-cell>
          <table:table-cell office:value-type="string" office:string-value="">
            <text:p/>
          </table:table-cell>
          <table:table-cell office:value-type="string" office:string-value="">
            <text:p/>
          </table:table-cell>
          <table:table-cell office:value-type="string" office:string-value="['pgamer78', 'ChrisJarka', 'yakob-aleksandrovich', 'jag3773']">
            <text:p>['pgamer78', 'ChrisJarka', 'yakob-aleksandrovich', 'jag3773']</text:p>
          </table:table-cell>
          <table:table-cell office:value-type="string" office:string-value="0">
            <text:p>0</text:p>
          </table:table-cell>
          <table:table-cell office:value-type="string" office:string-value="0">
            <text:p>0</text:p>
          </table:table-cell>
          <table:table-cell office:value-type="string" office:string-value="691">
            <text:p>69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40:07Z">
            <text:p>2025-10-09T10:40:07Z</text:p>
          </table:table-cell>
          <table:table-cell office:value-type="string" office:string-value="unfoldingWord-dev/translationStudio-Info">
            <text:p>unfoldingWord-dev/translationStudio-Info</text:p>
          </table:table-cell>
          <table:table-cell office:value-type="string" office:string-value="https://github.com/unfoldingWord-dev/translationStudio-Info">
            <text:p>https://github.com/unfoldingWord-dev/translationStudio-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translationStudio-Info">
            <text:p>translationStudio-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sv-groupdata-parser">
            <text:p>unfoldingWord/tsv-groupdata-parser</text:p>
          </table:table-cell>
          <table:table-cell office:value-type="string" office:string-value="https://github.com/unfoldingWord/tsv-groupdata-parser">
            <text:p>https://github.com/unfoldingWord/tsv-groupdata-pars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01T15:56:28Z">
            <text:p>2025-12-01T15:56:28Z</text:p>
          </table:table-cell>
          <table:table-cell office:value-type="string" office:string-value="2025-12-01T15:18:56Z">
            <text:p>2025-12-01T15:18:56Z</text:p>
          </table:table-cell>
          <table:table-cell office:value-type="string" office:string-value="2021-08-27T21:03:12Z">
            <text:p>2021-08-27T21:03:12Z</text:p>
          </table:table-cell>
          <table:table-cell office:value-type="string" office:string-value="['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office:string-value="['mannycolon', 'PhotoNomad0', 'da1nerd', 'richmahn', 'RoyalSix', 'mandolyte', 'Sterling (Jay) Scott', 'yakob-aleksandrovich']">
            <text:p>['mannycolon', 'PhotoNomad0', 'da1nerd', 'richmahn', 'RoyalSix', 'mandolyte', 'Sterling (Jay) Scott', 'yakob-aleksandrovich']</text:p>
          </table:table-cell>
          <table:table-cell office:value-type="string" office:string-value="7">
            <text:p>7</text:p>
          </table:table-cell>
          <table:table-cell office:value-type="string" office:string-value="7">
            <text:p>7</text:p>
          </table:table-cell>
          <table:table-cell office:value-type="string" office:string-value="284">
            <text:p>28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tsv-groupdata-parser">
            <text:p>tsv-groupdata-parser</text:p>
          </table:table-cell>
          <table:table-cell office:value-type="string" office:string-value="https://www.npmjs.com/package/tsv-groupdata-parser">
            <text:p>https://www.npmjs.com/package/tsv-groupdata-parser</text:p>
          </table:table-cell>
          <table:table-cell office:value-type="string" office:string-value="False">
            <text:p>False</text:p>
          </table:table-cell>
          <table:table-cell office:value-type="string" office:string-value="6516">
            <text:p>6516</text:p>
          </table:table-cell>
          <table:table-cell office:value-type="string" office:string-value="2024-10-16T17:43:33.516Z">
            <text:p>2024-10-16T17:43:33.516Z</text:p>
          </table:table-cell>
          <table:table-cell office:value-type="string" office:string-value="['translationCore', 'uw-quote-helpers', 'tc-source-content-updater', 'checking-tool-rcl', 'checking-extension', 'pdf-generator']">
            <text:p>['translationCore', 'uw-quote-helpers', 'tc-source-content-updater', 'checking-tool-rcl', 'checking-extension', 'pdf-generator']</text:p>
          </table:table-cell>
          <table:table-cell office:value-type="string" office:string-value="['bible-reference-range', 'uw-tsv-parser', 'string-punctuation-tokenizer', 'wordmap-lexer']">
            <text:p>['bible-reference-range', 'uw-tsv-parser', 'string-punctuation-tokenizer', 'wordmap-lexer']</text:p>
          </table:table-cell>
          <table:table-cell office:value-type="string" office:string-value="2025-12-01T15:19:13Z">
            <text:p>2025-12-01T15:19:13Z</text:p>
          </table:table-cell>
          <table:table-cell office:value-type="string" office:string-value="unfoldingWord/tsv-groupdata-parser">
            <text:p>unfoldingWord/tsv-groupdata-parser</text:p>
          </table:table-cell>
          <table:table-cell office:value-type="string" office:string-value="https://github.com/unfoldingWord/tsv-groupdata-parser">
            <text:p>https://github.com/unfoldingWord/tsv-groupdata-parser</text:p>
          </table:table-cell>
          <table:table-cell office:value-type="string" office:string-value="2-Keep">
            <text:p>2-Keep</text:p>
          </table:table-cell>
          <table:table-cell office:value-type="string" office:string-value="externally used - Repository has GitHub dependents or at least 1,000 npm downloads in the last year (6516 downloads).">
            <text:p>externally used - Repository has GitHub dependents or at least 1,000 npm downloads in the last year (651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516 downloads in the last year).">
            <text:p>Package has detected local usage, GitHub dependents, or significant npm downloads (6516 downloads in the last year).</text:p>
          </table:table-cell>
          <table:table-cell office:value-type="string" office:string-value="tsv-groupdata-parser">
            <text:p>tsv-groupdata-pars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sv-quote-converters">
            <text:p>unfoldingWord/tsv-quote-converters</text:p>
          </table:table-cell>
          <table:table-cell office:value-type="string" office:string-value="https://github.com/unfoldingWord/tsv-quote-converters">
            <text:p>https://github.com/unfoldingWord/tsv-quote-converter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06:45:29Z">
            <text:p>2026-06-17T06:45:29Z</text:p>
          </table:table-cell>
          <table:table-cell office:value-type="string" office:string-value="2026-06-17T06:45:25Z">
            <text:p>2026-06-17T06:45:25Z</text:p>
          </table:table-cell>
          <table:table-cell office:value-type="string" office:string-value="">
            <text:p/>
          </table:table-cell>
          <table:table-cell office:value-type="string" office:string-value="['unfoldingWord/node-cli-add-gl-quotes-to-tsv-files', 'unfoldingWord/tsv7-tn-cleanup-app']">
            <text:p>['unfoldingWord/node-cli-add-gl-quotes-to-tsv-files', 'unfoldingWord/tsv7-tn-cleanup-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1">
            <text:p>6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quote-converters">
            <text:p>tsv-quote-converters</text:p>
          </table:table-cell>
          <table:table-cell office:value-type="string" office:string-value="https://www.npmjs.com/package/tsv-quote-converters">
            <text:p>https://www.npmjs.com/package/tsv-quote-converters</text:p>
          </table:table-cell>
          <table:table-cell office:value-type="string" office:string-value="False">
            <text:p>False</text:p>
          </table:table-cell>
          <table:table-cell office:value-type="string" office:string-value="4032">
            <text:p>4032</text:p>
          </table:table-cell>
          <table:table-cell office:value-type="string" office:string-value="2026-06-05T07:52:39.650Z">
            <text:p>2026-06-05T07:52:39.650Z</text:p>
          </table:table-cell>
          <table:table-cell office:value-type="string" office:string-value="['twl-generator', 'tsv-twl-creation-app', 'tsv7-tn-cleanup-app', 'add-gl-quotes-to-tsv-files']">
            <text:p>['twl-generator', 'tsv-twl-creation-app', 'tsv7-tn-cleanup-app', 'add-gl-quotes-to-tsv-files']</text:p>
          </table:table-cell>
          <table:table-cell office:value-type="string" office:string-value="['string-punctuation-tokenizer', 'wordmap-lexer']">
            <text:p>['string-punctuation-tokenizer', 'wordmap-lexer']</text:p>
          </table:table-cell>
          <table:table-cell office:value-type="string" office:string-value="2026-06-17T06:45:34Z">
            <text:p>2026-06-17T06:45:34Z</text:p>
          </table:table-cell>
          <table:table-cell office:value-type="string" office:string-value="unfoldingWord/tsv-quote-converters">
            <text:p>unfoldingWord/tsv-quote-converters</text:p>
          </table:table-cell>
          <table:table-cell office:value-type="string" office:string-value="https://github.com/unfoldingWord/tsv-quote-converters">
            <text:p>https://github.com/unfoldingWord/tsv-quote-converters</text:p>
          </table:table-cell>
          <table:table-cell office:value-type="string" office:string-value="2-Keep">
            <text:p>2-Keep</text:p>
          </table:table-cell>
          <table:table-cell office:value-type="string" office:string-value="externally used - Repository has GitHub dependents or at least 1,000 npm downloads in the last year (4032 downloads).">
            <text:p>externally used - Repository has GitHub dependents or at least 1,000 npm downloads in the last year (403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032 downloads in the last year).">
            <text:p>Package has detected local usage, GitHub dependents, or significant npm downloads (4032 downloads in the last year).</text:p>
          </table:table-cell>
          <table:table-cell office:value-type="string" office:string-value="tsv-quote-converters">
            <text:p>tsv-quote-convert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sv-twl-creation-app">
            <text:p>unfoldingWord/tsv-twl-creation-app</text:p>
          </table:table-cell>
          <table:table-cell office:value-type="string" office:string-value="https://github.com/unfoldingWord/tsv-twl-creation-app">
            <text:p>https://github.com/unfoldingWord/tsv-twl-creation-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10:51:14Z">
            <text:p>2026-06-16T10:51:14Z</text:p>
          </table:table-cell>
          <table:table-cell office:value-type="string" office:string-value="2026-06-16T10:50:55Z">
            <text:p>2026-06-16T10:50:55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163">
            <text:p>16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twl-creation-app">
            <text:p>tsv-twl-creati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wl-generator', 'usfm-js', 'string-punctuation-tokenizer', 'usfm-alignment-remover', 'wordmap-lexer']">
            <text:p>['tsv-quote-converters', 'twl-generator', 'usfm-js', 'string-punctuation-tokenizer', 'usfm-alignment-remover', 'wordmap-lexer']</text:p>
          </table:table-cell>
          <table:table-cell office:value-type="string" office:string-value="2026-06-16T10:51:18Z">
            <text:p>2026-06-16T10:51:18Z</text:p>
          </table:table-cell>
          <table:table-cell office:value-type="string" office:string-value="unfoldingWord/tsv-twl-creation-app">
            <text:p>unfoldingWord/tsv-twl-creation-app</text:p>
          </table:table-cell>
          <table:table-cell office:value-type="string" office:string-value="https://github.com/unfoldingWord/tsv-twl-creation-app">
            <text:p>https://github.com/unfoldingWord/tsv-twl-creation-app</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sv-twl-creation-app">
            <text:p>tsv-twl-creation-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sv7-tn-cleanup-app">
            <text:p>unfoldingWord/tsv7-tn-cleanup-app</text:p>
          </table:table-cell>
          <table:table-cell office:value-type="string" office:string-value="https://github.com/unfoldingWord/tsv7-tn-cleanup-app">
            <text:p>https://github.com/unfoldingWord/tsv7-tn-cleanup-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1T23:11:16Z">
            <text:p>2025-12-11T23:11:16Z</text:p>
          </table:table-cell>
          <table:table-cell office:value-type="string" office:string-value="2025-12-11T23:11:14Z">
            <text:p>2025-12-11T23:11:14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95">
            <text:p>9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7-tn-cleanup-app">
            <text:p>tsv7-tn-cleanup-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string-punctuation-tokenizer', 'wordmap-lexer']">
            <text:p>['tsv-quote-converters', 'string-punctuation-tokenizer', 'wordmap-lexer']</text:p>
          </table:table-cell>
          <table:table-cell office:value-type="string" office:string-value="2025-12-11T23:11:20Z">
            <text:p>2025-12-11T23:11:20Z</text:p>
          </table:table-cell>
          <table:table-cell office:value-type="string" office:string-value="unfoldingWord/tsv7-tn-cleanup-app">
            <text:p>unfoldingWord/tsv7-tn-cleanup-app</text:p>
          </table:table-cell>
          <table:table-cell office:value-type="string" office:string-value="https://github.com/unfoldingWord/tsv7-tn-cleanup-app">
            <text:p>https://github.com/unfoldingWord/tsv7-tn-cleanup-app</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sv7-tn-cleanup-app">
            <text:p>tsv7-tn-cleanup-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
            <text:p>unfoldingWord-dev/tx</text:p>
          </table:table-cell>
          <table:table-cell office:value-type="string" office:string-value="https://github.com/unfoldingWord-dev/tx">
            <text:p>https://github.com/unfoldingWord-dev/tx</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9T10:49:33Z">
            <text:p>2025-10-09T10:49:33Z</text:p>
          </table:table-cell>
          <table:table-cell office:value-type="string" office:string-value="2025-10-09T10:49:33Z">
            <text:p>2025-10-09T10:49:33Z</text:p>
          </table:table-cell>
          <table:table-cell office:value-type="string" office:string-value="">
            <text:p/>
          </table:table-cell>
          <table:table-cell office:value-type="string" office:string-value="">
            <text:p/>
          </table:table-cell>
          <table:table-cell office:value-type="string" office:string-value="['da1nerd', 'yakob-aleksandrovich', 'jag3773']">
            <text:p>['da1nerd', 'yakob-aleksandrovich', 'jag3773']</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49:37Z">
            <text:p>2025-10-09T10:49:37Z</text:p>
          </table:table-cell>
          <table:table-cell office:value-type="string" office:string-value="unfoldingWord-dev/tx">
            <text:p>unfoldingWord-dev/tx</text:p>
          </table:table-cell>
          <table:table-cell office:value-type="string" office:string-value="https://github.com/unfoldingWord-dev/tx">
            <text:p>https://github.com/unfoldingWord-dev/tx</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tx">
            <text:p>tx</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nlocked-Bible-Commentary-Info">
            <text:p>unfoldingWord-dev/Unlocked-Bible-Commentary-Info</text:p>
          </table:table-cell>
          <table:table-cell office:value-type="string" office:string-value="https://github.com/unfoldingWord-dev/Unlocked-Bible-Commentary-Info">
            <text:p>https://github.com/unfoldingWord-dev/Unlocked-Bible-Commentary-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3:46Z">
            <text:p>2025-10-09T11:03:46Z</text:p>
          </table:table-cell>
          <table:table-cell office:value-type="string" office:string-value="2025-10-09T11:03:46Z">
            <text:p>2025-10-09T11:03:46Z</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9T15:21:29Z">
            <text:p>2025-12-09T15:21:29Z</text:p>
          </table:table-cell>
          <table:table-cell office:value-type="string" office:string-value="unfoldingWord-dev/Unlocked-Bible-Commentary-Info">
            <text:p>unfoldingWord-dev/Unlocked-Bible-Commentary-Info</text:p>
          </table:table-cell>
          <table:table-cell office:value-type="string" office:string-value="https://github.com/unfoldingWord-dev/Unlocked-Bible-Commentary-Info">
            <text:p>https://github.com/unfoldingWord-dev/Unlocked-Bible-Commentary-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Unlocked-Bible-Commentary-Info">
            <text:p>Unlocked-Bible-Commentary-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nlocked-Bible-Notes-Info">
            <text:p>unfoldingWord-dev/Unlocked-Bible-Notes-Info</text:p>
          </table:table-cell>
          <table:table-cell office:value-type="string" office:string-value="https://github.com/unfoldingWord-dev/Unlocked-Bible-Notes-Info">
            <text:p>https://github.com/unfoldingWord-dev/Unlocked-Bible-Notes-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7:50Z">
            <text:p>2025-10-09T11:07:50Z</text:p>
          </table:table-cell>
          <table:table-cell office:value-type="string" office:string-value="2025-10-09T11:07:50Z">
            <text:p>2025-10-09T11:07:50Z</text:p>
          </table:table-cell>
          <table:table-cell office:value-type="string" office:string-value="">
            <text:p/>
          </table:table-cell>
          <table:table-cell office:value-type="string" office:string-value="">
            <text:p/>
          </table:table-cell>
          <table:table-cell office:value-type="string" office:string-value="['ChrisJarka', 'jag3773', 'yakob-aleksandrovich', 'russp41']">
            <text:p>['ChrisJarka', 'jag3773', 'yakob-aleksandrovich', 'russp41']</text:p>
          </table:table-cell>
          <table:table-cell office:value-type="string" office:string-value="0">
            <text:p>0</text:p>
          </table:table-cell>
          <table:table-cell office:value-type="string" office:string-value="0">
            <text:p>0</text:p>
          </table:table-cell>
          <table:table-cell office:value-type="string" office:string-value="102">
            <text:p>10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9T15:21:13Z">
            <text:p>2025-12-09T15:21:13Z</text:p>
          </table:table-cell>
          <table:table-cell office:value-type="string" office:string-value="unfoldingWord-dev/Unlocked-Bible-Notes-Info">
            <text:p>unfoldingWord-dev/Unlocked-Bible-Notes-Info</text:p>
          </table:table-cell>
          <table:table-cell office:value-type="string" office:string-value="https://github.com/unfoldingWord-dev/Unlocked-Bible-Notes-Info">
            <text:p>https://github.com/unfoldingWord-dev/Unlocked-Bible-Notes-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Unlocked-Bible-Notes-Info">
            <text:p>Unlocked-Bible-Notes-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nlocked-Grammar-Info">
            <text:p>unfoldingWord-dev/Unlocked-Grammar-Info</text:p>
          </table:table-cell>
          <table:table-cell office:value-type="string" office:string-value="https://github.com/unfoldingWord-dev/Unlocked-Grammar-Info">
            <text:p>https://github.com/unfoldingWord-dev/Unlocked-Grammar-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10:38Z">
            <text:p>2025-10-09T11:10:38Z</text:p>
          </table:table-cell>
          <table:table-cell office:value-type="string" office:string-value="2025-10-09T11:10:38Z">
            <text:p>2025-10-09T11:10:38Z</text:p>
          </table:table-cell>
          <table:table-cell office:value-type="string" office:string-value="">
            <text:p/>
          </table:table-cell>
          <table:table-cell office:value-type="string" office:string-value="">
            <text:p/>
          </table:table-cell>
          <table:table-cell office:value-type="string" office:string-value="['cpresson', 'pjoakes', 'jag3773', 'yakob-aleksandrovich']">
            <text:p>['cpresson', 'pjoakes', 'jag3773', 'yakob-aleksandrovich']</text:p>
          </table:table-cell>
          <table:table-cell office:value-type="string" office:string-value="0">
            <text:p>0</text:p>
          </table:table-cell>
          <table:table-cell office:value-type="string" office:string-value="0">
            <text:p>0</text:p>
          </table:table-cell>
          <table:table-cell office:value-type="string" office:string-value="71">
            <text:p>7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1:10:42Z">
            <text:p>2025-10-09T11:10:42Z</text:p>
          </table:table-cell>
          <table:table-cell office:value-type="string" office:string-value="unfoldingWord-dev/Unlocked-Grammar-Info">
            <text:p>unfoldingWord-dev/Unlocked-Grammar-Info</text:p>
          </table:table-cell>
          <table:table-cell office:value-type="string" office:string-value="https://github.com/unfoldingWord-dev/Unlocked-Grammar-Info">
            <text:p>https://github.com/unfoldingWord-dev/Unlocked-Grammar-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Unlocked-Grammar-Info">
            <text:p>Unlocked-Grammar-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nlocked-Greek-Lexicon-Info">
            <text:p>unfoldingWord-dev/Unlocked-Greek-Lexicon-Info</text:p>
          </table:table-cell>
          <table:table-cell office:value-type="string" office:string-value="https://github.com/unfoldingWord-dev/Unlocked-Greek-Lexicon-Info">
            <text:p>https://github.com/unfoldingWord-dev/Unlocked-Greek-Lexicon-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26:54Z">
            <text:p>2025-10-09T11:26:54Z</text:p>
          </table:table-cell>
          <table:table-cell office:value-type="string" office:string-value="2025-10-09T11:26:54Z">
            <text:p>2025-10-09T11:26:54Z</text:p>
          </table:table-cell>
          <table:table-cell office:value-type="string" office:string-value="">
            <text:p/>
          </table:table-cell>
          <table:table-cell office:value-type="string" office:string-value="">
            <text:p/>
          </table:table-cell>
          <table:table-cell office:value-type="string" office:string-value="['destatez', 'cpresson', 'yakob-aleksandrovich', 'toddlprice', 'jag3773']">
            <text:p>['destatez', 'cpresson', 'yakob-aleksandrovich', 'toddlprice', 'jag3773']</text:p>
          </table:table-cell>
          <table:table-cell office:value-type="string" office:string-value="0">
            <text:p>0</text:p>
          </table:table-cell>
          <table:table-cell office:value-type="string" office:string-value="0">
            <text:p>0</text:p>
          </table:table-cell>
          <table:table-cell office:value-type="string" office:string-value="157">
            <text:p>15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1:26:58Z">
            <text:p>2025-10-09T11:26:58Z</text:p>
          </table:table-cell>
          <table:table-cell office:value-type="string" office:string-value="unfoldingWord-dev/Unlocked-Greek-Lexicon-Info">
            <text:p>unfoldingWord-dev/Unlocked-Greek-Lexicon-Info</text:p>
          </table:table-cell>
          <table:table-cell office:value-type="string" office:string-value="https://github.com/unfoldingWord-dev/Unlocked-Greek-Lexicon-Info">
            <text:p>https://github.com/unfoldingWord-dev/Unlocked-Greek-Lexicon-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Unlocked-Greek-Lexicon-Info">
            <text:p>Unlocked-Greek-Lexicon-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sfm-alignment-remover-app">
            <text:p>unfoldingWord/usfm-alignment-remover-app</text:p>
          </table:table-cell>
          <table:table-cell office:value-type="string" office:string-value="https://github.com/unfoldingWord/usfm-alignment-remover-app">
            <text:p>https://github.com/unfoldingWord/usfm-alignment-remover-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17:08Z">
            <text:p>2026-01-21T23:17:08Z</text:p>
          </table:table-cell>
          <table:table-cell office:value-type="string" office:string-value="2026-01-21T23:17:06Z">
            <text:p>2026-01-21T23:17:06Z</text:p>
          </table:table-cell>
          <table:table-cell office:value-type="string" office:string-value="">
            <text:p/>
          </table:table-cell>
          <table:table-cell office:value-type="string" office:string-value="unfoldingWord/door43-preview-app">
            <text:p>unfoldingWord/door43-preview-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alignment-remover">
            <text:p>usfm-alignment-remover</text:p>
          </table:table-cell>
          <table:table-cell office:value-type="string" office:string-value="https://www.npmjs.com/package/usfm-alignment-remover">
            <text:p>https://www.npmjs.com/package/usfm-alignment-remover</text:p>
          </table:table-cell>
          <table:table-cell office:value-type="string" office:string-value="False">
            <text:p>False</text:p>
          </table:table-cell>
          <table:table-cell office:value-type="string" office:string-value="855">
            <text:p>855</text:p>
          </table:table-cell>
          <table:table-cell office:value-type="string" office:string-value="2026-01-21T23:37:01.096Z">
            <text:p>2026-01-21T23:37:01.096Z</text:p>
          </table:table-cell>
          <table:table-cell office:value-type="string" office:string-value="['twl-generator', 'door43-preview-app', 'door43-preview-renderers']">
            <text:p>['twl-generator', 'door43-preview-app', 'door43-preview-renderers']</text:p>
          </table:table-cell>
          <table:table-cell office:value-type="string" office:string-value="usfm-js">
            <text:p>usfm-js</text:p>
          </table:table-cell>
          <table:table-cell office:value-type="string" office:string-value="2026-01-21T23:17:11Z">
            <text:p>2026-01-21T23:17:11Z</text:p>
          </table:table-cell>
          <table:table-cell office:value-type="string" office:string-value="unfoldingWord/usfm-alignment-remover-app">
            <text:p>unfoldingWord/usfm-alignment-remover-app</text:p>
          </table:table-cell>
          <table:table-cell office:value-type="string" office:string-value="https://github.com/unfoldingWord/usfm-alignment-remover-app">
            <text:p>https://github.com/unfoldingWord/usfm-alignment-remover-app</text:p>
          </table:table-cell>
          <table:table-cell office:value-type="string" office:string-value="2-Keep">
            <text:p>2-Keep</text:p>
          </table:table-cell>
          <table:table-cell office:value-type="string" office:string-value="externally used - Repository has GitHub dependents or at least 1,000 npm downloads in the last year (855 downloads).">
            <text:p>externally used - Repository has GitHub dependents or at least 1,000 npm downloads in the last year (85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855 downloads in the last year).">
            <text:p>Package has detected local usage, GitHub dependents, or significant npm downloads (855 downloads in the last year).</text:p>
          </table:table-cell>
          <table:table-cell office:value-type="string" office:string-value="usfm-alignment-remover-app">
            <text:p>usfm-alignment-remover-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sfm-js">
            <text:p>unfoldingWord/usfm-js</text:p>
          </table:table-cell>
          <table:table-cell office:value-type="string" office:string-value="https://github.com/unfoldingWord/usfm-js">
            <text:p>https://github.com/unfoldingWord/usfm-js</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5-23T23:11:20Z">
            <text:p>2026-05-23T23:11:20Z</text:p>
          </table:table-cell>
          <table:table-cell office:value-type="string" office:string-value="2026-05-23T23:09:13Z">
            <text:p>2026-05-23T23:09:13Z</text:p>
          </table:table-cell>
          <table:table-cell office:value-type="string" office:string-value="2018-11-05T12:47:58Z">
            <text:p>2018-11-05T12:47:58Z</text:p>
          </table:table-cell>
          <table:table-cell office:value-type="string" office:string-value="['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office:string-value="['PhotoNomad0', 'RoyalSix', 'mannycolon', 'klappy', 'Sterling (Jay) Scott', 'ihoegen', 'da1nerd', 'dependabot-support', 'richmahn', 'bspidel']">
            <text:p>['PhotoNomad0', 'RoyalSix', 'mannycolon', 'klappy', 'Sterling (Jay) Scott', 'ihoegen', 'da1nerd', 'dependabot-support', 'richmahn', 'bspidel']</text:p>
          </table:table-cell>
          <table:table-cell office:value-type="string" office:string-value="3">
            <text:p>3</text:p>
          </table:table-cell>
          <table:table-cell office:value-type="string" office:string-value="0">
            <text:p>0</text:p>
          </table:table-cell>
          <table:table-cell office:value-type="string" office:string-value="420">
            <text:p>4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4">
            <text:p>4</text:p>
          </table:table-cell>
          <table:table-cell office:value-type="string" office:string-value="usfm-js">
            <text:p>usfm-js</text:p>
          </table:table-cell>
          <table:table-cell office:value-type="string" office:string-value="https://www.npmjs.com/package/usfm-js">
            <text:p>https://www.npmjs.com/package/usfm-js</text:p>
          </table:table-cell>
          <table:table-cell office:value-type="string" office:string-value="False">
            <text:p>False</text:p>
          </table:table-cell>
          <table:table-cell office:value-type="string" office:string-value="123860">
            <text:p>123860</text:p>
          </table:table-cell>
          <table:table-cell office:value-type="string" office:string-value="2026-05-23T23:11:18.348Z">
            <text:p>2026-05-23T23:11:18.348Z</text:p>
          </table:table-cell>
          <table:table-cell office:value-type="string" office:string-value="['cskillbp-prompt-over-code', 'wordmap-usfm',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
            <text:p>['cskillbp-prompt-over-code', 'wordmap-usfm',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text:p>
          </table:table-cell>
          <table:table-cell office:value-type="string" office:string-value="">
            <text:p/>
          </table:table-cell>
          <table:table-cell office:value-type="string" office:string-value="2026-05-23T23:09:18Z">
            <text:p>2026-05-23T23:09:18Z</text:p>
          </table:table-cell>
          <table:table-cell office:value-type="string" office:string-value="unfoldingWord/usfm-js">
            <text:p>unfoldingWord/usfm-js</text:p>
          </table:table-cell>
          <table:table-cell office:value-type="string" office:string-value="https://github.com/unfoldingWord/usfm-js">
            <text:p>https://github.com/unfoldingWord/usfm-js</text:p>
          </table:table-cell>
          <table:table-cell office:value-type="string" office:string-value="2-Keep">
            <text:p>2-Keep</text:p>
          </table:table-cell>
          <table:table-cell office:value-type="string" office:string-value="externally used - Repository has GitHub dependents or at least 1,000 npm downloads in the last year (123860 downloads).">
            <text:p>externally used - Repository has GitHub dependents or at least 1,000 npm downloads in the last year (12386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3860 downloads in the last year).">
            <text:p>Package has detected local usage, GitHub dependents, or significant npm downloads (123860 downloads in the last year).</text:p>
          </table:table-cell>
          <table:table-cell office:value-type="string" office:string-value="usfm-js">
            <text:p>usfm-j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SFM-Tools">
            <text:p>unfoldingWord-dev/USFM-Tools</text:p>
          </table:table-cell>
          <table:table-cell office:value-type="string" office:string-value="https://github.com/unfoldingWord-dev/USFM-Tools">
            <text:p>https://github.com/unfoldingWord-dev/USFM-Tools</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9-11-19T01:34:28Z">
            <text:p>2019-11-19T01:34:28Z</text:p>
          </table:table-cell>
          <table:table-cell office:value-type="string" office:string-value="2019-11-19T01:34:27Z">
            <text:p>2019-11-19T01:34:27Z</text:p>
          </table:table-cell>
          <table:table-cell office:value-type="string" office:string-value="2017-08-24T19:20:35Z">
            <text:p>2017-08-24T19:20:35Z</text:p>
          </table:table-cell>
          <table:table-cell office:value-type="string" office:string-value="openenglishbible/USFM-Tools">
            <text:p>openenglishbible/USFM-Tools</text:p>
          </table:table-cell>
          <table:table-cell office:value-type="string" office:string-value="['Richard Mahn', 'kbuildsyourdotcom', 'Jesse A. Griffin', 'openenglishbible', 'da1nerd', 'richmahn', 'phillip-hopper', 'Phil Hopper', 'jag3773', 'rbnswartz', 'PhotoNomad0']">
            <text:p>['Richard Mahn', 'kbuildsyourdotcom', 'Jesse A. Griffin', 'openenglishbible', 'da1nerd', 'richmahn', 'phillip-hopper', 'Phil Hopper', 'jag3773', 'rbnswartz', 'PhotoNomad0']</text:p>
          </table:table-cell>
          <table:table-cell office:value-type="string" office:string-value="3">
            <text:p>3</text:p>
          </table:table-cell>
          <table:table-cell office:value-type="string" office:string-value="1">
            <text:p>1</text:p>
          </table:table-cell>
          <table:table-cell office:value-type="string" office:string-value="174">
            <text:p>17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5T16:07:19Z">
            <text:p>2025-12-05T16:07:19Z</text:p>
          </table:table-cell>
          <table:table-cell office:value-type="string" office:string-value="unfoldingWord-dev/USFM-Tools">
            <text:p>unfoldingWord-dev/USFM-Tools</text:p>
          </table:table-cell>
          <table:table-cell office:value-type="string" office:string-value="https://github.com/unfoldingWord-dev/USFM-Tools">
            <text:p>https://github.com/unfoldingWord-dev/USFM-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USFM-Tools">
            <text:p>USFM-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uw-codex-editor">
            <text:p>unfoldingWord-box3/uw-codex-editor</text:p>
          </table:table-cell>
          <table:table-cell office:value-type="string" office:string-value="https://github.com/unfoldingWord-box3/uw-codex-editor">
            <text:p>https://github.com/unfoldingWord-box3/uw-codex-editor</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6T20:54:08Z">
            <text:p>2024-03-26T20:54:08Z</text:p>
          </table:table-cell>
          <table:table-cell office:value-type="string" office:string-value="2024-03-26T20:53:58Z">
            <text:p>2024-03-26T20:53:58Z</text:p>
          </table:table-cell>
          <table:table-cell office:value-type="string" office:string-value="">
            <text:p/>
          </table:table-cell>
          <table:table-cell office:value-type="string" office:string-value="genesis-ai-dev/codex-editor">
            <text:p>genesis-ai-dev/codex-editor</text:p>
          </table:table-cell>
          <table:table-cell office:value-type="string" office:string-value="['ryderwishart', 'BenjaminScholtens', 'Daniel Losey', 'dadukhankevin', 'brianineza01', 'kintsoogi', 'CalJosKos', 'Kalisa11', 'PhotoNomad0', 'samueljd']">
            <text:p>['ryderwishart', 'BenjaminScholtens', 'Daniel Losey', 'dadukhankevin', 'brianineza01', 'kintsoogi', 'CalJosKos', 'Kalisa11', 'PhotoNomad0', 'samueljd']</text:p>
          </table:table-cell>
          <table:table-cell office:value-type="string" office:string-value="0">
            <text:p>0</text:p>
          </table:table-cell>
          <table:table-cell office:value-type="string" office:string-value="0">
            <text:p>0</text:p>
          </table:table-cell>
          <table:table-cell office:value-type="string" office:string-value="734">
            <text:p>73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28T07:20:52Z">
            <text:p>2024-03-28T07:20:52Z</text:p>
          </table:table-cell>
          <table:table-cell office:value-type="string" office:string-value="unfoldingWord-box3/uw-codex-editor">
            <text:p>unfoldingWord-box3/uw-codex-editor</text:p>
          </table:table-cell>
          <table:table-cell office:value-type="string" office:string-value="https://github.com/unfoldingWord-box3/uw-codex-editor">
            <text:p>https://github.com/unfoldingWord-box3/uw-codex-edito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uw-codex-editor">
            <text:p>uw-codex-edito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content-validation">
            <text:p>unfoldingWord/uw-content-validation</text:p>
          </table:table-cell>
          <table:table-cell office:value-type="string" office:string-value="https://github.com/unfoldingWord/uw-content-validation">
            <text:p>https://github.com/unfoldingWord/uw-content-validatio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1:57Z">
            <text:p>2026-06-22T04:01:57Z</text:p>
          </table:table-cell>
          <table:table-cell office:value-type="string" office:string-value="2026-06-22T03:57:41Z">
            <text:p>2026-06-22T03:57:41Z</text:p>
          </table:table-cell>
          <table:table-cell office:value-type="string" office:string-value="">
            <text:p/>
          </table:table-cell>
          <table:table-cell office:value-type="string" office:string-value="['unfoldingWord/gateway-admin', 'unfoldingWord/tc-create-app']">
            <text:p>['unfoldingWord/gateway-admin', 'unfoldingWord/tc-create-app']</text:p>
          </table:table-cell>
          <table:table-cell office:value-type="string" office:string-value="['RobH123', 'mandolyte', 'PhotoNomad0', 'richmahn', 'dependabot[bot]', 'jag3773', 'ancientTexts-net']">
            <text:p>['RobH123', 'mandolyte', 'PhotoNomad0', 'richmahn', 'dependabot[bot]', 'jag3773', 'ancientTexts-net']</text:p>
          </table:table-cell>
          <table:table-cell office:value-type="string" office:string-value="81">
            <text:p>81</text:p>
          </table:table-cell>
          <table:table-cell office:value-type="string" office:string-value="3">
            <text:p>3</text:p>
          </table:table-cell>
          <table:table-cell office:value-type="string" office:string-value="699">
            <text:p>69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content-validation">
            <text:p>uw-content-validation</text:p>
          </table:table-cell>
          <table:table-cell office:value-type="string" office:string-value="https://www.npmjs.com/package/uw-content-validation">
            <text:p>https://www.npmjs.com/package/uw-content-validation</text:p>
          </table:table-cell>
          <table:table-cell office:value-type="string" office:string-value="False">
            <text:p>False</text:p>
          </table:table-cell>
          <table:table-cell office:value-type="string" office:string-value="2264">
            <text:p>2264</text:p>
          </table:table-cell>
          <table:table-cell office:value-type="string" office:string-value="2026-06-22T04:01:52.034Z">
            <text:p>2026-06-22T04:01:52.034Z</text:p>
          </table:table-cell>
          <table:table-cell office:value-type="string" office:string-value="['gateway-admin', 'tc-create-app', 'catalog-next-toolkit', 'content-validation-app']">
            <text:p>['gateway-admin', 'tc-create-app', 'catalog-next-toolkit', 'content-validation-app']</text:p>
          </table:table-cell>
          <table:table-cell office:value-type="string" office:string-value="usfm-js">
            <text:p>usfm-js</text:p>
          </table:table-cell>
          <table:table-cell office:value-type="string" office:string-value="2026-06-22T03:58:05Z">
            <text:p>2026-06-22T03:58:05Z</text:p>
          </table:table-cell>
          <table:table-cell office:value-type="string" office:string-value="unfoldingWord/uw-content-validation">
            <text:p>unfoldingWord/uw-content-validation</text:p>
          </table:table-cell>
          <table:table-cell office:value-type="string" office:string-value="https://github.com/unfoldingWord/uw-content-validation">
            <text:p>https://github.com/unfoldingWord/uw-content-validation</text:p>
          </table:table-cell>
          <table:table-cell office:value-type="string" office:string-value="2-Keep">
            <text:p>2-Keep</text:p>
          </table:table-cell>
          <table:table-cell office:value-type="string" office:string-value="externally used - Repository has GitHub dependents or at least 1,000 npm downloads in the last year (2264 downloads).">
            <text:p>externally used - Repository has GitHub dependents or at least 1,000 npm downloads in the last year (226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64 downloads in the last year).">
            <text:p>Package has detected local usage, GitHub dependents, or significant npm downloads (2264 downloads in the last year).</text:p>
          </table:table-cell>
          <table:table-cell office:value-type="string" office:string-value="uw-content-validation">
            <text:p>uw-content-validati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editor">
            <text:p>unfoldingWord/uw-editor</text:p>
          </table:table-cell>
          <table:table-cell office:value-type="string" office:string-value="https://github.com/unfoldingWord/uw-editor">
            <text:p>https://github.com/unfoldingWord/uw-edito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9-12T15:49:20Z">
            <text:p>2023-09-12T15:49:20Z</text:p>
          </table:table-cell>
          <table:table-cell office:value-type="string" office:string-value="2023-09-12T15:49:12Z">
            <text:p>2023-09-12T15:49:12Z</text:p>
          </table:table-cell>
          <table:table-cell office:value-type="string" office:string-value="">
            <text:p/>
          </table:table-cell>
          <table:table-cell office:value-type="string" office:string-value="unfoldingWord/gateway-translate">
            <text:p>unfoldingWord/gateway-translate</text:p>
          </table:table-cell>
          <table:table-cell office:value-type="string" office:string-value="['larsgson', 'mandolyte', 'superdav42', 'abelpz', 'irahopkinson']">
            <text:p>['larsgson', 'mandolyte', 'superdav42', 'abelpz', 'irahopkinson']</text:p>
          </table:table-cell>
          <table:table-cell office:value-type="string" office:string-value="5">
            <text:p>5</text:p>
          </table:table-cell>
          <table:table-cell office:value-type="string" office:string-value="3">
            <text:p>3</text:p>
          </table:table-cell>
          <table:table-cell office:value-type="string" office:string-value="175">
            <text:p>17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editor">
            <text:p>uw-editor</text:p>
          </table:table-cell>
          <table:table-cell office:value-type="string" office:string-value="https://www.npmjs.com/package/uw-editor">
            <text:p>https://www.npmjs.com/package/uw-editor</text:p>
          </table:table-cell>
          <table:table-cell office:value-type="string" office:string-value="True">
            <text:p>True</text:p>
          </table:table-cell>
          <table:table-cell office:value-type="string" office:string-value="1181">
            <text:p>1181</text:p>
          </table:table-cell>
          <table:table-cell office:value-type="string" office:string-value="2023-03-21T14:43:38.471Z">
            <text:p>2023-03-21T14:43:38.471Z</text:p>
          </table:table-cell>
          <table:table-cell office:value-type="string" office:string-value="">
            <text:p/>
          </table:table-cell>
          <table:table-cell office:value-type="string" office:string-value="['epitelete-html', 'translation-helps-rcl', 'bible-reference-range', 'dcs-branch-merger', 'gitea-react-toolkit', 'markdown-translatable', 'scripture-resources-rcl', 'tc-ui-toolkit', 'word-aligner', 'string-punctuation-tokenizer', 'usfm-js', 'wordmap-lexer', '@unfoldingword/eslint-config', 'uw-proskomma', 'dcs-js', 'uw-quote-helpers', 'tsv-groupdata-parser', 'uw-bible-parser', 'uw-tsv-parser']">
            <text:p>['epitelete-html', 'translation-helps-rcl', 'bible-reference-range', 'dcs-branch-merger', 'gitea-react-toolkit', 'markdown-translatable', 'scripture-resources-rcl', 'tc-ui-toolkit', 'word-aligner', 'string-punctuation-tokenizer', 'usfm-js', 'wordmap-lexer', '@unfoldingword/eslint-config', 'uw-proskomma', 'dcs-js', 'uw-quote-helpers', 'tsv-groupdata-parser', 'uw-bible-parser', 'uw-tsv-parser']</text:p>
          </table:table-cell>
          <table:table-cell office:value-type="string" office:string-value="2022-10-19T03:29:50Z">
            <text:p>2022-10-19T03:29:50Z</text:p>
          </table:table-cell>
          <table:table-cell office:value-type="string" office:string-value="unfoldingWord/uw-editor">
            <text:p>unfoldingWord/uw-editor</text:p>
          </table:table-cell>
          <table:table-cell office:value-type="string" office:string-value="https://github.com/unfoldingWord/uw-editor">
            <text:p>https://github.com/unfoldingWord/uw-editor</text:p>
          </table:table-cell>
          <table:table-cell office:value-type="string" office:string-value="2-Keep">
            <text:p>2-Keep</text:p>
          </table:table-cell>
          <table:table-cell office:value-type="string" office:string-value="externally used - Repository has GitHub dependents or at least 1,000 npm downloads in the last year (1181 downloads).">
            <text:p>externally used - Repository has GitHub dependents or at least 1,000 npm downloads in the last year (1181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cell office:value-type="string" office:string-value="uw-editor">
            <text:p>uw-edi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languages-rcl">
            <text:p>unfoldingWord/uw-languages-rcl</text:p>
          </table:table-cell>
          <table:table-cell office:value-type="string" office:string-value="https://github.com/unfoldingWord/uw-languages-rcl">
            <text:p>https://github.com/unfoldingWord/uw-languages-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8T16:01:39Z">
            <text:p>2026-05-28T16:01:39Z</text:p>
          </table:table-cell>
          <table:table-cell office:value-type="string" office:string-value="2026-05-28T16:00:29Z">
            <text:p>2026-05-28T16:00:29Z</text:p>
          </table:table-cell>
          <table:table-cell office:value-type="string" office:string-value="">
            <text:p/>
          </table:table-cell>
          <table:table-cell office:value-type="string" office:string-value="['nishantshah-me/docusaurus', 'unfoldingWord/gateway-translate', 'unfoldingWord/tc-create-app']">
            <text:p>['nishantshah-me/docusaurus', 'unfoldingWord/gateway-translate', 'unfoldingWord/tc-create-app']</text:p>
          </table:table-cell>
          <table:table-cell office:value-type="string" office:string-value="['mandolyte', 'dependabot[bot]', 'abelpz', 'PhotoNomad0']">
            <text:p>['mandolyte', 'dependabot[bot]', 'abelpz', 'PhotoNomad0']</text:p>
          </table:table-cell>
          <table:table-cell office:value-type="string" office:string-value="15">
            <text:p>15</text:p>
          </table:table-cell>
          <table:table-cell office:value-type="string" office:string-value="12">
            <text:p>12</text:p>
          </table:table-cell>
          <table:table-cell office:value-type="string" office:string-value="77">
            <text:p>7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languages-rcl">
            <text:p>uw-languages-rcl</text:p>
          </table:table-cell>
          <table:table-cell office:value-type="string" office:string-value="https://www.npmjs.com/package/uw-languages-rcl">
            <text:p>https://www.npmjs.com/package/uw-languages-rcl</text:p>
          </table:table-cell>
          <table:table-cell office:value-type="string" office:string-value="False">
            <text:p>False</text:p>
          </table:table-cell>
          <table:table-cell office:value-type="string" office:string-value="1219">
            <text:p>1219</text:p>
          </table:table-cell>
          <table:table-cell office:value-type="string" office:string-value="2026-05-28T16:01:32.183Z">
            <text:p>2026-05-28T16:01:32.183Z</text:p>
          </table:table-cell>
          <table:table-cell office:value-type="string" office:string-value="['tc-create-app', 'dcs-react-hooks']">
            <text:p>['tc-create-app', 'dcs-react-hooks']</text:p>
          </table:table-cell>
          <table:table-cell office:value-type="string" office:string-value="">
            <text:p/>
          </table:table-cell>
          <table:table-cell office:value-type="string" office:string-value="2026-05-28T16:01:18Z">
            <text:p>2026-05-28T16:01:18Z</text:p>
          </table:table-cell>
          <table:table-cell office:value-type="string" office:string-value="unfoldingWord/uw-languages-rcl">
            <text:p>unfoldingWord/uw-languages-rcl</text:p>
          </table:table-cell>
          <table:table-cell office:value-type="string" office:string-value="https://github.com/unfoldingWord/uw-languages-rcl">
            <text:p>https://github.com/unfoldingWord/uw-languages-rcl</text:p>
          </table:table-cell>
          <table:table-cell office:value-type="string" office:string-value="2-Keep">
            <text:p>2-Keep</text:p>
          </table:table-cell>
          <table:table-cell office:value-type="string" office:string-value="externally used - Repository has GitHub dependents or at least 1,000 npm downloads in the last year (1219 downloads).">
            <text:p>externally used - Repository has GitHub dependents or at least 1,000 npm downloads in the last year (121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19 downloads in the last year).">
            <text:p>Package has detected local usage, GitHub dependents, or significant npm downloads (1219 downloads in the last year).</text:p>
          </table:table-cell>
          <table:table-cell office:value-type="string" office:string-value="uw-languages-rcl">
            <text:p>uw-languages-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uw-proskomma">
            <text:p>unfoldingWord-box3/uw-proskomma</text:p>
          </table:table-cell>
          <table:table-cell office:value-type="string" office:string-value="https://github.com/unfoldingWord-box3/uw-proskomma">
            <text:p>https://github.com/unfoldingWord-box3/uw-proskomma</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0T15:27:48Z">
            <text:p>2024-10-10T15:27:48Z</text:p>
          </table:table-cell>
          <table:table-cell office:value-type="string" office:string-value="2024-10-10T15:27:44Z">
            <text:p>2024-10-10T15:27:44Z</text:p>
          </table:table-cell>
          <table:table-cell office:value-type="string" office:string-value="">
            <text:p/>
          </table:table-cell>
          <table:table-cell office:value-type="string" office:string-value="['Proskomma/proskomma-legacy-projects', 'unfoldingWord/gateway-translate', 'DanielC-N/ptxaligner', 'Proskomma/proskomma-json-tools', 'unfoldingWord/epitelete-html', 'Proskomma/epitelete', 'Proskomma/diegesis-apollo-sandbox', 'Proskomma/proskomma-render-pdf', 'Proskomma/diegesis-server']">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office:string-value="['mvahowe', 'mandolyte', 'jag3773', 'richmahn']">
            <text:p>['mvahowe', 'mandolyte', 'jag3773', 'richmahn']</text:p>
          </table:table-cell>
          <table:table-cell office:value-type="string" office:string-value="1">
            <text:p>1</text:p>
          </table:table-cell>
          <table:table-cell office:value-type="string" office:string-value="1">
            <text:p>1</text:p>
          </table:table-cell>
          <table:table-cell office:value-type="string" office:string-value="104">
            <text:p>10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proskomma">
            <text:p>uw-proskomma</text:p>
          </table:table-cell>
          <table:table-cell office:value-type="string" office:string-value="https://www.npmjs.com/package/uw-proskomma">
            <text:p>https://www.npmjs.com/package/uw-proskomma</text:p>
          </table:table-cell>
          <table:table-cell office:value-type="string" office:string-value="False">
            <text:p>False</text:p>
          </table:table-cell>
          <table:table-cell office:value-type="string" office:string-value="2359">
            <text:p>2359</text:p>
          </table:table-cell>
          <table:table-cell office:value-type="string" office:string-value="2022-07-13T12:06:56.761Z">
            <text:p>2022-07-13T12:06:56.761Z</text:p>
          </table:table-cell>
          <table:table-cell office:value-type="string" office:string-value="['epitelete-html', 'proskomma-scripture-resources-rcl']">
            <text:p>['epitelete-html', 'proskomma-scripture-resources-rcl']</text:p>
          </table:table-cell>
          <table:table-cell office:value-type="string" office:string-value="">
            <text:p/>
          </table:table-cell>
          <table:table-cell office:value-type="string" office:string-value="2024-10-10T15:27:53Z">
            <text:p>2024-10-10T15:27:53Z</text:p>
          </table:table-cell>
          <table:table-cell office:value-type="string" office:string-value="unfoldingWord-box3/uw-proskomma">
            <text:p>unfoldingWord-box3/uw-proskomma</text:p>
          </table:table-cell>
          <table:table-cell office:value-type="string" office:string-value="https://github.com/unfoldingWord-box3/uw-proskomma">
            <text:p>https://github.com/unfoldingWord-box3/uw-proskomma</text:p>
          </table:table-cell>
          <table:table-cell office:value-type="string" office:string-value="2-Keep">
            <text:p>2-Keep</text:p>
          </table:table-cell>
          <table:table-cell office:value-type="string" office:string-value="externally used - Repository has GitHub dependents or at least 1,000 npm downloads in the last year (2359 downloads).">
            <text:p>externally used - Repository has GitHub dependents or at least 1,000 npm downloads in the last year (235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359 downloads in the last year).">
            <text:p>Package has detected local usage, GitHub dependents, or significant npm downloads (2359 downloads in the last year).</text:p>
          </table:table-cell>
          <table:table-cell office:value-type="string" office:string-value="uw-proskomma">
            <text:p>uw-proskomma</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quote-helpers">
            <text:p>unfoldingWord/uw-quote-helpers</text:p>
          </table:table-cell>
          <table:table-cell office:value-type="string" office:string-value="https://github.com/unfoldingWord/uw-quote-helpers">
            <text:p>https://github.com/unfoldingWord/uw-quote-helper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0T00:05:49Z">
            <text:p>2026-03-10T00:05:49Z</text:p>
          </table:table-cell>
          <table:table-cell office:value-type="string" office:string-value="2026-03-10T00:05:49Z">
            <text:p>2026-03-10T00:05:49Z</text:p>
          </table:table-cell>
          <table:table-cell office:value-type="string" office:string-value="">
            <text:p/>
          </table:table-cell>
          <table:table-cell office:value-type="string" office:string-value="['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office:string-value="['abelpz', 'PhotoNomad0', 'richmahn', 'Mookth789']">
            <text:p>['abelpz', 'PhotoNomad0', 'richmahn', 'Mookth789']</text:p>
          </table:table-cell>
          <table:table-cell office:value-type="string" office:string-value="0">
            <text:p>0</text:p>
          </table:table-cell>
          <table:table-cell office:value-type="string" office:string-value="0">
            <text:p>0</text:p>
          </table:table-cell>
          <table:table-cell office:value-type="string" office:string-value="62">
            <text:p>6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quote-helpers">
            <text:p>uw-quote-helpers</text:p>
          </table:table-cell>
          <table:table-cell office:value-type="string" office:string-value="https://www.npmjs.com/package/uw-quote-helpers">
            <text:p>https://www.npmjs.com/package/uw-quote-helpers</text:p>
          </table:table-cell>
          <table:table-cell office:value-type="string" office:string-value="False">
            <text:p>False</text:p>
          </table:table-cell>
          <table:table-cell office:value-type="string" office:string-value="3121">
            <text:p>3121</text:p>
          </table:table-cell>
          <table:table-cell office:value-type="string" office:string-value="2025-01-17T14:55:12.819Z">
            <text:p>2025-01-17T14:55:12.819Z</text:p>
          </table:table-cell>
          <table:table-cell office:value-type="string" office:string-value="['door43-preview-app', 'single-scripture-rcl', 'scripture-resources-rcl']">
            <text:p>['door43-preview-app', 'single-scripture-rcl', 'scripture-resources-rcl']</text:p>
          </table:table-cell>
          <table:table-cell office:value-type="string" office:string-value="['bible-reference-range', 'string-punctuation-tokenizer', 'tsv-groupdata-parser', 'usfm-js', 'uw-bible-parser', 'wordmap-lexer', 'uw-tsv-parser']">
            <text:p>['bible-reference-range', 'string-punctuation-tokenizer', 'tsv-groupdata-parser', 'usfm-js', 'uw-bible-parser', 'wordmap-lexer', 'uw-tsv-parser']</text:p>
          </table:table-cell>
          <table:table-cell office:value-type="string" office:string-value="2026-03-10T00:05:55Z">
            <text:p>2026-03-10T00:05:55Z</text:p>
          </table:table-cell>
          <table:table-cell office:value-type="string" office:string-value="unfoldingWord/uw-quote-helpers">
            <text:p>unfoldingWord/uw-quote-helpers</text:p>
          </table:table-cell>
          <table:table-cell office:value-type="string" office:string-value="https://github.com/unfoldingWord/uw-quote-helpers">
            <text:p>https://github.com/unfoldingWord/uw-quote-helpers</text:p>
          </table:table-cell>
          <table:table-cell office:value-type="string" office:string-value="2-Keep">
            <text:p>2-Keep</text:p>
          </table:table-cell>
          <table:table-cell office:value-type="string" office:string-value="externally used - Repository has GitHub dependents or at least 1,000 npm downloads in the last year (3121 downloads).">
            <text:p>externally used - Repository has GitHub dependents or at least 1,000 npm downloads in the last year (312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21 downloads in the last year).">
            <text:p>Package has detected local usage, GitHub dependents, or significant npm downloads (3121 downloads in the last year).</text:p>
          </table:table-cell>
          <table:table-cell office:value-type="string" office:string-value="uw-quote-helpers">
            <text:p>uw-quote-help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scripture-parser">
            <text:p>unfoldingWord/uw-scripture-parser</text:p>
          </table:table-cell>
          <table:table-cell office:value-type="string" office:string-value="https://github.com/unfoldingWord/uw-scripture-parser">
            <text:p>https://github.com/unfoldingWord/uw-scripture-parser</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3-16T00:50:58Z">
            <text:p>2023-03-16T00:50:58Z</text:p>
          </table:table-cell>
          <table:table-cell office:value-type="string" office:string-value="2023-03-16T00:49:47Z">
            <text:p>2023-03-16T00:49:47Z</text:p>
          </table:table-cell>
          <table:table-cell office:value-type="string" office:string-value="">
            <text:p/>
          </table:table-cell>
          <table:table-cell office:value-type="string" office:string-value="abelpz/oce-library-starter">
            <text:p>abelpz/oce-library-starter</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bible-parser">
            <text:p>uw-bible-pars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bible-reference-range', 'usfm-js']">
            <text:p>['bible-reference-range', 'usfm-js']</text:p>
          </table:table-cell>
          <table:table-cell office:value-type="string" office:string-value="2023-03-15T02:11:57Z">
            <text:p>2023-03-15T02:11:57Z</text:p>
          </table:table-cell>
          <table:table-cell office:value-type="string" office:string-value="unfoldingWord/uw-scripture-parser">
            <text:p>unfoldingWord/uw-scripture-parser</text:p>
          </table:table-cell>
          <table:table-cell office:value-type="string" office:string-value="https://github.com/unfoldingWord/uw-scripture-parser">
            <text:p>https://github.com/unfoldingWord/uw-scripture-pars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uw-scripture-parser">
            <text:p>uw-scripture-pars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uW-Tools-Collab">
            <text:p>unfoldingWord/uW-Tools-Collab</text:p>
          </table:table-cell>
          <table:table-cell office:value-type="string" office:string-value="https://github.com/unfoldingWord/uW-Tools-Collab">
            <text:p>https://github.com/unfoldingWord/uW-Tools-Collab</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2T15:52:46Z">
            <text:p>2025-09-12T15:52:46Z</text:p>
          </table:table-cell>
          <table:table-cell office:value-type="string" office:string-value="2025-09-12T15:52:46Z">
            <text:p>2025-09-12T15:52:46Z</text:p>
          </table:table-cell>
          <table:table-cell office:value-type="string" office:string-value="">
            <text:p/>
          </table:table-cell>
          <table:table-cell office:value-type="string" office:string-value="">
            <text:p/>
          </table:table-cell>
          <table:table-cell office:value-type="string" office:string-value="['abelpz', 'birchamp']">
            <text:p>['abelpz', 'birchamp']</text:p>
          </table:table-cell>
          <table:table-cell office:value-type="string" office:string-value="0">
            <text:p>0</text:p>
          </table:table-cell>
          <table:table-cell office:value-type="string" office:string-value="0">
            <text:p>0</text:p>
          </table:table-cell>
          <table:table-cell office:value-type="string" office:string-value="37">
            <text:p>3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12T15:52:50Z">
            <text:p>2025-09-12T15:52:50Z</text:p>
          </table:table-cell>
          <table:table-cell office:value-type="string" office:string-value="unfoldingWord/uW-Tools-Collab">
            <text:p>unfoldingWord/uW-Tools-Collab</text:p>
          </table:table-cell>
          <table:table-cell office:value-type="string" office:string-value="https://github.com/unfoldingWord/uW-Tools-Collab">
            <text:p>https://github.com/unfoldingWord/uW-Tools-Collab</text:p>
          </table:table-cell>
          <table:table-cell office:value-type="string" office:string-value="2-Keep">
            <text:p>2-Keep</text:p>
          </table:table-cell>
          <table:table-cell office:value-type="string" office:string-value="Active - Last commit was within the last 12 months (9 months ago).">
            <text:p>Active - Last commit was within the last 12 months (9 months ago).</text:p>
          </table:table-cell>
          <table:table-cell office:value-type="string" office:string-value="">
            <text:p/>
          </table:table-cell>
          <table:table-cell office:value-type="string" office:string-value="">
            <text:p/>
          </table:table-cell>
          <table:table-cell office:value-type="string" office:string-value="uW-Tools-Collab">
            <text:p>uW-Tools-Colla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tsv-parser">
            <text:p>unfoldingWord/uw-tsv-parser</text:p>
          </table:table-cell>
          <table:table-cell office:value-type="string" office:string-value="https://github.com/unfoldingWord/uw-tsv-parser">
            <text:p>https://github.com/unfoldingWord/uw-tsv-pars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6-05T15:16:07Z">
            <text:p>2023-06-05T15:16:07Z</text:p>
          </table:table-cell>
          <table:table-cell office:value-type="string" office:string-value="2023-05-31T22:28:26Z">
            <text:p>2023-05-31T22:28:26Z</text:p>
          </table:table-cell>
          <table:table-cell office:value-type="string" office:string-value="">
            <text:p/>
          </table:table-cell>
          <table:table-cell office:value-type="string" office:string-value="['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office:string-value="['mandolyte', 'PhotoNomad0', 'ancientTexts-net', 'mannycolon']">
            <text:p>['mandolyte', 'PhotoNomad0', 'ancientTexts-net', 'mannycolon']</text:p>
          </table:table-cell>
          <table:table-cell office:value-type="string" office:string-value="1">
            <text:p>1</text:p>
          </table:table-cell>
          <table:table-cell office:value-type="string" office:string-value="1">
            <text:p>1</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tsv-parser">
            <text:p>uw-tsv-parser</text:p>
          </table:table-cell>
          <table:table-cell office:value-type="string" office:string-value="https://www.npmjs.com/package/uw-tsv-parser">
            <text:p>https://www.npmjs.com/package/uw-tsv-parser</text:p>
          </table:table-cell>
          <table:table-cell office:value-type="string" office:string-value="False">
            <text:p>False</text:p>
          </table:table-cell>
          <table:table-cell office:value-type="string" office:string-value="4616">
            <text:p>4616</text:p>
          </table:table-cell>
          <table:table-cell office:value-type="string" office:string-value="2022-02-02T14:06:17.344Z">
            <text:p>2022-02-02T14:06:17.344Z</text:p>
          </table:table-cell>
          <table:table-cell office:value-type="string" office:string-value="['gateway-admin', 'tc-create-app', 'word-aligner-rcl', 'tsv-groupdata-parser', 'checking-tool-rcl', 'checking-extension']">
            <text:p>['gateway-admin', 'tc-create-app', 'word-aligner-rcl', 'tsv-groupdata-parser', 'checking-tool-rcl', 'checking-extension']</text:p>
          </table:table-cell>
          <table:table-cell office:value-type="string" office:string-value="">
            <text:p/>
          </table:table-cell>
          <table:table-cell office:value-type="string" office:string-value="2023-05-31T22:28:33Z">
            <text:p>2023-05-31T22:28:33Z</text:p>
          </table:table-cell>
          <table:table-cell office:value-type="string" office:string-value="unfoldingWord/uw-tsv-parser">
            <text:p>unfoldingWord/uw-tsv-parser</text:p>
          </table:table-cell>
          <table:table-cell office:value-type="string" office:string-value="https://github.com/unfoldingWord/uw-tsv-parser">
            <text:p>https://github.com/unfoldingWord/uw-tsv-parser</text:p>
          </table:table-cell>
          <table:table-cell office:value-type="string" office:string-value="2-Keep">
            <text:p>2-Keep</text:p>
          </table:table-cell>
          <table:table-cell office:value-type="string" office:string-value="externally used - Repository has GitHub dependents or at least 1,000 npm downloads in the last year (4616 downloads).">
            <text:p>externally used - Repository has GitHub dependents or at least 1,000 npm downloads in the last year (461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616 downloads in the last year).">
            <text:p>Package has detected local usage, GitHub dependents, or significant npm downloads (4616 downloads in the last year).</text:p>
          </table:table-cell>
          <table:table-cell office:value-type="string" office:string-value="uw-tsv-parser">
            <text:p>uw-tsv-pars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web">
            <text:p>unfoldingWord-dev/uw-web</text:p>
          </table:table-cell>
          <table:table-cell office:value-type="string" office:string-value="https://github.com/unfoldingWord-dev/uw-web">
            <text:p>https://github.com/unfoldingWord-dev/uw-web</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7-03-25T14:53:13Z">
            <text:p>2017-03-25T14:53:13Z</text:p>
          </table:table-cell>
          <table:table-cell office:value-type="string" office:string-value="2017-03-25T14:53:08Z">
            <text:p>2017-03-25T14:53:08Z</text:p>
          </table:table-cell>
          <table:table-cell office:value-type="string" office:string-value="">
            <text:p/>
          </table:table-cell>
          <table:table-cell office:value-type="string" office:string-value="digitalbiblesociety/browserbible-3">
            <text:p>digitalbiblesociety/browserbible-3</text:p>
          </table:table-cell>
          <table:table-cell office:value-type="string" office:string-value="['johndyer', 'codemis', 'phillip-hopper', 'alerque', 'Jesse A. Griffin', 'jag3773', 'explorigin', 'maf-jclark', 'nikaro', 'Zohma', 'rbnswartz', 'Phil Hopper', 'da1nerd', 'Jay', 'Gogs', 'anthonycrumley', 'chriskrycho', 'runlevelsix', 'Jonathan Bitgood', 'Timothy Farrell', 'joshykurian', 'pdattx']">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office:string-value="2">
            <text:p>2</text:p>
          </table:table-cell>
          <table:table-cell office:value-type="string" office:string-value="0">
            <text:p>0</text:p>
          </table:table-cell>
          <table:table-cell office:value-type="string" office:string-value="1261">
            <text:p>126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Bible">
            <text:p>BrowserBib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9-11T14:39:54Z">
            <text:p>2020-09-11T14:39:54Z</text:p>
          </table:table-cell>
          <table:table-cell office:value-type="string" office:string-value="unfoldingWord-dev/uw-web">
            <text:p>unfoldingWord-dev/uw-web</text:p>
          </table:table-cell>
          <table:table-cell office:value-type="string" office:string-value="https://github.com/unfoldingWord-dev/uw-web">
            <text:p>https://github.com/unfoldingWord-dev/uw-web</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uw-web">
            <text:p>uw-web</text:p>
          </table:table-cell>
          <table:table-cell office:value-type="string" office:string-value="unfoldingWord-dev">
            <text:p>unfoldingWord-dev</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website-resource-version-updater">
            <text:p>unfoldingWord/uw-website-resource-version-updater</text:p>
          </table:table-cell>
          <table:table-cell office:value-type="string" office:string-value="https://github.com/unfoldingWord/uw-website-resource-version-updater">
            <text:p>https://github.com/unfoldingWord/uw-website-resource-version-updater</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4T22:06:05Z">
            <text:p>2025-06-04T22:06:05Z</text:p>
          </table:table-cell>
          <table:table-cell office:value-type="string" office:string-value="2025-06-04T22:06:02Z">
            <text:p>2025-06-04T22:06:02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04T22:06:08Z">
            <text:p>2025-06-04T22:06:08Z</text:p>
          </table:table-cell>
          <table:table-cell office:value-type="string" office:string-value="unfoldingWord/uw-website-resource-version-updater">
            <text:p>unfoldingWord/uw-website-resource-version-updater</text:p>
          </table:table-cell>
          <table:table-cell office:value-type="string" office:string-value="https://github.com/unfoldingWord/uw-website-resource-version-updater">
            <text:p>https://github.com/unfoldingWord/uw-website-resource-version-updater</text:p>
          </table:table-cell>
          <table:table-cell office:value-type="string" office:string-value="2-Keep">
            <text:p>2-Keep</text:p>
          </table:table-cell>
          <table:table-cell office:value-type="string" office:string-value="Active - Last commit was within the last 12 months (12 months ago).">
            <text:p>Active - Last commit was within the last 12 months (12 months ago).</text:p>
          </table:table-cell>
          <table:table-cell office:value-type="string" office:string-value="">
            <text:p/>
          </table:table-cell>
          <table:table-cell office:value-type="string" office:string-value="">
            <text:p/>
          </table:table-cell>
          <table:table-cell office:value-type="string" office:string-value="uw-website-resource-version-updater">
            <text:p>uw-website-resource-version-upda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word-count">
            <text:p>unfoldingWord/uw-word-count</text:p>
          </table:table-cell>
          <table:table-cell office:value-type="string" office:string-value="https://github.com/unfoldingWord/uw-word-count">
            <text:p>https://github.com/unfoldingWord/uw-word-cou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5T03:16:29Z">
            <text:p>2023-01-05T03:16:29Z</text:p>
          </table:table-cell>
          <table:table-cell office:value-type="string" office:string-value="2020-08-11T13:41:51Z">
            <text:p>2020-08-11T13:41:51Z</text:p>
          </table:table-cell>
          <table:table-cell office:value-type="string" office:string-value="">
            <text:p/>
          </table:table-cell>
          <table:table-cell office:value-type="string" office:string-value="['unfoldingWord/book-package-app', 'unfoldingWord/book-package-rcl']">
            <text:p>['unfoldingWord/book-package-app', 'unfoldingWord/book-package-rcl']</text:p>
          </table:table-cell>
          <table:table-cell office:value-type="string" office:string-value="['mandolyte', 'dependabot[bot]', 'jag3773']">
            <text:p>['mandolyte', 'dependabot[bot]', 'jag3773']</text:p>
          </table:table-cell>
          <table:table-cell office:value-type="string" office:string-value="29">
            <text:p>29</text:p>
          </table:table-cell>
          <table:table-cell office:value-type="string" office:string-value="25">
            <text:p>25</text:p>
          </table:table-cell>
          <table:table-cell office:value-type="string" office:string-value="71">
            <text:p>7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word-count">
            <text:p>uw-word-count</text:p>
          </table:table-cell>
          <table:table-cell office:value-type="string" office:string-value="https://www.npmjs.com/package/uw-word-count">
            <text:p>https://www.npmjs.com/package/uw-word-count</text:p>
          </table:table-cell>
          <table:table-cell office:value-type="string" office:string-value="False">
            <text:p>False</text:p>
          </table:table-cell>
          <table:table-cell office:value-type="string" office:string-value="362">
            <text:p>362</text:p>
          </table:table-cell>
          <table:table-cell office:value-type="string" office:string-value="2020-07-15T14:01:25.409Z">
            <text:p>2020-07-15T14:01:25.409Z</text:p>
          </table:table-cell>
          <table:table-cell office:value-type="string" office:string-value="book-package-rcl">
            <text:p>book-package-rcl</text:p>
          </table:table-cell>
          <table:table-cell office:value-type="string" office:string-value="usfm-js">
            <text:p>usfm-js</text:p>
          </table:table-cell>
          <table:table-cell office:value-type="string" office:string-value="2020-08-11T13:41:55Z">
            <text:p>2020-08-11T13:41:55Z</text:p>
          </table:table-cell>
          <table:table-cell office:value-type="string" office:string-value="unfoldingWord/uw-word-count">
            <text:p>unfoldingWord/uw-word-count</text:p>
          </table:table-cell>
          <table:table-cell office:value-type="string" office:string-value="https://github.com/unfoldingWord/uw-word-count">
            <text:p>https://github.com/unfoldingWord/uw-word-count</text:p>
          </table:table-cell>
          <table:table-cell office:value-type="string" office:string-value="2-Keep">
            <text:p>2-Keep</text:p>
          </table:table-cell>
          <table:table-cell office:value-type="string" office:string-value="externally used - Repository has GitHub dependents or at least 1,000 npm downloads in the last year (362 downloads).">
            <text:p>externally used - Repository has GitHub dependents or at least 1,000 npm downloads in the last year (36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2 downloads in the last year).">
            <text:p>Package has detected local usage, GitHub dependents, or significant npm downloads (362 downloads in the last year).</text:p>
          </table:table-cell>
          <table:table-cell office:value-type="string" office:string-value="uw-word-count">
            <text:p>uw-word-cou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OceUsfmEdit">
            <text:p>unfoldingWord-box3/VscOceUsfmEdit</text:p>
          </table:table-cell>
          <table:table-cell office:value-type="string" office:string-value="https://github.com/unfoldingWord-box3/VscOceUsfmEdit">
            <text:p>https://github.com/unfoldingWord-box3/VscOceUsfmEdit</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02T13:44:52Z">
            <text:p>2024-02-02T13:44:52Z</text:p>
          </table:table-cell>
          <table:table-cell office:value-type="string" office:string-value="2024-02-02T13:44:52Z">
            <text:p>2024-02-02T13:44:52Z</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Joshua Lansford', 'larsgson', 'PhotoNomad0', 'blm']">
            <text:p>['Joshua Lansford', 'larsgson', 'PhotoNomad0', 'blm']</text:p>
          </table:table-cell>
          <table:table-cell office:value-type="string" office:string-value="0">
            <text:p>0</text:p>
          </table:table-cell>
          <table:table-cell office:value-type="string" office:string-value="0">
            <text:p>0</text:p>
          </table:table-cell>
          <table:table-cell office:value-type="string" office:string-value="42">
            <text:p>4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usfm-editor">
            <text:p>oce-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02T13:45:00Z">
            <text:p>2024-02-02T13:45:00Z</text:p>
          </table:table-cell>
          <table:table-cell office:value-type="string" office:string-value="unfoldingWord-box3/VscOceUsfmEdit">
            <text:p>unfoldingWord-box3/VscOceUsfmEdit</text:p>
          </table:table-cell>
          <table:table-cell office:value-type="string" office:string-value="https://github.com/unfoldingWord-box3/VscOceUsfmEdit">
            <text:p>https://github.com/unfoldingWord-box3/VscOceUsfmEdi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VscOceUsfmEdit">
            <text:p>VscOceUsfmEdi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ode-speech-to-text">
            <text:p>unfoldingWord-box3/vscode-speech-to-text</text:p>
          </table:table-cell>
          <table:table-cell office:value-type="string" office:string-value="https://github.com/unfoldingWord-box3/vscode-speech-to-text">
            <text:p>https://github.com/unfoldingWord-box3/vscode-speech-to-text</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07T15:31:48Z">
            <text:p>2024-03-07T15:31:48Z</text:p>
          </table:table-cell>
          <table:table-cell office:value-type="string" office:string-value="2022-04-04T07:52:29Z">
            <text:p>2022-04-04T07:52:29Z</text:p>
          </table:table-cell>
          <table:table-cell office:value-type="string" office:string-value="">
            <text:p/>
          </table:table-cell>
          <table:table-cell office:value-type="string" office:string-value="olefjaerestad/vscode-speech-to-text">
            <text:p>olefjaerestad/vscode-speech-to-text</text:p>
          </table:table-cell>
          <table:table-cell office:value-type="string" office:string-value="['olefjaerestad', 'dependabot[bot]']">
            <text:p>['olefjaerestad', 'dependabot[bot]']</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07T15:14:34Z">
            <text:p>2024-03-07T15:14:34Z</text:p>
          </table:table-cell>
          <table:table-cell office:value-type="string" office:string-value="unfoldingWord-box3/vscode-speech-to-text">
            <text:p>unfoldingWord-box3/vscode-speech-to-text</text:p>
          </table:table-cell>
          <table:table-cell office:value-type="string" office:string-value="https://github.com/unfoldingWord-box3/vscode-speech-to-text">
            <text:p>https://github.com/unfoldingWord-box3/vscode-speech-to-tex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vscode-speech-to-text">
            <text:p>vscode-speech-to-tex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https://github.com/unfoldingWord-box3/VscUsfmEditAlign">
            <text:p>https://github.com/unfoldingWord-box3/VscUsfmEditAlign</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15T14:05:55Z">
            <text:p>2024-02-15T14:05:55Z</text:p>
          </table:table-cell>
          <table:table-cell office:value-type="string" office:string-value="2024-02-13T19:43:46Z">
            <text:p>2024-02-13T19:43:46Z</text:p>
          </table:table-cell>
          <table:table-cell office:value-type="string" office:string-value="">
            <text:p/>
          </table:table-cell>
          <table:table-cell office:value-type="string" office:string-value="JEdward7777/VsCodeUsfmAligner">
            <text:p>JEdward7777/VsCodeUsfmAligner</text:p>
          </table:table-cell>
          <table:table-cell office:value-type="string" office:string-value="['Joshua Lansford', 'PhotoNomad0', 'blm']">
            <text:p>['Joshua Lansford', 'PhotoNomad0', 'blm']</text:p>
          </table:table-cell>
          <table:table-cell office:value-type="string" office:string-value="0">
            <text:p>0</text:p>
          </table:table-cell>
          <table:table-cell office:value-type="string" office:string-value="0">
            <text:p>0</text:p>
          </table:table-cell>
          <table:table-cell office:value-type="string" office:string-value="46">
            <text:p>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editor">
            <text:p>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15T14:03:06Z">
            <text:p>2024-02-15T14:03:06Z</text:p>
          </table:table-cell>
          <table:table-cell office:value-type="string" office:string-value="unfoldingWord-box3/VscUsfmEditAlign">
            <text:p>unfoldingWord-box3/VscUsfmEditAlign</text:p>
          </table:table-cell>
          <table:table-cell office:value-type="string" office:string-value="https://github.com/unfoldingWord-box3/VscUsfmEditAlign">
            <text:p>https://github.com/unfoldingWord-box3/VscUsfmEditAlig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VscUsfmEditAlign">
            <text:p>VscUsfmEditAlig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webhook-relay">
            <text:p>unfoldingWord-dev/webhook-relay</text:p>
          </table:table-cell>
          <table:table-cell office:value-type="string" office:string-value="https://github.com/unfoldingWord-dev/webhook-relay">
            <text:p>https://github.com/unfoldingWord-dev/webhook-relay</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8-01-22T23:48:40Z">
            <text:p>2018-01-22T23:48:40Z</text:p>
          </table:table-cell>
          <table:table-cell office:value-type="string" office:string-value="2018-01-22T23:48:02Z">
            <text:p>2018-01-22T23:48:02Z</text:p>
          </table:table-cell>
          <table:table-cell office:value-type="string" office:string-value="">
            <text:p/>
          </table:table-cell>
          <table:table-cell office:value-type="string" office:string-value="lscsoft/webhook-relay">
            <text:p>lscsoft/webhook-relay</text:p>
          </table:table-cell>
          <table:table-cell office:value-type="string" office:string-value="tpdownes">
            <text:p>tpdownes</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8-06-06T20:21:12Z">
            <text:p>2018-06-06T20:21:12Z</text:p>
          </table:table-cell>
          <table:table-cell office:value-type="string" office:string-value="unfoldingWord-dev/webhook-relay">
            <text:p>unfoldingWord-dev/webhook-relay</text:p>
          </table:table-cell>
          <table:table-cell office:value-type="string" office:string-value="https://github.com/unfoldingWord-dev/webhook-relay">
            <text:p>https://github.com/unfoldingWord-dev/webhook-rela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webhook-relay">
            <text:p>webhook-relay</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aligner">
            <text:p>unfoldingWord/word-aligner</text:p>
          </table:table-cell>
          <table:table-cell office:value-type="string" office:string-value="https://github.com/unfoldingWord/word-aligner">
            <text:p>https://github.com/unfoldingWord/word-align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1:22:15Z">
            <text:p>2026-05-24T21:22:15Z</text:p>
          </table:table-cell>
          <table:table-cell office:value-type="string" office:string-value="2026-05-24T21:16:40Z">
            <text:p>2026-05-24T21:16:40Z</text:p>
          </table:table-cell>
          <table:table-cell office:value-type="string" office:string-value="2019-02-06T21:43:28Z">
            <text:p>2019-02-06T21:43:28Z</text:p>
          </table:table-cell>
          <table:table-cell office:value-type="string" office:string-value="['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office:string-value="['PhotoNomad0', 'mannycolon', 'RoyalSix', 'richmahn', 'dependabot-support', 'Sterling (Jay) Scott', 'da1nerd', 'bspidel']">
            <text:p>['PhotoNomad0', 'mannycolon', 'RoyalSix', 'richmahn', 'dependabot-support', 'Sterling (Jay) Scott', 'da1nerd', 'bspidel']</text:p>
          </table:table-cell>
          <table:table-cell office:value-type="string" office:string-value="0">
            <text:p>0</text:p>
          </table:table-cell>
          <table:table-cell office:value-type="string" office:string-value="0">
            <text:p>0</text:p>
          </table:table-cell>
          <table:table-cell office:value-type="string" office:string-value="206">
            <text:p>20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6">
            <text:p>6</text:p>
          </table:table-cell>
          <table:table-cell office:value-type="string" office:string-value="word-aligner">
            <text:p>word-aligner</text:p>
          </table:table-cell>
          <table:table-cell office:value-type="string" office:string-value="https://www.npmjs.com/package/word-aligner">
            <text:p>https://www.npmjs.com/package/word-aligner</text:p>
          </table:table-cell>
          <table:table-cell office:value-type="string" office:string-value="False">
            <text:p>False</text:p>
          </table:table-cell>
          <table:table-cell office:value-type="string" office:string-value="45454">
            <text:p>45454</text:p>
          </table:table-cell>
          <table:table-cell office:value-type="string" office:string-value="2026-05-24T21:22:13.663Z">
            <text:p>2026-05-24T21:22:13.663Z</text:p>
          </table:table-cell>
          <table:table-cell office:value-type="string" office:string-value="['gateway-admin', 'translationCore', 'wordAlignment', 'gateway-edit', 'tc-create-app', 'word-aligner-rcl', 'word-aligner-lib', 'single-scripture-rcl', 'translation-helps-rcl', 'scripture-resources-rcl', 'bsa', 'checking-tool-rcl', 'tc-ui-toolkit', 'checking-tool-wrapper', 'alignment-playground', 'next-js-template']">
            <text:p>['gateway-admin', 'translationCore', 'wordAlignment', 'gateway-edit', 'tc-create-app', 'word-aligner-rcl', 'word-aligner-lib', 'single-scripture-rcl', 'translation-helps-rcl', 'scripture-resources-rcl', 'bsa', 'checking-tool-rcl', 'tc-ui-toolkit', 'checking-tool-wrapper', 'alignment-playground', 'next-js-template']</text:p>
          </table:table-cell>
          <table:table-cell office:value-type="string" office:string-value="['string-punctuation-tokenizer', 'usfm-js', 'wordmap-lexer']">
            <text:p>['string-punctuation-tokenizer', 'usfm-js', 'wordmap-lexer']</text:p>
          </table:table-cell>
          <table:table-cell office:value-type="string" office:string-value="2026-05-24T21:16:44Z">
            <text:p>2026-05-24T21:16:44Z</text:p>
          </table:table-cell>
          <table:table-cell office:value-type="string" office:string-value="unfoldingWord/word-aligner">
            <text:p>unfoldingWord/word-aligner</text:p>
          </table:table-cell>
          <table:table-cell office:value-type="string" office:string-value="https://github.com/unfoldingWord/word-aligner">
            <text:p>https://github.com/unfoldingWord/word-aligner</text:p>
          </table:table-cell>
          <table:table-cell office:value-type="string" office:string-value="2-Keep">
            <text:p>2-Keep</text:p>
          </table:table-cell>
          <table:table-cell office:value-type="string" office:string-value="externally used - Repository has GitHub dependents or at least 1,000 npm downloads in the last year (45454 downloads).">
            <text:p>externally used - Repository has GitHub dependents or at least 1,000 npm downloads in the last year (4545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5454 downloads in the last year).">
            <text:p>Package has detected local usage, GitHub dependents, or significant npm downloads (45454 downloads in the last year).</text:p>
          </table:table-cell>
          <table:table-cell office:value-type="string" office:string-value="word-aligner">
            <text:p>word-align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aligner-lib">
            <text:p>unfoldingWord/word-aligner-lib</text:p>
          </table:table-cell>
          <table:table-cell office:value-type="string" office:string-value="https://github.com/unfoldingWord/word-aligner-lib">
            <text:p>https://github.com/unfoldingWord/word-aligner-lib</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2:38:03Z">
            <text:p>2026-05-24T22:38:03Z</text:p>
          </table:table-cell>
          <table:table-cell office:value-type="string" office:string-value="2026-05-24T22:36:14Z">
            <text:p>2026-05-24T22:36:14Z</text:p>
          </table:table-cell>
          <table:table-cell office:value-type="string" office:string-value="">
            <text:p/>
          </table:table-cell>
          <table:table-cell office:value-type="string" office:string-value="['unfoldingWord/word-aligner', 'unfoldingWord/door43-preview-app', 'unfoldingWord/gateway-edit', 'unfoldingWord/single-scripture-rcl', 'unfoldingWord/word-aligner-rcl']">
            <text:p>['unfoldingWord/word-aligner', 'unfoldingWord/door43-preview-app', 'unfoldingWord/gateway-edit', 'unfoldingWord/single-scripture-rcl', 'unfoldingWord/word-aligner-rc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lib">
            <text:p>word-aligner-lib</text:p>
          </table:table-cell>
          <table:table-cell office:value-type="string" office:string-value="https://www.npmjs.com/package/word-aligner-lib">
            <text:p>https://www.npmjs.com/package/word-aligner-lib</text:p>
          </table:table-cell>
          <table:table-cell office:value-type="string" office:string-value="False">
            <text:p>False</text:p>
          </table:table-cell>
          <table:table-cell office:value-type="string" office:string-value="5512">
            <text:p>5512</text:p>
          </table:table-cell>
          <table:table-cell office:value-type="string" office:string-value="2026-05-24T22:38:01.649Z">
            <text:p>2026-05-24T22:38:01.649Z</text:p>
          </table:table-cell>
          <table:table-cell office:value-type="string" office:string-value="['word-aligner-rcl', 'checking-tool-rcl']">
            <text:p>['word-aligner-rcl', 'checking-tool-rcl']</text:p>
          </table:table-cell>
          <table:table-cell office:value-type="string" office:string-value="['string-punctuation-tokenizer', 'tc-strings', 'usfm-js', 'word-aligner', 'wordmap-lexer', 'bible-reference-range']">
            <text:p>['string-punctuation-tokenizer', 'tc-strings', 'usfm-js', 'word-aligner', 'wordmap-lexer', 'bible-reference-range']</text:p>
          </table:table-cell>
          <table:table-cell office:value-type="string" office:string-value="2026-05-24T22:36:18Z">
            <text:p>2026-05-24T22:36:18Z</text:p>
          </table:table-cell>
          <table:table-cell office:value-type="string" office:string-value="unfoldingWord/word-aligner-lib">
            <text:p>unfoldingWord/word-aligner-lib</text:p>
          </table:table-cell>
          <table:table-cell office:value-type="string" office:string-value="https://github.com/unfoldingWord/word-aligner-lib">
            <text:p>https://github.com/unfoldingWord/word-aligner-lib</text:p>
          </table:table-cell>
          <table:table-cell office:value-type="string" office:string-value="2-Keep">
            <text:p>2-Keep</text:p>
          </table:table-cell>
          <table:table-cell office:value-type="string" office:string-value="externally used - Repository has GitHub dependents or at least 1,000 npm downloads in the last year (5512 downloads).">
            <text:p>externally used - Repository has GitHub dependents or at least 1,000 npm downloads in the last year (551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512 downloads in the last year).">
            <text:p>Package has detected local usage, GitHub dependents, or significant npm downloads (5512 downloads in the last year).</text:p>
          </table:table-cell>
          <table:table-cell office:value-type="string" office:string-value="word-aligner-lib">
            <text:p>word-aligner-li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aligner-rcl">
            <text:p>unfoldingWord/word-aligner-rcl</text:p>
          </table:table-cell>
          <table:table-cell office:value-type="string" office:string-value="https://github.com/unfoldingWord/word-aligner-rcl">
            <text:p>https://github.com/unfoldingWord/word-aligner-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3:03:21Z">
            <text:p>2026-05-24T23:03:21Z</text:p>
          </table:table-cell>
          <table:table-cell office:value-type="string" office:string-value="2026-05-24T23:02:05Z">
            <text:p>2026-05-24T23:02:05Z</text:p>
          </table:table-cell>
          <table:table-cell office:value-type="string" office:string-value="">
            <text:p/>
          </table:table-cell>
          <table:table-cell office:value-type="string" office:string-value="['unfoldingWord/word-aligner', 'unfoldingWord/single-scripture-rcl', 'unfoldingWord/gateway-edit', 'unfoldingWord/door43-preview-app', 'unfoldingWord/oce-editor-tools']">
            <text:p>['unfoldingWord/word-aligner', 'unfoldingWord/single-scripture-rcl', 'unfoldingWord/gateway-edit', 'unfoldingWord/door43-preview-app', 'unfoldingWord/oce-editor-tools']</text:p>
          </table:table-cell>
          <table:table-cell office:value-type="string" office:string-value="['PhotoNomad0', 'Joshua Lansford', 'jincypjose']">
            <text:p>['PhotoNomad0', 'Joshua Lansford', 'jincypjose']</text:p>
          </table:table-cell>
          <table:table-cell office:value-type="string" office:string-value="5">
            <text:p>5</text:p>
          </table:table-cell>
          <table:table-cell office:value-type="string" office:string-value="2">
            <text:p>2</text:p>
          </table:table-cell>
          <table:table-cell office:value-type="string" office:string-value="188">
            <text:p>18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rcl">
            <text:p>word-aligner-rcl</text:p>
          </table:table-cell>
          <table:table-cell office:value-type="string" office:string-value="https://www.npmjs.com/package/word-aligner-rcl">
            <text:p>https://www.npmjs.com/package/word-aligner-rcl</text:p>
          </table:table-cell>
          <table:table-cell office:value-type="string" office:string-value="False">
            <text:p>False</text:p>
          </table:table-cell>
          <table:table-cell office:value-type="string" office:string-value="16604">
            <text:p>16604</text:p>
          </table:table-cell>
          <table:table-cell office:value-type="string" office:string-value="2026-05-24T23:03:19.258Z">
            <text:p>2026-05-24T23:03:19.258Z</text:p>
          </table:table-cell>
          <table:table-cell office:value-type="string" office:string-value="['door43-preview-app', 'gateway-edit', 'enhanced-word-aligner-rcl', 'single-scripture-rcl', '@oce-editor-tools/pk-aligner']">
            <text:p>['door43-preview-app', 'gateway-edit', 'enhanced-word-aligner-rcl', 'single-scripture-rcl', '@oce-editor-tools/pk-aligner']</text:p>
          </table:table-cell>
          <table:table-cell office:value-type="string" office:string-value="['bible-reference-range', 'string-punctuation-tokenizer', 'usfm-js', 'word-aligner', 'word-aligner-lib', 'wordmap', 'wordmap-lexer', 'uw-tsv-parser', 'tc-strings']">
            <text:p>['bible-reference-range', 'string-punctuation-tokenizer', 'usfm-js', 'word-aligner', 'word-aligner-lib', 'wordmap', 'wordmap-lexer', 'uw-tsv-parser', 'tc-strings']</text:p>
          </table:table-cell>
          <table:table-cell office:value-type="string" office:string-value="2026-05-24T23:02:10Z">
            <text:p>2026-05-24T23:02:10Z</text:p>
          </table:table-cell>
          <table:table-cell office:value-type="string" office:string-value="unfoldingWord/word-aligner-rcl">
            <text:p>unfoldingWord/word-aligner-rcl</text:p>
          </table:table-cell>
          <table:table-cell office:value-type="string" office:string-value="https://github.com/unfoldingWord/word-aligner-rcl">
            <text:p>https://github.com/unfoldingWord/word-aligner-rcl</text:p>
          </table:table-cell>
          <table:table-cell office:value-type="string" office:string-value="2-Keep">
            <text:p>2-Keep</text:p>
          </table:table-cell>
          <table:table-cell office:value-type="string" office:string-value="externally used - Repository has GitHub dependents or at least 1,000 npm downloads in the last year (16604 downloads).">
            <text:p>externally used - Repository has GitHub dependents or at least 1,000 npm downloads in the last year (1660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604 downloads in the last year).">
            <text:p>Package has detected local usage, GitHub dependents, or significant npm downloads (16604 downloads in the last year).</text:p>
          </table:table-cell>
          <table:table-cell office:value-type="string" office:string-value="word-aligner-rcl">
            <text:p>word-aligner-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MAP">
            <text:p>unfoldingWord/wordMAP</text:p>
          </table:table-cell>
          <table:table-cell office:value-type="string" office:string-value="https://github.com/unfoldingWord/wordMAP">
            <text:p>https://github.com/unfoldingWord/wordMA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2-18T15:24:32Z">
            <text:p>2026-02-18T15:24:32Z</text:p>
          </table:table-cell>
          <table:table-cell office:value-type="string" office:string-value="2020-07-20T13:09:49Z">
            <text:p>2020-07-20T13:09:49Z</text:p>
          </table:table-cell>
          <table:table-cell office:value-type="string" office:string-value="2020-01-21T15:05:54Z">
            <text:p>2020-01-21T15:05:54Z</text:p>
          </table:table-cell>
          <table:table-cell office:value-type="string" office:string-value="['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office:string-value="['da1nerd', 'mannycolon', 'RoyalSix', 'dependabot-support', 'PhotoNomad0', 'klappy', 'dependabot[bot]', 'bspidel', 'jag3773', 'Sterling (Jay) Scott']">
            <text:p>['da1nerd', 'mannycolon', 'RoyalSix', 'dependabot-support', 'PhotoNomad0', 'klappy', 'dependabot[bot]', 'bspidel', 'jag3773', 'Sterling (Jay) Scott']</text:p>
          </table:table-cell>
          <table:table-cell office:value-type="string" office:string-value="20">
            <text:p>20</text:p>
          </table:table-cell>
          <table:table-cell office:value-type="string" office:string-value="14">
            <text:p>14</text:p>
          </table:table-cell>
          <table:table-cell office:value-type="string" office:string-value="329">
            <text:p>3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0">
            <text:p>10</text:p>
          </table:table-cell>
          <table:table-cell office:value-type="string" office:string-value="wordmap">
            <text:p>wordmap</text:p>
          </table:table-cell>
          <table:table-cell office:value-type="string" office:string-value="https://www.npmjs.com/package/wordmap">
            <text:p>https://www.npmjs.com/package/wordmap</text:p>
          </table:table-cell>
          <table:table-cell office:value-type="string" office:string-value="False">
            <text:p>False</text:p>
          </table:table-cell>
          <table:table-cell office:value-type="string" office:string-value="17144">
            <text:p>17144</text:p>
          </table:table-cell>
          <table:table-cell office:value-type="string" office:string-value="2026-02-18T15:28:10.229Z">
            <text:p>2026-02-18T15:28:10.229Z</text:p>
          </table:table-cell>
          <table:table-cell office:value-type="string" office:string-value="['translationCore', 'wordAlignment', 'word-aligner-rcl', 'uw-wordmapbooster', 'wordmap-mt', 'wordmap-react-toolkit']">
            <text:p>['translationCore', 'wordAlignment', 'word-aligner-rcl', 'uw-wordmapbooster', 'wordmap-mt', 'wordmap-react-toolkit']</text:p>
          </table:table-cell>
          <table:table-cell office:value-type="string" office:string-value="wordmap-lexer">
            <text:p>wordmap-lexer</text:p>
          </table:table-cell>
          <table:table-cell office:value-type="string" office:string-value="2025-08-25T16:40:45Z">
            <text:p>2025-08-25T16:40:45Z</text:p>
          </table:table-cell>
          <table:table-cell office:value-type="string" office:string-value="unfoldingWord/wordMAP">
            <text:p>unfoldingWord/wordMAP</text:p>
          </table:table-cell>
          <table:table-cell office:value-type="string" office:string-value="https://github.com/unfoldingWord/wordMAP">
            <text:p>https://github.com/unfoldingWord/wordMAP</text:p>
          </table:table-cell>
          <table:table-cell office:value-type="string" office:string-value="2-Keep">
            <text:p>2-Keep</text:p>
          </table:table-cell>
          <table:table-cell office:value-type="string" office:string-value="externally used - Repository has GitHub dependents or at least 1,000 npm downloads in the last year (17144 downloads).">
            <text:p>externally used - Repository has GitHub dependents or at least 1,000 npm downloads in the last year (1714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144 downloads in the last year).">
            <text:p>Package has detected local usage, GitHub dependents, or significant npm downloads (17144 downloads in the last year).</text:p>
          </table:table-cell>
          <table:table-cell office:value-type="string" office:string-value="wordMAP">
            <text:p>wordMA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MAP-lexer">
            <text:p>unfoldingWord/wordMAP-lexer</text:p>
          </table:table-cell>
          <table:table-cell office:value-type="string" office:string-value="https://github.com/unfoldingWord/wordMAP-lexer">
            <text:p>https://github.com/unfoldingWord/wordMAP-lex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0-08-11T15:37:37Z">
            <text:p>2020-08-11T15:37:37Z</text:p>
          </table:table-cell>
          <table:table-cell office:value-type="string" office:string-value="2020-04-22T13:11:59Z">
            <text:p>2020-04-22T13:11:59Z</text:p>
          </table:table-cell>
          <table:table-cell office:value-type="string" office:string-value="">
            <text:p/>
          </table:table-cell>
          <table:table-cell office:value-type="string" office:string-value="['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office:value-type="string" office:string-value="['da1nerd', 'mannycolon', 'dependabot-support', 'RoyalSix', 'PhotoNomad0', 'Sterling (Jay) Scott', 'bspidel']">
            <text:p>['da1nerd', 'mannycolon', 'dependabot-support', 'RoyalSix', 'PhotoNomad0', 'Sterling (Jay) Scott', 'bspidel']</text:p>
          </table:table-cell>
          <table:table-cell office:value-type="string" office:string-value="0">
            <text:p>0</text:p>
          </table:table-cell>
          <table:table-cell office:value-type="string" office:string-value="0">
            <text:p>0</text:p>
          </table:table-cell>
          <table:table-cell office:value-type="string" office:string-value="39">
            <text:p>3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lexer">
            <text:p>wordmap-lexer</text:p>
          </table:table-cell>
          <table:table-cell office:value-type="string" office:string-value="https://www.npmjs.com/package/wordmap-lexer">
            <text:p>https://www.npmjs.com/package/wordmap-lexer</text:p>
          </table:table-cell>
          <table:table-cell office:value-type="string" office:string-value="False">
            <text:p>False</text:p>
          </table:table-cell>
          <table:table-cell office:value-type="string" office:string-value="19198">
            <text:p>19198</text:p>
          </table:table-cell>
          <table:table-cell office:value-type="string" office:string-value="2020-04-09T15:48:09.080Z">
            <text:p>2020-04-09T15:48:09.080Z</text:p>
          </table:table-cell>
          <table:table-cell office:value-type="string" office:string-value="['wordmap-usfm', 'translationCore', 'wordAlignment', 'string-punctuation-tokenizer', 'word-aligner-rcl', 'word-aligner-lib', 'uw-wordmapbooster', 'checking-tool-rcl', 'wordmap', 'wordmap-mt', 'alignment-playground', 'wordmap-react-toolkit']">
            <text:p>['wordmap-usfm', 'translationCore', 'wordAlignment', 'string-punctuation-tokenizer', 'word-aligner-rcl', 'word-aligner-lib', 'uw-wordmapbooster', 'checking-tool-rcl', 'wordmap', 'wordmap-mt', 'alignment-playground', 'wordmap-react-toolkit']</text:p>
          </table:table-cell>
          <table:table-cell office:value-type="string" office:string-value="string-punctuation-tokenizer">
            <text:p>string-punctuation-tokenizer</text:p>
          </table:table-cell>
          <table:table-cell office:value-type="string" office:string-value="2020-04-22T13:12:03Z">
            <text:p>2020-04-22T13:12:03Z</text:p>
          </table:table-cell>
          <table:table-cell office:value-type="string" office:string-value="unfoldingWord/wordMAP-lexer">
            <text:p>unfoldingWord/wordMAP-lexer</text:p>
          </table:table-cell>
          <table:table-cell office:value-type="string" office:string-value="https://github.com/unfoldingWord/wordMAP-lexer">
            <text:p>https://github.com/unfoldingWord/wordMAP-lexer</text:p>
          </table:table-cell>
          <table:table-cell office:value-type="string" office:string-value="2-Keep">
            <text:p>2-Keep</text:p>
          </table:table-cell>
          <table:table-cell office:value-type="string" office:string-value="externally used - Repository has GitHub dependents or at least 1,000 npm downloads in the last year (19198 downloads).">
            <text:p>externally used - Repository has GitHub dependents or at least 1,000 npm downloads in the last year (1919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9198 downloads in the last year).">
            <text:p>Package has detected local usage, GitHub dependents, or significant npm downloads (19198 downloads in the last year).</text:p>
          </table:table-cell>
          <table:table-cell office:value-type="string" office:string-value="wordMAP-lexer">
            <text:p>wordMAP-lex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mapbooster">
            <text:p>unfoldingWord/wordmapbooster</text:p>
          </table:table-cell>
          <table:table-cell office:value-type="string" office:string-value="https://github.com/unfoldingWord/wordmapbooster">
            <text:p>https://github.com/unfoldingWord/wordmapbooster</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3-09T13:39:10Z">
            <text:p>2026-03-09T13:39:10Z</text:p>
          </table:table-cell>
          <table:table-cell office:value-type="string" office:string-value="2026-03-09T13:39:10Z">
            <text:p>2026-03-09T13:39:10Z</text:p>
          </table:table-cell>
          <table:table-cell office:value-type="string" office:string-value="">
            <text:p/>
          </table:table-cell>
          <table:table-cell office:value-type="string" office:string-value="JEdward7777/wordmapbooster">
            <text:p>JEdward7777/wordmapbooster</text:p>
          </table:table-cell>
          <table:table-cell office:value-type="string" office:string-value="['Joshua Lansford', 'PhotoNomad0']">
            <text:p>['Joshua Lansford', 'PhotoNomad0']</text:p>
          </table:table-cell>
          <table:table-cell office:value-type="string" office:string-value="0">
            <text:p>0</text:p>
          </table:table-cell>
          <table:table-cell office:value-type="string" office:string-value="0">
            <text:p>0</text:p>
          </table:table-cell>
          <table:table-cell office:value-type="string" office:string-value="45">
            <text:p>4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wordmapbooster">
            <text:p>uw-wordmapboos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sfm-js', 'wordmap', 'wordmap-lexer']">
            <text:p>['usfm-js', 'wordmap', 'wordmap-lexer']</text:p>
          </table:table-cell>
          <table:table-cell office:value-type="string" office:string-value="2026-03-09T13:39:14Z">
            <text:p>2026-03-09T13:39:14Z</text:p>
          </table:table-cell>
          <table:table-cell office:value-type="string" office:string-value="unfoldingWord/wordmapbooster">
            <text:p>unfoldingWord/wordmapbooster</text:p>
          </table:table-cell>
          <table:table-cell office:value-type="string" office:string-value="https://github.com/unfoldingWord/wordmapbooster">
            <text:p>https://github.com/unfoldingWord/wordmapboost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wordmapbooster">
            <text:p>wordmapboos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ackage.json has wrong module name">
            <text:p>package.json has wrong module name</text:p>
          </table:table-cell>
          <table:table-cell office:value-type="string" office:string-value="unfoldingWord-box3/admin-app-old">
            <text:p>unfoldingWord-box3/admin-app-old</text:p>
          </table:table-cell>
          <table:table-cell office:value-type="string" office:string-value="https://github.com/unfoldingWord-box3/admin-app-old">
            <text:p>https://github.com/unfoldingWord-box3/admin-app-old</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1-03-10T14:23:06Z">
            <text:p>2021-03-10T14:23:06Z</text:p>
          </table:table-cell>
          <table:table-cell office:value-type="string" office:string-value="2021-03-09T18:47:30Z">
            <text:p>2021-03-09T18:47:30Z</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mannycolon', 'PhotoNomad0', 'mandolyte']">
            <text:p>['mannycolon', 'PhotoNomad0', 'mandolyte']</text:p>
          </table:table-cell>
          <table:table-cell office:value-type="string" office:string-value="0">
            <text:p>0</text:p>
          </table:table-cell>
          <table:table-cell office:value-type="string" office:string-value="0">
            <text:p>0</text:p>
          </table:table-cell>
          <table:table-cell office:value-type="string" office:string-value="239">
            <text:p>23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reate-app">
            <text:p>create-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ranslation-helps-rcl']">
            <text:p>['bible-reference-rcl', 'gitea-react-toolkit', 'markdown-translatable', 'resource-workspace-rcl', 'scripture-resources-rcl', 'single-scripture-rcl', 'translation-helps-rcl']</text:p>
          </table:table-cell>
          <table:table-cell office:value-type="string" office:string-value="2026-06-22T18:20:15Z">
            <text:p>2026-06-22T18:20:15Z</text:p>
          </table:table-cell>
          <table:table-cell office:value-type="string" office:string-value="unfoldingWord-box3/admin-app-old">
            <text:p>unfoldingWord-box3/admin-app-old</text:p>
          </table:table-cell>
          <table:table-cell office:value-type="string" office:string-value="https://github.com/unfoldingWord-box3/admin-app-old">
            <text:p>https://github.com/unfoldingWord-box3/admin-app-ol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admin-app-old">
            <text:p>admin-app-old</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avd-ar">
            <text:p>unfoldingWord/avd-ar</text:p>
          </table:table-cell>
          <table:table-cell office:value-type="string" office:string-value="https://github.com/unfoldingWord/avd-ar">
            <text:p>https://github.com/unfoldingWord/avd-ar</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2-23T03:29:23Z">
            <text:p>2016-02-23T03:29:23Z</text:p>
          </table:table-cell>
          <table:table-cell office:value-type="string" office:string-value="2016-02-23T03:29:20Z">
            <text:p>2016-02-23T03:29:20Z</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17Z">
            <text:p>2023-01-28T16:52:17Z</text:p>
          </table:table-cell>
          <table:table-cell office:value-type="string" office:string-value="unfoldingWord/avd-ar">
            <text:p>unfoldingWord/avd-ar</text:p>
          </table:table-cell>
          <table:table-cell office:value-type="string" office:string-value="https://github.com/unfoldingWord/avd-ar">
            <text:p>https://github.com/unfoldingWord/avd-a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avd-ar">
            <text:p>avd-a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Bootstrap43">
            <text:p>unfoldingWord-dev/Bootstrap43</text:p>
          </table:table-cell>
          <table:table-cell office:value-type="string" office:string-value="https://github.com/unfoldingWord-dev/Bootstrap43">
            <text:p>https://github.com/unfoldingWord-dev/Bootstrap43</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2-22T18:31:57Z">
            <text:p>2012-02-22T18:31:57Z</text:p>
          </table:table-cell>
          <table:table-cell office:value-type="string" office:string-value="2012-02-22T18:31:53Z">
            <text:p>2012-02-22T18:31:53Z</text:p>
          </table:table-cell>
          <table:table-cell office:value-type="string" office:string-value="">
            <text:p/>
          </table:table-cell>
          <table:table-cell office:value-type="string" office:string-value="aaronpk/Bootstrap-Skin">
            <text:p>aaronpk/Bootstrap-Skin</text:p>
          </table:table-cell>
          <table:table-cell office:value-type="string" office:string-value="['aaronpk', 'reidab']">
            <text:p>['aaronpk', 'reidab']</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Bootstrap43">
            <text:p>unfoldingWord-dev/Bootstrap43</text:p>
          </table:table-cell>
          <table:table-cell office:value-type="string" office:string-value="https://github.com/unfoldingWord-dev/Bootstrap43">
            <text:p>https://github.com/unfoldingWord-dev/Bootstrap43</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Bootstrap43">
            <text:p>Bootstrap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esign">
            <text:p>unfoldingWord-dev/design</text:p>
          </table:table-cell>
          <table:table-cell office:value-type="string" office:string-value="https://github.com/unfoldingWord-dev/design">
            <text:p>https://github.com/unfoldingWord-dev/design</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10-03T16:24:06Z">
            <text:p>2016-10-03T16:24:06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63">
            <text:p>6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design">
            <text:p>unfoldingWord-dev/design</text:p>
          </table:table-cell>
          <table:table-cell office:value-type="string" office:string-value="https://github.com/unfoldingWord-dev/design">
            <text:p>https://github.com/unfoldingWord-dev/desig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esign">
            <text:p>desig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iscourse-mermaid">
            <text:p>unfoldingWord/discourse-mermaid</text:p>
          </table:table-cell>
          <table:table-cell office:value-type="string" office:string-value="https://github.com/unfoldingWord/discourse-mermaid">
            <text:p>https://github.com/unfoldingWord/discourse-mermai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3-07-26T14:38:59Z">
            <text:p>2023-07-26T14:38:59Z</text:p>
          </table:table-cell>
          <table:table-cell office:value-type="string" office:string-value="2023-07-26T14:38:59Z">
            <text:p>2023-07-26T14:38:59Z</text:p>
          </table:table-cell>
          <table:table-cell office:value-type="string" office:string-value="">
            <text:p/>
          </table:table-cell>
          <table:table-cell office:value-type="string" office:string-value="">
            <text:p/>
          </table:table-cell>
          <table:table-cell office:value-type="string" office:string-value="['jag3773', 'rishabhlakhotia', 'jjaffeux']">
            <text:p>['jag3773', 'rishabhlakhotia', 'jjaffeux']</text:p>
          </table:table-cell>
          <table:table-cell office:value-type="string" office:string-value="4">
            <text:p>4</text:p>
          </table:table-cell>
          <table:table-cell office:value-type="string" office:string-value="2">
            <text:p>2</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5-13T01:56:41Z">
            <text:p>2025-05-13T01:56:41Z</text:p>
          </table:table-cell>
          <table:table-cell office:value-type="string" office:string-value="unfoldingWord/discourse-mermaid">
            <text:p>unfoldingWord/discourse-mermaid</text:p>
          </table:table-cell>
          <table:table-cell office:value-type="string" office:string-value="https://github.com/unfoldingWord/discourse-mermaid">
            <text:p>https://github.com/unfoldingWord/discourse-mermai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iscourse-mermaid">
            <text:p>discourse-mermai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okuwiki-slack-invite">
            <text:p>unfoldingWord-dev/dokuwiki-slack-invite</text:p>
          </table:table-cell>
          <table:table-cell office:value-type="string" office:string-value="https://github.com/unfoldingWord-dev/dokuwiki-slack-invite">
            <text:p>https://github.com/unfoldingWord-dev/dokuwiki-slack-invite</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8-11-02T14:11:36Z">
            <text:p>2018-11-02T14:11:36Z</text:p>
          </table:table-cell>
          <table:table-cell office:value-type="string" office:string-value="2018-11-02T14:11:35Z">
            <text:p>2018-11-02T14:11:35Z</text:p>
          </table:table-cell>
          <table:table-cell office:value-type="string" office:string-value="">
            <text:p/>
          </table:table-cell>
          <table:table-cell office:value-type="string" office:string-value="">
            <text:p/>
          </table:table-cell>
          <table:table-cell office:value-type="string" office:string-value="['MatejMecka', 'jag3773', 'Matej Plavevski', 'Richard Mahn', 'Saksham-Katiyar', 'yvonnel098']">
            <text:p>['MatejMecka', 'jag3773', 'Matej Plavevski', 'Richard Mahn', 'Saksham-Katiyar', 'yvonnel098']</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7T20:30:22Z">
            <text:p>2023-01-27T20:30:22Z</text:p>
          </table:table-cell>
          <table:table-cell office:value-type="string" office:string-value="unfoldingWord-dev/dokuwiki-slack-invite">
            <text:p>unfoldingWord-dev/dokuwiki-slack-invite</text:p>
          </table:table-cell>
          <table:table-cell office:value-type="string" office:string-value="https://github.com/unfoldingWord-dev/dokuwiki-slack-invite">
            <text:p>https://github.com/unfoldingWord-dev/dokuwiki-slack-invit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okuwiki-slack-invite">
            <text:p>dokuwiki-slack-invit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oor43">
            <text:p>unfoldingWord-dev/Door43</text:p>
          </table:table-cell>
          <table:table-cell office:value-type="string" office:string-value="https://github.com/unfoldingWord-dev/Door43">
            <text:p>https://github.com/unfoldingWord-dev/Door43</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7-04-25T18:49:08Z">
            <text:p>2017-04-25T18:49:08Z</text:p>
          </table:table-cell>
          <table:table-cell office:value-type="string" office:string-value="2016-11-15T14:20:40Z">
            <text:p>2016-11-15T14:20:40Z</text:p>
          </table:table-cell>
          <table:table-cell office:value-type="string" office:string-value="">
            <text:p/>
          </table:table-cell>
          <table:table-cell office:value-type="string" office:string-value="">
            <text:p/>
          </table:table-cell>
          <table:table-cell office:value-type="string" office:string-value="['Richard Mahn', 'richmahn', 'phillip-hopper', 'Phil Hopper', 'da1nerd', 'PurpleGuitar', 'superdav42', 'Apache', 'Apache Production', 'licoabi', 'root', 'kbuildsyourdotcom', 'dboerschlein', 'codemis', 'Apache Door43', 'Jesse A. Griffin', 'jag3773', 'Ricahrd Mahn', 'System Administrator', 'richmahn@gmail.com']">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office:string-value="17">
            <text:p>17</text:p>
          </table:table-cell>
          <table:table-cell office:value-type="string" office:string-value="0">
            <text:p>0</text:p>
          </table:table-cell>
          <table:table-cell office:value-type="string" office:string-value="548">
            <text:p>548</text:p>
          </table:table-cell>
          <table:table-cell office:value-type="string" office:string-value="">
            <text:p/>
          </table:table-cell>
          <table:table-cell office:value-type="string" office:string-value="['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5T03:14:44Z">
            <text:p>2026-03-15T03:14:44Z</text:p>
          </table:table-cell>
          <table:table-cell office:value-type="string" office:string-value="unfoldingWord-dev/Door43">
            <text:p>unfoldingWord-dev/Door43</text:p>
          </table:table-cell>
          <table:table-cell office:value-type="string" office:string-value="https://github.com/unfoldingWord-dev/Door43">
            <text:p>https://github.com/unfoldingWord-dev/Door43</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oor43">
            <text:p>Door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oor43-acceptance-tests">
            <text:p>unfoldingWord-dev/door43-acceptance-tests</text:p>
          </table:table-cell>
          <table:table-cell office:value-type="string" office:string-value="https://github.com/unfoldingWord-dev/door43-acceptance-tests">
            <text:p>https://github.com/unfoldingWord-dev/door43-acceptance-tests</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3-16T21:59:37Z">
            <text:p>2017-03-16T21:59:37Z</text:p>
          </table:table-cell>
          <table:table-cell office:value-type="string" office:string-value="2017-03-16T21:59:36Z">
            <text:p>2017-03-16T21:59:36Z</text:p>
          </table:table-cell>
          <table:table-cell office:value-type="string" office:string-value="">
            <text:p/>
          </table:table-cell>
          <table:table-cell office:value-type="string" office:string-value="">
            <text:p/>
          </table:table-cell>
          <table:table-cell office:value-type="string" office:string-value="['phillip-hopper', 'jag3773', 'Phil Hopper']">
            <text:p>['phillip-hopper', 'jag3773', 'Phil Hopper']</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9Z">
            <text:p>2023-01-28T16:19:09Z</text:p>
          </table:table-cell>
          <table:table-cell office:value-type="string" office:string-value="unfoldingWord-dev/door43-acceptance-tests">
            <text:p>unfoldingWord-dev/door43-acceptance-tests</text:p>
          </table:table-cell>
          <table:table-cell office:value-type="string" office:string-value="https://github.com/unfoldingWord-dev/door43-acceptance-tests">
            <text:p>https://github.com/unfoldingWord-dev/door43-acceptance-test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oor43-acceptance-tests">
            <text:p>door43-acceptance-tes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preview-server">
            <text:p>unfoldingWord/door43-preview-server</text:p>
          </table:table-cell>
          <table:table-cell office:value-type="string" office:string-value="https://github.com/unfoldingWord/door43-preview-server">
            <text:p>https://github.com/unfoldingWord/door43-preview-server</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4-05-23T13:53:24Z">
            <text:p>2024-05-23T13:53:24Z</text:p>
          </table:table-cell>
          <table:table-cell office:value-type="string" office:string-value="2024-05-23T13:53:22Z">
            <text:p>2024-05-23T13:53:22Z</text:p>
          </table:table-cell>
          <table:table-cell office:value-type="string" office:string-value="2024-05-22T20:17:13Z">
            <text:p>2024-05-22T20:17:13Z</text:p>
          </table:table-cell>
          <table:table-cell office:value-type="string" office:string-value="ccjmne/puppeteer-html2pdf">
            <text:p>ccjmne/puppeteer-html2pdf</text:p>
          </table:table-cell>
          <table:table-cell office:value-type="string" office:string-value="['ccjmne', 'richmahn', 'bmestanov', 'redbaron-gt']">
            <text:p>['ccjmne', 'richmahn', 'bmestanov', 'redbaron-gt']</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door43-preview-server">
            <text:p>door43-preview-ser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09T09:17:22Z">
            <text:p>2025-09-09T09:17:22Z</text:p>
          </table:table-cell>
          <table:table-cell office:value-type="string" office:string-value="unfoldingWord/door43-preview-server">
            <text:p>unfoldingWord/door43-preview-server</text:p>
          </table:table-cell>
          <table:table-cell office:value-type="string" office:string-value="https://github.com/unfoldingWord/door43-preview-server">
            <text:p>https://github.com/unfoldingWord/door43-preview-serv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door43-preview-server">
            <text:p>door43-preview-serv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oor43-project-pages">
            <text:p>unfoldingWord-dev/door43-project-pages</text:p>
          </table:table-cell>
          <table:table-cell office:value-type="string" office:string-value="https://github.com/unfoldingWord-dev/door43-project-pages">
            <text:p>https://github.com/unfoldingWord-dev/door43-project-pages</text:p>
          </table:table-cell>
          <table:table-cell office:value-type="string" office:string-value="CSS">
            <text:p>CSS</text:p>
          </table:table-cell>
          <table:table-cell office:value-type="string" office:string-value="True">
            <text:p>True</text:p>
          </table:table-cell>
          <table:table-cell office:value-type="string" office:string-value="True">
            <text:p>True</text:p>
          </table:table-cell>
          <table:table-cell office:value-type="string" office:string-value="2016-09-26T16:42:57Z">
            <text:p>2016-09-26T16:42:57Z</text:p>
          </table:table-cell>
          <table:table-cell office:value-type="string" office:string-value="2016-09-26T16:42:54Z">
            <text:p>2016-09-26T16:42:54Z</text:p>
          </table:table-cell>
          <table:table-cell office:value-type="string" office:string-value="">
            <text:p/>
          </table:table-cell>
          <table:table-cell office:value-type="string" office:string-value="bspidel/door43-project-pages">
            <text:p>bspidel/door43-project-pages</text:p>
          </table:table-cell>
          <table:table-cell office:value-type="string" office:string-value="['Richard Mahn', 'bspidel']">
            <text:p>['Richard Mahn', 'bspidel']</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door43-project-pages">
            <text:p>unfoldingWord-dev/door43-project-pages</text:p>
          </table:table-cell>
          <table:table-cell office:value-type="string" office:string-value="https://github.com/unfoldingWord-dev/door43-project-pages">
            <text:p>https://github.com/unfoldingWord-dev/door43-project-page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oor43-project-pages">
            <text:p>door43-project-page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electron">
            <text:p>unfoldingWord-box3/electron</text:p>
          </table:table-cell>
          <table:table-cell office:value-type="string" office:string-value="https://github.com/unfoldingWord-box3/electron">
            <text:p>https://github.com/unfoldingWord-box3/electron</text:p>
          </table:table-cell>
          <table:table-cell office:value-type="string" office:string-value="">
            <text:p/>
          </table:table-cell>
          <table:table-cell office:value-type="string" office:string-value="True">
            <text:p>True</text:p>
          </table:table-cell>
          <table:table-cell office:value-type="string" office:string-value="True">
            <text:p>True</text:p>
          </table:table-cell>
          <table:table-cell office:value-type="string" office:string-value="2022-04-17T01:34:51Z">
            <text:p>2022-04-17T01:34:51Z</text:p>
          </table:table-cell>
          <table:table-cell office:value-type="string" office:string-value="2022-04-12T13:43:01Z">
            <text:p>2022-04-12T13:43:01Z</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office:string-value="0">
            <text:p>0</text:p>
          </table:table-cell>
          <table:table-cell office:value-type="string" office:string-value="0">
            <text:p>0</text:p>
          </table:table-cell>
          <table:table-cell office:value-type="string" office:string-value="25985">
            <text:p>2598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00:48:49Z">
            <text:p>2023-01-28T00:48:49Z</text:p>
          </table:table-cell>
          <table:table-cell office:value-type="string" office:string-value="unfoldingWord-box3/electron">
            <text:p>unfoldingWord-box3/electron</text:p>
          </table:table-cell>
          <table:table-cell office:value-type="string" office:string-value="https://github.com/unfoldingWord-box3/electron">
            <text:p>https://github.com/unfoldingWord-box3/electro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electron">
            <text:p>electro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therpad-lite">
            <text:p>unfoldingWord-dev/etherpad-lite</text:p>
          </table:table-cell>
          <table:table-cell office:value-type="string" office:string-value="https://github.com/unfoldingWord-dev/etherpad-lite">
            <text:p>https://github.com/unfoldingWord-dev/etherpad-lite</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1-09-23T18:20:05Z">
            <text:p>2011-09-23T18:20:05Z</text:p>
          </table:table-cell>
          <table:table-cell office:value-type="string" office:string-value="2011-09-02T22:45:35Z">
            <text:p>2011-09-02T22:45:35Z</text:p>
          </table:table-cell>
          <table:table-cell office:value-type="string" office:string-value="">
            <text:p/>
          </table:table-cell>
          <table:table-cell office:value-type="string" office:string-value="ether/etherpad">
            <text:p>ether/etherpad</text:p>
          </table:table-cell>
          <table:table-cell office:value-type="string" office:string-value="['Pita', 'JohnMcLear', 'Robin Buse', 'Robin', 'hanspinckaers', 'Lukas Martini', 'adrianheine', 'garrett', 'Patrick Pfeiffer', 'Randy', 'erlendfh', 'chapel', 'Pita Poison', 'root', 'snarkyMcSnark']">
            <text:p>['Pita', 'JohnMcLear', 'Robin Buse', 'Robin', 'hanspinckaers', 'Lukas Martini', 'adrianheine', 'garrett', 'Patrick Pfeiffer', 'Randy', 'erlendfh', 'chapel', 'Pita Poison', 'root', 'snarkyMcSnark']</text:p>
          </table:table-cell>
          <table:table-cell office:value-type="string" office:string-value="0">
            <text:p>0</text:p>
          </table:table-cell>
          <table:table-cell office:value-type="string" office:string-value="0">
            <text:p>0</text:p>
          </table:table-cell>
          <table:table-cell office:value-type="string" office:string-value="576">
            <text:p>57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therpad-lite">
            <text:p>etherpad-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etherpad-lite">
            <text:p>unfoldingWord-dev/etherpad-lite</text:p>
          </table:table-cell>
          <table:table-cell office:value-type="string" office:string-value="https://github.com/unfoldingWord-dev/etherpad-lite">
            <text:p>https://github.com/unfoldingWord-dev/etherpad-lit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etherpad-lite">
            <text:p>etherpad-lit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xample_tool">
            <text:p>unfoldingWord-dev/example_tool</text:p>
          </table:table-cell>
          <table:table-cell office:value-type="string" office:string-value="https://github.com/unfoldingWord-dev/example_tool">
            <text:p>https://github.com/unfoldingWord-dev/example_tool</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6-12-09T21:07:14Z">
            <text:p>2016-12-09T21:07:14Z</text:p>
          </table:table-cell>
          <table:table-cell office:value-type="string" office:string-value="2016-10-20T07:35:23Z">
            <text:p>2016-10-20T07:35:23Z</text:p>
          </table:table-cell>
          <table:table-cell office:value-type="string" office:string-value="">
            <text:p/>
          </table:table-cell>
          <table:table-cell office:value-type="string" office:string-value="">
            <text:p/>
          </table:table-cell>
          <table:table-cell office:value-type="string" office:string-value="['ihoegen', 'Sterling (Jay) Scott']">
            <text:p>['ihoegen', 'Sterling (Jay) Scott']</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xampleTool">
            <text:p>Example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06Z">
            <text:p>2023-01-28T16:52:06Z</text:p>
          </table:table-cell>
          <table:table-cell office:value-type="string" office:string-value="unfoldingWord-dev/example_tool">
            <text:p>unfoldingWord-dev/example_tool</text:p>
          </table:table-cell>
          <table:table-cell office:value-type="string" office:string-value="https://github.com/unfoldingWord-dev/example_tool">
            <text:p>https://github.com/unfoldingWord-dev/example_tool</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example_tool">
            <text:p>example_too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md-exports">
            <text:p>unfoldingWord-dev/md-exports</text:p>
          </table:table-cell>
          <table:table-cell office:value-type="string" office:string-value="https://github.com/unfoldingWord-dev/md-exports">
            <text:p>https://github.com/unfoldingWord-dev/md-exports</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4-06-16T18:55:44Z">
            <text:p>2014-06-16T18:55:44Z</text:p>
          </table:table-cell>
          <table:table-cell office:value-type="string" office:string-value="2014-06-16T18:55:35Z">
            <text:p>2014-06-16T18:55:35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md-exports">
            <text:p>unfoldingWord-dev/md-exports</text:p>
          </table:table-cell>
          <table:table-cell office:value-type="string" office:string-value="https://github.com/unfoldingWord-dev/md-exports">
            <text:p>https://github.com/unfoldingWord-dev/md-export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md-exports">
            <text:p>md-expor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https://github.com/unfoldingWord/MediaWiki-USFMTag">
            <text:p>https://github.com/unfoldingWord/MediaWiki-USFMTag</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3-07-10T19:23:35Z">
            <text:p>2013-07-10T19:23:35Z</text:p>
          </table:table-cell>
          <table:table-cell office:value-type="string" office:string-value="2013-07-10T19:23:26Z">
            <text:p>2013-07-10T19:23:26Z</text:p>
          </table:table-cell>
          <table:table-cell office:value-type="string" office:string-value="">
            <text:p/>
          </table:table-cell>
          <table:table-cell office:value-type="string" office:string-value="">
            <text:p/>
          </table:table-cell>
          <table:table-cell office:value-type="string" office:string-value="['Distant Shores Media', 'Door43']">
            <text:p>['Distant Shores Media', 'Door43']</text:p>
          </table:table-cell>
          <table:table-cell office:value-type="string" office:string-value="1">
            <text:p>1</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23T14:45:18Z">
            <text:p>2026-02-23T14:45:18Z</text:p>
          </table:table-cell>
          <table:table-cell office:value-type="string" office:string-value="unfoldingWord/MediaWiki-USFMTag">
            <text:p>unfoldingWord/MediaWiki-USFMTag</text:p>
          </table:table-cell>
          <table:table-cell office:value-type="string" office:string-value="https://github.com/unfoldingWord/MediaWiki-USFMTag">
            <text:p>https://github.com/unfoldingWord/MediaWiki-USFMTag</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MediaWiki-USFMTag">
            <text:p>MediaWiki-USFMTag</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Mobile-JWiki">
            <text:p>unfoldingWord-dev/Mobile-JWiki</text:p>
          </table:table-cell>
          <table:table-cell office:value-type="string" office:string-value="https://github.com/unfoldingWord-dev/Mobile-JWiki">
            <text:p>https://github.com/unfoldingWord-dev/Mobile-JWiki</text:p>
          </table:table-cell>
          <table:table-cell office:value-type="string" office:string-value="PHP">
            <text:p>PHP</text:p>
          </table:table-cell>
          <table:table-cell office:value-type="string" office:string-value="True">
            <text:p>True</text:p>
          </table:table-cell>
          <table:table-cell office:value-type="string" office:string-value="True">
            <text:p>True</text:p>
          </table:table-cell>
          <table:table-cell office:value-type="string" office:string-value="2011-09-19T17:33:58Z">
            <text:p>2011-09-19T17:33:58Z</text:p>
          </table:table-cell>
          <table:table-cell office:value-type="string" office:string-value="2011-09-19T17:33:58Z">
            <text:p>2011-09-19T17:33:58Z</text:p>
          </table:table-cell>
          <table:table-cell office:value-type="string" office:string-value="">
            <text:p/>
          </table:table-cell>
          <table:table-cell office:value-type="string" office:string-value="rwadholm/Mobile-JWiki">
            <text:p>rwadholm/Mobile-JWiki</text:p>
          </table:table-cell>
          <table:table-cell office:value-type="string" office:string-value="Bob Wadholm">
            <text:p>Bob Wadholm</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Mobile-JWiki">
            <text:p>unfoldingWord-dev/Mobile-JWiki</text:p>
          </table:table-cell>
          <table:table-cell office:value-type="string" office:string-value="https://github.com/unfoldingWord-dev/Mobile-JWiki">
            <text:p>https://github.com/unfoldingWord-dev/Mobile-JWiki</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Mobile-JWiki">
            <text:p>Mobile-JWiki</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MultiplatformFrameworks">
            <text:p>unfoldingWord-box3/MultiplatformFrameworks</text:p>
          </table:table-cell>
          <table:table-cell office:value-type="string" office:string-value="https://github.com/unfoldingWord-box3/MultiplatformFrameworks">
            <text:p>https://github.com/unfoldingWord-box3/MultiplatformFrameworks</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11-10T17:20:33Z">
            <text:p>2022-11-10T17:20:33Z</text:p>
          </table:table-cell>
          <table:table-cell office:value-type="string" office:string-value="2020-03-16T14:26:24Z">
            <text:p>2020-03-16T14:26:24Z</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5">
            <text:p>5</text:p>
          </table:table-cell>
          <table:table-cell office:value-type="string" office:string-value="5">
            <text:p>5</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3T19:52:51Z">
            <text:p>2025-12-03T19:52:51Z</text:p>
          </table:table-cell>
          <table:table-cell office:value-type="string" office:string-value="unfoldingWord-box3/MultiplatformFrameworks">
            <text:p>unfoldingWord-box3/MultiplatformFrameworks</text:p>
          </table:table-cell>
          <table:table-cell office:value-type="string" office:string-value="https://github.com/unfoldingWord-box3/MultiplatformFrameworks">
            <text:p>https://github.com/unfoldingWord-box3/MultiplatformFramework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MultiplatformFrameworks">
            <text:p>MultiplatformFramework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agios_plugins">
            <text:p>unfoldingWord-dev/nagios_plugins</text:p>
          </table:table-cell>
          <table:table-cell office:value-type="string" office:string-value="https://github.com/unfoldingWord-dev/nagios_plugins">
            <text:p>https://github.com/unfoldingWord-dev/nagios_plugins</text:p>
          </table:table-cell>
          <table:table-cell office:value-type="string" office:string-value="Shell">
            <text:p>Shell</text:p>
          </table:table-cell>
          <table:table-cell office:value-type="string" office:string-value="True">
            <text:p>True</text:p>
          </table:table-cell>
          <table:table-cell office:value-type="string" office:string-value="False">
            <text:p>False</text:p>
          </table:table-cell>
          <table:table-cell office:value-type="string" office:string-value="2019-05-09T13:39:46Z">
            <text:p>2019-05-09T13:39:46Z</text:p>
          </table:table-cell>
          <table:table-cell office:value-type="string" office:string-value="2019-05-09T13:39:39Z">
            <text:p>2019-05-09T13:39:39Z</text:p>
          </table:table-cell>
          <table:table-cell office:value-type="string" office:string-value="">
            <text:p/>
          </table:table-cell>
          <table:table-cell office:value-type="string" office:string-value="">
            <text:p/>
          </table:table-cell>
          <table:table-cell office:value-type="string" office:string-value="['jag3773', 'Jesse A. Griffin', 'jpetitt1', 'root']">
            <text:p>['jag3773', 'Jesse A. Griffin', 'jpetitt1', 'root']</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nagios_plugins">
            <text:p>unfoldingWord-dev/nagios_plugins</text:p>
          </table:table-cell>
          <table:table-cell office:value-type="string" office:string-value="https://github.com/unfoldingWord-dev/nagios_plugins">
            <text:p>https://github.com/unfoldingWord-dev/nagios_plugin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nagios_plugins">
            <text:p>nagios_plugin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dcs-api-client">
            <text:p>unfoldingWord-dev/node-dcs-api-client</text:p>
          </table:table-cell>
          <table:table-cell office:value-type="string" office:string-value="https://github.com/unfoldingWord-dev/node-dcs-api-client">
            <text:p>https://github.com/unfoldingWord-dev/node-dcs-api-client</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04-22T11:32:53Z">
            <text:p>2022-04-22T11:32:53Z</text:p>
          </table:table-cell>
          <table:table-cell office:value-type="string" office:string-value="2022-04-22T11:31:46Z">
            <text:p>2022-04-22T11:31:46Z</text:p>
          </table:table-cell>
          <table:table-cell office:value-type="string" office:string-value="2022-04-22T11:32:54Z">
            <text:p>2022-04-22T11:32:54Z</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dcs_api_client">
            <text:p>dcs_api_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7T20:32:30Z">
            <text:p>2023-01-27T20:32:30Z</text:p>
          </table:table-cell>
          <table:table-cell office:value-type="string" office:string-value="unfoldingWord-dev/node-dcs-api-client">
            <text:p>unfoldingWord-dev/node-dcs-api-client</text:p>
          </table:table-cell>
          <table:table-cell office:value-type="string" office:string-value="https://github.com/unfoldingWord-dev/node-dcs-api-client">
            <text:p>https://github.com/unfoldingWord-dev/node-dcs-api-client</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node-dcs-api-client">
            <text:p>node-dcs-api-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am">
            <text:p>unfoldingWord/obs-am</text:p>
          </table:table-cell>
          <table:table-cell office:value-type="string" office:string-value="https://github.com/unfoldingWord/obs-am">
            <text:p>https://github.com/unfoldingWord/obs-am</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0Z">
            <text:p>2016-01-14T23:50:50Z</text:p>
          </table:table-cell>
          <table:table-cell office:value-type="string" office:string-value="2016-01-14T23:50:48Z">
            <text:p>2016-01-14T23:50:48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am">
            <text:p>unfoldingWord/obs-am</text:p>
          </table:table-cell>
          <table:table-cell office:value-type="string" office:string-value="https://github.com/unfoldingWord/obs-am">
            <text:p>https://github.com/unfoldingWord/obs-am</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am">
            <text:p>obs-am</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Android">
            <text:p>unfoldingWord-dev/OBS-Android</text:p>
          </table:table-cell>
          <table:table-cell office:value-type="string" office:string-value="https://github.com/unfoldingWord-dev/OBS-Android">
            <text:p>https://github.com/unfoldingWord-dev/OBS-Androi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3:21Z">
            <text:p>2013-07-11T18:03:21Z</text:p>
          </table:table-cell>
          <table:table-cell office:value-type="string" office:string-value="2013-07-11T18:03:21Z">
            <text:p>2013-07-11T18:03:21Z</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OBS-Android">
            <text:p>unfoldingWord-dev/OBS-Android</text:p>
          </table:table-cell>
          <table:table-cell office:value-type="string" office:string-value="https://github.com/unfoldingWord-dev/OBS-Android">
            <text:p>https://github.com/unfoldingWord-dev/OBS-Androi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Android">
            <text:p>OBS-Androi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bn">
            <text:p>unfoldingWord/obs-bn</text:p>
          </table:table-cell>
          <table:table-cell office:value-type="string" office:string-value="https://github.com/unfoldingWord/obs-bn">
            <text:p>https://github.com/unfoldingWord/obs-bn</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5Z">
            <text:p>2016-01-14T23:51:05Z</text:p>
          </table:table-cell>
          <table:table-cell office:value-type="string" office:string-value="2016-01-14T23:51:03Z">
            <text:p>2016-01-14T23:51:03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bn">
            <text:p>unfoldingWord/obs-bn</text:p>
          </table:table-cell>
          <table:table-cell office:value-type="string" office:string-value="https://github.com/unfoldingWord/obs-bn">
            <text:p>https://github.com/unfoldingWord/obs-b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bn">
            <text:p>obs-b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ceb">
            <text:p>unfoldingWord/obs-ceb</text:p>
          </table:table-cell>
          <table:table-cell office:value-type="string" office:string-value="https://github.com/unfoldingWord/obs-ceb">
            <text:p>https://github.com/unfoldingWord/obs-ceb</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5-10T14:40:53Z">
            <text:p>2016-05-10T14:40:53Z</text:p>
          </table:table-cell>
          <table:table-cell office:value-type="string" office:string-value="2016-05-10T14:40:44Z">
            <text:p>2016-05-10T14:40:44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ceb">
            <text:p>unfoldingWord/obs-ceb</text:p>
          </table:table-cell>
          <table:table-cell office:value-type="string" office:string-value="https://github.com/unfoldingWord/obs-ceb">
            <text:p>https://github.com/unfoldingWord/obs-ceb</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ceb">
            <text:p>obs-ce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door43">
            <text:p>unfoldingWord-dev/obs-door43</text:p>
          </table:table-cell>
          <table:table-cell office:value-type="string" office:string-value="https://github.com/unfoldingWord-dev/obs-door43">
            <text:p>https://github.com/unfoldingWord-dev/obs-door43</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9-16T00:02:35Z">
            <text:p>2016-09-16T00:02:35Z</text:p>
          </table:table-cell>
          <table:table-cell office:value-type="string" office:string-value="2016-09-14T12:07:32Z">
            <text:p>2016-09-14T12:07:32Z</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obs-door43">
            <text:p>unfoldingWord-dev/obs-door43</text:p>
          </table:table-cell>
          <table:table-cell office:value-type="string" office:string-value="https://github.com/unfoldingWord-dev/obs-door43">
            <text:p>https://github.com/unfoldingWord-dev/obs-door43</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door43">
            <text:p>obs-door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en">
            <text:p>unfoldingWord/obs-en</text:p>
          </table:table-cell>
          <table:table-cell office:value-type="string" office:string-value="https://github.com/unfoldingWord/obs-en">
            <text:p>https://github.com/unfoldingWord/obs-en</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7Z">
            <text:p>2016-01-14T23:50:47Z</text:p>
          </table:table-cell>
          <table:table-cell office:value-type="string" office:string-value="2016-01-14T23:50:45Z">
            <text:p>2016-01-14T23:50:45Z</text:p>
          </table:table-cell>
          <table:table-cell office:value-type="string" office:string-value="">
            <text:p/>
          </table:table-cell>
          <table:table-cell office:value-type="string" office:string-value="">
            <text:p/>
          </table:table-cell>
          <table:table-cell office:value-type="string" office:string-value="['root', 'Jesse A. Griffin']">
            <text:p>['root', 'Jesse A. Griffin']</text:p>
          </table:table-cell>
          <table:table-cell office:value-type="string" office:string-value="0">
            <text:p>0</text:p>
          </table:table-cell>
          <table:table-cell office:value-type="string" office:string-value="0">
            <text:p>0</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8Z">
            <text:p>2023-01-28T16:58:28Z</text:p>
          </table:table-cell>
          <table:table-cell office:value-type="string" office:string-value="unfoldingWord/obs-en">
            <text:p>unfoldingWord/obs-en</text:p>
          </table:table-cell>
          <table:table-cell office:value-type="string" office:string-value="https://github.com/unfoldingWord/obs-en">
            <text:p>https://github.com/unfoldingWord/obs-e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en">
            <text:p>obs-e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es">
            <text:p>unfoldingWord/obs-es</text:p>
          </table:table-cell>
          <table:table-cell office:value-type="string" office:string-value="https://github.com/unfoldingWord/obs-es">
            <text:p>https://github.com/unfoldingWord/obs-es</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5Z">
            <text:p>2016-01-14T23:50:45Z</text:p>
          </table:table-cell>
          <table:table-cell office:value-type="string" office:string-value="2016-01-14T23:50:43Z">
            <text:p>2016-01-14T23:50:43Z</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50">
            <text:p>5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6Z">
            <text:p>2023-01-28T16:58:16Z</text:p>
          </table:table-cell>
          <table:table-cell office:value-type="string" office:string-value="unfoldingWord/obs-es">
            <text:p>unfoldingWord/obs-es</text:p>
          </table:table-cell>
          <table:table-cell office:value-type="string" office:string-value="https://github.com/unfoldingWord/obs-es">
            <text:p>https://github.com/unfoldingWord/obs-e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es">
            <text:p>obs-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es-419">
            <text:p>unfoldingWord/obs-es-419</text:p>
          </table:table-cell>
          <table:table-cell office:value-type="string" office:string-value="https://github.com/unfoldingWord/obs-es-419">
            <text:p>https://github.com/unfoldingWord/obs-es-419</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7-25T15:51:01Z">
            <text:p>2016-07-25T15:51:01Z</text:p>
          </table:table-cell>
          <table:table-cell office:value-type="string" office:string-value="2016-07-25T15:50:59Z">
            <text:p>2016-07-25T15:50:5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es-419">
            <text:p>unfoldingWord/obs-es-419</text:p>
          </table:table-cell>
          <table:table-cell office:value-type="string" office:string-value="https://github.com/unfoldingWord/obs-es-419">
            <text:p>https://github.com/unfoldingWord/obs-es-419</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es-419">
            <text:p>obs-es-419</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fa">
            <text:p>unfoldingWord/obs-fa</text:p>
          </table:table-cell>
          <table:table-cell office:value-type="string" office:string-value="https://github.com/unfoldingWord/obs-fa">
            <text:p>https://github.com/unfoldingWord/obs-fa</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6-15T12:49:15Z">
            <text:p>2016-06-15T12:49:15Z</text:p>
          </table:table-cell>
          <table:table-cell office:value-type="string" office:string-value="2016-06-15T12:49:01Z">
            <text:p>2016-06-15T12:49:01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6Z">
            <text:p>2023-01-28T16:58:16Z</text:p>
          </table:table-cell>
          <table:table-cell office:value-type="string" office:string-value="unfoldingWord/obs-fa">
            <text:p>unfoldingWord/obs-fa</text:p>
          </table:table-cell>
          <table:table-cell office:value-type="string" office:string-value="https://github.com/unfoldingWord/obs-fa">
            <text:p>https://github.com/unfoldingWord/obs-fa</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fa">
            <text:p>obs-fa</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fr">
            <text:p>unfoldingWord/obs-fr</text:p>
          </table:table-cell>
          <table:table-cell office:value-type="string" office:string-value="https://github.com/unfoldingWord/obs-fr">
            <text:p>https://github.com/unfoldingWord/obs-f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0T14:38:11Z">
            <text:p>2016-05-10T14:38:11Z</text:p>
          </table:table-cell>
          <table:table-cell office:value-type="string" office:string-value="2016-05-10T14:37:59Z">
            <text:p>2016-05-10T14:37:5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fr">
            <text:p>unfoldingWord/obs-fr</text:p>
          </table:table-cell>
          <table:table-cell office:value-type="string" office:string-value="https://github.com/unfoldingWord/obs-fr">
            <text:p>https://github.com/unfoldingWord/obs-f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fr">
            <text:p>obs-f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gaj-x-ymnk">
            <text:p>unfoldingWord/obs-gaj-x-ymnk</text:p>
          </table:table-cell>
          <table:table-cell office:value-type="string" office:string-value="https://github.com/unfoldingWord/obs-gaj-x-ymnk">
            <text:p>https://github.com/unfoldingWord/obs-gaj-x-ymnk</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10:27Z">
            <text:p>2016-07-27T12:10:27Z</text:p>
          </table:table-cell>
          <table:table-cell office:value-type="string" office:string-value="2016-07-27T12:10:17Z">
            <text:p>2016-07-27T12:10:17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9Z">
            <text:p>2023-01-28T16:58:19Z</text:p>
          </table:table-cell>
          <table:table-cell office:value-type="string" office:string-value="unfoldingWord/obs-gaj-x-ymnk">
            <text:p>unfoldingWord/obs-gaj-x-ymnk</text:p>
          </table:table-cell>
          <table:table-cell office:value-type="string" office:string-value="https://github.com/unfoldingWord/obs-gaj-x-ymnk">
            <text:p>https://github.com/unfoldingWord/obs-gaj-x-ymnk</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gaj-x-ymnk">
            <text:p>obs-gaj-x-ymnk</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gof">
            <text:p>unfoldingWord/obs-gof</text:p>
          </table:table-cell>
          <table:table-cell office:value-type="string" office:string-value="https://github.com/unfoldingWord/obs-gof">
            <text:p>https://github.com/unfoldingWord/obs-gof</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10T14:48:23Z">
            <text:p>2016-05-10T14:48:23Z</text:p>
          </table:table-cell>
          <table:table-cell office:value-type="string" office:string-value="2016-05-10T14:30:12Z">
            <text:p>2016-05-10T14:30:12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gof">
            <text:p>unfoldingWord/obs-gof</text:p>
          </table:table-cell>
          <table:table-cell office:value-type="string" office:string-value="https://github.com/unfoldingWord/obs-gof">
            <text:p>https://github.com/unfoldingWord/obs-gof</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gof">
            <text:p>obs-gof</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gu">
            <text:p>unfoldingWord/obs-gu</text:p>
          </table:table-cell>
          <table:table-cell office:value-type="string" office:string-value="https://github.com/unfoldingWord/obs-gu">
            <text:p>https://github.com/unfoldingWord/obs-gu</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4Z">
            <text:p>2016-01-14T23:51:14Z</text:p>
          </table:table-cell>
          <table:table-cell office:value-type="string" office:string-value="2016-01-14T23:51:12Z">
            <text:p>2016-01-14T23:51:12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2Z">
            <text:p>2023-01-28T16:58:22Z</text:p>
          </table:table-cell>
          <table:table-cell office:value-type="string" office:string-value="unfoldingWord/obs-gu">
            <text:p>unfoldingWord/obs-gu</text:p>
          </table:table-cell>
          <table:table-cell office:value-type="string" office:string-value="https://github.com/unfoldingWord/obs-gu">
            <text:p>https://github.com/unfoldingWord/obs-gu</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gu">
            <text:p>obs-gu</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ha">
            <text:p>unfoldingWord/obs-ha</text:p>
          </table:table-cell>
          <table:table-cell office:value-type="string" office:string-value="https://github.com/unfoldingWord/obs-ha">
            <text:p>https://github.com/unfoldingWord/obs-ha</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1Z">
            <text:p>2016-01-14T23:51:21Z</text:p>
          </table:table-cell>
          <table:table-cell office:value-type="string" office:string-value="2016-01-14T23:51:19Z">
            <text:p>2016-01-14T23:51:1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8Z">
            <text:p>2023-01-28T16:58:28Z</text:p>
          </table:table-cell>
          <table:table-cell office:value-type="string" office:string-value="unfoldingWord/obs-ha">
            <text:p>unfoldingWord/obs-ha</text:p>
          </table:table-cell>
          <table:table-cell office:value-type="string" office:string-value="https://github.com/unfoldingWord/obs-ha">
            <text:p>https://github.com/unfoldingWord/obs-ha</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ha">
            <text:p>obs-ha</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hi">
            <text:p>unfoldingWord/obs-hi</text:p>
          </table:table-cell>
          <table:table-cell office:value-type="string" office:string-value="https://github.com/unfoldingWord/obs-hi">
            <text:p>https://github.com/unfoldingWord/obs-hi</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2Z">
            <text:p>2016-01-14T23:51:12Z</text:p>
          </table:table-cell>
          <table:table-cell office:value-type="string" office:string-value="2016-01-14T23:51:09Z">
            <text:p>2016-01-14T23:51:0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hi">
            <text:p>unfoldingWord/obs-hi</text:p>
          </table:table-cell>
          <table:table-cell office:value-type="string" office:string-value="https://github.com/unfoldingWord/obs-hi">
            <text:p>https://github.com/unfoldingWord/obs-hi</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hi">
            <text:p>obs-h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hmr">
            <text:p>unfoldingWord/obs-hmr</text:p>
          </table:table-cell>
          <table:table-cell office:value-type="string" office:string-value="https://github.com/unfoldingWord/obs-hmr">
            <text:p>https://github.com/unfoldingWord/obs-hmr</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09:22Z">
            <text:p>2016-07-27T12:09:22Z</text:p>
          </table:table-cell>
          <table:table-cell office:value-type="string" office:string-value="2016-07-27T12:08:31Z">
            <text:p>2016-07-27T12:08:31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hmr">
            <text:p>unfoldingWord/obs-hmr</text:p>
          </table:table-cell>
          <table:table-cell office:value-type="string" office:string-value="https://github.com/unfoldingWord/obs-hmr">
            <text:p>https://github.com/unfoldingWord/obs-hm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hmr">
            <text:p>obs-hm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hu">
            <text:p>unfoldingWord/obs-hu</text:p>
          </table:table-cell>
          <table:table-cell office:value-type="string" office:string-value="https://github.com/unfoldingWord/obs-hu">
            <text:p>https://github.com/unfoldingWord/obs-hu</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8T19:53:08Z">
            <text:p>2016-07-28T19:53:08Z</text:p>
          </table:table-cell>
          <table:table-cell office:value-type="string" office:string-value="2016-07-28T19:52:13Z">
            <text:p>2016-07-28T19:52:13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9Z">
            <text:p>2023-01-28T16:58:19Z</text:p>
          </table:table-cell>
          <table:table-cell office:value-type="string" office:string-value="unfoldingWord/obs-hu">
            <text:p>unfoldingWord/obs-hu</text:p>
          </table:table-cell>
          <table:table-cell office:value-type="string" office:string-value="https://github.com/unfoldingWord/obs-hu">
            <text:p>https://github.com/unfoldingWord/obs-hu</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hu">
            <text:p>obs-hu</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iOS">
            <text:p>unfoldingWord-dev/OBS-iOS</text:p>
          </table:table-cell>
          <table:table-cell office:value-type="string" office:string-value="https://github.com/unfoldingWord-dev/OBS-iOS">
            <text:p>https://github.com/unfoldingWord-dev/OBS-iOS</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5:53Z">
            <text:p>2013-07-11T18:05:53Z</text:p>
          </table:table-cell>
          <table:table-cell office:value-type="string" office:string-value="2013-07-11T18:05:53Z">
            <text:p>2013-07-11T18:05:53Z</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OBS-iOS">
            <text:p>unfoldingWord-dev/OBS-iOS</text:p>
          </table:table-cell>
          <table:table-cell office:value-type="string" office:string-value="https://github.com/unfoldingWord-dev/OBS-iOS">
            <text:p>https://github.com/unfoldingWord-dev/OBS-iO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iOS">
            <text:p>OBS-iO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lpx">
            <text:p>unfoldingWord/obs-lpx</text:p>
          </table:table-cell>
          <table:table-cell office:value-type="string" office:string-value="https://github.com/unfoldingWord/obs-lpx">
            <text:p>https://github.com/unfoldingWord/obs-lpx</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28T19:45:10Z">
            <text:p>2016-05-28T19:45:10Z</text:p>
          </table:table-cell>
          <table:table-cell office:value-type="string" office:string-value="2016-05-28T19:44:44Z">
            <text:p>2016-05-28T19:44:44Z</text:p>
          </table:table-cell>
          <table:table-cell office:value-type="string" office:string-value="">
            <text:p/>
          </table:table-cell>
          <table:table-cell office:value-type="string" office:string-value="">
            <text:p/>
          </table:table-cell>
          <table:table-cell office:value-type="string" office:string-value="['Phil Hopper', 'root']">
            <text:p>['Phil Hopper', 'root']</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2Z">
            <text:p>2023-01-28T16:58:22Z</text:p>
          </table:table-cell>
          <table:table-cell office:value-type="string" office:string-value="unfoldingWord/obs-lpx">
            <text:p>unfoldingWord/obs-lpx</text:p>
          </table:table-cell>
          <table:table-cell office:value-type="string" office:string-value="https://github.com/unfoldingWord/obs-lpx">
            <text:p>https://github.com/unfoldingWord/obs-lpx</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lpx">
            <text:p>obs-lpx</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Mobile">
            <text:p>unfoldingWord-dev/OBS-Mobile</text:p>
          </table:table-cell>
          <table:table-cell office:value-type="string" office:string-value="https://github.com/unfoldingWord-dev/OBS-Mobile">
            <text:p>https://github.com/unfoldingWord-dev/OBS-Mobile</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7-29T21:22:13Z">
            <text:p>2012-07-29T21:22:13Z</text:p>
          </table:table-cell>
          <table:table-cell office:value-type="string" office:string-value="2012-07-29T21:21:55Z">
            <text:p>2012-07-29T21:21:55Z</text:p>
          </table:table-cell>
          <table:table-cell office:value-type="string" office:string-value="">
            <text:p/>
          </table:table-cell>
          <table:table-cell office:value-type="string" office:string-value="phonegap/phonegap-start">
            <text:p>phonegap/phonegap-start</text:p>
          </table:table-cell>
          <table:table-cell office:value-type="string" office:string-value="['Bob Wadholm', 'alunny', 'ryanbetts', 'Andrew Lunny', 'Dan Silivestru', 'Dave Johnson']">
            <text:p>['Bob Wadholm', 'alunny', 'ryanbetts', 'Andrew Lunny', 'Dan Silivestru', 'Dave Johnson']</text:p>
          </table:table-cell>
          <table:table-cell office:value-type="string" office:string-value="2">
            <text:p>2</text:p>
          </table:table-cell>
          <table:table-cell office:value-type="string" office:string-value="0">
            <text:p>0</text:p>
          </table:table-cell>
          <table:table-cell office:value-type="string" office:string-value="90">
            <text:p>9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OBS-Mobile">
            <text:p>unfoldingWord-dev/OBS-Mobile</text:p>
          </table:table-cell>
          <table:table-cell office:value-type="string" office:string-value="https://github.com/unfoldingWord-dev/OBS-Mobile">
            <text:p>https://github.com/unfoldingWord-dev/OBS-Mobil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Mobile">
            <text:p>OBS-Mobil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mr">
            <text:p>unfoldingWord/obs-mr</text:p>
          </table:table-cell>
          <table:table-cell office:value-type="string" office:string-value="https://github.com/unfoldingWord/obs-mr">
            <text:p>https://github.com/unfoldingWord/obs-m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6Z">
            <text:p>2016-01-14T23:51:06Z</text:p>
          </table:table-cell>
          <table:table-cell office:value-type="string" office:string-value="2016-01-14T23:51:05Z">
            <text:p>2016-01-14T23:51:05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mr">
            <text:p>unfoldingWord/obs-mr</text:p>
          </table:table-cell>
          <table:table-cell office:value-type="string" office:string-value="https://github.com/unfoldingWord/obs-mr">
            <text:p>https://github.com/unfoldingWord/obs-m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mr">
            <text:p>obs-m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ne">
            <text:p>unfoldingWord/obs-ne</text:p>
          </table:table-cell>
          <table:table-cell office:value-type="string" office:string-value="https://github.com/unfoldingWord/obs-ne">
            <text:p>https://github.com/unfoldingWord/obs-ne</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33Z">
            <text:p>2016-01-22T20:24:33Z</text:p>
          </table:table-cell>
          <table:table-cell office:value-type="string" office:string-value="2016-01-22T20:24:30Z">
            <text:p>2016-01-22T20:24:30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ne">
            <text:p>unfoldingWord/obs-ne</text:p>
          </table:table-cell>
          <table:table-cell office:value-type="string" office:string-value="https://github.com/unfoldingWord/obs-ne">
            <text:p>https://github.com/unfoldingWord/obs-n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ne">
            <text:p>obs-n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or">
            <text:p>unfoldingWord/obs-or</text:p>
          </table:table-cell>
          <table:table-cell office:value-type="string" office:string-value="https://github.com/unfoldingWord/obs-or">
            <text:p>https://github.com/unfoldingWord/obs-o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2Z">
            <text:p>2016-01-14T23:51:02Z</text:p>
          </table:table-cell>
          <table:table-cell office:value-type="string" office:string-value="2016-01-14T23:51:00Z">
            <text:p>2016-01-14T23:51:00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1Z">
            <text:p>2023-01-28T16:58:21Z</text:p>
          </table:table-cell>
          <table:table-cell office:value-type="string" office:string-value="unfoldingWord/obs-or">
            <text:p>unfoldingWord/obs-or</text:p>
          </table:table-cell>
          <table:table-cell office:value-type="string" office:string-value="https://github.com/unfoldingWord/obs-or">
            <text:p>https://github.com/unfoldingWord/obs-o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or">
            <text:p>obs-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pa">
            <text:p>unfoldingWord/obs-pa</text:p>
          </table:table-cell>
          <table:table-cell office:value-type="string" office:string-value="https://github.com/unfoldingWord/obs-pa">
            <text:p>https://github.com/unfoldingWord/obs-pa</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8Z">
            <text:p>2016-01-14T23:51:08Z</text:p>
          </table:table-cell>
          <table:table-cell office:value-type="string" office:string-value="2016-01-14T23:51:07Z">
            <text:p>2016-01-14T23:51:07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pa">
            <text:p>unfoldingWord/obs-pa</text:p>
          </table:table-cell>
          <table:table-cell office:value-type="string" office:string-value="https://github.com/unfoldingWord/obs-pa">
            <text:p>https://github.com/unfoldingWord/obs-pa</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pa">
            <text:p>obs-pa</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pdf">
            <text:p>unfoldingWord/obs-pdf</text:p>
          </table:table-cell>
          <table:table-cell office:value-type="string" office:string-value="https://github.com/unfoldingWord/obs-pdf">
            <text:p>https://github.com/unfoldingWord/obs-pdf</text:p>
          </table:table-cell>
          <table:table-cell office:value-type="string" office:string-value="TeX">
            <text:p>TeX</text:p>
          </table:table-cell>
          <table:table-cell office:value-type="string" office:string-value="True">
            <text:p>True</text:p>
          </table:table-cell>
          <table:table-cell office:value-type="string" office:string-value="False">
            <text:p>False</text:p>
          </table:table-cell>
          <table:table-cell office:value-type="string" office:string-value="2024-06-05T21:37:29Z">
            <text:p>2024-06-05T21:37:29Z</text:p>
          </table:table-cell>
          <table:table-cell office:value-type="string" office:string-value="2020-07-01T09:33:35Z">
            <text:p>2020-07-01T09:33:35Z</text:p>
          </table:table-cell>
          <table:table-cell office:value-type="string" office:string-value="">
            <text:p/>
          </table:table-cell>
          <table:table-cell office:value-type="string" office:string-value="">
            <text:p/>
          </table:table-cell>
          <table:table-cell office:value-type="string" office:string-value="['RobH123', 'phillip-hopper', 'Phil Hopper']">
            <text:p>['RobH123', 'phillip-hopper', 'Phil Hopper']</text:p>
          </table:table-cell>
          <table:table-cell office:value-type="string" office:string-value="5">
            <text:p>5</text:p>
          </table:table-cell>
          <table:table-cell office:value-type="string" office:string-value="0">
            <text:p>0</text:p>
          </table:table-cell>
          <table:table-cell office:value-type="string" office:string-value="127">
            <text:p>1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09T09:10:04Z">
            <text:p>2025-09-09T09:10:04Z</text:p>
          </table:table-cell>
          <table:table-cell office:value-type="string" office:string-value="unfoldingWord/obs-pdf">
            <text:p>unfoldingWord/obs-pdf</text:p>
          </table:table-cell>
          <table:table-cell office:value-type="string" office:string-value="https://github.com/unfoldingWord/obs-pdf">
            <text:p>https://github.com/unfoldingWord/obs-pdf</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pdf">
            <text:p>obs-pdf</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pt-br">
            <text:p>unfoldingWord/obs-pt-br</text:p>
          </table:table-cell>
          <table:table-cell office:value-type="string" office:string-value="https://github.com/unfoldingWord/obs-pt-br">
            <text:p>https://github.com/unfoldingWord/obs-pt-b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3Z">
            <text:p>2016-01-14T23:50:43Z</text:p>
          </table:table-cell>
          <table:table-cell office:value-type="string" office:string-value="2016-01-14T23:50:41Z">
            <text:p>2016-01-14T23:50:41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pt-br">
            <text:p>unfoldingWord/obs-pt-br</text:p>
          </table:table-cell>
          <table:table-cell office:value-type="string" office:string-value="https://github.com/unfoldingWord/obs-pt-br">
            <text:p>https://github.com/unfoldingWord/obs-pt-b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pt-br">
            <text:p>obs-pt-b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ru">
            <text:p>unfoldingWord/obs-ru</text:p>
          </table:table-cell>
          <table:table-cell office:value-type="string" office:string-value="https://github.com/unfoldingWord/obs-ru">
            <text:p>https://github.com/unfoldingWord/obs-ru</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2T17:49:13Z">
            <text:p>2016-05-12T17:49:13Z</text:p>
          </table:table-cell>
          <table:table-cell office:value-type="string" office:string-value="2016-05-12T17:49:07Z">
            <text:p>2016-05-12T17:49:07Z</text:p>
          </table:table-cell>
          <table:table-cell office:value-type="string" office:string-value="">
            <text:p/>
          </table:table-cell>
          <table:table-cell office:value-type="string" office:string-value="">
            <text:p/>
          </table:table-cell>
          <table:table-cell office:value-type="string" office:string-value="['root', 'Jesse A. Griffin', 'phillip-hopper']">
            <text:p>['root', 'Jesse A. Griffin', 'phillip-hopper']</text:p>
          </table:table-cell>
          <table:table-cell office:value-type="string" office:string-value="0">
            <text:p>0</text:p>
          </table:table-cell>
          <table:table-cell office:value-type="string" office:string-value="0">
            <text:p>0</text:p>
          </table:table-cell>
          <table:table-cell office:value-type="string" office:string-value="54">
            <text:p>5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8Z">
            <text:p>2023-01-28T16:58:28Z</text:p>
          </table:table-cell>
          <table:table-cell office:value-type="string" office:string-value="unfoldingWord/obs-ru">
            <text:p>unfoldingWord/obs-ru</text:p>
          </table:table-cell>
          <table:table-cell office:value-type="string" office:string-value="https://github.com/unfoldingWord/obs-ru">
            <text:p>https://github.com/unfoldingWord/obs-ru</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ru">
            <text:p>obs-ru</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sgj">
            <text:p>unfoldingWord/obs-sgj</text:p>
          </table:table-cell>
          <table:table-cell office:value-type="string" office:string-value="https://github.com/unfoldingWord/obs-sgj">
            <text:p>https://github.com/unfoldingWord/obs-sgj</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8Z">
            <text:p>2016-01-14T23:50:58Z</text:p>
          </table:table-cell>
          <table:table-cell office:value-type="string" office:string-value="2016-01-14T23:50:56Z">
            <text:p>2016-01-14T23:50:56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7:00:18Z">
            <text:p>2023-01-28T17:00:18Z</text:p>
          </table:table-cell>
          <table:table-cell office:value-type="string" office:string-value="unfoldingWord/obs-sgj">
            <text:p>unfoldingWord/obs-sgj</text:p>
          </table:table-cell>
          <table:table-cell office:value-type="string" office:string-value="https://github.com/unfoldingWord/obs-sgj">
            <text:p>https://github.com/unfoldingWord/obs-sgj</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sgj">
            <text:p>obs-sgj</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tdj">
            <text:p>unfoldingWord/obs-tdj</text:p>
          </table:table-cell>
          <table:table-cell office:value-type="string" office:string-value="https://github.com/unfoldingWord/obs-tdj">
            <text:p>https://github.com/unfoldingWord/obs-tdj</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14T21:55:14Z">
            <text:p>2017-03-14T21:55:14Z</text:p>
          </table:table-cell>
          <table:table-cell office:value-type="string" office:string-value="2017-03-14T21:55:02Z">
            <text:p>2017-03-14T21:55:02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9Z">
            <text:p>2023-01-28T16:58:19Z</text:p>
          </table:table-cell>
          <table:table-cell office:value-type="string" office:string-value="unfoldingWord/obs-tdj">
            <text:p>unfoldingWord/obs-tdj</text:p>
          </table:table-cell>
          <table:table-cell office:value-type="string" office:string-value="https://github.com/unfoldingWord/obs-tdj">
            <text:p>https://github.com/unfoldingWord/obs-tdj</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dj">
            <text:p>obs-tdj</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tl">
            <text:p>unfoldingWord/obs-tl</text:p>
          </table:table-cell>
          <table:table-cell office:value-type="string" office:string-value="https://github.com/unfoldingWord/obs-tl">
            <text:p>https://github.com/unfoldingWord/obs-tl</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7T15:40:18Z">
            <text:p>2016-07-27T15:40:1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9Z">
            <text:p>2023-01-28T16:58:19Z</text:p>
          </table:table-cell>
          <table:table-cell office:value-type="string" office:string-value="unfoldingWord/obs-tl">
            <text:p>unfoldingWord/obs-tl</text:p>
          </table:table-cell>
          <table:table-cell office:value-type="string" office:string-value="https://github.com/unfoldingWord/obs-tl">
            <text:p>https://github.com/unfoldingWord/obs-tl</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l">
            <text:p>obs-t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tpi">
            <text:p>unfoldingWord/obs-tpi</text:p>
          </table:table-cell>
          <table:table-cell office:value-type="string" office:string-value="https://github.com/unfoldingWord/obs-tpi">
            <text:p>https://github.com/unfoldingWord/obs-tpi</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0Z">
            <text:p>2016-01-14T23:51:00Z</text:p>
          </table:table-cell>
          <table:table-cell office:value-type="string" office:string-value="2016-01-14T23:50:58Z">
            <text:p>2016-01-14T23:50:58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tpi">
            <text:p>unfoldingWord/obs-tpi</text:p>
          </table:table-cell>
          <table:table-cell office:value-type="string" office:string-value="https://github.com/unfoldingWord/obs-tpi">
            <text:p>https://github.com/unfoldingWord/obs-tpi</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pi">
            <text:p>obs-tp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tr">
            <text:p>unfoldingWord/obs-tr</text:p>
          </table:table-cell>
          <table:table-cell office:value-type="string" office:string-value="https://github.com/unfoldingWord/obs-tr">
            <text:p>https://github.com/unfoldingWord/obs-t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24T15:53:38Z">
            <text:p>2016-05-24T15:53:38Z</text:p>
          </table:table-cell>
          <table:table-cell office:value-type="string" office:string-value="2016-05-24T15:53:02Z">
            <text:p>2016-05-24T15:53:02Z</text:p>
          </table:table-cell>
          <table:table-cell office:value-type="string" office:string-value="">
            <text:p/>
          </table:table-cell>
          <table:table-cell office:value-type="string" office:string-value="">
            <text:p/>
          </table:table-cell>
          <table:table-cell office:value-type="string" office:string-value="['root', 'phillip-hopper']">
            <text:p>['root', 'phillip-hopper']</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tr">
            <text:p>unfoldingWord/obs-tr</text:p>
          </table:table-cell>
          <table:table-cell office:value-type="string" office:string-value="https://github.com/unfoldingWord/obs-tr">
            <text:p>https://github.com/unfoldingWord/obs-t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r">
            <text:p>obs-t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Translation-App">
            <text:p>unfoldingWord-dev/OBS-Translation-App</text:p>
          </table:table-cell>
          <table:table-cell office:value-type="string" office:string-value="https://github.com/unfoldingWord-dev/OBS-Translation-App">
            <text:p>https://github.com/unfoldingWord-dev/OBS-Translation-App</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6-08-31T14:37:46Z">
            <text:p>2016-08-31T14:37:46Z</text:p>
          </table:table-cell>
          <table:table-cell office:value-type="string" office:string-value="2014-06-02T15:19:24Z">
            <text:p>2014-06-02T15:19:24Z</text:p>
          </table:table-cell>
          <table:table-cell office:value-type="string" office:string-value="">
            <text:p/>
          </table:table-cell>
          <table:table-cell office:value-type="string" office:string-value="">
            <text:p/>
          </table:table-cell>
          <table:table-cell office:value-type="string" office:string-value="['MBoronNeotreks', 'jag3773', 'Tim', 'Distant Shores Media', 'yvonnel098']">
            <text:p>['MBoronNeotreks', 'jag3773', 'Tim', 'Distant Shores Media', 'yvonnel098']</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OBS-Translation-App">
            <text:p>unfoldingWord-dev/OBS-Translation-App</text:p>
          </table:table-cell>
          <table:table-cell office:value-type="string" office:string-value="https://github.com/unfoldingWord-dev/OBS-Translation-App">
            <text:p>https://github.com/unfoldingWord-dev/OBS-Translation-App</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ranslation-App">
            <text:p>OBS-Translation-A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ur">
            <text:p>unfoldingWord/obs-ur</text:p>
          </table:table-cell>
          <table:table-cell office:value-type="string" office:string-value="https://github.com/unfoldingWord/obs-ur">
            <text:p>https://github.com/unfoldingWord/obs-u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26Z">
            <text:p>2016-01-22T20:24:26Z</text:p>
          </table:table-cell>
          <table:table-cell office:value-type="string" office:string-value="2016-01-22T20:24:25Z">
            <text:p>2016-01-22T20:24:25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2Z">
            <text:p>2023-01-28T16:58:22Z</text:p>
          </table:table-cell>
          <table:table-cell office:value-type="string" office:string-value="unfoldingWord/obs-ur">
            <text:p>unfoldingWord/obs-ur</text:p>
          </table:table-cell>
          <table:table-cell office:value-type="string" office:string-value="https://github.com/unfoldingWord/obs-ur">
            <text:p>https://github.com/unfoldingWord/obs-u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ur">
            <text:p>obs-u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vi">
            <text:p>unfoldingWord/obs-vi</text:p>
          </table:table-cell>
          <table:table-cell office:value-type="string" office:string-value="https://github.com/unfoldingWord/obs-vi">
            <text:p>https://github.com/unfoldingWord/obs-vi</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3Z">
            <text:p>2016-01-14T23:51:23Z</text:p>
          </table:table-cell>
          <table:table-cell office:value-type="string" office:string-value="2016-01-14T23:51:21Z">
            <text:p>2016-01-14T23:51:21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vi">
            <text:p>unfoldingWord/obs-vi</text:p>
          </table:table-cell>
          <table:table-cell office:value-type="string" office:string-value="https://github.com/unfoldingWord/obs-vi">
            <text:p>https://github.com/unfoldingWord/obs-vi</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vi">
            <text:p>obs-v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ld-tx-manager">
            <text:p>unfoldingWord-dev/old-tx-manager</text:p>
          </table:table-cell>
          <table:table-cell office:value-type="string" office:string-value="https://github.com/unfoldingWord-dev/old-tx-manager">
            <text:p>https://github.com/unfoldingWord-dev/old-tx-manager</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0-20T01:23:03Z">
            <text:p>2016-10-20T01:23:03Z</text:p>
          </table:table-cell>
          <table:table-cell office:value-type="string" office:string-value="2016-10-20T01:23:03Z">
            <text:p>2016-10-20T01:23:03Z</text:p>
          </table:table-cell>
          <table:table-cell office:value-type="string" office:string-value="">
            <text:p/>
          </table:table-cell>
          <table:table-cell office:value-type="string" office:string-value="">
            <text:p/>
          </table:table-cell>
          <table:table-cell office:value-type="string" office:string-value="['Richard Mahn', 'ethantkoenig', 'Phil Hopper']">
            <text:p>['Richard Mahn', 'ethantkoenig', 'Phil Hopper']</text:p>
          </table:table-cell>
          <table:table-cell office:value-type="string" office:string-value="1">
            <text:p>1</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old-tx-manager">
            <text:p>unfoldingWord-dev/old-tx-manager</text:p>
          </table:table-cell>
          <table:table-cell office:value-type="string" office:string-value="https://github.com/unfoldingWord-dev/old-tx-manager">
            <text:p>https://github.com/unfoldingWord-dev/old-tx-manag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ld-tx-manager">
            <text:p>old-tx-mana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pen-components-hackathon-website">
            <text:p>unfoldingWord/open-components-hackathon-website</text:p>
          </table:table-cell>
          <table:table-cell office:value-type="string" office:string-value="https://github.com/unfoldingWord/open-components-hackathon-website">
            <text:p>https://github.com/unfoldingWord/open-components-hackathon-website</text:p>
          </table:table-cell>
          <table:table-cell office:value-type="string" office:string-value="TypeScript">
            <text:p>TypeScript</text:p>
          </table:table-cell>
          <table:table-cell office:value-type="string" office:string-value="True">
            <text:p>True</text:p>
          </table:table-cell>
          <table:table-cell office:value-type="string" office:string-value="True">
            <text:p>True</text:p>
          </table:table-cell>
          <table:table-cell office:value-type="string" office:string-value="2022-01-05T02:52:31Z">
            <text:p>2022-01-05T02:52:31Z</text:p>
          </table:table-cell>
          <table:table-cell office:value-type="string" office:string-value="2022-01-05T02:52:31Z">
            <text:p>2022-01-05T02:52:31Z</text:p>
          </table:table-cell>
          <table:table-cell office:value-type="string" office:string-value="">
            <text:p/>
          </table:table-cell>
          <table:table-cell office:value-type="string" office:string-value="vercel/virtual-event-starter-kit">
            <text:p>vercel/virtual-event-starter-kit</text:p>
          </table:table-cell>
          <table:table-cell office:value-type="string" office:string-value="['mannycolon', 'chibicode', 'leerob', 'goncy', 'levimykel', 'fofiu', 'Deep-Codes', 'enesakar', 'erikras', 'irahopkinson', 'marionott', 'matheuss', 'richmahn', 'hugefunwoo', 'lisilinhart']">
            <text:p>['mannycolon', 'chibicode', 'leerob', 'goncy', 'levimykel', 'fofiu', 'Deep-Codes', 'enesakar', 'erikras', 'irahopkinson', 'marionott', 'matheuss', 'richmahn', 'hugefunwoo', 'lisilinhart']</text:p>
          </table:table-cell>
          <table:table-cell office:value-type="string" office:string-value="4">
            <text:p>4</text:p>
          </table:table-cell>
          <table:table-cell office:value-type="string" office:string-value="0">
            <text:p>0</text:p>
          </table:table-cell>
          <table:table-cell office:value-type="string" office:string-value="130">
            <text:p>13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virtual-event-starter-kit">
            <text:p>virtual-event-starter-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5-22T10:11:28Z">
            <text:p>2024-05-22T10:11:28Z</text:p>
          </table:table-cell>
          <table:table-cell office:value-type="string" office:string-value="unfoldingWord/open-components-hackathon-website">
            <text:p>unfoldingWord/open-components-hackathon-website</text:p>
          </table:table-cell>
          <table:table-cell office:value-type="string" office:string-value="https://github.com/unfoldingWord/open-components-hackathon-website">
            <text:p>https://github.com/unfoldingWord/open-components-hackathon-websit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pen-components-hackathon-website">
            <text:p>open-components-hackathon-webs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rthography-app-BE">
            <text:p>unfoldingWord/orthography-app-BE</text:p>
          </table:table-cell>
          <table:table-cell office:value-type="string" office:string-value="https://github.com/unfoldingWord/orthography-app-BE">
            <text:p>https://github.com/unfoldingWord/orthography-app-BE</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8-06T11:57:29Z">
            <text:p>2024-08-06T11:57:29Z</text:p>
          </table:table-cell>
          <table:table-cell office:value-type="string" office:string-value="2024-08-06T11:57:27Z">
            <text:p>2024-08-06T11:57:27Z</text:p>
          </table:table-cell>
          <table:table-cell office:value-type="string" office:string-value="">
            <text:p/>
          </table:table-cell>
          <table:table-cell office:value-type="string" office:string-value="">
            <text:p/>
          </table:table-cell>
          <table:table-cell office:value-type="string" office:string-value="['yakob-aleksandrovich', 'Stephen0272']">
            <text:p>['yakob-aleksandrovich', 'Stephen0272']</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rthoapp_poc">
            <text:p>orthoapp_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16T08:07:38Z">
            <text:p>2026-04-16T08:07:38Z</text:p>
          </table:table-cell>
          <table:table-cell office:value-type="string" office:string-value="unfoldingWord/orthography-app-BE">
            <text:p>unfoldingWord/orthography-app-BE</text:p>
          </table:table-cell>
          <table:table-cell office:value-type="string" office:string-value="https://github.com/unfoldingWord/orthography-app-BE">
            <text:p>https://github.com/unfoldingWord/orthography-app-B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rthography-app-BE">
            <text:p>orthography-app-B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rthography-app-FE">
            <text:p>unfoldingWord/orthography-app-FE</text:p>
          </table:table-cell>
          <table:table-cell office:value-type="string" office:string-value="https://github.com/unfoldingWord/orthography-app-FE">
            <text:p>https://github.com/unfoldingWord/orthography-app-FE</text:p>
          </table:table-cell>
          <table:table-cell office:value-type="string" office:string-value="Dart">
            <text:p>Dart</text:p>
          </table:table-cell>
          <table:table-cell office:value-type="string" office:string-value="True">
            <text:p>True</text:p>
          </table:table-cell>
          <table:table-cell office:value-type="string" office:string-value="False">
            <text:p>False</text:p>
          </table:table-cell>
          <table:table-cell office:value-type="string" office:string-value="2024-06-05T10:56:02Z">
            <text:p>2024-06-05T10:56:02Z</text:p>
          </table:table-cell>
          <table:table-cell office:value-type="string" office:string-value="2024-06-05T10:55:54Z">
            <text:p>2024-06-05T10:55:54Z</text:p>
          </table:table-cell>
          <table:table-cell office:value-type="string" office:string-value="">
            <text:p/>
          </table:table-cell>
          <table:table-cell office:value-type="string" office:string-value="">
            <text:p/>
          </table:table-cell>
          <table:table-cell office:value-type="string" office:string-value="Stephen0272">
            <text:p>Stephen0272</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16T08:08:11Z">
            <text:p>2026-04-16T08:08:11Z</text:p>
          </table:table-cell>
          <table:table-cell office:value-type="string" office:string-value="unfoldingWord/orthography-app-FE">
            <text:p>unfoldingWord/orthography-app-FE</text:p>
          </table:table-cell>
          <table:table-cell office:value-type="string" office:string-value="https://github.com/unfoldingWord/orthography-app-FE">
            <text:p>https://github.com/unfoldingWord/orthography-app-F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rthography-app-FE">
            <text:p>orthography-app-F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proposed_changes_module">
            <text:p>unfoldingWord-dev/proposed_changes_module</text:p>
          </table:table-cell>
          <table:table-cell office:value-type="string" office:string-value="https://github.com/unfoldingWord-dev/proposed_changes_module">
            <text:p>https://github.com/unfoldingWord-dev/proposed_changes_module</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13Z">
            <text:p>2017-04-13T00:19:13Z</text:p>
          </table:table-cell>
          <table:table-cell office:value-type="string" office:string-value="2017-03-13T15:22:06Z">
            <text:p>2017-03-13T15:22:06Z</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33">
            <text:p>3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roposedChanges">
            <text:p>ProposedChan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9Z">
            <text:p>2023-01-28T16:19:09Z</text:p>
          </table:table-cell>
          <table:table-cell office:value-type="string" office:string-value="unfoldingWord-dev/proposed_changes_module">
            <text:p>unfoldingWord-dev/proposed_changes_module</text:p>
          </table:table-cell>
          <table:table-cell office:value-type="string" office:string-value="https://github.com/unfoldingWord-dev/proposed_changes_module">
            <text:p>https://github.com/unfoldingWord-dev/proposed_changes_modul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proposed_changes_module">
            <text:p>proposed_changes_modul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pub.distantshores.org">
            <text:p>unfoldingWord-dev/pub.distantshores.org</text:p>
          </table:table-cell>
          <table:table-cell office:value-type="string" office:string-value="https://github.com/unfoldingWord-dev/pub.distantshores.org">
            <text:p>https://github.com/unfoldingWord-dev/pub.distantshores.org</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7-10-01T22:50:31Z">
            <text:p>2017-10-01T22:50:31Z</text:p>
          </table:table-cell>
          <table:table-cell office:value-type="string" office:string-value="2017-10-01T22:48:41Z">
            <text:p>2017-10-01T22:48:41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9Z">
            <text:p>2023-01-28T16:19:09Z</text:p>
          </table:table-cell>
          <table:table-cell office:value-type="string" office:string-value="unfoldingWord-dev/pub.distantshores.org">
            <text:p>unfoldingWord-dev/pub.distantshores.org</text:p>
          </table:table-cell>
          <table:table-cell office:value-type="string" office:string-value="https://github.com/unfoldingWord-dev/pub.distantshores.org">
            <text:p>https://github.com/unfoldingWord-dev/pub.distantshores.org</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pub.distantshores.org">
            <text:p>pub.distantshores.org</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ResourceChecker">
            <text:p>unfoldingWord-dev/ResourceChecker</text:p>
          </table:table-cell>
          <table:table-cell office:value-type="string" office:string-value="https://github.com/unfoldingWord-dev/ResourceChecker">
            <text:p>https://github.com/unfoldingWord-dev/ResourceChecker</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0-05-19T19:57:08Z">
            <text:p>2020-05-19T19:57:08Z</text:p>
          </table:table-cell>
          <table:table-cell office:value-type="string" office:string-value="2020-05-19T19:56:49Z">
            <text:p>2020-05-19T19:56:49Z</text:p>
          </table:table-cell>
          <table:table-cell office:value-type="string" office:string-value="">
            <text:p/>
          </table:table-cell>
          <table:table-cell office:value-type="string" office:string-value="unfoldingWord/uw-word-count">
            <text:p>unfoldingWord/uw-word-count</text:p>
          </table:table-cell>
          <table:table-cell office:value-type="string" office:string-value="['mandolyte', 'RobH123', 'jag3773']">
            <text:p>['mandolyte', 'RobH123', 'jag3773']</text:p>
          </table:table-cell>
          <table:table-cell office:value-type="string" office:string-value="0">
            <text:p>0</text:p>
          </table:table-cell>
          <table:table-cell office:value-type="string" office:string-value="0">
            <text:p>0</text:p>
          </table:table-cell>
          <table:table-cell office:value-type="string" office:string-value="64">
            <text:p>6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checker">
            <text:p>resource-checker</text:p>
          </table:table-cell>
          <table:table-cell office:value-type="string" office:string-value="https://www.npmjs.com/package/resource-checker">
            <text:p>https://www.npmjs.com/package/resource-checker</text:p>
          </table:table-cell>
          <table:table-cell office:value-type="string" office:string-value="False">
            <text:p>False</text:p>
          </table:table-cell>
          <table:table-cell office:value-type="string" office:string-value="133">
            <text:p>133</text:p>
          </table:table-cell>
          <table:table-cell office:value-type="string" office:string-value="2020-03-31T01:31:18.653Z">
            <text:p>2020-03-31T01:31:18.653Z</text:p>
          </table:table-cell>
          <table:table-cell office:value-type="string" office:string-value="">
            <text:p/>
          </table:table-cell>
          <table:table-cell office:value-type="string" office:string-value="['usfm-js', 'gitea-react-toolkit', 'scripture-resources-rcl', 'markdown-translatable']">
            <text:p>['usfm-js', 'gitea-react-toolkit', 'scripture-resources-rcl', 'markdown-translatable']</text:p>
          </table:table-cell>
          <table:table-cell office:value-type="string" office:string-value="2023-01-28T14:29:30Z">
            <text:p>2023-01-28T14:29:30Z</text:p>
          </table:table-cell>
          <table:table-cell office:value-type="string" office:string-value="unfoldingWord-dev/ResourceChecker">
            <text:p>unfoldingWord-dev/ResourceChecker</text:p>
          </table:table-cell>
          <table:table-cell office:value-type="string" office:string-value="https://github.com/unfoldingWord-dev/ResourceChecker">
            <text:p>https://github.com/unfoldingWord-dev/ResourceCheck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ResourceChecker">
            <text:p>ResourceChecker</text:p>
          </table:table-cell>
          <table:table-cell office:value-type="string" office:string-value="unfoldingWord-dev">
            <text:p>unfoldingWord-dev</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Old Project rolled into tc-ui-toolkit">
            <text:p>Old Project rolled into tc-ui-toolkit</text:p>
          </table:table-cell>
          <table:table-cell office:value-type="string" office:string-value="unfoldingWord-dev/ScripturePane">
            <text:p>unfoldingWord-dev/ScripturePane</text:p>
          </table:table-cell>
          <table:table-cell office:value-type="string" office:string-value="https://github.com/unfoldingWord-dev/ScripturePane">
            <text:p>https://github.com/unfoldingWord-dev/ScripturePane</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7T19:59:54Z">
            <text:p>2018-05-17T19:59:54Z</text:p>
          </table:table-cell>
          <table:table-cell office:value-type="string" office:string-value="2018-05-17T19:59:53Z">
            <text:p>2018-05-17T19:59:53Z</text:p>
          </table:table-cell>
          <table:table-cell office:value-type="string" office:string-value="">
            <text:p/>
          </table:table-cell>
          <table:table-cell office:value-type="string" office:string-value="">
            <text:p/>
          </table:table-cell>
          <table:table-cell office:value-type="string" office:string-value="['mannycolon', 'PhotoNomad0', 'da1nerd', 'klappy', 'RoyalSix', 'EllDoubleYew', 'cdwhitfield73', 'Sterling (Jay) Scott', 'ihoegen', 'richmahn', 'bspidel', 'Richard Mahn']">
            <text:p>['mannycolon', 'PhotoNomad0', 'da1nerd', 'klappy', 'RoyalSix', 'EllDoubleYew', 'cdwhitfield73', 'Sterling (Jay) Scott', 'ihoegen', 'richmahn', 'bspidel', 'Richard Mahn']</text:p>
          </table:table-cell>
          <table:table-cell office:value-type="string" office:string-value="0">
            <text:p>0</text:p>
          </table:table-cell>
          <table:table-cell office:value-type="string" office:string-value="0">
            <text:p>0</text:p>
          </table:table-cell>
          <table:table-cell office:value-type="string" office:string-value="450">
            <text:p>45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Pane">
            <text:p>Scripture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c-tool', 'usfm-js', 'wordmap-lexer']">
            <text:p>['string-punctuation-tokenizer', 'tc-tool', 'usfm-js', 'wordmap-lexer']</text:p>
          </table:table-cell>
          <table:table-cell office:value-type="string" office:string-value="2026-06-18T18:23:13Z">
            <text:p>2026-06-18T18:23:13Z</text:p>
          </table:table-cell>
          <table:table-cell office:value-type="string" office:string-value="unfoldingWord-dev/ScripturePane">
            <text:p>unfoldingWord-dev/ScripturePane</text:p>
          </table:table-cell>
          <table:table-cell office:value-type="string" office:string-value="https://github.com/unfoldingWord-dev/ScripturePane">
            <text:p>https://github.com/unfoldingWord-dev/ScripturePan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ScripturePane">
            <text:p>ScripturePan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submachine">
            <text:p>unfoldingWord-dev/submachine</text:p>
          </table:table-cell>
          <table:table-cell office:value-type="string" office:string-value="https://github.com/unfoldingWord-dev/submachine">
            <text:p>https://github.com/unfoldingWord-dev/submachine</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5-02-17T18:57:00Z">
            <text:p>2025-02-17T18:57:00Z</text:p>
          </table:table-cell>
          <table:table-cell office:value-type="string" office:string-value="2025-02-17T18:56:56Z">
            <text:p>2025-02-17T18:56:56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28T15:18:59Z">
            <text:p>2025-10-28T15:18:59Z</text:p>
          </table:table-cell>
          <table:table-cell office:value-type="string" office:string-value="unfoldingWord-dev/submachine">
            <text:p>unfoldingWord-dev/submachine</text:p>
          </table:table-cell>
          <table:table-cell office:value-type="string" office:string-value="https://github.com/unfoldingWord-dev/submachine">
            <text:p>https://github.com/unfoldingWord-dev/submachin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submachine">
            <text:p>submachine</text:p>
          </table:table-cell>
          <table:table-cell office:value-type="string" office:string-value="unfoldingWord-dev">
            <text:p>unfoldingWord-dev</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c-tsv-converter">
            <text:p>unfoldingWord/tc-tsv-converter</text:p>
          </table:table-cell>
          <table:table-cell office:value-type="string" office:string-value="https://github.com/unfoldingWord/tc-tsv-converter">
            <text:p>https://github.com/unfoldingWord/tc-tsv-converter</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6-06-17T19:19:57Z">
            <text:p>2026-06-17T19:19:57Z</text:p>
          </table:table-cell>
          <table:table-cell office:value-type="string" office:string-value="2026-06-17T19:19:57Z">
            <text:p>2026-06-17T19:19:5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converter">
            <text:p>tsv-conver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19:20:15Z">
            <text:p>2026-06-17T19:20:15Z</text:p>
          </table:table-cell>
          <table:table-cell office:value-type="string" office:string-value="unfoldingWord/tc-tsv-converter">
            <text:p>unfoldingWord/tc-tsv-converter</text:p>
          </table:table-cell>
          <table:table-cell office:value-type="string" office:string-value="https://github.com/unfoldingWord/tc-tsv-converter">
            <text:p>https://github.com/unfoldingWord/tc-tsv-convert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tsv-converter">
            <text:p>tc-tsv-conver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C_Resources">
            <text:p>unfoldingWord-dev/tC_Resources</text:p>
          </table:table-cell>
          <table:table-cell office:value-type="string" office:string-value="https://github.com/unfoldingWord-dev/tC_Resources">
            <text:p>https://github.com/unfoldingWord-dev/tC_Resources</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9-09T10:57:36Z">
            <text:p>2018-09-09T10:57:36Z</text:p>
          </table:table-cell>
          <table:table-cell office:value-type="string" office:string-value="2018-08-06T15:39:55Z">
            <text:p>2018-08-06T15:39:55Z</text:p>
          </table:table-cell>
          <table:table-cell office:value-type="string" office:string-value="">
            <text:p/>
          </table:table-cell>
          <table:table-cell office:value-type="string" office:string-value="">
            <text:p/>
          </table:table-cell>
          <table:table-cell office:value-type="string" office:string-value="['PhotoNomad0', 'richmahn', 'mannycolon', 'Richard Mahn', 'klappy', 'RoyalSix', 'da1nerd', 'Sterling (Jay) Scott']">
            <text:p>['PhotoNomad0', 'richmahn', 'mannycolon', 'Richard Mahn', 'klappy', 'RoyalSix', 'da1nerd', 'Sterling (Jay) Scott']</text:p>
          </table:table-cell>
          <table:table-cell office:value-type="string" office:string-value="0">
            <text:p>0</text:p>
          </table:table-cell>
          <table:table-cell office:value-type="string" office:string-value="0">
            <text:p>0</text:p>
          </table:table-cell>
          <table:table-cell office:value-type="string" office:string-value="183">
            <text:p>18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_resources">
            <text:p>tc_resourc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3-01-28T16:35:42Z">
            <text:p>2023-01-28T16:35:42Z</text:p>
          </table:table-cell>
          <table:table-cell office:value-type="string" office:string-value="unfoldingWord-dev/tC_Resources">
            <text:p>unfoldingWord-dev/tC_Resources</text:p>
          </table:table-cell>
          <table:table-cell office:value-type="string" office:string-value="https://github.com/unfoldingWord-dev/tC_Resources">
            <text:p>https://github.com/unfoldingWord-dev/tC_Resource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_Resources">
            <text:p>tC_Resource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d">
            <text:p>unfoldingWord-box3/td</text:p>
          </table:table-cell>
          <table:table-cell office:value-type="string" office:string-value="https://github.com/unfoldingWord-box3/td">
            <text:p>https://github.com/unfoldingWord-box3/t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9-09-17T14:39:19Z">
            <text:p>2019-09-17T14:39:19Z</text:p>
          </table:table-cell>
          <table:table-cell office:value-type="string" office:string-value="2019-09-17T14:39:18Z">
            <text:p>2019-09-17T14:39:18Z</text:p>
          </table:table-cell>
          <table:table-cell office:value-type="string" office:string-value="">
            <text:p/>
          </table:table-cell>
          <table:table-cell office:value-type="string" office:string-value="">
            <text:p/>
          </table:table-cell>
          <table:table-cell office:value-type="string" office:string-value="['mandolyte', 'jag3773', 'Tim J']">
            <text:p>['mandolyte', 'jag3773', 'Tim J']</text:p>
          </table:table-cell>
          <table:table-cell office:value-type="string" office:string-value="20">
            <text:p>20</text:p>
          </table:table-cell>
          <table:table-cell office:value-type="string" office:string-value="0">
            <text:p>0</text:p>
          </table:table-cell>
          <table:table-cell office:value-type="string" office:string-value="34">
            <text:p>3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2-05T16:03:25Z">
            <text:p>2023-12-05T16:03:25Z</text:p>
          </table:table-cell>
          <table:table-cell office:value-type="string" office:string-value="unfoldingWord-box3/td">
            <text:p>unfoldingWord-box3/td</text:p>
          </table:table-cell>
          <table:table-cell office:value-type="string" office:string-value="https://github.com/unfoldingWord-box3/td">
            <text:p>https://github.com/unfoldingWord-box3/t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d">
            <text:p>td</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heCompassionateFatherApp">
            <text:p>unfoldingWord-dev/TheCompassionateFatherApp</text:p>
          </table:table-cell>
          <table:table-cell office:value-type="string" office:string-value="https://github.com/unfoldingWord-dev/TheCompassionateFatherApp">
            <text:p>https://github.com/unfoldingWord-dev/TheCompassionateFatherApp</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1-04-27T22:43:14Z">
            <text:p>2011-04-27T22:43:14Z</text:p>
          </table:table-cell>
          <table:table-cell office:value-type="string" office:string-value="2011-04-27T22:42:54Z">
            <text:p>2011-04-27T22:42:54Z</text:p>
          </table:table-cell>
          <table:table-cell office:value-type="string" office:string-value="">
            <text:p/>
          </table:table-cell>
          <table:table-cell office:value-type="string" office:string-value="">
            <text:p/>
          </table:table-cell>
          <table:table-cell office:value-type="string" office:string-value="['DSM', 'DSM Mobile', 'Tim Jore']">
            <text:p>['DSM', 'DSM Mobile', 'Tim Jore']</text:p>
          </table:table-cell>
          <table:table-cell office:value-type="string" office:string-value="1">
            <text:p>1</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TheCompassionateFatherApp">
            <text:p>unfoldingWord-dev/TheCompassionateFatherApp</text:p>
          </table:table-cell>
          <table:table-cell office:value-type="string" office:string-value="https://github.com/unfoldingWord-dev/TheCompassionateFatherApp">
            <text:p>https://github.com/unfoldingWord-dev/TheCompassionateFatherApp</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heCompassionateFatherApp">
            <text:p>TheCompassionateFatherA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_academy">
            <text:p>unfoldingWord-dev/translation_academy</text:p>
          </table:table-cell>
          <table:table-cell office:value-type="string" office:string-value="https://github.com/unfoldingWord-dev/translation_academy">
            <text:p>https://github.com/unfoldingWord-dev/translation_academy</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24Z">
            <text:p>2017-04-13T00:19:24Z</text:p>
          </table:table-cell>
          <table:table-cell office:value-type="string" office:string-value="2017-03-14T20:52:36Z">
            <text:p>2017-03-14T20:52:36Z</text:p>
          </table:table-cell>
          <table:table-cell office:value-type="string" office:string-value="">
            <text:p/>
          </table:table-cell>
          <table:table-cell office:value-type="string" office:string-value="">
            <text:p/>
          </table:table-cell>
          <table:table-cell office:value-type="string" office:string-value="['ihoegen', 'Sterling (Jay) Scott', 'klappy']">
            <text:p>['ihoegen', 'Sterling (Jay) Scott', 'klappy']</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Academy">
            <text:p>TranslationAcadem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9Z">
            <text:p>2023-01-28T16:19:09Z</text:p>
          </table:table-cell>
          <table:table-cell office:value-type="string" office:string-value="unfoldingWord-dev/translation_academy">
            <text:p>unfoldingWord-dev/translation_academy</text:p>
          </table:table-cell>
          <table:table-cell office:value-type="string" office:string-value="https://github.com/unfoldingWord-dev/translation_academy">
            <text:p>https://github.com/unfoldingWord-dev/translation_academy</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_academy">
            <text:p>translation_academy</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Core-PoC">
            <text:p>unfoldingWord-dev/translationCore-PoC</text:p>
          </table:table-cell>
          <table:table-cell office:value-type="string" office:string-value="https://github.com/unfoldingWord-dev/translationCore-PoC">
            <text:p>https://github.com/unfoldingWord-dev/translationCore-PoC</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7-06T20:17:32Z">
            <text:p>2018-07-06T20:17:32Z</text:p>
          </table:table-cell>
          <table:table-cell office:value-type="string" office:string-value="2018-07-06T20:17:31Z">
            <text:p>2018-07-06T20:17:31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40">
            <text:p>40</text:p>
          </table:table-cell>
          <table:table-cell office:value-type="string" office:string-value="0">
            <text:p>0</text:p>
          </table:table-cell>
          <table:table-cell office:value-type="string" office:string-value="61">
            <text:p>6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translationCore-PoC">
            <text:p>unfoldingWord-dev/translationCore-PoC</text:p>
          </table:table-cell>
          <table:table-cell office:value-type="string" office:string-value="https://github.com/unfoldingWord-dev/translationCore-PoC">
            <text:p>https://github.com/unfoldingWord-dev/translationCore-PoC</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Core-PoC">
            <text:p>translationCore-Po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DatabaseWeb">
            <text:p>unfoldingWord-dev/translationDatabaseWeb</text:p>
          </table:table-cell>
          <table:table-cell office:value-type="string" office:string-value="https://github.com/unfoldingWord-dev/translationDatabaseWeb">
            <text:p>https://github.com/unfoldingWord-dev/translationDatabaseWeb</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3-06-06T12:28:28Z">
            <text:p>2023-06-06T12:28:28Z</text:p>
          </table:table-cell>
          <table:table-cell office:value-type="string" office:string-value="2023-06-06T12:28:28Z">
            <text:p>2023-06-06T12:28:28Z</text:p>
          </table:table-cell>
          <table:table-cell office:value-type="string" office:string-value="">
            <text:p/>
          </table:table-cell>
          <table:table-cell office:value-type="string" office:string-value="">
            <text:p/>
          </table:table-cell>
          <table:table-cell office:value-type="string" office:string-value="['vleong2332', 'paltman', 'swilcox', 'Vicky Leong', 'cdaield', 'jacobwegner', 'phillip-hopper', 'smcoll', 'rbnswartz', 'Phil Hopper', 'RobH123', 'yakob-aleksandrovich', 'jag3773']">
            <text:p>['vleong2332', 'paltman', 'swilcox', 'Vicky Leong', 'cdaield', 'jacobwegner', 'phillip-hopper', 'smcoll', 'rbnswartz', 'Phil Hopper', 'RobH123', 'yakob-aleksandrovich', 'jag3773']</text:p>
          </table:table-cell>
          <table:table-cell office:value-type="string" office:string-value="150">
            <text:p>150</text:p>
          </table:table-cell>
          <table:table-cell office:value-type="string" office:string-value="20">
            <text:p>20</text:p>
          </table:table-cell>
          <table:table-cell office:value-type="string" office:string-value="1008">
            <text:p>100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2-05T16:16:56Z">
            <text:p>2023-12-05T16:16:56Z</text:p>
          </table:table-cell>
          <table:table-cell office:value-type="string" office:string-value="unfoldingWord-dev/translationDatabaseWeb">
            <text:p>unfoldingWord-dev/translationDatabaseWeb</text:p>
          </table:table-cell>
          <table:table-cell office:value-type="string" office:string-value="https://github.com/unfoldingWord-dev/translationDatabaseWeb">
            <text:p>https://github.com/unfoldingWord-dev/translationDatabaseWeb</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DatabaseWeb">
            <text:p>translationDatabaseWeb</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db-tools">
            <text:p>unfoldingWord-dev/translationdb-tools</text:p>
          </table:table-cell>
          <table:table-cell office:value-type="string" office:string-value="https://github.com/unfoldingWord-dev/translationdb-tools">
            <text:p>https://github.com/unfoldingWord-dev/translationdb-tools</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5-06-23T21:33:38Z">
            <text:p>2015-06-23T21:33:38Z</text:p>
          </table:table-cell>
          <table:table-cell office:value-type="string" office:string-value="2015-06-23T21:33:37Z">
            <text:p>2015-06-23T21:33:37Z</text:p>
          </table:table-cell>
          <table:table-cell office:value-type="string" office:string-value="">
            <text:p/>
          </table:table-cell>
          <table:table-cell office:value-type="string" office:string-value="">
            <text:p/>
          </table:table-cell>
          <table:table-cell office:value-type="string" office:string-value="['Dave Pearce', 'jag3773']">
            <text:p>['Dave Pearce', 'jag3773']</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translationdb-tools">
            <text:p>unfoldingWord-dev/translationdb-tools</text:p>
          </table:table-cell>
          <table:table-cell office:value-type="string" office:string-value="https://github.com/unfoldingWord-dev/translationdb-tools">
            <text:p>https://github.com/unfoldingWord-dev/translationdb-tool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db-tools">
            <text:p>translationdb-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Helps">
            <text:p>unfoldingWord-dev/translationHelps</text:p>
          </table:table-cell>
          <table:table-cell office:value-type="string" office:string-value="https://github.com/unfoldingWord-dev/translationHelps">
            <text:p>https://github.com/unfoldingWord-dev/translationHelps</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3-12T17:46:51Z">
            <text:p>2018-03-12T17:46:51Z</text:p>
          </table:table-cell>
          <table:table-cell office:value-type="string" office:string-value="2018-03-12T17:46:50Z">
            <text:p>2018-03-12T17:46:50Z</text:p>
          </table:table-cell>
          <table:table-cell office:value-type="string" office:string-value="">
            <text:p/>
          </table:table-cell>
          <table:table-cell office:value-type="string" office:string-value="">
            <text:p/>
          </table:table-cell>
          <table:table-cell office:value-type="string" office:string-value="['mannycolon', 'EllDoubleYew', 'Richard Mahn', 'klappy', 'ihoegen', 'cdwhitfield73', 'RoyalSix', 'da1nerd', 'Sterling (Jay) Scott', 'Audrey Mahn', 'PhotoNomad0']">
            <text:p>['mannycolon', 'EllDoubleYew', 'Richard Mahn', 'klappy', 'ihoegen', 'cdwhitfield73', 'RoyalSix', 'da1nerd', 'Sterling (Jay) Scott', 'Audrey Mahn', 'PhotoNomad0']</text:p>
          </table:table-cell>
          <table:table-cell office:value-type="string" office:string-value="0">
            <text:p>0</text:p>
          </table:table-cell>
          <table:table-cell office:value-type="string" office:string-value="0">
            <text:p>0</text:p>
          </table:table-cell>
          <table:table-cell office:value-type="string" office:string-value="136">
            <text:p>1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06Z">
            <text:p>2023-01-28T16:52:06Z</text:p>
          </table:table-cell>
          <table:table-cell office:value-type="string" office:string-value="unfoldingWord-dev/translationHelps">
            <text:p>unfoldingWord-dev/translationHelps</text:p>
          </table:table-cell>
          <table:table-cell office:value-type="string" office:string-value="https://github.com/unfoldingWord-dev/translationHelps">
            <text:p>https://github.com/unfoldingWord-dev/translationHelp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Helps">
            <text:p>translationHelp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Keyboard">
            <text:p>unfoldingWord-dev/translationKeyboard</text:p>
          </table:table-cell>
          <table:table-cell office:value-type="string" office:string-value="https://github.com/unfoldingWord-dev/translationKeyboard">
            <text:p>https://github.com/unfoldingWord-dev/translationKeyboard</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8-06-08T15:50:17Z">
            <text:p>2018-06-08T15:50:17Z</text:p>
          </table:table-cell>
          <table:table-cell office:value-type="string" office:string-value="2018-06-08T15:49:12Z">
            <text:p>2018-06-08T15:49:12Z</text:p>
          </table:table-cell>
          <table:table-cell office:value-type="string" office:string-value="2018-06-08T15:50:17Z">
            <text:p>2018-06-08T15:50:17Z</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10">
            <text:p>10</text:p>
          </table:table-cell>
          <table:table-cell office:value-type="string" office:string-value="0">
            <text:p>0</text:p>
          </table:table-cell>
          <table:table-cell office:value-type="string" office:string-value="252">
            <text:p>252</text:p>
          </table:table-cell>
          <table:table-cell office:value-type="string" office:string-value="">
            <text:p/>
          </table:table-cell>
          <table:table-cell office:value-type="string" office:string-value="">
            <text:p/>
          </table:table-cell>
          <table:table-cell office:value-type="string" office:string-value="729">
            <text:p>729</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11T22:35:12Z">
            <text:p>2024-03-11T22:35:12Z</text:p>
          </table:table-cell>
          <table:table-cell office:value-type="string" office:string-value="unfoldingWord-dev/translationKeyboard">
            <text:p>unfoldingWord-dev/translationKeyboard</text:p>
          </table:table-cell>
          <table:table-cell office:value-type="string" office:string-value="https://github.com/unfoldingWord-dev/translationKeyboard">
            <text:p>https://github.com/unfoldingWord-dev/translationKeyboar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Keyboard">
            <text:p>translationKeyboar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KeyboardWeb">
            <text:p>unfoldingWord-dev/translationKeyboardWeb</text:p>
          </table:table-cell>
          <table:table-cell office:value-type="string" office:string-value="https://github.com/unfoldingWord-dev/translationKeyboardWeb">
            <text:p>https://github.com/unfoldingWord-dev/translationKeyboardWeb</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11T20:15:34Z">
            <text:p>2015-07-11T20:15:34Z</text:p>
          </table:table-cell>
          <table:table-cell office:value-type="string" office:string-value="2015-07-11T20:15:35Z">
            <text:p>2015-07-11T20:15:35Z</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7">
            <text:p>7</text:p>
          </table:table-cell>
          <table:table-cell office:value-type="string" office:string-value="0">
            <text:p>0</text:p>
          </table:table-cell>
          <table:table-cell office:value-type="string" office:string-value="181">
            <text:p>18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translationKeyboardWeb">
            <text:p>unfoldingWord-dev/translationKeyboardWeb</text:p>
          </table:table-cell>
          <table:table-cell office:value-type="string" office:string-value="https://github.com/unfoldingWord-dev/translationKeyboardWeb">
            <text:p>https://github.com/unfoldingWord-dev/translationKeyboardWeb</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KeyboardWeb">
            <text:p>translationKeyboardWeb</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Notes">
            <text:p>unfoldingWord-dev/translationNotes</text:p>
          </table:table-cell>
          <table:table-cell office:value-type="string" office:string-value="https://github.com/unfoldingWord-dev/translationNotes">
            <text:p>https://github.com/unfoldingWord-dev/translationNotes</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8-15T16:29:39Z">
            <text:p>2016-08-15T16:29:39Z</text:p>
          </table:table-cell>
          <table:table-cell office:value-type="string" office:string-value="2016-08-15T16:29:38Z">
            <text:p>2016-08-15T16:29:38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17:34:51Z">
            <text:p>2026-06-18T17:34:51Z</text:p>
          </table:table-cell>
          <table:table-cell office:value-type="string" office:string-value="unfoldingWord-dev/translationNotes">
            <text:p>unfoldingWord-dev/translationNotes</text:p>
          </table:table-cell>
          <table:table-cell office:value-type="string" office:string-value="https://github.com/unfoldingWord-dev/translationNotes">
            <text:p>https://github.com/unfoldingWord-dev/translationNote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Notes">
            <text:p>translationNote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s-server">
            <text:p>unfoldingWord-dev/ts-server</text:p>
          </table:table-cell>
          <table:table-cell office:value-type="string" office:string-value="https://github.com/unfoldingWord-dev/ts-server">
            <text:p>https://github.com/unfoldingWord-dev/ts-server</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4-09-23T19:33:20Z">
            <text:p>2014-09-23T19:33:20Z</text:p>
          </table:table-cell>
          <table:table-cell office:value-type="string" office:string-value="2014-09-23T19:33:17Z">
            <text:p>2014-09-23T19:33:17Z</text:p>
          </table:table-cell>
          <table:table-cell office:value-type="string" office:string-value="">
            <text:p/>
          </table:table-cell>
          <table:table-cell office:value-type="string" office:string-value="">
            <text:p/>
          </table:table-cell>
          <table:table-cell office:value-type="string" office:string-value="['da1nerd', 'root']">
            <text:p>['da1nerd', 'root']</text:p>
          </table:table-cell>
          <table:table-cell office:value-type="string" office:string-value="9">
            <text:p>9</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ts-server">
            <text:p>unfoldingWord-dev/ts-server</text:p>
          </table:table-cell>
          <table:table-cell office:value-type="string" office:string-value="https://github.com/unfoldingWord-dev/ts-server">
            <text:p>https://github.com/unfoldingWord-dev/ts-serv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s-server">
            <text:p>ts-serv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s-v2-catalog-backport">
            <text:p>unfoldingWord/ts-v2-catalog-backport</text:p>
          </table:table-cell>
          <table:table-cell office:value-type="string" office:string-value="https://github.com/unfoldingWord/ts-v2-catalog-backport">
            <text:p>https://github.com/unfoldingWord/ts-v2-catalog-backport</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2-12-31T07:59:27Z">
            <text:p>2022-12-31T07:59:27Z</text:p>
          </table:table-cell>
          <table:table-cell office:value-type="string" office:string-value="2022-06-02T18:06:07Z">
            <text:p>2022-06-02T18:06:07Z</text:p>
          </table:table-cell>
          <table:table-cell office:value-type="string" office:string-value="2022-06-01T22:42:37Z">
            <text:p>2022-06-01T22:42:37Z</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1">
            <text:p>1</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09T08:54:13Z">
            <text:p>2025-09-09T08:54:13Z</text:p>
          </table:table-cell>
          <table:table-cell office:value-type="string" office:string-value="unfoldingWord/ts-v2-catalog-backport">
            <text:p>unfoldingWord/ts-v2-catalog-backport</text:p>
          </table:table-cell>
          <table:table-cell office:value-type="string" office:string-value="https://github.com/unfoldingWord/ts-v2-catalog-backport">
            <text:p>https://github.com/unfoldingWord/ts-v2-catalog-backport</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s-v2-catalog-backport">
            <text:p>ts-v2-catalog-back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manager">
            <text:p>unfoldingWord-dev/tx-manager</text:p>
          </table:table-cell>
          <table:table-cell office:value-type="string" office:string-value="https://github.com/unfoldingWord-dev/tx-manager">
            <text:p>https://github.com/unfoldingWord-dev/tx-manager</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1-06-04T15:53:18Z">
            <text:p>2021-06-04T15:53:18Z</text:p>
          </table:table-cell>
          <table:table-cell office:value-type="string" office:string-value="2020-03-19T16:48:27Z">
            <text:p>2020-03-19T16:48:27Z</text:p>
          </table:table-cell>
          <table:table-cell office:value-type="string" office:string-value="2017-06-21T14:06:12Z">
            <text:p>2017-06-21T14:06:12Z</text:p>
          </table:table-cell>
          <table:table-cell office:value-type="string" office:string-value="">
            <text:p/>
          </table:table-cell>
          <table:table-cell office:value-type="string" office:string-value="['Richard Mahn', 'richmahn', 'PhotoNomad0', 'Phil Hopper', 'bspidel', 'jag3773', 'phillip-hopper', 'lversaw', 'ethantkoenig']">
            <text:p>['Richard Mahn', 'richmahn', 'PhotoNomad0', 'Phil Hopper', 'bspidel', 'jag3773', 'phillip-hopper', 'lversaw', 'ethantkoenig']</text:p>
          </table:table-cell>
          <table:table-cell office:value-type="string" office:string-value="6">
            <text:p>6</text:p>
          </table:table-cell>
          <table:table-cell office:value-type="string" office:string-value="6">
            <text:p>6</text:p>
          </table:table-cell>
          <table:table-cell office:value-type="string" office:string-value="387">
            <text:p>38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5-22T13:48:54Z">
            <text:p>2024-05-22T13:48:54Z</text:p>
          </table:table-cell>
          <table:table-cell office:value-type="string" office:string-value="unfoldingWord-dev/tx-manager">
            <text:p>unfoldingWord-dev/tx-manager</text:p>
          </table:table-cell>
          <table:table-cell office:value-type="string" office:string-value="https://github.com/unfoldingWord-dev/tx-manager">
            <text:p>https://github.com/unfoldingWord-dev/tx-manag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x-manager">
            <text:p>tx-mana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manager-lambda">
            <text:p>unfoldingWord-dev/tx-manager-lambda</text:p>
          </table:table-cell>
          <table:table-cell office:value-type="string" office:string-value="https://github.com/unfoldingWord-dev/tx-manager-lambda">
            <text:p>https://github.com/unfoldingWord-dev/tx-manager-lambda</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6-07T15:44:54Z">
            <text:p>2017-06-07T15:44:54Z</text:p>
          </table:table-cell>
          <table:table-cell office:value-type="string" office:string-value="2017-06-07T15:44:53Z">
            <text:p>2017-06-07T15:44:53Z</text:p>
          </table:table-cell>
          <table:table-cell office:value-type="string" office:string-value="">
            <text:p/>
          </table:table-cell>
          <table:table-cell office:value-type="string" office:string-value="">
            <text:p/>
          </table:table-cell>
          <table:table-cell office:value-type="string" office:string-value="['richmahn', 'Richard Mahn', 'Phil Hopper', 'PhotoNomad0', 'bspidel', 'phillip-hopper', 'jag3773']">
            <text:p>['richmahn', 'Richard Mahn', 'Phil Hopper', 'PhotoNomad0', 'bspidel', 'phillip-hopper', 'jag3773']</text:p>
          </table:table-cell>
          <table:table-cell office:value-type="string" office:string-value="0">
            <text:p>0</text:p>
          </table:table-cell>
          <table:table-cell office:value-type="string" office:string-value="0">
            <text:p>0</text:p>
          </table:table-cell>
          <table:table-cell office:value-type="string" office:string-value="62">
            <text:p>6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59:32Z">
            <text:p>2025-10-09T10:59:32Z</text:p>
          </table:table-cell>
          <table:table-cell office:value-type="string" office:string-value="unfoldingWord-dev/tx-manager-lambda">
            <text:p>unfoldingWord-dev/tx-manager-lambda</text:p>
          </table:table-cell>
          <table:table-cell office:value-type="string" office:string-value="https://github.com/unfoldingWord-dev/tx-manager-lambda">
            <text:p>https://github.com/unfoldingWord-dev/tx-manager-lambda</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x-manager-lambda">
            <text:p>tx-manager-lambd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simple-usfm2html">
            <text:p>unfoldingWord-dev/tx-simple-usfm2html</text:p>
          </table:table-cell>
          <table:table-cell office:value-type="string" office:string-value="https://github.com/unfoldingWord-dev/tx-simple-usfm2html">
            <text:p>https://github.com/unfoldingWord-dev/tx-simple-usfm2html</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2-20T06:23:46Z">
            <text:p>2016-12-20T06:23:46Z</text:p>
          </table:table-cell>
          <table:table-cell office:value-type="string" office:string-value="2016-12-20T06:23:40Z">
            <text:p>2016-12-20T06:23:40Z</text:p>
          </table:table-cell>
          <table:table-cell office:value-type="string" office:string-value="">
            <text:p/>
          </table:table-cell>
          <table:table-cell office:value-type="string" office:string-value="">
            <text:p/>
          </table:table-cell>
          <table:table-cell office:value-type="string" office:string-value="['Gogs', 'Richard Mahn']">
            <text:p>['Gogs', 'Richard Mahn']</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tx-simple-usfm2html">
            <text:p>unfoldingWord-dev/tx-simple-usfm2html</text:p>
          </table:table-cell>
          <table:table-cell office:value-type="string" office:string-value="https://github.com/unfoldingWord-dev/tx-simple-usfm2html">
            <text:p>https://github.com/unfoldingWord-dev/tx-simple-usfm2html</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x-simple-usfm2html">
            <text:p>tx-simple-usfm2htm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db-en">
            <text:p>unfoldingWord/udb-en</text:p>
          </table:table-cell>
          <table:table-cell office:value-type="string" office:string-value="https://github.com/unfoldingWord/udb-en">
            <text:p>https://github.com/unfoldingWord/udb-en</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18:41Z">
            <text:p>2017-06-23T20:18:41Z</text:p>
          </table:table-cell>
          <table:table-cell office:value-type="string" office:string-value="2017-06-23T20:17:50Z">
            <text:p>2017-06-23T20:17:50Z</text:p>
          </table:table-cell>
          <table:table-cell office:value-type="string" office:string-value="2016-10-04T01:16:56Z">
            <text:p>2016-10-04T01:16:56Z</text:p>
          </table:table-cell>
          <table:table-cell office:value-type="string" office:string-value="">
            <text:p/>
          </table:table-cell>
          <table:table-cell office:value-type="string" office:string-value="['root', 'jag3773']">
            <text:p>['root', 'jag3773']</text:p>
          </table:table-cell>
          <table:table-cell office:value-type="string" office:string-value="0">
            <text:p>0</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17Z">
            <text:p>2023-01-28T16:52:17Z</text:p>
          </table:table-cell>
          <table:table-cell office:value-type="string" office:string-value="unfoldingWord/udb-en">
            <text:p>unfoldingWord/udb-en</text:p>
          </table:table-cell>
          <table:table-cell office:value-type="string" office:string-value="https://github.com/unfoldingWord/udb-en">
            <text:p>https://github.com/unfoldingWord/udb-e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db-en">
            <text:p>udb-e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lb-en">
            <text:p>unfoldingWord/ulb-en</text:p>
          </table:table-cell>
          <table:table-cell office:value-type="string" office:string-value="https://github.com/unfoldingWord/ulb-en">
            <text:p>https://github.com/unfoldingWord/ulb-en</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21:08Z">
            <text:p>2017-06-23T20:21:08Z</text:p>
          </table:table-cell>
          <table:table-cell office:value-type="string" office:string-value="2017-06-23T20:20:49Z">
            <text:p>2017-06-23T20:20:49Z</text:p>
          </table:table-cell>
          <table:table-cell office:value-type="string" office:string-value="2016-10-04T01:18:57Z">
            <text:p>2016-10-04T01:18:57Z</text:p>
          </table:table-cell>
          <table:table-cell office:value-type="string" office:string-value="">
            <text:p/>
          </table:table-cell>
          <table:table-cell office:value-type="string" office:string-value="['root', 'jag3773']">
            <text:p>['root', 'jag3773']</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5T15:37:06Z">
            <text:p>2025-12-05T15:37:06Z</text:p>
          </table:table-cell>
          <table:table-cell office:value-type="string" office:string-value="unfoldingWord/ulb-en">
            <text:p>unfoldingWord/ulb-en</text:p>
          </table:table-cell>
          <table:table-cell office:value-type="string" office:string-value="https://github.com/unfoldingWord/ulb-en">
            <text:p>https://github.com/unfoldingWord/ulb-e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lb-en">
            <text:p>ulb-e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lb-pt-br">
            <text:p>unfoldingWord/ulb-pt-br</text:p>
          </table:table-cell>
          <table:table-cell office:value-type="string" office:string-value="https://github.com/unfoldingWord/ulb-pt-br">
            <text:p>https://github.com/unfoldingWord/ulb-pt-br</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3-11T00:22:21Z">
            <text:p>2016-03-11T00:22:21Z</text:p>
          </table:table-cell>
          <table:table-cell office:value-type="string" office:string-value="2016-03-11T00:22:18Z">
            <text:p>2016-03-11T00:22:18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17Z">
            <text:p>2023-01-28T16:52:17Z</text:p>
          </table:table-cell>
          <table:table-cell office:value-type="string" office:string-value="unfoldingWord/ulb-pt-br">
            <text:p>unfoldingWord/ulb-pt-br</text:p>
          </table:table-cell>
          <table:table-cell office:value-type="string" office:string-value="https://github.com/unfoldingWord/ulb-pt-br">
            <text:p>https://github.com/unfoldingWord/ulb-pt-b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lb-pt-br">
            <text:p>ulb-pt-b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nfoldingWord.github.io-old">
            <text:p>unfoldingWord/unfoldingWord.github.io-old</text:p>
          </table:table-cell>
          <table:table-cell office:value-type="string" office:string-value="https://github.com/unfoldingWord/unfoldingWord.github.io-old">
            <text:p>https://github.com/unfoldingWord/unfoldingWord.github.io-ol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11-28T20:38:37Z">
            <text:p>2018-11-28T20:38:37Z</text:p>
          </table:table-cell>
          <table:table-cell office:value-type="string" office:string-value="2018-11-28T20:31:56Z">
            <text:p>2018-11-28T20:31:56Z</text:p>
          </table:table-cell>
          <table:table-cell office:value-type="string" office:string-value="">
            <text:p/>
          </table:table-cell>
          <table:table-cell office:value-type="string" office:string-value="">
            <text:p/>
          </table:table-cell>
          <table:table-cell office:value-type="string" office:string-value="['jag3773', 'phillip-hopper', 'Tim', 'codemis', 'Jesse A. Griffin', 'Tim J', 'benjore', 'Phil Hopper', 'root', 'jesse@unfoldingword.org', 'timjore', 'Apache', 'Richard Mahn', 'toddlprice', 'Gogs', 'russp41']">
            <text:p>['jag3773', 'phillip-hopper', 'Tim', 'codemis', 'Jesse A. Griffin', 'Tim J', 'benjore', 'Phil Hopper', 'root', 'jesse@unfoldingword.org', 'timjore', 'Apache', 'Richard Mahn', 'toddlprice', 'Gogs', 'russp41']</text:p>
          </table:table-cell>
          <table:table-cell office:value-type="string" office:string-value="0">
            <text:p>0</text:p>
          </table:table-cell>
          <table:table-cell office:value-type="string" office:string-value="0">
            <text:p>0</text:p>
          </table:table-cell>
          <table:table-cell office:value-type="string" office:string-value="1051">
            <text:p>105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2:10Z">
            <text:p>2025-10-02T14:12:10Z</text:p>
          </table:table-cell>
          <table:table-cell office:value-type="string" office:string-value="unfoldingWord/unfoldingWord.github.io-old">
            <text:p>unfoldingWord/unfoldingWord.github.io-old</text:p>
          </table:table-cell>
          <table:table-cell office:value-type="string" office:string-value="https://github.com/unfoldingWord/unfoldingWord.github.io-old">
            <text:p>https://github.com/unfoldingWord/unfoldingWord.github.io-ol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nfoldingWord.github.io-old">
            <text:p>unfoldingWord.github.io-ol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nlocked-Greek-Lexicon">
            <text:p>unfoldingWord/Unlocked-Greek-Lexicon</text:p>
          </table:table-cell>
          <table:table-cell office:value-type="string" office:string-value="https://github.com/unfoldingWord/Unlocked-Greek-Lexicon">
            <text:p>https://github.com/unfoldingWord/Unlocked-Greek-Lexicon</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23T14:19:11Z">
            <text:p>2017-03-23T14:19:11Z</text:p>
          </table:table-cell>
          <table:table-cell office:value-type="string" office:string-value="2017-03-23T14:19:10Z">
            <text:p>2017-03-23T14:19:10Z</text:p>
          </table:table-cell>
          <table:table-cell office:value-type="string" office:string-value="">
            <text:p/>
          </table:table-cell>
          <table:table-cell office:value-type="string" office:string-value="">
            <text:p/>
          </table:table-cell>
          <table:table-cell office:value-type="string" office:string-value="['Tim', 'toddlprice', 'timjore']">
            <text:p>['Tim', 'toddlprice', 'timjore']</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17Z">
            <text:p>2023-01-28T16:52:17Z</text:p>
          </table:table-cell>
          <table:table-cell office:value-type="string" office:string-value="unfoldingWord/Unlocked-Greek-Lexicon">
            <text:p>unfoldingWord/Unlocked-Greek-Lexicon</text:p>
          </table:table-cell>
          <table:table-cell office:value-type="string" office:string-value="https://github.com/unfoldingWord/Unlocked-Greek-Lexicon">
            <text:p>https://github.com/unfoldingWord/Unlocked-Greek-Lexico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nlocked-Greek-Lexicon">
            <text:p>Unlocked-Greek-Lexic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nlocked-Greek-New-Testament">
            <text:p>unfoldingWord/Unlocked-Greek-New-Testament</text:p>
          </table:table-cell>
          <table:table-cell office:value-type="string" office:string-value="https://github.com/unfoldingWord/Unlocked-Greek-New-Testament">
            <text:p>https://github.com/unfoldingWord/Unlocked-Greek-New-Testament</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8-09-13T14:41:31Z">
            <text:p>2018-09-13T14:41:31Z</text:p>
          </table:table-cell>
          <table:table-cell office:value-type="string" office:string-value="2018-09-13T14:41:30Z">
            <text:p>2018-09-13T14:41:30Z</text:p>
          </table:table-cell>
          <table:table-cell office:value-type="string" office:string-value="">
            <text:p/>
          </table:table-cell>
          <table:table-cell office:value-type="string" office:string-value="">
            <text:p/>
          </table:table-cell>
          <table:table-cell office:value-type="string" office:string-value="['toddlprice', 'klappy', 'Tim', 'jag3773', 'timjore']">
            <text:p>['toddlprice', 'klappy', 'Tim', 'jag3773', 'timjore']</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28T01:08:22Z">
            <text:p>2025-12-28T01:08:22Z</text:p>
          </table:table-cell>
          <table:table-cell office:value-type="string" office:string-value="unfoldingWord/Unlocked-Greek-New-Testament">
            <text:p>unfoldingWord/Unlocked-Greek-New-Testament</text:p>
          </table:table-cell>
          <table:table-cell office:value-type="string" office:string-value="https://github.com/unfoldingWord/Unlocked-Greek-New-Testament">
            <text:p>https://github.com/unfoldingWord/Unlocked-Greek-New-Testament</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nlocked-Greek-New-Testament">
            <text:p>Unlocked-Greek-New-Testam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publish">
            <text:p>unfoldingWord-dev/uw-publish</text:p>
          </table:table-cell>
          <table:table-cell office:value-type="string" office:string-value="https://github.com/unfoldingWord-dev/uw-publish">
            <text:p>https://github.com/unfoldingWord-dev/uw-publish</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8-05-05T12:58:13Z">
            <text:p>2018-05-05T12:58:13Z</text:p>
          </table:table-cell>
          <table:table-cell office:value-type="string" office:string-value="2017-04-13T18:46:02Z">
            <text:p>2017-04-13T18:46:02Z</text:p>
          </table:table-cell>
          <table:table-cell office:value-type="string" office:string-value="">
            <text:p/>
          </table:table-cell>
          <table:table-cell office:value-type="string" office:string-value="">
            <text:p/>
          </table:table-cell>
          <table:table-cell office:value-type="string" office:string-value="['phillip-hopper', 'Phil Hopper', 'richmahn', 'Richard Mahn']">
            <text:p>['phillip-hopper', 'Phil Hopper', 'richmahn', 'Richard Mahn']</text:p>
          </table:table-cell>
          <table:table-cell office:value-type="string" office:string-value="0">
            <text:p>0</text:p>
          </table:table-cell>
          <table:table-cell office:value-type="string" office:string-value="0">
            <text:p>0</text:p>
          </table:table-cell>
          <table:table-cell office:value-type="string" office:string-value="112">
            <text:p>1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uw-publish">
            <text:p>unfoldingWord-dev/uw-publish</text:p>
          </table:table-cell>
          <table:table-cell office:value-type="string" office:string-value="https://github.com/unfoldingWord-dev/uw-publish">
            <text:p>https://github.com/unfoldingWord-dev/uw-publish</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w-publish">
            <text:p>uw-publish</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admin">
            <text:p>unfoldingWord-dev/uwadmin</text:p>
          </table:table-cell>
          <table:table-cell office:value-type="string" office:string-value="https://github.com/unfoldingWord-dev/uwadmin">
            <text:p>https://github.com/unfoldingWord-dev/uwadmin</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30T18:10:25Z">
            <text:p>2015-07-30T18:10:25Z</text:p>
          </table:table-cell>
          <table:table-cell office:value-type="string" office:string-value="2015-07-30T18:10:25Z">
            <text:p>2015-07-30T18:10:25Z</text:p>
          </table:table-cell>
          <table:table-cell office:value-type="string" office:string-value="">
            <text:p/>
          </table:table-cell>
          <table:table-cell office:value-type="string" office:string-value="">
            <text:p/>
          </table:table-cell>
          <table:table-cell office:value-type="string" office:string-value="['paltman', 'swilcox', 'root', 'jag3773']">
            <text:p>['paltman', 'swilcox', 'root', 'jag3773']</text:p>
          </table:table-cell>
          <table:table-cell office:value-type="string" office:string-value="0">
            <text:p>0</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uwadmin">
            <text:p>unfoldingWord-dev/uwadmin</text:p>
          </table:table-cell>
          <table:table-cell office:value-type="string" office:string-value="https://github.com/unfoldingWord-dev/uwadmin">
            <text:p>https://github.com/unfoldingWord-dev/uwadmi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wadmin">
            <text:p>uwadmi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VerseCheck">
            <text:p>unfoldingWord-dev/VerseCheck</text:p>
          </table:table-cell>
          <table:table-cell office:value-type="string" office:string-value="https://github.com/unfoldingWord-dev/VerseCheck">
            <text:p>https://github.com/unfoldingWord-dev/VerseCheck</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8T14:29:02Z">
            <text:p>2018-05-18T14:29:02Z</text:p>
          </table:table-cell>
          <table:table-cell office:value-type="string" office:string-value="2018-05-17T20:00:13Z">
            <text:p>2018-05-17T20:00:13Z</text:p>
          </table:table-cell>
          <table:table-cell office:value-type="string" office:string-value="">
            <text:p/>
          </table:table-cell>
          <table:table-cell office:value-type="string" office:string-value="">
            <text:p/>
          </table:table-cell>
          <table:table-cell office:value-type="string" office:string-value="['mannycolon', 'klappy', 'RoyalSix', 'cdwhitfield73', 'Richard Mahn', 'ihoegen', 'EllDoubleYew', 'da1nerd', 'Sterling (Jay) Scott', 'richmahn', 'bspidel', 'PhotoNomad0']">
            <text:p>['mannycolon', 'klappy', 'RoyalSix', 'cdwhitfield73', 'Richard Mahn', 'ihoegen', 'EllDoubleYew', 'da1nerd', 'Sterling (Jay) Scott', 'richmahn', 'bspidel', 'PhotoNomad0']</text:p>
          </table:table-cell>
          <table:table-cell office:value-type="string" office:string-value="1">
            <text:p>1</text:p>
          </table:table-cell>
          <table:table-cell office:value-type="string" office:string-value="0">
            <text:p>0</text:p>
          </table:table-cell>
          <table:table-cell office:value-type="string" office:string-value="381">
            <text:p>38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VerseCheck">
            <text:p>VerseCheck</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c-strings', 'tc-tool', 'usfm-js']">
            <text:p>['selections', 'tc-strings', 'tc-tool', 'usfm-js']</text:p>
          </table:table-cell>
          <table:table-cell office:value-type="string" office:string-value="2023-01-28T16:35:42Z">
            <text:p>2023-01-28T16:35:42Z</text:p>
          </table:table-cell>
          <table:table-cell office:value-type="string" office:string-value="unfoldingWord-dev/VerseCheck">
            <text:p>unfoldingWord-dev/VerseCheck</text:p>
          </table:table-cell>
          <table:table-cell office:value-type="string" office:string-value="https://github.com/unfoldingWord-dev/VerseCheck">
            <text:p>https://github.com/unfoldingWord-dev/VerseCheck</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VerseCheck">
            <text:p>VerseCheck</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ebsite">
            <text:p>unfoldingWord/website</text:p>
          </table:table-cell>
          <table:table-cell office:value-type="string" office:string-value="https://github.com/unfoldingWord/website">
            <text:p>https://github.com/unfoldingWord/website</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5-05-31T15:07:23Z">
            <text:p>2025-05-31T15:07:2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oryi', 'jeremymoore', 'kellyvivancox', 'aagraston', 'richmahn', 'yakob-aleksandrovich', 'sethstoll3', 'jag3773', 'generosityx']">
            <text:p>['yoryi', 'jeremymoore', 'kellyvivancox', 'aagraston', 'richmahn', 'yakob-aleksandrovich', 'sethstoll3', 'jag3773', 'generosityx']</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3T19:14:44Z">
            <text:p>2025-12-03T19:14:44Z</text:p>
          </table:table-cell>
          <table:table-cell office:value-type="string" office:string-value="unfoldingWord/website">
            <text:p>unfoldingWord/website</text:p>
          </table:table-cell>
          <table:table-cell office:value-type="string" office:string-value="https://github.com/unfoldingWord/website">
            <text:p>https://github.com/unfoldingWord/websit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website">
            <text:p>website</text:p>
          </table:table-cell>
          <table:table-cell office:value-type="string" office:string-value="unfoldingWord">
            <text:p>unfoldingWord</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word-aligner-extension">
            <text:p>unfoldingWord-box3/word-aligner-extension</text:p>
          </table:table-cell>
          <table:table-cell office:value-type="string" office:string-value="https://github.com/unfoldingWord-box3/word-aligner-extension">
            <text:p>https://github.com/unfoldingWord-box3/word-aligner-extension</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1-17T18:59:55Z">
            <text:p>2024-01-17T18:59:55Z</text:p>
          </table:table-cell>
          <table:table-cell office:value-type="string" office:string-value="2024-01-17T18:59:48Z">
            <text:p>2024-01-17T18:59:48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react-vite">
            <text:p>word-aligner-react-v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19:22:57Z">
            <text:p>2026-06-17T19:22:57Z</text:p>
          </table:table-cell>
          <table:table-cell office:value-type="string" office:string-value="unfoldingWord-box3/word-aligner-extension">
            <text:p>unfoldingWord-box3/word-aligner-extension</text:p>
          </table:table-cell>
          <table:table-cell office:value-type="string" office:string-value="https://github.com/unfoldingWord-box3/word-aligner-extension">
            <text:p>https://github.com/unfoldingWord-box3/word-aligner-extensio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word-aligner-extension">
            <text:p>word-aligner-extension</text:p>
          </table:table-cell>
          <table:table-cell office:value-type="string" office:string-value="unfoldingWord-box3">
            <text:p>unfoldingWord-box3</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wordMAP-mt">
            <text:p>unfoldingWord-box3/wordMAP-mt</text:p>
          </table:table-cell>
          <table:table-cell office:value-type="string" office:string-value="https://github.com/unfoldingWord-box3/wordMAP-mt">
            <text:p>https://github.com/unfoldingWord-box3/wordMAP-mt</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5-11-03T19:05:27Z">
            <text:p>2025-11-03T19:05:27Z</text:p>
          </table:table-cell>
          <table:table-cell office:value-type="string" office:string-value="2025-11-03T19:05:27Z">
            <text:p>2025-11-03T19:05:27Z</text:p>
          </table:table-cell>
          <table:table-cell office:value-type="string" office:string-value="">
            <text:p/>
          </table:table-cell>
          <table:table-cell office:value-type="string" office:string-value="">
            <text:p/>
          </table:table-cell>
          <table:table-cell office:value-type="string" office:string-value="['da1nerd', 'yakob-aleksandrovich']">
            <text:p>['da1nerd', 'yakob-aleksandrovich']</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mt">
            <text:p>wordmap-m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wordmap-lexer']">
            <text:p>['wordmap', 'wordmap-lexer']</text:p>
          </table:table-cell>
          <table:table-cell office:value-type="string" office:string-value="2026-06-17T19:27:07Z">
            <text:p>2026-06-17T19:27:07Z</text:p>
          </table:table-cell>
          <table:table-cell office:value-type="string" office:string-value="unfoldingWord-box3/wordMAP-mt">
            <text:p>unfoldingWord-box3/wordMAP-mt</text:p>
          </table:table-cell>
          <table:table-cell office:value-type="string" office:string-value="https://github.com/unfoldingWord-box3/wordMAP-mt">
            <text:p>https://github.com/unfoldingWord-box3/wordMAP-mt</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wordMAP-mt">
            <text:p>wordMAP-mt</text:p>
          </table:table-cell>
          <table:table-cell office:value-type="string" office:string-value="unfoldingWord-box3">
            <text:p>unfoldingWord-box3</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No longer used">
            <text:p>No longer used</text:p>
          </table:table-cell>
          <table:table-cell office:value-type="string" office:string-value="unfoldingWord/wordMAP-usfm">
            <text:p>unfoldingWord/wordMAP-usfm</text:p>
          </table:table-cell>
          <table:table-cell office:value-type="string" office:string-value="https://github.com/unfoldingWord/wordMAP-usfm">
            <text:p>https://github.com/unfoldingWord/wordMAP-usfm</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19-03-05T21:01:50Z">
            <text:p>2019-03-05T21:01:50Z</text:p>
          </table:table-cell>
          <table:table-cell office:value-type="string" office:string-value="2019-03-05T21:01:16Z">
            <text:p>2019-03-05T21:01:16Z</text:p>
          </table:table-cell>
          <table:table-cell office:value-type="string" office:string-value="">
            <text:p/>
          </table:table-cell>
          <table:table-cell office:value-type="string" office:string-value="">
            <text:p/>
          </table:table-cell>
          <table:table-cell office:value-type="string" office:string-value="['da1nerd', 'klappy', 'mannycolon', 'dependabot-support', 'bspidel']">
            <text:p>['da1nerd', 'klappy', 'mannycolon', 'dependabot-support', 'bspidel']</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usfm">
            <text:p>wordmap-usfm</text:p>
          </table:table-cell>
          <table:table-cell office:value-type="string" office:string-value="https://www.npmjs.com/package/wordmap-usfm">
            <text:p>https://www.npmjs.com/package/wordmap-usfm</text:p>
          </table:table-cell>
          <table:table-cell office:value-type="string" office:string-value="False">
            <text:p>False</text:p>
          </table:table-cell>
          <table:table-cell office:value-type="string" office:string-value="244">
            <text:p>244</text:p>
          </table:table-cell>
          <table:table-cell office:value-type="string" office:string-value="2018-11-30T10:27:55.416Z">
            <text:p>2018-11-30T10:27:55.416Z</text:p>
          </table:table-cell>
          <table:table-cell office:value-type="string" office:string-value="">
            <text:p/>
          </table:table-cell>
          <table:table-cell office:value-type="string" office:string-value="['usfm-js', 'wordmap-lexer']">
            <text:p>['usfm-js', 'wordmap-lexer']</text:p>
          </table:table-cell>
          <table:table-cell office:value-type="string" office:string-value="2026-06-23T11:19:16Z">
            <text:p>2026-06-23T11:19:16Z</text:p>
          </table:table-cell>
          <table:table-cell office:value-type="string" office:string-value="unfoldingWord/wordMAP-usfm">
            <text:p>unfoldingWord/wordMAP-usfm</text:p>
          </table:table-cell>
          <table:table-cell office:value-type="string" office:string-value="https://github.com/unfoldingWord/wordMAP-usfm">
            <text:p>https://github.com/unfoldingWord/wordMAP-usfm</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wordMAP-usfm">
            <text:p>wordMAP-usfm</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udget-report">
            <text:p>unfoldingWord/budget-report</text:p>
          </table:table-cell>
          <table:table-cell office:value-type="string" office:string-value="https://github.com/unfoldingWord/budget-report">
            <text:p>https://github.com/unfoldingWord/budget-report</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23T15:54:54Z">
            <text:p>2026-06-23T15:54:5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3T15:55:18Z">
            <text:p>2026-06-23T15:55:18Z</text:p>
          </table:table-cell>
          <table:table-cell office:value-type="string" office:string-value="unfoldingWord/budget-report">
            <text:p>unfoldingWord/budget-report</text:p>
          </table:table-cell>
          <table:table-cell office:value-type="string" office:string-value="https://github.com/unfoldingWord/budget-report">
            <text:p>https://github.com/unfoldingWord/budget-report</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budget-report">
            <text:p>budget-re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claude-skills">
            <text:p>unfoldingWord/claude-skills</text:p>
          </table:table-cell>
          <table:table-cell office:value-type="string" office:string-value="https://github.com/unfoldingWord/claude-skills">
            <text:p>https://github.com/unfoldingWord/claude-skil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7T14:34:28Z">
            <text:p>2026-06-17T14:34:2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14:39:48Z">
            <text:p>2026-06-17T14:39:48Z</text:p>
          </table:table-cell>
          <table:table-cell office:value-type="string" office:string-value="unfoldingWord/claude-skills">
            <text:p>unfoldingWord/claude-skills</text:p>
          </table:table-cell>
          <table:table-cell office:value-type="string" office:string-value="https://github.com/unfoldingWord/claude-skills">
            <text:p>https://github.com/unfoldingWord/claude-skill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claude-skills">
            <text:p>claude-skil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w-zipodt">
            <text:p>unfoldingWord-dev/dw-zipodt</text:p>
          </table:table-cell>
          <table:table-cell office:value-type="string" office:string-value="https://github.com/unfoldingWord-dev/dw-zipodt">
            <text:p>https://github.com/unfoldingWord-dev/dw-zipodt</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5-28T21:07:47Z">
            <text:p>2015-05-28T21:07:4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5-28T21:07:46Z">
            <text:p>2015-05-28T21:07:46Z</text:p>
          </table:table-cell>
          <table:table-cell office:value-type="string" office:string-value="unfoldingWord-dev/dw-zipodt">
            <text:p>unfoldingWord-dev/dw-zipodt</text:p>
          </table:table-cell>
          <table:table-cell office:value-type="string" office:string-value="https://github.com/unfoldingWord-dev/dw-zipodt">
            <text:p>https://github.com/unfoldingWord-dev/dw-zipodt</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dw-zipodt">
            <text:p>dw-zipod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ngineering-practices">
            <text:p>unfoldingWord/engineering-practices</text:p>
          </table:table-cell>
          <table:table-cell office:value-type="string" office:string-value="https://github.com/unfoldingWord/engineering-practices">
            <text:p>https://github.com/unfoldingWord/engineering-practice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5-06T21:10:08Z">
            <text:p>2026-05-06T21:10:0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text:p>sethstoll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06T21:10:18Z">
            <text:p>2026-05-06T21:10:18Z</text:p>
          </table:table-cell>
          <table:table-cell office:value-type="string" office:string-value="unfoldingWord/engineering-practices">
            <text:p>unfoldingWord/engineering-practices</text:p>
          </table:table-cell>
          <table:table-cell office:value-type="string" office:string-value="https://github.com/unfoldingWord/engineering-practices">
            <text:p>https://github.com/unfoldingWord/engineering-practice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engineering-practices">
            <text:p>engineering-practic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l_database_private">
            <text:p>unfoldingWord/gl_database_private</text:p>
          </table:table-cell>
          <table:table-cell office:value-type="string" office:string-value="https://github.com/unfoldingWord/gl_database_private">
            <text:p>https://github.com/unfoldingWord/gl_database_private</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1-12-15T21:34:14Z">
            <text:p>2021-12-15T21:34:1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cobwegner">
            <text:p>jacobwegner</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2-15T21:34:33Z">
            <text:p>2021-12-15T21:34:33Z</text:p>
          </table:table-cell>
          <table:table-cell office:value-type="string" office:string-value="unfoldingWord/gl_database_private">
            <text:p>unfoldingWord/gl_database_private</text:p>
          </table:table-cell>
          <table:table-cell office:value-type="string" office:string-value="https://github.com/unfoldingWord/gl_database_private">
            <text:p>https://github.com/unfoldingWord/gl_database_private</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gl_database_private">
            <text:p>gl_database_priva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eting-issues">
            <text:p>unfoldingWord/meeting-issues</text:p>
          </table:table-cell>
          <table:table-cell office:value-type="string" office:string-value="https://github.com/unfoldingWord/meeting-issues">
            <text:p>https://github.com/unfoldingWord/meeting-issues</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6-22T17:53:29Z">
            <text:p>2026-06-22T17:53:29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 LITSON LAMBERT">
            <text:p>ELSY LITSON LAMBERT</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2T17:53:33Z">
            <text:p>2026-06-22T17:53:33Z</text:p>
          </table:table-cell>
          <table:table-cell office:value-type="string" office:string-value="unfoldingWord/meeting-issues">
            <text:p>unfoldingWord/meeting-issues</text:p>
          </table:table-cell>
          <table:table-cell office:value-type="string" office:string-value="https://github.com/unfoldingWord/meeting-issues">
            <text:p>https://github.com/unfoldingWord/meeting-issue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meeting-issues">
            <text:p>meeting-issu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node-usfm2html-cli">
            <text:p>unfoldingWord/node-usfm2html-cli</text:p>
          </table:table-cell>
          <table:table-cell office:value-type="string" office:string-value="https://github.com/unfoldingWord/node-usfm2html-cli">
            <text:p>https://github.com/unfoldingWord/node-usfm2html-cli</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4T23:44:52Z">
            <text:p>2026-05-14T23:44:52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4T23:44:56Z">
            <text:p>2026-05-14T23:44:56Z</text:p>
          </table:table-cell>
          <table:table-cell office:value-type="string" office:string-value="unfoldingWord/node-usfm2html-cli">
            <text:p>unfoldingWord/node-usfm2html-cli</text:p>
          </table:table-cell>
          <table:table-cell office:value-type="string" office:string-value="https://github.com/unfoldingWord/node-usfm2html-cli">
            <text:p>https://github.com/unfoldingWord/node-usfm2html-cli</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node-usfm2html-cli">
            <text:p>node-usfm2html-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print-preview-tools">
            <text:p>unfoldingWord/oce-print-preview-tools</text:p>
          </table:table-cell>
          <table:table-cell office:value-type="string" office:string-value="https://github.com/unfoldingWord/oce-print-preview-tools">
            <text:p>https://github.com/unfoldingWord/oce-print-preview-tool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2-13T23:46:18Z">
            <text:p>2023-12-13T23:46:1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2-14T00:56:44Z">
            <text:p>2023-12-14T00:56:44Z</text:p>
          </table:table-cell>
          <table:table-cell office:value-type="string" office:string-value="unfoldingWord/oce-print-preview-tools">
            <text:p>unfoldingWord/oce-print-preview-tools</text:p>
          </table:table-cell>
          <table:table-cell office:value-type="string" office:string-value="https://github.com/unfoldingWord/oce-print-preview-tools">
            <text:p>https://github.com/unfoldingWord/oce-print-preview-tool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oce-print-preview-tools">
            <text:p>oce-print-preview-too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populate-gl-quote-rcl">
            <text:p>unfoldingWord-box3/populate-gl-quote-rcl</text:p>
          </table:table-cell>
          <table:table-cell office:value-type="string" office:string-value="https://github.com/unfoldingWord-box3/populate-gl-quote-rcl">
            <text:p>https://github.com/unfoldingWord-box3/populate-gl-quote-rcl</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9-23T16:15:56Z">
            <text:p>2022-09-23T16:15:56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9-23T16:15:55Z">
            <text:p>2022-09-23T16:15:55Z</text:p>
          </table:table-cell>
          <table:table-cell office:value-type="string" office:string-value="unfoldingWord-box3/populate-gl-quote-rcl">
            <text:p>unfoldingWord-box3/populate-gl-quote-rcl</text:p>
          </table:table-cell>
          <table:table-cell office:value-type="string" office:string-value="https://github.com/unfoldingWord-box3/populate-gl-quote-rcl">
            <text:p>https://github.com/unfoldingWord-box3/populate-gl-quote-rcl</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populate-gl-quote-rcl">
            <text:p>populate-gl-quote-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alesforce-aplos-integration">
            <text:p>unfoldingWord/salesforce-aplos-integration</text:p>
          </table:table-cell>
          <table:table-cell office:value-type="string" office:string-value="https://github.com/unfoldingWord/salesforce-aplos-integration">
            <text:p>https://github.com/unfoldingWord/salesforce-aplos-integration</text:p>
          </table:table-cell>
          <table:table-cell office:value-type="string" office:string-value="Apex">
            <text:p>Apex</text:p>
          </table:table-cell>
          <table:table-cell office:value-type="string" office:string-value="False">
            <text:p>False</text:p>
          </table:table-cell>
          <table:table-cell office:value-type="string" office:string-value="False">
            <text:p>False</text:p>
          </table:table-cell>
          <table:table-cell office:value-type="string" office:string-value="2024-06-25T16:11:01Z">
            <text:p>2024-06-25T16:11:0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g-reichert', 'kmace16', 'jag3773']">
            <text:p>['MrRosewood', 'g-reichert', 'kmace16', '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29T19:51:55Z">
            <text:p>2023-08-29T19:51:55Z</text:p>
          </table:table-cell>
          <table:table-cell office:value-type="string" office:string-value="unfoldingWord/salesforce-aplos-integration">
            <text:p>unfoldingWord/salesforce-aplos-integration</text:p>
          </table:table-cell>
          <table:table-cell office:value-type="string" office:string-value="https://github.com/unfoldingWord/salesforce-aplos-integration">
            <text:p>https://github.com/unfoldingWord/salesforce-aplos-integration</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alesforce-aplos-integration">
            <text:p>salesforce-aplos-integrati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alesforce-core">
            <text:p>unfoldingWord/salesforce-core</text:p>
          </table:table-cell>
          <table:table-cell office:value-type="string" office:string-value="https://github.com/unfoldingWord/salesforce-core">
            <text:p>https://github.com/unfoldingWord/salesforce-cor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8T14:52:21Z">
            <text:p>2024-08-28T14:52:2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dhallsim', 'g-reichert', 'kmace16', 'UW-MountainPoint', 'MPkadarby1', 'atrancandoris', 'hallienicholas', 'Derek Hall', 'Jeff Clark', 'jag3773']">
            <text:p>['MrRosewood', 'dhallsim', 'g-reichert', 'kmace16', 'UW-MountainPoint', 'MPkadarby1', 'atrancandoris', 'hallienicholas', 'Derek Hall', 'Jeff Clark', '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8-28T14:52:21Z">
            <text:p>2024-08-28T14:52:21Z</text:p>
          </table:table-cell>
          <table:table-cell office:value-type="string" office:string-value="unfoldingWord/salesforce-core">
            <text:p>unfoldingWord/salesforce-core</text:p>
          </table:table-cell>
          <table:table-cell office:value-type="string" office:string-value="https://github.com/unfoldingWord/salesforce-core">
            <text:p>https://github.com/unfoldingWord/salesforce-core</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alesforce-core">
            <text:p>salesforce-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alesforce-donation-page-package-core">
            <text:p>unfoldingWord/salesforce-donation-page-package-core</text:p>
          </table:table-cell>
          <table:table-cell office:value-type="string" office:string-value="https://github.com/unfoldingWord/salesforce-donation-page-package-core">
            <text:p>https://github.com/unfoldingWord/salesforce-donation-page-package-core</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25Z">
            <text:p>2020-05-11T18:43:25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5-11T18:43:28Z">
            <text:p>2020-05-11T18:43:28Z</text:p>
          </table:table-cell>
          <table:table-cell office:value-type="string" office:string-value="unfoldingWord/salesforce-donation-page-package-core">
            <text:p>unfoldingWord/salesforce-donation-page-package-core</text:p>
          </table:table-cell>
          <table:table-cell office:value-type="string" office:string-value="https://github.com/unfoldingWord/salesforce-donation-page-package-core">
            <text:p>https://github.com/unfoldingWord/salesforce-donation-page-package-core</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alesforce-donation-page-package-core">
            <text:p>salesforce-donation-page-package-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alesforce-donation-page-package-customizations">
            <text:p>unfoldingWord/salesforce-donation-page-package-customizations</text:p>
          </table:table-cell>
          <table:table-cell office:value-type="string" office:string-value="https://github.com/unfoldingWord/salesforce-donation-page-package-customizations">
            <text:p>https://github.com/unfoldingWord/salesforce-donation-page-package-customization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55Z">
            <text:p>2020-05-11T18:43:55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5-11T18:43:58Z">
            <text:p>2020-05-11T18:43:58Z</text:p>
          </table:table-cell>
          <table:table-cell office:value-type="string" office:string-value="unfoldingWord/salesforce-donation-page-package-customizations">
            <text:p>unfoldingWord/salesforce-donation-page-package-customizations</text:p>
          </table:table-cell>
          <table:table-cell office:value-type="string" office:string-value="https://github.com/unfoldingWord/salesforce-donation-page-package-customizations">
            <text:p>https://github.com/unfoldingWord/salesforce-donation-page-package-customization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alesforce-donation-page-package-customizations">
            <text:p>salesforce-donation-page-package-customization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hiny-app-outputs-report">
            <text:p>unfoldingWord/shiny-app-outputs-report</text:p>
          </table:table-cell>
          <table:table-cell office:value-type="string" office:string-value="https://github.com/unfoldingWord/shiny-app-outputs-report">
            <text:p>https://github.com/unfoldingWord/shiny-app-outputs-report</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1-29T15:53:53Z">
            <text:p>2024-01-29T15:53:5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1-29T17:00:31Z">
            <text:p>2024-01-29T17:00:31Z</text:p>
          </table:table-cell>
          <table:table-cell office:value-type="string" office:string-value="unfoldingWord/shiny-app-outputs-report">
            <text:p>unfoldingWord/shiny-app-outputs-report</text:p>
          </table:table-cell>
          <table:table-cell office:value-type="string" office:string-value="https://github.com/unfoldingWord/shiny-app-outputs-report">
            <text:p>https://github.com/unfoldingWord/shiny-app-outputs-report</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hiny-app-outputs-report">
            <text:p>shiny-app-outputs-re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create-2-poc">
            <text:p>unfoldingWord/tc-create-2-poc</text:p>
          </table:table-cell>
          <table:table-cell office:value-type="string" office:string-value="https://github.com/unfoldingWord/tc-create-2-poc">
            <text:p>https://github.com/unfoldingWord/tc-create-2-poc</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12-22T20:44:24Z">
            <text:p>2020-12-22T20:44:2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12-17T16:24:38Z">
            <text:p>2020-12-17T16:24:38Z</text:p>
          </table:table-cell>
          <table:table-cell office:value-type="string" office:string-value="unfoldingWord/tc-create-2-poc">
            <text:p>unfoldingWord/tc-create-2-poc</text:p>
          </table:table-cell>
          <table:table-cell office:value-type="string" office:string-value="https://github.com/unfoldingWord/tc-create-2-poc">
            <text:p>https://github.com/unfoldingWord/tc-create-2-poc</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tc-create-2-poc">
            <text:p>tc-create-2-poc</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website">
            <text:p>unfoldingWord/tc-website</text:p>
          </table:table-cell>
          <table:table-cell office:value-type="string" office:string-value="https://github.com/unfoldingWord/tc-website">
            <text:p>https://github.com/unfoldingWord/tc-website</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4-17T14:26:58Z">
            <text:p>2026-04-17T14:26:5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 Champeon', 'google-labs-jules[bot]', 'birchamp']">
            <text:p>['Birch Champeon', 'google-labs-jules[bot]', 'birchamp']</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17T14:27:01Z">
            <text:p>2026-04-17T14:27:01Z</text:p>
          </table:table-cell>
          <table:table-cell office:value-type="string" office:string-value="unfoldingWord/tc-website">
            <text:p>unfoldingWord/tc-website</text:p>
          </table:table-cell>
          <table:table-cell office:value-type="string" office:string-value="https://github.com/unfoldingWord/tc-website">
            <text:p>https://github.com/unfoldingWord/tc-website</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tc-website">
            <text:p>tc-webs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erraform">
            <text:p>unfoldingWord/terraform</text:p>
          </table:table-cell>
          <table:table-cell office:value-type="string" office:string-value="https://github.com/unfoldingWord/terraform">
            <text:p>https://github.com/unfoldingWord/terraform</text:p>
          </table:table-cell>
          <table:table-cell office:value-type="string" office:string-value="HCL">
            <text:p>HCL</text:p>
          </table:table-cell>
          <table:table-cell office:value-type="string" office:string-value="False">
            <text:p>False</text:p>
          </table:table-cell>
          <table:table-cell office:value-type="string" office:string-value="False">
            <text:p>False</text:p>
          </table:table-cell>
          <table:table-cell office:value-type="string" office:string-value="2023-07-11T09:20:37Z">
            <text:p>2023-07-11T09:20:3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7-04T15:33:16Z">
            <text:p>2023-07-04T15:33:16Z</text:p>
          </table:table-cell>
          <table:table-cell office:value-type="string" office:string-value="unfoldingWord/terraform">
            <text:p>unfoldingWord/terraform</text:p>
          </table:table-cell>
          <table:table-cell office:value-type="string" office:string-value="https://github.com/unfoldingWord/terraform">
            <text:p>https://github.com/unfoldingWord/terraform</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terraform">
            <text:p>terraform</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n-tsv7-to-tsv8">
            <text:p>unfoldingWord/tn-tsv7-to-tsv8</text:p>
          </table:table-cell>
          <table:table-cell office:value-type="string" office:string-value="https://github.com/unfoldingWord/tn-tsv7-to-tsv8">
            <text:p>https://github.com/unfoldingWord/tn-tsv7-to-tsv8</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11-14T10:49:22Z">
            <text:p>2024-11-14T10:49:22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11-14T10:49:22Z">
            <text:p>2024-11-14T10:49:22Z</text:p>
          </table:table-cell>
          <table:table-cell office:value-type="string" office:string-value="unfoldingWord/tn-tsv7-to-tsv8">
            <text:p>unfoldingWord/tn-tsv7-to-tsv8</text:p>
          </table:table-cell>
          <table:table-cell office:value-type="string" office:string-value="https://github.com/unfoldingWord/tn-tsv7-to-tsv8">
            <text:p>https://github.com/unfoldingWord/tn-tsv7-to-tsv8</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tn-tsv7-to-tsv8">
            <text:p>tn-tsv7-to-tsv8</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fw_redirects">
            <text:p>unfoldingWord/ufw_redirects</text:p>
          </table:table-cell>
          <table:table-cell office:value-type="string" office:string-value="https://github.com/unfoldingWord/ufw_redirects">
            <text:p>https://github.com/unfoldingWord/ufw_redirec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6-02T19:41:29Z">
            <text:p>2026-06-02T19:41:29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yakob-aleksandrovich', 'jag3773', 'kellyvivancox', 'richmahn', 'drcox633']">
            <text:p>['sethstoll3', 'yakob-aleksandrovich', 'jag3773', 'kellyvivancox', 'richmahn', 'drcox63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2T19:41:33Z">
            <text:p>2026-06-02T19:41:33Z</text:p>
          </table:table-cell>
          <table:table-cell office:value-type="string" office:string-value="unfoldingWord/ufw_redirects">
            <text:p>unfoldingWord/ufw_redirects</text:p>
          </table:table-cell>
          <table:table-cell office:value-type="string" office:string-value="https://github.com/unfoldingWord/ufw_redirects">
            <text:p>https://github.com/unfoldingWord/ufw_redirect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ufw_redirects">
            <text:p>ufw_redirec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Bible-Maps">
            <text:p>unfoldingWord-dev/uW-Bible-Maps</text:p>
          </table:table-cell>
          <table:table-cell office:value-type="string" office:string-value="https://github.com/unfoldingWord-dev/uW-Bible-Maps">
            <text:p>https://github.com/unfoldingWord-dev/uW-Bible-Map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1-18T15:24:04Z">
            <text:p>2015-11-18T15:24:0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11-18T15:24:04Z">
            <text:p>2015-11-18T15:24:04Z</text:p>
          </table:table-cell>
          <table:table-cell office:value-type="string" office:string-value="unfoldingWord-dev/uW-Bible-Maps">
            <text:p>unfoldingWord-dev/uW-Bible-Maps</text:p>
          </table:table-cell>
          <table:table-cell office:value-type="string" office:string-value="https://github.com/unfoldingWord-dev/uW-Bible-Maps">
            <text:p>https://github.com/unfoldingWord-dev/uW-Bible-Map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uW-Bible-Maps">
            <text:p>uW-Bible-Map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dev-skills">
            <text:p>unfoldingWord/uw-dev-skills</text:p>
          </table:table-cell>
          <table:table-cell office:value-type="string" office:string-value="https://github.com/unfoldingWord/uw-dev-skills">
            <text:p>https://github.com/unfoldingWord/uw-dev-skills</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5-11T16:50:23Z">
            <text:p>2026-05-11T16:50:2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text:p>['claude', 'sethstoll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6:50:29Z">
            <text:p>2026-05-11T16:50:29Z</text:p>
          </table:table-cell>
          <table:table-cell office:value-type="string" office:string-value="unfoldingWord/uw-dev-skills">
            <text:p>unfoldingWord/uw-dev-skills</text:p>
          </table:table-cell>
          <table:table-cell office:value-type="string" office:string-value="https://github.com/unfoldingWord/uw-dev-skills">
            <text:p>https://github.com/unfoldingWord/uw-dev-skill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uw-dev-skills">
            <text:p>uw-dev-skil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zulip-mcp">
            <text:p>unfoldingWord/uw-zulip-mcp</text:p>
          </table:table-cell>
          <table:table-cell office:value-type="string" office:string-value="https://github.com/unfoldingWord/uw-zulip-mcp">
            <text:p>https://github.com/unfoldingWord/uw-zulip-mcp</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29T15:05:23Z">
            <text:p>2026-05-29T15:05:2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kougkas', 'nlightcc', 'sethstoll3', 'sethstoll', 'yakob-aleksandrovich', 'klutchell']">
            <text:p>['akougkas', 'nlightcc', 'sethstoll3', 'sethstoll', 'yakob-aleksandrovich', 'klutchell']</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29T15:06:34Z">
            <text:p>2026-05-29T15:06:34Z</text:p>
          </table:table-cell>
          <table:table-cell office:value-type="string" office:string-value="unfoldingWord/uw-zulip-mcp">
            <text:p>unfoldingWord/uw-zulip-mcp</text:p>
          </table:table-cell>
          <table:table-cell office:value-type="string" office:string-value="https://github.com/unfoldingWord/uw-zulip-mcp">
            <text:p>https://github.com/unfoldingWord/uw-zulip-mcp</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uw-zulip-mcp">
            <text:p>uw-zulip-mc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zulip-files">
            <text:p>unfoldingWord/zulip-files</text:p>
          </table:table-cell>
          <table:table-cell office:value-type="string" office:string-value="https://github.com/unfoldingWord/zulip-files">
            <text:p>https://github.com/unfoldingWord/zulip-files</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2-21T13:15:07Z">
            <text:p>2026-02-21T13:15:0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lightcc">
            <text:p>nlightcc</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21T13:15:10Z">
            <text:p>2026-02-21T13:15:10Z</text:p>
          </table:table-cell>
          <table:table-cell office:value-type="string" office:string-value="unfoldingWord/zulip-files">
            <text:p>unfoldingWord/zulip-files</text:p>
          </table:table-cell>
          <table:table-cell office:value-type="string" office:string-value="https://github.com/unfoldingWord/zulip-files">
            <text:p>https://github.com/unfoldingWord/zulip-file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zulip-files">
            <text:p>zulip-files</text:p>
          </table:table-cell>
          <table:table-cell office:value-type="string" office:string-value="unfoldingWord">
            <text:p>unfoldingWord</text:p>
          </table:table-cell>
        </table:table-row>
      </table:table>
      <table:named-expressions/>
      <table:database-ranges>
        <table:database-range table:name="__Anonymous_Sheet_DB__0" table:target-range-address="Repositories.A1:Repositories.AK549">
          <table:sort>
            <table:sort-by table:field-number="33" table:data-type="automatic"/>
            <table:sort-by table:field-number="34"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3">00/00/0000</text:date>, <text:time style:data-style-name="N2" text:time-value="13:04:48.47600263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23T13:23:59.381463739</dc:date>
    <meta:editing-duration>PT21H50M10S</meta:editing-duration>
    <meta:editing-cycles>45</meta:editing-cycles>
    <meta:document-statistic meta:table-count="1" meta:cell-count="20313" meta:object-count="0"/>
  </office:meta>
</office:document-meta>
</file>