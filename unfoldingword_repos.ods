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16T19:51:50Z</text:p>
          </table:table-cell>
          <table:table-cell office:value-type="string">
            <text:p>2026-06-16T19:51: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16T19:51:55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simple-text-editor-rcl</text:p>
          </table:table-cell>
          <table:table-cell office:value-type="string">
            <text:p>False</text:p>
          </table:table-cell>
          <table:table-cell office:value-type="string">
            <text:p>391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proskomma</text:p>
          </table:table-cell>
          <table:table-cell office:value-type="string">
            <text:p>False</text:p>
          </table:table-cell>
          <table:table-cell office:value-type="string">
            <text:p>236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
          </table:table-cell>
          <table:table-cell office:value-type="string">
            <text:p>wordmap-react-toolkit</text:p>
          </table:table-cell>
          <table:table-cell office:value-type="string">
            <text:p>False</text:p>
          </table:table-cell>
          <table:table-cell office:value-type="string">
            <text:p>225</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content-validation-app</text:p>
          </table:table-cell>
          <table:table-cell office:value-type="string">
            <text:p>False</text:p>
          </table:table-cell>
          <table:table-cell office:value-type="string">
            <text:p>188</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5:25:46Z</text:p>
          </table:table-cell>
          <table:table-cell office:value-type="string">
            <text:p>2026-06-17T15:25:36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5:27:01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14:59:01Z</text:p>
          </table:table-cell>
          <table:table-cell office:value-type="string">
            <text:p>2026-06-17T14:58: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7T15:03:26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wl-generator, tsv-twl-creation-app,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2:45:39Z</text:p>
          </table:table-cell>
          <table:table-cell office:value-type="string">
            <text:p>2026-06-16T22:45: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6T22:45:4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wl-generator</text:p>
          </table:table-cell>
          <table:table-cell office:value-type="string">
            <text:p>False</text:p>
          </table:table-cell>
          <table:table-cell office:value-type="string">
            <text:p>5594</text:p>
          </table:table-cell>
          <table:table-cell office:value-type="string">
            <text:p>2026-06-16T10:00:58.589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5:26:25Z</text:p>
          </table:table-cell>
          <table:table-cell office:value-type="string">
            <text:p>2026-06-16T21:32:07Z</text:p>
          </table:table-cell>
          <table:table-cell office:value-type="string">
            <text:p/>
          </table:table-cell>
          <table:table-cell office:value-type="string">
            <text:p>110</text:p>
          </table:table-cell>
          <table:table-cell office:value-type="string">
            <text:p>10</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6T21:33:14Z</text:p>
          </table:table-cell>
        </table:table-row>
        <table:table-row>
          <table:table-cell office:value-type="string">
            <text:p>bt-servant-signal-gateway</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16T21:44:04Z</text:p>
          </table:table-cell>
          <table:table-cell office:value-type="string">
            <text:p>2026-06-16T18:47:12Z</text:p>
          </table:table-cell>
          <table:table-cell office:value-type="string">
            <text:p/>
          </table:table-cell>
          <table:table-cell office:value-type="string">
            <text:p>12</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16T18:48:3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17:48:59Z</text:p>
          </table:table-cell>
          <table:table-cell office:value-type="string">
            <text:p>2026-06-13T17:48:58Z</text:p>
          </table:table-cell>
          <table:table-cell office:value-type="string">
            <text:p/>
          </table:table-cell>
          <table:table-cell office:value-type="string">
            <text:p>7</text:p>
          </table:table-cell>
          <table:table-cell office:value-type="string">
            <text:p>1</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3T17:49:02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
          </table:table-cell>
          <table:table-cell office:value-type="string">
            <text:p>uw-content-validation</text:p>
          </table:table-cell>
          <table:table-cell office:value-type="string">
            <text:p>False</text:p>
          </table:table-cell>
          <table:table-cell office:value-type="string">
            <text:p>2070</text:p>
          </table:table-cell>
          <table:table-cell office:value-type="string">
            <text:p>2026-06-07T09:30:48.45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3T18:25:41Z</text:p>
          </table:table-cell>
          <table:table-cell office:value-type="string">
            <text:p>2026-06-03T18:25:3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03T18:25:59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09:29:35Z</text:p>
          </table:table-cell>
          <table:table-cell office:value-type="string">
            <text:p>2026-06-03T09:2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03T09:29:39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02T19:21:1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02T19:21:17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enhanced-word-aligner-rcl</text:p>
          </table:table-cell>
          <table:table-cell office:value-type="string">
            <text:p>False</text:p>
          </table:table-cell>
          <table:table-cell office:value-type="string">
            <text:p>24656</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
          </table:table-cell>
          <table:table-cell office:value-type="string">
            <text:p>uw-languages-rcl</text:p>
          </table:table-cell>
          <table:table-cell office:value-type="string">
            <text:p>False</text:p>
          </table:table-cell>
          <table:table-cell office:value-type="string">
            <text:p>1220</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
          </table:table-cell>
          <table:table-cell office:value-type="string">
            <text:p>string-punctuation-tokenizer</text:p>
          </table:table-cell>
          <table:table-cell office:value-type="string">
            <text:p>False</text:p>
          </table:table-cell>
          <table:table-cell office:value-type="string">
            <text:p>98082</text:p>
          </table:table-cell>
          <table:table-cell office:value-type="string">
            <text:p>2021-08-25T21:55:46.406Z</text:p>
          </table:table-cell>
          <table:table-cell office:value-type="string">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
          </table:table-cell>
          <table:table-cell office:value-type="string">
            <text:p>word-aligner-rcl</text:p>
          </table:table-cell>
          <table:table-cell office:value-type="string">
            <text:p>False</text:p>
          </table:table-cell>
          <table:table-cell office:value-type="string">
            <text:p>16522</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lib</text:p>
          </table:table-cell>
          <table:table-cell office:value-type="string">
            <text:p>False</text:p>
          </table:table-cell>
          <table:table-cell office:value-type="string">
            <text:p>4741</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
          </table:table-cell>
          <table:table-cell office:value-type="string">
            <text:p>word-aligner</text:p>
          </table:table-cell>
          <table:table-cell office:value-type="string">
            <text:p>False</text:p>
          </table:table-cell>
          <table:table-cell office:value-type="string">
            <text:p>44675</text:p>
          </table:table-cell>
          <table:table-cell office:value-type="string">
            <text:p>2026-05-24T21:22:13.663Z</text:p>
          </table:table-cell>
          <table:table-cell office: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16T19:38:34Z</text:p>
          </table:table-cell>
          <table:table-cell office:value-type="string">
            <text:p>2026-05-16T19:38: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5-16T19:38:3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
          </table:table-cell>
          <table:table-cell office:value-type="string">
            <text:p>gitea-react-toolkit</text:p>
          </table:table-cell>
          <table:table-cell office:value-type="string">
            <text:p>False</text:p>
          </table:table-cell>
          <table:table-cell office:value-type="string">
            <text:p>17473</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6T05:40:18Z</text:p>
          </table:table-cell>
          <table:table-cell office:value-type="string">
            <text:p>2026-05-05T16:33:43Z</text:p>
          </table:table-cell>
          <table:table-cell office:value-type="string">
            <text:p/>
          </table:table-cell>
          <table:table-cell office:value-type="string">
            <text:p>9</text:p>
          </table:table-cell>
          <table:table-cell office:value-type="string">
            <text:p>1</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14T01:06:5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
          </table:table-cell>
          <table:table-cell office:value-type="string">
            <text:p>single-scripture-rcl</text:p>
          </table:table-cell>
          <table:table-cell office:value-type="string">
            <text:p>False</text:p>
          </table:table-cell>
          <table:table-cell office:value-type="string">
            <text:p>9774</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
          </table:table-cell>
          <table:table-cell office:value-type="string">
            <text:p>translation-helps-rcl</text:p>
          </table:table-cell>
          <table:table-cell office:value-type="string">
            <text:p>False</text:p>
          </table:table-cell>
          <table:table-cell office:value-type="string">
            <text:p>15003</text:p>
          </table:table-cell>
          <table:table-cell office:value-type="string">
            <text:p>2026-03-27T22:01:47.002Z</text:p>
          </table:table-cell>
          <table:table-cell office:value-type="string">
            <text:p>next-js-template, gateway-edit, admin-app, create-app, gateway-admin, single-scripture-rcl, bsa,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dcs-branch-merger</text:p>
          </table:table-cell>
          <table:table-cell office:value-type="string">
            <text:p>False</text:p>
          </table:table-cell>
          <table:table-cell office:value-type="string">
            <text:p>3615</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
          </table:table-cell>
          <table:table-cell office:value-type="string">
            <text:p>scripture-resources-rcl</text:p>
          </table:table-cell>
          <table:table-cell office:value-type="string">
            <text:p>False</text:p>
          </table:table-cell>
          <table:table-cell office:value-type="string">
            <text:p>15048</text:p>
          </table:table-cell>
          <table:table-cell office:value-type="string">
            <text:p>2026-03-19T13:24:25.124Z</text:p>
          </table:table-cell>
          <table:table-cell office: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quote-helpers</text:p>
          </table:table-cell>
          <table:table-cell office:value-type="string">
            <text:p>False</text:p>
          </table:table-cell>
          <table:table-cell office:value-type="string">
            <text:p>3142</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0976</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twl-generator, door43-preview-app,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
          </table:table-cell>
          <table:table-cell office:value-type="string">
            <text:p>tsv-groupdata-parser</text:p>
          </table:table-cell>
          <table:table-cell office:value-type="string">
            <text:p>False</text:p>
          </table:table-cell>
          <table:table-cell office:value-type="string">
            <text:p>6418</text:p>
          </table:table-cell>
          <table:table-cell office:value-type="string">
            <text:p>2024-10-16T17:43:33.516Z</text:p>
          </table:table-cell>
          <table:table-cell office:value-type="string">
            <text:p>checking-extension, pdf-generator, translationCore, uw-quote-helpers,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
          </table:table-cell>
          <table:table-cell office:value-type="string">
            <text:p>tc-source-content-updater</text:p>
          </table:table-cell>
          <table:table-cell office:value-type="string">
            <text:p>False</text:p>
          </table:table-cell>
          <table:table-cell office:value-type="string">
            <text:p>7777</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
          </table:table-cell>
          <table:table-cell office:value-type="string">
            <text:p>checking-tool-rcl</text:p>
          </table:table-cell>
          <table:table-cell office:value-type="string">
            <text:p>False</text:p>
          </table:table-cell>
          <table:table-cell office:value-type="string">
            <text:p>5895</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translationCore, wordAlignment, word-aligner-rcl, uw-wordmapbooster</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markdown-translatable</text:p>
          </table:table-cell>
          <table:table-cell office:value-type="string">
            <text:p>False</text:p>
          </table:table-cell>
          <table:table-cell office:value-type="string">
            <text:p>18050</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
          </table:table-cell>
          <table:table-cell office:value-type="string">
            <text:p>tc-ui-toolkit</text:p>
          </table:table-cell>
          <table:table-cell office:value-type="string">
            <text:p>False</text:p>
          </table:table-cell>
          <table:table-cell office:value-type="string">
            <text:p>29502</text:p>
          </table:table-cell>
          <table:table-cell office:value-type="string">
            <text:p>2024-12-31T18:53:34.752Z</text:p>
          </table:table-cell>
          <table:table-cell office:value-type="string">
            <text:p>alignment-playground, next-js-template, gateway-edit, translationCore, wordAlignment, gateway-admin, tc-create-app, single-scripture-rcl, translation-helps-rcl, scripture-resources-rcl, bsa,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ld-language-map-rcl</text:p>
          </table:table-cell>
          <table:table-cell office:value-type="string">
            <text:p>False</text:p>
          </table:table-cell>
          <table:table-cell office:value-type="string">
            <text:p>116</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
          </table:table-cell>
          <table:table-cell office:value-type="string">
            <text:p>bible-reference-rcl</text:p>
          </table:table-cell>
          <table:table-cell office:value-type="string">
            <text:p>False</text:p>
          </table:table-cell>
          <table:table-cell office:value-type="string">
            <text:p>5135</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
          </table:table-cell>
          <table:table-cell office:value-type="string">
            <text:p>scripture-tsv</text:p>
          </table:table-cell>
          <table:table-cell office:value-type="string">
            <text:p>False</text:p>
          </table:table-cell>
          <table:table-cell office:value-type="string">
            <text:p>2669</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reference-range</text:p>
          </table:table-cell>
          <table:table-cell office:value-type="string">
            <text:p>False</text:p>
          </table:table-cell>
          <table:table-cell office:value-type="string">
            <text:p>16712</text:p>
          </table:table-cell>
          <table:table-cell office:value-type="string">
            <text:p>2023-12-07T19:15:35.590Z</text:p>
          </table:table-cell>
          <table:table-cell office: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tsv-parser</text:p>
          </table:table-cell>
          <table:table-cell office:value-type="string">
            <text:p>False</text:p>
          </table:table-cell>
          <table:table-cell office:value-type="string">
            <text:p>4619</text:p>
          </table:table-cell>
          <table:table-cell office:value-type="string">
            <text:p>2022-02-02T14:06:17.344Z</text:p>
          </table:table-cell>
          <table:table-cell office:value-type="string">
            <text:p>checking-extension, gateway-admin, tc-create-app, word-aligner-rcl, tsv-groupdata-parser, checking-tool-rcl</text:p>
          </table:table-cell>
          <table:table-cell office:value-type="string">
            <text:p/>
          </table:table-cell>
          <table:table-cell office:value-type="string">
            <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
          </table:table-cell>
          <table:table-cell office:value-type="string">
            <text:p>epitelete-html</text:p>
          </table:table-cell>
          <table:table-cell office:value-type="string">
            <text:p>False</text:p>
          </table:table-cell>
          <table:table-cell office:value-type="string">
            <text:p>10010</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False</text:p>
          </table:table-cell>
          <table:table-cell office:value-type="string">
            <text:p>607</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
          </table:table-cell>
          <table:table-cell office:value-type="string">
            <text:p>uw-editor</text:p>
          </table:table-cell>
          <table:table-cell office:value-type="string">
            <text:p>True</text:p>
          </table:table-cell>
          <table:table-cell office:value-type="string">
            <text:p>1183</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dcs-react-hooks</text:p>
          </table:table-cell>
          <table:table-cell office:value-type="string">
            <text:p>False</text:p>
          </table:table-cell>
          <table:table-cell office:value-type="string">
            <text:p>178</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resource-workspace-rcl</text:p>
          </table:table-cell>
          <table:table-cell office:value-type="string">
            <text:p>False</text:p>
          </table:table-cell>
          <table:table-cell office:value-type="string">
            <text:p>2803</text:p>
          </table:table-cell>
          <table:table-cell office:value-type="string">
            <text:p>2023-06-13T13:51:03.803Z</text:p>
          </table:table-cell>
          <table:table-cell office:value-type="string">
            <text:p>next-js-template, gateway-edit, admin-app, create-app, gateway-admin, bsa,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
          </table:table-cell>
          <table:table-cell office:value-type="string">
            <text:p>book-package-app</text:p>
          </table:table-cell>
          <table:table-cell office:value-type="string">
            <text:p>False</text:p>
          </table:table-cell>
          <table:table-cell office:value-type="string">
            <text:p>115</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enhanced-word-aligner-rcl, gitea-react-toolkit, single-scripture-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
          </table:table-cell>
          <table:table-cell office:value-type="string">
            <text:p>uw-word-count</text:p>
          </table:table-cell>
          <table:table-cell office:value-type="string">
            <text:p>False</text:p>
          </table:table-cell>
          <table:table-cell office:value-type="string">
            <text:p>365</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translationCore, wordAlignment, string-punctuation-tokenizer, word-aligner-rcl, word-aligner-lib, uw-wordmapbooster, checking-tool-rcl, wordmap, wordmap-usfm</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7</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
          </table:table-cell>
          <table:table-cell office:value-type="string">
            <text:p>gogs-client</text:p>
          </table:table-cell>
          <table:table-cell office:value-type="string">
            <text:p>False</text:p>
          </table:table-cell>
          <table:table-cell office:value-type="string">
            <text:p>6728</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
          </table:table-cell>
          <table:table-cell office:value-type="string">
            <text:p>electronite</text:p>
          </table:table-cell>
          <table:table-cell office:value-type="string">
            <text:p>False</text:p>
          </table:table-cell>
          <table:table-cell office:value-type="string">
            <text:p>2609</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resource-container</text:p>
          </table:table-cell>
          <table:table-cell office:value-type="string">
            <text:p>False</text:p>
          </table:table-cell>
          <table:table-cell office:value-type="string">
            <text:p>3150</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rc</text:p>
          </table:table-cell>
          <table:table-cell office:value-type="string">
            <text:p>True</text:p>
          </table:table-cell>
          <table:table-cell office:value-type="string">
            <text:p>1502</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16-08-15T16:29:38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text:p>
          </table:table-cell>
          <table:table-cell office:value-type="string">
            <text:p/>
          </table:table-cell>
          <table:table-cell office:value-type="string">
            <text:p>1852</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core</text:p>
          </table:table-cell>
          <table:table-cell office:value-type="string">
            <text:p/>
          </table:table-cell>
          <table:table-cell office:value-type="string">
            <text:p>407</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pk</text:p>
          </table:table-cell>
          <table:table-cell office:value-type="string">
            <text:p/>
          </table:table-cell>
          <table:table-cell office:value-type="string">
            <text:p>131</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core</text:p>
          </table:table-cell>
          <table:table-cell office:value-type="string">
            <text:p/>
          </table:table-cell>
          <table:table-cell office:value-type="string">
            <text:p>645</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pk</text:p>
          </table:table-cell>
          <table:table-cell office:value-type="string">
            <text:p/>
          </table:table-cell>
          <table:table-cell office:value-type="string">
            <text:p>337</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simple</text:p>
          </table:table-cell>
          <table:table-cell office:value-type="string">
            <text:p/>
          </table:table-cell>
          <table:table-cell office:value-type="string">
            <text:p>373</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verse-mapper</text:p>
          </table:table-cell>
          <table:table-cell office:value-type="string">
            <text:p/>
          </table:table-cell>
          <table:table-cell office:value-type="string">
            <text:p>98</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
          </table:table-cell>
          <table:table-cell office:value-type="string">
            <text:p>607</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git submodules</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simple-text-editor-rcl</text:p>
          </table:table-cell>
          <table:table-cell office:value-type="string">
            <text:p>False</text:p>
          </table:table-cell>
          <table:table-cell office:value-type="string">
            <text:p>3912</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proskomma</text:p>
          </table:table-cell>
          <table:table-cell office:value-type="string">
            <text:p>False</text:p>
          </table:table-cell>
          <table:table-cell office:value-type="string">
            <text:p>2361</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
          </table:table-cell>
          <table:table-cell office:value-type="string">
            <text:p>wordmap-react-toolkit</text:p>
          </table:table-cell>
          <table:table-cell office:value-type="string">
            <text:p>False</text:p>
          </table:table-cell>
          <table:table-cell office:value-type="string">
            <text:p>225</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content-validation-app</text:p>
          </table:table-cell>
          <table:table-cell office:value-type="string">
            <text:p>False</text:p>
          </table:table-cell>
          <table:table-cell office:value-type="string">
            <text:p>188</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5:25:46Z</text:p>
          </table:table-cell>
          <table:table-cell office:value-type="string">
            <text:p>2026-06-17T15:25:36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5:27:01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14:59:01Z</text:p>
          </table:table-cell>
          <table:table-cell office:value-type="string">
            <text:p>2026-06-17T14:58: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7T15:03:26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7T06:45:29Z</text:p>
          </table:table-cell>
          <table:table-cell office:value-type="string">
            <text:p>2026-06-17T06:45: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wl-generator, tsv-twl-creation-app,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17T06:45:34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2:45:39Z</text:p>
          </table:table-cell>
          <table:table-cell office:value-type="string">
            <text:p>2026-06-16T22:45: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6T22:45:44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wl-generator</text:p>
          </table:table-cell>
          <table:table-cell office:value-type="string">
            <text:p>False</text:p>
          </table:table-cell>
          <table:table-cell office:value-type="string">
            <text:p>5594</text:p>
          </table:table-cell>
          <table:table-cell office:value-type="string">
            <text:p>2026-06-16T10:00:58.589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5:26:25Z</text:p>
          </table:table-cell>
          <table:table-cell office:value-type="string">
            <text:p>2026-06-16T21:32:07Z</text:p>
          </table:table-cell>
          <table:table-cell office:value-type="string">
            <text:p/>
          </table:table-cell>
          <table:table-cell office:value-type="string">
            <text:p>110</text:p>
          </table:table-cell>
          <table:table-cell office:value-type="string">
            <text:p>10</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16T21:33:14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17:48:59Z</text:p>
          </table:table-cell>
          <table:table-cell office:value-type="string">
            <text:p>2026-06-13T17:48:58Z</text:p>
          </table:table-cell>
          <table:table-cell office:value-type="string">
            <text:p/>
          </table:table-cell>
          <table:table-cell office:value-type="string">
            <text:p>7</text:p>
          </table:table-cell>
          <table:table-cell office:value-type="string">
            <text:p>1</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3T17:49:02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
          </table:table-cell>
          <table:table-cell office:value-type="string">
            <text:p>uw-content-validation</text:p>
          </table:table-cell>
          <table:table-cell office:value-type="string">
            <text:p>False</text:p>
          </table:table-cell>
          <table:table-cell office:value-type="string">
            <text:p>2070</text:p>
          </table:table-cell>
          <table:table-cell office:value-type="string">
            <text:p>2026-06-07T09:30:48.45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3T18:25:41Z</text:p>
          </table:table-cell>
          <table:table-cell office:value-type="string">
            <text:p>2026-06-03T18:25:3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03T18:25:59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enhanced-word-aligner-rcl</text:p>
          </table:table-cell>
          <table:table-cell office:value-type="string">
            <text:p>False</text:p>
          </table:table-cell>
          <table:table-cell office:value-type="string">
            <text:p>24656</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
          </table:table-cell>
          <table:table-cell office:value-type="string">
            <text:p>tc-create-app</text:p>
          </table:table-cell>
          <table:table-cell office:value-type="string">
            <text:p>False</text:p>
          </table:table-cell>
          <table:table-cell office:value-type="string">
            <text:p>73</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
          </table:table-cell>
          <table:table-cell office:value-type="string">
            <text:p>uw-languages-rcl</text:p>
          </table:table-cell>
          <table:table-cell office:value-type="string">
            <text:p>False</text:p>
          </table:table-cell>
          <table:table-cell office:value-type="string">
            <text:p>1220</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
          </table:table-cell>
          <table:table-cell office:value-type="string">
            <text:p>string-punctuation-tokenizer</text:p>
          </table:table-cell>
          <table:table-cell office:value-type="string">
            <text:p>False</text:p>
          </table:table-cell>
          <table:table-cell office:value-type="string">
            <text:p>98082</text:p>
          </table:table-cell>
          <table:table-cell office:value-type="string">
            <text:p>2021-08-25T21:55:46.406Z</text:p>
          </table:table-cell>
          <table:table-cell office:value-type="string">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
          </table:table-cell>
          <table:table-cell office:value-type="string">
            <text:p>word-aligner-rcl</text:p>
          </table:table-cell>
          <table:table-cell office:value-type="string">
            <text:p>False</text:p>
          </table:table-cell>
          <table:table-cell office:value-type="string">
            <text:p>16522</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aligner-lib</text:p>
          </table:table-cell>
          <table:table-cell office:value-type="string">
            <text:p>False</text:p>
          </table:table-cell>
          <table:table-cell office:value-type="string">
            <text:p>4741</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
          </table:table-cell>
          <table:table-cell office:value-type="string">
            <text:p>word-aligner</text:p>
          </table:table-cell>
          <table:table-cell office:value-type="string">
            <text:p>False</text:p>
          </table:table-cell>
          <table:table-cell office:value-type="string">
            <text:p>44675</text:p>
          </table:table-cell>
          <table:table-cell office:value-type="string">
            <text:p>2026-05-24T21:22:13.663Z</text:p>
          </table:table-cell>
          <table:table-cell office: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
          </table:table-cell>
          <table:table-cell office:value-type="string">
            <text:p>gitea-react-toolkit</text:p>
          </table:table-cell>
          <table:table-cell office:value-type="string">
            <text:p>False</text:p>
          </table:table-cell>
          <table:table-cell office:value-type="string">
            <text:p>17473</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6T05:40:18Z</text:p>
          </table:table-cell>
          <table:table-cell office:value-type="string">
            <text:p>2026-05-05T16:33:43Z</text:p>
          </table:table-cell>
          <table:table-cell office:value-type="string">
            <text:p/>
          </table:table-cell>
          <table:table-cell office:value-type="string">
            <text:p>9</text:p>
          </table:table-cell>
          <table:table-cell office:value-type="string">
            <text:p>1</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
          </table:table-cell>
          <table:table-cell office:value-type="string">
            <text:p>single-scripture-rcl</text:p>
          </table:table-cell>
          <table:table-cell office:value-type="string">
            <text:p>False</text:p>
          </table:table-cell>
          <table:table-cell office:value-type="string">
            <text:p>9774</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
          </table:table-cell>
          <table:table-cell office:value-type="string">
            <text:p>translation-helps-rcl</text:p>
          </table:table-cell>
          <table:table-cell office:value-type="string">
            <text:p>False</text:p>
          </table:table-cell>
          <table:table-cell office:value-type="string">
            <text:p>15003</text:p>
          </table:table-cell>
          <table:table-cell office:value-type="string">
            <text:p>2026-03-27T22:01:47.002Z</text:p>
          </table:table-cell>
          <table:table-cell office:value-type="string">
            <text:p>next-js-template, gateway-edit, admin-app, create-app, gateway-admin, single-scripture-rcl, bsa,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dcs-branch-merger</text:p>
          </table:table-cell>
          <table:table-cell office:value-type="string">
            <text:p>False</text:p>
          </table:table-cell>
          <table:table-cell office:value-type="string">
            <text:p>3615</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
          </table:table-cell>
          <table:table-cell office:value-type="string">
            <text:p>scripture-resources-rcl</text:p>
          </table:table-cell>
          <table:table-cell office:value-type="string">
            <text:p>False</text:p>
          </table:table-cell>
          <table:table-cell office:value-type="string">
            <text:p>15048</text:p>
          </table:table-cell>
          <table:table-cell office:value-type="string">
            <text:p>2026-03-19T13:24:25.124Z</text:p>
          </table:table-cell>
          <table:table-cell office: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quote-helpers</text:p>
          </table:table-cell>
          <table:table-cell office:value-type="string">
            <text:p>False</text:p>
          </table:table-cell>
          <table:table-cell office:value-type="string">
            <text:p>3142</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twl-generator, door43-preview-app,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
          </table:table-cell>
          <table:table-cell office:value-type="string">
            <text:p>tsv-groupdata-parser</text:p>
          </table:table-cell>
          <table:table-cell office:value-type="string">
            <text:p>False</text:p>
          </table:table-cell>
          <table:table-cell office:value-type="string">
            <text:p>6418</text:p>
          </table:table-cell>
          <table:table-cell office:value-type="string">
            <text:p>2024-10-16T17:43:33.516Z</text:p>
          </table:table-cell>
          <table:table-cell office:value-type="string">
            <text:p>checking-extension, pdf-generator, translationCore, uw-quote-helpers,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
          </table:table-cell>
          <table:table-cell office:value-type="string">
            <text:p>tc-source-content-updater</text:p>
          </table:table-cell>
          <table:table-cell office:value-type="string">
            <text:p>False</text:p>
          </table:table-cell>
          <table:table-cell office:value-type="string">
            <text:p>7777</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
          </table:table-cell>
          <table:table-cell office:value-type="string">
            <text:p>checking-tool-rcl</text:p>
          </table:table-cell>
          <table:table-cell office:value-type="string">
            <text:p>False</text:p>
          </table:table-cell>
          <table:table-cell office:value-type="string">
            <text:p>5895</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translationCore, wordAlignment, word-aligner-rcl, uw-wordmapbooster</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
          </table:table-cell>
          <table:table-cell office:value-type="string">
            <text:p>markdown-translatable</text:p>
          </table:table-cell>
          <table:table-cell office:value-type="string">
            <text:p>False</text:p>
          </table:table-cell>
          <table:table-cell office:value-type="string">
            <text:p>18050</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
          </table:table-cell>
          <table:table-cell office:value-type="string">
            <text:p>tc-ui-toolkit</text:p>
          </table:table-cell>
          <table:table-cell office:value-type="string">
            <text:p>False</text:p>
          </table:table-cell>
          <table:table-cell office:value-type="string">
            <text:p>29502</text:p>
          </table:table-cell>
          <table:table-cell office:value-type="string">
            <text:p>2024-12-31T18:53:34.752Z</text:p>
          </table:table-cell>
          <table:table-cell office:value-type="string">
            <text:p>alignment-playground, next-js-template, gateway-edit, translationCore, wordAlignment, gateway-admin, tc-create-app, single-scripture-rcl, translation-helps-rcl, scripture-resources-rcl, bsa,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ld-language-map-rcl</text:p>
          </table:table-cell>
          <table:table-cell office:value-type="string">
            <text:p>False</text:p>
          </table:table-cell>
          <table:table-cell office:value-type="string">
            <text:p>116</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
          </table:table-cell>
          <table:table-cell office:value-type="string">
            <text:p>bible-reference-rcl</text:p>
          </table:table-cell>
          <table:table-cell office:value-type="string">
            <text:p>False</text:p>
          </table:table-cell>
          <table:table-cell office:value-type="string">
            <text:p>5135</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
          </table:table-cell>
          <table:table-cell office:value-type="string">
            <text:p>scripture-tsv</text:p>
          </table:table-cell>
          <table:table-cell office:value-type="string">
            <text:p>False</text:p>
          </table:table-cell>
          <table:table-cell office:value-type="string">
            <text:p>2669</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ible-reference-range</text:p>
          </table:table-cell>
          <table:table-cell office:value-type="string">
            <text:p>False</text:p>
          </table:table-cell>
          <table:table-cell office:value-type="string">
            <text:p>16712</text:p>
          </table:table-cell>
          <table:table-cell office:value-type="string">
            <text:p>2023-12-07T19:15:35.590Z</text:p>
          </table:table-cell>
          <table:table-cell office: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uw-tsv-parser</text:p>
          </table:table-cell>
          <table:table-cell office:value-type="string">
            <text:p>False</text:p>
          </table:table-cell>
          <table:table-cell office:value-type="string">
            <text:p>4619</text:p>
          </table:table-cell>
          <table:table-cell office:value-type="string">
            <text:p>2022-02-02T14:06:17.344Z</text:p>
          </table:table-cell>
          <table:table-cell office:value-type="string">
            <text:p>checking-extension, gateway-admin, tc-create-app, word-aligner-rcl, tsv-groupdata-parser, checking-tool-rcl</text:p>
          </table:table-cell>
          <table:table-cell office:value-type="string">
            <text:p/>
          </table:table-cell>
          <table:table-cell office:value-type="string">
            <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
          </table:table-cell>
          <table:table-cell office:value-type="string">
            <text:p>epitelete-html</text:p>
          </table:table-cell>
          <table:table-cell office:value-type="string">
            <text:p>False</text:p>
          </table:table-cell>
          <table:table-cell office:value-type="string">
            <text:p>10010</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False</text:p>
          </table:table-cell>
          <table:table-cell office:value-type="string">
            <text:p>607</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
          </table:table-cell>
          <table:table-cell office:value-type="string">
            <text:p>uw-editor</text:p>
          </table:table-cell>
          <table:table-cell office:value-type="string">
            <text:p>True</text:p>
          </table:table-cell>
          <table:table-cell office:value-type="string">
            <text:p>1183</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
          </table:table-cell>
          <table:table-cell office:value-type="string">
            <text:p>dcs-react-hooks</text:p>
          </table:table-cell>
          <table:table-cell office:value-type="string">
            <text:p>False</text:p>
          </table:table-cell>
          <table:table-cell office:value-type="string">
            <text:p>178</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resource-workspace-rcl</text:p>
          </table:table-cell>
          <table:table-cell office:value-type="string">
            <text:p>False</text:p>
          </table:table-cell>
          <table:table-cell office:value-type="string">
            <text:p>2803</text:p>
          </table:table-cell>
          <table:table-cell office:value-type="string">
            <text:p>2023-06-13T13:51:03.803Z</text:p>
          </table:table-cell>
          <table:table-cell office:value-type="string">
            <text:p>next-js-template, gateway-edit, admin-app, create-app, gateway-admin, bsa,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
          </table:table-cell>
          <table:table-cell office:value-type="string">
            <text:p>book-package-app</text:p>
          </table:table-cell>
          <table:table-cell office:value-type="string">
            <text:p>False</text:p>
          </table:table-cell>
          <table:table-cell office:value-type="string">
            <text:p>115</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enhanced-word-aligner-rcl, gitea-react-toolkit, single-scripture-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
          </table:table-cell>
          <table:table-cell office:value-type="string">
            <text:p>uw-word-count</text:p>
          </table:table-cell>
          <table:table-cell office:value-type="string">
            <text:p>False</text:p>
          </table:table-cell>
          <table:table-cell office:value-type="string">
            <text:p>365</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translationCore, wordAlignment, string-punctuation-tokenizer, word-aligner-rcl, word-aligner-lib, uw-wordmapbooster, checking-tool-rcl, wordmap, wordmap-usfm</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
          </table:table-cell>
          <table:table-cell office:value-type="string">
            <text:p>gogs-client</text:p>
          </table:table-cell>
          <table:table-cell office:value-type="string">
            <text:p>False</text:p>
          </table:table-cell>
          <table:table-cell office:value-type="string">
            <text:p>6728</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
          </table:table-cell>
          <table:table-cell office:value-type="string">
            <text:p>electronite</text:p>
          </table:table-cell>
          <table:table-cell office:value-type="string">
            <text:p>False</text:p>
          </table:table-cell>
          <table:table-cell office:value-type="string">
            <text:p>2609</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resource-container</text:p>
          </table:table-cell>
          <table:table-cell office:value-type="string">
            <text:p>False</text:p>
          </table:table-cell>
          <table:table-cell office:value-type="string">
            <text:p>3150</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oor43-rc</text:p>
          </table:table-cell>
          <table:table-cell office:value-type="string">
            <text:p>True</text:p>
          </table:table-cell>
          <table:table-cell office:value-type="string">
            <text:p>1502</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base</text:p>
          </table:table-cell>
          <table:table-cell office:value-type="string">
            <text:p/>
          </table:table-cell>
          <table:table-cell office:value-type="string">
            <text:p>1852</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core</text:p>
          </table:table-cell>
          <table:table-cell office:value-type="string">
            <text:p/>
          </table:table-cell>
          <table:table-cell office:value-type="string">
            <text:p>407</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pk</text:p>
          </table:table-cell>
          <table:table-cell office:value-type="string">
            <text:p/>
          </table:table-cell>
          <table:table-cell office:value-type="string">
            <text:p>131</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core</text:p>
          </table:table-cell>
          <table:table-cell office:value-type="string">
            <text:p/>
          </table:table-cell>
          <table:table-cell office:value-type="string">
            <text:p>645</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pk</text:p>
          </table:table-cell>
          <table:table-cell office:value-type="string">
            <text:p/>
          </table:table-cell>
          <table:table-cell office:value-type="string">
            <text:p>337</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simple</text:p>
          </table:table-cell>
          <table:table-cell office:value-type="string">
            <text:p/>
          </table:table-cell>
          <table:table-cell office:value-type="string">
            <text:p>373</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oce-editor-tools/verse-mapper</text:p>
          </table:table-cell>
          <table:table-cell office:value-type="string">
            <text:p/>
          </table:table-cell>
          <table:table-cell office:value-type="string">
            <text:p>98</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js</text:p>
          </table:table-cell>
          <table:table-cell office:value-type="string">
            <text:p/>
          </table:table-cell>
          <table:table-cell office:value-type="string">
            <text:p>607</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
    </office:spreadsheet>
  </office:body>
</office:document-content>
</file>