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bt-servant-signal-gateway</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8T19:11:50Z</text:p>
          </table:table-cell>
          <table:table-cell office:value-type="string">
            <text:p>2026-06-18T19:11:15Z</text:p>
          </table:table-cell>
          <table:table-cell office:value-type="string">
            <text:p/>
          </table:table-cell>
          <table:table-cell office:value-type="string">
            <text:p>11</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signal-gateway</text:p>
          </table:table-cell>
          <table:table-cell office:value-type="string">
            <text:p>2026-06-18T19:11:21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5:02:07Z</text:p>
          </table:table-cell>
          <table:table-cell office:value-type="string">
            <text:p>2026-06-18T15:01:38Z</text:p>
          </table:table-cell>
          <table:table-cell office:value-type="string">
            <text:p/>
          </table:table-cell>
          <table:table-cell office:value-type="string">
            <text:p>104</text:p>
          </table:table-cell>
          <table:table-cell office:value-type="string">
            <text:p>9</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8T15:03:36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8T14:19:40Z</text:p>
          </table:table-cell>
          <table:table-cell office:value-type="string">
            <text:p>2026-06-18T14:19: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18T14:20:38Z</text:p>
          </table:table-cell>
        </table:table-row>
        <table:table-row>
          <table:table-cell office:value-type="string">
            <text:p>meeting-issue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6-18T13:45:3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 LITSON LAMBERT</text:p>
          </table:table-cell>
          <table:table-cell office:value-type="string">
            <text:p>0</text:p>
          </table:table-cell>
          <table:table-cell office:value-type="string">
            <text:p>0</text:p>
          </table:table-cell>
          <table:table-cell office:value-type="string">
            <text:p>https://github.com/unfoldingWord/meeting-issues</text:p>
          </table:table-cell>
          <table:table-cell office:value-type="string">
            <text:p>2026-06-18T13:46:29Z</text:p>
          </table:table-cell>
        </table:table-row>
        <table:table-row>
          <table:table-cell office:value-type="string">
            <text:p>cyber-security-re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8T09:01:31Z</text:p>
          </table:table-cell>
          <table:table-cell office:value-type="string">
            <text:p>2026-06-18T09:01: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yber-security-report</text:p>
          </table:table-cell>
          <table:table-cell office:value-type="string">
            <text:p>2026-06-18T09:01:44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20:29:08Z</text:p>
          </table:table-cell>
          <table:table-cell office:value-type="string">
            <text:p>2026-06-17T14:58:59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17T15:03:26Z</text:p>
          </table:table-cell>
        </table:table-row>
        <table:table-row>
          <table:table-cell office:value-type="string">
            <text:p>claude-skill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7T14:34:2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claude-skills</text:p>
          </table:table-cell>
          <table:table-cell office:value-type="string">
            <text:p>2026-06-17T14:39:48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06:45:29Z</text:p>
          </table:table-cell>
          <table:table-cell office:value-type="string">
            <text:p>2026-06-17T06:45: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17T06:45:34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wl-generator</text:p>
          </table:table-cell>
          <table:table-cell office:value-type="string">
            <text:p>False</text:p>
          </table:table-cell>
          <table:table-cell office:value-type="string">
            <text:p>5611</text:p>
          </table:table-cell>
          <table:table-cell office:value-type="string">
            <text:p>2026-06-16T10:00:58.589Z</text:p>
          </table:table-cell>
          <table:table-cell office:value-type="string">
            <text:p/>
          </table:table-cell>
          <table:table-cell office:value-type="string">
            <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47</text:p>
          </table:table-cell>
          <table:table-cell office:value-type="string">
            <text:p>0</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6</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10:38:09Z</text:p>
          </table:table-cell>
          <table:table-cell office:value-type="string">
            <text:p>2026-06-07T10:38:05Z</text:p>
          </table:table-cell>
          <table:table-cell office:value-type="string">
            <text:p>2024-10-21T20:57:32Z</text:p>
          </table:table-cell>
          <table:table-cell office:value-type="string">
            <text:p>43</text:p>
          </table:table-cell>
          <table:table-cell office:value-type="string">
            <text:p>0</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superdav42, richmahn,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07T10:38:10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09:33:50Z</text:p>
          </table:table-cell>
          <table:table-cell office:value-type="string">
            <text:p>2026-06-07T09:31:31Z</text:p>
          </table:table-cell>
          <table:table-cell office:value-type="string">
            <text:p/>
          </table:table-cell>
          <table:table-cell office:value-type="string">
            <text:p>80</text:p>
          </table:table-cell>
          <table:table-cell office:value-type="string">
            <text:p>2</text:p>
          </table:table-cell>
          <table:table-cell office:value-type="string">
            <text:p/>
          </table:table-cell>
          <table:table-cell office:value-type="string">
            <text:p>uw-content-validation</text:p>
          </table:table-cell>
          <table:table-cell office:value-type="string">
            <text:p>False</text:p>
          </table:table-cell>
          <table:table-cell office:value-type="string">
            <text:p>2067</text:p>
          </table:table-cell>
          <table:table-cell office:value-type="string">
            <text:p>2026-06-07T09:30:48.456Z</text:p>
          </table:table-cell>
          <table:table-cell office:value-type="string">
            <text:p/>
          </table:table-cell>
          <table:table-cell office:value-type="string">
            <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07T09:31:36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4T15:07:37Z</text:p>
          </table:table-cell>
          <table:table-cell office:value-type="string">
            <text:p>2026-06-04T15:07: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keybase_git_backup</text:p>
          </table:table-cell>
          <table:table-cell office:value-type="string">
            <text:p>2026-06-04T15:11:14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dcs-homepage</text:p>
          </table:table-cell>
          <table:table-cell office:value-type="string">
            <text:p>unfoldingWord</text:p>
          </table:table-cell>
          <table:table-cell office:value-type="string">
            <text:p>Go Template</text:p>
          </table:table-cell>
          <table:table-cell office:value-type="string">
            <text:p>False</text:p>
          </table:table-cell>
          <table:table-cell office:value-type="string">
            <text:p>False</text:p>
          </table:table-cell>
          <table:table-cell office:value-type="string">
            <text:p>2026-06-03T16:01:29Z</text:p>
          </table:table-cell>
          <table:table-cell office:value-type="string">
            <text:p>2026-06-03T16:01: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text:p>
          </table:table-cell>
          <table:table-cell office:value-type="string">
            <text:p>2026-06-03T16:04:29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8:11Z</text:p>
          </table:table-cell>
          <table:table-cell office:value-type="string">
            <text:p>2026-06-03T15:58: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ichmahn</text:p>
          </table:table-cell>
          <table:table-cell office:value-type="string">
            <text:p>0</text:p>
          </table:table-cell>
          <table:table-cell office:value-type="string">
            <text:p>0</text:p>
          </table:table-cell>
          <table:table-cell office:value-type="string">
            <text:p>https://github.com/unfoldingWord/minitracker</text:p>
          </table:table-cell>
          <table:table-cell office:value-type="string">
            <text:p>2026-06-03T16:02:34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3:05Z</text:p>
          </table:table-cell>
          <table:table-cell office:value-type="string">
            <text:p>2026-06-03T15:53: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 richmahn</text:p>
          </table:table-cell>
          <table:table-cell office:value-type="string">
            <text:p>0</text:p>
          </table:table-cell>
          <table:table-cell office:value-type="string">
            <text:p>0</text:p>
          </table:table-cell>
          <table:table-cell office:value-type="string">
            <text:p>https://github.com/unfoldingWord/cloudfront_logprocessor</text:p>
          </table:table-cell>
          <table:table-cell office:value-type="string">
            <text:p>2026-06-03T15:57:01Z</text:p>
          </table:table-cell>
        </table:table-row>
        <table:table-row>
          <table:table-cell office:value-type="string">
            <text:p>uf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6-02T19:41:29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yakob-aleksandrovich, jag3773, kellyvivancox, richmahn, drcox633</text:p>
          </table:table-cell>
          <table:table-cell office:value-type="string">
            <text:p>0</text:p>
          </table:table-cell>
          <table:table-cell office:value-type="string">
            <text:p>0</text:p>
          </table:table-cell>
          <table:table-cell office:value-type="string">
            <text:p>https://github.com/unfoldingWord/ufw_redirects</text:p>
          </table:table-cell>
          <table:table-cell office:value-type="string">
            <text:p>2026-06-02T19:41:33Z</text:p>
          </table:table-cell>
        </table:table-row>
        <table:table-row>
          <table:table-cell office:value-type="string">
            <text:p>budget-report</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02T19:21:1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udget-report</text:p>
          </table:table-cell>
          <table:table-cell office:value-type="string">
            <text:p>2026-06-02T19:21:17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enhanced-word-aligner-rcl</text:p>
          </table:table-cell>
          <table:table-cell office:value-type="string">
            <text:p>False</text:p>
          </table:table-cell>
          <table:table-cell office:value-type="string">
            <text:p>24657</text:p>
          </table:table-cell>
          <table:table-cell office:value-type="string">
            <text:p>2026-06-02T13:32:18.685Z</text:p>
          </table:table-cell>
          <table:table-cell office:value-type="string">
            <text:p/>
          </table:table-cell>
          <table:table-cell office:value-type="string">
            <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uw-zulip-mc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29T15:05:23Z</text:p>
          </table:table-cell>
          <table:table-cell office:value-type="string">
            <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kougkas, nlightcc, sethstoll3, sethstoll, yakob-aleksandrovich, klutchell</text:p>
          </table:table-cell>
          <table:table-cell office:value-type="string">
            <text:p>0</text:p>
          </table:table-cell>
          <table:table-cell office:value-type="string">
            <text:p>0</text:p>
          </table:table-cell>
          <table:table-cell office:value-type="string">
            <text:p>https://github.com/unfoldingWord/uw-zulip-mcp</text:p>
          </table:table-cell>
          <table:table-cell office:value-type="string">
            <text:p>2026-05-29T15:06:34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9T18:54:12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
          </table:table-cell>
          <table:table-cell office:value-type="string">
            <text:p>tc-create-app</text:p>
          </table:table-cell>
          <table:table-cell office:value-type="string">
            <text:p>False</text:p>
          </table:table-cell>
          <table:table-cell office:value-type="string">
            <text:p>73</text:p>
          </table:table-cell>
          <table:table-cell office:value-type="string">
            <text:p>2022-02-22T21:12:10.659Z</text:p>
          </table:table-cell>
          <table:table-cell office:value-type="string">
            <text:p/>
          </table:table-cell>
          <table:table-cell office:value-type="string">
            <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
          </table:table-cell>
          <table:table-cell office:value-type="string">
            <text:p>uw-languages-rcl</text:p>
          </table:table-cell>
          <table:table-cell office:value-type="string">
            <text:p>False</text:p>
          </table:table-cell>
          <table:table-cell office:value-type="string">
            <text:p>1220</text:p>
          </table:table-cell>
          <table:table-cell office:value-type="string">
            <text:p>2026-05-28T16:01:32.183Z</text:p>
          </table:table-cell>
          <table:table-cell office:value-type="string">
            <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
          </table:table-cell>
          <table:table-cell office:value-type="string">
            <text:p>string-punctuation-tokenizer</text:p>
          </table:table-cell>
          <table:table-cell office:value-type="string">
            <text:p>False</text:p>
          </table:table-cell>
          <table:table-cell office:value-type="string">
            <text:p>98531</text:p>
          </table:table-cell>
          <table:table-cell office:value-type="string">
            <text:p>2021-08-25T21:55:46.406Z</text:p>
          </table:table-cell>
          <table:table-cell office:value-type="string">
            <text:p/>
          </table:table-cell>
          <table:table-cell office:value-type="string">
            <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
          </table:table-cell>
          <table:table-cell office:value-type="string">
            <text:p>word-aligner-rcl</text:p>
          </table:table-cell>
          <table:table-cell office:value-type="string">
            <text:p>False</text:p>
          </table:table-cell>
          <table:table-cell office:value-type="string">
            <text:p>16552</text:p>
          </table:table-cell>
          <table:table-cell office:value-type="string">
            <text:p>2026-05-24T23:03:19.258Z</text:p>
          </table:table-cell>
          <table:table-cell office:value-type="string">
            <text:p/>
          </table:table-cell>
          <table:table-cell office:value-type="string">
            <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aligner-lib</text:p>
          </table:table-cell>
          <table:table-cell office:value-type="string">
            <text:p>False</text:p>
          </table:table-cell>
          <table:table-cell office:value-type="string">
            <text:p>4867</text:p>
          </table:table-cell>
          <table:table-cell office:value-type="string">
            <text:p>2026-05-24T22:38:01.649Z</text:p>
          </table:table-cell>
          <table:table-cell office:value-type="string">
            <text:p/>
          </table:table-cell>
          <table:table-cell office:value-type="string">
            <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
          </table:table-cell>
          <table:table-cell office:value-type="string">
            <text:p>word-aligner</text:p>
          </table:table-cell>
          <table:table-cell office:value-type="string">
            <text:p>False</text:p>
          </table:table-cell>
          <table:table-cell office:value-type="string">
            <text:p>44815</text:p>
          </table:table-cell>
          <table:table-cell office:value-type="string">
            <text:p>2026-05-24T21:22:13.663Z</text:p>
          </table:table-cell>
          <table:table-cell office:value-type="string">
            <text:p/>
          </table:table-cell>
          <table:table-cell office:value-type="string">
            <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laude_security_sentinel</text:p>
          </table:table-cell>
          <table:table-cell office:value-type="string">
            <text:p>2026-05-22T15:02:16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0</text:p>
          </table:table-cell>
          <table:table-cell office:value-type="string">
            <text:p>0</text:p>
          </table:table-cell>
          <table:table-cell office:value-type="string">
            <text:p>https://github.com/unfoldingWord/Brown-Driver-Briggs-Enhanced</text:p>
          </table:table-cell>
          <table:table-cell office:value-type="string">
            <text:p>2026-05-17T13:44:58Z</text:p>
          </table:table-cell>
        </table:table-row>
        <table:table-row>
          <table:table-cell office:value-type="string">
            <text:p>bt-servant-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5-16T19:38:34Z</text:p>
          </table:table-cell>
          <table:table-cell office:value-type="string">
            <text:p>2026-05-16T19:38:3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 sethstoll3</text:p>
          </table:table-cell>
          <table:table-cell office:value-type="string">
            <text:p>1</text:p>
          </table:table-cell>
          <table:table-cell office:value-type="string">
            <text:p>0</text:p>
          </table:table-cell>
          <table:table-cell office:value-type="string">
            <text:p>https://github.com/unfoldingWord/bt-servant-site</text:p>
          </table:table-cell>
          <table:table-cell office:value-type="string">
            <text:p>2026-05-16T19:38:3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
          </table:table-cell>
          <table:table-cell office:value-type="string">
            <text:p>gitea-react-toolkit</text:p>
          </table:table-cell>
          <table:table-cell office:value-type="string">
            <text:p>False</text:p>
          </table:table-cell>
          <table:table-cell office:value-type="string">
            <text:p>17484</text:p>
          </table:table-cell>
          <table:table-cell office:value-type="string">
            <text:p>2026-05-12T13:15:42.563Z</text:p>
          </table:table-cell>
          <table:table-cell office:value-type="string">
            <text:p/>
          </table:table-cell>
          <table:table-cell office:value-type="string">
            <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uw-dev-skill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5-11T16:50: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text:p>
          </table:table-cell>
          <table:table-cell office:value-type="string">
            <text:p>0</text:p>
          </table:table-cell>
          <table:table-cell office:value-type="string">
            <text:p>0</text:p>
          </table:table-cell>
          <table:table-cell office:value-type="string">
            <text:p>https://github.com/unfoldingWord/uw-dev-skills</text:p>
          </table:table-cell>
          <table:table-cell office:value-type="string">
            <text:p>2026-05-11T16:50:29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loki-exporter</text:p>
          </table:table-cell>
          <table:table-cell office:value-type="string">
            <text:p>2026-05-08T16:01:37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fred-mcp</text:p>
          </table:table-cell>
          <table:table-cell office:value-type="string">
            <text:p>2026-05-07T01:50:40Z</text:p>
          </table:table-cell>
        </table:table-row>
        <table:table-row>
          <table:table-cell office:value-type="string">
            <text:p>engineering-practic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5-06T21:10:0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text:p>
          </table:table-cell>
          <table:table-cell office:value-type="string">
            <text:p>0</text:p>
          </table:table-cell>
          <table:table-cell office:value-type="string">
            <text:p>0</text:p>
          </table:table-cell>
          <table:table-cell office:value-type="string">
            <text:p>https://github.com/unfoldingWord/engineering-practices</text:p>
          </table:table-cell>
          <table:table-cell office:value-type="string">
            <text:p>2026-05-06T21:10:18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8T21:52:16Z</text:p>
          </table:table-cell>
          <table:table-cell office:value-type="string">
            <text:p>2026-05-05T16:33:43Z</text:p>
          </table:table-cell>
          <table:table-cell office:value-type="string">
            <text:p/>
          </table:table-cell>
          <table:table-cell office:value-type="string">
            <text:p>11</text:p>
          </table:table-cell>
          <table:table-cell office:value-type="string">
            <text:p>2</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4-28T20:23:11Z</text:p>
          </table:table-cell>
          <table:table-cell office:value-type="string">
            <text:p>2026-04-28T20:21:50Z</text:p>
          </table:table-cell>
          <table:table-cell office:value-type="string">
            <text:p>2026-04-28T20:23: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go-rc2sb</text:p>
          </table:table-cell>
          <table:table-cell office:value-type="string">
            <text:p>2026-04-28T20:21:57Z</text:p>
          </table:table-cell>
        </table:table-row>
        <table:table-row>
          <table:table-cell office:value-type="string">
            <text:p>obs-web</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14T01:06:51Z</text:p>
          </table:table-cell>
          <table:table-cell office:value-type="string">
            <text:p>2026-04-19T02:36:29Z</text:p>
          </table:table-cell>
          <table:table-cell office:value-type="string">
            <text:p>2026-06-03T23:53:30Z</text:p>
          </table:table-cell>
          <table:table-cell office:value-type="string">
            <text:p>48</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104</text:p>
          </table:table-cell>
          <table:table-cell office:value-type="string">
            <text:p>1040</text:p>
          </table:table-cell>
          <table:table-cell office:value-type="string">
            <text:p>https://github.com/unfoldingWord/dcs</text:p>
          </table:table-cell>
          <table:table-cell office:value-type="string">
            <text:p>2026-04-19T02:36:49Z</text:p>
          </table:table-cell>
        </table:table-row>
        <table:table-row>
          <table:table-cell office:value-type="string">
            <text:p>tc-web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4-17T14:26:5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 Champeon, google-labs-jules[bot], birchamp</text:p>
          </table:table-cell>
          <table:table-cell office:value-type="string">
            <text:p>0</text:p>
          </table:table-cell>
          <table:table-cell office:value-type="string">
            <text:p>0</text:p>
          </table:table-cell>
          <table:table-cell office:value-type="string">
            <text:p>https://github.com/unfoldingWord/tc-website</text:p>
          </table:table-cell>
          <table:table-cell office:value-type="string">
            <text:p>2026-04-17T14:27:01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
          </table:table-cell>
          <table:table-cell office:value-type="string">
            <text:p>single-scripture-rcl</text:p>
          </table:table-cell>
          <table:table-cell office:value-type="string">
            <text:p>False</text:p>
          </table:table-cell>
          <table:table-cell office:value-type="string">
            <text:p>9772</text:p>
          </table:table-cell>
          <table:table-cell office:value-type="string">
            <text:p>2026-04-16T17:29:58.529Z</text:p>
          </table:table-cell>
          <table:table-cell office:value-type="string">
            <text:p/>
          </table:table-cell>
          <table:table-cell office:value-type="string">
            <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0</text:p>
          </table:table-cell>
          <table:table-cell office:value-type="string">
            <text:p>0</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0</text:p>
          </table:table-cell>
          <table:table-cell office:value-type="string">
            <text:p>0</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4-02T09:43:44Z</text:p>
          </table:table-cell>
          <table:table-cell office:value-type="string">
            <text:p>2026-04-02T09:4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
          </table:table-cell>
          <table:table-cell office:value-type="string">
            <text:p>translation-helps-rcl</text:p>
          </table:table-cell>
          <table:table-cell office:value-type="string">
            <text:p>False</text:p>
          </table:table-cell>
          <table:table-cell office:value-type="string">
            <text:p>16081</text:p>
          </table:table-cell>
          <table:table-cell office:value-type="string">
            <text:p>2026-03-27T22:01:47.002Z</text:p>
          </table:table-cell>
          <table:table-cell office:value-type="string">
            <text:p/>
          </table:table-cell>
          <table:table-cell office:value-type="string">
            <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dcs-branch-merger</text:p>
          </table:table-cell>
          <table:table-cell office:value-type="string">
            <text:p>False</text:p>
          </table:table-cell>
          <table:table-cell office:value-type="string">
            <text:p>3617</text:p>
          </table:table-cell>
          <table:table-cell office:value-type="string">
            <text:p>2026-03-27T21:57:39.012Z</text:p>
          </table:table-cell>
          <table:table-cell office:value-type="string">
            <text:p/>
          </table:table-cell>
          <table:table-cell office:value-type="string">
            <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
          </table:table-cell>
          <table:table-cell office:value-type="string">
            <text:p>scripture-resources-rcl</text:p>
          </table:table-cell>
          <table:table-cell office:value-type="string">
            <text:p>False</text:p>
          </table:table-cell>
          <table:table-cell office:value-type="string">
            <text:p>15096</text:p>
          </table:table-cell>
          <table:table-cell office:value-type="string">
            <text:p>2026-03-19T13:24:25.124Z</text:p>
          </table:table-cell>
          <table:table-cell office:value-type="string">
            <text:p/>
          </table:table-cell>
          <table:table-cell office:value-type="string">
            <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quote-helpers</text:p>
          </table:table-cell>
          <table:table-cell office:value-type="string">
            <text:p>False</text:p>
          </table:table-cell>
          <table:table-cell office:value-type="string">
            <text:p>3132</text:p>
          </table:table-cell>
          <table:table-cell office:value-type="string">
            <text:p>2025-01-17T14:55:12.819Z</text:p>
          </table:table-cell>
          <table:table-cell office:value-type="string">
            <text:p/>
          </table:table-cell>
          <table:table-cell office:value-type="string">
            <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
          </table:table-cell>
          <table:table-cell office:value-type="string">
            <text:p>datatable-translatable</text:p>
          </table:table-cell>
          <table:table-cell office:value-type="string">
            <text:p>False</text:p>
          </table:table-cell>
          <table:table-cell office:value-type="string">
            <text:p>3397</text:p>
          </table:table-cell>
          <table:table-cell office:value-type="string">
            <text:p>2026-02-02T16:12:05.648Z</text:p>
          </table:table-cell>
          <table:table-cell office:value-type="string">
            <text:p/>
          </table:table-cell>
          <table:table-cell office:value-type="string">
            <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0</text:p>
          </table:table-cell>
          <table:table-cell office:value-type="string">
            <text:p>0</text:p>
          </table:table-cell>
          <table:table-cell office:value-type="string">
            <text:p>https://github.com/unfoldingWord/MediaWiki-USFMTag</text:p>
          </table:table-cell>
          <table:table-cell office:value-type="string">
            <text:p>2026-02-23T14:45:18Z</text:p>
          </table:table-cell>
        </table:table-row>
        <table:table-row>
          <table:table-cell office:value-type="string">
            <text:p>zulip-file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2-21T13:15:07Z</text:p>
          </table:table-cell>
          <table:table-cell office:value-type="string">
            <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lightcc</text:p>
          </table:table-cell>
          <table:table-cell office:value-type="string">
            <text:p>0</text:p>
          </table:table-cell>
          <table:table-cell office:value-type="string">
            <text:p>0</text:p>
          </table:table-cell>
          <table:table-cell office:value-type="string">
            <text:p>https://github.com/unfoldingWord/zulip-files</text:p>
          </table:table-cell>
          <table:table-cell office:value-type="string">
            <text:p>2026-02-21T13:15:10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18T15:31:33Z</text:p>
          </table:table-cell>
          <table:table-cell office:value-type="string">
            <text:p>2026-02-18T15:31:28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0</text:p>
          </table:table-cell>
          <table:table-cell office:value-type="string">
            <text:p>0</text:p>
          </table:table-cell>
          <table:table-cell office:value-type="string">
            <text:p>https://github.com/unfoldingWord/metrics</text:p>
          </table:table-cell>
          <table:table-cell office:value-type="string">
            <text:p>2026-02-18T15:31:37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40</text:p>
          </table:table-cell>
          <table:table-cell office:value-type="string">
            <text:p>21002</text:p>
          </table:table-cell>
          <table:table-cell office:value-type="string">
            <text:p>https://github.com/unfoldingWord/electronite</text:p>
          </table:table-cell>
          <table:table-cell office:value-type="string">
            <text:p>2026-02-15T19:31:4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03T19:14:01Z</text:p>
          </table:table-cell>
          <table:table-cell office:value-type="string">
            <text:p>2026-02-03T19:13:59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0</text:p>
          </table:table-cell>
          <table:table-cell office:value-type="string">
            <text:p>0</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6</text:p>
          </table:table-cell>
          <table:table-cell office:value-type="string">
            <text:p>0</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0</text:p>
          </table:table-cell>
          <table:table-cell office:value-type="string">
            <text:p>0</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0</text:p>
          </table:table-cell>
          <table:table-cell office:value-type="string">
            <text:p>0</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0</text:p>
          </table:table-cell>
          <table:table-cell office:value-type="string">
            <text:p>0</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0</text:p>
          </table:table-cell>
          <table:table-cell office:value-type="string">
            <text:p>0</text:p>
          </table:table-cell>
          <table:table-cell office:value-type="string">
            <text:p>https://github.com/unfoldingWord/kr1-data-scripts</text:p>
          </table:table-cell>
          <table:table-cell office:value-type="string">
            <text:p>2025-12-12T04:31:59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lb-en</text:p>
          </table:table-cell>
          <table:table-cell office:value-type="string">
            <text:p>2025-12-05T15:37:06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0</text:p>
          </table:table-cell>
          <table:table-cell office:value-type="string">
            <text:p>0</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
          </table:table-cell>
          <table:table-cell office:value-type="string">
            <text:p>tsv-groupdata-parser</text:p>
          </table:table-cell>
          <table:table-cell office:value-type="string">
            <text:p>False</text:p>
          </table:table-cell>
          <table:table-cell office:value-type="string">
            <text:p>6419</text:p>
          </table:table-cell>
          <table:table-cell office:value-type="string">
            <text:p>2024-10-16T17:43:33.516Z</text:p>
          </table:table-cell>
          <table:table-cell office:value-type="string">
            <text:p/>
          </table:table-cell>
          <table:table-cell office:value-type="string">
            <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2</text:p>
          </table:table-cell>
          <table:table-cell office:value-type="string">
            <text:p>9</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3T22:32:56Z</text:p>
          </table:table-cell>
          <table:table-cell office:value-type="string">
            <text:p>2025-11-23T22:3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
          </table:table-cell>
          <table:table-cell office:value-type="string">
            <text:p>tc-source-content-updater</text:p>
          </table:table-cell>
          <table:table-cell office:value-type="string">
            <text:p>False</text:p>
          </table:table-cell>
          <table:table-cell office:value-type="string">
            <text:p>7777</text:p>
          </table:table-cell>
          <table:table-cell office:value-type="string">
            <text:p>2025-10-28T18:16:22.466Z</text:p>
          </table:table-cell>
          <table:table-cell office:value-type="string">
            <text:p/>
          </table:table-cell>
          <table:table-cell office:value-type="string">
            <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
          </table:table-cell>
          <table:table-cell office:value-type="string">
            <text:p>checking-tool-rcl</text:p>
          </table:table-cell>
          <table:table-cell office:value-type="string">
            <text:p>False</text:p>
          </table:table-cell>
          <table:table-cell office:value-type="string">
            <text:p>5894</text:p>
          </table:table-cell>
          <table:table-cell office:value-type="string">
            <text:p>2025-10-20T15:58:23.259Z</text:p>
          </table:table-cell>
          <table:table-cell office:value-type="string">
            <text:p/>
          </table:table-cell>
          <table:table-cell office:value-type="string">
            <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0</text:p>
          </table:table-cell>
          <table:table-cell office:value-type="string">
            <text:p>0</text:p>
          </table:table-cell>
          <table:table-cell office:value-type="string">
            <text:p>https://github.com/unfoldingWord/fred-zulip-bot</text:p>
          </table:table-cell>
          <table:table-cell office:value-type="string">
            <text:p>2025-10-07T20:31:31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0</text:p>
          </table:table-cell>
          <table:table-cell office:value-type="string">
            <text:p>0</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0</text:p>
          </table:table-cell>
          <table:table-cell office:value-type="string">
            <text:p>0</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2</text:p>
          </table:table-cell>
          <table:table-cell office:value-type="string">
            <text:p>0</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
          </table:table-cell>
          <table:table-cell office:value-type="string">
            <text:p>markdown-translatable</text:p>
          </table:table-cell>
          <table:table-cell office:value-type="string">
            <text:p>False</text:p>
          </table:table-cell>
          <table:table-cell office:value-type="string">
            <text:p>18062</text:p>
          </table:table-cell>
          <table:table-cell office:value-type="string">
            <text:p>2023-03-07T15:00:29.476Z</text:p>
          </table:table-cell>
          <table:table-cell office:value-type="string">
            <text:p/>
          </table:table-cell>
          <table:table-cell office:value-type="string">
            <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
          </table:table-cell>
          <table:table-cell office:value-type="string">
            <text:p>tc-ui-toolkit</text:p>
          </table:table-cell>
          <table:table-cell office:value-type="string">
            <text:p>False</text:p>
          </table:table-cell>
          <table:table-cell office:value-type="string">
            <text:p>29501</text:p>
          </table:table-cell>
          <table:table-cell office:value-type="string">
            <text:p>2024-12-31T18:53:34.752Z</text:p>
          </table:table-cell>
          <table:table-cell office:value-type="string">
            <text:p/>
          </table:table-cell>
          <table:table-cell office:value-type="string">
            <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tn-tsv7-to-tsv8</text:p>
          </table:table-cell>
          <table:table-cell office:value-type="string">
            <text:p>2024-11-14T10:49:22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ld-language-map-rcl</text:p>
          </table:table-cell>
          <table:table-cell office:value-type="string">
            <text:p>False</text:p>
          </table:table-cell>
          <table:table-cell office:value-type="string">
            <text:p>120</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40</text:p>
          </table:table-cell>
          <table:table-cell office:value-type="string">
            <text:p>0</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
          </table:table-cell>
          <table:table-cell office:value-type="string">
            <text:p>bible-reference-rcl</text:p>
          </table:table-cell>
          <table:table-cell office:value-type="string">
            <text:p>False</text:p>
          </table:table-cell>
          <table:table-cell office:value-type="string">
            <text:p>5141</text:p>
          </table:table-cell>
          <table:table-cell office:value-type="string">
            <text:p>2024-06-04T12:40:10.075Z</text:p>
          </table:table-cell>
          <table:table-cell office:value-type="string">
            <text:p/>
          </table:table-cell>
          <table:table-cell office:value-type="string">
            <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
          </table:table-cell>
          <table:table-cell office:value-type="string">
            <text:p>scripture-tsv</text:p>
          </table:table-cell>
          <table:table-cell office:value-type="string">
            <text:p>False</text:p>
          </table:table-cell>
          <table:table-cell office:value-type="string">
            <text:p>2668</text:p>
          </table:table-cell>
          <table:table-cell office:value-type="string">
            <text:p>2024-05-02T21:03:03.412Z</text:p>
          </table:table-cell>
          <table:table-cell office:value-type="string">
            <text:p/>
          </table:table-cell>
          <table:table-cell office:value-type="string">
            <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20</text:p>
          </table:table-cell>
          <table:table-cell office:value-type="string">
            <text:p>0</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38</text:p>
          </table:table-cell>
          <table:table-cell office:value-type="string">
            <text:p>0</text:p>
          </table:table-cell>
          <table:table-cell office:value-type="string">
            <text:p>https://github.com/unfoldingWord/door43-job-handler</text:p>
          </table:table-cell>
          <table:table-cell office:value-type="string">
            <text:p>2024-02-06T15:21:33Z</text:p>
          </table:table-cell>
        </table:table-row>
        <table:table-row>
          <table:table-cell office:value-type="string">
            <text:p>shiny-app-outputs-report</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1-29T15:53:5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shiny-app-outputs-report</text:p>
          </table:table-cell>
          <table:table-cell office:value-type="string">
            <text:p>2024-01-29T17:00:31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0</text:p>
          </table:table-cell>
          <table:table-cell office:value-type="string">
            <text:p>0</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salesforce-aplos-integration</text:p>
          </table:table-cell>
          <table:table-cell office:value-type="string">
            <text:p>unfoldingWord</text:p>
          </table:table-cell>
          <table:table-cell office:value-type="string">
            <text:p>Apex</text:p>
          </table:table-cell>
          <table:table-cell office:value-type="string">
            <text:p>False</text:p>
          </table:table-cell>
          <table:table-cell office:value-type="string">
            <text:p>False</text:p>
          </table:table-cell>
          <table:table-cell office:value-type="string">
            <text:p>2024-06-25T16:11:0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g-reichert, kmace16, jag3773</text:p>
          </table:table-cell>
          <table:table-cell office:value-type="string">
            <text:p>0</text:p>
          </table:table-cell>
          <table:table-cell office:value-type="string">
            <text:p>0</text:p>
          </table:table-cell>
          <table:table-cell office:value-type="string">
            <text:p>https://github.com/unfoldingWord/salesforce-aplos-integration</text:p>
          </table:table-cell>
          <table:table-cell office:value-type="string">
            <text:p>2023-08-29T19:51:55Z</text:p>
          </table:table-cell>
        </table:table-row>
        <table:table-row>
          <table:table-cell office:value-type="string">
            <text:p>door43-library</text:p>
          </table:table-cell>
          <table:table-cell office:value-type="string">
            <text:p>unfoldingWord</text:p>
          </table:table-cell>
          <table:table-cell office:value-type="string">
            <text:p>HTML</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ible-reference-range</text:p>
          </table:table-cell>
          <table:table-cell office:value-type="string">
            <text:p>False</text:p>
          </table:table-cell>
          <table:table-cell office:value-type="string">
            <text:p>16717</text:p>
          </table:table-cell>
          <table:table-cell office:value-type="string">
            <text:p>2023-12-07T19:15:35.590Z</text:p>
          </table:table-cell>
          <table:table-cell office:value-type="string">
            <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terraform</text:p>
          </table:table-cell>
          <table:table-cell office:value-type="string">
            <text:p>unfoldingWord</text:p>
          </table:table-cell>
          <table:table-cell office:value-type="string">
            <text:p>HCL</text:p>
          </table:table-cell>
          <table:table-cell office:value-type="string">
            <text:p>False</text:p>
          </table:table-cell>
          <table:table-cell office:value-type="string">
            <text:p>False</text:p>
          </table:table-cell>
          <table:table-cell office:value-type="string">
            <text:p>2023-07-11T09:20:37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erraform</text:p>
          </table:table-cell>
          <table:table-cell office:value-type="string">
            <text:p>2023-07-04T15:33:16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0</text:p>
          </table:table-cell>
          <table:table-cell office:value-type="string">
            <text:p>0</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0</text:p>
          </table:table-cell>
          <table:table-cell office:value-type="string">
            <text:p>0</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uw-tsv-parser</text:p>
          </table:table-cell>
          <table:table-cell office:value-type="string">
            <text:p>False</text:p>
          </table:table-cell>
          <table:table-cell office:value-type="string">
            <text:p>4621</text:p>
          </table:table-cell>
          <table:table-cell office:value-type="string">
            <text:p>2022-02-02T14:06:17.344Z</text:p>
          </table:table-cell>
          <table:table-cell office:value-type="string">
            <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0</text:p>
          </table:table-cell>
          <table:table-cell office:value-type="string">
            <text:p>0</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
          </table:table-cell>
          <table:table-cell office:value-type="string">
            <text:p>epitelete-html</text:p>
          </table:table-cell>
          <table:table-cell office:value-type="string">
            <text:p>False</text:p>
          </table:table-cell>
          <table:table-cell office:value-type="string">
            <text:p>10131</text:p>
          </table:table-cell>
          <table:table-cell office:value-type="string">
            <text:p>2023-07-16T00:28:17.57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0</text:p>
          </table:table-cell>
          <table:table-cell office:value-type="string">
            <text:p>0</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0</text:p>
          </table:table-cell>
          <table:table-cell office:value-type="string">
            <text:p>0</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0</text:p>
          </table:table-cell>
          <table:table-cell office:value-type="string">
            <text:p>0</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0</text:p>
          </table:table-cell>
          <table:table-cell office:value-type="string">
            <text:p>0</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0</text:p>
          </table:table-cell>
          <table:table-cell office:value-type="string">
            <text:p>0</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tx-dev</text:p>
          </table:table-cell>
          <table:table-cell office:value-type="string">
            <text:p>2022-12-12T05:15:4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
          </table:table-cell>
          <table:table-cell office:value-type="string">
            <text:p>dcs-js</text:p>
          </table:table-cell>
          <table:table-cell office:value-type="string">
            <text:p>False</text:p>
          </table:table-cell>
          <table:table-cell office:value-type="string">
            <text:p>609</text:p>
          </table:table-cell>
          <table:table-cell office:value-type="string">
            <text:p>2022-11-02T13:18:25.384Z</text:p>
          </table:table-cell>
          <table:table-cell office:value-type="string">
            <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
          </table:table-cell>
          <table:table-cell office:value-type="string">
            <text:p>uw-editor</text:p>
          </table:table-cell>
          <table:table-cell office:value-type="string">
            <text:p>True</text:p>
          </table:table-cell>
          <table:table-cell office:value-type="string">
            <text:p>1183</text:p>
          </table:table-cell>
          <table:table-cell office:value-type="string">
            <text:p>2023-03-21T14:43:38.471Z</text:p>
          </table:table-cell>
          <table:table-cell office:value-type="string">
            <text:p/>
          </table:table-cell>
          <table:table-cell office:value-type="string">
            <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9</text:p>
          </table:table-cell>
          <table:table-cell office:value-type="string">
            <text:p>0</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6</text:p>
          </table:table-cell>
          <table:table-cell office:value-type="string">
            <text:p>0</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24</text:p>
          </table:table-cell>
          <table:table-cell office:value-type="string">
            <text:p>0</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8</text:p>
          </table:table-cell>
          <table:table-cell office:value-type="string">
            <text:p>0</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
          </table:table-cell>
          <table:table-cell office:value-type="string">
            <text:p>dcs-react-hooks</text:p>
          </table:table-cell>
          <table:table-cell office:value-type="string">
            <text:p>False</text:p>
          </table:table-cell>
          <table:table-cell office:value-type="string">
            <text:p>178</text:p>
          </table:table-cell>
          <table:table-cell office:value-type="string">
            <text:p>2022-08-19T12:33:49.976Z</text:p>
          </table:table-cell>
          <table:table-cell office:value-type="string">
            <text:p/>
          </table:table-cell>
          <table:table-cell office:value-type="string">
            <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
          </table:table-cell>
          <table:table-cell office:value-type="string">
            <text:p>book-package-rcl</text:p>
          </table:table-cell>
          <table:table-cell office:value-type="string">
            <text:p>False</text:p>
          </table:table-cell>
          <table:table-cell office:value-type="string">
            <text:p>2255</text:p>
          </table:table-cell>
          <table:table-cell office:value-type="string">
            <text:p>2023-01-02T13:16:20.145Z</text:p>
          </table:table-cell>
          <table:table-cell office:value-type="string">
            <text:p/>
          </table:table-cell>
          <table:table-cell office:value-type="string">
            <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resource-workspace-rcl</text:p>
          </table:table-cell>
          <table:table-cell office:value-type="string">
            <text:p>False</text:p>
          </table:table-cell>
          <table:table-cell office:value-type="string">
            <text:p>2804</text:p>
          </table:table-cell>
          <table:table-cell office:value-type="string">
            <text:p>2023-06-13T13:51:03.803Z</text:p>
          </table:table-cell>
          <table:table-cell office:value-type="string">
            <text:p/>
          </table:table-cell>
          <table:table-cell office:value-type="string">
            <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0</text:p>
          </table:table-cell>
          <table:table-cell office:value-type="string">
            <text:p>0</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
          </table:table-cell>
          <table:table-cell office:value-type="string">
            <text:p>book-package-app</text:p>
          </table:table-cell>
          <table:table-cell office:value-type="string">
            <text:p>False</text:p>
          </table:table-cell>
          <table:table-cell office:value-type="string">
            <text:p>115</text:p>
          </table:table-cell>
          <table:table-cell office:value-type="string">
            <text:p>2020-07-15T14:29:05.613Z</text:p>
          </table:table-cell>
          <table:table-cell office:value-type="string">
            <text:p/>
          </table:table-cell>
          <table:table-cell office:value-type="string">
            <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gl_database_priva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1-12-15T21:34:1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cobwegner</text:p>
          </table:table-cell>
          <table:table-cell office:value-type="string">
            <text:p>0</text:p>
          </table:table-cell>
          <table:table-cell office:value-type="string">
            <text:p>0</text:p>
          </table:table-cell>
          <table:table-cell office:value-type="string">
            <text:p>https://github.com/unfoldingWord/gl_database_private</text:p>
          </table:table-cell>
          <table:table-cell office:value-type="string">
            <text:p>2021-12-15T21:34:33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0</text:p>
          </table:table-cell>
          <table:table-cell office:value-type="string">
            <text:p>0</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0</text:p>
          </table:table-cell>
          <table:table-cell office:value-type="string">
            <text:p>0</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0</text:p>
          </table:table-cell>
          <table:table-cell office:value-type="string">
            <text:p>0</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0</text:p>
          </table:table-cell>
          <table:table-cell office:value-type="string">
            <text:p>0</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text:p>
          </table:table-cell>
          <table:table-cell office:value-type="string">
            <text:p>2021-01-21T20:44:49Z</text:p>
          </table:table-cell>
        </table:table-row>
        <table:table-row>
          <table:table-cell office:value-type="string">
            <text:p>tc-create-2-poc</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12-22T20:44:2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create-2-poc</text:p>
          </table:table-cell>
          <table:table-cell office:value-type="string">
            <text:p>2020-12-17T16:24:38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
          </table:table-cell>
          <table:table-cell office:value-type="string">
            <text:p>uw-word-count</text:p>
          </table:table-cell>
          <table:table-cell office:value-type="string">
            <text:p>False</text:p>
          </table:table-cell>
          <table:table-cell office:value-type="string">
            <text:p>365</text:p>
          </table:table-cell>
          <table:table-cell office:value-type="string">
            <text:p>2020-07-15T14:01:25.409Z</text:p>
          </table:table-cell>
          <table:table-cell office:value-type="string">
            <text:p/>
          </table:table-cell>
          <table:table-cell office:value-type="string">
            <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w_redirects</text:p>
          </table:table-cell>
          <table:table-cell office:value-type="string">
            <text:p>2020-05-14T14:42:44Z</text:p>
          </table:table-cell>
        </table:table-row>
        <table:table-row>
          <table:table-cell office:value-type="string">
            <text:p>salesforce-donation-page-package-customization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5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ustomizations</text:p>
          </table:table-cell>
          <table:table-cell office:value-type="string">
            <text:p>2020-05-11T18:43:58Z</text:p>
          </table:table-cell>
        </table:table-row>
        <table:table-row>
          <table:table-cell office:value-type="string">
            <text:p>salesforce-donation-page-package-cor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2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ore</text:p>
          </table:table-cell>
          <table:table-cell office:value-type="string">
            <text:p>2020-05-11T18:43:28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Notes</text:p>
          </table:table-cell>
          <table:table-cell office:value-type="string">
            <text:p>2026-06-18T17:34:51Z</text:p>
          </table:table-cell>
        </table:table-row>
        <table:table-row>
          <table:table-cell office:value-type="string">
            <text:p>ts-deskto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397</text:p>
          </table:table-cell>
          <table:table-cell office:value-type="string">
            <text:p>https://github.com/unfoldingWord-dev/ts-desktop</text:p>
          </table:table-cell>
          <table:table-cell office:value-type="string">
            <text:p>2026-04-22T14:46:49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61</text:p>
          </table:table-cell>
          <table:table-cell office:value-type="string">
            <text:p>2302</text:p>
          </table:table-cell>
          <table:table-cell office:value-type="string">
            <text:p>https://github.com/unfoldingWord-dev/ts-android</text:p>
          </table:table-cell>
          <table:table-cell office:value-type="string">
            <text:p>2026-04-22T14:45:07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0</text:p>
          </table:table-cell>
          <table:table-cell office:value-type="string">
            <text:p>0</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git@git.door43.org:unfoldingWord-dev/tx-dev-dcs.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0</text:p>
          </table:table-cell>
          <table:table-cell office:value-type="string">
            <text:p>0</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0</text:p>
          </table:table-cell>
          <table:table-cell office:value-type="string">
            <text:p>0</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0</text:p>
          </table:table-cell>
          <table:table-cell office:value-type="string">
            <text:p>0</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0</text:p>
          </table:table-cell>
          <table:table-cell office:value-type="string">
            <text:p>0</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2</text:p>
          </table:table-cell>
          <table:table-cell office:value-type="string">
            <text:p>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0</text:p>
          </table:table-cell>
          <table:table-cell office:value-type="string">
            <text:p>0</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0</text:p>
          </table:table-cell>
          <table:table-cell office:value-type="string">
            <text:p>0</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0</text:p>
          </table:table-cell>
          <table:table-cell office:value-type="string">
            <text:p>0</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0</text:p>
          </table:table-cell>
          <table:table-cell office:value-type="string">
            <text:p>0</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0</text:p>
          </table:table-cell>
          <table:table-cell office:value-type="string">
            <text:p>0</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0</text:p>
          </table:table-cell>
          <table:table-cell office:value-type="string">
            <text:p>0</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1</text:p>
          </table:table-cell>
          <table:table-cell office:value-type="string">
            <text:p>0</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2</text:p>
          </table:table-cell>
          <table:table-cell office:value-type="string">
            <text:p>0</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0</text:p>
          </table:table-cell>
          <table:table-cell office:value-type="string">
            <text:p>0</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3</text:p>
          </table:table-cell>
          <table:table-cell office:value-type="string">
            <text:p>20</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44</text:p>
          </table:table-cell>
          <table:table-cell office:value-type="string">
            <text:p>2302</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2</text:p>
          </table:table-cell>
          <table:table-cell office:value-type="string">
            <text:p>0</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2</text:p>
          </table:table-cell>
          <table:table-cell office:value-type="string">
            <text:p>0</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0</text:p>
          </table:table-cell>
          <table:table-cell office:value-type="string">
            <text:p>0</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
          </table:table-cell>
          <table:table-cell office:value-type="string">
            <text:p>gogs-client</text:p>
          </table:table-cell>
          <table:table-cell office:value-type="string">
            <text:p>False</text:p>
          </table:table-cell>
          <table:table-cell office:value-type="string">
            <text:p>6730</text:p>
          </table:table-cell>
          <table:table-cell office:value-type="string">
            <text:p>2016-07-13T00:07:45.833Z</text:p>
          </table:table-cell>
          <table:table-cell office:value-type="string">
            <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5</text:p>
          </table:table-cell>
          <table:table-cell office:value-type="string">
            <text:p>0</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24</text:p>
          </table:table-cell>
          <table:table-cell office:value-type="string">
            <text:p>729</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0</text:p>
          </table:table-cell>
          <table:table-cell office:value-type="string">
            <text:p>0</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0</text:p>
          </table:table-cell>
          <table:table-cell office:value-type="string">
            <text:p>0</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
          </table:table-cell>
          <table:table-cell office:value-type="string">
            <text:p>electronite</text:p>
          </table:table-cell>
          <table:table-cell office:value-type="string">
            <text:p>False</text:p>
          </table:table-cell>
          <table:table-cell office:value-type="string">
            <text:p>2604</text:p>
          </table:table-cell>
          <table:table-cell office:value-type="string">
            <text:p>2026-01-22T21:05:02.866Z</text:p>
          </table:table-cell>
          <table:table-cell office:value-type="string">
            <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0</text:p>
          </table:table-cell>
          <table:table-cell office:value-type="string">
            <text:p>0</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0</text:p>
          </table:table-cell>
          <table:table-cell office:value-type="string">
            <text:p>0</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0</text:p>
          </table:table-cell>
          <table:table-cell office:value-type="string">
            <text:p>0</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0</text:p>
          </table:table-cell>
          <table:table-cell office:value-type="string">
            <text:p>0</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0</text:p>
          </table:table-cell>
          <table:table-cell office:value-type="string">
            <text:p>0</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0</text:p>
          </table:table-cell>
          <table:table-cell office:value-type="string">
            <text:p>0</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0</text:p>
          </table:table-cell>
          <table:table-cell office:value-type="string">
            <text:p>0</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0</text:p>
          </table:table-cell>
          <table:table-cell office:value-type="string">
            <text:p>0</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0</text:p>
          </table:table-cell>
          <table:table-cell office:value-type="string">
            <text:p>0</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0</text:p>
          </table:table-cell>
          <table:table-cell office:value-type="string">
            <text:p>0</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0</text:p>
          </table:table-cell>
          <table:table-cell office:value-type="string">
            <text:p>0</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0</text:p>
          </table:table-cell>
          <table:table-cell office:value-type="string">
            <text:p>0</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0</text:p>
          </table:table-cell>
          <table:table-cell office:value-type="string">
            <text:p>0</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0</text:p>
          </table:table-cell>
          <table:table-cell office:value-type="string">
            <text:p>0</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0</text:p>
          </table:table-cell>
          <table:table-cell office:value-type="string">
            <text:p>0</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0</text:p>
          </table:table-cell>
          <table:table-cell office:value-type="string">
            <text:p>0</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0</text:p>
          </table:table-cell>
          <table:table-cell office:value-type="string">
            <text:p>0</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
          </table:table-cell>
          <table:table-cell office:value-type="string">
            <text:p>door43-client</text:p>
          </table:table-cell>
          <table:table-cell office:value-type="string">
            <text:p>False</text:p>
          </table:table-cell>
          <table:table-cell office:value-type="string">
            <text:p>1556</text:p>
          </table:table-cell>
          <table:table-cell office:value-type="string">
            <text:p>2019-11-06T17:33:42.928Z</text:p>
          </table:table-cell>
          <table:table-cell office:value-type="string">
            <text:p/>
          </table:table-cell>
          <table:table-cell office:value-type="string">
            <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0</text:p>
          </table:table-cell>
          <table:table-cell office:value-type="string">
            <text:p>0</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0</text:p>
          </table:table-cell>
          <table:table-cell office:value-type="string">
            <text:p>0</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0</text:p>
          </table:table-cell>
          <table:table-cell office:value-type="string">
            <text:p>0</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0</text:p>
          </table:table-cell>
          <table:table-cell office:value-type="string">
            <text:p>0</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0</text:p>
          </table:table-cell>
          <table:table-cell office:value-type="string">
            <text:p>0</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resource-container</text:p>
          </table:table-cell>
          <table:table-cell office:value-type="string">
            <text:p>False</text:p>
          </table:table-cell>
          <table:table-cell office:value-type="string">
            <text:p>3175</text:p>
          </table:table-cell>
          <table:table-cell office:value-type="string">
            <text:p>2017-02-28T01:01:07.451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0</text:p>
          </table:table-cell>
          <table:table-cell office:value-type="string">
            <text:p>0</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1</text:p>
          </table:table-cell>
          <table:table-cell office:value-type="string">
            <text:p>0</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0</text:p>
          </table:table-cell>
          <table:table-cell office:value-type="string">
            <text:p>0</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0</text:p>
          </table:table-cell>
          <table:table-cell office:value-type="string">
            <text:p>0</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0</text:p>
          </table:table-cell>
          <table:table-cell office:value-type="string">
            <text:p>0</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0</text:p>
          </table:table-cell>
          <table:table-cell office:value-type="string">
            <text:p>0</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0</text:p>
          </table:table-cell>
          <table:table-cell office:value-type="string">
            <text:p>0</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0</text:p>
          </table:table-cell>
          <table:table-cell office:value-type="string">
            <text:p>0</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0</text:p>
          </table:table-cell>
          <table:table-cell office:value-type="string">
            <text:p>0</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0</text:p>
          </table:table-cell>
          <table:table-cell office:value-type="string">
            <text:p>0</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rc</text:p>
          </table:table-cell>
          <table:table-cell office:value-type="string">
            <text:p>True</text:p>
          </table:table-cell>
          <table:table-cell office:value-type="string">
            <text:p>1502</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0</text:p>
          </table:table-cell>
          <table:table-cell office:value-type="string">
            <text:p>0</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0</text:p>
          </table:table-cell>
          <table:table-cell office:value-type="string">
            <text:p>0</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0</text:p>
          </table:table-cell>
          <table:table-cell office:value-type="string">
            <text:p>0</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0</text:p>
          </table:table-cell>
          <table:table-cell office:value-type="string">
            <text:p>0</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0</text:p>
          </table:table-cell>
          <table:table-cell office:value-type="string">
            <text:p>0</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0</text:p>
          </table:table-cell>
          <table:table-cell office:value-type="string">
            <text:p>0</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0</text:p>
          </table:table-cell>
          <table:table-cell office:value-type="string">
            <text:p>0</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0</text:p>
          </table:table-cell>
          <table:table-cell office:value-type="string">
            <text:p>0</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0</text:p>
          </table:table-cell>
          <table:table-cell office:value-type="string">
            <text:p>0</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0</text:p>
          </table:table-cell>
          <table:table-cell office:value-type="string">
            <text:p>0</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0</text:p>
          </table:table-cell>
          <table:table-cell office:value-type="string">
            <text:p>0</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0</text:p>
          </table:table-cell>
          <table:table-cell office:value-type="string">
            <text:p>0</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0</text:p>
          </table:table-cell>
          <table:table-cell office:value-type="string">
            <text:p>0</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0</text:p>
          </table:table-cell>
          <table:table-cell office:value-type="string">
            <text:p>0</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0</text:p>
          </table:table-cell>
          <table:table-cell office:value-type="string">
            <text:p>0</text:p>
          </table:table-cell>
          <table:table-cell office:value-type="string">
            <text:p>https://github.com/unfoldingWord-dev/obs-reader</text:p>
          </table:table-cell>
          <table:table-cell office:value-type="string">
            <text:p>2015-03-09T22:06:24Z</text:p>
          </table:table-cell>
        </table:table-row>
        <table:table-row>
          <table:table-cell office:value-type="string">
            <text:p>RepoLis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True</text:p>
          </table:table-cell>
          <table:table-cell office:value-type="string">
            <text:p>2026-06-18T18:47:28Z</text:p>
          </table:table-cell>
          <table:table-cell office:value-type="string">
            <text:p>2026-06-18T18:47: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RepoLis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RepoList</text:p>
          </table:table-cell>
          <table:table-cell office:value-type="string">
            <text:p>2026-06-18T18:47:33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0</text:p>
          </table:table-cell>
          <table:table-cell office:value-type="string">
            <text:p>0</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
          </table:table-cell>
          <table:table-cell office:value-type="string">
            <text:p>simple-text-editor-rcl</text:p>
          </table:table-cell>
          <table:table-cell office:value-type="string">
            <text:p>False</text:p>
          </table:table-cell>
          <table:table-cell office:value-type="string">
            <text:p>3826</text:p>
          </table:table-cell>
          <table:table-cell office:value-type="string">
            <text:p>2022-06-09T23:15:38.322Z</text:p>
          </table:table-cell>
          <table:table-cell office:value-type="string">
            <text:p/>
          </table:table-cell>
          <table:table-cell office:value-type="string">
            <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0</text:p>
          </table:table-cell>
          <table:table-cell office:value-type="string">
            <text:p>0</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0</text:p>
          </table:table-cell>
          <table:table-cell office:value-type="string">
            <text:p>0</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uw-proskomma</text:p>
          </table:table-cell>
          <table:table-cell office:value-type="string">
            <text:p>False</text:p>
          </table:table-cell>
          <table:table-cell office:value-type="string">
            <text:p>2362</text:p>
          </table:table-cell>
          <table:table-cell office:value-type="string">
            <text:p>2022-07-13T12:06:56.761Z</text:p>
          </table:table-cell>
          <table:table-cell office:value-type="string">
            <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0</text:p>
          </table:table-cell>
          <table:table-cell office:value-type="string">
            <text:p>0</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0</text:p>
          </table:table-cell>
          <table:table-cell office:value-type="string">
            <text:p>0</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0</text:p>
          </table:table-cell>
          <table:table-cell office:value-type="string">
            <text:p>0</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21</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
          </table:table-cell>
          <table:table-cell office:value-type="string">
            <text:p>wordmap-react-toolkit</text:p>
          </table:table-cell>
          <table:table-cell office:value-type="string">
            <text:p>False</text:p>
          </table:table-cell>
          <table:table-cell office:value-type="string">
            <text:p>245</text:p>
          </table:table-cell>
          <table:table-cell office:value-type="string">
            <text:p>2019-11-07T08:13:01.981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0</text:p>
          </table:table-cell>
          <table:table-cell office:value-type="string">
            <text:p>0</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create-app</text:p>
          </table:table-cell>
          <table:table-cell office:value-type="string">
            <text:p>False</text:p>
          </table:table-cell>
          <table:table-cell office:value-type="string">
            <text:p>73</text:p>
          </table:table-cell>
          <table:table-cell office:value-type="string">
            <text:p>2022-02-22T21:12:10.659Z</text:p>
          </table:table-cell>
          <table:table-cell office:value-type="string">
            <text:p/>
          </table:table-cell>
          <table:table-cell office:value-type="string">
            <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
          </table:table-cell>
          <table:table-cell office:value-type="string">
            <text:p>content-validation-app</text:p>
          </table:table-cell>
          <table:table-cell office:value-type="string">
            <text:p>False</text:p>
          </table:table-cell>
          <table:table-cell office:value-type="string">
            <text:p>188</text:p>
          </table:table-cell>
          <table:table-cell office:value-type="string">
            <text:p>2020-09-16T21:52:51.640Z</text:p>
          </table:table-cell>
          <table:table-cell office:value-type="string">
            <text:p/>
          </table:table-cell>
          <table:table-cell office:value-type="string">
            <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
          </table:table-cell>
          <table:table-cell office:value-type="string">
            <text:p>greek-apparatus-app</text:p>
          </table:table-cell>
          <table:table-cell office:value-type="string">
            <text:p>False</text:p>
          </table:table-cell>
          <table:table-cell office:value-type="string">
            <text:p>71</text:p>
          </table:table-cell>
          <table:table-cell office:value-type="string">
            <text:p>2020-12-11T16:05:46.321Z</text:p>
          </table:table-cell>
          <table:table-cell office:value-type="string">
            <text:p/>
          </table:table-cell>
          <table:table-cell office:value-type="string">
            <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base</text:p>
          </table:table-cell>
          <table:table-cell office:value-type="string">
            <text:p/>
          </table:table-cell>
          <table:table-cell office:value-type="string">
            <text:p>1851</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core</text:p>
          </table:table-cell>
          <table:table-cell office:value-type="string">
            <text:p/>
          </table:table-cell>
          <table:table-cell office:value-type="string">
            <text:p>407</text:p>
          </table:table-cell>
          <table:table-cell office:value-type="string">
            <text:p>2024-01-10T09:45:57.004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pk</text:p>
          </table:table-cell>
          <table:table-cell office:value-type="string">
            <text:p/>
          </table:table-cell>
          <table:table-cell office:value-type="string">
            <text:p>131</text:p>
          </table:table-cell>
          <table:table-cell office:value-type="string">
            <text:p>2024-01-10T09:47:45.958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core</text:p>
          </table:table-cell>
          <table:table-cell office:value-type="string">
            <text:p/>
          </table:table-cell>
          <table:table-cell office:value-type="string">
            <text:p>645</text:p>
          </table:table-cell>
          <table:table-cell office:value-type="string">
            <text:p>2024-01-10T09:42:28.55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pk</text:p>
          </table:table-cell>
          <table:table-cell office:value-type="string">
            <text:p/>
          </table:table-cell>
          <table:table-cell office:value-type="string">
            <text:p>337</text:p>
          </table:table-cell>
          <table:table-cell office:value-type="string">
            <text:p>2024-01-10T09:45:17.176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simple</text:p>
          </table:table-cell>
          <table:table-cell office:value-type="string">
            <text:p/>
          </table:table-cell>
          <table:table-cell office:value-type="string">
            <text:p>373</text:p>
          </table:table-cell>
          <table:table-cell office:value-type="string">
            <text:p>2024-01-10T09:45:39.01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verse-mapper</text:p>
          </table:table-cell>
          <table:table-cell office:value-type="string">
            <text:p/>
          </table:table-cell>
          <table:table-cell office:value-type="string">
            <text:p>97</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js</text:p>
          </table:table-cell>
          <table:table-cell office:value-type="string">
            <text:p/>
          </table:table-cell>
          <table:table-cell office:value-type="string">
            <text:p>609</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5:02:07Z</text:p>
          </table:table-cell>
          <table:table-cell office:value-type="string">
            <text:p>2026-06-18T15:01:38Z</text:p>
          </table:table-cell>
          <table:table-cell office:value-type="string">
            <text:p/>
          </table:table-cell>
          <table:table-cell office:value-type="string">
            <text:p>104</text:p>
          </table:table-cell>
          <table:table-cell office:value-type="string">
            <text:p>9</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8T15:03:36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8T14:19:40Z</text:p>
          </table:table-cell>
          <table:table-cell office:value-type="string">
            <text:p>2026-06-18T14:19: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18T14:20:38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20:29:08Z</text:p>
          </table:table-cell>
          <table:table-cell office:value-type="string">
            <text:p>2026-06-17T14:58:59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17T15:03:26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06:45:29Z</text:p>
          </table:table-cell>
          <table:table-cell office:value-type="string">
            <text:p>2026-06-17T06:45: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17T06:45:34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wl-generator</text:p>
          </table:table-cell>
          <table:table-cell office:value-type="string">
            <text:p>False</text:p>
          </table:table-cell>
          <table:table-cell office:value-type="string">
            <text:p>5611</text:p>
          </table:table-cell>
          <table:table-cell office:value-type="string">
            <text:p>2026-06-16T10:00:58.589Z</text:p>
          </table:table-cell>
          <table:table-cell office:value-type="string">
            <text:p/>
          </table:table-cell>
          <table:table-cell office:value-type="string">
            <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47</text:p>
          </table:table-cell>
          <table:table-cell office:value-type="string">
            <text:p>0</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6</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10:38:09Z</text:p>
          </table:table-cell>
          <table:table-cell office:value-type="string">
            <text:p>2026-06-07T10:38:05Z</text:p>
          </table:table-cell>
          <table:table-cell office:value-type="string">
            <text:p>2024-10-21T20:57:32Z</text:p>
          </table:table-cell>
          <table:table-cell office:value-type="string">
            <text:p>43</text:p>
          </table:table-cell>
          <table:table-cell office:value-type="string">
            <text:p>0</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superdav42, richmahn,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07T10:38:10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09:33:50Z</text:p>
          </table:table-cell>
          <table:table-cell office:value-type="string">
            <text:p>2026-06-07T09:31:31Z</text:p>
          </table:table-cell>
          <table:table-cell office:value-type="string">
            <text:p/>
          </table:table-cell>
          <table:table-cell office:value-type="string">
            <text:p>80</text:p>
          </table:table-cell>
          <table:table-cell office:value-type="string">
            <text:p>2</text:p>
          </table:table-cell>
          <table:table-cell office:value-type="string">
            <text:p/>
          </table:table-cell>
          <table:table-cell office:value-type="string">
            <text:p>uw-content-validation</text:p>
          </table:table-cell>
          <table:table-cell office:value-type="string">
            <text:p>False</text:p>
          </table:table-cell>
          <table:table-cell office:value-type="string">
            <text:p>2067</text:p>
          </table:table-cell>
          <table:table-cell office:value-type="string">
            <text:p>2026-06-07T09:30:48.456Z</text:p>
          </table:table-cell>
          <table:table-cell office:value-type="string">
            <text:p/>
          </table:table-cell>
          <table:table-cell office:value-type="string">
            <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07T09:31:36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enhanced-word-aligner-rcl</text:p>
          </table:table-cell>
          <table:table-cell office:value-type="string">
            <text:p>False</text:p>
          </table:table-cell>
          <table:table-cell office:value-type="string">
            <text:p>24657</text:p>
          </table:table-cell>
          <table:table-cell office:value-type="string">
            <text:p>2026-06-02T13:32:18.685Z</text:p>
          </table:table-cell>
          <table:table-cell office:value-type="string">
            <text:p/>
          </table:table-cell>
          <table:table-cell office:value-type="string">
            <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9T18:54:12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
          </table:table-cell>
          <table:table-cell office:value-type="string">
            <text:p>tc-create-app</text:p>
          </table:table-cell>
          <table:table-cell office:value-type="string">
            <text:p>False</text:p>
          </table:table-cell>
          <table:table-cell office:value-type="string">
            <text:p>73</text:p>
          </table:table-cell>
          <table:table-cell office:value-type="string">
            <text:p>2022-02-22T21:12:10.659Z</text:p>
          </table:table-cell>
          <table:table-cell office:value-type="string">
            <text:p/>
          </table:table-cell>
          <table:table-cell office:value-type="string">
            <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
          </table:table-cell>
          <table:table-cell office:value-type="string">
            <text:p>uw-languages-rcl</text:p>
          </table:table-cell>
          <table:table-cell office:value-type="string">
            <text:p>False</text:p>
          </table:table-cell>
          <table:table-cell office:value-type="string">
            <text:p>1220</text:p>
          </table:table-cell>
          <table:table-cell office:value-type="string">
            <text:p>2026-05-28T16:01:32.183Z</text:p>
          </table:table-cell>
          <table:table-cell office:value-type="string">
            <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
          </table:table-cell>
          <table:table-cell office:value-type="string">
            <text:p>string-punctuation-tokenizer</text:p>
          </table:table-cell>
          <table:table-cell office:value-type="string">
            <text:p>False</text:p>
          </table:table-cell>
          <table:table-cell office:value-type="string">
            <text:p>98531</text:p>
          </table:table-cell>
          <table:table-cell office:value-type="string">
            <text:p>2021-08-25T21:55:46.406Z</text:p>
          </table:table-cell>
          <table:table-cell office:value-type="string">
            <text:p/>
          </table:table-cell>
          <table:table-cell office:value-type="string">
            <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
          </table:table-cell>
          <table:table-cell office:value-type="string">
            <text:p>word-aligner-rcl</text:p>
          </table:table-cell>
          <table:table-cell office:value-type="string">
            <text:p>False</text:p>
          </table:table-cell>
          <table:table-cell office:value-type="string">
            <text:p>16552</text:p>
          </table:table-cell>
          <table:table-cell office:value-type="string">
            <text:p>2026-05-24T23:03:19.258Z</text:p>
          </table:table-cell>
          <table:table-cell office:value-type="string">
            <text:p/>
          </table:table-cell>
          <table:table-cell office:value-type="string">
            <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aligner-lib</text:p>
          </table:table-cell>
          <table:table-cell office:value-type="string">
            <text:p>False</text:p>
          </table:table-cell>
          <table:table-cell office:value-type="string">
            <text:p>4867</text:p>
          </table:table-cell>
          <table:table-cell office:value-type="string">
            <text:p>2026-05-24T22:38:01.649Z</text:p>
          </table:table-cell>
          <table:table-cell office:value-type="string">
            <text:p/>
          </table:table-cell>
          <table:table-cell office:value-type="string">
            <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
          </table:table-cell>
          <table:table-cell office:value-type="string">
            <text:p>word-aligner</text:p>
          </table:table-cell>
          <table:table-cell office:value-type="string">
            <text:p>False</text:p>
          </table:table-cell>
          <table:table-cell office:value-type="string">
            <text:p>44815</text:p>
          </table:table-cell>
          <table:table-cell office:value-type="string">
            <text:p>2026-05-24T21:22:13.663Z</text:p>
          </table:table-cell>
          <table:table-cell office:value-type="string">
            <text:p/>
          </table:table-cell>
          <table:table-cell office:value-type="string">
            <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
          </table:table-cell>
          <table:table-cell office:value-type="string">
            <text:p>gitea-react-toolkit</text:p>
          </table:table-cell>
          <table:table-cell office:value-type="string">
            <text:p>False</text:p>
          </table:table-cell>
          <table:table-cell office:value-type="string">
            <text:p>17484</text:p>
          </table:table-cell>
          <table:table-cell office:value-type="string">
            <text:p>2026-05-12T13:15:42.563Z</text:p>
          </table:table-cell>
          <table:table-cell office:value-type="string">
            <text:p/>
          </table:table-cell>
          <table:table-cell office:value-type="string">
            <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8T21:52:16Z</text:p>
          </table:table-cell>
          <table:table-cell office:value-type="string">
            <text:p>2026-05-05T16:33:43Z</text:p>
          </table:table-cell>
          <table:table-cell office:value-type="string">
            <text:p/>
          </table:table-cell>
          <table:table-cell office:value-type="string">
            <text:p>11</text:p>
          </table:table-cell>
          <table:table-cell office:value-type="string">
            <text:p>2</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
          </table:table-cell>
          <table:table-cell office:value-type="string">
            <text:p>single-scripture-rcl</text:p>
          </table:table-cell>
          <table:table-cell office:value-type="string">
            <text:p>False</text:p>
          </table:table-cell>
          <table:table-cell office:value-type="string">
            <text:p>9772</text:p>
          </table:table-cell>
          <table:table-cell office:value-type="string">
            <text:p>2026-04-16T17:29:58.529Z</text:p>
          </table:table-cell>
          <table:table-cell office:value-type="string">
            <text:p/>
          </table:table-cell>
          <table:table-cell office:value-type="string">
            <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
          </table:table-cell>
          <table:table-cell office:value-type="string">
            <text:p>translation-helps-rcl</text:p>
          </table:table-cell>
          <table:table-cell office:value-type="string">
            <text:p>False</text:p>
          </table:table-cell>
          <table:table-cell office:value-type="string">
            <text:p>16081</text:p>
          </table:table-cell>
          <table:table-cell office:value-type="string">
            <text:p>2026-03-27T22:01:47.002Z</text:p>
          </table:table-cell>
          <table:table-cell office:value-type="string">
            <text:p/>
          </table:table-cell>
          <table:table-cell office:value-type="string">
            <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dcs-branch-merger</text:p>
          </table:table-cell>
          <table:table-cell office:value-type="string">
            <text:p>False</text:p>
          </table:table-cell>
          <table:table-cell office:value-type="string">
            <text:p>3617</text:p>
          </table:table-cell>
          <table:table-cell office:value-type="string">
            <text:p>2026-03-27T21:57:39.012Z</text:p>
          </table:table-cell>
          <table:table-cell office:value-type="string">
            <text:p/>
          </table:table-cell>
          <table:table-cell office:value-type="string">
            <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
          </table:table-cell>
          <table:table-cell office:value-type="string">
            <text:p>scripture-resources-rcl</text:p>
          </table:table-cell>
          <table:table-cell office:value-type="string">
            <text:p>False</text:p>
          </table:table-cell>
          <table:table-cell office:value-type="string">
            <text:p>15096</text:p>
          </table:table-cell>
          <table:table-cell office:value-type="string">
            <text:p>2026-03-19T13:24:25.124Z</text:p>
          </table:table-cell>
          <table:table-cell office:value-type="string">
            <text:p/>
          </table:table-cell>
          <table:table-cell office:value-type="string">
            <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quote-helpers</text:p>
          </table:table-cell>
          <table:table-cell office:value-type="string">
            <text:p>False</text:p>
          </table:table-cell>
          <table:table-cell office:value-type="string">
            <text:p>3132</text:p>
          </table:table-cell>
          <table:table-cell office:value-type="string">
            <text:p>2025-01-17T14:55:12.819Z</text:p>
          </table:table-cell>
          <table:table-cell office:value-type="string">
            <text:p/>
          </table:table-cell>
          <table:table-cell office:value-type="string">
            <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
          </table:table-cell>
          <table:table-cell office:value-type="string">
            <text:p>datatable-translatable</text:p>
          </table:table-cell>
          <table:table-cell office:value-type="string">
            <text:p>False</text:p>
          </table:table-cell>
          <table:table-cell office:value-type="string">
            <text:p>3397</text:p>
          </table:table-cell>
          <table:table-cell office:value-type="string">
            <text:p>2026-02-02T16:12:05.648Z</text:p>
          </table:table-cell>
          <table:table-cell office:value-type="string">
            <text:p/>
          </table:table-cell>
          <table:table-cell office:value-type="string">
            <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
          </table:table-cell>
          <table:table-cell office:value-type="string">
            <text:p>tsv-groupdata-parser</text:p>
          </table:table-cell>
          <table:table-cell office:value-type="string">
            <text:p>False</text:p>
          </table:table-cell>
          <table:table-cell office:value-type="string">
            <text:p>6419</text:p>
          </table:table-cell>
          <table:table-cell office:value-type="string">
            <text:p>2024-10-16T17:43:33.516Z</text:p>
          </table:table-cell>
          <table:table-cell office:value-type="string">
            <text:p/>
          </table:table-cell>
          <table:table-cell office:value-type="string">
            <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
          </table:table-cell>
          <table:table-cell office:value-type="string">
            <text:p>tc-source-content-updater</text:p>
          </table:table-cell>
          <table:table-cell office:value-type="string">
            <text:p>False</text:p>
          </table:table-cell>
          <table:table-cell office:value-type="string">
            <text:p>7777</text:p>
          </table:table-cell>
          <table:table-cell office:value-type="string">
            <text:p>2025-10-28T18:16:22.466Z</text:p>
          </table:table-cell>
          <table:table-cell office:value-type="string">
            <text:p/>
          </table:table-cell>
          <table:table-cell office:value-type="string">
            <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
          </table:table-cell>
          <table:table-cell office:value-type="string">
            <text:p>checking-tool-rcl</text:p>
          </table:table-cell>
          <table:table-cell office:value-type="string">
            <text:p>False</text:p>
          </table:table-cell>
          <table:table-cell office:value-type="string">
            <text:p>5894</text:p>
          </table:table-cell>
          <table:table-cell office:value-type="string">
            <text:p>2025-10-20T15:58:23.259Z</text:p>
          </table:table-cell>
          <table:table-cell office:value-type="string">
            <text:p/>
          </table:table-cell>
          <table:table-cell office:value-type="string">
            <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
          </table:table-cell>
          <table:table-cell office:value-type="string">
            <text:p>markdown-translatable</text:p>
          </table:table-cell>
          <table:table-cell office:value-type="string">
            <text:p>False</text:p>
          </table:table-cell>
          <table:table-cell office:value-type="string">
            <text:p>18062</text:p>
          </table:table-cell>
          <table:table-cell office:value-type="string">
            <text:p>2023-03-07T15:00:29.476Z</text:p>
          </table:table-cell>
          <table:table-cell office:value-type="string">
            <text:p/>
          </table:table-cell>
          <table:table-cell office:value-type="string">
            <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
          </table:table-cell>
          <table:table-cell office:value-type="string">
            <text:p>tc-ui-toolkit</text:p>
          </table:table-cell>
          <table:table-cell office:value-type="string">
            <text:p>False</text:p>
          </table:table-cell>
          <table:table-cell office:value-type="string">
            <text:p>29501</text:p>
          </table:table-cell>
          <table:table-cell office:value-type="string">
            <text:p>2024-12-31T18:53:34.752Z</text:p>
          </table:table-cell>
          <table:table-cell office:value-type="string">
            <text:p/>
          </table:table-cell>
          <table:table-cell office:value-type="string">
            <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ld-language-map-rcl</text:p>
          </table:table-cell>
          <table:table-cell office:value-type="string">
            <text:p>False</text:p>
          </table:table-cell>
          <table:table-cell office:value-type="string">
            <text:p>120</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
          </table:table-cell>
          <table:table-cell office:value-type="string">
            <text:p>bible-reference-rcl</text:p>
          </table:table-cell>
          <table:table-cell office:value-type="string">
            <text:p>False</text:p>
          </table:table-cell>
          <table:table-cell office:value-type="string">
            <text:p>5141</text:p>
          </table:table-cell>
          <table:table-cell office:value-type="string">
            <text:p>2024-06-04T12:40:10.075Z</text:p>
          </table:table-cell>
          <table:table-cell office:value-type="string">
            <text:p/>
          </table:table-cell>
          <table:table-cell office:value-type="string">
            <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
          </table:table-cell>
          <table:table-cell office:value-type="string">
            <text:p>scripture-tsv</text:p>
          </table:table-cell>
          <table:table-cell office:value-type="string">
            <text:p>False</text:p>
          </table:table-cell>
          <table:table-cell office:value-type="string">
            <text:p>2668</text:p>
          </table:table-cell>
          <table:table-cell office:value-type="string">
            <text:p>2024-05-02T21:03:03.412Z</text:p>
          </table:table-cell>
          <table:table-cell office:value-type="string">
            <text:p/>
          </table:table-cell>
          <table:table-cell office:value-type="string">
            <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ible-reference-range</text:p>
          </table:table-cell>
          <table:table-cell office:value-type="string">
            <text:p>False</text:p>
          </table:table-cell>
          <table:table-cell office:value-type="string">
            <text:p>16717</text:p>
          </table:table-cell>
          <table:table-cell office:value-type="string">
            <text:p>2023-12-07T19:15:35.590Z</text:p>
          </table:table-cell>
          <table:table-cell office:value-type="string">
            <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uw-tsv-parser</text:p>
          </table:table-cell>
          <table:table-cell office:value-type="string">
            <text:p>False</text:p>
          </table:table-cell>
          <table:table-cell office:value-type="string">
            <text:p>4621</text:p>
          </table:table-cell>
          <table:table-cell office:value-type="string">
            <text:p>2022-02-02T14:06:17.344Z</text:p>
          </table:table-cell>
          <table:table-cell office:value-type="string">
            <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
          </table:table-cell>
          <table:table-cell office:value-type="string">
            <text:p>epitelete-html</text:p>
          </table:table-cell>
          <table:table-cell office:value-type="string">
            <text:p>False</text:p>
          </table:table-cell>
          <table:table-cell office:value-type="string">
            <text:p>10131</text:p>
          </table:table-cell>
          <table:table-cell office:value-type="string">
            <text:p>2023-07-16T00:28:17.57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
          </table:table-cell>
          <table:table-cell office:value-type="string">
            <text:p>dcs-js</text:p>
          </table:table-cell>
          <table:table-cell office:value-type="string">
            <text:p>False</text:p>
          </table:table-cell>
          <table:table-cell office:value-type="string">
            <text:p>609</text:p>
          </table:table-cell>
          <table:table-cell office:value-type="string">
            <text:p>2022-11-02T13:18:25.384Z</text:p>
          </table:table-cell>
          <table:table-cell office:value-type="string">
            <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
          </table:table-cell>
          <table:table-cell office:value-type="string">
            <text:p>uw-editor</text:p>
          </table:table-cell>
          <table:table-cell office:value-type="string">
            <text:p>True</text:p>
          </table:table-cell>
          <table:table-cell office:value-type="string">
            <text:p>1183</text:p>
          </table:table-cell>
          <table:table-cell office:value-type="string">
            <text:p>2023-03-21T14:43:38.471Z</text:p>
          </table:table-cell>
          <table:table-cell office:value-type="string">
            <text:p/>
          </table:table-cell>
          <table:table-cell office:value-type="string">
            <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
          </table:table-cell>
          <table:table-cell office:value-type="string">
            <text:p>dcs-react-hooks</text:p>
          </table:table-cell>
          <table:table-cell office:value-type="string">
            <text:p>False</text:p>
          </table:table-cell>
          <table:table-cell office:value-type="string">
            <text:p>178</text:p>
          </table:table-cell>
          <table:table-cell office:value-type="string">
            <text:p>2022-08-19T12:33:49.976Z</text:p>
          </table:table-cell>
          <table:table-cell office:value-type="string">
            <text:p/>
          </table:table-cell>
          <table:table-cell office:value-type="string">
            <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
          </table:table-cell>
          <table:table-cell office:value-type="string">
            <text:p>book-package-rcl</text:p>
          </table:table-cell>
          <table:table-cell office:value-type="string">
            <text:p>False</text:p>
          </table:table-cell>
          <table:table-cell office:value-type="string">
            <text:p>2255</text:p>
          </table:table-cell>
          <table:table-cell office:value-type="string">
            <text:p>2023-01-02T13:16:20.145Z</text:p>
          </table:table-cell>
          <table:table-cell office:value-type="string">
            <text:p/>
          </table:table-cell>
          <table:table-cell office:value-type="string">
            <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resource-workspace-rcl</text:p>
          </table:table-cell>
          <table:table-cell office:value-type="string">
            <text:p>False</text:p>
          </table:table-cell>
          <table:table-cell office:value-type="string">
            <text:p>2804</text:p>
          </table:table-cell>
          <table:table-cell office:value-type="string">
            <text:p>2023-06-13T13:51:03.803Z</text:p>
          </table:table-cell>
          <table:table-cell office:value-type="string">
            <text:p/>
          </table:table-cell>
          <table:table-cell office:value-type="string">
            <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
          </table:table-cell>
          <table:table-cell office:value-type="string">
            <text:p>book-package-app</text:p>
          </table:table-cell>
          <table:table-cell office:value-type="string">
            <text:p>False</text:p>
          </table:table-cell>
          <table:table-cell office:value-type="string">
            <text:p>115</text:p>
          </table:table-cell>
          <table:table-cell office:value-type="string">
            <text:p>2020-07-15T14:29:05.613Z</text:p>
          </table:table-cell>
          <table:table-cell office:value-type="string">
            <text:p/>
          </table:table-cell>
          <table:table-cell office:value-type="string">
            <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
          </table:table-cell>
          <table:table-cell office:value-type="string">
            <text:p>uw-word-count</text:p>
          </table:table-cell>
          <table:table-cell office:value-type="string">
            <text:p>False</text:p>
          </table:table-cell>
          <table:table-cell office:value-type="string">
            <text:p>365</text:p>
          </table:table-cell>
          <table:table-cell office:value-type="string">
            <text:p>2020-07-15T14:01:25.409Z</text:p>
          </table:table-cell>
          <table:table-cell office:value-type="string">
            <text:p/>
          </table:table-cell>
          <table:table-cell office:value-type="string">
            <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
          </table:table-cell>
          <table:table-cell office:value-type="string">
            <text:p>gogs-client</text:p>
          </table:table-cell>
          <table:table-cell office:value-type="string">
            <text:p>False</text:p>
          </table:table-cell>
          <table:table-cell office:value-type="string">
            <text:p>6730</text:p>
          </table:table-cell>
          <table:table-cell office:value-type="string">
            <text:p>2016-07-13T00:07:45.833Z</text:p>
          </table:table-cell>
          <table:table-cell office:value-type="string">
            <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
          </table:table-cell>
          <table:table-cell office:value-type="string">
            <text:p>electronite</text:p>
          </table:table-cell>
          <table:table-cell office:value-type="string">
            <text:p>False</text:p>
          </table:table-cell>
          <table:table-cell office:value-type="string">
            <text:p>2604</text:p>
          </table:table-cell>
          <table:table-cell office:value-type="string">
            <text:p>2026-01-22T21:05:02.866Z</text:p>
          </table:table-cell>
          <table:table-cell office:value-type="string">
            <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
          </table:table-cell>
          <table:table-cell office:value-type="string">
            <text:p>door43-client</text:p>
          </table:table-cell>
          <table:table-cell office:value-type="string">
            <text:p>False</text:p>
          </table:table-cell>
          <table:table-cell office:value-type="string">
            <text:p>1556</text:p>
          </table:table-cell>
          <table:table-cell office:value-type="string">
            <text:p>2019-11-06T17:33:42.928Z</text:p>
          </table:table-cell>
          <table:table-cell office:value-type="string">
            <text:p/>
          </table:table-cell>
          <table:table-cell office:value-type="string">
            <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resource-container</text:p>
          </table:table-cell>
          <table:table-cell office:value-type="string">
            <text:p>False</text:p>
          </table:table-cell>
          <table:table-cell office:value-type="string">
            <text:p>3175</text:p>
          </table:table-cell>
          <table:table-cell office:value-type="string">
            <text:p>2017-02-28T01:01:07.451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rc</text:p>
          </table:table-cell>
          <table:table-cell office:value-type="string">
            <text:p>True</text:p>
          </table:table-cell>
          <table:table-cell office:value-type="string">
            <text:p>1502</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
          </table:table-cell>
          <table:table-cell office:value-type="string">
            <text:p>simple-text-editor-rcl</text:p>
          </table:table-cell>
          <table:table-cell office:value-type="string">
            <text:p>False</text:p>
          </table:table-cell>
          <table:table-cell office:value-type="string">
            <text:p>3826</text:p>
          </table:table-cell>
          <table:table-cell office:value-type="string">
            <text:p>2022-06-09T23:15:38.322Z</text:p>
          </table:table-cell>
          <table:table-cell office:value-type="string">
            <text:p/>
          </table:table-cell>
          <table:table-cell office:value-type="string">
            <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uw-proskomma</text:p>
          </table:table-cell>
          <table:table-cell office:value-type="string">
            <text:p>False</text:p>
          </table:table-cell>
          <table:table-cell office:value-type="string">
            <text:p>2362</text:p>
          </table:table-cell>
          <table:table-cell office:value-type="string">
            <text:p>2022-07-13T12:06:56.761Z</text:p>
          </table:table-cell>
          <table:table-cell office:value-type="string">
            <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
          </table:table-cell>
          <table:table-cell office:value-type="string">
            <text:p>wordmap-react-toolkit</text:p>
          </table:table-cell>
          <table:table-cell office:value-type="string">
            <text:p>False</text:p>
          </table:table-cell>
          <table:table-cell office:value-type="string">
            <text:p>245</text:p>
          </table:table-cell>
          <table:table-cell office:value-type="string">
            <text:p>2019-11-07T08:13:01.981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create-app</text:p>
          </table:table-cell>
          <table:table-cell office:value-type="string">
            <text:p>False</text:p>
          </table:table-cell>
          <table:table-cell office:value-type="string">
            <text:p>73</text:p>
          </table:table-cell>
          <table:table-cell office:value-type="string">
            <text:p>2022-02-22T21:12:10.659Z</text:p>
          </table:table-cell>
          <table:table-cell office:value-type="string">
            <text:p/>
          </table:table-cell>
          <table:table-cell office:value-type="string">
            <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
          </table:table-cell>
          <table:table-cell office:value-type="string">
            <text:p>content-validation-app</text:p>
          </table:table-cell>
          <table:table-cell office:value-type="string">
            <text:p>False</text:p>
          </table:table-cell>
          <table:table-cell office:value-type="string">
            <text:p>188</text:p>
          </table:table-cell>
          <table:table-cell office:value-type="string">
            <text:p>2020-09-16T21:52:51.640Z</text:p>
          </table:table-cell>
          <table:table-cell office:value-type="string">
            <text:p/>
          </table:table-cell>
          <table:table-cell office:value-type="string">
            <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
          </table:table-cell>
          <table:table-cell office:value-type="string">
            <text:p>greek-apparatus-app</text:p>
          </table:table-cell>
          <table:table-cell office:value-type="string">
            <text:p>False</text:p>
          </table:table-cell>
          <table:table-cell office:value-type="string">
            <text:p>71</text:p>
          </table:table-cell>
          <table:table-cell office:value-type="string">
            <text:p>2020-12-11T16:05:46.321Z</text:p>
          </table:table-cell>
          <table:table-cell office:value-type="string">
            <text:p/>
          </table:table-cell>
          <table:table-cell office:value-type="string">
            <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base</text:p>
          </table:table-cell>
          <table:table-cell office:value-type="string">
            <text:p/>
          </table:table-cell>
          <table:table-cell office:value-type="string">
            <text:p>1851</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core</text:p>
          </table:table-cell>
          <table:table-cell office:value-type="string">
            <text:p/>
          </table:table-cell>
          <table:table-cell office:value-type="string">
            <text:p>407</text:p>
          </table:table-cell>
          <table:table-cell office:value-type="string">
            <text:p>2024-01-10T09:45:57.004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pk</text:p>
          </table:table-cell>
          <table:table-cell office:value-type="string">
            <text:p/>
          </table:table-cell>
          <table:table-cell office:value-type="string">
            <text:p>131</text:p>
          </table:table-cell>
          <table:table-cell office:value-type="string">
            <text:p>2024-01-10T09:47:45.958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core</text:p>
          </table:table-cell>
          <table:table-cell office:value-type="string">
            <text:p/>
          </table:table-cell>
          <table:table-cell office:value-type="string">
            <text:p>645</text:p>
          </table:table-cell>
          <table:table-cell office:value-type="string">
            <text:p>2024-01-10T09:42:28.55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pk</text:p>
          </table:table-cell>
          <table:table-cell office:value-type="string">
            <text:p/>
          </table:table-cell>
          <table:table-cell office:value-type="string">
            <text:p>337</text:p>
          </table:table-cell>
          <table:table-cell office:value-type="string">
            <text:p>2024-01-10T09:45:17.176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simple</text:p>
          </table:table-cell>
          <table:table-cell office:value-type="string">
            <text:p/>
          </table:table-cell>
          <table:table-cell office:value-type="string">
            <text:p>373</text:p>
          </table:table-cell>
          <table:table-cell office:value-type="string">
            <text:p>2024-01-10T09:45:39.010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verse-mapper</text:p>
          </table:table-cell>
          <table:table-cell office:value-type="string">
            <text:p/>
          </table:table-cell>
          <table:table-cell office:value-type="string">
            <text:p>97</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js</text:p>
          </table:table-cell>
          <table:table-cell office:value-type="string">
            <text:p/>
          </table:table-cell>
          <table:table-cell office:value-type="string">
            <text:p>609</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office:spreadsheet>
  </office:body>
</office:document-content>
</file>