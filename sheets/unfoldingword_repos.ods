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organization</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maintainers</text:p>
          </table:table-cell>
          <table:table-cell office:value-type="string">
            <text:p>npmjs used by</text:p>
          </table:table-cell>
          <table:table-cell office:value-type="string">
            <text:p>npmjs uses</text:p>
          </table:table-cell>
          <table:table-cell office:value-type="string">
            <text:p>npmjs broken</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bible-edit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8T12:35:58Z</text:p>
          </table:table-cell>
          <table:table-cell office:value-type="string">
            <text:p>2026-07-08T12:00:14Z</text:p>
          </table:table-cell>
          <table:table-cell office:value-type="string">
            <text:p/>
          </table:table-cell>
          <table:table-cell office:value-type="string">
            <text:p>7</text:p>
          </table:table-cell>
          <table:table-cell office:value-type="string">
            <text:p>5</text:p>
          </table:table-cell>
          <table:table-cell office:value-type="string">
            <text:p>605</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enjamin-test, deferredreward, stephenwunrow, dependabot[bot], Benjamin Wrigh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7-08T12:00:3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8T12:03:26Z</text:p>
          </table:table-cell>
          <table:table-cell office:value-type="string">
            <text:p>2026-07-08T11:59:56Z</text:p>
          </table:table-cell>
          <table:table-cell office:value-type="string">
            <text:p/>
          </table:table-cell>
          <table:table-cell office:value-type="string">
            <text:p>1</text:p>
          </table:table-cell>
          <table:table-cell office:value-type="string">
            <text:p>0</text:p>
          </table:table-cell>
          <table:table-cell office:value-type="string">
            <text:p>468</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W Bot, deferredreward, benjamin-test, stephenwunrow, Benjamin Wright,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7-08T12:00:02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02:42:36Z</text:p>
          </table:table-cell>
          <table:table-cell office:value-type="string">
            <text:p>2026-07-08T02:42:21Z</text:p>
          </table:table-cell>
          <table:table-cell office:value-type="string">
            <text:p/>
          </table:table-cell>
          <table:table-cell office:value-type="string">
            <text:p>122</text:p>
          </table:table-cell>
          <table:table-cell office:value-type="string">
            <text:p>9</text:p>
          </table:table-cell>
          <table:table-cell office:value-type="string">
            <text:p>241</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7-08T02:42:25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7-07T10:41:49Z</text:p>
          </table:table-cell>
          <table:table-cell office:value-type="string">
            <text:p>2026-07-07T10:41:45Z</text:p>
          </table:table-cell>
          <table:table-cell office:value-type="string">
            <text:p/>
          </table:table-cell>
          <table:table-cell office:value-type="string">
            <text:p>2</text:p>
          </table:table-cell>
          <table:table-cell office:value-type="string">
            <text:p>2</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7-07T10:41:53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6T15:35:10Z</text:p>
          </table:table-cell>
          <table:table-cell office:value-type="string">
            <text:p>2026-07-06T15:31:02Z</text:p>
          </table:table-cell>
          <table:table-cell office:value-type="string">
            <text:p/>
          </table:table-cell>
          <table:table-cell office:value-type="string">
            <text:p>57</text:p>
          </table:table-cell>
          <table:table-cell office:value-type="string">
            <text:p>0</text:p>
          </table:table-cell>
          <table:table-cell office:value-type="string">
            <text:p>161</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claude,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7-06T15:31:1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5T03:18:29Z</text:p>
          </table:table-cell>
          <table:table-cell office:value-type="string">
            <text:p>2026-07-05T03:17:43Z</text:p>
          </table:table-cell>
          <table:table-cell office:value-type="string">
            <text:p>2026-07-05T03:18:29Z</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unfoldingword/door43-preview-renderers</text:p>
          </table:table-cell>
          <table:table-cell office:value-type="string">
            <text:p>unfoldingword</text:p>
          </table:table-cell>
          <table:table-cell office:value-type="string">
            <text:p>False</text:p>
          </table:table-cell>
          <table:table-cell office:value-type="string">
            <text:p>610</text:p>
          </table:table-cell>
          <table:table-cell office:value-type="string">
            <text:p>2026-07-05T03:16:58.765Z</text:p>
          </table:table-cell>
          <table:table-cell office:value-type="string">
            <text:p>jakobaleksandrovich, klappy, photo-nomad, richmahn, jag3773, mvahowe, abelpz, eliaspinero</text:p>
          </table:table-cell>
          <table:table-cell office:value-type="string">
            <text:p/>
          </table:table-cell>
          <table:table-cell office:value-type="string">
            <text:p>tsv-quote-converters, usfm-alignment-remover, usfm-js</text:p>
          </table:table-cell>
          <table:table-cell office:value-type="string">
            <text:p/>
          </table:table-cell>
          <table:table-cell office:value-type="string">
            <text:p/>
          </table:table-cell>
          <table:table-cell office:value-type="string">
            <text:p>richmahn</text:p>
          </table:table-cell>
          <table:table-cell office:value-type="string">
            <text:p>4</text:p>
          </table:table-cell>
          <table:table-cell office:value-type="string">
            <text:p>0</text:p>
          </table:table-cell>
          <table:table-cell office:value-type="string">
            <text:p>https://github.com/unfoldingWord/door43-preview-renderers</text:p>
          </table:table-cell>
          <table:table-cell office:value-type="string">
            <text:p>2026-07-05T03:17:50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5T00:49:18Z</text:p>
          </table:table-cell>
          <table:table-cell office:value-type="string">
            <text:p>2026-07-05T00:49:09Z</text:p>
          </table:table-cell>
          <table:table-cell office:value-type="string">
            <text:p>2026-07-05T00:49:18Z</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tsv-quote-converters</text:p>
          </table:table-cell>
          <table:table-cell office:value-type="string">
            <text:p>unfoldingword</text:p>
          </table:table-cell>
          <table:table-cell office:value-type="string">
            <text:p>False</text:p>
          </table:table-cell>
          <table:table-cell office:value-type="string">
            <text:p>4222</text:p>
          </table:table-cell>
          <table:table-cell office:value-type="string">
            <text:p>2026-07-05T01:03:03.193Z</text:p>
          </table:table-cell>
          <table:table-cell office:value-type="string">
            <text:p>jakobaleksandrovich, klappy, photo-nomad, richmahn, jag3773, mvahowe, abelpz, eliaspinero</text:p>
          </table:table-cell>
          <table:table-cell office:value-type="string">
            <text:p>@unfoldingword/door43-preview-renderers, tsv7-tn-cleanup-app, twl-generator, tsv-twl-creation-app, add-gl-quotes-to-tsv-files</text:p>
          </table:table-cell>
          <table:table-cell office:value-type="string">
            <text:p>string-punctuation-tokenizer</text:p>
          </table:table-cell>
          <table:table-cell office:value-type="string">
            <text:p>tsv-quote-converters - . Missing homepage. Missing repository. Missing repository url</text:p>
          </table:table-cell>
          <table:table-cell office:value-type="string">
            <text:p>unfoldingWord/node-cli-add-gl-quotes-to-tsv-files, unfoldingWord/tsv7-tn-cleanup-app</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tsv-quote-converters</text:p>
          </table:table-cell>
          <table:table-cell office:value-type="string">
            <text:p>2026-07-05T00:49:14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7-02T11:30:35Z</text:p>
          </table:table-cell>
          <table:table-cell office:value-type="string">
            <text:p>2026-07-02T11:30:32Z</text:p>
          </table:table-cell>
          <table:table-cell office:value-type="string">
            <text:p/>
          </table:table-cell>
          <table:table-cell office:value-type="string">
            <text:p>0</text:p>
          </table:table-cell>
          <table:table-cell office:value-type="string">
            <text:p>0</text:p>
          </table:table-cell>
          <table:table-cell office:value-type="string">
            <text:p>1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7-02T11:30:41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1T15:47:46Z</text:p>
          </table:table-cell>
          <table:table-cell office:value-type="string">
            <text:p>2026-07-01T15:46:14Z</text:p>
          </table:table-cell>
          <table:table-cell office:value-type="string">
            <text:p/>
          </table:table-cell>
          <table:table-cell office:value-type="string">
            <text:p>1</text:p>
          </table:table-cell>
          <table:table-cell office:value-type="string">
            <text:p>0</text:p>
          </table:table-cell>
          <table:table-cell office:value-type="string">
            <text:p>16</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7-01T15:46:21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30T15:38:2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30T15:38:46Z</text:p>
          </table:table-cell>
        </table:table-row>
        <table:table-row>
          <table:table-cell office:value-type="string">
            <text:p>foundations-bt-websi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30T15:16:10Z</text:p>
          </table:table-cell>
          <table:table-cell office:value-type="string">
            <text:p>2026-06-30T15:16:10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text:p>
          </table:table-cell>
          <table:table-cell office:value-type="string">
            <text:p>0</text:p>
          </table:table-cell>
          <table:table-cell office:value-type="string">
            <text:p>0</text:p>
          </table:table-cell>
          <table:table-cell office:value-type="string">
            <text:p>https://github.com/unfoldingWord/foundations-bt-website</text:p>
          </table:table-cell>
          <table:table-cell office:value-type="string">
            <text:p>2026-06-30T15:17:52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30T14:03:18Z</text:p>
          </table:table-cell>
          <table:table-cell office:value-type="string">
            <text:p>2026-06-30T14:03:16Z</text:p>
          </table:table-cell>
          <table:table-cell office:value-type="string">
            <text:p/>
          </table:table-cell>
          <table:table-cell office:value-type="string">
            <text:p>1</text:p>
          </table:table-cell>
          <table:table-cell office:value-type="string">
            <text:p>0</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 claude</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6-30T14:04:5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5T02:47:54Z</text:p>
          </table:table-cell>
          <table:table-cell office:value-type="string">
            <text:p>2026-06-30T08:15:34Z</text:p>
          </table:table-cell>
          <table:table-cell office:value-type="string">
            <text:p>2026-06-27T01:17:05Z</text:p>
          </table:table-cell>
          <table:table-cell office:value-type="string">
            <text:p>6</text:p>
          </table:table-cell>
          <table:table-cell office:value-type="string">
            <text:p>1</text:p>
          </table:table-cell>
          <table:table-cell office:value-type="string">
            <text:p>55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
          </table:table-cell>
          <table:table-cell office:value-type="string">
            <text:p>richmahn, larsgson, PhotoNomad0</text:p>
          </table:table-cell>
          <table:table-cell office:value-type="string">
            <text:p>29</text:p>
          </table:table-cell>
          <table:table-cell office:value-type="string">
            <text:p>0</text:p>
          </table:table-cell>
          <table:table-cell office:value-type="string">
            <text:p>https://github.com/unfoldingWord/door43-preview-app</text:p>
          </table:table-cell>
          <table:table-cell office:value-type="string">
            <text:p>2026-06-30T08:16:27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9T12:16:13Z</text:p>
          </table:table-cell>
          <table:table-cell office:value-type="string">
            <text:p>2026-06-29T10:48:4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6-06-29T12:16:23Z</text:p>
          </table:table-cell>
        </table:table-row>
        <table:table-row>
          <table:table-cell office:value-type="string">
            <text:p>go-ts2s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29T05:27:1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go-ts2sb</text:p>
          </table:table-cell>
          <table:table-cell office:value-type="string">
            <text:p>2026-06-29T05:27:13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7T22:00:46Z</text:p>
          </table:table-cell>
          <table:table-cell office:value-type="string">
            <text:p>2026-06-27T22:00:4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dcs-catalog-accordion-rcl</text:p>
          </table:table-cell>
          <table:table-cell office:value-type="string">
            <text:p>unfoldingword</text:p>
          </table:table-cell>
          <table:table-cell office:value-type="string">
            <text:p>False</text:p>
          </table:table-cell>
          <table:table-cell office:value-type="string">
            <text:p>2676</text:p>
          </table:table-cell>
          <table:table-cell office:value-type="string">
            <text:p>2026-06-27T22:03:16.080Z</text:p>
          </table:table-cell>
          <table:table-cell office:value-type="string">
            <text:p>jakobaleksandrovich, klappy, photo-nomad, richmahn, jag3773, mvahowe, abelpz, eliaspinero</text:p>
          </table:table-cell>
          <table:table-cell office:value-type="string">
            <text:p/>
          </table:table-cell>
          <table:table-cell office:value-type="string">
            <text:p/>
          </table:table-cell>
          <table:table-cell office:value-type="string">
            <text:p>dcs-catalog-accordion-rcl - . Missing homepage. Missing repository. Missing repository ur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27T22:00:49Z</text:p>
          </table:table-cell>
        </table:table-row>
        <table:table-row>
          <table:table-cell office:value-type="string">
            <text:p>meeting-issue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6-25T22:29: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 LITSON LAMBERT</text:p>
          </table:table-cell>
          <table:table-cell office:value-type="string">
            <text:p>0</text:p>
          </table:table-cell>
          <table:table-cell office:value-type="string">
            <text:p>0</text:p>
          </table:table-cell>
          <table:table-cell office:value-type="string">
            <text:p>https://github.com/unfoldingWord/meeting-issues</text:p>
          </table:table-cell>
          <table:table-cell office:value-type="string">
            <text:p>2026-06-25T22:29:18Z</text:p>
          </table:table-cell>
        </table:table-row>
        <table:table-row>
          <table:table-cell office:value-type="string">
            <text:p>bt-servant-signal-gateway</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30T22:43:37Z</text:p>
          </table:table-cell>
          <table:table-cell office:value-type="string">
            <text:p>2026-06-25T20:23:16Z</text:p>
          </table:table-cell>
          <table:table-cell office:value-type="string">
            <text:p/>
          </table:table-cell>
          <table:table-cell office:value-type="string">
            <text:p>12</text:p>
          </table:table-cell>
          <table:table-cell office:value-type="string">
            <text:p>9</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25T20:23:21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5T15:40:22Z</text:p>
          </table:table-cell>
          <table:table-cell office:value-type="string">
            <text:p>2026-06-25T15:40:1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25T15:40:28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6-06-25T09:38:56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25T07:59:51Z</text:p>
          </table:table-cell>
          <table:table-cell office:value-type="string">
            <text:p>2026-06-25T07:59:15Z</text:p>
          </table:table-cell>
          <table:table-cell office:value-type="string">
            <text:p>2026-06-25T07:59:51Z</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5</text:p>
          </table:table-cell>
          <table:table-cell office:value-type="string">
            <text:p>0</text:p>
          </table:table-cell>
          <table:table-cell office:value-type="string">
            <text:p>https://github.com/unfoldingWord/go-rc2sb</text:p>
          </table:table-cell>
          <table:table-cell office:value-type="string">
            <text:p>2026-06-25T07:59:2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25:16Z</text:p>
          </table:table-cell>
          <table:table-cell office:value-type="string">
            <text:p>2026-06-24T05:25:12Z</text:p>
          </table:table-cell>
          <table:table-cell office:value-type="string">
            <text:p/>
          </table:table-cell>
          <table:table-cell office:value-type="string">
            <text:p>1</text:p>
          </table:table-cell>
          <table:table-cell office:value-type="string">
            <text:p>0</text:p>
          </table:table-cell>
          <table:table-cell office:value-type="string">
            <text:p>98</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6-06-24T05:25:19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7-08T02:36:02Z</text:p>
          </table:table-cell>
          <table:table-cell office:value-type="string">
            <text:p>2026-06-23T14:15:02Z</text:p>
          </table:table-cell>
          <table:table-cell office:value-type="string">
            <text:p/>
          </table:table-cell>
          <table:table-cell office:value-type="string">
            <text:p>10</text:p>
          </table:table-cell>
          <table:table-cell office:value-type="string">
            <text:p>2</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unfoldingword</text:p>
          </table:table-cell>
          <table:table-cell office:value-type="string">
            <text:p>False</text:p>
          </table:table-cell>
          <table:table-cell office:value-type="string">
            <text:p>390</text:p>
          </table:table-cell>
          <table:table-cell office:value-type="string">
            <text:p>2018-11-30T10:27:55.416Z</text:p>
          </table:table-cell>
          <table:table-cell office:value-type="string">
            <text:p>jakobaleksandrovich, klappy, photo-nomad, richmahn, jag3773, mvahowe, abelpz, eliaspinero, neutrinog</text:p>
          </table:table-cell>
          <table:table-cell office:value-type="string">
            <text:p/>
          </table:table-cell>
          <table:table-cell office:value-type="string">
            <text:p>usfm-js, wordmap-lexer</text:p>
          </table:table-cell>
          <table:table-cell office:value-type="string">
            <text:p>wordmap-usfm - . Repository url git+https://github.com/translationCoreApps/wordMAP-usfm.git is translationCoreApps</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bt-servant-si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2T13:50:36Z</text:p>
          </table:table-cell>
          <table:table-cell office:value-type="string">
            <text:p>2026-06-22T13:50:35Z</text:p>
          </table:table-cell>
          <table:table-cell office:value-type="string">
            <text:p/>
          </table:table-cell>
          <table:table-cell office:value-type="string">
            <text:p>1</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6-22T13:51:05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6-22T06:33:59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30T20:25:47Z</text:p>
          </table:table-cell>
          <table:table-cell office:value-type="string">
            <text:p>2026-06-22T03:57:41Z</text:p>
          </table:table-cell>
          <table:table-cell office:value-type="string">
            <text:p/>
          </table:table-cell>
          <table:table-cell office:value-type="string">
            <text:p>82</text:p>
          </table:table-cell>
          <table:table-cell office:value-type="string">
            <text:p>4</text:p>
          </table:table-cell>
          <table:table-cell office:value-type="string">
            <text:p>699</text:p>
          </table:table-cell>
          <table:table-cell office:value-type="string">
            <text:p/>
          </table:table-cell>
          <table:table-cell office:value-type="string">
            <text:p>uw-content-validation</text:p>
          </table:table-cell>
          <table:table-cell office:value-type="string">
            <text:p>unfoldingword</text:p>
          </table:table-cell>
          <table:table-cell office:value-type="string">
            <text:p>False</text:p>
          </table:table-cell>
          <table:table-cell office:value-type="string">
            <text:p>2398</text:p>
          </table:table-cell>
          <table:table-cell office:value-type="string">
            <text:p>2026-06-22T04:01:52.034Z</text:p>
          </table:table-cell>
          <table:table-cell office:value-type="string">
            <text:p>jakobaleksandrovich, klappy, photo-nomad, richmahn, jag3773, mvahowe, abelpz, eliaspinero, mandolyte, robh33</text:p>
          </table:table-cell>
          <table:table-cell office:value-type="string">
            <text:p>gateway-admin, tc-create-app, catalog-next-toolkit, content-validation-app</text:p>
          </table:table-cell>
          <table:table-cell office:value-type="string">
            <text:p>usfm-js</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09:01:31Z</text:p>
          </table:table-cell>
          <table:table-cell office:value-type="string">
            <text:p>2026-06-18T09:01:1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18T09:01:44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unfoldingword</text:p>
          </table:table-cell>
          <table:table-cell office:value-type="string">
            <text:p>False</text:p>
          </table:table-cell>
          <table:table-cell office:value-type="string">
            <text:p>5858</text:p>
          </table:table-cell>
          <table:table-cell office:value-type="string">
            <text:p>2026-06-16T10:00:58.589Z</text:p>
          </table:table-cell>
          <table:table-cell office:value-type="string">
            <text:p>jakobaleksandrovich, klappy, photo-nomad, richmahn, jag3773, mvahowe, abelpz, eliaspinero</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proskomma-react-hooks,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602</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9</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gateway-edit - . Missing homepage. Missing repository. Missing repository ur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8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unfoldingword</text:p>
          </table:table-cell>
          <table:table-cell office:value-type="string">
            <text:p>False</text:p>
          </table:table-cell>
          <table:table-cell office:value-type="string">
            <text:p>25501</text:p>
          </table:table-cell>
          <table:table-cell office:value-type="string">
            <text:p>2026-06-02T13:32:18.685Z</text:p>
          </table:table-cell>
          <table:table-cell office:value-type="string">
            <text:p>jakobaleksandrovich, klappy, photo-nomad, richmahn, jag3773, mvahowe, abelpz, eliaspinero</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enhanced-word-aligner-rcl - . Missing homepage</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0</text:p>
          </table:table-cell>
          <table:table-cell office:value-type="string">
            <text:p>2022-02-22T21:12:10.659Z</text:p>
          </table:table-cell>
          <table:table-cell office:value-type="string">
            <text:p>klappy</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unfoldingword</text:p>
          </table:table-cell>
          <table:table-cell office:value-type="string">
            <text:p>False</text:p>
          </table:table-cell>
          <table:table-cell office:value-type="string">
            <text:p>1327</text:p>
          </table:table-cell>
          <table:table-cell office:value-type="string">
            <text:p>2026-05-28T16:01:32.183Z</text:p>
          </table:table-cell>
          <table:table-cell office:value-type="string">
            <text:p>jakobaleksandrovich, klappy, photo-nomad, richmahn, jag3773, mvahowe, abelpz, eliaspinero, mandolyte</text:p>
          </table:table-cell>
          <table:table-cell office:value-type="string">
            <text:p>tc-create-app, dcs-react-hooks</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unfoldingword</text:p>
          </table:table-cell>
          <table:table-cell office:value-type="string">
            <text:p>False</text:p>
          </table:table-cell>
          <table:table-cell office:value-type="string">
            <text:p>105530</text:p>
          </table:table-cell>
          <table:table-cell office:value-type="string">
            <text:p>2021-08-25T21:55:46.406Z</text:p>
          </table:table-cell>
          <table:table-cell office:value-type="string">
            <text:p>jakobaleksandrovich, klappy, photo-nomad, richmahn, jag3773, mvahowe, abelpz, eliaspinero, macolon</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hiscoder-com/level, hiscoder-com/tn-quote, unfoldingWord/oce-editor-tools, vipinpaul/autographa, unfoldingWord/uw-quote-helpers, unfoldingWord/word-aligner-rcl</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unfoldingword</text:p>
          </table:table-cell>
          <table:table-cell office:value-type="string">
            <text:p>False</text:p>
          </table:table-cell>
          <table:table-cell office:value-type="string">
            <text:p>16992</text:p>
          </table:table-cell>
          <table:table-cell office:value-type="string">
            <text:p>2026-05-24T23:03:19.258Z</text:p>
          </table:table-cell>
          <table:table-cell office:value-type="string">
            <text:p>jakobaleksandrovich, klappy, photo-nomad, richmahn, jag3773, mvahowe, abelpz, eliaspinero</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word-aligner-rcl - . Missing homepage</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unfoldingword</text:p>
          </table:table-cell>
          <table:table-cell office:value-type="string">
            <text:p>False</text:p>
          </table:table-cell>
          <table:table-cell office:value-type="string">
            <text:p>6408</text:p>
          </table:table-cell>
          <table:table-cell office:value-type="string">
            <text:p>2026-05-24T22:38:01.649Z</text:p>
          </table:table-cell>
          <table:table-cell office:value-type="string">
            <text:p>photo-nomad</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word-aligner-lib - . Missing homepa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unfoldingword</text:p>
          </table:table-cell>
          <table:table-cell office:value-type="string">
            <text:p>False</text:p>
          </table:table-cell>
          <table:table-cell office:value-type="string">
            <text:p>44550</text:p>
          </table:table-cell>
          <table:table-cell office:value-type="string">
            <text:p>2026-05-24T21:22:13.663Z</text:p>
          </table:table-cell>
          <table:table-cell office:value-type="string">
            <text:p>jakobaleksandrovich, klappy, photo-nomad, richmahn, jag3773, mvahowe, abelpz, eliaspinero, royalsix</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transferer, alignment-playground, next-js-template</text:p>
          </table:table-cell>
          <table:table-cell office:value-type="string">
            <text:p>string-punctuation-tokenizer, usfm-js</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unfoldingword</text:p>
          </table:table-cell>
          <table:table-cell office:value-type="string">
            <text:p>False</text:p>
          </table:table-cell>
          <table:table-cell office:value-type="string">
            <text:p>125701</text:p>
          </table:table-cell>
          <table:table-cell office:value-type="string">
            <text:p>2026-05-23T23:11:18.348Z</text:p>
          </table:table-cell>
          <table:table-cell office:value-type="string">
            <text:p>jakobaleksandrovich, klappy, photo-nomad, richmahn, jag3773, mvahowe, abelpz, eliaspinero, macolon</text:p>
          </table:table-cell>
          <table:table-cell office:value-type="string">
            <text:p>zulip-bot, cskillbp-prompt-over-code, @unfoldingword/door43-preview-renderers, door43-preview-app, wordmap-usfm, uw-content-validation, tsv-twl-creation-app, translationCore, wordAlignment, enhanced-word-aligner-rcl, tc-create-app, word-aligner-rcl, word-aligner-lib, word-aligner, single-scripture-rcl, scripture-resources-rcl, uw-quote-helpers, uw-wordmapbooster, usfm-alignment-remover, tc-source-content-updater, checking-tool-rcl, tc-ui-toolkit, checking-tool-wrapper, uw-bible-parser, book-package-rcl, uw-word-count, usfm-js-wrapper, ScripturePane, translationstudio, alignment-transferer, tc_resources, VerseCheck, resource-checker, checking-extension, translation-helps, qa-app, alignment-playground, greek-apparatus-app, pdf-generator, scripture-as-graph, @bible-editor/api, @bible-editor/web, @bt-synergy/mobile, tc-study, @bt-synergy/resource-parsers, @bt-synergy/usfm-processor</text:p>
          </table:table-cell>
          <table:table-cell office:value-type="string">
            <text:p/>
          </table:table-cell>
          <table:table-cell office:value-type="string">
            <text:p>usfm-js - . Repository url git+https://github.com/translationCoreApps/usfm-js.git is translationCoreApps</text:p>
          </table:table-cell>
          <table:table-cell office:value-type="string">
            <text:p>ihoegen/usfm-parser, unfoldingWord/tsv7-tn-cleanup-app,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unfoldingword</text:p>
          </table:table-cell>
          <table:table-cell office:value-type="string">
            <text:p>False</text:p>
          </table:table-cell>
          <table:table-cell office:value-type="string">
            <text:p>17591</text:p>
          </table:table-cell>
          <table:table-cell office:value-type="string">
            <text:p>2026-05-12T13:15:42.563Z</text:p>
          </table:table-cell>
          <table:table-cell office:value-type="string">
            <text:p>jakobaleksandrovich, klappy, photo-nomad, richmahn, jag3773, mvahowe, abelpz, eliaspinero</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obs-w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obs-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7-05T00:50:20Z</text:p>
          </table:table-cell>
          <table:table-cell office:value-type="string">
            <text:p>2026-04-19T02:36:29Z</text:p>
          </table:table-cell>
          <table:table-cell office:value-type="string">
            <text:p>2026-06-26T09:17:03Z</text:p>
          </table:table-cell>
          <table:table-cell office:value-type="string">
            <text:p>48</text:p>
          </table:table-cell>
          <table:table-cell office:value-type="string">
            <text:p>7</text:p>
          </table:table-cell>
          <table:table-cell office:value-type="string">
            <text:p>207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5</text:p>
          </table:table-cell>
          <table:table-cell office:value-type="string">
            <text:p>1045</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unfoldingword</text:p>
          </table:table-cell>
          <table:table-cell office:value-type="string">
            <text:p>False</text:p>
          </table:table-cell>
          <table:table-cell office:value-type="string">
            <text:p>10271</text:p>
          </table:table-cell>
          <table:table-cell office:value-type="string">
            <text:p>2026-04-16T17:29:58.529Z</text:p>
          </table:table-cell>
          <table:table-cell office:value-type="string">
            <text:p>jakobaleksandrovich, klappy, photo-nomad, richmahn, jag3773, mvahowe, abelpz, eliaspinero</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single-scripture-rcl - . Missing homepage</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unfoldingword</text:p>
          </table:table-cell>
          <table:table-cell office:value-type="string">
            <text:p>False</text:p>
          </table:table-cell>
          <table:table-cell office:value-type="string">
            <text:p>16004</text:p>
          </table:table-cell>
          <table:table-cell office:value-type="string">
            <text:p>2026-03-27T22:01:47.002Z</text:p>
          </table:table-cell>
          <table:table-cell office:value-type="string">
            <text:p>jakobaleksandrovich, klappy, photo-nomad, richmahn, jag3773, mvahowe, abelpz, eliaspinero, macolon</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unfoldingword</text:p>
          </table:table-cell>
          <table:table-cell office:value-type="string">
            <text:p>False</text:p>
          </table:table-cell>
          <table:table-cell office:value-type="string">
            <text:p>3846</text:p>
          </table:table-cell>
          <table:table-cell office:value-type="string">
            <text:p>2026-03-27T21:57:39.012Z</text:p>
          </table:table-cell>
          <table:table-cell office:value-type="string">
            <text:p>jakobaleksandrovich, klappy, photo-nomad, richmahn, jag3773, mvahowe, abelpz, eliaspinero, mandolyte, thenerd247</text:p>
          </table:table-cell>
          <table:table-cell office:value-type="string">
            <text:p>gateway-admin, tc-create-app, translation-helps-rcl</text:p>
          </table:table-cell>
          <table:table-cell office:value-type="string">
            <text:p>dcs-js</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unfoldingword</text:p>
          </table:table-cell>
          <table:table-cell office:value-type="string">
            <text:p>False</text:p>
          </table:table-cell>
          <table:table-cell office:value-type="string">
            <text:p>17061</text:p>
          </table:table-cell>
          <table:table-cell office:value-type="string">
            <text:p>2026-03-19T13:24:25.124Z</text:p>
          </table:table-cell>
          <table:table-cell office:value-type="string">
            <text:p>jakobaleksandrovich, klappy, photo-nomad, richmahn, jag3773, mvahowe, abelpz, eliaspinero, royalsix</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unfoldingword</text:p>
          </table:table-cell>
          <table:table-cell office:value-type="string">
            <text:p>False</text:p>
          </table:table-cell>
          <table:table-cell office:value-type="string">
            <text:p>3583</text:p>
          </table:table-cell>
          <table:table-cell office:value-type="string">
            <text:p>2025-01-17T14:55:12.819Z</text:p>
          </table:table-cell>
          <table:table-cell office:value-type="string">
            <text:p>jakobaleksandrovich, klappy, photo-nomad, richmahn, jag3773, mvahowe, abelpz, eliaspinero</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photo-nomad</text:p>
          </table:table-cell>
          <table:table-cell office:value-type="string">
            <text:p>enhanced-word-aligner-rcl</text:p>
          </table:table-cell>
          <table:table-cell office:value-type="string">
            <text:p>usfm-js, wordmap, wordmap-lexer</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unfoldingword</text:p>
          </table:table-cell>
          <table:table-cell office:value-type="string">
            <text:p>False</text:p>
          </table:table-cell>
          <table:table-cell office:value-type="string">
            <text:p>3826</text:p>
          </table:table-cell>
          <table:table-cell office:value-type="string">
            <text:p>2026-02-02T16:12:05.648Z</text:p>
          </table:table-cell>
          <table:table-cell office:value-type="string">
            <text:p>jakobaleksandrovich, klappy, photo-nomad, richmahn, jag3773, mvahowe, abelpz, eliaspinero</text:p>
          </table:table-cell>
          <table:table-cell office:value-type="string">
            <text:p>tc-create-app, greek-apparatus-app</text:p>
          </table:table-cell>
          <table:table-cell office:value-type="string">
            <text:p>markdown-translatable, @unfoldingword/eslint-config</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2755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1284</text:p>
          </table:table-cell>
          <table:table-cell office:value-type="string">
            <text:p>https://github.com/unfoldingWord/electronite</text:p>
          </table:table-cell>
          <table:table-cell office:value-type="string">
            <text:p>2026-02-15T19:31:44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unfoldingword</text:p>
          </table:table-cell>
          <table:table-cell office:value-type="string">
            <text:p>False</text:p>
          </table:table-cell>
          <table:table-cell office:value-type="string">
            <text:p>1110</text:p>
          </table:table-cell>
          <table:table-cell office:value-type="string">
            <text:p>2026-01-21T23:37:01.096Z</text:p>
          </table:table-cell>
          <table:table-cell office:value-type="string">
            <text:p>jakobaleksandrovich, klappy, photo-nomad, richmahn, jag3773, mvahowe, abelpz, eliaspinero</text:p>
          </table:table-cell>
          <table:table-cell office:value-type="string">
            <text:p>@unfoldingword/door43-preview-renderers, door43-preview-app, twl-generator</text:p>
          </table:table-cell>
          <table:table-cell office:value-type="string">
            <text:p>usfm-js</text:p>
          </table:table-cell>
          <table:table-cell office:value-type="string">
            <text:p>usfm-alignment-remover - . Missing homepage. Missing repository. Missing repository url</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bt-servant-log-view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3</text:p>
          </table:table-cell>
          <table:table-cell office:value-type="string">
            <text:p>0</text:p>
          </table:table-cell>
          <table:table-cell office:value-type="string">
            <text:p>39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unfoldingword</text:p>
          </table:table-cell>
          <table:table-cell office:value-type="string">
            <text:p>False</text:p>
          </table:table-cell>
          <table:table-cell office:value-type="string">
            <text:p>6869</text:p>
          </table:table-cell>
          <table:table-cell office:value-type="string">
            <text:p>2024-10-16T17:43:33.516Z</text:p>
          </table:table-cell>
          <table:table-cell office:value-type="string">
            <text:p>jakobaleksandrovich, klappy, photo-nomad, richmahn, jag3773, mvahowe, abelpz, eliaspinero, macolon</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unfoldingword</text:p>
          </table:table-cell>
          <table:table-cell office:value-type="string">
            <text:p>False</text:p>
          </table:table-cell>
          <table:table-cell office:value-type="string">
            <text:p>3929</text:p>
          </table:table-cell>
          <table:table-cell office:value-type="string">
            <text:p>2025-11-03T22:53:20.315Z</text:p>
          </table:table-cell>
          <table:table-cell office:value-type="string">
            <text:p>jakobaleksandrovich, klappy, photo-nomad, richmahn, jag3773, mvahowe, abelpz, eliaspinero</text:p>
          </table:table-cell>
          <table:table-cell office:value-type="string">
            <text:p/>
          </table:table-cell>
          <table:table-cell office:value-type="string">
            <text:p>tsv-quote-converters</text:p>
          </table:table-cell>
          <table:table-cell office:value-type="string">
            <text:p>add-gl-quotes-to-tsv-files - . Missing homepage</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unfoldingword</text:p>
          </table:table-cell>
          <table:table-cell office:value-type="string">
            <text:p>False</text:p>
          </table:table-cell>
          <table:table-cell office:value-type="string">
            <text:p>8067</text:p>
          </table:table-cell>
          <table:table-cell office:value-type="string">
            <text:p>2025-10-28T18:16:22.466Z</text:p>
          </table:table-cell>
          <table:table-cell office:value-type="string">
            <text:p>jakobaleksandrovich, klappy, photo-nomad, richmahn, jag3773, mvahowe, abelpz, eliaspinero, royalsix</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unfoldingword</text:p>
          </table:table-cell>
          <table:table-cell office:value-type="string">
            <text:p>False</text:p>
          </table:table-cell>
          <table:table-cell office:value-type="string">
            <text:p>5979</text:p>
          </table:table-cell>
          <table:table-cell office:value-type="string">
            <text:p>2025-10-20T15:58:23.259Z</text:p>
          </table:table-cell>
          <table:table-cell office:value-type="string">
            <text:p>photo-nomad</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checking-tool-rcl - . Missing homepage</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unfoldingword</text:p>
          </table:table-cell>
          <table:table-cell office:value-type="string">
            <text:p>False</text:p>
          </table:table-cell>
          <table:table-cell office:value-type="string">
            <text:p>18829</text:p>
          </table:table-cell>
          <table:table-cell office:value-type="string">
            <text:p>2026-02-18T15:28:10.229Z</text:p>
          </table:table-cell>
          <table:table-cell office:value-type="string">
            <text:p>jakobaleksandrovich, klappy, photo-nomad, richmahn, jag3773, mvahowe, abelpz, eliaspinero, neutrinog</text:p>
          </table:table-cell>
          <table:table-cell office:value-type="string">
            <text:p>translationCore, wordAlignment, word-aligner-rcl, uw-wordmapbooster, alignment-transferer, wordmap-mt, wordmap-react-toolkit</text:p>
          </table:table-cell>
          <table:table-cell office:value-type="string">
            <text:p>wordmap-lexer</text:p>
          </table:table-cell>
          <table:table-cell office:value-type="string">
            <text:p>wordmap - . Repository url git+https://github.com/translationCoreApps/wordMAP.git is translationCoreApps</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unfoldingword</text:p>
          </table:table-cell>
          <table:table-cell office:value-type="string">
            <text:p>False</text:p>
          </table:table-cell>
          <table:table-cell office:value-type="string">
            <text:p>19774</text:p>
          </table:table-cell>
          <table:table-cell office:value-type="string">
            <text:p>2023-03-07T15:00:29.476Z</text:p>
          </table:table-cell>
          <table:table-cell office:value-type="string">
            <text:p>jakobaleksandrovich, klappy, photo-nomad, richmahn, jag3773, mvahowe, abelpz, eliaspinero</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unfoldingword</text:p>
          </table:table-cell>
          <table:table-cell office:value-type="string">
            <text:p>False</text:p>
          </table:table-cell>
          <table:table-cell office:value-type="string">
            <text:p>28517</text:p>
          </table:table-cell>
          <table:table-cell office:value-type="string">
            <text:p>2024-12-31T18:53:34.752Z</text:p>
          </table:table-cell>
          <table:table-cell office:value-type="string">
            <text:p>jakobaleksandrovich, klappy, photo-nomad, richmahn, jag3773, mvahowe, abelpz, eliaspinero, macolon</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unfoldingword</text:p>
          </table:table-cell>
          <table:table-cell office:value-type="string">
            <text:p>False</text:p>
          </table:table-cell>
          <table:table-cell office:value-type="string">
            <text:p>9812</text:p>
          </table:table-cell>
          <table:table-cell office:value-type="string">
            <text:p>2024-03-19T18:58:55.915Z</text:p>
          </table:table-cell>
          <table:table-cell office:value-type="string">
            <text:p>jakobaleksandrovich, klappy, photo-nomad, richmahn, jag3773, mvahowe, abelpz, eliaspinero, macolon</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checking-tool-wrapper - . Missing homepage. Missing repository. Missing repository url</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unfoldingword</text:p>
          </table:table-cell>
          <table:table-cell office:value-type="string">
            <text:p>False</text:p>
          </table:table-cell>
          <table:table-cell office:value-type="string">
            <text:p>254</text:p>
          </table:table-cell>
          <table:table-cell office:value-type="string">
            <text:p>2024-10-13T01:08:01.943Z</text:p>
          </table:table-cell>
          <table:table-cell office:value-type="string">
            <text:p>jakobaleksandrovich, klappy, photo-nomad, richmahn, jag3773, mvahowe,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5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unfoldingword</text:p>
          </table:table-cell>
          <table:table-cell office:value-type="string">
            <text:p>False</text:p>
          </table:table-cell>
          <table:table-cell office:value-type="string">
            <text:p>5688</text:p>
          </table:table-cell>
          <table:table-cell office:value-type="string">
            <text:p>2024-06-04T12:40:10.075Z</text:p>
          </table:table-cell>
          <table:table-cell office:value-type="string">
            <text:p>jakobaleksandrovich, klappy, photo-nomad, richmahn, jag3773, mvahowe, abelpz, eliaspinero</text:p>
          </table:table-cell>
          <table:table-cell office:value-type="string">
            <text:p>door43-preview-app, gateway-edit, bsa, scripture-tsv, gateway-translate, create-app, bible-preview-app, bible-ref-pk-demo, anchor-alignment-poc, greek-apparatus-app, @oce-editor-tools/joy-pk, @oce-editor-tools/mui-pk</text:p>
          </table:table-cell>
          <table:table-cell office:value-type="string">
            <text:p>bible-reference-range</text:p>
          </table:table-cell>
          <table:table-cell office:value-type="string">
            <text:p>bible-reference-rcl - . Missing homepa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unfoldingword</text:p>
          </table:table-cell>
          <table:table-cell office:value-type="string">
            <text:p>False</text:p>
          </table:table-cell>
          <table:table-cell office:value-type="string">
            <text:p>2818</text:p>
          </table:table-cell>
          <table:table-cell office:value-type="string">
            <text:p>2024-05-02T21:03:03.412Z</text:p>
          </table:table-cell>
          <table:table-cell office:value-type="string">
            <text:p>kintsoogii</text:p>
          </table:table-cell>
          <table:table-cell office:value-type="string">
            <text:p>gateway-edit</text:p>
          </table:table-cell>
          <table:table-cell office:value-type="string">
            <text:p>bible-reference-range, bible-reference-rcl</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2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7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door43-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unfoldingword</text:p>
          </table:table-cell>
          <table:table-cell office:value-type="string">
            <text:p>False</text:p>
          </table:table-cell>
          <table:table-cell office:value-type="string">
            <text:p>17013</text:p>
          </table:table-cell>
          <table:table-cell office:value-type="string">
            <text:p>2023-12-07T19:15:35.590Z</text:p>
          </table:table-cell>
          <table:table-cell office:value-type="string">
            <text:p>jakobaleksandrovich, klappy, photo-nomad, richmahn, jag3773, mvahowe, abelpz, eliaspinero, joelcjohnson</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translation-notes-extension, codex-editor-extension, alignment-playground</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3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unfoldingword</text:p>
          </table:table-cell>
          <table:table-cell office:value-type="string">
            <text:p>False</text:p>
          </table:table-cell>
          <table:table-cell office:value-type="string">
            <text:p>4896</text:p>
          </table:table-cell>
          <table:table-cell office:value-type="string">
            <text:p>2022-02-02T14:06:17.344Z</text:p>
          </table:table-cell>
          <table:table-cell office:value-type="string">
            <text:p>jakobaleksandrovich, klappy, photo-nomad, richmahn, jag3773, mvahowe, abelpz, eliaspinero, mandolyte, zachpennington</text:p>
          </table:table-cell>
          <table:table-cell office:value-type="string">
            <text:p>gateway-admin, tc-create-app, word-aligner-rcl, tsv-groupdata-parser, checking-tool-rcl, checking-extension</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3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uw-quote-helpers</text:p>
          </table:table-cell>
          <table:table-cell office:value-type="string">
            <text:p>bible-reference-range, usfm-js</text:p>
          </table:table-cell>
          <table:table-cell office:value-type="string">
            <text:p>uw-bible-parser - . Missing homepage</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unfoldingword</text:p>
          </table:table-cell>
          <table:table-cell office:value-type="string">
            <text:p>False</text:p>
          </table:table-cell>
          <table:table-cell office:value-type="string">
            <text:p>11157</text:p>
          </table:table-cell>
          <table:table-cell office:value-type="string">
            <text:p>2023-07-16T00:28:17.570Z</text:p>
          </table:table-cell>
          <table:table-cell office:value-type="string">
            <text:p>jakobaleksandrovich, klappy, photo-nomad, richmahn, jag3773, mvahowe, abelpz, eliaspinero, mandolyte</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163</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997</text:p>
          </table:table-cell>
          <table:table-cell office:value-type="string">
            <text:p>2022-11-02T13:18:25.384Z</text:p>
          </table:table-cell>
          <table:table-cell office:value-type="string">
            <text:p>jakobaleksandrovich, klappy, photo-nomad, richmahn, jag3773, mvahowe, abelpz, eliaspinero</text:p>
          </table:table-cell>
          <table:table-cell office:value-type="string">
            <text:p>dcs-branch-merger, gateway-translate, dcs-react-hooks, bible-preview-app, dcs-login, dcs-js-example</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unfoldingword</text:p>
          </table:table-cell>
          <table:table-cell office:value-type="string">
            <text:p>True</text:p>
          </table:table-cell>
          <table:table-cell office:value-type="string">
            <text:p>1357</text:p>
          </table:table-cell>
          <table:table-cell office:value-type="string">
            <text:p>2023-03-21T14:43:38.471Z</text:p>
          </table:table-cell>
          <table:table-cell office:value-type="string">
            <text:p>jakobaleksandrovich, klappy, photo-nomad, richmahn, jag3773, mvahowe, abelpz, eliaspinero, superdav42</text:p>
          </table:table-cell>
          <table:table-cell office:value-type="string">
            <text:p/>
          </table:table-cell>
          <table:table-cell office:value-type="string">
            <text:p>epitelete-html, proskomma-react-hooks, translation-helps-rcl</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5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proskomma-react-hooks</text:p>
          </table:table-cell>
          <table:table-cell office:value-type="string">
            <text:p>unfoldingword</text:p>
          </table:table-cell>
          <table:table-cell office:value-type="string">
            <text:p>False</text:p>
          </table:table-cell>
          <table:table-cell office:value-type="string">
            <text:p>3457</text:p>
          </table:table-cell>
          <table:table-cell office:value-type="string">
            <text:p>2022-08-24T19:15:40.763Z</text:p>
          </table:table-cell>
          <table:table-cell office:value-type="string">
            <text:p>jakobaleksandrovich, klappy, photo-nomad, richmahn, jag3773, mvahowe, abelpz, eliaspinero</text:p>
          </table:table-cell>
          <table:table-cell office:value-type="string">
            <text:p>translationCore, uw-pdf-preview, uw-editor</text:p>
          </table:table-cell>
          <table:table-cell office:value-type="string">
            <text:p>proskomma-render-pdf, @unfoldingword/eslint-config</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unfoldingword</text:p>
          </table:table-cell>
          <table:table-cell office:value-type="string">
            <text:p>False</text:p>
          </table:table-cell>
          <table:table-cell office:value-type="string">
            <text:p>176</text:p>
          </table:table-cell>
          <table:table-cell office:value-type="string">
            <text:p>2022-08-19T12:33:49.976Z</text:p>
          </table:table-cell>
          <table:table-cell office:value-type="string">
            <text:p>mandolyte, abelpz</text:p>
          </table:table-cell>
          <table:table-cell office:value-type="string">
            <text:p/>
          </table:table-cell>
          <table:table-cell office:value-type="string">
            <text:p>dcs-js, uw-languages-rcl, @unfoldingword/eslint-config</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unfoldingword</text:p>
          </table:table-cell>
          <table:table-cell office:value-type="string">
            <text:p>False</text:p>
          </table:table-cell>
          <table:table-cell office:value-type="string">
            <text:p>2231</text:p>
          </table:table-cell>
          <table:table-cell office:value-type="string">
            <text:p>2023-01-02T13:16:20.145Z</text:p>
          </table:table-cell>
          <table:table-cell office:value-type="string">
            <text:p>mandolyte</text:p>
          </table:table-cell>
          <table:table-cell office:value-type="string">
            <text:p>book-package-app</text:p>
          </table:table-cell>
          <table:table-cell office:value-type="string">
            <text:p>usfm-js, uw-word-count</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unfoldingword</text:p>
          </table:table-cell>
          <table:table-cell office:value-type="string">
            <text:p>False</text:p>
          </table:table-cell>
          <table:table-cell office:value-type="string">
            <text:p>3473</text:p>
          </table:table-cell>
          <table:table-cell office:value-type="string">
            <text:p>2023-06-13T13:51:03.803Z</text:p>
          </table:table-cell>
          <table:table-cell office:value-type="string">
            <text:p>jakobaleksandrovich, klappy, photo-nomad, richmahn, jag3773, mvahowe, abelpz, eliaspinero, royalsix</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resource-workspace-rcl - . Missing homepage</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victor-hu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unfoldingword</text:p>
          </table:table-cell>
          <table:table-cell office:value-type="string">
            <text:p>False</text:p>
          </table:table-cell>
          <table:table-cell office:value-type="string">
            <text:p>109</text:p>
          </table:table-cell>
          <table:table-cell office:value-type="string">
            <text:p>2020-07-15T14:29:05.613Z</text:p>
          </table:table-cell>
          <table:table-cell office:value-type="string">
            <text:p>mandolyte</text:p>
          </table:table-cell>
          <table:table-cell office:value-type="string">
            <text:p/>
          </table:table-cell>
          <table:table-cell office:value-type="string">
            <text:p>book-package-rcl</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unfoldingword</text:p>
          </table:table-cell>
          <table:table-cell office:value-type="string">
            <text:p>False</text:p>
          </table:table-cell>
          <table:table-cell office:value-type="string">
            <text:p>1494</text:p>
          </table:table-cell>
          <table:table-cell office:value-type="string">
            <text:p>2020-12-10T06:26:46.446Z</text:p>
          </table:table-cell>
          <table:table-cell office:value-type="string">
            <text:p>jakobaleksandrovich, klappy, photo-nomad, richmahn, jag3773, mvahowe, abelpz, eliaspinero</text:p>
          </table:table-cell>
          <table:table-cell office:value-type="string">
            <text:p>enhanced-word-aligner-rcl, tc-create-app, gitea-react-toolkit, single-scripture-rcl, scripture-resources-rcl, datatable-translatable, markdown-translatable, proskomma-react-hooks, dcs-react-hooks, resource-workspace-rcl, simple-text-editor-rcl, gitea-offline-poc</text:p>
          </table:table-cell>
          <table:table-cell office:value-type="string">
            <text:p/>
          </table:table-cell>
          <table:table-cell office:value-type="string">
            <text:p>@unfoldingword/eslint-config - . Missing homepage. Missing repository. Missing repository url</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
          </table:table-cell>
          <table:table-cell office:value-type="string">
            <text:p>False</text:p>
          </table:table-cell>
          <table:table-cell office:value-type="string">
            <text:p>321</text:p>
          </table:table-cell>
          <table:table-cell office:value-type="string">
            <text:p>2020-07-15T14:01:25.409Z</text:p>
          </table:table-cell>
          <table:table-cell office:value-type="string">
            <text:p>mandolyte</text:p>
          </table:table-cell>
          <table:table-cell office:value-type="string">
            <text:p>book-package-rcl</text:p>
          </table:table-cell>
          <table:table-cell office:value-type="string">
            <text:p>usfm-js</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unfoldingword</text:p>
          </table:table-cell>
          <table:table-cell office:value-type="string">
            <text:p>False</text:p>
          </table:table-cell>
          <table:table-cell office:value-type="string">
            <text:p>21351</text:p>
          </table:table-cell>
          <table:table-cell office:value-type="string">
            <text:p>2020-04-09T15:48:09.080Z</text:p>
          </table:table-cell>
          <table:table-cell office:value-type="string">
            <text:p>jakobaleksandrovich, klappy, photo-nomad, richmahn, jag3773, mvahowe, abelpz, eliaspinero, neutrinog</text:p>
          </table:table-cell>
          <table:table-cell office:value-type="string">
            <text:p>wordmap-usfm, translationCore, wordAlignment, string-punctuation-tokenizer, word-aligner-rcl, word-aligner-lib, uw-wordmapbooster, checking-tool-rcl, wordmap, alignment-transferer, wordmap-mt, alignment-playground, wordmap-react-toolkit</text:p>
          </table:table-cell>
          <table:table-cell office:value-type="string">
            <text:p>string-punctuation-tokenizer</text:p>
          </table:table-cell>
          <table:table-cell office:value-type="string">
            <text:p>wordmap-lexer - . Repository url git+https://github.com/translationCoreApps/wordMAP-lexer.git is translationCoreApps</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unfoldingword</text:p>
          </table:table-cell>
          <table:table-cell office:value-type="string">
            <text:p>False</text:p>
          </table:table-cell>
          <table:table-cell office:value-type="string">
            <text:p>19071</text:p>
          </table:table-cell>
          <table:table-cell office:value-type="string">
            <text:p>2020-04-16T04:30:54.949Z</text:p>
          </table:table-cell>
          <table:table-cell office:value-type="string">
            <text:p>jakobaleksandrovich, klappy, photo-nomad, richmahn, jag3773, mvahowe, abelpz, eliaspinero, neutrinog</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tc-tool - . Repository url git+https://github.com/translationCoreApps/tc-tool.git is translationCoreApps</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unfoldingword</text:p>
          </table:table-cell>
          <table:table-cell office:value-type="string">
            <text:p>False</text:p>
          </table:table-cell>
          <table:table-cell office:value-type="string">
            <text:p>13142</text:p>
          </table:table-cell>
          <table:table-cell office:value-type="string">
            <text:p>2018-05-03T21:24:53.169Z</text:p>
          </table:table-cell>
          <table:table-cell office:value-type="string">
            <text:p>jakobaleksandrovich, klappy, photo-nomad, richmahn, jag3773, mvahowe, abelpz, eliaspinero</text:p>
          </table:table-cell>
          <table:table-cell office:value-type="string">
            <text:p>translationCore, word-aligner-lib, checking-tool-rcl, selections, VerseCheck</text:p>
          </table:table-cell>
          <table:table-cell office:value-type="string">
            <text:p/>
          </table:table-cell>
          <table:table-cell office:value-type="string">
            <text:p>tc-strings - . Repository url git+https://github.com/translationCoreApps/string-utils.git is translationCoreApp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unfoldingword</text:p>
          </table:table-cell>
          <table:table-cell office:value-type="string">
            <text:p>False</text:p>
          </table:table-cell>
          <table:table-cell office:value-type="string">
            <text:p>7894</text:p>
          </table:table-cell>
          <table:table-cell office:value-type="string">
            <text:p>2018-05-03T21:23:02.005Z</text:p>
          </table:table-cell>
          <table:table-cell office:value-type="string">
            <text:p>jakobaleksandrovich, klappy, photo-nomad, richmahn, jag3773, mvahowe, abelpz, eliaspinero</text:p>
          </table:table-cell>
          <table:table-cell office:value-type="string">
            <text:p>translationCore, wordAlignment, checking-tool-wrapper, VerseCheck</text:p>
          </table:table-cell>
          <table:table-cell office:value-type="string">
            <text:p>tc-strings</text:p>
          </table:table-cell>
          <table:table-cell office:value-type="string">
            <text:p>selections - . Repository url git+https://github.com/translationCoreApps/selections.git is translationCoreApp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release_uw_resource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6-06-23T22:40:28Z</text:p>
          </table:table-cell>
          <table:table-cell office:value-type="string">
            <text:p>2026-06-23T22:40:2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release_uw_resources</text:p>
          </table:table-cell>
          <table:table-cell office:value-type="string">
            <text:p>2026-06-23T22:40:32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33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6-23T06:48:31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26-06-18T17:34:51Z</text:p>
          </table:table-cell>
        </table:table-row>
        <table:table-row>
          <table:table-cell office:value-type="string">
            <text:p>ts-deskto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translationstudi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client, electron, gogs-client, usfm-js, electron-packager</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400</text:p>
          </table:table-cell>
          <table:table-cell office:value-type="string">
            <text:p>https://github.com/unfoldingWord-dev/ts-desktop</text:p>
          </table:table-cell>
          <table:table-cell office:value-type="string">
            <text:p>2026-04-22T14:46:49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2396</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548</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1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15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69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1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2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70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unfoldingword</text:p>
          </table:table-cell>
          <table:table-cell office:value-type="string">
            <text:p>False</text:p>
          </table:table-cell>
          <table:table-cell office:value-type="string">
            <text:p>6564</text:p>
          </table:table-cell>
          <table:table-cell office:value-type="string">
            <text:p>2016-07-13T00:07:45.833Z</text:p>
          </table:table-cell>
          <table:table-cell office:value-type="string">
            <text:p>neutrinog</text:p>
          </table:table-cell>
          <table:table-cell office:value-type="string">
            <text:p>translationCore, wordAlignment, checking-tool-wrapper, translationstudio</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38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2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100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rickzhao, georgexu99, malept, marshallofsound, vertedinde</text:p>
          </table:table-cell>
          <table:table-cell office:value-type="string">
            <text:p>electron-forge, translationstudio, @electron-forge/core, @electron-forge/plugin-webpack, @electron-forge/shared-types</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electron-builder/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unfoldingword</text:p>
          </table:table-cell>
          <table:table-cell office:value-type="string">
            <text:p>False</text:p>
          </table:table-cell>
          <table:table-cell office:value-type="string">
            <text:p>2761</text:p>
          </table:table-cell>
          <table:table-cell office:value-type="string">
            <text:p>2026-01-22T21:05:02.866Z</text:p>
          </table:table-cell>
          <table:table-cell office:value-type="string">
            <text:p>jakobaleksandrovich, klappy, photo-nomad, richmahn, jag3773, mvahowe, abelpz, eliaspinero, neutrinog</text:p>
          </table:table-cell>
          <table:table-cell office:value-type="string">
            <text:p>translationCore</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2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1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hatap</text:p>
          </table:table-cell>
          <table:table-cell office:value-type="string">
            <text:p/>
          </table:table-cell>
          <table:table-cell office:value-type="string">
            <text:p>usfm-js, gitea-react-toolkit, scripture-resources-rcl, markdown-translatable</text:p>
          </table:table-cell>
          <table:table-cell office:value-type="string">
            <text:p>resource-checker - . Missing homepage. Missing repository. Missing repository url</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1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proskomma-render-pdf</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mvahowe</text:p>
          </table:table-cell>
          <table:table-cell office:value-type="string">
            <text:p>proskomma-react-hooks, bible-preview-app, bible-ref-pk-demo</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30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mirror-to-gite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
          </table:table-cell>
          <table:table-cell office:value-type="string">
            <text:p>False</text:p>
          </table:table-cell>
          <table:table-cell office:value-type="string">
            <text:p>1643</text:p>
          </table:table-cell>
          <table:table-cell office:value-type="string">
            <text:p>2019-11-06T17:33:42.928Z</text:p>
          </table:table-cell>
          <table:table-cell office:value-type="string">
            <text:p>neutrinog</text:p>
          </table:table-cell>
          <table:table-cell office:value-type="string">
            <text:p>translationstudio</text:p>
          </table:table-cell>
          <table:table-cell office:value-type="string">
            <text:p>resource-container</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12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54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
          </table:table-cell>
          <table:table-cell office:value-type="string">
            <text:p>False</text:p>
          </table:table-cell>
          <table:table-cell office:value-type="string">
            <text:p>3362</text:p>
          </table:table-cell>
          <table:table-cell office:value-type="string">
            <text:p>2017-02-28T01:01:07.451Z</text:p>
          </table:table-cell>
          <table:table-cell office:value-type="string">
            <text:p>neutrinog</text:p>
          </table:table-cell>
          <table:table-cell office:value-type="string">
            <text:p>door43-client</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8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2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
          </table:table-cell>
          <table:table-cell office:value-type="string">
            <text:p>True</text:p>
          </table:table-cell>
          <table:table-cell office:value-type="string">
            <text:p>1840</text:p>
          </table:table-cell>
          <table:table-cell office:value-type="string">
            <text:p>2016-09-01T18:35:44.393Z</text:p>
          </table:table-cell>
          <table:table-cell office:value-type="string">
            <text:p>neutrin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1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78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1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7-08T11:09:24Z</text:p>
          </table:table-cell>
          <table:table-cell office:value-type="string">
            <text:p>2026-07-08T11:07:18Z</text:p>
          </table:table-cell>
          <table:table-cell office:value-type="string">
            <text:p/>
          </table:table-cell>
          <table:table-cell office:value-type="string">
            <text:p>0</text:p>
          </table:table-cell>
          <table:table-cell office:value-type="string">
            <text:p>0</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7-08T11:09:29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ucifier129</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ilarest</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1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unfoldingword</text:p>
          </table:table-cell>
          <table:table-cell office:value-type="string">
            <text:p>False</text:p>
          </table:table-cell>
          <table:table-cell office:value-type="string">
            <text:p>4118</text:p>
          </table:table-cell>
          <table:table-cell office:value-type="string">
            <text:p>2022-06-09T23:15:38.322Z</text:p>
          </table:table-cell>
          <table:table-cell office:value-type="string">
            <text:p>jakobaleksandrovich, klappy, photo-nomad, richmahn, jag3773, mvahowe, abelpz, eliaspinero</text:p>
          </table:table-cell>
          <table:table-cell office:value-type="string">
            <text:p>simple-text-editor-app</text:p>
          </table:table-cell>
          <table:table-cell office:value-type="string">
            <text:p>@unfoldingword/eslint-config</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1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
          </table:table-cell>
          <table:table-cell office:value-type="string">
            <text:p>False</text:p>
          </table:table-cell>
          <table:table-cell office:value-type="string">
            <text:p>2244</text:p>
          </table:table-cell>
          <table:table-cell office:value-type="string">
            <text:p>2022-07-13T12:06:56.761Z</text:p>
          </table:table-cell>
          <table:table-cell office:value-type="string">
            <text:p>mandolyte, mvahowe</text:p>
          </table:table-cell>
          <table:table-cell office:value-type="string">
            <text:p>epitelete-html, proskomma-scripture-resources-rcl</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ranslation-notes-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codex-editor-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vscode-speech-to-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proskomma-render-pdf</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vanderzee</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ranslationstudio, test, @scope/package, electronite-forge/, fuses-test-app, native-app, CheckingTool, electron-app</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
          </table:table-cell>
          <table:table-cell office:value-type="string">
            <text:p>False</text:p>
          </table:table-cell>
          <table:table-cell office:value-type="string">
            <text:p>230</text:p>
          </table:table-cell>
          <table:table-cell office:value-type="string">
            <text:p>2019-11-07T08:13:01.981Z</text:p>
          </table:table-cell>
          <table:table-cell office:value-type="string">
            <text:p>neutrinog</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
          </table:table-cell>
          <table:table-cell office:value-type="string">
            <text:p>False</text:p>
          </table:table-cell>
          <table:table-cell office:value-type="string">
            <text:p>194</text:p>
          </table:table-cell>
          <table:table-cell office:value-type="string">
            <text:p>2019-09-25T16:00:59.747Z</text:p>
          </table:table-cell>
          <table:table-cell office:value-type="string">
            <text:p>klapp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hemikejr</text:p>
          </table:table-cell>
          <table:table-cell office:value-type="string">
            <text:p>anchor-alignment-poc</text:p>
          </table:table-cell>
          <table:table-cell office:value-type="string">
            <text:p/>
          </table:table-cell>
          <table:table-cell office:value-type="string">
            <text:p>alignment-editor-rcl - . Missing homepage. Missing repository. Missing repository url</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bible-ref-pk-dem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proskomma-render-pdf</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0</text:p>
          </table:table-cell>
          <table:table-cell office:value-type="string">
            <text:p>2022-02-22T21:12:10.659Z</text:p>
          </table:table-cell>
          <table:table-cell office:value-type="string">
            <text:p>klappy</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gateway-edit - . Missing homepage. Missing repository. Missing repository url</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unfoldingword</text:p>
          </table:table-cell>
          <table:table-cell office:value-type="string">
            <text:p>False</text:p>
          </table:table-cell>
          <table:table-cell office:value-type="string">
            <text:p>286</text:p>
          </table:table-cell>
          <table:table-cell office:value-type="string">
            <text:p>2020-09-16T21:52:51.640Z</text:p>
          </table:table-cell>
          <table:table-cell office:value-type="string">
            <text:p>jakobaleksandrovich, klappy, photo-nomad, richmahn, jag3773, mvahowe, abelpz, eliaspinero</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uxiangqiu</text:p>
          </table:table-cell>
          <table:table-cell office:value-type="string">
            <text:p/>
          </table:table-cell>
          <table:table-cell office:value-type="string">
            <text:p>gitea-react-toolkit, translation-helps-rcl, resource-workspace-rcl</text:p>
          </table:table-cell>
          <table:table-cell office:value-type="string">
            <text:p>admin-app - . Missing homepage. Missing repository. Missing repository ur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unfoldingword</text:p>
          </table:table-cell>
          <table:table-cell office:value-type="string">
            <text:p>False</text:p>
          </table:table-cell>
          <table:table-cell office:value-type="string">
            <text:p>69</text:p>
          </table:table-cell>
          <table:table-cell office:value-type="string">
            <text:p>2020-12-11T16:05:46.321Z</text:p>
          </table:table-cell>
          <table:table-cell office:value-type="string">
            <text:p>macolon</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ofanyer</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pdf-generator - . Missing homepag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colon</text:p>
          </table:table-cell>
          <table:table-cell office:value-type="string">
            <text:p/>
          </table:table-cell>
          <table:table-cell office:value-type="string">
            <text:p/>
          </table:table-cell>
          <table:table-cell office:value-type="string">
            <text:p>sample-react-component-library - . Missing homepage. Missing repository. Missing repository url</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ible-editor/@bible-editor/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bible-editor/@bible-editor/te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te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bible-editor/@bible-edi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unfoldingword</text:p>
          </table:table-cell>
          <table:table-cell office:value-type="string">
            <text:p>False</text:p>
          </table:table-cell>
          <table:table-cell office:value-type="string">
            <text:p>1870</text:p>
          </table:table-cell>
          <table:table-cell office:value-type="string">
            <text:p>2024-01-10T09:41:28.021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unfoldingword</text:p>
          </table:table-cell>
          <table:table-cell office:value-type="string">
            <text:p>False</text:p>
          </table:table-cell>
          <table:table-cell office:value-type="string">
            <text:p>421</text:p>
          </table:table-cell>
          <table:table-cell office:value-type="string">
            <text:p>2024-01-10T09:45:57.004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unfoldingword</text:p>
          </table:table-cell>
          <table:table-cell office:value-type="string">
            <text:p>False</text:p>
          </table:table-cell>
          <table:table-cell office:value-type="string">
            <text:p>139</text:p>
          </table:table-cell>
          <table:table-cell office:value-type="string">
            <text:p>2024-01-10T09:47:45.958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unfoldingword</text:p>
          </table:table-cell>
          <table:table-cell office:value-type="string">
            <text:p>False</text:p>
          </table:table-cell>
          <table:table-cell office:value-type="string">
            <text:p>649</text:p>
          </table:table-cell>
          <table:table-cell office:value-type="string">
            <text:p>2024-01-10T09:42:28.55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unfoldingword</text:p>
          </table:table-cell>
          <table:table-cell office:value-type="string">
            <text:p>False</text:p>
          </table:table-cell>
          <table:table-cell office:value-type="string">
            <text:p>345</text:p>
          </table:table-cell>
          <table:table-cell office:value-type="string">
            <text:p>2024-01-10T09:45:17.176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unfoldingword</text:p>
          </table:table-cell>
          <table:table-cell office:value-type="string">
            <text:p>False</text:p>
          </table:table-cell>
          <table:table-cell office:value-type="string">
            <text:p>399</text:p>
          </table:table-cell>
          <table:table-cell office:value-type="string">
            <text:p>2024-01-10T09:45:39.01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unfoldingword</text:p>
          </table:table-cell>
          <table:table-cell office:value-type="string">
            <text:p>False</text:p>
          </table:table-cell>
          <table:table-cell office:value-type="string">
            <text:p>99</text:p>
          </table:table-cell>
          <table:table-cell office:value-type="string">
            <text:p>2024-01-10T09:46:28.087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electronite-forge/@electron-forge/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cope/packa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cope/pack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dumm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dum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second</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seco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on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o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create-electr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create-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app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app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m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m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flatpa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flatpa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pk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p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rpm</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rp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na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n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quirre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quirr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wi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w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zi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zi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auto-unpack-nativ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auto-unpack-nativ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compi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comp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electronegativit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electronegativi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fus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fus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fuses-test-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fuses-test-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local-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local-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nativ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nativ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itbucke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itbucke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electron-release-serv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electron-release-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githu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githu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nucleu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nucleu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3</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napcraf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napcraf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ypescrip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st-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st-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shared-typ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shared-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web-multi-log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web-multi-log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ypedoc-forge-custom-sidebar-them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ypedoc-forge-custom-sidebar-them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997</text:p>
          </table:table-cell>
          <table:table-cell office:value-type="string">
            <text:p>2022-11-02T13:18:25.384Z</text:p>
          </table:table-cell>
          <table:table-cell office:value-type="string">
            <text:p>jakobaleksandrovich, klappy, photo-nomad, richmahn, jag3773, mvahowe,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organization</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maintainers</text:p>
          </table:table-cell>
          <table:table-cell office:value-type="string">
            <text:p>npmjs used by</text:p>
          </table:table-cell>
          <table:table-cell office:value-type="string">
            <text:p>npmjs uses</text:p>
          </table:table-cell>
          <table:table-cell office:value-type="string">
            <text:p>npmjs broken</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bible-edit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8T12:35:58Z</text:p>
          </table:table-cell>
          <table:table-cell office:value-type="string">
            <text:p>2026-07-08T12:00:14Z</text:p>
          </table:table-cell>
          <table:table-cell office:value-type="string">
            <text:p/>
          </table:table-cell>
          <table:table-cell office:value-type="string">
            <text:p>7</text:p>
          </table:table-cell>
          <table:table-cell office:value-type="string">
            <text:p>5</text:p>
          </table:table-cell>
          <table:table-cell office:value-type="string">
            <text:p>605</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enjamin-test, deferredreward, stephenwunrow, dependabot[bot], Benjamin Wrigh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7-08T12:00:3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8T12:03:26Z</text:p>
          </table:table-cell>
          <table:table-cell office:value-type="string">
            <text:p>2026-07-08T11:59:56Z</text:p>
          </table:table-cell>
          <table:table-cell office:value-type="string">
            <text:p/>
          </table:table-cell>
          <table:table-cell office:value-type="string">
            <text:p>1</text:p>
          </table:table-cell>
          <table:table-cell office:value-type="string">
            <text:p>0</text:p>
          </table:table-cell>
          <table:table-cell office:value-type="string">
            <text:p>468</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W Bot, deferredreward, benjamin-test, stephenwunrow, Benjamin Wright,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7-08T12:00:02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02:42:36Z</text:p>
          </table:table-cell>
          <table:table-cell office:value-type="string">
            <text:p>2026-07-08T02:42:21Z</text:p>
          </table:table-cell>
          <table:table-cell office:value-type="string">
            <text:p/>
          </table:table-cell>
          <table:table-cell office:value-type="string">
            <text:p>122</text:p>
          </table:table-cell>
          <table:table-cell office:value-type="string">
            <text:p>9</text:p>
          </table:table-cell>
          <table:table-cell office:value-type="string">
            <text:p>241</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7-08T02:42:25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6T15:35:10Z</text:p>
          </table:table-cell>
          <table:table-cell office:value-type="string">
            <text:p>2026-07-06T15:31:02Z</text:p>
          </table:table-cell>
          <table:table-cell office:value-type="string">
            <text:p/>
          </table:table-cell>
          <table:table-cell office:value-type="string">
            <text:p>57</text:p>
          </table:table-cell>
          <table:table-cell office:value-type="string">
            <text:p>0</text:p>
          </table:table-cell>
          <table:table-cell office:value-type="string">
            <text:p>161</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claude,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7-06T15:31:1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5T03:18:29Z</text:p>
          </table:table-cell>
          <table:table-cell office:value-type="string">
            <text:p>2026-07-05T03:17:43Z</text:p>
          </table:table-cell>
          <table:table-cell office:value-type="string">
            <text:p>2026-07-05T03:18:29Z</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unfoldingword/door43-preview-renderers</text:p>
          </table:table-cell>
          <table:table-cell office:value-type="string">
            <text:p>unfoldingword</text:p>
          </table:table-cell>
          <table:table-cell office:value-type="string">
            <text:p>False</text:p>
          </table:table-cell>
          <table:table-cell office:value-type="string">
            <text:p>610</text:p>
          </table:table-cell>
          <table:table-cell office:value-type="string">
            <text:p>2026-07-05T03:16:58.765Z</text:p>
          </table:table-cell>
          <table:table-cell office:value-type="string">
            <text:p>jakobaleksandrovich, klappy, photo-nomad, richmahn, jag3773, mvahowe, abelpz, eliaspinero</text:p>
          </table:table-cell>
          <table:table-cell office:value-type="string">
            <text:p/>
          </table:table-cell>
          <table:table-cell office:value-type="string">
            <text:p>tsv-quote-converters, usfm-alignment-remover, usfm-js</text:p>
          </table:table-cell>
          <table:table-cell office:value-type="string">
            <text:p/>
          </table:table-cell>
          <table:table-cell office:value-type="string">
            <text:p/>
          </table:table-cell>
          <table:table-cell office:value-type="string">
            <text:p>richmahn</text:p>
          </table:table-cell>
          <table:table-cell office:value-type="string">
            <text:p>4</text:p>
          </table:table-cell>
          <table:table-cell office:value-type="string">
            <text:p>0</text:p>
          </table:table-cell>
          <table:table-cell office:value-type="string">
            <text:p>https://github.com/unfoldingWord/door43-preview-renderers</text:p>
          </table:table-cell>
          <table:table-cell office:value-type="string">
            <text:p>2026-07-05T03:17:50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5T00:49:18Z</text:p>
          </table:table-cell>
          <table:table-cell office:value-type="string">
            <text:p>2026-07-05T00:49:09Z</text:p>
          </table:table-cell>
          <table:table-cell office:value-type="string">
            <text:p>2026-07-05T00:49:18Z</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tsv-quote-converters</text:p>
          </table:table-cell>
          <table:table-cell office:value-type="string">
            <text:p>unfoldingword</text:p>
          </table:table-cell>
          <table:table-cell office:value-type="string">
            <text:p>False</text:p>
          </table:table-cell>
          <table:table-cell office:value-type="string">
            <text:p>4222</text:p>
          </table:table-cell>
          <table:table-cell office:value-type="string">
            <text:p>2026-07-05T01:03:03.193Z</text:p>
          </table:table-cell>
          <table:table-cell office:value-type="string">
            <text:p>jakobaleksandrovich, klappy, photo-nomad, richmahn, jag3773, mvahowe, abelpz, eliaspinero</text:p>
          </table:table-cell>
          <table:table-cell office:value-type="string">
            <text:p>@unfoldingword/door43-preview-renderers, tsv7-tn-cleanup-app, twl-generator, tsv-twl-creation-app, add-gl-quotes-to-tsv-files</text:p>
          </table:table-cell>
          <table:table-cell office:value-type="string">
            <text:p>string-punctuation-tokenizer</text:p>
          </table:table-cell>
          <table:table-cell office:value-type="string">
            <text:p>tsv-quote-converters - . Missing homepage. Missing repository. Missing repository url</text:p>
          </table:table-cell>
          <table:table-cell office:value-type="string">
            <text:p>unfoldingWord/node-cli-add-gl-quotes-to-tsv-files, unfoldingWord/tsv7-tn-cleanup-app</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tsv-quote-converters</text:p>
          </table:table-cell>
          <table:table-cell office:value-type="string">
            <text:p>2026-07-05T00:49:14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1T15:47:46Z</text:p>
          </table:table-cell>
          <table:table-cell office:value-type="string">
            <text:p>2026-07-01T15:46:14Z</text:p>
          </table:table-cell>
          <table:table-cell office:value-type="string">
            <text:p/>
          </table:table-cell>
          <table:table-cell office:value-type="string">
            <text:p>1</text:p>
          </table:table-cell>
          <table:table-cell office:value-type="string">
            <text:p>0</text:p>
          </table:table-cell>
          <table:table-cell office:value-type="string">
            <text:p>16</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7-01T15:46:21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7-05T02:47:54Z</text:p>
          </table:table-cell>
          <table:table-cell office:value-type="string">
            <text:p>2026-06-30T08:15:34Z</text:p>
          </table:table-cell>
          <table:table-cell office:value-type="string">
            <text:p>2026-06-27T01:17:05Z</text:p>
          </table:table-cell>
          <table:table-cell office:value-type="string">
            <text:p>6</text:p>
          </table:table-cell>
          <table:table-cell office:value-type="string">
            <text:p>1</text:p>
          </table:table-cell>
          <table:table-cell office:value-type="string">
            <text:p>55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
          </table:table-cell>
          <table:table-cell office:value-type="string">
            <text:p>richmahn, larsgson, PhotoNomad0</text:p>
          </table:table-cell>
          <table:table-cell office:value-type="string">
            <text:p>29</text:p>
          </table:table-cell>
          <table:table-cell office:value-type="string">
            <text:p>0</text:p>
          </table:table-cell>
          <table:table-cell office:value-type="string">
            <text:p>https://github.com/unfoldingWord/door43-preview-app</text:p>
          </table:table-cell>
          <table:table-cell office:value-type="string">
            <text:p>2026-06-30T08:16:27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7T22:00:46Z</text:p>
          </table:table-cell>
          <table:table-cell office:value-type="string">
            <text:p>2026-06-27T22:00:4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dcs-catalog-accordion-rcl</text:p>
          </table:table-cell>
          <table:table-cell office:value-type="string">
            <text:p>unfoldingword</text:p>
          </table:table-cell>
          <table:table-cell office:value-type="string">
            <text:p>False</text:p>
          </table:table-cell>
          <table:table-cell office:value-type="string">
            <text:p>2676</text:p>
          </table:table-cell>
          <table:table-cell office:value-type="string">
            <text:p>2026-06-27T22:03:16.080Z</text:p>
          </table:table-cell>
          <table:table-cell office:value-type="string">
            <text:p>jakobaleksandrovich, klappy, photo-nomad, richmahn, jag3773, mvahowe, abelpz, eliaspinero</text:p>
          </table:table-cell>
          <table:table-cell office:value-type="string">
            <text:p/>
          </table:table-cell>
          <table:table-cell office:value-type="string">
            <text:p/>
          </table:table-cell>
          <table:table-cell office:value-type="string">
            <text:p>dcs-catalog-accordion-rcl - . Missing homepage. Missing repository. Missing repository ur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27T22:00:4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25:16Z</text:p>
          </table:table-cell>
          <table:table-cell office:value-type="string">
            <text:p>2026-06-24T05:25:12Z</text:p>
          </table:table-cell>
          <table:table-cell office:value-type="string">
            <text:p/>
          </table:table-cell>
          <table:table-cell office:value-type="string">
            <text:p>1</text:p>
          </table:table-cell>
          <table:table-cell office:value-type="string">
            <text:p>0</text:p>
          </table:table-cell>
          <table:table-cell office:value-type="string">
            <text:p>98</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6-06-24T05:25:19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7-08T02:36:02Z</text:p>
          </table:table-cell>
          <table:table-cell office:value-type="string">
            <text:p>2026-06-23T14:15:02Z</text:p>
          </table:table-cell>
          <table:table-cell office:value-type="string">
            <text:p/>
          </table:table-cell>
          <table:table-cell office:value-type="string">
            <text:p>10</text:p>
          </table:table-cell>
          <table:table-cell office:value-type="string">
            <text:p>2</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unfoldingword</text:p>
          </table:table-cell>
          <table:table-cell office:value-type="string">
            <text:p>False</text:p>
          </table:table-cell>
          <table:table-cell office:value-type="string">
            <text:p>390</text:p>
          </table:table-cell>
          <table:table-cell office:value-type="string">
            <text:p>2018-11-30T10:27:55.416Z</text:p>
          </table:table-cell>
          <table:table-cell office:value-type="string">
            <text:p>jakobaleksandrovich, klappy, photo-nomad, richmahn, jag3773, mvahowe, abelpz, eliaspinero, neutrinog</text:p>
          </table:table-cell>
          <table:table-cell office:value-type="string">
            <text:p/>
          </table:table-cell>
          <table:table-cell office:value-type="string">
            <text:p>usfm-js, wordmap-lexer</text:p>
          </table:table-cell>
          <table:table-cell office:value-type="string">
            <text:p>wordmap-usfm - . Repository url git+https://github.com/translationCoreApps/wordMAP-usfm.git is translationCoreApps</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30T20:25:47Z</text:p>
          </table:table-cell>
          <table:table-cell office:value-type="string">
            <text:p>2026-06-22T03:57:41Z</text:p>
          </table:table-cell>
          <table:table-cell office:value-type="string">
            <text:p/>
          </table:table-cell>
          <table:table-cell office:value-type="string">
            <text:p>82</text:p>
          </table:table-cell>
          <table:table-cell office:value-type="string">
            <text:p>4</text:p>
          </table:table-cell>
          <table:table-cell office:value-type="string">
            <text:p>699</text:p>
          </table:table-cell>
          <table:table-cell office:value-type="string">
            <text:p/>
          </table:table-cell>
          <table:table-cell office:value-type="string">
            <text:p>uw-content-validation</text:p>
          </table:table-cell>
          <table:table-cell office:value-type="string">
            <text:p>unfoldingword</text:p>
          </table:table-cell>
          <table:table-cell office:value-type="string">
            <text:p>False</text:p>
          </table:table-cell>
          <table:table-cell office:value-type="string">
            <text:p>2398</text:p>
          </table:table-cell>
          <table:table-cell office:value-type="string">
            <text:p>2026-06-22T04:01:52.034Z</text:p>
          </table:table-cell>
          <table:table-cell office:value-type="string">
            <text:p>jakobaleksandrovich, klappy, photo-nomad, richmahn, jag3773, mvahowe, abelpz, eliaspinero, mandolyte, robh33</text:p>
          </table:table-cell>
          <table:table-cell office:value-type="string">
            <text:p>gateway-admin, tc-create-app, catalog-next-toolkit, content-validation-app</text:p>
          </table:table-cell>
          <table:table-cell office:value-type="string">
            <text:p>usfm-js</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unfoldingword</text:p>
          </table:table-cell>
          <table:table-cell office:value-type="string">
            <text:p>False</text:p>
          </table:table-cell>
          <table:table-cell office:value-type="string">
            <text:p>5858</text:p>
          </table:table-cell>
          <table:table-cell office:value-type="string">
            <text:p>2026-06-16T10:00:58.589Z</text:p>
          </table:table-cell>
          <table:table-cell office:value-type="string">
            <text:p>jakobaleksandrovich, klappy, photo-nomad, richmahn, jag3773, mvahowe, abelpz, eliaspinero</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proskomma-react-hooks,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602</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9</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gateway-edit - . Missing homepage. Missing repository. Missing repository ur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unfoldingword</text:p>
          </table:table-cell>
          <table:table-cell office:value-type="string">
            <text:p>False</text:p>
          </table:table-cell>
          <table:table-cell office:value-type="string">
            <text:p>25501</text:p>
          </table:table-cell>
          <table:table-cell office:value-type="string">
            <text:p>2026-06-02T13:32:18.685Z</text:p>
          </table:table-cell>
          <table:table-cell office:value-type="string">
            <text:p>jakobaleksandrovich, klappy, photo-nomad, richmahn, jag3773, mvahowe, abelpz, eliaspinero</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enhanced-word-aligner-rcl - . Missing homepage</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0</text:p>
          </table:table-cell>
          <table:table-cell office:value-type="string">
            <text:p>2022-02-22T21:12:10.659Z</text:p>
          </table:table-cell>
          <table:table-cell office:value-type="string">
            <text:p>klappy</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unfoldingword</text:p>
          </table:table-cell>
          <table:table-cell office:value-type="string">
            <text:p>False</text:p>
          </table:table-cell>
          <table:table-cell office:value-type="string">
            <text:p>1327</text:p>
          </table:table-cell>
          <table:table-cell office:value-type="string">
            <text:p>2026-05-28T16:01:32.183Z</text:p>
          </table:table-cell>
          <table:table-cell office:value-type="string">
            <text:p>jakobaleksandrovich, klappy, photo-nomad, richmahn, jag3773, mvahowe, abelpz, eliaspinero, mandolyte</text:p>
          </table:table-cell>
          <table:table-cell office:value-type="string">
            <text:p>tc-create-app, dcs-react-hooks</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unfoldingword</text:p>
          </table:table-cell>
          <table:table-cell office:value-type="string">
            <text:p>False</text:p>
          </table:table-cell>
          <table:table-cell office:value-type="string">
            <text:p>105530</text:p>
          </table:table-cell>
          <table:table-cell office:value-type="string">
            <text:p>2021-08-25T21:55:46.406Z</text:p>
          </table:table-cell>
          <table:table-cell office:value-type="string">
            <text:p>jakobaleksandrovich, klappy, photo-nomad, richmahn, jag3773, mvahowe, abelpz, eliaspinero, macolon</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hiscoder-com/level, hiscoder-com/tn-quote, unfoldingWord/oce-editor-tools, vipinpaul/autographa, unfoldingWord/uw-quote-helpers, unfoldingWord/word-aligner-rcl</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unfoldingword</text:p>
          </table:table-cell>
          <table:table-cell office:value-type="string">
            <text:p>False</text:p>
          </table:table-cell>
          <table:table-cell office:value-type="string">
            <text:p>16992</text:p>
          </table:table-cell>
          <table:table-cell office:value-type="string">
            <text:p>2026-05-24T23:03:19.258Z</text:p>
          </table:table-cell>
          <table:table-cell office:value-type="string">
            <text:p>jakobaleksandrovich, klappy, photo-nomad, richmahn, jag3773, mvahowe, abelpz, eliaspinero</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word-aligner-rcl - . Missing homepage</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unfoldingword</text:p>
          </table:table-cell>
          <table:table-cell office:value-type="string">
            <text:p>False</text:p>
          </table:table-cell>
          <table:table-cell office:value-type="string">
            <text:p>6408</text:p>
          </table:table-cell>
          <table:table-cell office:value-type="string">
            <text:p>2026-05-24T22:38:01.649Z</text:p>
          </table:table-cell>
          <table:table-cell office:value-type="string">
            <text:p>photo-nomad</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word-aligner-lib - . Missing homepa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unfoldingword</text:p>
          </table:table-cell>
          <table:table-cell office:value-type="string">
            <text:p>False</text:p>
          </table:table-cell>
          <table:table-cell office:value-type="string">
            <text:p>44550</text:p>
          </table:table-cell>
          <table:table-cell office:value-type="string">
            <text:p>2026-05-24T21:22:13.663Z</text:p>
          </table:table-cell>
          <table:table-cell office:value-type="string">
            <text:p>jakobaleksandrovich, klappy, photo-nomad, richmahn, jag3773, mvahowe, abelpz, eliaspinero, royalsix</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transferer, alignment-playground, next-js-template</text:p>
          </table:table-cell>
          <table:table-cell office:value-type="string">
            <text:p>string-punctuation-tokenizer, usfm-js</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unfoldingword</text:p>
          </table:table-cell>
          <table:table-cell office:value-type="string">
            <text:p>False</text:p>
          </table:table-cell>
          <table:table-cell office:value-type="string">
            <text:p>125701</text:p>
          </table:table-cell>
          <table:table-cell office:value-type="string">
            <text:p>2026-05-23T23:11:18.348Z</text:p>
          </table:table-cell>
          <table:table-cell office:value-type="string">
            <text:p>jakobaleksandrovich, klappy, photo-nomad, richmahn, jag3773, mvahowe, abelpz, eliaspinero, macolon</text:p>
          </table:table-cell>
          <table:table-cell office:value-type="string">
            <text:p>zulip-bot, cskillbp-prompt-over-code, @unfoldingword/door43-preview-renderers, door43-preview-app, wordmap-usfm, uw-content-validation, tsv-twl-creation-app, translationCore, wordAlignment, enhanced-word-aligner-rcl, tc-create-app, word-aligner-rcl, word-aligner-lib, word-aligner, single-scripture-rcl, scripture-resources-rcl, uw-quote-helpers, uw-wordmapbooster, usfm-alignment-remover, tc-source-content-updater, checking-tool-rcl, tc-ui-toolkit, checking-tool-wrapper, uw-bible-parser, book-package-rcl, uw-word-count, usfm-js-wrapper, ScripturePane, translationstudio, alignment-transferer, tc_resources, VerseCheck, resource-checker, checking-extension, translation-helps, qa-app, alignment-playground, greek-apparatus-app, pdf-generator, scripture-as-graph, @bible-editor/api, @bible-editor/web, @bt-synergy/mobile, tc-study, @bt-synergy/resource-parsers, @bt-synergy/usfm-processor</text:p>
          </table:table-cell>
          <table:table-cell office:value-type="string">
            <text:p/>
          </table:table-cell>
          <table:table-cell office:value-type="string">
            <text:p>usfm-js - . Repository url git+https://github.com/translationCoreApps/usfm-js.git is translationCoreApps</text:p>
          </table:table-cell>
          <table:table-cell office:value-type="string">
            <text:p>ihoegen/usfm-parser, unfoldingWord/tsv7-tn-cleanup-app,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unfoldingword</text:p>
          </table:table-cell>
          <table:table-cell office:value-type="string">
            <text:p>False</text:p>
          </table:table-cell>
          <table:table-cell office:value-type="string">
            <text:p>17591</text:p>
          </table:table-cell>
          <table:table-cell office:value-type="string">
            <text:p>2026-05-12T13:15:42.563Z</text:p>
          </table:table-cell>
          <table:table-cell office:value-type="string">
            <text:p>jakobaleksandrovich, klappy, photo-nomad, richmahn, jag3773, mvahowe, abelpz, eliaspinero</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obs-w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obs-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unfoldingword</text:p>
          </table:table-cell>
          <table:table-cell office:value-type="string">
            <text:p>False</text:p>
          </table:table-cell>
          <table:table-cell office:value-type="string">
            <text:p>10271</text:p>
          </table:table-cell>
          <table:table-cell office:value-type="string">
            <text:p>2026-04-16T17:29:58.529Z</text:p>
          </table:table-cell>
          <table:table-cell office:value-type="string">
            <text:p>jakobaleksandrovich, klappy, photo-nomad, richmahn, jag3773, mvahowe, abelpz, eliaspinero</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single-scripture-rcl - . Missing homepage</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unfoldingword</text:p>
          </table:table-cell>
          <table:table-cell office:value-type="string">
            <text:p>False</text:p>
          </table:table-cell>
          <table:table-cell office:value-type="string">
            <text:p>16004</text:p>
          </table:table-cell>
          <table:table-cell office:value-type="string">
            <text:p>2026-03-27T22:01:47.002Z</text:p>
          </table:table-cell>
          <table:table-cell office:value-type="string">
            <text:p>jakobaleksandrovich, klappy, photo-nomad, richmahn, jag3773, mvahowe, abelpz, eliaspinero, macolon</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unfoldingword</text:p>
          </table:table-cell>
          <table:table-cell office:value-type="string">
            <text:p>False</text:p>
          </table:table-cell>
          <table:table-cell office:value-type="string">
            <text:p>3846</text:p>
          </table:table-cell>
          <table:table-cell office:value-type="string">
            <text:p>2026-03-27T21:57:39.012Z</text:p>
          </table:table-cell>
          <table:table-cell office:value-type="string">
            <text:p>jakobaleksandrovich, klappy, photo-nomad, richmahn, jag3773, mvahowe, abelpz, eliaspinero, mandolyte, thenerd247</text:p>
          </table:table-cell>
          <table:table-cell office:value-type="string">
            <text:p>gateway-admin, tc-create-app, translation-helps-rcl</text:p>
          </table:table-cell>
          <table:table-cell office:value-type="string">
            <text:p>dcs-js</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unfoldingword</text:p>
          </table:table-cell>
          <table:table-cell office:value-type="string">
            <text:p>False</text:p>
          </table:table-cell>
          <table:table-cell office:value-type="string">
            <text:p>17061</text:p>
          </table:table-cell>
          <table:table-cell office:value-type="string">
            <text:p>2026-03-19T13:24:25.124Z</text:p>
          </table:table-cell>
          <table:table-cell office:value-type="string">
            <text:p>jakobaleksandrovich, klappy, photo-nomad, richmahn, jag3773, mvahowe, abelpz, eliaspinero, royalsix</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unfoldingword</text:p>
          </table:table-cell>
          <table:table-cell office:value-type="string">
            <text:p>False</text:p>
          </table:table-cell>
          <table:table-cell office:value-type="string">
            <text:p>3583</text:p>
          </table:table-cell>
          <table:table-cell office:value-type="string">
            <text:p>2025-01-17T14:55:12.819Z</text:p>
          </table:table-cell>
          <table:table-cell office:value-type="string">
            <text:p>jakobaleksandrovich, klappy, photo-nomad, richmahn, jag3773, mvahowe, abelpz, eliaspinero</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photo-nomad</text:p>
          </table:table-cell>
          <table:table-cell office:value-type="string">
            <text:p>enhanced-word-aligner-rcl</text:p>
          </table:table-cell>
          <table:table-cell office:value-type="string">
            <text:p>usfm-js, wordmap, wordmap-lexer</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unfoldingword</text:p>
          </table:table-cell>
          <table:table-cell office:value-type="string">
            <text:p>False</text:p>
          </table:table-cell>
          <table:table-cell office:value-type="string">
            <text:p>3826</text:p>
          </table:table-cell>
          <table:table-cell office:value-type="string">
            <text:p>2026-02-02T16:12:05.648Z</text:p>
          </table:table-cell>
          <table:table-cell office:value-type="string">
            <text:p>jakobaleksandrovich, klappy, photo-nomad, richmahn, jag3773, mvahowe, abelpz, eliaspinero</text:p>
          </table:table-cell>
          <table:table-cell office:value-type="string">
            <text:p>tc-create-app, greek-apparatus-app</text:p>
          </table:table-cell>
          <table:table-cell office:value-type="string">
            <text:p>markdown-translatable, @unfoldingword/eslint-config</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unfoldingword</text:p>
          </table:table-cell>
          <table:table-cell office:value-type="string">
            <text:p>False</text:p>
          </table:table-cell>
          <table:table-cell office:value-type="string">
            <text:p>1110</text:p>
          </table:table-cell>
          <table:table-cell office:value-type="string">
            <text:p>2026-01-21T23:37:01.096Z</text:p>
          </table:table-cell>
          <table:table-cell office:value-type="string">
            <text:p>jakobaleksandrovich, klappy, photo-nomad, richmahn, jag3773, mvahowe, abelpz, eliaspinero</text:p>
          </table:table-cell>
          <table:table-cell office:value-type="string">
            <text:p>@unfoldingword/door43-preview-renderers, door43-preview-app, twl-generator</text:p>
          </table:table-cell>
          <table:table-cell office:value-type="string">
            <text:p>usfm-js</text:p>
          </table:table-cell>
          <table:table-cell office:value-type="string">
            <text:p>usfm-alignment-remover - . Missing homepage. Missing repository. Missing repository url</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bt-servant-log-view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unfoldingword</text:p>
          </table:table-cell>
          <table:table-cell office:value-type="string">
            <text:p>False</text:p>
          </table:table-cell>
          <table:table-cell office:value-type="string">
            <text:p>6869</text:p>
          </table:table-cell>
          <table:table-cell office:value-type="string">
            <text:p>2024-10-16T17:43:33.516Z</text:p>
          </table:table-cell>
          <table:table-cell office:value-type="string">
            <text:p>jakobaleksandrovich, klappy, photo-nomad, richmahn, jag3773, mvahowe, abelpz, eliaspinero, macolon</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unfoldingword</text:p>
          </table:table-cell>
          <table:table-cell office:value-type="string">
            <text:p>False</text:p>
          </table:table-cell>
          <table:table-cell office:value-type="string">
            <text:p>3929</text:p>
          </table:table-cell>
          <table:table-cell office:value-type="string">
            <text:p>2025-11-03T22:53:20.315Z</text:p>
          </table:table-cell>
          <table:table-cell office:value-type="string">
            <text:p>jakobaleksandrovich, klappy, photo-nomad, richmahn, jag3773, mvahowe, abelpz, eliaspinero</text:p>
          </table:table-cell>
          <table:table-cell office:value-type="string">
            <text:p/>
          </table:table-cell>
          <table:table-cell office:value-type="string">
            <text:p>tsv-quote-converters</text:p>
          </table:table-cell>
          <table:table-cell office:value-type="string">
            <text:p>add-gl-quotes-to-tsv-files - . Missing homepage</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unfoldingword</text:p>
          </table:table-cell>
          <table:table-cell office:value-type="string">
            <text:p>False</text:p>
          </table:table-cell>
          <table:table-cell office:value-type="string">
            <text:p>8067</text:p>
          </table:table-cell>
          <table:table-cell office:value-type="string">
            <text:p>2025-10-28T18:16:22.466Z</text:p>
          </table:table-cell>
          <table:table-cell office:value-type="string">
            <text:p>jakobaleksandrovich, klappy, photo-nomad, richmahn, jag3773, mvahowe, abelpz, eliaspinero, royalsix</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unfoldingword</text:p>
          </table:table-cell>
          <table:table-cell office:value-type="string">
            <text:p>False</text:p>
          </table:table-cell>
          <table:table-cell office:value-type="string">
            <text:p>5979</text:p>
          </table:table-cell>
          <table:table-cell office:value-type="string">
            <text:p>2025-10-20T15:58:23.259Z</text:p>
          </table:table-cell>
          <table:table-cell office:value-type="string">
            <text:p>photo-nomad</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checking-tool-rcl - . Missing homepage</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unfoldingword</text:p>
          </table:table-cell>
          <table:table-cell office:value-type="string">
            <text:p>False</text:p>
          </table:table-cell>
          <table:table-cell office:value-type="string">
            <text:p>18829</text:p>
          </table:table-cell>
          <table:table-cell office:value-type="string">
            <text:p>2026-02-18T15:28:10.229Z</text:p>
          </table:table-cell>
          <table:table-cell office:value-type="string">
            <text:p>jakobaleksandrovich, klappy, photo-nomad, richmahn, jag3773, mvahowe, abelpz, eliaspinero, neutrinog</text:p>
          </table:table-cell>
          <table:table-cell office:value-type="string">
            <text:p>translationCore, wordAlignment, word-aligner-rcl, uw-wordmapbooster, alignment-transferer, wordmap-mt, wordmap-react-toolkit</text:p>
          </table:table-cell>
          <table:table-cell office:value-type="string">
            <text:p>wordmap-lexer</text:p>
          </table:table-cell>
          <table:table-cell office:value-type="string">
            <text:p>wordmap - . Repository url git+https://github.com/translationCoreApps/wordMAP.git is translationCoreApps</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unfoldingword</text:p>
          </table:table-cell>
          <table:table-cell office:value-type="string">
            <text:p>False</text:p>
          </table:table-cell>
          <table:table-cell office:value-type="string">
            <text:p>19774</text:p>
          </table:table-cell>
          <table:table-cell office:value-type="string">
            <text:p>2023-03-07T15:00:29.476Z</text:p>
          </table:table-cell>
          <table:table-cell office:value-type="string">
            <text:p>jakobaleksandrovich, klappy, photo-nomad, richmahn, jag3773, mvahowe, abelpz, eliaspinero</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unfoldingword</text:p>
          </table:table-cell>
          <table:table-cell office:value-type="string">
            <text:p>False</text:p>
          </table:table-cell>
          <table:table-cell office:value-type="string">
            <text:p>28517</text:p>
          </table:table-cell>
          <table:table-cell office:value-type="string">
            <text:p>2024-12-31T18:53:34.752Z</text:p>
          </table:table-cell>
          <table:table-cell office:value-type="string">
            <text:p>jakobaleksandrovich, klappy, photo-nomad, richmahn, jag3773, mvahowe, abelpz, eliaspinero, macolon</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unfoldingword</text:p>
          </table:table-cell>
          <table:table-cell office:value-type="string">
            <text:p>False</text:p>
          </table:table-cell>
          <table:table-cell office:value-type="string">
            <text:p>9812</text:p>
          </table:table-cell>
          <table:table-cell office:value-type="string">
            <text:p>2024-03-19T18:58:55.915Z</text:p>
          </table:table-cell>
          <table:table-cell office:value-type="string">
            <text:p>jakobaleksandrovich, klappy, photo-nomad, richmahn, jag3773, mvahowe, abelpz, eliaspinero, macolon</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checking-tool-wrapper - . Missing homepage. Missing repository. Missing repository url</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unfoldingword</text:p>
          </table:table-cell>
          <table:table-cell office:value-type="string">
            <text:p>False</text:p>
          </table:table-cell>
          <table:table-cell office:value-type="string">
            <text:p>254</text:p>
          </table:table-cell>
          <table:table-cell office:value-type="string">
            <text:p>2024-10-13T01:08:01.943Z</text:p>
          </table:table-cell>
          <table:table-cell office:value-type="string">
            <text:p>jakobaleksandrovich, klappy, photo-nomad, richmahn, jag3773, mvahowe,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unfoldingword</text:p>
          </table:table-cell>
          <table:table-cell office:value-type="string">
            <text:p>False</text:p>
          </table:table-cell>
          <table:table-cell office:value-type="string">
            <text:p>5688</text:p>
          </table:table-cell>
          <table:table-cell office:value-type="string">
            <text:p>2024-06-04T12:40:10.075Z</text:p>
          </table:table-cell>
          <table:table-cell office:value-type="string">
            <text:p>jakobaleksandrovich, klappy, photo-nomad, richmahn, jag3773, mvahowe, abelpz, eliaspinero</text:p>
          </table:table-cell>
          <table:table-cell office:value-type="string">
            <text:p>door43-preview-app, gateway-edit, bsa, scripture-tsv, gateway-translate, create-app, bible-preview-app, bible-ref-pk-demo, anchor-alignment-poc, greek-apparatus-app, @oce-editor-tools/joy-pk, @oce-editor-tools/mui-pk</text:p>
          </table:table-cell>
          <table:table-cell office:value-type="string">
            <text:p>bible-reference-range</text:p>
          </table:table-cell>
          <table:table-cell office:value-type="string">
            <text:p>bible-reference-rcl - . Missing homepa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unfoldingword</text:p>
          </table:table-cell>
          <table:table-cell office:value-type="string">
            <text:p>False</text:p>
          </table:table-cell>
          <table:table-cell office:value-type="string">
            <text:p>2818</text:p>
          </table:table-cell>
          <table:table-cell office:value-type="string">
            <text:p>2024-05-02T21:03:03.412Z</text:p>
          </table:table-cell>
          <table:table-cell office:value-type="string">
            <text:p>kintsoogii</text:p>
          </table:table-cell>
          <table:table-cell office:value-type="string">
            <text:p>gateway-edit</text:p>
          </table:table-cell>
          <table:table-cell office:value-type="string">
            <text:p>bible-reference-range, bible-reference-rcl</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door43-librar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door43-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unfoldingword</text:p>
          </table:table-cell>
          <table:table-cell office:value-type="string">
            <text:p>False</text:p>
          </table:table-cell>
          <table:table-cell office:value-type="string">
            <text:p>17013</text:p>
          </table:table-cell>
          <table:table-cell office:value-type="string">
            <text:p>2023-12-07T19:15:35.590Z</text:p>
          </table:table-cell>
          <table:table-cell office:value-type="string">
            <text:p>jakobaleksandrovich, klappy, photo-nomad, richmahn, jag3773, mvahowe, abelpz, eliaspinero, joelcjohnson</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translation-notes-extension, codex-editor-extension, alignment-playground</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unfoldingword</text:p>
          </table:table-cell>
          <table:table-cell office:value-type="string">
            <text:p>False</text:p>
          </table:table-cell>
          <table:table-cell office:value-type="string">
            <text:p>4896</text:p>
          </table:table-cell>
          <table:table-cell office:value-type="string">
            <text:p>2022-02-02T14:06:17.344Z</text:p>
          </table:table-cell>
          <table:table-cell office:value-type="string">
            <text:p>jakobaleksandrovich, klappy, photo-nomad, richmahn, jag3773, mvahowe, abelpz, eliaspinero, mandolyte, zachpennington</text:p>
          </table:table-cell>
          <table:table-cell office:value-type="string">
            <text:p>gateway-admin, tc-create-app, word-aligner-rcl, tsv-groupdata-parser, checking-tool-rcl, checking-extension</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uw-quote-helpers</text:p>
          </table:table-cell>
          <table:table-cell office:value-type="string">
            <text:p>bible-reference-range, usfm-js</text:p>
          </table:table-cell>
          <table:table-cell office:value-type="string">
            <text:p>uw-bible-parser - . Missing homepage</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unfoldingword</text:p>
          </table:table-cell>
          <table:table-cell office:value-type="string">
            <text:p>False</text:p>
          </table:table-cell>
          <table:table-cell office:value-type="string">
            <text:p>11157</text:p>
          </table:table-cell>
          <table:table-cell office:value-type="string">
            <text:p>2023-07-16T00:28:17.570Z</text:p>
          </table:table-cell>
          <table:table-cell office:value-type="string">
            <text:p>jakobaleksandrovich, klappy, photo-nomad, richmahn, jag3773, mvahowe, abelpz, eliaspinero, mandolyte</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997</text:p>
          </table:table-cell>
          <table:table-cell office:value-type="string">
            <text:p>2022-11-02T13:18:25.384Z</text:p>
          </table:table-cell>
          <table:table-cell office:value-type="string">
            <text:p>jakobaleksandrovich, klappy, photo-nomad, richmahn, jag3773, mvahowe, abelpz, eliaspinero</text:p>
          </table:table-cell>
          <table:table-cell office:value-type="string">
            <text:p>dcs-branch-merger, gateway-translate, dcs-react-hooks, bible-preview-app, dcs-login, dcs-js-example</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unfoldingword</text:p>
          </table:table-cell>
          <table:table-cell office:value-type="string">
            <text:p>True</text:p>
          </table:table-cell>
          <table:table-cell office:value-type="string">
            <text:p>1357</text:p>
          </table:table-cell>
          <table:table-cell office:value-type="string">
            <text:p>2023-03-21T14:43:38.471Z</text:p>
          </table:table-cell>
          <table:table-cell office:value-type="string">
            <text:p>jakobaleksandrovich, klappy, photo-nomad, richmahn, jag3773, mvahowe, abelpz, eliaspinero, superdav42</text:p>
          </table:table-cell>
          <table:table-cell office:value-type="string">
            <text:p/>
          </table:table-cell>
          <table:table-cell office:value-type="string">
            <text:p>epitelete-html, proskomma-react-hooks, translation-helps-rcl</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proskomma-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proskomma-react-hooks</text:p>
          </table:table-cell>
          <table:table-cell office:value-type="string">
            <text:p>unfoldingword</text:p>
          </table:table-cell>
          <table:table-cell office:value-type="string">
            <text:p>False</text:p>
          </table:table-cell>
          <table:table-cell office:value-type="string">
            <text:p>3457</text:p>
          </table:table-cell>
          <table:table-cell office:value-type="string">
            <text:p>2022-08-24T19:15:40.763Z</text:p>
          </table:table-cell>
          <table:table-cell office:value-type="string">
            <text:p>jakobaleksandrovich, klappy, photo-nomad, richmahn, jag3773, mvahowe, abelpz, eliaspinero</text:p>
          </table:table-cell>
          <table:table-cell office:value-type="string">
            <text:p>translationCore, uw-pdf-preview, uw-editor</text:p>
          </table:table-cell>
          <table:table-cell office:value-type="string">
            <text:p>proskomma-render-pdf, @unfoldingword/eslint-config</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unfoldingword</text:p>
          </table:table-cell>
          <table:table-cell office:value-type="string">
            <text:p>False</text:p>
          </table:table-cell>
          <table:table-cell office:value-type="string">
            <text:p>176</text:p>
          </table:table-cell>
          <table:table-cell office:value-type="string">
            <text:p>2022-08-19T12:33:49.976Z</text:p>
          </table:table-cell>
          <table:table-cell office:value-type="string">
            <text:p>mandolyte, abelpz</text:p>
          </table:table-cell>
          <table:table-cell office:value-type="string">
            <text:p/>
          </table:table-cell>
          <table:table-cell office:value-type="string">
            <text:p>dcs-js, uw-languages-rcl, @unfoldingword/eslint-config</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unfoldingword</text:p>
          </table:table-cell>
          <table:table-cell office:value-type="string">
            <text:p>False</text:p>
          </table:table-cell>
          <table:table-cell office:value-type="string">
            <text:p>2231</text:p>
          </table:table-cell>
          <table:table-cell office:value-type="string">
            <text:p>2023-01-02T13:16:20.145Z</text:p>
          </table:table-cell>
          <table:table-cell office:value-type="string">
            <text:p>mandolyte</text:p>
          </table:table-cell>
          <table:table-cell office:value-type="string">
            <text:p>book-package-app</text:p>
          </table:table-cell>
          <table:table-cell office:value-type="string">
            <text:p>usfm-js, uw-word-count</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unfoldingword</text:p>
          </table:table-cell>
          <table:table-cell office:value-type="string">
            <text:p>False</text:p>
          </table:table-cell>
          <table:table-cell office:value-type="string">
            <text:p>3473</text:p>
          </table:table-cell>
          <table:table-cell office:value-type="string">
            <text:p>2023-06-13T13:51:03.803Z</text:p>
          </table:table-cell>
          <table:table-cell office:value-type="string">
            <text:p>jakobaleksandrovich, klappy, photo-nomad, richmahn, jag3773, mvahowe, abelpz, eliaspinero, royalsix</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resource-workspace-rcl - . Missing homepage</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dcs-doc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victor-hu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unfoldingword</text:p>
          </table:table-cell>
          <table:table-cell office:value-type="string">
            <text:p>False</text:p>
          </table:table-cell>
          <table:table-cell office:value-type="string">
            <text:p>109</text:p>
          </table:table-cell>
          <table:table-cell office:value-type="string">
            <text:p>2020-07-15T14:29:05.613Z</text:p>
          </table:table-cell>
          <table:table-cell office:value-type="string">
            <text:p>mandolyte</text:p>
          </table:table-cell>
          <table:table-cell office:value-type="string">
            <text:p/>
          </table:table-cell>
          <table:table-cell office:value-type="string">
            <text:p>book-package-rcl</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unfoldingword</text:p>
          </table:table-cell>
          <table:table-cell office:value-type="string">
            <text:p>False</text:p>
          </table:table-cell>
          <table:table-cell office:value-type="string">
            <text:p>1494</text:p>
          </table:table-cell>
          <table:table-cell office:value-type="string">
            <text:p>2020-12-10T06:26:46.446Z</text:p>
          </table:table-cell>
          <table:table-cell office:value-type="string">
            <text:p>jakobaleksandrovich, klappy, photo-nomad, richmahn, jag3773, mvahowe, abelpz, eliaspinero</text:p>
          </table:table-cell>
          <table:table-cell office:value-type="string">
            <text:p>enhanced-word-aligner-rcl, tc-create-app, gitea-react-toolkit, single-scripture-rcl, scripture-resources-rcl, datatable-translatable, markdown-translatable, proskomma-react-hooks, dcs-react-hooks, resource-workspace-rcl, simple-text-editor-rcl, gitea-offline-poc</text:p>
          </table:table-cell>
          <table:table-cell office:value-type="string">
            <text:p/>
          </table:table-cell>
          <table:table-cell office:value-type="string">
            <text:p>@unfoldingword/eslint-config - . Missing homepage. Missing repository. Missing repository url</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
          </table:table-cell>
          <table:table-cell office:value-type="string">
            <text:p>False</text:p>
          </table:table-cell>
          <table:table-cell office:value-type="string">
            <text:p>321</text:p>
          </table:table-cell>
          <table:table-cell office:value-type="string">
            <text:p>2020-07-15T14:01:25.409Z</text:p>
          </table:table-cell>
          <table:table-cell office:value-type="string">
            <text:p>mandolyte</text:p>
          </table:table-cell>
          <table:table-cell office:value-type="string">
            <text:p>book-package-rcl</text:p>
          </table:table-cell>
          <table:table-cell office:value-type="string">
            <text:p>usfm-js</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unfoldingword</text:p>
          </table:table-cell>
          <table:table-cell office:value-type="string">
            <text:p>False</text:p>
          </table:table-cell>
          <table:table-cell office:value-type="string">
            <text:p>21351</text:p>
          </table:table-cell>
          <table:table-cell office:value-type="string">
            <text:p>2020-04-09T15:48:09.080Z</text:p>
          </table:table-cell>
          <table:table-cell office:value-type="string">
            <text:p>jakobaleksandrovich, klappy, photo-nomad, richmahn, jag3773, mvahowe, abelpz, eliaspinero, neutrinog</text:p>
          </table:table-cell>
          <table:table-cell office:value-type="string">
            <text:p>wordmap-usfm, translationCore, wordAlignment, string-punctuation-tokenizer, word-aligner-rcl, word-aligner-lib, uw-wordmapbooster, checking-tool-rcl, wordmap, alignment-transferer, wordmap-mt, alignment-playground, wordmap-react-toolkit</text:p>
          </table:table-cell>
          <table:table-cell office:value-type="string">
            <text:p>string-punctuation-tokenizer</text:p>
          </table:table-cell>
          <table:table-cell office:value-type="string">
            <text:p>wordmap-lexer - . Repository url git+https://github.com/translationCoreApps/wordMAP-lexer.git is translationCoreApps</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unfoldingword</text:p>
          </table:table-cell>
          <table:table-cell office:value-type="string">
            <text:p>False</text:p>
          </table:table-cell>
          <table:table-cell office:value-type="string">
            <text:p>19071</text:p>
          </table:table-cell>
          <table:table-cell office:value-type="string">
            <text:p>2020-04-16T04:30:54.949Z</text:p>
          </table:table-cell>
          <table:table-cell office:value-type="string">
            <text:p>jakobaleksandrovich, klappy, photo-nomad, richmahn, jag3773, mvahowe, abelpz, eliaspinero, neutrinog</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tc-tool - . Repository url git+https://github.com/translationCoreApps/tc-tool.git is translationCoreApps</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unfoldingword</text:p>
          </table:table-cell>
          <table:table-cell office:value-type="string">
            <text:p>False</text:p>
          </table:table-cell>
          <table:table-cell office:value-type="string">
            <text:p>13142</text:p>
          </table:table-cell>
          <table:table-cell office:value-type="string">
            <text:p>2018-05-03T21:24:53.169Z</text:p>
          </table:table-cell>
          <table:table-cell office:value-type="string">
            <text:p>jakobaleksandrovich, klappy, photo-nomad, richmahn, jag3773, mvahowe, abelpz, eliaspinero</text:p>
          </table:table-cell>
          <table:table-cell office:value-type="string">
            <text:p>translationCore, word-aligner-lib, checking-tool-rcl, selections, VerseCheck</text:p>
          </table:table-cell>
          <table:table-cell office:value-type="string">
            <text:p/>
          </table:table-cell>
          <table:table-cell office:value-type="string">
            <text:p>tc-strings - . Repository url git+https://github.com/translationCoreApps/string-utils.git is translationCoreApp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unfoldingword</text:p>
          </table:table-cell>
          <table:table-cell office:value-type="string">
            <text:p>False</text:p>
          </table:table-cell>
          <table:table-cell office:value-type="string">
            <text:p>7894</text:p>
          </table:table-cell>
          <table:table-cell office:value-type="string">
            <text:p>2018-05-03T21:23:02.005Z</text:p>
          </table:table-cell>
          <table:table-cell office:value-type="string">
            <text:p>jakobaleksandrovich, klappy, photo-nomad, richmahn, jag3773, mvahowe, abelpz, eliaspinero</text:p>
          </table:table-cell>
          <table:table-cell office:value-type="string">
            <text:p>translationCore, wordAlignment, checking-tool-wrapper, VerseCheck</text:p>
          </table:table-cell>
          <table:table-cell office:value-type="string">
            <text:p>tc-strings</text:p>
          </table:table-cell>
          <table:table-cell office:value-type="string">
            <text:p>selections - . Repository url git+https://github.com/translationCoreApps/selections.git is translationCoreApp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s-deskto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translationstudi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client, electron, gogs-client, usfm-js, electron-packager</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400</text:p>
          </table:table-cell>
          <table:table-cell office:value-type="string">
            <text:p>https://github.com/unfoldingWord-dev/ts-desktop</text:p>
          </table:table-cell>
          <table:table-cell office:value-type="string">
            <text:p>2026-04-22T14:46:49Z</text:p>
          </table:table-cell>
        </table:table-row>
        <table:table-row>
          <table:table-cell office:value-type="string">
            <text:p>alignment-transfer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unfoldingword</text:p>
          </table:table-cell>
          <table:table-cell office:value-type="string">
            <text:p>False</text:p>
          </table:table-cell>
          <table:table-cell office:value-type="string">
            <text:p>6564</text:p>
          </table:table-cell>
          <table:table-cell office:value-type="string">
            <text:p>2016-07-13T00:07:45.833Z</text:p>
          </table:table-cell>
          <table:table-cell office:value-type="string">
            <text:p>neutrinog</text:p>
          </table:table-cell>
          <table:table-cell office:value-type="string">
            <text:p>translationCore, wordAlignment, checking-tool-wrapper, translationstudio</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rickzhao, georgexu99, malept, marshallofsound, vertedinde</text:p>
          </table:table-cell>
          <table:table-cell office:value-type="string">
            <text:p>electron-forge, translationstudio, @electron-forge/core, @electron-forge/plugin-webpack, @electron-forge/shared-types</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electron-builder/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unfoldingword</text:p>
          </table:table-cell>
          <table:table-cell office:value-type="string">
            <text:p>False</text:p>
          </table:table-cell>
          <table:table-cell office:value-type="string">
            <text:p>2761</text:p>
          </table:table-cell>
          <table:table-cell office:value-type="string">
            <text:p>2026-01-22T21:05:02.866Z</text:p>
          </table:table-cell>
          <table:table-cell office:value-type="string">
            <text:p>jakobaleksandrovich, klappy, photo-nomad, richmahn, jag3773, mvahowe, abelpz, eliaspinero, neutrinog</text:p>
          </table:table-cell>
          <table:table-cell office:value-type="string">
            <text:p>translationCore</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hatap</text:p>
          </table:table-cell>
          <table:table-cell office:value-type="string">
            <text:p/>
          </table:table-cell>
          <table:table-cell office:value-type="string">
            <text:p>usfm-js, gitea-react-toolkit, scripture-resources-rcl, markdown-translatable</text:p>
          </table:table-cell>
          <table:table-cell office:value-type="string">
            <text:p>resource-checker - . Missing homepage. Missing repository. Missing repository url</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proskomma-render-preview</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proskomma-render-pdf</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mvahowe</text:p>
          </table:table-cell>
          <table:table-cell office:value-type="string">
            <text:p>proskomma-react-hooks, bible-preview-app, bible-ref-pk-demo</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migrate-org-repos</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mirror-to-gite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
          </table:table-cell>
          <table:table-cell office:value-type="string">
            <text:p>False</text:p>
          </table:table-cell>
          <table:table-cell office:value-type="string">
            <text:p>1643</text:p>
          </table:table-cell>
          <table:table-cell office:value-type="string">
            <text:p>2019-11-06T17:33:42.928Z</text:p>
          </table:table-cell>
          <table:table-cell office:value-type="string">
            <text:p>neutrinog</text:p>
          </table:table-cell>
          <table:table-cell office:value-type="string">
            <text:p>translationstudio</text:p>
          </table:table-cell>
          <table:table-cell office:value-type="string">
            <text:p>resource-container</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
          </table:table-cell>
          <table:table-cell office:value-type="string">
            <text:p>False</text:p>
          </table:table-cell>
          <table:table-cell office:value-type="string">
            <text:p>3362</text:p>
          </table:table-cell>
          <table:table-cell office:value-type="string">
            <text:p>2017-02-28T01:01:07.451Z</text:p>
          </table:table-cell>
          <table:table-cell office:value-type="string">
            <text:p>neutrinog</text:p>
          </table:table-cell>
          <table:table-cell office:value-type="string">
            <text:p>door43-client</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w-ap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
          </table:table-cell>
          <table:table-cell office:value-type="string">
            <text:p>True</text:p>
          </table:table-cell>
          <table:table-cell office:value-type="string">
            <text:p>1840</text:p>
          </table:table-cell>
          <table:table-cell office:value-type="string">
            <text:p>2016-09-01T18:35:44.393Z</text:p>
          </table:table-cell>
          <table:table-cell office:value-type="string">
            <text:p>neutrin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ucifier129</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ilarest</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suggesting-word-align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unfoldingword</text:p>
          </table:table-cell>
          <table:table-cell office:value-type="string">
            <text:p>False</text:p>
          </table:table-cell>
          <table:table-cell office:value-type="string">
            <text:p>4118</text:p>
          </table:table-cell>
          <table:table-cell office:value-type="string">
            <text:p>2022-06-09T23:15:38.322Z</text:p>
          </table:table-cell>
          <table:table-cell office:value-type="string">
            <text:p>jakobaleksandrovich, klappy, photo-nomad, richmahn, jag3773, mvahowe, abelpz, eliaspinero</text:p>
          </table:table-cell>
          <table:table-cell office:value-type="string">
            <text:p>simple-text-editor-app</text:p>
          </table:table-cell>
          <table:table-cell office:value-type="string">
            <text:p>@unfoldingword/eslint-config</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
          </table:table-cell>
          <table:table-cell office:value-type="string">
            <text:p>False</text:p>
          </table:table-cell>
          <table:table-cell office:value-type="string">
            <text:p>2244</text:p>
          </table:table-cell>
          <table:table-cell office:value-type="string">
            <text:p>2022-07-13T12:06:56.761Z</text:p>
          </table:table-cell>
          <table:table-cell office:value-type="string">
            <text:p>mandolyte, mvahowe</text:p>
          </table:table-cell>
          <table:table-cell office:value-type="string">
            <text:p>epitelete-html, proskomma-scripture-resources-rcl</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notes-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ranslation-notes-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uw-codex-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codex-editor-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vscode-speech-to-t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vscode-speech-to-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proskomma-render-pdf</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vanderzee</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ranslationstudio, test, @scope/package, electronite-forge/, fuses-test-app, native-app, CheckingTool, electron-app</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
          </table:table-cell>
          <table:table-cell office:value-type="string">
            <text:p>False</text:p>
          </table:table-cell>
          <table:table-cell office:value-type="string">
            <text:p>230</text:p>
          </table:table-cell>
          <table:table-cell office:value-type="string">
            <text:p>2019-11-07T08:13:01.981Z</text:p>
          </table:table-cell>
          <table:table-cell office:value-type="string">
            <text:p>neutrinog</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
          </table:table-cell>
          <table:table-cell office:value-type="string">
            <text:p>False</text:p>
          </table:table-cell>
          <table:table-cell office:value-type="string">
            <text:p>194</text:p>
          </table:table-cell>
          <table:table-cell office:value-type="string">
            <text:p>2019-09-25T16:00:59.747Z</text:p>
          </table:table-cell>
          <table:table-cell office:value-type="string">
            <text:p>klapp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hemikejr</text:p>
          </table:table-cell>
          <table:table-cell office:value-type="string">
            <text:p>anchor-alignment-poc</text:p>
          </table:table-cell>
          <table:table-cell office:value-type="string">
            <text:p/>
          </table:table-cell>
          <table:table-cell office:value-type="string">
            <text:p>alignment-editor-rcl - . Missing homepage. Missing repository. Missing repository url</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bible-ref-pk-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bible-ref-pk-dem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proskomma-render-pdf</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0</text:p>
          </table:table-cell>
          <table:table-cell office:value-type="string">
            <text:p>2022-02-22T21:12:10.659Z</text:p>
          </table:table-cell>
          <table:table-cell office:value-type="string">
            <text:p>klappy</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gateway-edit - . Missing homepage. Missing repository. Missing repository url</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unfoldingword</text:p>
          </table:table-cell>
          <table:table-cell office:value-type="string">
            <text:p>False</text:p>
          </table:table-cell>
          <table:table-cell office:value-type="string">
            <text:p>286</text:p>
          </table:table-cell>
          <table:table-cell office:value-type="string">
            <text:p>2020-09-16T21:52:51.640Z</text:p>
          </table:table-cell>
          <table:table-cell office:value-type="string">
            <text:p>jakobaleksandrovich, klappy, photo-nomad, richmahn, jag3773, mvahowe, abelpz, eliaspinero</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uxiangqiu</text:p>
          </table:table-cell>
          <table:table-cell office:value-type="string">
            <text:p/>
          </table:table-cell>
          <table:table-cell office:value-type="string">
            <text:p>gitea-react-toolkit, translation-helps-rcl, resource-workspace-rcl</text:p>
          </table:table-cell>
          <table:table-cell office:value-type="string">
            <text:p>admin-app - . Missing homepage. Missing repository. Missing repository ur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unfoldingword</text:p>
          </table:table-cell>
          <table:table-cell office:value-type="string">
            <text:p>False</text:p>
          </table:table-cell>
          <table:table-cell office:value-type="string">
            <text:p>69</text:p>
          </table:table-cell>
          <table:table-cell office:value-type="string">
            <text:p>2020-12-11T16:05:46.321Z</text:p>
          </table:table-cell>
          <table:table-cell office:value-type="string">
            <text:p>macolon</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ofanyer</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pdf-generator - . Missing homepag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colon</text:p>
          </table:table-cell>
          <table:table-cell office:value-type="string">
            <text:p/>
          </table:table-cell>
          <table:table-cell office:value-type="string">
            <text:p/>
          </table:table-cell>
          <table:table-cell office:value-type="string">
            <text:p>sample-react-component-library - . Missing homepage. Missing repository. Missing repository url</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ible-editor/@bible-editor/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bible-editor/@bible-editor/te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te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bible-editor/@bible-edi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8T16:29:15Z</text:p>
          </table:table-cell>
          <table:table-cell office:value-type="string">
            <text:p>2026-07-08T15:50:09Z</text:p>
          </table:table-cell>
          <table:table-cell office:value-type="string">
            <text:p/>
          </table:table-cell>
          <table:table-cell office:value-type="string">
            <text:p>1</text:p>
          </table:table-cell>
          <table:table-cell office:value-type="string">
            <text:p>1</text:p>
          </table:table-cell>
          <table:table-cell office:value-type="string">
            <text:p>738</text:p>
          </table:table-cell>
          <table:table-cell office:value-type="string">
            <text:p/>
          </table:table-cell>
          <table:table-cell office:value-type="string">
            <text:p>@bible-edi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deferredreward, Benjamin, claude</text:p>
          </table:table-cell>
          <table:table-cell office:value-type="string">
            <text:p>0</text:p>
          </table:table-cell>
          <table:table-cell office:value-type="string">
            <text:p>0</text:p>
          </table:table-cell>
          <table:table-cell office:value-type="string">
            <text:p>https://github.com/unfoldingWord/bible-editor</text:p>
          </table:table-cell>
          <table:table-cell office:value-type="string">
            <text:p>2026-07-08T15:50:17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7-03T17:04:04Z</text:p>
          </table:table-cell>
          <table:table-cell office:value-type="string">
            <text:p>2026-07-03T17:03:50Z</text:p>
          </table:table-cell>
          <table:table-cell office:value-type="string">
            <text:p/>
          </table:table-cell>
          <table:table-cell office:value-type="string">
            <text:p>13</text:p>
          </table:table-cell>
          <table:table-cell office:value-type="string">
            <text:p>0</text:p>
          </table:table-cell>
          <table:table-cell office:value-type="string">
            <text:p>72</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7-03T17:04:12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unfoldingword</text:p>
          </table:table-cell>
          <table:table-cell office:value-type="string">
            <text:p>False</text:p>
          </table:table-cell>
          <table:table-cell office:value-type="string">
            <text:p>1870</text:p>
          </table:table-cell>
          <table:table-cell office:value-type="string">
            <text:p>2024-01-10T09:41:28.021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unfoldingword</text:p>
          </table:table-cell>
          <table:table-cell office:value-type="string">
            <text:p>False</text:p>
          </table:table-cell>
          <table:table-cell office:value-type="string">
            <text:p>421</text:p>
          </table:table-cell>
          <table:table-cell office:value-type="string">
            <text:p>2024-01-10T09:45:57.004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unfoldingword</text:p>
          </table:table-cell>
          <table:table-cell office:value-type="string">
            <text:p>False</text:p>
          </table:table-cell>
          <table:table-cell office:value-type="string">
            <text:p>139</text:p>
          </table:table-cell>
          <table:table-cell office:value-type="string">
            <text:p>2024-01-10T09:47:45.958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unfoldingword</text:p>
          </table:table-cell>
          <table:table-cell office:value-type="string">
            <text:p>False</text:p>
          </table:table-cell>
          <table:table-cell office:value-type="string">
            <text:p>649</text:p>
          </table:table-cell>
          <table:table-cell office:value-type="string">
            <text:p>2024-01-10T09:42:28.55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unfoldingword</text:p>
          </table:table-cell>
          <table:table-cell office:value-type="string">
            <text:p>False</text:p>
          </table:table-cell>
          <table:table-cell office:value-type="string">
            <text:p>345</text:p>
          </table:table-cell>
          <table:table-cell office:value-type="string">
            <text:p>2024-01-10T09:45:17.176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unfoldingword</text:p>
          </table:table-cell>
          <table:table-cell office:value-type="string">
            <text:p>False</text:p>
          </table:table-cell>
          <table:table-cell office:value-type="string">
            <text:p>399</text:p>
          </table:table-cell>
          <table:table-cell office:value-type="string">
            <text:p>2024-01-10T09:45:39.01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unfoldingword</text:p>
          </table:table-cell>
          <table:table-cell office:value-type="string">
            <text:p>False</text:p>
          </table:table-cell>
          <table:table-cell office:value-type="string">
            <text:p>99</text:p>
          </table:table-cell>
          <table:table-cell office:value-type="string">
            <text:p>2024-01-10T09:46:28.087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electronite-forge/@electron-forge/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cope/packa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cope/pack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dumm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dum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second</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seco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on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o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create-electr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create-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app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app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m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m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flatpa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flatpa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pk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p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rpm</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rp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na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n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quirre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quirr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wi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w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zi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zi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auto-unpack-nativ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auto-unpack-nativ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compi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comp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electronegativit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electronegativi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fus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fus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fuses-test-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fuses-test-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local-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local-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nativ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nativ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itbucke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itbucke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electron-release-serv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electron-release-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githu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githu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nucleu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nucleu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3</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napcraf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napcraf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ypescrip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st-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st-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shared-typ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shared-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web-multi-log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web-multi-log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ypedoc-forge-custom-sidebar-them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ypedoc-forge-custom-sidebar-them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997</text:p>
          </table:table-cell>
          <table:table-cell office:value-type="string">
            <text:p>2022-11-02T13:18:25.384Z</text:p>
          </table:table-cell>
          <table:table-cell office:value-type="string">
            <text:p>jakobaleksandrovich, klappy, photo-nomad, richmahn, jag3773, mvahowe,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office:spreadsheet>
  </office:body>
</office:document-content>
</file>