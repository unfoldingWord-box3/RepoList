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1.4425in"/>
    </style:style>
    <style:style style:name="co18" style:family="table-column">
      <style:table-column-properties fo:break-before="auto" style:column-width="1.9839in"/>
    </style:style>
    <style:style style:name="co19" style:family="table-column">
      <style:table-column-properties fo:break-before="auto" style:column-width="2.0681in"/>
    </style:style>
    <style:style style:name="co20" style:family="table-column">
      <style:table-column-properties fo:break-before="auto" style:column-width="4.4484in"/>
    </style:style>
    <style:style style:name="co21" style:family="table-column">
      <style:table-column-properties fo:break-before="auto" style:column-width="2.0563in"/>
    </style:style>
    <style:style style:name="co22" style:family="table-column">
      <style:table-column-properties fo:break-before="auto" style:column-width="6.2409in"/>
    </style:style>
    <style:style style:name="co23" style:family="table-column">
      <style:table-column-properties fo:break-before="auto" style:column-width="2.6811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354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9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2"/>
        <table:table-column table:style-name="co5" table:number-columns-repeated="2" table:default-cell-style-name="ce2"/>
        <table:table-column table:style-name="co6" table:number-columns-repeated="2" table:default-cell-style-name="ce2"/>
        <table:table-column table:style-name="co7" table:default-cell-style-name="ce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unfoldingWord-box3/admin-app">
            <text:p>unfoldingWord-box3/admi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unfoldingWord-box3/anchor-alignment-poc">
            <text:p>unfoldingWord-box3/anchor-alignment-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unfoldingWord-box3/audio-obs-navigator">
            <text:p>unfoldingWord-box3/audio-obs-navig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unfoldingWord-box3/audio-quiz">
            <text:p>unfoldingWord-box3/audio-quiz</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unfoldingWord-dev/Autographa">
            <text:p>unfoldingWord-dev/Autographa</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unfoldingWord/baruch">
            <text:p>unfoldingWord/baruc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unfoldingWord-box3/beta-bibel-demo">
            <text:p>unfoldingWord-box3/beta-bibel-demo</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unfoldingWord-box3/bible-preview-app">
            <text:p>unfoldingWord-box3/bible-preview-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unfoldingWord-box3/book-package-viewer-poc">
            <text:p>unfoldingWord-box3/book-package-view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47:17Z">
            <text:p>2026-06-10T12:47:17Z</text:p>
          </table:table-cell>
          <table:table-cell office:value-type="string" office:string-value="2026-06-10T12:47:16Z">
            <text:p>2026-06-10T12:47: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claude', 'bp-assistant bot']">
            <text:p>['benjamin-test', 'deferredreward', 'stephenwunrow',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0T12:47:23Z">
            <text:p>2026-06-10T12:47:23Z</text:p>
          </table:table-cell>
          <table:table-cell office:value-type="string" office:string-value="unfoldingWord/bp-assistant">
            <text:p>unfoldingWord/bp-assistan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58:52Z">
            <text:p>2026-06-10T12:58:52Z</text:p>
          </table:table-cell>
          <table:table-cell office:value-type="string" office:string-value="2026-06-10T12:58:51Z">
            <text:p>2026-06-10T12:58:5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0T12:59:00Z">
            <text:p>2026-06-10T12:59:00Z</text:p>
          </table:table-cell>
          <table:table-cell office:value-type="string" office:string-value="unfoldingWord/bp-assistant-skills">
            <text:p>unfoldingWord/bp-assistant-skil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browser-app">
            <text:p>unfoldingWord-box3/checking-app-theia/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CheckingApp">
            <text:p>unfoldingWord-box3/checking-app-theia/Checking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CheckingTool">
            <text:p>unfoldingWord-box3/checking-app-theia/Checking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startChecking">
            <text:p>unfoldingWord-box3/checking-app-theia/startCheckin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unfoldingWord-dev/checkingRubric_tool">
            <text:p>unfoldingWord-dev/checkingRubric_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unfoldingWord-box3/codex-sb-handler">
            <text:p>unfoldingWord-box3/codex-sb-handl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unfoldingWord-dev/comment_box">
            <text:p>unfoldingWord-dev/comment_box</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unfoldingWord-box3/desktop-app-liminal">
            <text:p>unfoldingWord-box3/desktop-app-limina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unfoldingWord/fia-mcp">
            <text:p>unfoldingWord/fia-mc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unfoldingWord/fred-zulip-bot-worker">
            <text:p>unfoldingWord/fred-zulip-bot-work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unfoldingWord-box3/gitea-offline-poc">
            <text:p>unfoldingWord-box3/gitea-offline-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unfoldingWord-box3/gutenberg-project">
            <text:p>unfoldingWord-box3/gutenberg-projec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unfoldingWord-box3/lang-as-graph">
            <text:p>unfoldingWord-box3/lang-as-grap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unfoldingWord-box3/md-converter-app">
            <text:p>unfoldingWord-box3/md-convert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unfoldingWord-box3/next-js-template">
            <text:p>unfoldingWord-box3/next-js-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unfoldingWord/node-cli-add-gl-quotes-to-tsv-files">
            <text:p>unfoldingWord/node-cli-add-gl-quotes-to-tsv-fil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unfoldingWord-box3/obs-audio-navigation">
            <text:p>unfoldingWord-box3/obs-audio-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unfoldingWord-box3/obs-pdf-poc">
            <text:p>unfoldingWord-box3/obs-pdf-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unfoldingWord-dev/obsidian-uw-rc-link-opener">
            <text:p>unfoldingWord-dev/obsidian-uw-rc-link-open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unfoldingWord/oce-oak-edit">
            <text:p>unfoldingWord/oce-oak-edi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unfoldingWord/oce-oak-render">
            <text:p>unfoldingWord/oce-oak-ren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unfoldingWord/open-languages">
            <text:p>unfoldingWord/open-languag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unfoldingWord-box3/passage-recorder-app">
            <text:p>unfoldingWord-box3/passage-record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unfoldingWord-box3/pdf-generator">
            <text:p>unfoldingWord-box3/pdf-gener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unfoldingWord-box3/RecordVoice">
            <text:p>unfoldingWord-box3/RecordVoic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unfoldingWord-box3/sample-react-component-library">
            <text:p>unfoldingWord-box3/sample-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unfoldingWord-box3/simple-text-editor-app">
            <text:p>unfoldingWord-box3/simple-text-edito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unfoldingWord-dev/t_pane">
            <text:p>unfoldingWord-dev/t_pa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
            <text:p>unfoldingWord/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che-adapter-indexeddb">
            <text:p>unfoldingWord/tc-study/@bt-synergy/cache-adapter-indexedd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che-adapter-memory">
            <text:p>unfoldingWord/tc-study/@bt-synergy/cache-adapter-memo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che-adapter-sqlite">
            <text:p>unfoldingWord/tc-study/@bt-synergy/cache-adapter-sqli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linked-panels">
            <text:p>unfoldingWord/tc-study/@bt-synergy/linked-pane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mobile">
            <text:p>unfoldingWord/tc-study/@bt-synergy/mobil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navigation">
            <text:p>unfoldingWord/tc-study/@bt-synergy/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builder">
            <text:p>unfoldingWord/tc-study/@bt-synergy/package-buil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builder-engine">
            <text:p>unfoldingWord/tc-study/@bt-synergy/package-builder-engi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core">
            <text:p>unfoldingWord/tc-study/@bt-synergy/package-creator-c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state">
            <text:p>unfoldingWord/tc-study/@bt-synergy/package-creator-st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web">
            <text:p>unfoldingWord/tc-study/@bt-synergy/package-cre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creator-workflow">
            <text:p>unfoldingWord/tc-study/@bt-synergy/package-creator-workflo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ckage-storage">
            <text:p>unfoldingWord/tc-study/@bt-synergy/package-storag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ssage-sets">
            <text:p>unfoldingWord/tc-study/@bt-synergy/passage-set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passage-sets-cli">
            <text:p>unfoldingWord/tc-study/@bt-synergy/passage-sets-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hared">
            <text:p>unfoldingWord/tc-study/@bt-synergy/shared</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tudy-store">
            <text:p>unfoldingWord/tc-study/@bt-synergy/study-st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oc-generator-cli">
            <text:p>unfoldingWord/tc-study/@bt-synergy/toc-generator-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academy-loader">
            <text:p>unfoldingWord/tc-study/@bt-synergy/translation-academy-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notes-loader">
            <text:p>unfoldingWord/tc-study/@bt-synergy/translation-note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questions-loader">
            <text:p>unfoldingWord/tc-study/@bt-synergy/translation-question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words-links-loader">
            <text:p>unfoldingWord/tc-study/@bt-synergy/translation-words-link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translation-words-loader">
            <text:p>unfoldingWord/tc-study/@bt-synergy/translation-word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ui-controls">
            <text:p>unfoldingWord/tc-study/@bt-synergy/ui-contro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usfm-processor">
            <text:p>unfoldingWord/tc-study/@bt-synergy/usfm-process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ible-web">
            <text:p>unfoldingWord/tc-study/bible-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linked-panels-spike">
            <text:p>unfoldingWord/tc-study/linked-panels-spik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tc-study">
            <text:p>unfoldingWord/tc-study/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toc-generator-web">
            <text:p>unfoldingWord/tc-study/toc-gener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unfoldingWord/tc-tsv-converter">
            <text:p>unfoldingWord/tc-tsv-convert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browser-app">
            <text:p>unfoldingWord-box3/theia-examples/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electron-app">
            <text:p>unfoldingWord-box3/theia-examples/electr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empty">
            <text:p>unfoldingWord-box3/theia-examples/empt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unfoldingWord-dev/toolTemplate">
            <text:p>unfoldingWord-dev/tool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unfoldingWord-box3/tq-app">
            <text:p>unfoldingWord-box3/tq-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unfoldingWord-box3/translate-markdown-poc">
            <text:p>unfoldingWord-box3/translate-markdown-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unfoldingWord-box3/translation-helps">
            <text:p>unfoldingWord-box3/translation-help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unfoldingWord-box3/translation-manager-poc">
            <text:p>unfoldingWord-box3/translation-manag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unfoldingWord-box3/translation-process">
            <text:p>unfoldingWord-box3/translation-proces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unfoldingWord-box3/tsv-editor">
            <text:p>unfoldingWord-box3/tsv-edi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20:04:13Z">
            <text:p>2026-06-05T20:04:13Z</text:p>
          </table:table-cell>
          <table:table-cell office:value-type="string" office:string-value="2026-06-05T20:04:11Z">
            <text:p>2026-06-05T20:04:1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05T20:04:17Z">
            <text:p>2026-06-05T20:04:17Z</text:p>
          </table:table-cell>
          <table:table-cell office:value-type="string" office:string-value="unfoldingWord/tsv-twl-creation-app">
            <text:p>unfoldingWord/tsv-twl-creati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unfoldingWord/tsv7-tn-cleanup-app">
            <text:p>unfoldingWord/tsv7-tn-cleanup-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unfoldingWord/usfm-js-wrapper">
            <text:p>unfoldingWord/usfm-js-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unfoldingWord-box3/uw-metadata-react-component-library">
            <text:p>unfoldingWord-box3/uw-metadata-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unfoldingWord/uw-pdf-preview">
            <text:p>unfoldingWord/uw-pdf-previe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unfoldingWord-box3/word-aligner-extension">
            <text:p>unfoldingWord-box3/word-aligner-extens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unfoldingWord-box3/wordMAP-mt">
            <text:p>unfoldingWord-box3/wordMAP-m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unfoldingWord/wordMAP-usfm">
            <text:p>unfoldingWord/wordMAP-usfm</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unfoldingWord-box3/admin-app-old">
            <text:p>unfoldingWord-box3/admin-app-old</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unfoldingWord-box3/alignment-ml">
            <text:p>unfoldingWord-box3/alignment-ml</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unfoldingWord-box3/alignment-playground">
            <text:p>unfoldingWord-box3/alignment-playground</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unfoldingWord-dev/alignment-transferer">
            <text:p>unfoldingWord-dev/alignment-transfer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unfoldingWord-box3/bible-ref-pk-demo">
            <text:p>unfoldingWord-box3/bible-ref-pk-demo</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3T18:25:41Z">
            <text:p>2026-06-03T18:25:41Z</text:p>
          </table:table-cell>
          <table:table-cell office:value-type="string" office:string-value="2026-06-03T18:25:34Z">
            <text:p>2026-06-03T18:25:3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03T18:25:59Z">
            <text:p>2026-06-03T18:25:59Z</text:p>
          </table:table-cell>
          <table:table-cell office:value-type="string" office:string-value="unfoldingWord/bt-servant-telegram-gateway">
            <text:p>unfoldingWord/bt-servant-telegram-gatewa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unfoldingWord-box3/checking-extension">
            <text:p>unfoldingWord-box3/checking-extens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8">
            <text:p>5898</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unfoldingWord/checking-tool-rcl">
            <text:p>unfoldingWord/checking-tool-rcl</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5898 downloads).">
            <text:p>Repository has GitHub dependents or at least 1,000 npm downloads in the last year (58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8 downloads in the last year).">
            <text:p>Package has detected local usage, GitHub dependents, or significant npm downloads (589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unfoldingWord-dev/concourse-pipeline">
            <text:p>unfoldingWord-dev/concourse-pipelin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unfoldingWord-dev/dcs-migrate-org-repos">
            <text:p>unfoldingWord-dev/dcs-migrate-org-repo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dcs-react-hooks">
            <text:p>dcs-react-hooks</text:p>
          </table:table-cell>
          <table:table-cell office:value-type="string" office:string-value="False">
            <text:p>False</text:p>
          </table:table-cell>
          <table:table-cell office:value-type="string" office:string-value="179">
            <text:p>179</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unfoldingWord/dcs-react-hooks">
            <text:p>unfoldingWord/dcs-react-hook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79 downloads).">
            <text:p>Repository has GitHub dependents or at least 1,000 npm downloads in the last year (17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9 downloads in the last year).">
            <text:p>Package has detected local usage, GitHub dependents, or significant npm downloads (17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unfoldingWord-box3/desktop-app-template">
            <text:p>unfoldingWord-box3/desktop-app-templat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unfoldingWord-dev/dokuwiki-plugin-translation">
            <text:p>unfoldingWord-dev/dokuwiki-plugin-translat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unfoldingWord/door43-enqueue-job">
            <text:p>unfoldingWord/door43-enqueue-jo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unfoldingWord/door43-enqueue-job-test">
            <text:p>unfoldingWord/door43-enqueue-job-tes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unfoldingWord/door43-library">
            <text:p>unfoldingWord/door43-librar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976">
            <text:p>20976</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unfoldingWord/electronite">
            <text:p>unfoldingWord/electronit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unfoldingWord-dev/electronite-builder">
            <text:p>unfoldingWord-dev/electronite-build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unfoldingWord/electronite-forge">
            <text:p>unfoldingWord/electronite-forg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unfoldingWord-dev/electronite-packager">
            <text:p>unfoldingWord-dev/electronite-packag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
            <text:p>unfoldingWord/find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mui">
            <text:p>unfoldingWord/findr/@findr/mui</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perf">
            <text:p>unfoldingWord/findr/@findr/perf</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react">
            <text:p>unfoldingWord/findr/@findr/reac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unfoldingWord/findr/@findr/text">
            <text:p>unfoldingWord/findr/@findr/tex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unfoldingWord-dev/flask-github-webhook">
            <text:p>unfoldingWord-dev/flask-github-webhook</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unfoldingWord-dev/go-gogs-client">
            <text:p>unfoldingWord-dev/go-gogs-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unfoldingWord/go-rc2sb">
            <text:p>unfoldingWord/go-rc2s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unfoldingWord-dev/hackathon-zpp">
            <text:p>unfoldingWord-dev/hackathon-zpp</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unfoldingWord-dev/HebrewLexicon">
            <text:p>unfoldingWord-dev/HebrewLexic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unfoldingWord-dev/node-door43-client">
            <text:p>unfoldingWord-dev/node-door43-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True">
            <text:p>True</text:p>
          </table:table-cell>
          <table:table-cell office:value-type="string" office:string-value="1504">
            <text:p>1504</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unfoldingWord-dev/node-door43-rc">
            <text:p>unfoldingWord-dev/node-door43-rc</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504 downloads).">
            <text:p>Repository has GitHub dependents or at least 1,000 npm downloads in the last year (1504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unfoldingWord-dev/nototools">
            <text:p>unfoldingWord-dev/nototool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unfoldingWord-box3/obs-study">
            <text:p>unfoldingWord-box3/obs-stud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unfoldingWord/obt">
            <text:p>unfoldingWord/ob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
            <text:p>unfoldingWord/oce-editor-tool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
            <text:p>@oce-editor-tools/base</text:p>
          </table:table-cell>
          <table:table-cell office:value-type="string" office:string-value="">
            <text:p/>
          </table:table-cell>
          <table:table-cell office:value-type="string" office:string-value="1852">
            <text:p>1852</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base">
            <text:p>unfoldingWord/oce-editor-tools/@oce-editor-tools/bas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852 downloads).">
            <text:p>Repository has GitHub dependents or at least 1,000 npm downloads in the last year (18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2 downloads in the last year).">
            <text:p>Package has detected local usage, GitHub dependents, or significant npm downloads (18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base-core">
            <text:p>unfoldingWord/oce-editor-tools/@oce-editor-tools/base-cor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
            <text:p/>
          </table:table-cell>
          <table:table-cell office:value-type="string" office:string-value="405">
            <text:p>405</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joy-core">
            <text:p>unfoldingWord/oce-editor-tools/@oce-editor-tools/joy-cor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405 downloads).">
            <text:p>Repository has GitHub dependents or at least 1,000 npm downloads in the last year (40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5 downloads in the last year).">
            <text:p>Package has detected local usage, GitHub dependents, or significant npm downloads (40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pk">
            <text:p>@oce-editor-tools/joy-pk</text:p>
          </table:table-cell>
          <table:table-cell office:value-type="string" office:string-value="">
            <text:p/>
          </table:table-cell>
          <table:table-cell office:value-type="string" office:string-value="129">
            <text:p>129</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joy-pk">
            <text:p>unfoldingWord/oce-editor-tools/@oce-editor-tools/joy-pk</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29 downloads).">
            <text:p>Repository has GitHub dependents or at least 1,000 npm downloads in the last year (12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9 downloads in the last year).">
            <text:p>Package has detected local usage, GitHub dependents, or significant npm downloads (12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joy-verse-navigator">
            <text:p>unfoldingWord/oce-editor-tools/@oce-editor-tools/joy-verse-naviga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
            <text:p/>
          </table:table-cell>
          <table:table-cell office:value-type="string" office:string-value="641">
            <text:p>641</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core">
            <text:p>unfoldingWord/oce-editor-tools/@oce-editor-tools/mui-cor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641 downloads).">
            <text:p>Repository has GitHub dependents or at least 1,000 npm downloads in the last year (64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 downloads in the last year).">
            <text:p>Package has detected local usage, GitHub dependents, or significant npm downloads (64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pk">
            <text:p>@oce-editor-tools/mui-pk</text:p>
          </table:table-cell>
          <table:table-cell office:value-type="string" office:string-value="">
            <text:p/>
          </table:table-cell>
          <table:table-cell office:value-type="string" office:string-value="335">
            <text:p>335</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pk">
            <text:p>unfoldingWord/oce-editor-tools/@oce-editor-tools/mui-pk</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335 downloads).">
            <text:p>Repository has GitHub dependents or at least 1,000 npm downloads in the last year (33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5 downloads in the last year).">
            <text:p>Package has detected local usage, GitHub dependents, or significant npm downloads (33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1">
            <text:p>37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simple">
            <text:p>unfoldingWord/oce-editor-tools/@oce-editor-tools/mui-simpl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371 downloads).">
            <text:p>Repository has GitHub dependents or at least 1,000 npm downloads in the last year (3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1 downloads in the last year).">
            <text:p>Package has detected local usage, GitHub dependents, or significant npm downloads (37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mui-verse-navigator">
            <text:p>unfoldingWord/oce-editor-tools/@oce-editor-tools/mui-verse-naviga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pk-aligner">
            <text:p>unfoldingWord/oce-editor-tools/@oce-editor-tools/pk-align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6">
            <text:p>96</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unfoldingWord/oce-editor-tools/@oce-editor-tools/verse-mapper">
            <text:p>unfoldingWord/oce-editor-tools/@oce-editor-tools/verse-mapp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96 downloads).">
            <text:p>Repository has GitHub dependents or at least 1,000 npm downloads in the last year (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 downloads in the last year).">
            <text:p>Package has detected local usage, GitHub dependents, or significant npm downloads (9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unfoldingWord-dev/pagequery">
            <text:p>unfoldingWord-dev/pagequer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unfoldingWord-box3/pankosmia-web">
            <text:p>unfoldingWord-box3/pankosmia-we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unfoldingWord/proskomma-react-hooks">
            <text:p>unfoldingWord/proskomma-react-hook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unfoldingWord-dev/proskomma-render-preview">
            <text:p>unfoldingWord-dev/proskomma-render-preview</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unfoldingWord/python-dcs-api-client">
            <text:p>unfoldingWord/python-dcs-api-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unfoldingWord/python-dcs-catalog-client">
            <text:p>unfoldingWord/python-dcs-catalog-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unfoldingWord-box3/react-library-starter">
            <text:p>unfoldingWord-box3/react-library-start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unfoldingWord-box3/react-to-electron-action">
            <text:p>unfoldingWord-box3/react-to-electron-act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unfoldingWord-box3/StableTTS_Editing">
            <text:p>unfoldingWord-box3/StableTTS_Editing</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unfoldingWord-box3/suggesting-word-aligner">
            <text:p>unfoldingWord-box3/suggesting-word-align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unfoldingWord/t-core-submodule-updater">
            <text:p>unfoldingWord/t-core-submodule-updat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unfoldingWord-box3/tact">
            <text:p>unfoldingWord-box3/tac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unfoldingWord-box3/tc-create-poc">
            <text:p>unfoldingWord-box3/tc-create-poc</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74 downloads).">
            <text:p>Repository has GitHub dependents or at least 1,000 npm downloads in the last year (7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4 downloads in the last year).">
            <text:p>Package has detected local usage, GitHub dependents, or significant npm downloads (7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unfoldingWord/tc-electron-env">
            <text:p>unfoldingWord/tc-electron-env</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6T05:40:18Z">
            <text:p>2026-06-06T05:40:18Z</text:p>
          </table:table-cell>
          <table:table-cell office:value-type="string" office:string-value="2026-05-05T16:33:43Z">
            <text:p>2026-05-05T16:33:43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unfoldingWord/translation-helps-mcp">
            <text:p>unfoldingWord/translation-helps-mcp</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unfoldingWord-box3/translation-notes-extension">
            <text:p>unfoldingWord-box3/translation-notes-extens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unfoldingWord-box3/translation-project">
            <text:p>unfoldingWord-box3/translation-projec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unfoldingWord-dev/USFM-Tools">
            <text:p>unfoldingWord-dev/USFM-Tool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unfoldingWord-box3/uw-codex-editor">
            <text:p>unfoldingWord-box3/uw-codex-edi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uw-editor">
            <text:p>uw-editor</text:p>
          </table:table-cell>
          <table:table-cell office:value-type="string" office:string-value="True">
            <text:p>True</text:p>
          </table:table-cell>
          <table:table-cell office:value-type="string" office:string-value="1163">
            <text:p>1163</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unfoldingWord/uw-editor">
            <text:p>unfoldingWord/uw-edi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163 downloads).">
            <text:p>Repository has GitHub dependents or at least 1,000 npm downloads in the last year (116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unfoldingWord-dev/uw-web">
            <text:p>unfoldingWord-dev/uw-we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unfoldingWord-box3/VscOceUsfmEdit">
            <text:p>unfoldingWord-box3/VscOceUsfmEdi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unfoldingWord-box3/vscode-speech-to-text">
            <text:p>unfoldingWord-box3/vscode-speech-to-tex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unfoldingWord-box3/VscUsfmEditAlign">
            <text:p>unfoldingWord-box3/VscUsfmEditAlig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unfoldingWord-dev/webhook-relay">
            <text:p>unfoldingWord-dev/webhook-rela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unfoldingWord-box3/alignment-editor-rcl">
            <text:p>unfoldingWord-box3/alignment-edito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574">
            <text:p>16574</text:p>
          </table:table-cell>
          <table:table-cell office:value-type="string" office:string-value="2023-12-07T19:15:35.590Z">
            <text:p>2023-12-07T19:15:35.590Z</text:p>
          </table:table-cell>
          <table:table-cell office:value-type="string" office:string-value="['checking-extension', 'alignment-playground', 'translationCore', 'enhanced-word-aligner-rcl', 'tc-create-app', 'word-aligner-rcl', 'word-aligner-lib', 'single-scripture-rcl', 'translation-helps-rcl', 'scripture-resources-rcl', 'uw-quote-helpers', 'tsv-groupdata-parser', 'checking-tool-rcl', 'bible-reference-rcl', 'scripture-tsv', 'uw-bible-parser']">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unfoldingWord/bible-reference-range">
            <text:p>unfoldingWord/bible-reference-range</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74 downloads in the last year).">
            <text:p>Package has detected local usage, GitHub dependents, or significant npm downloads (1657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42">
            <text:p>5142</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unfoldingWord/bible-reference-rcl">
            <text:p>unfoldingWord/bible-referenc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42 downloads in the last year).">
            <text:p>Package has detected local usage, GitHub dependents, or significant npm downloads (514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unfoldingWord/book-package-rcl">
            <text:p>unfoldingWord/book-packag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unfoldingWord/checking-tool-wrapper">
            <text:p>unfoldingWord/checking-tool-wrapp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unfoldingWord/datatable-translatable">
            <text:p>unfoldingWord/datatable-translatable</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4">
            <text:p>3614</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unfoldingWord/dcs-branch-merger">
            <text:p>unfoldingWord/dcs-branch-merg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4 downloads in the last year).">
            <text:p>Package has detected local usage, GitHub dependents, or significant npm downloads (361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False">
            <text:p>False</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unfoldingWord/dcs-js">
            <text:p>unfoldingWord/dcs-j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7 downloads in the last year).">
            <text:p>Package has detected local usage, GitHub dependents, or significant npm downloads (6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electronite">
            <text:p>electronite</text:p>
          </table:table-cell>
          <table:table-cell office:value-type="string" office:string-value="False">
            <text:p>False</text:p>
          </table:table-cell>
          <table:table-cell office:value-type="string" office:string-value="2608">
            <text:p>2608</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unfoldingWord-dev/electronite-cli">
            <text:p>unfoldingWord-dev/electronite-cli</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2">
            <text:p>24652</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unfoldingWord/enhanced-word-aligner-rcl">
            <text:p>unfoldingWord/enhanced-word-aligne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2 downloads in the last year).">
            <text:p>Package has detected local usage, GitHub dependents, or significant npm downloads (246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epitelete-html">
            <text:p>epitelete-html</text:p>
          </table:table-cell>
          <table:table-cell office:value-type="string" office:string-value="False">
            <text:p>False</text:p>
          </table:table-cell>
          <table:table-cell office:value-type="string" office:string-value="9613">
            <text:p>9613</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unfoldingWord/epitelete-html">
            <text:p>unfoldingWord/epitelete-htm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13 downloads in the last year).">
            <text:p>Package has detected local usage, GitHub dependents, or significant npm downloads (961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enhanced-word-aligner-rcl', 'gitea-react-toolkit', 'single-scripture-rcl', 'scripture-resources-rcl', 'datatable-translatable', 'markdown-translatable', 'dcs-react-hooks', 'resource-workspace-rcl']">
            <text:p>['simple-text-editor-rcl', 'tc-create-app', 'gitea-offline-poc', 'enhanced-word-aligner-rcl', 'gitea-react-toolkit', 'single-scripture-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unfoldingWord/eslint-config">
            <text:p>unfoldingWord/eslint-config</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68">
            <text:p>17468</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unfoldingWord/gitea-react-toolkit">
            <text:p>unfoldingWord/gitea-react-toolki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68 downloads in the last year).">
            <text:p>Package has detected local usage, GitHub dependents, or significant npm downloads (1746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50">
            <text:p>18050</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unfoldingWord/markdown-translatable">
            <text:p>unfoldingWord/markdown-translatable</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50 downloads in the last year).">
            <text:p>Package has detected local usage, GitHub dependents, or significant npm downloads (180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gogs-client">
            <text:p>gogs-client</text:p>
          </table:table-cell>
          <table:table-cell office:value-type="string" office:string-value="False">
            <text:p>False</text:p>
          </table:table-cell>
          <table:table-cell office:value-type="string" office:string-value="6726">
            <text:p>6726</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unfoldingWord-dev/node-gogs-client">
            <text:p>unfoldingWord-dev/node-gogs-clien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07">
            <text:p>3107</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unfoldingWord-dev/node-resource-container">
            <text:p>unfoldingWord-dev/node-resource-contain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07 downloads in the last year).">
            <text:p>Package has detected local usage, GitHub dependents, or significant npm downloads (31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53:21Z">
            <text:p>2026-06-05T07:53:21Z</text:p>
          </table:table-cell>
          <table:table-cell office:value-type="string" office:string-value="2026-06-05T07:53:19Z">
            <text:p>2026-06-05T07:53: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False">
            <text:p>False</text:p>
          </table:table-cell>
          <table:table-cell office:value-type="string" office:string-value="5434">
            <text:p>5434</text:p>
          </table:table-cell>
          <table:table-cell office:value-type="string" office:string-value="2026-06-05T07:54:21.337Z">
            <text:p>2026-06-05T07:54:21.337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05T07:53:25Z">
            <text:p>2026-06-05T07:53:25Z</text:p>
          </table:table-cell>
          <table:table-cell office:value-type="string" office:string-value="unfoldingWord/node-twl-generator">
            <text:p>unfoldingWord/node-twl-generato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434 downloads in the last year).">
            <text:p>Package has detected local usage, GitHub dependents, or significant npm downloads (543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783">
            <text:p>2783</text:p>
          </table:table-cell>
          <table:table-cell office:value-type="string" office:string-value="2023-06-13T13:51:03.803Z">
            <text:p>2023-06-13T13:51:03.803Z</text:p>
          </table:table-cell>
          <table:table-cell office:value-type="string" office:string-value="['next-js-template', 'gateway-edit', 'admin-app', 'create-app', 'gateway-admin', 'bsa', 'gateway-translate']">
            <text:p>['next-js-template', 'gateway-edit', 'admin-app', 'create-app', 'gateway-admin', 'bsa', 'gateway-translate']</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unfoldingWord/resource-workspace-rcl">
            <text:p>unfoldingWord/resource-workspac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783 downloads in the last year).">
            <text:p>Package has detected local usage, GitHub dependents, or significant npm downloads (278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217">
            <text:p>15217</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gateway-admin', 'single-scripture-rcl', 'translation-helps-rcl', 'bsa', 'gateway-translate', 'resource-workspace-rcl', 'resource-checker']">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unfoldingWord/scripture-resources-rcl">
            <text:p>unfoldingWord/scripture-resources-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217 downloads in the last year).">
            <text:p>Package has detected local usage, GitHub dependents, or significant npm downloads (1521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scripture-tsv">
            <text:p>scripture-tsv</text:p>
          </table:table-cell>
          <table:table-cell office:value-type="string" office:string-value="False">
            <text:p>False</text:p>
          </table:table-cell>
          <table:table-cell office:value-type="string" office:string-value="2648">
            <text:p>2648</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unfoldingWord/scripture-tsv">
            <text:p>unfoldingWord/scripture-tsv</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48 downloads in the last year).">
            <text:p>Package has detected local usage, GitHub dependents, or significant npm downloads (264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unfoldingWord/selections">
            <text:p>unfoldingWord/selection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96">
            <text:p>3896</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unfoldingWord-box3/simple-text-editor-rcl">
            <text:p>unfoldingWord-box3/simple-text-edito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96 downloads in the last year).">
            <text:p>Package has detected local usage, GitHub dependents, or significant npm downloads (389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56">
            <text:p>9756</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unfoldingWord/single-scripture-rcl">
            <text:p>unfoldingWord/single-scriptur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56 downloads in the last year).">
            <text:p>Package has detected local usage, GitHub dependents, or significant npm downloads (975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7848">
            <text:p>97848</text:p>
          </table:table-cell>
          <table:table-cell office:value-type="string" office:string-value="2021-08-25T21:55:46.406Z">
            <text:p>2021-08-25T21:55:46.406Z</text:p>
          </table:table-cell>
          <table:table-cell office:value-type="string" office:string-value="['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unfoldingWord/string-punctuation-tokenizer">
            <text:p>unfoldingWord/string-punctuation-tokeniz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47">
            <text:p>7747</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unfoldingWord/tc-source-content-updater">
            <text:p>unfoldingWord/tc-source-content-updat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47 downloads in the last year).">
            <text:p>Package has detected local usage, GitHub dependents, or significant npm downloads (774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unfoldingWord/tc-strings">
            <text:p>unfoldingWord/tc-string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VerseCheck', 'toolTemplate', 'ScripturePane']">
            <text:p>['translationCore', 'translationNotes', 'translationWords', 'wordAlignment',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unfoldingWord/tc-tool">
            <text:p>unfoldingWord/tc-too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tc-ui-toolkit">
            <text:p>tc-ui-toolkit</text:p>
          </table:table-cell>
          <table:table-cell office:value-type="string" office:string-value="False">
            <text:p>False</text:p>
          </table:table-cell>
          <table:table-cell office:value-type="string" office:string-value="29495">
            <text:p>29495</text:p>
          </table:table-cell>
          <table:table-cell office:value-type="string" office:string-value="2024-12-31T18:53:34.752Z">
            <text:p>2024-12-31T18:53:34.752Z</text:p>
          </table:table-cell>
          <table:table-cell office:value-type="string" office:string-value="['alignment-playground', 'next-js-template', 'gateway-edit', 'translationCore', 'wordAlignment', 'gateway-admin', 'tc-create-app', 'single-scripture-rcl', 'translation-helps-rcl', 'scripture-resources-rcl', 'bsa', 'checking-tool-wrapper']">
            <text:p>['alignment-playground', 'next-js-template', 'gateway-edit', 'translationCore', 'wordAlignment', 'gateway-admin', 'tc-create-app', 'single-scripture-rcl', 'translation-helps-rcl', 'scripture-resources-rcl', 'bsa', 'checking-tool-wrapper']</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unfoldingWord/tc-ui-toolkit">
            <text:p>unfoldingWord/tc-ui-toolki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495 downloads in the last year).">
            <text:p>Package has detected local usage, GitHub dependents, or significant npm downloads (2949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4995">
            <text:p>14995</text:p>
          </table:table-cell>
          <table:table-cell office:value-type="string" office:string-value="2026-03-27T22:01:47.002Z">
            <text:p>2026-03-27T22:01:47.002Z</text:p>
          </table:table-cell>
          <table:table-cell office:value-type="string" office:string-value="['next-js-template', 'gateway-edit', 'admin-app', 'create-app', 'gateway-admin', 'single-scripture-rcl', 'bsa', 'gateway-translate', 'uw-editor', 'resource-workspace-rcl']">
            <text:p>['next-js-template', 'gateway-edit', 'admin-app', 'create-app', 'gateway-admin', 'single-scripture-rcl', 'bsa', 'gateway-translate', 'uw-editor', 'resource-workspace-rcl']</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unfoldingWord/translation-helps-rcl">
            <text:p>unfoldingWord/translation-helps-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4995 downloads in the last year).">
            <text:p>Package has detected local usage, GitHub dependents, or significant npm downloads (1499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398">
            <text:p>6398</text:p>
          </table:table-cell>
          <table:table-cell office:value-type="string" office:string-value="2024-10-16T17:43:33.516Z">
            <text:p>2024-10-16T17:43:33.516Z</text:p>
          </table:table-cell>
          <table:table-cell office:value-type="string" office:string-value="['checking-extension', 'pdf-generator', 'translationCore', 'uw-quote-helpers', 'tc-source-content-updater', 'checking-tool-rcl']">
            <text:p>['checking-extension', 'pdf-generator', 'translationCore', 'uw-quote-helpers', 'tc-source-content-updater', 'checking-tool-rcl']</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unfoldingWord/tsv-groupdata-parser">
            <text:p>unfoldingWord/tsv-groupdata-pars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398 downloads in the last year).">
            <text:p>Package has detected local usage, GitHub dependents, or significant npm downloads (639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47:31Z">
            <text:p>2026-06-05T07:47:31Z</text:p>
          </table:table-cell>
          <table:table-cell office:value-type="string" office:string-value="2026-06-05T07:47:29Z">
            <text:p>2026-06-05T07:47: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twl-creation-app', 'twl-generator', 'tsv7-tn-cleanup-app', 'add-gl-quotes-to-tsv-files']">
            <text:p>['tsv-twl-creation-app', 'twl-generator',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05T07:47:35Z">
            <text:p>2026-06-05T07:47:35Z</text:p>
          </table:table-cell>
          <table:table-cell office:value-type="string" office:string-value="unfoldingWord/tsv-quote-converters">
            <text:p>unfoldingWord/tsv-quote-converter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wl-generator', 'door43-preview-renderers']">
            <text:p>['door43-preview-app', 'twl-generator',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unfoldingWord/usfm-alignment-remover-app">
            <text:p>unfoldingWord/usfm-alignment-remover-app</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unfoldingWord/usfm-js">
            <text:p>unfoldingWord/usfm-j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52">
            <text:p>2052</text:p>
          </table:table-cell>
          <table:table-cell office:value-type="string" office:string-value="2026-06-07T09:30:48.456Z">
            <text:p>2026-06-07T09:30:48.45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unfoldingWord/uw-content-validation">
            <text:p>unfoldingWord/uw-content-validation</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52 downloads in the last year).">
            <text:p>Package has detected local usage, GitHub dependents, or significant npm downloads (20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uw-languages-rcl">
            <text:p>uw-languages-rcl</text:p>
          </table:table-cell>
          <table:table-cell office:value-type="string" office:string-value="False">
            <text:p>False</text:p>
          </table:table-cell>
          <table:table-cell office:value-type="string" office:string-value="1201">
            <text:p>1201</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unfoldingWord/uw-languages-rcl">
            <text:p>unfoldingWord/uw-languages-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01 downloads in the last year).">
            <text:p>Package has detected local usage, GitHub dependents, or significant npm downloads (120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proskomma">
            <text:p>uw-proskomma</text:p>
          </table:table-cell>
          <table:table-cell office:value-type="string" office:string-value="False">
            <text:p>False</text:p>
          </table:table-cell>
          <table:table-cell office:value-type="string" office:string-value="2345">
            <text:p>2345</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unfoldingWord-box3/uw-proskomma">
            <text:p>unfoldingWord-box3/uw-proskomma</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45 downloads in the last year).">
            <text:p>Package has detected local usage, GitHub dependents, or significant npm downloads (234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False">
            <text:p>False</text:p>
          </table:table-cell>
          <table:table-cell office:value-type="string" office:string-value="3135">
            <text:p>3135</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unfoldingWord/uw-quote-helpers">
            <text:p>unfoldingWord/uw-quote-helper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35 downloads in the last year).">
            <text:p>Package has detected local usage, GitHub dependents, or significant npm downloads (313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unfoldingWord/uw-scripture-parser">
            <text:p>unfoldingWord/uw-scripture-pars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tsv-parser">
            <text:p>uw-tsv-parser</text:p>
          </table:table-cell>
          <table:table-cell office:value-type="string" office:string-value="False">
            <text:p>False</text:p>
          </table:table-cell>
          <table:table-cell office:value-type="string" office:string-value="4593">
            <text:p>4593</text:p>
          </table:table-cell>
          <table:table-cell office:value-type="string" office:string-value="2022-02-02T14:06:17.344Z">
            <text:p>2022-02-02T14:06:17.344Z</text:p>
          </table:table-cell>
          <table:table-cell office:value-type="string" office:string-value="['checking-extension', 'gateway-admin', 'tc-create-app', 'word-aligner-rcl', 'tsv-groupdata-parser', 'checking-tool-rcl']">
            <text:p>['checking-extension', 'gateway-admin', 'tc-create-app', 'word-aligner-rcl', 'tsv-groupdata-parser', 'checking-tool-rcl']</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unfoldingWord/uw-tsv-parser">
            <text:p>unfoldingWord/uw-tsv-pars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593 downloads in the last year).">
            <text:p>Package has detected local usage, GitHub dependents, or significant npm downloads (459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uw-word-count">
            <text:p>uw-word-count</text:p>
          </table:table-cell>
          <table:table-cell office:value-type="string" office:string-value="False">
            <text:p>False</text:p>
          </table:table-cell>
          <table:table-cell office:value-type="string" office:string-value="345">
            <text:p>345</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unfoldingWord/uw-word-count">
            <text:p>unfoldingWord/uw-word-coun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45 downloads in the last year).">
            <text:p>Package has detected local usage, GitHub dependents, or significant npm downloads (34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word-aligner">
            <text:p>word-aligner</text:p>
          </table:table-cell>
          <table:table-cell office:value-type="string" office:string-value="False">
            <text:p>False</text:p>
          </table:table-cell>
          <table:table-cell office:value-type="string" office:string-value="44656">
            <text:p>44656</text:p>
          </table:table-cell>
          <table:table-cell office:value-type="string" office:string-value="2026-05-24T21:22:13.663Z">
            <text:p>2026-05-24T21:22:13.663Z</text:p>
          </table:table-cell>
          <table:table-cell office:value-type="string" office:string-value="['alignment-playground', 'next-js-template', 'gateway-edit', 'translationCore', 'wordAlignment', 'gateway-admin', 'tc-create-app', 'word-aligner-rcl', 'word-aligner-lib', 'single-scripture-rcl', 'translation-helps-rcl', 'scripture-resources-rcl', 'bsa', 'checking-tool-rcl', 'tc-ui-toolkit', 'checking-tool-wrapper']">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unfoldingWord/word-aligner">
            <text:p>unfoldingWord/word-align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656 downloads in the last year).">
            <text:p>Package has detected local usage, GitHub dependents, or significant npm downloads (4465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False">
            <text:p>False</text:p>
          </table:table-cell>
          <table:table-cell office:value-type="string" office:string-value="4730">
            <text:p>4730</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unfoldingWord/word-aligner-lib">
            <text:p>unfoldingWord/word-aligner-lib</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730 downloads in the last year).">
            <text:p>Package has detected local usage, GitHub dependents, or significant npm downloads (473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word-aligner-rcl">
            <text:p>word-aligner-rcl</text:p>
          </table:table-cell>
          <table:table-cell office:value-type="string" office:string-value="False">
            <text:p>False</text:p>
          </table:table-cell>
          <table:table-cell office:value-type="string" office:string-value="16507">
            <text:p>16507</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box3/word-aligner-extension', 'unfoldingWord/oce-editor-tools']">
            <text:p>['unfoldingWord/word-aligner', '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unfoldingWord/word-aligner-rcl">
            <text:p>unfoldingWord/word-aligne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07 downloads in the last year).">
            <text:p>Package has detected local usage, GitHub dependents, or significant npm downloads (165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translationCore', 'wordAlignment', 'word-aligner-rcl', 'uw-wordmapbooster']">
            <text:p>['wordmap-mt', 'wordmap-react-toolkit', 'translationCore', 'wordAlignment', 'word-aligner-rcl', 'uw-wordmapbooster']</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unfoldingWord/wordMAP">
            <text:p>unfoldingWord/wordMAP</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translationCore', 'wordAlignment', 'string-punctuation-tokenizer', 'word-aligner-rcl', 'word-aligner-lib', 'uw-wordmapbooster', 'checking-tool-rcl', 'wordmap', 'wordmap-usfm']">
            <text:p>['wordmap-mt', 'alignment-playground', 'wordmap-react-toolkit', 'translationCore', 'wordAlignment', 'string-punctuation-tokenizer', 'word-aligner-rcl', 'word-aligner-lib', 'uw-wordmapbooster', 'checking-tool-rcl', 'wordmap', 'wordmap-usfm']</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unfoldingWord/wordMAP-lexer">
            <text:p>unfoldingWord/wordMAP-lex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unfoldingWord/wordmapbooster">
            <text:p>unfoldingWord/wordmapboost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unfoldingWord-dev/android-door43-client">
            <text:p>unfoldingWord-dev/android-door43-clien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unfoldingWord-dev/android-resource-container">
            <text:p>unfoldingWord-dev/android-resource-contain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unfoldingWord-box3/aquifer-to-dcs">
            <text:p>unfoldingWord-box3/aquifer-to-d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unfoldingWord/bt-servant-admin-portal">
            <text:p>unfoldingWord/bt-servant-admin-porta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unfoldingWord/bt-servant-engine">
            <text:p>unfoldingWord/bt-servant-engin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unfoldingWord/bt-servant-engine-data-loaders">
            <text:p>unfoldingWord/bt-servant-engine-data-load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unfoldingWord/bt-servant-kb-worker">
            <text:p>unfoldingWord/bt-servant-kb-wor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unfoldingWord/bt-servant-log-viewer">
            <text:p>unfoldingWord/bt-servant-log-view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unfoldingWord/bt-servant-message-broker">
            <text:p>unfoldingWord/bt-servant-message-bro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unfoldingWord/bt-servant-report-sender">
            <text:p>unfoldingWord/bt-servant-report-sen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unfoldingWord/bt-servant-site">
            <text:p>unfoldingWord/bt-servant-sit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unfoldingWord/bt-servant-telemetry">
            <text:p>unfoldingWord/bt-servant-telemetr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17:48:59Z">
            <text:p>2026-06-13T17:48:59Z</text:p>
          </table:table-cell>
          <table:table-cell office:value-type="string" office:string-value="2026-06-13T17:48:58Z">
            <text:p>2026-06-13T17:48:58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3T17:49:02Z">
            <text:p>2026-06-13T17:49:02Z</text:p>
          </table:table-cell>
          <table:table-cell office:value-type="string" office:string-value="unfoldingWord/bt-servant-web-client">
            <text:p>unfoldingWord/bt-servant-web-clien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30T15:04:02Z">
            <text:p>2026-04-30T15:04:02Z</text:p>
          </table:table-cell>
          <table:table-cell office:value-type="string" office:string-value="2026-04-30T15:04:01Z">
            <text:p>2026-04-30T15:04:01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4-30T15:09:54Z">
            <text:p>2026-04-30T15:09:54Z</text:p>
          </table:table-cell>
          <table:table-cell office:value-type="string" office:string-value="unfoldingWord/bt-servant-whatsapp-gateway">
            <text:p>unfoldingWord/bt-servant-whatsapp-gatewa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8:26:02Z">
            <text:p>2026-06-10T18:26:02Z</text:p>
          </table:table-cell>
          <table:table-cell office:value-type="string" office:string-value="2026-05-28T15:55:55Z">
            <text:p>2026-05-28T15:55:55Z</text:p>
          </table:table-cell>
          <table:table-cell office:value-type="string" office:string-value="">
            <text:p/>
          </table:table-cell>
          <table:table-cell office:value-type="string" office:string-value="89">
            <text:p>89</text:p>
          </table:table-cell>
          <table:table-cell office:value-type="string" office:string-value="9">
            <text:p>9</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5-28T15:56:00Z">
            <text:p>2026-05-28T15:56:00Z</text:p>
          </table:table-cell>
          <table:table-cell office:value-type="string" office:string-value="unfoldingWord/bt-servant-worker">
            <text:p>unfoldingWord/bt-servant-wor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unfoldingWord/catalog-next-toolkit">
            <text:p>unfoldingWord/catalog-next-toolki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6">
            <text:p>186</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unfoldingWord-box3/content-validation-app">
            <text:p>unfoldingWord-box3/content-validation-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6 downloads in the last year) and no detected local consumers.">
            <text:p>Package has low but nonzero npm usage (186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unfoldingWord-dev/d43-catalog">
            <text:p>unfoldingWord-dev/d43-catalog</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unfoldingWord/dcs">
            <text:p>unfoldingWord/d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unfoldingWord-dev/dcs-api-merge-poc">
            <text:p>unfoldingWord-dev/dcs-api-merge-poc</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unfoldingWord-dev/dcs-api-resolve-conflicts-poc">
            <text:p>unfoldingWord-dev/dcs-api-resolve-conflicts-poc</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unfoldingWord/dcs-catalog-accordion-rcl">
            <text:p>unfoldingWord/dcs-catalog-accordion-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unfoldingWord-dev/dcs-docker">
            <text:p>unfoldingWord-dev/dcs-doc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unfoldingWord/dcs-docs">
            <text:p>unfoldingWord/dcs-do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unfoldingWord-box3/dcs-file-version-diff-tool">
            <text:p>unfoldingWord-box3/dcs-file-version-diff-too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unfoldingWord/dcs-home-page-old">
            <text:p>unfoldingWord/dcs-home-page-old</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unfoldingWord/dcs-homepage">
            <text:p>unfoldingWord/dcs-homepag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unfoldingWord/dcs-local">
            <text:p>unfoldingWord/dcs-loca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unfoldingWord-box3/dcs-login">
            <text:p>unfoldingWord-box3/dcs-login</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
            <text:p>unfoldingWord/dcs-package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
            <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dcs-js">
            <text:p>unfoldingWord/dcs-packages/dcs-j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7 downloads in the last year) and no detected local consumers.">
            <text:p>Package has low but nonzero npm usage (607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dcs-js-example">
            <text:p>unfoldingWord/dcs-packages/dcs-js-exampl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dcs-ts">
            <text:p>unfoldingWord/dcs-packages/dcs-t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unfoldingWord/dcs-packages/vite-project">
            <text:p>unfoldingWord/dcs-packages/vite-projec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unfoldingWord-dev/dcs-profile-blank">
            <text:p>unfoldingWord-dev/dcs-profile-blank</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unfoldingWord-dev/dcs-profile-unfoldingword">
            <text:p>unfoldingWord-dev/dcs-profile-unfoldingword</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unfoldingWord/dcs-templates">
            <text:p>unfoldingWord/dcs-template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unfoldingWord-box3/dcs-vanilla">
            <text:p>unfoldingWord-box3/dcs-vanilla</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unfoldingWord/door43-catalog-job-handler">
            <text:p>unfoldingWord/door43-catalog-job-ha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unfoldingWord/door43-job-handler">
            <text:p>unfoldingWord/door43-job-ha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unfoldingWord/door43-preview-actions">
            <text:p>unfoldingWord/door43-preview-action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unfoldingWord/door43-preview-app">
            <text:p>unfoldingWord/door43-preview-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unfoldingWord-box3/door43-preview-rcl">
            <text:p>unfoldingWord-box3/door43-preview-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unfoldingWord/door43-preview-renderers">
            <text:p>unfoldingWord/door43-preview-render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unfoldingWord/door43.org">
            <text:p>unfoldingWord/door43.org</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unfoldingWord/gateway-admin">
            <text:p>unfoldingWord/gateway-admin</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unfoldingWord/gateway-edit">
            <text:p>unfoldingWord/gateway-edi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unfoldingWord-box3/gateway-edit-POC">
            <text:p>unfoldingWord-box3/gateway-edit-POC</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unfoldingWord/gateway-translate">
            <text:p>unfoldingWord/gateway-translat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unfoldingWord-box3/graphql-catalog-next">
            <text:p>unfoldingWord-box3/graphql-catalog-nex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unfoldingWord-box3/hello-dcs-react-component-library">
            <text:p>unfoldingWord-box3/hello-dcs-react-component-librar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unfoldingWord/Katalon-gatewayEdit-Elsy">
            <text:p>unfoldingWord/Katalon-gatewayEdit-Els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unfoldingWord/Katalon-gatewayEdit-Koz">
            <text:p>unfoldingWord/Katalon-gatewayEdit-Koz</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unfoldingWord/obs-app">
            <text:p>unfoldingWord/obs-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unfoldingWord-box3/org-language-resource-hook">
            <text:p>unfoldingWord-box3/org-language-resource-hook</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unfoldingWord-box3/proskomma-scripture-resources-rcl">
            <text:p>unfoldingWord-box3/proskomma-scripture-resources-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unfoldingWord-dev/python-resource-container">
            <text:p>unfoldingWord-dev/python-resource-contain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unfoldingWord-dev/Resource-Container">
            <text:p>unfoldingWord-dev/Resource-Contain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unfoldingWord-box3/resource-container-rcl">
            <text:p>unfoldingWord-box3/resource-container-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unfoldingWord-box3/scripture-as-graph">
            <text:p>unfoldingWord-box3/scripture-as-graph</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unfoldingWord-dev/ScripturePane">
            <text:p>unfoldingWord-dev/ScripturePan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unfoldingWord/tc-create-app">
            <text:p>unfoldingWord/tc-create-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4 downloads in the last year) and no detected local consumers.">
            <text:p>Package has low but nonzero npm usage (74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adapter-indexeddb">
            <text:p>unfoldingWord/tc-study/@bt-synergy/catalog-adapter-indexeddb</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adapter-memory">
            <text:p>unfoldingWord/tc-study/@bt-synergy/catalog-adapter-memor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adapter-sqlite">
            <text:p>unfoldingWord/tc-study/@bt-synergy/catalog-adapter-sqlit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cli">
            <text:p>unfoldingWord/tc-study/@bt-synergy/catalog-cli</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catalog-manager">
            <text:p>unfoldingWord/tc-study/@bt-synergy/catalog-manag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door43-api">
            <text:p>unfoldingWord/tc-study/@bt-synergy/door43-api</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actions">
            <text:p>unfoldingWord/tc-study/@bt-synergy/resource-action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adapters">
            <text:p>unfoldingWord/tc-study/@bt-synergy/resource-adapt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bundler">
            <text:p>unfoldingWord/tc-study/@bt-synergy/resource-bu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cache">
            <text:p>unfoldingWord/tc-study/@bt-synergy/resource-cach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catalog">
            <text:p>unfoldingWord/tc-study/@bt-synergy/resource-catalog</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cli">
            <text:p>unfoldingWord/tc-study/@bt-synergy/resource-cli</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package-builder">
            <text:p>unfoldingWord/tc-study/@bt-synergy/resource-package-buil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panels">
            <text:p>unfoldingWord/tc-study/@bt-synergy/resource-panel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parsers">
            <text:p>unfoldingWord/tc-study/@bt-synergy/resource-pars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selection">
            <text:p>unfoldingWord/tc-study/@bt-synergy/resource-selection</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signals">
            <text:p>unfoldingWord/tc-study/@bt-synergy/resource-signal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resource-types">
            <text:p>unfoldingWord/tc-study/@bt-synergy/resource-type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cripture-loader">
            <text:p>unfoldingWord/tc-study/@bt-synergy/scripture-loa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synergy/unified-catalog-store">
            <text:p>unfoldingWord/tc-study/@bt-synergy/unified-catalog-stor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bt-toolkit/resource-downloader">
            <text:p>unfoldingWord/tc-study/@bt-toolkit/resource-downloa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unfoldingWord/tc-study/resource-panels-spike">
            <text:p>unfoldingWord/tc-study/resource-panels-spik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unfoldingWord-dev/tn_add_scripture_links">
            <text:p>unfoldingWord-dev/tn_add_scripture_link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unfoldingWord/translationCore">
            <text:p>unfoldingWord/translationCor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unfoldingWord-dev/ts-android">
            <text:p>unfoldingWord-dev/ts-android</text:p>
          </table:table-cell>
          <table:table-cell office:value-type="string" office:string-value="3-Manual review">
            <text:p>3-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unfoldingWord-dev/ts-desktop">
            <text:p>unfoldingWord-dev/ts-desktop</text:p>
          </table:table-cell>
          <table:table-cell office:value-type="string" office:string-value="3-Manual review">
            <text:p>3-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unfoldingWord-dev/ts-requirements">
            <text:p>unfoldingWord-dev/ts-requirements</text:p>
          </table:table-cell>
          <table:table-cell office:value-type="string" office:string-value="3-Manual review">
            <text:p>3-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unfoldingWord/tx-dev-dcs">
            <text:p>unfoldingWord/tx-dev-d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unfoldingWord-dev/tx-dev-door43">
            <text:p>unfoldingWord-dev/tx-dev-door43</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unfoldingWord-dev/tx-door43">
            <text:p>unfoldingWord-dev/tx-door43</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unfoldingWord/tx-enqueue-job">
            <text:p>unfoldingWord/tx-enqueue-job</text:p>
          </table:table-cell>
          <table:table-cell office:value-type="string" office:string-value="3-Manual review">
            <text:p>3-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unfoldingWord/tx-job-handler">
            <text:p>unfoldingWord/tx-job-ha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unfoldingWord-dev/uw-android">
            <text:p>unfoldingWord-dev/uw-android</text:p>
          </table:table-cell>
          <table:table-cell office:value-type="string" office:string-value="3-Manual review">
            <text:p>3-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unfoldingWord/uw-website-resource-version-updater">
            <text:p>unfoldingWord/uw-website-resource-version-updat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unfoldingWord/.github">
            <text:p>unfoldingWord/.githu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unfoldingWord-dev/android-event-buffer">
            <text:p>unfoldingWord-dev/android-event-buff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unfoldingWord-dev/android-foreground">
            <text:p>unfoldingWord-dev/android-foregroun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unfoldingWord-dev/android-gogs-client">
            <text:p>unfoldingWord-dev/android-gogs-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unfoldingWord-dev/android-http">
            <text:p>unfoldingWord-dev/android-htt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unfoldingWord-dev/android-logger">
            <text:p>unfoldingWord-dev/android-logg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unfoldingWord-dev/android-task-manager">
            <text:p>unfoldingWord-dev/android-task-manag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unfoldingWord-dev/api-index">
            <text:p>unfoldingWord-dev/api-index</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unfoldingWord/blank-project-template">
            <text:p>unfoldingWord/blank-project-templat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book-package-app">
            <text:p>book-package-app</text:p>
          </table:table-cell>
          <table:table-cell office:value-type="string" office:string-value="False">
            <text:p>False</text:p>
          </table:table-cell>
          <table:table-cell office:value-type="string" office:string-value="114">
            <text:p>114</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unfoldingWord/book-package-app">
            <text:p>unfoldingWord/book-package-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4 downloads in the last year) and no detected local consumers.">
            <text:p>Package has low but nonzero npm usage (114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unfoldingWord/Brown-Driver-Briggs-Enhanced">
            <text:p>unfoldingWord/Brown-Driver-Briggs-Enhance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unfoldingWord-box3/chamilo2obsidian">
            <text:p>unfoldingWord-box3/chamilo2obsidian</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unfoldingWord-box3/checking-app-theia">
            <text:p>unfoldingWord-box3/checking-app-thei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unfoldingWord/claude_security_sentinel">
            <text:p>unfoldingWord/claude_security_sentine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unfoldingWord/cloudfront_logprocessor">
            <text:p>unfoldingWord/cloudfront_logprocesso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09:29:35Z">
            <text:p>2026-06-03T09:29:35Z</text:p>
          </table:table-cell>
          <table:table-cell office:value-type="string" office:string-value="2026-06-03T09:29:29Z">
            <text:p>2026-06-03T09:2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03T09:29:39Z">
            <text:p>2026-06-03T09:29:39Z</text:p>
          </table:table-cell>
          <table:table-cell office:value-type="string" office:string-value="unfoldingWord/cyber-security-report">
            <text:p>unfoldingWord/cyber-security-re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unfoldingWord/data_tracking_import">
            <text:p>unfoldingWord/data_tracking_im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unfoldingWord/data_tracking_wrangler">
            <text:p>unfoldingWord/data_tracking_wrangl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unfoldingWord/dbbackupr2">
            <text:p>unfoldingWord/dbbackupr2</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unfoldingWord-dev/dokuwiki-obs-comparer">
            <text:p>unfoldingWord-dev/dokuwiki-obs-compar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unfoldingWord-dev/dokuwiki-plugin-obs">
            <text:p>unfoldingWord-dev/dokuwiki-plugin-ob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unfoldingWord-dev/dokuwiki-plugin-obs-audio-upload">
            <text:p>unfoldingWord-dev/dokuwiki-plugin-obs-audio-uploa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unfoldingWord-dev/dokuwiki-plugin-obs-review">
            <text:p>unfoldingWord-dev/dokuwiki-plugin-obs-review</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unfoldingWord-dev/dokuwiki-plugin-register">
            <text:p>unfoldingWord-dev/dokuwiki-plugin-regist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unfoldingWord-dev/dokuwiki-plugin-shared">
            <text:p>unfoldingWord-dev/dokuwiki-plugin-share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unfoldingWord-dev/dokuwiki-to-rc">
            <text:p>unfoldingWord-dev/dokuwiki-to-r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unfoldingWord-dev/dokuwiki-usfm-import">
            <text:p>unfoldingWord-dev/dokuwiki-usfm-im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unfoldingWord/download-link-tracker">
            <text:p>unfoldingWord/download-link-track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unfoldingWord/dw_redirects">
            <text:p>unfoldingWord/dw_redirec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unfoldingWord/en_obs_tf">
            <text:p>unfoldingWord/en_obs_tf</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unfoldingWord-dev/ExampleCheckingApp-tC">
            <text:p>unfoldingWord-dev/ExampleCheckingApp-t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unfoldingWord-dev/exports">
            <text:p>unfoldingWord-dev/expor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unfoldingWord/fia-kb">
            <text:p>unfoldingWord/fia-k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unfoldingWord/fred-mcp">
            <text:p>unfoldingWord/fred-mc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unfoldingWord/fred-zulip-bot">
            <text:p>unfoldingWord/fred-zulip-bo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unfoldingWord-box3/gl-database-visualizations">
            <text:p>unfoldingWord-box3/gl-database-visualization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unfoldingWord/gl_database">
            <text:p>unfoldingWord/gl_databas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unfoldingWord/gl_database_code">
            <text:p>unfoldingWord/gl_database_cod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unfoldingWord-dev/gogs-custom">
            <text:p>unfoldingWord-dev/gogs-custom</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unfoldingWord-dev/gogs_auto_scaling">
            <text:p>unfoldingWord-dev/gogs_auto_scaling</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unfoldingWord-box3/greek-apparatus-app">
            <text:p>unfoldingWord-box3/greek-apparatus-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unfoldingWord/GWE-Tests">
            <text:p>unfoldingWord/GWE-Tes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unfoldingWord-box3/hello-world-react-component-library">
            <text:p>unfoldingWord-box3/hello-world-react-component-librar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unfoldingWord-dev/hubot">
            <text:p>unfoldingWord-dev/hubo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unfoldingWord/inventoryst">
            <text:p>unfoldingWord/inventorys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unfoldingWord/Katalon_MD-TSV_Converter_Koz">
            <text:p>unfoldingWord/Katalon_MD-TSV_Converter_Koz</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unfoldingWord/Katalon_tC_Create">
            <text:p>unfoldingWord/Katalon_tC_Creat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unfoldingWord/keybase_git_backup">
            <text:p>unfoldingWord/keybase_git_backu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unfoldingWord/kr1-data-scripts">
            <text:p>unfoldingWord/kr1-data-scrip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unfoldingWord/lambda-tw-strongs-list-generator">
            <text:p>unfoldingWord/lambda-tw-strongs-list-generato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unfoldingWord/language-search">
            <text:p>unfoldingWord/language-search</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unfoldingWord-box3/lexicon-poc">
            <text:p>unfoldingWord-box3/lexicon-po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unfoldingWord/loki-exporter">
            <text:p>unfoldingWord/loki-export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unfoldingWord-dev/media">
            <text:p>unfoldingWord-dev/medi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unfoldingWord/metrics">
            <text:p>unfoldingWord/metric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unfoldingWord-box3/mini-sb-handler">
            <text:p>unfoldingWord-box3/mini-sb-handl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unfoldingWord/minitracker">
            <text:p>unfoldingWord/minitrack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unfoldingWord-box3/NotionImport">
            <text:p>unfoldingWord-box3/NotionIm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unfoldingWord-dev/obs-comparer">
            <text:p>unfoldingWord-dev/obs-compar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unfoldingWord-dev/obs-data">
            <text:p>unfoldingWord-dev/obs-dat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unfoldingWord-dev/obs-reader">
            <text:p>unfoldingWord-dev/obs-read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unfoldingWord/obs-web">
            <text:p>unfoldingWord/obs-we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unfoldingWord-dev/obs_tools">
            <text:p>unfoldingWord-dev/obs_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unfoldingWord/odd-claude-plugin">
            <text:p>unfoldingWord/odd-claude-plugin</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unfoldingWord-dev/old-tx-manager-lambda">
            <text:p>unfoldingWord-dev/old-tx-manager-lambd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unfoldingWord-dev/pages">
            <text:p>unfoldingWord-dev/page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unfoldingWord-box3/pdf-splitter">
            <text:p>unfoldingWord-box3/pdf-splitt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unfoldingWord-dev/pi-collab">
            <text:p>unfoldingWord-dev/pi-colla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unfoldingWord-dev/PublishingBlockchain">
            <text:p>unfoldingWord-dev/PublishingBlockchain</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unfoldingWord-dev/python-aws-tools">
            <text:p>unfoldingWord-dev/python-aws-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unfoldingWord-dev/python-gitea-client">
            <text:p>unfoldingWord-dev/python-gitea-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unfoldingWord/rc-schema">
            <text:p>unfoldingWord/rc-schem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unfoldingWord-dev/s3_list-zip">
            <text:p>unfoldingWord-dev/s3_list-zi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unfoldingWord-dev/sigadd">
            <text:p>unfoldingWord-dev/sigad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unfoldingWord-box3/SIL_API_loader">
            <text:p>unfoldingWord-box3/SIL_API_load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unfoldingWord-box3/Simplify">
            <text:p>unfoldingWord-box3/Simplif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unfoldingWord-dev/slack-lambda">
            <text:p>unfoldingWord-dev/slack-lambd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unfoldingWord-box3/SpeechToText">
            <text:p>unfoldingWord-box3/SpeechToTex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unfoldingWord-box3/SplitAudioByText">
            <text:p>unfoldingWord-box3/SplitAudioByTex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unfoldingWord/tc-helps-skills">
            <text:p>unfoldingWord/tc-helps-skil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unfoldingWord/tCCreateQA-Daniel">
            <text:p>unfoldingWord/tCCreateQA-Danie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unfoldingWord/tcCreateQA-elsy">
            <text:p>unfoldingWord/tcCreateQA-els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unfoldingWord/td-legacy">
            <text:p>unfoldingWord/td-legac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unfoldingWord-box3/td-neo4j-poc">
            <text:p>unfoldingWord-box3/td-neo4j-po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unfoldingWord-box3/theia-examples">
            <text:p>unfoldingWord-box3/theia-example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unfoldingWord-dev/tools">
            <text:p>unfoldingWord-dev/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unfoldingWord-dev/tr-requirements">
            <text:p>unfoldingWord-dev/tr-requiremen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unfoldingWord-box3/translation-helps-print-preview">
            <text:p>unfoldingWord-box3/translation-helps-print-preview</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unfoldingWord-dev/translationNotes">
            <text:p>unfoldingWord-dev/translationNote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unfoldingWord-dev/translationRecorder-Info">
            <text:p>unfoldingWord-dev/translationRecorder-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unfoldingWord-dev/translationStudio-Info">
            <text:p>unfoldingWord-dev/translationStudio-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unfoldingWord-dev/translationWords-tC">
            <text:p>unfoldingWord-dev/translationWords-t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unfoldingWord-dev/ts-exports">
            <text:p>unfoldingWord-dev/ts-expor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unfoldingWord-dev/ts-stats">
            <text:p>unfoldingWord-dev/ts-sta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unfoldingWord-dev/tw_consistency">
            <text:p>unfoldingWord-dev/tw_consistenc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unfoldingWord-box3/twin-ahk">
            <text:p>unfoldingWord-box3/twin-ahk</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unfoldingWord-dev/tx">
            <text:p>unfoldingWord-dev/tx</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unfoldingWord/tx-dev">
            <text:p>unfoldingWord/tx-dev</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unfoldingWord-dev/tx-html2pdf">
            <text:p>unfoldingWord-dev/tx-html2pdf</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unfoldingWord-dev/tx-md2html">
            <text:p>unfoldingWord-dev/tx-md2htm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unfoldingWord-box3/tx-redis-poc">
            <text:p>unfoldingWord-box3/tx-redis-po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unfoldingWord-dev/tx-sample-client">
            <text:p>unfoldingWord-dev/tx-sample-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unfoldingWord-dev/tx-shared-tools">
            <text:p>unfoldingWord-dev/tx-shared-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unfoldingWord-dev/tx-usfm2html">
            <text:p>unfoldingWord-dev/tx-usfm2htm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unfoldingWord-dev/tx-webhook">
            <text:p>unfoldingWord-dev/tx-webhook</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unfoldingWord-dev/tx-webhook-client">
            <text:p>unfoldingWord-dev/tx-webhook-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unfoldingWord-dev/ugnt-app">
            <text:p>unfoldingWord-dev/ugnt-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unfoldingWord/unfoldingWord">
            <text:p>unfoldingWord/unfoldingWor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unfoldingWord-dev/Unlocked-Bible-Commentary-Info">
            <text:p>unfoldingWord-dev/Unlocked-Bible-Commentary-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unfoldingWord-dev/Unlocked-Bible-Notes-Info">
            <text:p>unfoldingWord-dev/Unlocked-Bible-Notes-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unfoldingWord-dev/Unlocked-Grammar-Info">
            <text:p>unfoldingWord-dev/Unlocked-Grammar-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unfoldingWord-dev/Unlocked-Greek-Lexicon-Info">
            <text:p>unfoldingWord-dev/Unlocked-Greek-Lexicon-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unfoldingWord-dev/USFM-Utils">
            <text:p>unfoldingWord-dev/USFM-Uti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unfoldingWord-dev/uw-api">
            <text:p>unfoldingWord-dev/uw-api</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unfoldingWord-box3/uw-data-tools">
            <text:p>unfoldingWord-box3/uw-data-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unfoldingWord-dev/uw-ios">
            <text:p>unfoldingWord-dev/uw-io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unfoldingWord-dev/uW-mobile-app">
            <text:p>unfoldingWord-dev/uW-mobile-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unfoldingWord-dev/uw-pdf-conversion-tools">
            <text:p>unfoldingWord-dev/uw-pdf-conversion-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unfoldingWord-dev/uw-publisher">
            <text:p>unfoldingWord-dev/uw-publish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unfoldingWord/uW-Tools-Collab">
            <text:p>unfoldingWord/uW-Tools-Colla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unfoldingWord-dev/uw_tools">
            <text:p>unfoldingWord-dev/uw_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unfoldingWord-box3/viewer-app-cordova">
            <text:p>unfoldingWord-box3/viewer-app-cordov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25">
            <text:p>225</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unfoldingWord-box3/wordmap-react-toolkit">
            <text:p>unfoldingWord-box3/wordmap-react-toolki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25 downloads in the last year) and no detected local consumers.">
            <text:p>Package has low but nonzero npm usage (22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unfoldingWord-box3/wordmap-seed-app">
            <text:p>unfoldingWord-box3/wordmap-seed-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6">
            <text:p>116</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unfoldingWord/world-language-map-rcl">
            <text:p>unfoldingWord/world-language-map-rc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6 downloads in the last year) and no detected local consumers.">
            <text:p>Package has low but nonzero npm usage (116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unfoldingWord/avd-ar">
            <text:p>unfoldingWord/avd-a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unfoldingWord-dev/Bootstrap43">
            <text:p>unfoldingWord-dev/Bootstrap43</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unfoldingWord-dev/design">
            <text:p>unfoldingWord-dev/desig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unfoldingWord/discourse-mermaid">
            <text:p>unfoldingWord/discourse-mermai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unfoldingWord-dev/dokuwiki-slack-invite">
            <text:p>unfoldingWord-dev/dokuwiki-slack-inv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unfoldingWord-dev/Door43">
            <text:p>unfoldingWord-dev/Door43</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unfoldingWord-dev/door43-acceptance-tests">
            <text:p>unfoldingWord-dev/door43-acceptance-test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unfoldingWord/door43-preview-server">
            <text:p>unfoldingWord/door43-preview-serv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unfoldingWord-dev/door43-project-pages">
            <text:p>unfoldingWord-dev/door43-project-page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unfoldingWord-box3/electron">
            <text:p>unfoldingWord-box3/electro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unfoldingWord-dev/etherpad-lite">
            <text:p>unfoldingWord-dev/etherpad-l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unfoldingWord-dev/example_tool">
            <text:p>unfoldingWord-dev/example_tool</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unfoldingWord-dev/md-exports">
            <text:p>unfoldingWord-dev/md-export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unfoldingWord/MediaWiki-USFMTag">
            <text:p>unfoldingWord/MediaWiki-USFMTag</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unfoldingWord-dev/Mobile-JWiki">
            <text:p>unfoldingWord-dev/Mobile-JWik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unfoldingWord-box3/MultiplatformFrameworks">
            <text:p>unfoldingWord-box3/MultiplatformFramework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unfoldingWord-dev/nagios_plugins">
            <text:p>unfoldingWord-dev/nagios_plugin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unfoldingWord-dev/node-dcs-api-client">
            <text:p>unfoldingWord-dev/node-dcs-api-client</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unfoldingWord/obs-am">
            <text:p>unfoldingWord/obs-am</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unfoldingWord-dev/OBS-Android">
            <text:p>unfoldingWord-dev/OBS-Androi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unfoldingWord/obs-bn">
            <text:p>unfoldingWord/obs-b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unfoldingWord/obs-ceb">
            <text:p>unfoldingWord/obs-ceb</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unfoldingWord-dev/obs-door43">
            <text:p>unfoldingWord-dev/obs-door43</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unfoldingWord/obs-en">
            <text:p>unfoldingWord/obs-e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unfoldingWord/obs-es">
            <text:p>unfoldingWord/obs-e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unfoldingWord/obs-es-419">
            <text:p>unfoldingWord/obs-es-419</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unfoldingWord/obs-fa">
            <text:p>unfoldingWord/obs-f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unfoldingWord/obs-fr">
            <text:p>unfoldingWord/obs-f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unfoldingWord/obs-gaj-x-ymnk">
            <text:p>unfoldingWord/obs-gaj-x-ymnk</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unfoldingWord/obs-gof">
            <text:p>unfoldingWord/obs-gof</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unfoldingWord/obs-gu">
            <text:p>unfoldingWord/obs-gu</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unfoldingWord/obs-ha">
            <text:p>unfoldingWord/obs-h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unfoldingWord/obs-hi">
            <text:p>unfoldingWord/obs-h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unfoldingWord/obs-hmr">
            <text:p>unfoldingWord/obs-hm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unfoldingWord/obs-hu">
            <text:p>unfoldingWord/obs-hu</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unfoldingWord-dev/OBS-iOS">
            <text:p>unfoldingWord-dev/OBS-iO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unfoldingWord/obs-lpx">
            <text:p>unfoldingWord/obs-lpx</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unfoldingWord-dev/OBS-Mobile">
            <text:p>unfoldingWord-dev/OBS-Mobil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unfoldingWord/obs-mr">
            <text:p>unfoldingWord/obs-m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unfoldingWord/obs-ne">
            <text:p>unfoldingWord/obs-n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unfoldingWord/obs-or">
            <text:p>unfoldingWord/obs-o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unfoldingWord/obs-pa">
            <text:p>unfoldingWord/obs-p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unfoldingWord/obs-pdf">
            <text:p>unfoldingWord/obs-pdf</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unfoldingWord/obs-pt-br">
            <text:p>unfoldingWord/obs-pt-b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unfoldingWord/obs-ru">
            <text:p>unfoldingWord/obs-ru</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unfoldingWord/obs-sgj">
            <text:p>unfoldingWord/obs-sgj</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unfoldingWord/obs-tdj">
            <text:p>unfoldingWord/obs-tdj</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unfoldingWord/obs-tl">
            <text:p>unfoldingWord/obs-tl</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unfoldingWord/obs-tpi">
            <text:p>unfoldingWord/obs-tp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unfoldingWord/obs-tr">
            <text:p>unfoldingWord/obs-t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unfoldingWord-dev/OBS-Translation-App">
            <text:p>unfoldingWord-dev/OBS-Translation-App</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unfoldingWord/obs-ur">
            <text:p>unfoldingWord/obs-u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unfoldingWord/obs-vi">
            <text:p>unfoldingWord/obs-v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unfoldingWord-dev/old-tx-manager">
            <text:p>unfoldingWord-dev/old-tx-manag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unfoldingWord/open-components-hackathon-website">
            <text:p>unfoldingWord/open-components-hackathon-webs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unfoldingWord/orthography-app-BE">
            <text:p>unfoldingWord/orthography-app-B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unfoldingWord/orthography-app-FE">
            <text:p>unfoldingWord/orthography-app-F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unfoldingWord-dev/proposed_changes_module">
            <text:p>unfoldingWord-dev/proposed_changes_modul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unfoldingWord-dev/pub.distantshores.org">
            <text:p>unfoldingWord-dev/pub.distantshores.org</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unfoldingWord-dev/ResourceChecker">
            <text:p>unfoldingWord-dev/ResourceCheck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unfoldingWord-dev/submachine">
            <text:p>unfoldingWord-dev/submachin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unfoldingWord-dev/tC_Resources">
            <text:p>unfoldingWord-dev/tC_Resource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unfoldingWord-box3/td">
            <text:p>unfoldingWord-box3/t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unfoldingWord-dev/TheCompassionateFatherApp">
            <text:p>unfoldingWord-dev/TheCompassionateFatherApp</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unfoldingWord-dev/translation_academy">
            <text:p>unfoldingWord-dev/translation_academy</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unfoldingWord-dev/translationCore-PoC">
            <text:p>unfoldingWord-dev/translationCore-PoC</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unfoldingWord-dev/translationDatabaseWeb">
            <text:p>unfoldingWord-dev/translationDatabaseWeb</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unfoldingWord-dev/translationdb-tools">
            <text:p>unfoldingWord-dev/translationdb-tool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unfoldingWord-dev/translationHelps">
            <text:p>unfoldingWord-dev/translationHelp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unfoldingWord-dev/translationKeyboard">
            <text:p>unfoldingWord-dev/translationKeyboar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unfoldingWord-dev/translationKeyboardWeb">
            <text:p>unfoldingWord-dev/translationKeyboardWeb</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unfoldingWord-dev/ts-server">
            <text:p>unfoldingWord-dev/ts-serv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unfoldingWord/ts-v2-catalog-backport">
            <text:p>unfoldingWord/ts-v2-catalog-backport</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unfoldingWord-dev/tx-manager">
            <text:p>unfoldingWord-dev/tx-manag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unfoldingWord-dev/tx-manager-lambda">
            <text:p>unfoldingWord-dev/tx-manager-lambd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unfoldingWord-dev/tx-simple-usfm2html">
            <text:p>unfoldingWord-dev/tx-simple-usfm2html</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unfoldingWord/udb-en">
            <text:p>unfoldingWord/udb-e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unfoldingWord/ulb-en">
            <text:p>unfoldingWord/ulb-e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unfoldingWord/ulb-pt-br">
            <text:p>unfoldingWord/ulb-pt-b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unfoldingWord/unfoldingWord.github.io-old">
            <text:p>unfoldingWord/unfoldingWord.github.io-ol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unfoldingWord/Unlocked-Greek-Lexicon">
            <text:p>unfoldingWord/Unlocked-Greek-Lexico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unfoldingWord/Unlocked-Greek-New-Testament">
            <text:p>unfoldingWord/Unlocked-Greek-New-Testament</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unfoldingWord-dev/uw-publish">
            <text:p>unfoldingWord-dev/uw-publish</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unfoldingWord-dev/uwadmin">
            <text:p>unfoldingWord-dev/uwadmi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unfoldingWord-dev/VerseCheck">
            <text:p>unfoldingWord-dev/VerseCheck</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unfoldingWord/website">
            <text:p>unfoldingWord/webs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unfoldingWord/budget-report">
            <text:p>unfoldingWord/budget-report</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7T17:00:21Z">
            <text:p>2026-05-07T17:00: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5-07T17:00:32Z">
            <text:p>2026-05-07T17:00:32Z</text:p>
          </table:table-cell>
          <table:table-cell office:value-type="string" office:string-value="unfoldingWord/claude-skills">
            <text:p>unfoldingWord/claude-skill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unfoldingWord-dev/dw-zipodt">
            <text:p>unfoldingWord-dev/dw-zipodt</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unfoldingWord/engineering-practices">
            <text:p>unfoldingWord/engineering-practice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unfoldingWord/gl_database_private">
            <text:p>unfoldingWord/gl_database_privat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unfoldingWord/node-usfm2html-cli">
            <text:p>unfoldingWord/node-usfm2html-cli</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unfoldingWord/oce-print-preview-tools">
            <text:p>unfoldingWord/oce-print-preview-tool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unfoldingWord-box3/populate-gl-quote-rcl">
            <text:p>unfoldingWord-box3/populate-gl-quote-rcl</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unfoldingWord/salesforce-aplos-integration">
            <text:p>unfoldingWord/salesforce-aplos-integration</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unfoldingWord/salesforce-core">
            <text:p>unfoldingWord/salesforce-cor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unfoldingWord/salesforce-donation-page-package-core">
            <text:p>unfoldingWord/salesforce-donation-page-package-cor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unfoldingWord/salesforce-donation-page-package-customizations">
            <text:p>unfoldingWord/salesforce-donation-page-package-customization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unfoldingWord/shiny-app-outputs-report">
            <text:p>unfoldingWord/shiny-app-outputs-report</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unfoldingWord/tc-create-2-poc">
            <text:p>unfoldingWord/tc-create-2-poc</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unfoldingWord/tc-website">
            <text:p>unfoldingWord/tc-websit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unfoldingWord/terraform">
            <text:p>unfoldingWord/terraform</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unfoldingWord/tn-tsv7-to-tsv8">
            <text:p>unfoldingWord/tn-tsv7-to-tsv8</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unfoldingWord/ufw_redirects">
            <text:p>unfoldingWord/ufw_redirect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unfoldingWord-dev/uW-Bible-Maps">
            <text:p>unfoldingWord-dev/uW-Bible-Map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unfoldingWord/uw-dev-skills">
            <text:p>unfoldingWord/uw-dev-skill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unfoldingWord/uw-zulip-mcp">
            <text:p>unfoldingWord/uw-zulip-mcp</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unfoldingWord/zulip-files">
            <text:p>unfoldingWord/zulip-file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table:database-ranges>
        <table:database-range table:name="__Anonymous_Sheet_DB__0" table:target-range-address="Repositories.A1:Repositories.AA546">
          <table:sort>
            <table:sort-by table:field-number="6"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7">00/00/0000</text:date>, <text:time style:data-style-name="N2" text:time-value="11:02:57.8815339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7T11:03:30.785588391</dc:date>
    <meta:editing-duration>PT55M35S</meta:editing-duration>
    <meta:editing-cycles>11</meta:editing-cycles>
    <meta:document-statistic meta:table-count="1" meta:cell-count="16380" meta:object-count="0"/>
  </office:meta>
</office:document-meta>
</file>