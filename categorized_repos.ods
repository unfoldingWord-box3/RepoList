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fo="urn:oasis:names:tc:opendocument:xmlns:xsl-fo-compatible:1.0" xmlns:form="urn:oasis:names:tc:opendocument:xmlns:form:1.0" xmlns:office="urn:oasis:names:tc:opendocument:xmlns:office:1.0" xmlns:style="urn:oasis:names:tc:opendocument:xmlns:style:1.0" xmlns:svg="urn:oasis:names:tc:opendocument:xmlns:svg-compatible:1.0" xmlns:table="urn:oasis:names:tc:opendocument:xmlns:table:1.0" xmlns:text="urn:oasis:names:tc:opendocument:xmlns:text: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3.5346in"/>
    </style:style>
    <style:style style:name="co3" style:family="table-column">
      <style:table-column-properties fo:break-before="auto" style:column-width="1.5508in"/>
    </style:style>
    <style:style style:name="co4" style:family="table-column">
      <style:table-column-properties fo:break-before="auto" style:column-width="0.998in"/>
    </style:style>
    <style:style style:name="co5" style:family="table-column">
      <style:table-column-properties fo:break-before="auto" style:column-width="0.7811in"/>
    </style:style>
    <style:style style:name="co6" style:family="table-column">
      <style:table-column-properties fo:break-before="auto" style:column-width="1.8516in"/>
    </style:style>
    <style:style style:name="co7" style:family="table-column">
      <style:table-column-properties fo:break-before="auto" style:column-width="1.6953in"/>
    </style:style>
    <style:style style:name="co8" style:family="table-column">
      <style:table-column-properties fo:break-before="auto" style:column-width="1.3709in"/>
    </style:style>
    <style:style style:name="co9" style:family="table-column">
      <style:table-column-properties fo:break-before="auto" style:column-width="2.8016in"/>
    </style:style>
    <style:style style:name="co10" style:family="table-column">
      <style:table-column-properties fo:break-before="auto" style:column-width="1.322in"/>
    </style:style>
    <style:style style:name="co11" style:family="table-column">
      <style:table-column-properties fo:break-before="auto" style:column-width="1.8992in"/>
    </style:style>
    <style:style style:name="co12" style:family="table-column">
      <style:table-column-properties fo:break-before="auto" style:column-width="1.4783in"/>
    </style:style>
    <style:style style:name="co13" style:family="table-column">
      <style:table-column-properties fo:break-before="auto" style:column-width="2.3209in"/>
    </style:style>
    <style:style style:name="co14" style:family="table-column">
      <style:table-column-properties fo:break-before="auto" style:column-width="2.3563in"/>
    </style:style>
    <style:style style:name="co15" style:family="table-column">
      <style:table-column-properties fo:break-before="auto" style:column-width="1.5634in"/>
    </style:style>
    <style:style style:name="co16" style:family="table-column">
      <style:table-column-properties fo:break-before="auto" style:column-width="2.152in"/>
    </style:style>
    <style:style style:name="co17" style:family="table-column">
      <style:table-column-properties fo:break-before="auto" style:column-width="5.4228in"/>
    </style:style>
    <style:style style:name="co18" style:family="table-column">
      <style:table-column-properties fo:break-before="auto" style:column-width="1.4425in"/>
    </style:style>
    <style:style style:name="co19" style:family="table-column">
      <style:table-column-properties fo:break-before="auto" style:column-width="1.539in"/>
    </style:style>
    <style:style style:name="co20" style:family="table-column">
      <style:table-column-properties fo:break-before="auto" style:column-width="2.0681in"/>
    </style:style>
    <style:style style:name="co21" style:family="table-column">
      <style:table-column-properties fo:break-before="auto" style:column-width="1.7193in"/>
    </style:style>
    <style:style style:name="co22" style:family="table-column">
      <style:table-column-properties fo:break-before="auto" style:column-width="3.7154in"/>
    </style:style>
    <style:style style:name="co23" style:family="table-column">
      <style:table-column-properties fo:break-before="auto" style:column-width="6.7937in"/>
    </style:style>
    <style:style style:name="co24" style:family="table-column">
      <style:table-column-properties fo:break-before="auto" style:column-width="2.9575in"/>
    </style:style>
    <style:style style:name="co2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047in" fo:break-before="auto" style:use-optimal-row-height="true"/>
    </style:style>
    <style:style style:name="ro3" style:family="table-row">
      <style:table-row-properties style:row-height="0.7402in" fo:break-before="auto" style:use-optimal-row-height="true"/>
    </style:style>
    <style:style style:name="ro4" style:family="table-row">
      <style:table-row-properties style:row-height="0.3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default-cell-style-name="ce1"/>
        <table:table-column table:style-name="co8" table:number-columns-repeated="2" table:default-cell-style-name="ce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0" table:default-cell-style-name="Default"/>
        <table:table-column table:style-name="co22" table:default-cell-style-name="Default"/>
        <table:table-column table:style-name="co16" table:default-cell-style-name="Default"/>
        <table:table-column table:style-name="co23" table:default-cell-style-name="Default"/>
        <table:table-column table:style-name="co24" table:default-cell-style-name="Default"/>
        <table:table-column table:style-name="co25" table:default-cell-style-name="Default"/>
        <table:table-row>
          <table:table-cell office:value-type="string" office:string-value="Ask">
            <text:p>Ask</text:p>
          </table:table-cell>
          <table:table-cell office:value-type="string" office:string-value="Archive">
            <text:p>Archive</text:p>
          </table:table-cell>
          <table:table-cell office:value-type="string" office:string-value="Keep">
            <text:p>Keep</text:p>
          </table:table-cell>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git submodules">
            <text:p>git submodules</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cell office:value-type="string" office:string-value="is submodule of">
            <text:p>is submodule of</text:p>
          </table:table-cell>
          <table:table-cell office:value-type="string" office:string-value="repo full name">
            <text:p>repo full name</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dmin-app">
            <text:p>admi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
            <text:p>['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cell office:value-type="string" office:string-value="">
            <text:p/>
          </table:table-cell>
          <table:table-cell office:value-type="string" office:string-value="unfoldingWord-box3/admin-app">
            <text:p>unfoldingWord-box3/admi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wordmap-lexer', 'markdown-translatable', '@unfoldingword/eslint-config', 'bible-reference-range']">
            <text:p>['alignment-editor-rcl', 'bible-reference-rcl', 'gitea-react-toolkit', 'string-punctuation-tokenizer', 'wordmap-lexer', 'markdown-translatable', '@unfoldingword/eslint-config', 'bible-reference-range']</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cell office:value-type="string" office:string-value="">
            <text:p/>
          </table:table-cell>
          <table:table-cell office:value-type="string" office:string-value="unfoldingWord-box3/anchor-alignment-poc">
            <text:p>unfoldingWord-box3/anchor-alignment-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cell office:value-type="string" office:string-value="">
            <text:p/>
          </table:table-cell>
          <table:table-cell office:value-type="string" office:string-value="unfoldingWord-box3/audio-obs-navigator">
            <text:p>unfoldingWord-box3/audio-obs-navig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cell office:value-type="string" office:string-value="">
            <text:p/>
          </table:table-cell>
          <table:table-cell office:value-type="string" office:string-value="unfoldingWord-box3/audio-quiz">
            <text:p>unfoldingWord-box3/audio-quiz</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
            <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cell office:value-type="string" office:string-value="">
            <text:p/>
          </table:table-cell>
          <table:table-cell office:value-type="string" office:string-value="unfoldingWord-dev/Autographa">
            <text:p>unfoldingWord-dev/Autographa</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
            <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cell office:value-type="string" office:string-value="">
            <text:p/>
          </table:table-cell>
          <table:table-cell office:value-type="string" office:string-value="unfoldingWord/baruch">
            <text:p>unfoldingWord/baruc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cell office:value-type="string" office:string-value="">
            <text:p/>
          </table:table-cell>
          <table:table-cell office:value-type="string" office:string-value="unfoldingWord-box3/beta-bibel-demo">
            <text:p>unfoldingWord-box3/beta-bibel-demo</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bible-reference-range']">
            <text:p>['bible-reference-rcl', 'dcs-js', 'bible-reference-range']</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cell office:value-type="string" office:string-value="">
            <text:p/>
          </table:table-cell>
          <table:table-cell office:value-type="string" office:string-value="unfoldingWord-box3/bible-preview-app">
            <text:p>unfoldingWord-box3/bible-preview-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unfoldingword/eslint-config', 'bible-reference-range', 'string-punctuation-tokenizer', 'tc-ui-toolkit', 'usfm-js', 'uw-quote-helpers', 'word-aligner', 'wordmap-lexer', 'tsv-groupdata-parser', 'uw-bible-parser', 'uw-tsv-parser']">
            <text:p>['gitea-react-toolkit', 'markdown-translatable', 'scripture-resources-rcl', '@unfoldingword/eslint-config', 'bible-reference-range', 'string-punctuation-tokenizer', 'tc-ui-toolkit', 'usfm-js', 'uw-quote-helpers', 'word-aligner', 'wordmap-lexer', 'tsv-groupdata-parser', 'uw-bible-parser', 'uw-tsv-parser']</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cell office:value-type="string" office:string-value="">
            <text:p/>
          </table:table-cell>
          <table:table-cell office:value-type="string" office:string-value="unfoldingWord-box3/book-package-viewer-poc">
            <text:p>unfoldingWord-box3/book-package-view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2:45:39Z">
            <text:p>2026-06-16T22:45:39Z</text:p>
          </table:table-cell>
          <table:table-cell office:value-type="string" office:string-value="2026-06-16T22:45:39Z">
            <text:p>2026-06-16T22:45: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enjamin-test', 'deferredreward', 'stephenwunrow', 'claude', 'bp-assistant bot']">
            <text:p>['benjamin-test', 'deferredreward', 'stephenwunrow',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16T22:45:44Z">
            <text:p>2026-06-16T22:45:44Z</text:p>
          </table:table-cell>
          <table:table-cell office:value-type="string" office:string-value="">
            <text:p/>
          </table:table-cell>
          <table:table-cell office:value-type="string" office:string-value="unfoldingWord/bp-assistant">
            <text:p>unfoldingWord/bp-assistan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14:59:01Z">
            <text:p>2026-06-17T14:59:01Z</text:p>
          </table:table-cell>
          <table:table-cell office:value-type="string" office:string-value="2026-06-17T14:58:59Z">
            <text:p>2026-06-17T14:58: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17T15:03:26Z">
            <text:p>2026-06-17T15:03:26Z</text:p>
          </table:table-cell>
          <table:table-cell office:value-type="string" office:string-value="">
            <text:p/>
          </table:table-cell>
          <table:table-cell office:value-type="string" office:string-value="unfoldingWord/bp-assistant-skills">
            <text:p>unfoldingWord/bp-assistant-skil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browser-app">
            <text:p>unfoldingWord-box3/checking-app-theia/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CheckingApp">
            <text:p>unfoldingWord-box3/checking-app-theia/Checking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CheckingTool">
            <text:p>unfoldingWord-box3/checking-app-theia/Checking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startChecking">
            <text:p>unfoldingWord-box3/checking-app-theia/startChecking</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cell office:value-type="string" office:string-value="">
            <text:p/>
          </table:table-cell>
          <table:table-cell office:value-type="string" office:string-value="unfoldingWord-dev/checkingRubric_tool">
            <text:p>unfoldingWord-dev/checkingRubric_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cell office:value-type="string" office:string-value="">
            <text:p/>
          </table:table-cell>
          <table:table-cell office:value-type="string" office:string-value="unfoldingWord-box3/codex-sb-handler">
            <text:p>unfoldingWord-box3/codex-sb-handl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cell office:value-type="string" office:string-value="">
            <text:p/>
          </table:table-cell>
          <table:table-cell office:value-type="string" office:string-value="unfoldingWord-dev/comment_box">
            <text:p>unfoldingWord-dev/comment_box</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cell office:value-type="string" office:string-value="">
            <text:p/>
          </table:table-cell>
          <table:table-cell office:value-type="string" office:string-value="unfoldingWord-box3/desktop-app-liminal">
            <text:p>unfoldingWord-box3/desktop-app-limina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cell office:value-type="string" office:string-value="">
            <text:p/>
          </table:table-cell>
          <table:table-cell office:value-type="string" office:string-value="unfoldingWord/fia-mcp">
            <text:p>unfoldingWord/fia-mc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cell office:value-type="string" office:string-value="">
            <text:p/>
          </table:table-cell>
          <table:table-cell office:value-type="string" office:string-value="unfoldingWord/fred-zulip-bot-worker">
            <text:p>unfoldingWord/fred-zulip-bot-work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
            <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cell office:value-type="string" office:string-value="">
            <text:p/>
          </table:table-cell>
          <table:table-cell office:value-type="string" office:string-value="unfoldingWord-box3/gitea-offline-poc">
            <text:p>unfoldingWord-box3/gitea-offline-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cell office:value-type="string" office:string-value="">
            <text:p/>
          </table:table-cell>
          <table:table-cell office:value-type="string" office:string-value="unfoldingWord-box3/gutenberg-project">
            <text:p>unfoldingWord-box3/gutenberg-projec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cell office:value-type="string" office:string-value="">
            <text:p/>
          </table:table-cell>
          <table:table-cell office:value-type="string" office:string-value="unfoldingWord-box3/lang-as-graph">
            <text:p>unfoldingWord-box3/lang-as-grap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
            <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cell office:value-type="string" office:string-value="">
            <text:p/>
          </table:table-cell>
          <table:table-cell office:value-type="string" office:string-value="unfoldingWord-box3/md-converter-app">
            <text:p>unfoldingWord-box3/md-convert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
            <text:p>['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cell office:value-type="string" office:string-value="">
            <text:p/>
          </table:table-cell>
          <table:table-cell office:value-type="string" office:string-value="unfoldingWord-box3/next-js-template">
            <text:p>unfoldingWord-box3/next-js-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cell office:value-type="string" office:string-value="">
            <text:p/>
          </table:table-cell>
          <table:table-cell office:value-type="string" office:string-value="unfoldingWord/node-cli-add-gl-quotes-to-tsv-files">
            <text:p>unfoldingWord/node-cli-add-gl-quotes-to-tsv-fil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cell office:value-type="string" office:string-value="">
            <text:p/>
          </table:table-cell>
          <table:table-cell office:value-type="string" office:string-value="unfoldingWord-box3/obs-audio-navigation">
            <text:p>unfoldingWord-box3/obs-audio-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unfoldingword/eslint-config']">
            <text:p>['markdown-translatable', '@unfoldingword/eslint-config']</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cell office:value-type="string" office:string-value="">
            <text:p/>
          </table:table-cell>
          <table:table-cell office:value-type="string" office:string-value="unfoldingWord-box3/obs-pdf-poc">
            <text:p>unfoldingWord-box3/obs-pdf-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cell office:value-type="string" office:string-value="">
            <text:p/>
          </table:table-cell>
          <table:table-cell office:value-type="string" office:string-value="unfoldingWord-dev/obsidian-uw-rc-link-opener">
            <text:p>unfoldingWord-dev/obsidian-uw-rc-link-open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cell office:value-type="string" office:string-value="">
            <text:p/>
          </table:table-cell>
          <table:table-cell office:value-type="string" office:string-value="unfoldingWord/oce-oak-edit">
            <text:p>unfoldingWord/oce-oak-edi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uw-proskomma']">
            <text:p>['epitelete-html', 'uw-proskomma']</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cell office:value-type="string" office:string-value="">
            <text:p/>
          </table:table-cell>
          <table:table-cell office:value-type="string" office:string-value="unfoldingWord/oce-oak-render">
            <text:p>unfoldingWord/oce-oak-ren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cell office:value-type="string" office:string-value="">
            <text:p/>
          </table:table-cell>
          <table:table-cell office:value-type="string" office:string-value="unfoldingWord/open-languages">
            <text:p>unfoldingWord/open-languag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cell office:value-type="string" office:string-value="">
            <text:p/>
          </table:table-cell>
          <table:table-cell office:value-type="string" office:string-value="unfoldingWord-box3/passage-recorder-app">
            <text:p>unfoldingWord-box3/passage-record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string-punctuation-tokenizer', 'tc-source-content-updater', 'tsv-groupdata-parser', 'usfm-js', 'wordmap-lexer', 'bible-reference-range', 'gitea-react-toolkit', 'markdown-translatable', 'tc-ui-toolkit', 'uw-quote-helpers', 'word-aligner', '@unfoldingword/eslint-config', 'uw-tsv-parser', 'uw-bible-parser']">
            <text:p>['scripture-resources-rcl', 'string-punctuation-tokenizer', 'tc-source-content-updater', 'tsv-groupdata-parser', 'usfm-js', 'wordmap-lexer', 'bible-reference-range', 'gitea-react-toolkit', 'markdown-translatable', 'tc-ui-toolkit', 'uw-quote-helpers', 'word-aligner', '@unfoldingword/eslint-config', 'uw-tsv-parser', 'uw-bible-parser']</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cell office:value-type="string" office:string-value="">
            <text:p/>
          </table:table-cell>
          <table:table-cell office:value-type="string" office:string-value="unfoldingWord-box3/pdf-generator">
            <text:p>unfoldingWord-box3/pdf-gener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cell office:value-type="string" office:string-value="">
            <text:p/>
          </table:table-cell>
          <table:table-cell office:value-type="string" office:string-value="unfoldingWord-box3/RecordVoice">
            <text:p>unfoldingWord-box3/RecordVoic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cell office:value-type="string" office:string-value="">
            <text:p/>
          </table:table-cell>
          <table:table-cell office:value-type="string" office:string-value="unfoldingWord-box3/sample-react-component-library">
            <text:p>unfoldingWord-box3/sample-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unfoldingword/eslint-config']">
            <text:p>['simple-text-editor-rcl', '@unfoldingword/eslint-config']</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cell office:value-type="string" office:string-value="">
            <text:p/>
          </table:table-cell>
          <table:table-cell office:value-type="string" office:string-value="unfoldingWord-box3/simple-text-editor-app">
            <text:p>unfoldingWord-box3/simple-text-edito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cell office:value-type="string" office:string-value="">
            <text:p/>
          </table:table-cell>
          <table:table-cell office:value-type="string" office:string-value="unfoldingWord-dev/t_pane">
            <text:p>unfoldingWord-dev/t_pa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
            <text:p>unfoldingWord/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indexeddb">
            <text:p>unfoldingWord/tc-study/@bt-synergy/cache-adapter-indexedd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memory">
            <text:p>unfoldingWord/tc-study/@bt-synergy/cache-adapter-memo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sqlite">
            <text:p>unfoldingWord/tc-study/@bt-synergy/cache-adapter-sqli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linked-panels">
            <text:p>unfoldingWord/tc-study/@bt-synergy/linked-pane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mobile">
            <text:p>unfoldingWord/tc-study/@bt-synergy/mobil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navigation">
            <text:p>unfoldingWord/tc-study/@bt-synergy/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builder">
            <text:p>unfoldingWord/tc-study/@bt-synergy/package-buil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builder-engine">
            <text:p>unfoldingWord/tc-study/@bt-synergy/package-builder-engi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core">
            <text:p>unfoldingWord/tc-study/@bt-synergy/package-creator-c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state">
            <text:p>unfoldingWord/tc-study/@bt-synergy/package-creator-st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web">
            <text:p>unfoldingWord/tc-study/@bt-synergy/package-cre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workflow">
            <text:p>unfoldingWord/tc-study/@bt-synergy/package-creator-workflo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storage">
            <text:p>unfoldingWord/tc-study/@bt-synergy/package-storag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ssage-sets">
            <text:p>unfoldingWord/tc-study/@bt-synergy/passage-set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ssage-sets-cli">
            <text:p>unfoldingWord/tc-study/@bt-synergy/passage-sets-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hared">
            <text:p>unfoldingWord/tc-study/@bt-synergy/shared</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tudy-store">
            <text:p>unfoldingWord/tc-study/@bt-synergy/study-st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oc-generator-cli">
            <text:p>unfoldingWord/tc-study/@bt-synergy/toc-generator-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academy-loader">
            <text:p>unfoldingWord/tc-study/@bt-synergy/translation-academy-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notes-loader">
            <text:p>unfoldingWord/tc-study/@bt-synergy/translation-note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questions-loader">
            <text:p>unfoldingWord/tc-study/@bt-synergy/translation-question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words-links-loader">
            <text:p>unfoldingWord/tc-study/@bt-synergy/translation-words-link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words-loader">
            <text:p>unfoldingWord/tc-study/@bt-synergy/translation-word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i-controls">
            <text:p>unfoldingWord/tc-study/@bt-synergy/ui-contro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sfm-processor">
            <text:p>unfoldingWord/tc-study/@bt-synergy/usfm-process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ible-web">
            <text:p>unfoldingWord/tc-study/bible-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linked-panels-spike">
            <text:p>unfoldingWord/tc-study/linked-panels-spik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tc-study">
            <text:p>unfoldingWord/tc-study/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toc-generator-web">
            <text:p>unfoldingWord/tc-study/toc-gener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
            <text:p/>
          </table:table-cell>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1-15T22:01:51Z">
            <text:p>2022-11-15T22:01:51Z</text:p>
          </table:table-cell>
          <table:table-cell office:value-type="string" office:string-value="2022-11-15T22:01:47Z">
            <text:p>2022-11-15T22:0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2-11-15T23:06:04Z">
            <text:p>2022-11-15T23:06:04Z</text:p>
          </table:table-cell>
          <table:table-cell office:value-type="string" office:string-value="">
            <text:p/>
          </table:table-cell>
          <table:table-cell office:value-type="string" office:string-value="unfoldingWord/tc-tsv-converter">
            <text:p>unfoldingWord/tc-tsv-convert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browser-app">
            <text:p>unfoldingWord-box3/theia-examples/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electron-app">
            <text:p>unfoldingWord-box3/theia-examples/electro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empty">
            <text:p>unfoldingWord-box3/theia-examples/empt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cell office:value-type="string" office:string-value="">
            <text:p/>
          </table:table-cell>
          <table:table-cell office:value-type="string" office:string-value="unfoldingWord-dev/toolTemplate">
            <text:p>unfoldingWord-dev/tool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x">
            <text:p>x</text:p>
          </table:table-cell>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cell office:value-type="string" office:string-value="">
            <text:p/>
          </table:table-cell>
          <table:table-cell office:value-type="string" office:string-value="unfoldingWord-box3/tq-app">
            <text:p>unfoldingWord-box3/tq-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cell office:value-type="string" office:string-value="">
            <text:p/>
          </table:table-cell>
          <table:table-cell office:value-type="string" office:string-value="unfoldingWord-box3/translate-markdown-poc">
            <text:p>unfoldingWord-box3/translate-markdown-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cell office:value-type="string" office:string-value="">
            <text:p/>
          </table:table-cell>
          <table:table-cell office:value-type="string" office:string-value="unfoldingWord-box3/translation-helps">
            <text:p>unfoldingWord-box3/translation-help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
            <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cell office:value-type="string" office:string-value="">
            <text:p/>
          </table:table-cell>
          <table:table-cell office:value-type="string" office:string-value="unfoldingWord-box3/translation-manager-poc">
            <text:p>unfoldingWord-box3/translation-manag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cell office:value-type="string" office:string-value="">
            <text:p/>
          </table:table-cell>
          <table:table-cell office:value-type="string" office:string-value="unfoldingWord-box3/translation-process">
            <text:p>unfoldingWord-box3/translation-proces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unfoldingword/eslint-config']">
            <text:p>['markdown-translatable', '@unfoldingword/eslint-config']</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cell office:value-type="string" office:string-value="">
            <text:p/>
          </table:table-cell>
          <table:table-cell office:value-type="string" office:string-value="unfoldingWord-box3/tsv-editor">
            <text:p>unfoldingWord-box3/tsv-edi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string-punctuation-tokenizer', 'usfm-alignment-remover', 'wordmap-lexer']">
            <text:p>['tsv-quote-converters', 'twl-generator', 'usfm-js', 'string-punctuation-tokenizer', 'usfm-alignment-remover', 'wordmap-lexer']</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16T10:51:18Z">
            <text:p>2026-06-16T10:51:18Z</text:p>
          </table:table-cell>
          <table:table-cell office:value-type="string" office:string-value="">
            <text:p/>
          </table:table-cell>
          <table:table-cell office:value-type="string" office:string-value="unfoldingWord/tsv-twl-creation-app">
            <text:p>unfoldingWord/tsv-twl-creatio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string-punctuation-tokenizer', 'wordmap-lexer']">
            <text:p>['tsv-quote-converters', 'string-punctuation-tokenizer', 'wordmap-lexer']</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cell office:value-type="string" office:string-value="">
            <text:p/>
          </table:table-cell>
          <table:table-cell office:value-type="string" office:string-value="unfoldingWord/tsv7-tn-cleanup-app">
            <text:p>unfoldingWord/tsv7-tn-cleanup-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cell office:value-type="string" office:string-value="">
            <text:p/>
          </table:table-cell>
          <table:table-cell office:value-type="string" office:string-value="unfoldingWord/usfm-js-wrapper">
            <text:p>unfoldingWord/usfm-js-wrapp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cell office:value-type="string" office:string-value="">
            <text:p/>
          </table:table-cell>
          <table:table-cell office:value-type="string" office:string-value="unfoldingWord-box3/uw-metadata-react-component-library">
            <text:p>unfoldingWord-box3/uw-metadata-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cell office:value-type="string" office:string-value="">
            <text:p/>
          </table:table-cell>
          <table:table-cell office:value-type="string" office:string-value="unfoldingWord/uw-pdf-preview">
            <text:p>unfoldingWord/uw-pdf-previe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
            <text:p/>
          </table:table-cell>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4-01-08T23:29:10Z">
            <text:p>2024-01-08T23:29:10Z</text:p>
          </table:table-cell>
          <table:table-cell office:value-type="string" office:string-value="">
            <text:p/>
          </table:table-cell>
          <table:table-cell office:value-type="string" office:string-value="unfoldingWord-box3/word-aligner-extension">
            <text:p>unfoldingWord-box3/word-aligner-extens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
            <text:p/>
          </table:table-cell>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5-11-03T19:05:31Z">
            <text:p>2025-11-03T19:05:31Z</text:p>
          </table:table-cell>
          <table:table-cell office:value-type="string" office:string-value="">
            <text:p/>
          </table:table-cell>
          <table:table-cell office:value-type="string" office:string-value="unfoldingWord-box3/wordMAP-mt">
            <text:p>unfoldingWord-box3/wordMAP-m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usfm">
            <text:p>wordmap-usf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wordmap-lexer']">
            <text:p>['usfm-js', 'wordmap-lexer']</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2-11-13T22:45:42Z">
            <text:p>2022-11-13T22:45:42Z</text:p>
          </table:table-cell>
          <table:table-cell office:value-type="string" office:string-value="">
            <text:p/>
          </table:table-cell>
          <table:table-cell office:value-type="string" office:string-value="unfoldingWord/wordMAP-usfm">
            <text:p>unfoldingWord/wordMAP-usfm</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hub">
            <text:p>.githu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ithub">
            <text:p>https://github.com/unfoldingWord/.github</text:p>
          </table:table-cell>
          <table:table-cell office:value-type="string" office:string-value="2023-06-23T17:54:35Z">
            <text:p>2023-06-23T17:54:35Z</text:p>
          </table:table-cell>
          <table:table-cell office:value-type="string" office:string-value="">
            <text:p/>
          </table:table-cell>
          <table:table-cell office:value-type="string" office:string-value="unfoldingWord/.github">
            <text:p>unfoldingWord/.githu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door43-client">
            <text:p>android-door43-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https://github.com/unfoldingWord-dev/android-door43-client">
            <text:p>https://github.com/unfoldingWord-dev/android-door43-client</text:p>
          </table:table-cell>
          <table:table-cell office:value-type="string" office:string-value="2016-08-30T17:57:37Z">
            <text:p>2016-08-30T17:57:37Z</text:p>
          </table:table-cell>
          <table:table-cell office:value-type="string" office:string-value="">
            <text:p/>
          </table:table-cell>
          <table:table-cell office:value-type="string" office:string-value="unfoldingWord-dev/android-door43-client">
            <text:p>unfoldingWord-dev/android-door43-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event-buffer">
            <text:p>android-event-buff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event-buffer">
            <text:p>https://github.com/unfoldingWord-dev/android-event-buffer</text:p>
          </table:table-cell>
          <table:table-cell office:value-type="string" office:string-value="2017-01-05T01:22:50Z">
            <text:p>2017-01-05T01:22:50Z</text:p>
          </table:table-cell>
          <table:table-cell office:value-type="string" office:string-value="">
            <text:p/>
          </table:table-cell>
          <table:table-cell office:value-type="string" office:string-value="unfoldingWord-dev/android-event-buffer">
            <text:p>unfoldingWord-dev/android-event-buff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foreground">
            <text:p>android-foregroun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foreground">
            <text:p>https://github.com/unfoldingWord-dev/android-foreground</text:p>
          </table:table-cell>
          <table:table-cell office:value-type="string" office:string-value="2017-02-10T22:11:12Z">
            <text:p>2017-02-10T22:11:12Z</text:p>
          </table:table-cell>
          <table:table-cell office:value-type="string" office:string-value="">
            <text:p/>
          </table:table-cell>
          <table:table-cell office:value-type="string" office:string-value="unfoldingWord-dev/android-foreground">
            <text:p>unfoldingWord-dev/android-foregroun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gogs-client">
            <text:p>android-gogs-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
            <text:p>2</text:p>
          </table:table-cell>
          <table:table-cell office:value-type="string" office:string-value="0">
            <text:p>0</text:p>
          </table:table-cell>
          <table:table-cell office:value-type="string" office:string-value="https://github.com/unfoldingWord-dev/android-gogs-client">
            <text:p>https://github.com/unfoldingWord-dev/android-gogs-client</text:p>
          </table:table-cell>
          <table:table-cell office:value-type="string" office:string-value="2024-12-11T07:18:00Z">
            <text:p>2024-12-11T07:18:00Z</text:p>
          </table:table-cell>
          <table:table-cell office:value-type="string" office:string-value="">
            <text:p/>
          </table:table-cell>
          <table:table-cell office:value-type="string" office:string-value="unfoldingWord-dev/android-gogs-client">
            <text:p>unfoldingWord-dev/android-gogs-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http">
            <text:p>android-htt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http">
            <text:p>https://github.com/unfoldingWord-dev/android-http</text:p>
          </table:table-cell>
          <table:table-cell office:value-type="string" office:string-value="2019-04-26T20:08:03Z">
            <text:p>2019-04-26T20:08:03Z</text:p>
          </table:table-cell>
          <table:table-cell office:value-type="string" office:string-value="">
            <text:p/>
          </table:table-cell>
          <table:table-cell office:value-type="string" office:string-value="unfoldingWord-dev/android-http">
            <text:p>unfoldingWord-dev/android-htt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logger">
            <text:p>android-log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https://github.com/unfoldingWord-dev/android-logger">
            <text:p>https://github.com/unfoldingWord-dev/android-logger</text:p>
          </table:table-cell>
          <table:table-cell office:value-type="string" office:string-value="2016-02-27T02:27:42Z">
            <text:p>2016-02-27T02:27:42Z</text:p>
          </table:table-cell>
          <table:table-cell office:value-type="string" office:string-value="">
            <text:p/>
          </table:table-cell>
          <table:table-cell office:value-type="string" office:string-value="unfoldingWord-dev/android-logger">
            <text:p>unfoldingWord-dev/android-logg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resource-container">
            <text:p>android-resource-contain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resource-container">
            <text:p>https://github.com/unfoldingWord-dev/android-resource-container</text:p>
          </table:table-cell>
          <table:table-cell office:value-type="string" office:string-value="2017-03-07T23:44:50Z">
            <text:p>2017-03-07T23:44:50Z</text:p>
          </table:table-cell>
          <table:table-cell office:value-type="string" office:string-value="">
            <text:p/>
          </table:table-cell>
          <table:table-cell office:value-type="string" office:string-value="unfoldingWord-dev/android-resource-container">
            <text:p>unfoldingWord-dev/android-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task-manager">
            <text:p>android-task-mana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task-manager">
            <text:p>https://github.com/unfoldingWord-dev/android-task-manager</text:p>
          </table:table-cell>
          <table:table-cell office:value-type="string" office:string-value="2016-06-15T00:18:45Z">
            <text:p>2016-06-15T00:18:45Z</text:p>
          </table:table-cell>
          <table:table-cell office:value-type="string" office:string-value="">
            <text:p/>
          </table:table-cell>
          <table:table-cell office:value-type="string" office:string-value="unfoldingWord-dev/android-task-manager">
            <text:p>unfoldingWord-dev/android-task-manag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pi-index">
            <text:p>api-index</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api-index">
            <text:p>https://github.com/unfoldingWord-dev/api-index</text:p>
          </table:table-cell>
          <table:table-cell office:value-type="string" office:string-value="2023-10-06T14:53:06Z">
            <text:p>2023-10-06T14:53:06Z</text:p>
          </table:table-cell>
          <table:table-cell office:value-type="string" office:string-value="">
            <text:p/>
          </table:table-cell>
          <table:table-cell office:value-type="string" office:string-value="unfoldingWord-dev/api-index">
            <text:p>unfoldingWord-dev/api-index</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quifer-to-dcs">
            <text:p>aquifer-to-dcs</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aquifer-to-dcs">
            <text:p>https://github.com/unfoldingWord-box3/aquifer-to-dcs</text:p>
          </table:table-cell>
          <table:table-cell office:value-type="string" office:string-value="2025-03-29T15:49:03Z">
            <text:p>2025-03-29T15:49:03Z</text:p>
          </table:table-cell>
          <table:table-cell office:value-type="string" office:string-value="">
            <text:p/>
          </table:table-cell>
          <table:table-cell office:value-type="string" office:string-value="unfoldingWord-box3/aquifer-to-dcs">
            <text:p>unfoldingWord-box3/aquifer-to-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ank-project-template">
            <text:p>blank-project-templat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lank-project-template">
            <text:p>https://github.com/unfoldingWord/blank-project-template</text:p>
          </table:table-cell>
          <table:table-cell office:value-type="string" office:string-value="2022-08-20T15:23:15Z">
            <text:p>2022-08-20T15:23:15Z</text:p>
          </table:table-cell>
          <table:table-cell office:value-type="string" office:string-value="">
            <text:p/>
          </table:table-cell>
          <table:table-cell office:value-type="string" office:string-value="unfoldingWord/blank-project-template">
            <text:p>unfoldingWord/blank-project-templat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
            <text:p/>
          </table:table-cell>
          <table:table-cell office:value-type="string" office:string-value="book-package-app">
            <text:p>book-package-app</text:p>
          </table:table-cell>
          <table:table-cell office:value-type="string" office:string-value="False">
            <text:p>False</text:p>
          </table:table-cell>
          <table:table-cell office:value-type="string" office:string-value="115">
            <text:p>115</text:p>
          </table:table-cell>
          <table:table-cell office:value-type="string" office:string-value="2020-07-15T14:29:05.613Z">
            <text:p>2020-07-15T14:29:05.613Z</text:p>
          </table:table-cell>
          <table:table-cell office:value-type="string" office:string-value="">
            <text:p/>
          </table:table-cell>
          <table:table-cell office:value-type="string" office:string-value="['book-package-rcl', 'usfm-js', 'uw-word-count']">
            <text:p>['book-package-rcl', 'usfm-js', 'uw-word-count']</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5 downloads in the last year) and no detected local consumers.">
            <text:p>Package has low but nonzero npm usage (115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rown-Driver-Briggs-Enhanced">
            <text:p>Brown-Driver-Briggs-Enhanced</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rown-Driver-Briggs-Enhanced">
            <text:p>https://github.com/unfoldingWord/Brown-Driver-Briggs-Enhanced</text:p>
          </table:table-cell>
          <table:table-cell office:value-type="string" office:string-value="2026-05-17T13:44:58Z">
            <text:p>2026-05-17T13:44:58Z</text:p>
          </table:table-cell>
          <table:table-cell office:value-type="string" office:string-value="">
            <text:p/>
          </table:table-cell>
          <table:table-cell office:value-type="string" office:string-value="unfoldingWord/Brown-Driver-Briggs-Enhanced">
            <text:p>unfoldingWord/Brown-Driver-Briggs-Enhance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47">
            <text:p>47</text:p>
          </table:table-cell>
          <table:table-cell office:value-type="string" office:string-value="0">
            <text:p>0</text:p>
          </table:table-cell>
          <table:table-cell office:value-type="string" office:string-value="">
            <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cell office:value-type="string" office:string-value="">
            <text:p/>
          </table:table-cell>
          <table:table-cell office:value-type="string" office:string-value="unfoldingWord/bt-servant-admin-portal">
            <text:p>unfoldingWord/bt-servant-admin-port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engine">
            <text:p>bt-servant-engine</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35">
            <text:p>3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6">
            <text:p>6</text:p>
          </table:table-cell>
          <table:table-cell office:value-type="string" office:string-value="0">
            <text:p>0</text:p>
          </table:table-cell>
          <table:table-cell office:value-type="string" office:string-value="https://github.com/unfoldingWord/bt-servant-engine">
            <text:p>https://github.com/unfoldingWord/bt-servant-engine</text:p>
          </table:table-cell>
          <table:table-cell office:value-type="string" office:string-value="2026-01-16T14:04:21Z">
            <text:p>2026-01-16T14:04:21Z</text:p>
          </table:table-cell>
          <table:table-cell office:value-type="string" office:string-value="">
            <text:p/>
          </table:table-cell>
          <table:table-cell office:value-type="string" office:string-value="unfoldingWord/bt-servant-engine">
            <text:p>unfoldingWord/bt-servant-engin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engine-data-loaders">
            <text:p>bt-servant-engine-data-loader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engine-data-loaders">
            <text:p>https://github.com/unfoldingWord/bt-servant-engine-data-loaders</text:p>
          </table:table-cell>
          <table:table-cell office:value-type="string" office:string-value="2026-01-15T00:36:42Z">
            <text:p>2026-01-15T00:36:42Z</text:p>
          </table:table-cell>
          <table:table-cell office:value-type="string" office:string-value="">
            <text:p/>
          </table:table-cell>
          <table:table-cell office:value-type="string" office:string-value="unfoldingWord/bt-servant-engine-data-loaders">
            <text:p>unfoldingWord/bt-servant-engine-data-load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kb-worker">
            <text:p>bt-servant-kb-worke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kb-worker">
            <text:p>https://github.com/unfoldingWord/bt-servant-kb-worker</text:p>
          </table:table-cell>
          <table:table-cell office:value-type="string" office:string-value="2026-03-14T00:10:02Z">
            <text:p>2026-03-14T00:10:02Z</text:p>
          </table:table-cell>
          <table:table-cell office:value-type="string" office:string-value="">
            <text:p/>
          </table:table-cell>
          <table:table-cell office:value-type="string" office:string-value="unfoldingWord/bt-servant-kb-worker">
            <text:p>unfoldingWord/bt-servant-kb-wor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log-viewer">
            <text:p>bt-servant-log-viewer</text:p>
          </table:table-cell>
          <table:table-cell office:value-type="string" office:string-value="unfoldingWord">
            <text:p>unfoldingWord</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0">
            <text:p>0</text:p>
          </table:table-cell>
          <table:table-cell office:value-type="string" office:string-value="0">
            <text:p>0</text:p>
          </table:table-cell>
          <table:table-cell office:value-type="string" office:string-value="https://github.com/unfoldingWord/bt-servant-log-viewer">
            <text:p>https://github.com/unfoldingWord/bt-servant-log-viewer</text:p>
          </table:table-cell>
          <table:table-cell office:value-type="string" office:string-value="2026-01-16T23:13:43Z">
            <text:p>2026-01-16T23:13:43Z</text:p>
          </table:table-cell>
          <table:table-cell office:value-type="string" office:string-value="">
            <text:p/>
          </table:table-cell>
          <table:table-cell office:value-type="string" office:string-value="unfoldingWord/bt-servant-log-viewer">
            <text:p>unfoldingWord/bt-servant-log-view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message-broker">
            <text:p>bt-servant-message-bro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message-broker">
            <text:p>https://github.com/unfoldingWord/bt-servant-message-broker</text:p>
          </table:table-cell>
          <table:table-cell office:value-type="string" office:string-value="2026-02-20T00:14:18Z">
            <text:p>2026-02-20T00:14:18Z</text:p>
          </table:table-cell>
          <table:table-cell office:value-type="string" office:string-value="">
            <text:p/>
          </table:table-cell>
          <table:table-cell office:value-type="string" office:string-value="unfoldingWord/bt-servant-message-broker">
            <text:p>unfoldingWord/bt-servant-message-bro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report-sender">
            <text:p>bt-servant-report-send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report-sender">
            <text:p>https://github.com/unfoldingWord/bt-servant-report-sender</text:p>
          </table:table-cell>
          <table:table-cell office:value-type="string" office:string-value="2025-12-17T16:47:41Z">
            <text:p>2025-12-17T16:47:41Z</text:p>
          </table:table-cell>
          <table:table-cell office:value-type="string" office:string-value="">
            <text:p/>
          </table:table-cell>
          <table:table-cell office:value-type="string" office:string-value="unfoldingWord/bt-servant-report-sender">
            <text:p>unfoldingWord/bt-servant-report-sen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signal-gateway">
            <text:p>bt-servant-signal-gateway</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16T21:44:04Z">
            <text:p>2026-06-16T21:44:04Z</text:p>
          </table:table-cell>
          <table:table-cell office:value-type="string" office:string-value="2026-06-16T18:47:12Z">
            <text:p>2026-06-16T18:47:12Z</text:p>
          </table:table-cell>
          <table:table-cell office:value-type="string" office:string-value="">
            <text:p/>
          </table:table-cell>
          <table:table-cell office:value-type="string" office:string-value="12">
            <text:p>12</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signal-gateway">
            <text:p>https://github.com/unfoldingWord/bt-servant-signal-gateway</text:p>
          </table:table-cell>
          <table:table-cell office:value-type="string" office:string-value="2026-06-16T18:48:35Z">
            <text:p>2026-06-16T18:48:35Z</text:p>
          </table:table-cell>
          <table:table-cell office:value-type="string" office:string-value="">
            <text:p/>
          </table:table-cell>
          <table:table-cell office:value-type="string" office:string-value="unfoldingWord/bt-servant-signal-gateway">
            <text:p>unfoldingWord/bt-servant-signal-gatewa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site">
            <text:p>bt-servant-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5-16T19:38:34Z">
            <text:p>2026-05-16T19:38:34Z</text:p>
          </table:table-cell>
          <table:table-cell office:value-type="string" office:string-value="2026-05-16T19:38:34Z">
            <text:p>2026-05-16T19:38: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https://github.com/unfoldingWord/bt-servant-site">
            <text:p>https://github.com/unfoldingWord/bt-servant-site</text:p>
          </table:table-cell>
          <table:table-cell office:value-type="string" office:string-value="2026-05-16T19:38:38Z">
            <text:p>2026-05-16T19:38:38Z</text:p>
          </table:table-cell>
          <table:table-cell office:value-type="string" office:string-value="">
            <text:p/>
          </table:table-cell>
          <table:table-cell office:value-type="string" office:string-value="unfoldingWord/bt-servant-site">
            <text:p>unfoldingWord/bt-servant-si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
            <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cell office:value-type="string" office:string-value="">
            <text:p/>
          </table:table-cell>
          <table:table-cell office:value-type="string" office:string-value="unfoldingWord/bt-servant-telemetry">
            <text:p>unfoldingWord/bt-servant-telemet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17:48:59Z">
            <text:p>2026-06-13T17:48:59Z</text:p>
          </table:table-cell>
          <table:table-cell office:value-type="string" office:string-value="2026-06-13T17:48:58Z">
            <text:p>2026-06-13T17:48:58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
            <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3T17:49:02Z">
            <text:p>2026-06-13T17:49:02Z</text:p>
          </table:table-cell>
          <table:table-cell office:value-type="string" office:string-value="">
            <text:p/>
          </table:table-cell>
          <table:table-cell office:value-type="string" office:string-value="unfoldingWord/bt-servant-web-client">
            <text:p>unfoldingWord/bt-servant-web-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5:25:46Z">
            <text:p>2026-06-17T15:25:46Z</text:p>
          </table:table-cell>
          <table:table-cell office:value-type="string" office:string-value="2026-06-17T15:25:36Z">
            <text:p>2026-06-17T15:25:36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
            <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6-17T15:27:01Z">
            <text:p>2026-06-17T15:27:01Z</text:p>
          </table:table-cell>
          <table:table-cell office:value-type="string" office:string-value="">
            <text:p/>
          </table:table-cell>
          <table:table-cell office:value-type="string" office:string-value="unfoldingWord/bt-servant-whatsapp-gateway">
            <text:p>unfoldingWord/bt-servant-whatsapp-gatewa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5:26:25Z">
            <text:p>2026-06-17T15:26:25Z</text:p>
          </table:table-cell>
          <table:table-cell office:value-type="string" office:string-value="2026-06-16T21:32:07Z">
            <text:p>2026-06-16T21:32:07Z</text:p>
          </table:table-cell>
          <table:table-cell office:value-type="string" office:string-value="">
            <text:p/>
          </table:table-cell>
          <table:table-cell office:value-type="string" office:string-value="110">
            <text:p>110</text:p>
          </table:table-cell>
          <table:table-cell office:value-type="string" office:string-value="10">
            <text:p>10</text:p>
          </table:table-cell>
          <table:table-cell office:value-type="string" office:string-value="">
            <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6-16T21:33:14Z">
            <text:p>2026-06-16T21:33:14Z</text:p>
          </table:table-cell>
          <table:table-cell office:value-type="string" office:string-value="">
            <text:p/>
          </table:table-cell>
          <table:table-cell office:value-type="string" office:string-value="unfoldingWord/bt-servant-worker">
            <text:p>unfoldingWord/bt-servant-wor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usfm-js']">
            <text:p>['uw-content-validation', 'usfm-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cell office:value-type="string" office:string-value="">
            <text:p/>
          </table:table-cell>
          <table:table-cell office:value-type="string" office:string-value="unfoldingWord/catalog-next-toolkit">
            <text:p>unfoldingWord/catalog-next-toolk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amilo2obsidian">
            <text:p>chamilo2obsidian</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chamilo2obsidian">
            <text:p>https://github.com/unfoldingWord-box3/chamilo2obsidian</text:p>
          </table:table-cell>
          <table:table-cell office:value-type="string" office:string-value="2022-12-12T20:50:51Z">
            <text:p>2022-12-12T20:50:51Z</text:p>
          </table:table-cell>
          <table:table-cell office:value-type="string" office:string-value="">
            <text:p/>
          </table:table-cell>
          <table:table-cell office:value-type="string" office:string-value="unfoldingWord-box3/chamilo2obsidian">
            <text:p>unfoldingWord-box3/chamilo2obsidia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
            <text:p>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_security_sentinel">
            <text:p>claude_security_sentinel</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laude_security_sentinel">
            <text:p>https://github.com/unfoldingWord/claude_security_sentinel</text:p>
          </table:table-cell>
          <table:table-cell office:value-type="string" office:string-value="2026-05-22T15:02:16Z">
            <text:p>2026-05-22T15:02:16Z</text:p>
          </table:table-cell>
          <table:table-cell office:value-type="string" office:string-value="">
            <text:p/>
          </table:table-cell>
          <table:table-cell office:value-type="string" office:string-value="unfoldingWord/claude_security_sentinel">
            <text:p>unfoldingWord/claude_security_sentine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oudfront_logprocessor">
            <text:p>cloudfront_logprocesso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https://github.com/unfoldingWord/cloudfront_logprocessor">
            <text:p>https://github.com/unfoldingWord/cloudfront_logprocessor</text:p>
          </table:table-cell>
          <table:table-cell office:value-type="string" office:string-value="2026-06-03T15:57:01Z">
            <text:p>2026-06-03T15:57:01Z</text:p>
          </table:table-cell>
          <table:table-cell office:value-type="string" office:string-value="">
            <text:p/>
          </table:table-cell>
          <table:table-cell office:value-type="string" office:string-value="unfoldingWord/cloudfront_logprocessor">
            <text:p>unfoldingWord/cloudfront_logprocesso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
            <text:p/>
          </table:table-cell>
          <table:table-cell office:value-type="string" office:string-value="content-validation-app">
            <text:p>content-validation-app</text:p>
          </table:table-cell>
          <table:table-cell office:value-type="string" office:string-value="False">
            <text:p>False</text:p>
          </table:table-cell>
          <table:table-cell office:value-type="string" office:string-value="188">
            <text:p>188</text:p>
          </table:table-cell>
          <table:table-cell office:value-type="string" office:string-value="2020-09-16T21:52:51.640Z">
            <text:p>2020-09-16T21:52:51.640Z</text:p>
          </table:table-cell>
          <table:table-cell office:value-type="string" office:string-value="">
            <text:p/>
          </table:table-cell>
          <table:table-cell office:value-type="string" office:string-value="['uw-content-validation', 'usfm-js']">
            <text:p>['uw-content-validation', 'usfm-js']</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cell office:value-type="string" office:string-value="">
            <text:p/>
          </table:table-cell>
          <table:table-cell office:value-type="string" office:string-value="unfoldingWord-box3/content-validation-app">
            <text:p>unfoldingWord-box3/content-validation-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8 downloads in the last year) and no detected local consumers.">
            <text:p>Package has low but nonzero npm usage (188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yber-security-report">
            <text:p>cyber-security-re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09:29:35Z">
            <text:p>2026-06-03T09:29:35Z</text:p>
          </table:table-cell>
          <table:table-cell office:value-type="string" office:string-value="2026-06-03T09:29:29Z">
            <text:p>2026-06-03T09:2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yber-security-report">
            <text:p>https://github.com/unfoldingWord/cyber-security-report</text:p>
          </table:table-cell>
          <table:table-cell office:value-type="string" office:string-value="2026-06-03T09:29:39Z">
            <text:p>2026-06-03T09:29:39Z</text:p>
          </table:table-cell>
          <table:table-cell office:value-type="string" office:string-value="">
            <text:p/>
          </table:table-cell>
          <table:table-cell office:value-type="string" office:string-value="unfoldingWord/cyber-security-report">
            <text:p>unfoldingWord/cyber-security-re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43-catalog">
            <text:p>d43-catalog</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25">
            <text:p>25</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d43-catalog">
            <text:p>https://github.com/unfoldingWord-dev/d43-catalog</text:p>
          </table:table-cell>
          <table:table-cell office:value-type="string" office:string-value="2024-10-21T07:58:18Z">
            <text:p>2024-10-21T07:58:18Z</text:p>
          </table:table-cell>
          <table:table-cell office:value-type="string" office:string-value="">
            <text:p/>
          </table:table-cell>
          <table:table-cell office:value-type="string" office:string-value="unfoldingWord-dev/d43-catalog">
            <text:p>unfoldingWord-dev/d43-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ta_tracking_import">
            <text:p>data_tracking_im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import">
            <text:p>https://github.com/unfoldingWord/data_tracking_import</text:p>
          </table:table-cell>
          <table:table-cell office:value-type="string" office:string-value="2026-02-03T19:14:08Z">
            <text:p>2026-02-03T19:14:08Z</text:p>
          </table:table-cell>
          <table:table-cell office:value-type="string" office:string-value="">
            <text:p/>
          </table:table-cell>
          <table:table-cell office:value-type="string" office:string-value="unfoldingWord/data_tracking_import">
            <text:p>unfoldingWord/data_tracking_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ta_tracking_wrangler">
            <text:p>data_tracking_wrangler</text:p>
          </table:table-cell>
          <table:table-cell office:value-type="string" office:string-value="unfoldingWord">
            <text:p>unfoldingWord</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wrangler">
            <text:p>https://github.com/unfoldingWord/data_tracking_wrangler</text:p>
          </table:table-cell>
          <table:table-cell office:value-type="string" office:string-value="2025-12-02T16:38:55Z">
            <text:p>2025-12-02T16:38:55Z</text:p>
          </table:table-cell>
          <table:table-cell office:value-type="string" office:string-value="">
            <text:p/>
          </table:table-cell>
          <table:table-cell office:value-type="string" office:string-value="unfoldingWord/data_tracking_wrangler">
            <text:p>unfoldingWord/data_tracking_wrang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bbackupr2">
            <text:p>dbbackupr2</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2">
            <text:p>2</text:p>
          </table:table-cell>
          <table:table-cell office:value-type="string" office:string-value="9">
            <text:p>9</text:p>
          </table:table-cell>
          <table:table-cell office:value-type="string" office:string-value="https://github.com/unfoldingWord/dbbackupr2">
            <text:p>https://github.com/unfoldingWord/dbbackupr2</text:p>
          </table:table-cell>
          <table:table-cell office:value-type="string" office:string-value="2025-11-27T12:19:25Z">
            <text:p>2025-11-27T12:19:25Z</text:p>
          </table:table-cell>
          <table:table-cell office:value-type="string" office:string-value="">
            <text:p/>
          </table:table-cell>
          <table:table-cell office:value-type="string" office:string-value="unfoldingWord/dbbackupr2">
            <text:p>unfoldingWord/dbbackupr2</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
            <text:p>dcs</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14T01:06:51Z">
            <text:p>2026-06-14T01:06:5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48">
            <text:p>48</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104">
            <text:p>104</text:p>
          </table:table-cell>
          <table:table-cell office:value-type="string" office:string-value="1040">
            <text:p>1040</text:p>
          </table:table-cell>
          <table:table-cell office:value-type="string" office:string-value="https://github.com/unfoldingWord/dcs">
            <text:p>https://github.com/unfoldingWord/dcs</text:p>
          </table:table-cell>
          <table:table-cell office:value-type="string" office:string-value="2026-04-19T02:36:49Z">
            <text:p>2026-04-19T02:36:49Z</text:p>
          </table:table-cell>
          <table:table-cell office:value-type="string" office:string-value="">
            <text:p/>
          </table:table-cell>
          <table:table-cell office:value-type="string" office:string-value="unfoldingWord/dcs">
            <text:p>unfoldingWord/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api-merge-poc">
            <text:p>dcs-api-merge-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https://github.com/unfoldingWord-dev/dcs-api-merge-poc">
            <text:p>https://github.com/unfoldingWord-dev/dcs-api-merge-poc</text:p>
          </table:table-cell>
          <table:table-cell office:value-type="string" office:string-value="2020-11-09T17:01:06Z">
            <text:p>2020-11-09T17:01:06Z</text:p>
          </table:table-cell>
          <table:table-cell office:value-type="string" office:string-value="">
            <text:p/>
          </table:table-cell>
          <table:table-cell office:value-type="string" office:string-value="unfoldingWord-dev/dcs-api-merge-poc">
            <text:p>unfoldingWord-dev/dcs-api-merge-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api-resolve-conflicts-poc">
            <text:p>dcs-api-resolve-conflicts-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api-resolve-conflicts-poc">
            <text:p>https://github.com/unfoldingWord-dev/dcs-api-resolve-conflicts-poc</text:p>
          </table:table-cell>
          <table:table-cell office:value-type="string" office:string-value="2020-11-13T22:23:27Z">
            <text:p>2020-11-13T22:23:27Z</text:p>
          </table:table-cell>
          <table:table-cell office:value-type="string" office:string-value="">
            <text:p/>
          </table:table-cell>
          <table:table-cell office:value-type="string" office:string-value="unfoldingWord-dev/dcs-api-resolve-conflicts-poc">
            <text:p>unfoldingWord-dev/dcs-api-resolve-conflicts-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catalog-accordion-rcl">
            <text:p>dcs-catalog-accordion-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cell office:value-type="string" office:string-value="">
            <text:p/>
          </table:table-cell>
          <table:table-cell office:value-type="string" office:string-value="unfoldingWord/dcs-catalog-accordion-rcl">
            <text:p>unfoldingWord/dcs-catalog-accordion-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cell office:value-type="string" office:string-value="">
            <text:p/>
          </table:table-cell>
          <table:table-cell office:value-type="string" office:string-value="unfoldingWord-dev/dcs-docker">
            <text:p>unfoldingWord-dev/dcs-doc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docs">
            <text:p>dcs-doc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https://github.com/unfoldingWord/dcs-docs">
            <text:p>https://github.com/unfoldingWord/dcs-docs</text:p>
          </table:table-cell>
          <table:table-cell office:value-type="string" office:string-value="2022-02-25T23:02:31Z">
            <text:p>2022-02-25T23:02:31Z</text:p>
          </table:table-cell>
          <table:table-cell office:value-type="string" office:string-value="">
            <text:p/>
          </table:table-cell>
          <table:table-cell office:value-type="string" office:string-value="unfoldingWord/dcs-docs">
            <text:p>unfoldingWord/dcs-do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
            <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cell office:value-type="string" office:string-value="">
            <text:p/>
          </table:table-cell>
          <table:table-cell office:value-type="string" office:string-value="unfoldingWord-box3/dcs-file-version-diff-tool">
            <text:p>unfoldingWord-box3/dcs-file-version-diff-too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home-page-old">
            <text:p>dcs-home-page-old</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old">
            <text:p>https://github.com/unfoldingWord/dcs-home-page-old</text:p>
          </table:table-cell>
          <table:table-cell office:value-type="string" office:string-value="2023-01-31T23:27:02Z">
            <text:p>2023-01-31T23:27:02Z</text:p>
          </table:table-cell>
          <table:table-cell office:value-type="string" office:string-value="">
            <text:p/>
          </table:table-cell>
          <table:table-cell office:value-type="string" office:string-value="unfoldingWord/dcs-home-page-old">
            <text:p>unfoldingWord/dcs-home-page-ol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homepage">
            <text:p>dcs-homepage</text:p>
          </table:table-cell>
          <table:table-cell office:value-type="string" office:string-value="unfoldingWord">
            <text:p>unfoldingWord</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
            <text:p>https://github.com/unfoldingWord/dcs-homepage</text:p>
          </table:table-cell>
          <table:table-cell office:value-type="string" office:string-value="2026-06-03T16:04:29Z">
            <text:p>2026-06-03T16:04:29Z</text:p>
          </table:table-cell>
          <table:table-cell office:value-type="string" office:string-value="">
            <text:p/>
          </table:table-cell>
          <table:table-cell office:value-type="string" office:string-value="unfoldingWord/dcs-homepage">
            <text:p>unfoldingWord/dcs-homepag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local">
            <text:p>dcs-local</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cs-local">
            <text:p>https://github.com/unfoldingWord/dcs-local</text:p>
          </table:table-cell>
          <table:table-cell office:value-type="string" office:string-value="2023-10-06T04:52:20Z">
            <text:p>2023-10-06T04:52:20Z</text:p>
          </table:table-cell>
          <table:table-cell office:value-type="string" office:string-value="">
            <text:p/>
          </table:table-cell>
          <table:table-cell office:value-type="string" office:string-value="unfoldingWord/dcs-local">
            <text:p>unfoldingWord/dcs-loc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cell office:value-type="string" office:string-value="">
            <text:p/>
          </table:table-cell>
          <table:table-cell office:value-type="string" office:string-value="unfoldingWord-box3/dcs-login">
            <text:p>unfoldingWord-box3/dcs-log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
            <text:p>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js">
            <text:p>unfoldingWord/dcs-packages/dcs-j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607 downloads in the last year) and no detected local consumers.">
            <text:p>Package has low but nonzero npm usage (607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js-example">
            <text:p>unfoldingWord/dcs-packages/dcs-js-exampl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ts">
            <text:p>unfoldingWord/dcs-packages/dcs-t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vite-project">
            <text:p>unfoldingWord/dcs-packages/vite-projec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rofile-blank">
            <text:p>dcs-profile-blank</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blank">
            <text:p>https://github.com/unfoldingWord-dev/dcs-profile-blank</text:p>
          </table:table-cell>
          <table:table-cell office:value-type="string" office:string-value="2021-05-11T21:05:08Z">
            <text:p>2021-05-11T21:05:08Z</text:p>
          </table:table-cell>
          <table:table-cell office:value-type="string" office:string-value="">
            <text:p/>
          </table:table-cell>
          <table:table-cell office:value-type="string" office:string-value="unfoldingWord-dev/dcs-profile-blank">
            <text:p>unfoldingWord-dev/dcs-profile-blan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rofile-unfoldingword">
            <text:p>dcs-profile-unfoldingwor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
            <text:p>https://github.com/unfoldingWord-dev/dcs-profile-unfoldingword</text:p>
          </table:table-cell>
          <table:table-cell office:value-type="string" office:string-value="2021-05-11T21:28:35Z">
            <text:p>2021-05-11T21:28:35Z</text:p>
          </table:table-cell>
          <table:table-cell office:value-type="string" office:string-value="">
            <text:p/>
          </table:table-cell>
          <table:table-cell office:value-type="string" office:string-value="unfoldingWord-dev/dcs-profile-unfoldingword">
            <text:p>unfoldingWord-dev/dcs-profile-unfoldingwor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rofile-unfoldingword-mirrored">
            <text:p>dcs-profile-unfoldingword-mirrore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mirrored">
            <text:p>https://github.com/unfoldingWord-dev/dcs-profile-unfoldingword-mirrored</text:p>
          </table:table-cell>
          <table:table-cell office:value-type="string" office:string-value="2021-05-11T20:44:52Z">
            <text:p>2021-05-11T20:44:52Z</text:p>
          </table:table-cell>
          <table:table-cell office:value-type="string" office:string-value="unfoldingWord-dev/dcs-profile-unfoldingword-mirrored">
            <text:p>unfoldingWord-dev/dcs-profile-unfoldingword-mirrored</text:p>
          </table:table-cell>
          <table:table-cell office:value-type="string" office:string-value="unfoldingWord-dev/dcs-profile-unfoldingword-mirrored">
            <text:p>unfoldingWord-dev/dcs-profile-unfoldingword-mirrored</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templates">
            <text:p>dcs-templat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https://github.com/unfoldingWord/dcs-templates">
            <text:p>https://github.com/unfoldingWord/dcs-templates</text:p>
          </table:table-cell>
          <table:table-cell office:value-type="string" office:string-value="2023-09-27T18:53:50Z">
            <text:p>2023-09-27T18:53:50Z</text:p>
          </table:table-cell>
          <table:table-cell office:value-type="string" office:string-value="">
            <text:p/>
          </table:table-cell>
          <table:table-cell office:value-type="string" office:string-value="unfoldingWord/dcs-templates">
            <text:p>unfoldingWord/dcs-templat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vanilla">
            <text:p>dcs-vanilla</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cs-vanilla">
            <text:p>https://github.com/unfoldingWord-box3/dcs-vanilla</text:p>
          </table:table-cell>
          <table:table-cell office:value-type="string" office:string-value="2025-01-25T15:47:15Z">
            <text:p>2025-01-25T15:47:15Z</text:p>
          </table:table-cell>
          <table:table-cell office:value-type="string" office:string-value="">
            <text:p/>
          </table:table-cell>
          <table:table-cell office:value-type="string" office:string-value="unfoldingWord-box3/dcs-vanilla">
            <text:p>unfoldingWord-box3/dcs-vanilla</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enhancedindexer">
            <text:p>dokuwiki-enhancedindex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dokuwiki-enhancedindexer">
            <text:p>https://github.com/unfoldingWord-dev/dokuwiki-enhancedindexer</text:p>
          </table:table-cell>
          <table:table-cell office:value-type="string" office:string-value="2016-01-14T18:53:56Z">
            <text:p>2016-01-14T18:53:56Z</text:p>
          </table:table-cell>
          <table:table-cell office:value-type="string" office:string-value="unfoldingWord-dev/dokuwiki-enhancedindexer">
            <text:p>unfoldingWord-dev/dokuwiki-enhancedindexer</text:p>
          </table:table-cell>
          <table:table-cell office:value-type="string" office:string-value="unfoldingWord-dev/dokuwiki-enhancedindexer">
            <text:p>unfoldingWord-dev/dokuwiki-enhancedindexer</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obs-comparer">
            <text:p>dokuwiki-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obs-comparer">
            <text:p>https://github.com/unfoldingWord-dev/dokuwiki-obs-comparer</text:p>
          </table:table-cell>
          <table:table-cell office:value-type="string" office:string-value="2015-05-29T18:20:26Z">
            <text:p>2015-05-29T18:20:26Z</text:p>
          </table:table-cell>
          <table:table-cell office:value-type="string" office:string-value="">
            <text:p/>
          </table:table-cell>
          <table:table-cell office:value-type="string" office:string-value="unfoldingWord-dev/dokuwiki-obs-comparer">
            <text:p>unfoldingWord-dev/dokuwiki-obs-compar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obs">
            <text:p>dokuwiki-plugin-obs</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
            <text:p>https://github.com/unfoldingWord-dev/dokuwiki-plugin-obs</text:p>
          </table:table-cell>
          <table:table-cell office:value-type="string" office:string-value="2015-06-23T18:57:35Z">
            <text:p>2015-06-23T18:57:35Z</text:p>
          </table:table-cell>
          <table:table-cell office:value-type="string" office:string-value="">
            <text:p/>
          </table:table-cell>
          <table:table-cell office:value-type="string" office:string-value="unfoldingWord-dev/dokuwiki-plugin-obs">
            <text:p>unfoldingWord-dev/dokuwiki-plugin-ob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cell office:value-type="string" office:string-value="">
            <text:p/>
          </table:table-cell>
          <table:table-cell office:value-type="string" office:string-value="unfoldingWord-dev/dokuwiki-plugin-obs-audio-upload">
            <text:p>unfoldingWord-dev/dokuwiki-plugin-obs-audio-uploa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obs-review">
            <text:p>dokuwiki-plugin-obs-review</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review">
            <text:p>https://github.com/unfoldingWord-dev/dokuwiki-plugin-obs-review</text:p>
          </table:table-cell>
          <table:table-cell office:value-type="string" office:string-value="2015-04-13T19:33:48Z">
            <text:p>2015-04-13T19:33:48Z</text:p>
          </table:table-cell>
          <table:table-cell office:value-type="string" office:string-value="">
            <text:p/>
          </table:table-cell>
          <table:table-cell office:value-type="string" office:string-value="unfoldingWord-dev/dokuwiki-plugin-obs-review">
            <text:p>unfoldingWord-dev/dokuwiki-plugin-obs-review</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register">
            <text:p>dokuwiki-plugin-regist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register">
            <text:p>https://github.com/unfoldingWord-dev/dokuwiki-plugin-register</text:p>
          </table:table-cell>
          <table:table-cell office:value-type="string" office:string-value="2015-03-12T19:17:46Z">
            <text:p>2015-03-12T19:17:46Z</text:p>
          </table:table-cell>
          <table:table-cell office:value-type="string" office:string-value="">
            <text:p/>
          </table:table-cell>
          <table:table-cell office:value-type="string" office:string-value="unfoldingWord-dev/dokuwiki-plugin-register">
            <text:p>unfoldingWord-dev/dokuwiki-plugin-regis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shared">
            <text:p>dokuwiki-plugin-shared</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shared">
            <text:p>https://github.com/unfoldingWord-dev/dokuwiki-plugin-shared</text:p>
          </table:table-cell>
          <table:table-cell office:value-type="string" office:string-value="2015-06-04T20:09:16Z">
            <text:p>2015-06-04T20:09:16Z</text:p>
          </table:table-cell>
          <table:table-cell office:value-type="string" office:string-value="">
            <text:p/>
          </table:table-cell>
          <table:table-cell office:value-type="string" office:string-value="unfoldingWord-dev/dokuwiki-plugin-shared">
            <text:p>unfoldingWord-dev/dokuwiki-plugin-share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to-rc">
            <text:p>dokuwiki-to-rc</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to-rc">
            <text:p>https://github.com/unfoldingWord-dev/dokuwiki-to-rc</text:p>
          </table:table-cell>
          <table:table-cell office:value-type="string" office:string-value="2016-09-24T19:55:06Z">
            <text:p>2016-09-24T19:55:06Z</text:p>
          </table:table-cell>
          <table:table-cell office:value-type="string" office:string-value="">
            <text:p/>
          </table:table-cell>
          <table:table-cell office:value-type="string" office:string-value="unfoldingWord-dev/dokuwiki-to-rc">
            <text:p>unfoldingWord-dev/dokuwiki-to-r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usfm-import">
            <text:p>dokuwiki-usfm-impor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import">
            <text:p>https://github.com/unfoldingWord-dev/dokuwiki-usfm-import</text:p>
          </table:table-cell>
          <table:table-cell office:value-type="string" office:string-value="2015-06-23T19:07:28Z">
            <text:p>2015-06-23T19:07:28Z</text:p>
          </table:table-cell>
          <table:table-cell office:value-type="string" office:string-value="">
            <text:p/>
          </table:table-cell>
          <table:table-cell office:value-type="string" office:string-value="unfoldingWord-dev/dokuwiki-usfm-import">
            <text:p>unfoldingWord-dev/dokuwiki-usfm-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USFMTag">
            <text:p>Dokuwiki-USFMTa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Tag">
            <text:p>https://github.com/unfoldingWord-dev/Dokuwiki-USFMTag</text:p>
          </table:table-cell>
          <table:table-cell office:value-type="string" office:string-value="2022-07-27T07:42:16Z">
            <text:p>2022-07-27T07:42:16Z</text:p>
          </table:table-cell>
          <table:table-cell office:value-type="string" office:string-value="unfoldingWord-dev/Dokuwiki-USFMTag">
            <text:p>unfoldingWord-dev/Dokuwiki-USFMTag</text:p>
          </table:table-cell>
          <table:table-cell office:value-type="string" office:string-value="unfoldingWord-dev/Dokuwiki-USFMTag">
            <text:p>unfoldingWord-dev/Dokuwiki-USFMTag</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catalog-job-handler">
            <text:p>door43-catalog-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a1nerd']">
            <text:p>['richmahn', 'da1nerd']</text:p>
          </table:table-cell>
          <table:table-cell office:value-type="string" office:string-value="8">
            <text:p>8</text:p>
          </table:table-cell>
          <table:table-cell office:value-type="string" office:string-value="0">
            <text:p>0</text:p>
          </table:table-cell>
          <table:table-cell office:value-type="string" office:string-value="https://github.com/unfoldingWord/door43-catalog-job-handler">
            <text:p>https://github.com/unfoldingWord/door43-catalog-job-handler</text:p>
          </table:table-cell>
          <table:table-cell office:value-type="string" office:string-value="2022-10-04T15:44:21Z">
            <text:p>2022-10-04T15:44:21Z</text:p>
          </table:table-cell>
          <table:table-cell office:value-type="string" office:string-value="">
            <text:p/>
          </table:table-cell>
          <table:table-cell office:value-type="string" office:string-value="unfoldingWord/door43-catalog-job-handler">
            <text:p>unfoldingWord/door43-catalog-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job-handler">
            <text:p>door43-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38">
            <text:p>38</text:p>
          </table:table-cell>
          <table:table-cell office:value-type="string" office:string-value="0">
            <text:p>0</text:p>
          </table:table-cell>
          <table:table-cell office:value-type="string" office:string-value="https://github.com/unfoldingWord/door43-job-handler">
            <text:p>https://github.com/unfoldingWord/door43-job-handler</text:p>
          </table:table-cell>
          <table:table-cell office:value-type="string" office:string-value="2024-02-06T15:21:33Z">
            <text:p>2024-02-06T15:21:33Z</text:p>
          </table:table-cell>
          <table:table-cell office:value-type="string" office:string-value="">
            <text:p/>
          </table:table-cell>
          <table:table-cell office:value-type="string" office:string-value="unfoldingWord/door43-job-handler">
            <text:p>unfoldingWord/door43-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actions">
            <text:p>door43-preview-action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actions">
            <text:p>https://github.com/unfoldingWord/door43-preview-actions</text:p>
          </table:table-cell>
          <table:table-cell office:value-type="string" office:string-value="2025-11-23T22:33:00Z">
            <text:p>2025-11-23T22:33:00Z</text:p>
          </table:table-cell>
          <table:table-cell office:value-type="string" office:string-value="">
            <text:p/>
          </table:table-cell>
          <table:table-cell office:value-type="string" office:string-value="unfoldingWord/door43-preview-actions">
            <text:p>unfoldingWord/door43-preview-action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bible-reference-range', 'string-punctuation-tokenizer', 'word-aligner', 'word-aligner-lib', 'wordmap', 'wordmap-lexer', 'uw-tsv-parser', 'tsv-groupdata-parser', 'uw-bible-parser', 'tc-strings']">
            <text:p>['bible-reference-rcl', 'usfm-alignment-remover', 'usfm-js', 'uw-quote-helpers', 'word-aligner-rcl', 'bible-reference-range', 'string-punctuation-tokenizer', 'word-aligner', 'word-aligner-lib', 'wordmap', 'wordmap-lexer', 'uw-tsv-parser', 'tsv-groupdata-parser', 'uw-bible-parser', 'tc-strings']</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cell office:value-type="string" office:string-value="">
            <text:p/>
          </table:table-cell>
          <table:table-cell office:value-type="string" office:string-value="unfoldingWord-box3/door43-preview-rcl">
            <text:p>unfoldingWord-box3/door43-preview-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cell office:value-type="string" office:string-value="">
            <text:p/>
          </table:table-cell>
          <table:table-cell office:value-type="string" office:string-value="unfoldingWord/door43-preview-renderers">
            <text:p>unfoldingWord/door43-preview-render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
            <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cell office:value-type="string" office:string-value="">
            <text:p/>
          </table:table-cell>
          <table:table-cell office:value-type="string" office:string-value="unfoldingWord/door43.org">
            <text:p>unfoldingWord/door43.or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wnload-link-tracker">
            <text:p>download-link-track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wnload-link-tracker">
            <text:p>https://github.com/unfoldingWord/download-link-tracker</text:p>
          </table:table-cell>
          <table:table-cell office:value-type="string" office:string-value="2025-06-06T21:39:46Z">
            <text:p>2025-06-06T21:39:46Z</text:p>
          </table:table-cell>
          <table:table-cell office:value-type="string" office:string-value="">
            <text:p/>
          </table:table-cell>
          <table:table-cell office:value-type="string" office:string-value="unfoldingWord/download-link-tracker">
            <text:p>unfoldingWord/download-link-track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w-gitcommit">
            <text:p>dw-gitcommi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https://github.com/unfoldingWord-dev/dw-gitcommit">
            <text:p>https://github.com/unfoldingWord-dev/dw-gitcommit</text:p>
          </table:table-cell>
          <table:table-cell office:value-type="string" office:string-value="2016-04-08T13:55:39Z">
            <text:p>2016-04-08T13:55:39Z</text:p>
          </table:table-cell>
          <table:table-cell office:value-type="string" office:string-value="unfoldingWord-dev/dw-gitcommit">
            <text:p>unfoldingWord-dev/dw-gitcommit</text:p>
          </table:table-cell>
          <table:table-cell office:value-type="string" office:string-value="unfoldingWord-dev/dw-gitcommit">
            <text:p>unfoldingWord-dev/dw-gitcommi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w_redirects">
            <text:p>d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w_redirects">
            <text:p>https://github.com/unfoldingWord/dw_redirects</text:p>
          </table:table-cell>
          <table:table-cell office:value-type="string" office:string-value="2020-05-14T14:42:44Z">
            <text:p>2020-05-14T14:42:44Z</text:p>
          </table:table-cell>
          <table:table-cell office:value-type="string" office:string-value="">
            <text:p/>
          </table:table-cell>
          <table:table-cell office:value-type="string" office:string-value="unfoldingWord/dw_redirects">
            <text:p>unfoldingWord/dw_redirec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_obs_tf">
            <text:p>en_obs_tf</text:p>
          </table:table-cell>
          <table:table-cell office:value-type="string" office:string-value="unfoldingWord">
            <text:p>unfoldingWord</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https://github.com/unfoldingWord/en_obs_tf">
            <text:p>https://github.com/unfoldingWord/en_obs_tf</text:p>
          </table:table-cell>
          <table:table-cell office:value-type="string" office:string-value="2023-06-07T19:49:43Z">
            <text:p>2023-06-07T19:49:43Z</text:p>
          </table:table-cell>
          <table:table-cell office:value-type="string" office:string-value="">
            <text:p/>
          </table:table-cell>
          <table:table-cell office:value-type="string" office:string-value="unfoldingWord/en_obs_tf">
            <text:p>unfoldingWord/en_obs_tf</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xampleCheckingApp-tC">
            <text:p>ExampleCheckingApp-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ExampleCheckingApp-tC">
            <text:p>https://github.com/unfoldingWord-dev/ExampleCheckingApp-tC</text:p>
          </table:table-cell>
          <table:table-cell office:value-type="string" office:string-value="2016-08-15T16:27:49Z">
            <text:p>2016-08-15T16:27:49Z</text:p>
          </table:table-cell>
          <table:table-cell office:value-type="string" office:string-value="">
            <text:p/>
          </table:table-cell>
          <table:table-cell office:value-type="string" office:string-value="unfoldingWord-dev/ExampleCheckingApp-tC">
            <text:p>unfoldingWord-dev/ExampleCheckingApp-t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xports">
            <text:p>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exports">
            <text:p>https://github.com/unfoldingWord-dev/exports</text:p>
          </table:table-cell>
          <table:table-cell office:value-type="string" office:string-value="2015-06-23T21:38:19Z">
            <text:p>2015-06-23T21:38:19Z</text:p>
          </table:table-cell>
          <table:table-cell office:value-type="string" office:string-value="">
            <text:p/>
          </table:table-cell>
          <table:table-cell office:value-type="string" office:string-value="unfoldingWord-dev/exports">
            <text:p>unfoldingWord-dev/expor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a-kb">
            <text:p>fia-k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fia-kb">
            <text:p>https://github.com/unfoldingWord/fia-kb</text:p>
          </table:table-cell>
          <table:table-cell office:value-type="string" office:string-value="2026-03-13T19:46:02Z">
            <text:p>2026-03-13T19:46:02Z</text:p>
          </table:table-cell>
          <table:table-cell office:value-type="string" office:string-value="">
            <text:p/>
          </table:table-cell>
          <table:table-cell office:value-type="string" office:string-value="unfoldingWord/fia-kb">
            <text:p>unfoldingWord/fia-k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red-mcp">
            <text:p>fred-mcp</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fred-mcp">
            <text:p>https://github.com/unfoldingWord/fred-mcp</text:p>
          </table:table-cell>
          <table:table-cell office:value-type="string" office:string-value="2026-05-07T01:50:40Z">
            <text:p>2026-05-07T01:50:40Z</text:p>
          </table:table-cell>
          <table:table-cell office:value-type="string" office:string-value="">
            <text:p/>
          </table:table-cell>
          <table:table-cell office:value-type="string" office:string-value="unfoldingWord/fred-mcp">
            <text:p>unfoldingWord/fred-mc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red-zulip-bot">
            <text:p>fred-zulip-bo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
            <text:p>https://github.com/unfoldingWord/fred-zulip-bot</text:p>
          </table:table-cell>
          <table:table-cell office:value-type="string" office:string-value="2025-10-07T20:31:31Z">
            <text:p>2025-10-07T20:31:31Z</text:p>
          </table:table-cell>
          <table:table-cell office:value-type="string" office:string-value="">
            <text:p/>
          </table:table-cell>
          <table:table-cell office:value-type="string" office:string-value="unfoldingWord/fred-zulip-bot">
            <text:p>unfoldingWord/fred-zulip-bo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10:38:09Z">
            <text:p>2026-06-07T10:38:09Z</text:p>
          </table:table-cell>
          <table:table-cell office:value-type="string" office:string-value="2026-06-07T10:38:05Z">
            <text:p>2026-06-07T10:38:05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
            <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
            <text:p>['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text:p>
          </table:table-cell>
          <table:table-cell office:value-type="string" office:string-value="">
            <text:p/>
          </table:table-cell>
          <table:table-cell office:value-type="string" office:string-value="['mandolyte', 'superdav42', 'richmahn', 'theNerd247', 'mannycolon', 'birchamp', 'abelpz', 'Joel-C-Johnson', 'PhotoNomad0']">
            <text:p>['mandolyte', 'superdav42', 'richmahn',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07T10:38:10Z">
            <text:p>2026-06-07T10:38:10Z</text:p>
          </table:table-cell>
          <table:table-cell office:value-type="string" office:string-value="">
            <text:p/>
          </table:table-cell>
          <table:table-cell office:value-type="string" office:string-value="unfoldingWord/gateway-admin">
            <text:p>unfoldingWord/gateway-adm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
            <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
            <text:p>['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cell office:value-type="string" office:string-value="">
            <text:p/>
          </table:table-cell>
          <table:table-cell office:value-type="string" office:string-value="unfoldingWord-box3/gateway-edit-POC">
            <text:p>unfoldingWord-box3/gateway-edit-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
            <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
            <text:p>['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cell office:value-type="string" office:string-value="">
            <text:p/>
          </table:table-cell>
          <table:table-cell office:value-type="string" office:string-value="unfoldingWord/gateway-translate">
            <text:p>unfoldingWord/gateway-transla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cell office:value-type="string" office:string-value="">
            <text:p/>
          </table:table-cell>
          <table:table-cell office:value-type="string" office:string-value="unfoldingWord-box3/gl-database-visualizations">
            <text:p>unfoldingWord-box3/gl-database-visualization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_database">
            <text:p>gl_databas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
            <text:p>https://github.com/unfoldingWord/gl_database</text:p>
          </table:table-cell>
          <table:table-cell office:value-type="string" office:string-value="2021-01-21T20:44:49Z">
            <text:p>2021-01-21T20:44:49Z</text:p>
          </table:table-cell>
          <table:table-cell office:value-type="string" office:string-value="">
            <text:p/>
          </table:table-cell>
          <table:table-cell office:value-type="string" office:string-value="unfoldingWord/gl_database">
            <text:p>unfoldingWord/gl_databas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_database_code">
            <text:p>gl_database_cod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code">
            <text:p>https://github.com/unfoldingWord/gl_database_code</text:p>
          </table:table-cell>
          <table:table-cell office:value-type="string" office:string-value="2021-10-14T15:01:45Z">
            <text:p>2021-10-14T15:01:45Z</text:p>
          </table:table-cell>
          <table:table-cell office:value-type="string" office:string-value="">
            <text:p/>
          </table:table-cell>
          <table:table-cell office:value-type="string" office:string-value="unfoldingWord/gl_database_code">
            <text:p>unfoldingWord/gl_database_cod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ustom">
            <text:p>gogs-custom</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https://github.com/unfoldingWord-dev/gogs-custom">
            <text:p>https://github.com/unfoldingWord-dev/gogs-custom</text:p>
          </table:table-cell>
          <table:table-cell office:value-type="string" office:string-value="2025-10-02T14:14:06Z">
            <text:p>2025-10-02T14:14:06Z</text:p>
          </table:table-cell>
          <table:table-cell office:value-type="string" office:string-value="">
            <text:p/>
          </table:table-cell>
          <table:table-cell office:value-type="string" office:string-value="unfoldingWord-dev/gogs-custom">
            <text:p>unfoldingWord-dev/gogs-custom</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_auto_scaling">
            <text:p>gogs_auto_scaling</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gogs_auto_scaling">
            <text:p>https://github.com/unfoldingWord-dev/gogs_auto_scaling</text:p>
          </table:table-cell>
          <table:table-cell office:value-type="string" office:string-value="2022-05-20T10:45:41Z">
            <text:p>2022-05-20T10:45:41Z</text:p>
          </table:table-cell>
          <table:table-cell office:value-type="string" office:string-value="">
            <text:p/>
          </table:table-cell>
          <table:table-cell office:value-type="string" office:string-value="unfoldingWord-dev/gogs_auto_scaling">
            <text:p>unfoldingWord-dev/gogs_auto_scaling</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cell office:value-type="string" office:string-value="">
            <text:p/>
          </table:table-cell>
          <table:table-cell office:value-type="string" office:string-value="unfoldingWord-box3/graphql-catalog-next">
            <text:p>unfoldingWord-box3/graphql-catalog-nex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
            <text:p/>
          </table:table-cell>
          <table:table-cell office:value-type="string" office:string-value="greek-apparatus-app">
            <text:p>greek-apparatus-app</text:p>
          </table:table-cell>
          <table:table-cell office:value-type="string" office:string-value="False">
            <text:p>False</text:p>
          </table:table-cell>
          <table:table-cell office:value-type="string" office:string-value="71">
            <text:p>71</text:p>
          </table:table-cell>
          <table:table-cell office:value-type="string" office:string-value="2020-12-11T16:05:46.321Z">
            <text:p>2020-12-11T16:05:46.321Z</text:p>
          </table:table-cell>
          <table:table-cell office:value-type="string" office:string-value="">
            <text:p/>
          </table:table-cell>
          <table:table-cell office:value-type="string" office:string-value="['bible-reference-rcl', 'datatable-translatable', 'gitea-react-toolkit', 'scripture-resources-rcl', 'string-punctuation-tokenizer', 'usfm-js', 'wordmap-lexer', 'markdown-translatable', '@unfoldingword/eslint-config', 'bible-reference-range', 'tc-ui-toolkit', 'uw-quote-helpers', 'word-aligner', 'tsv-groupdata-parser', 'uw-bible-parser', 'uw-tsv-parser']">
            <text:p>['bible-reference-rcl', 'datatable-translatable', 'gitea-react-toolkit', 'scripture-resources-rcl', 'string-punctuation-tokenizer', 'usfm-js', 'wordmap-lexer', 'markdown-translatable', '@unfoldingword/eslint-config', 'bible-reference-range', 'tc-ui-toolkit', 'uw-quote-helpers', 'word-aligner', 'tsv-groupdata-parser', 'uw-bible-parser', 'uw-tsv-parser']</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cell office:value-type="string" office:string-value="">
            <text:p/>
          </table:table-cell>
          <table:table-cell office:value-type="string" office:string-value="unfoldingWord-box3/greek-apparatus-app">
            <text:p>unfoldingWord-box3/greek-apparatus-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71 downloads in the last year) and no detected local consumers.">
            <text:p>Package has low but nonzero npm usage (71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WE-Tests">
            <text:p>GWE-Tes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WE-Tests">
            <text:p>https://github.com/unfoldingWord/GWE-Tests</text:p>
          </table:table-cell>
          <table:table-cell office:value-type="string" office:string-value="2024-07-29T13:32:27Z">
            <text:p>2024-07-29T13:32:27Z</text:p>
          </table:table-cell>
          <table:table-cell office:value-type="string" office:string-value="">
            <text:p/>
          </table:table-cell>
          <table:table-cell office:value-type="string" office:string-value="unfoldingWord/GWE-Tests">
            <text:p>unfoldingWord/GWE-Tes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unfoldingword/eslint-config']">
            <text:p>['gitea-react-toolkit', 'markdown-translatable', '@unfoldingword/eslint-config']</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cell office:value-type="string" office:string-value="">
            <text:p/>
          </table:table-cell>
          <table:table-cell office:value-type="string" office:string-value="unfoldingWord-box3/hello-dcs-react-component-library">
            <text:p>unfoldingWord-box3/hello-dcs-react-component-libra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
            <text:p/>
          </table:table-cell>
          <table:table-cell office:value-type="string" office:string-value="hello-world-react-component-library">
            <text:p>hello-world-react-component-library</text:p>
          </table:table-cell>
          <table:table-cell office:value-type="string" office:string-value="False">
            <text:p>False</text:p>
          </table:table-cell>
          <table:table-cell office:value-type="string" office:string-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cell office:value-type="string" office:string-value="">
            <text:p/>
          </table:table-cell>
          <table:table-cell office:value-type="string" office:string-value="unfoldingWord-box3/hello-world-react-component-library">
            <text:p>unfoldingWord-box3/hello-world-react-component-librar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99 downloads in the last year) and no detected local consumers.">
            <text:p>Package has low but nonzero npm usage (199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ubot">
            <text:p>hubot</text:p>
          </table:table-cell>
          <table:table-cell office:value-type="string" office:string-value="unfoldingWord-dev">
            <text:p>unfoldingWord-dev</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25">
            <text:p>2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hubot">
            <text:p>https://github.com/unfoldingWord-dev/hubot</text:p>
          </table:table-cell>
          <table:table-cell office:value-type="string" office:string-value="2016-12-01T19:33:07Z">
            <text:p>2016-12-01T19:33:07Z</text:p>
          </table:table-cell>
          <table:table-cell office:value-type="string" office:string-value="">
            <text:p/>
          </table:table-cell>
          <table:table-cell office:value-type="string" office:string-value="unfoldingWord-dev/hubot">
            <text:p>unfoldingWord-dev/hubo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nventoryst">
            <text:p>inventory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inventoryst">
            <text:p>https://github.com/unfoldingWord/inventoryst</text:p>
          </table:table-cell>
          <table:table-cell office:value-type="string" office:string-value="2026-04-02T09:43:48Z">
            <text:p>2026-04-02T09:43:48Z</text:p>
          </table:table-cell>
          <table:table-cell office:value-type="string" office:string-value="">
            <text:p/>
          </table:table-cell>
          <table:table-cell office:value-type="string" office:string-value="unfoldingWord/inventoryst">
            <text:p>unfoldingWord/inventorys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atalon-gatewayEdit-Elsy">
            <text:p>Katalon-gatewayEdit-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Elsy">
            <text:p>https://github.com/unfoldingWord/Katalon-gatewayEdit-Elsy</text:p>
          </table:table-cell>
          <table:table-cell office:value-type="string" office:string-value="2021-09-01T17:45:03Z">
            <text:p>2021-09-01T17:45:03Z</text:p>
          </table:table-cell>
          <table:table-cell office:value-type="string" office:string-value="">
            <text:p/>
          </table:table-cell>
          <table:table-cell office:value-type="string" office:string-value="unfoldingWord/Katalon-gatewayEdit-Elsy">
            <text:p>unfoldingWord/Katalon-gatewayEdit-Els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atalon-gatewayEdit-Koz">
            <text:p>Katalon-gatewayEdit-Koz</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Koz">
            <text:p>https://github.com/unfoldingWord/Katalon-gatewayEdit-Koz</text:p>
          </table:table-cell>
          <table:table-cell office:value-type="string" office:string-value="2021-05-22T18:43:04Z">
            <text:p>2021-05-22T18:43:04Z</text:p>
          </table:table-cell>
          <table:table-cell office:value-type="string" office:string-value="">
            <text:p/>
          </table:table-cell>
          <table:table-cell office:value-type="string" office:string-value="unfoldingWord/Katalon-gatewayEdit-Koz">
            <text:p>unfoldingWord/Katalon-gatewayEdit-Koz</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atalon_MD-TSV_Converter_Koz">
            <text:p>Katalon_MD-TSV_Converter_Koz</text:p>
          </table:table-cell>
          <table:table-cell office:value-type="string" office:string-value="unfoldingWord">
            <text:p>unfoldingWord</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https://github.com/unfoldingWord/Katalon_MD-TSV_Converter_Koz">
            <text:p>https://github.com/unfoldingWord/Katalon_MD-TSV_Converter_Koz</text:p>
          </table:table-cell>
          <table:table-cell office:value-type="string" office:string-value="2021-07-01T04:36:22Z">
            <text:p>2021-07-01T04:36:22Z</text:p>
          </table:table-cell>
          <table:table-cell office:value-type="string" office:string-value="">
            <text:p/>
          </table:table-cell>
          <table:table-cell office:value-type="string" office:string-value="unfoldingWord/Katalon_MD-TSV_Converter_Koz">
            <text:p>unfoldingWord/Katalon_MD-TSV_Converter_Koz</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atalon_tC_Create">
            <text:p>Katalon_tC_Crea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https://github.com/unfoldingWord/Katalon_tC_Create">
            <text:p>https://github.com/unfoldingWord/Katalon_tC_Create</text:p>
          </table:table-cell>
          <table:table-cell office:value-type="string" office:string-value="2021-07-08T17:16:26Z">
            <text:p>2021-07-08T17:16:26Z</text:p>
          </table:table-cell>
          <table:table-cell office:value-type="string" office:string-value="">
            <text:p/>
          </table:table-cell>
          <table:table-cell office:value-type="string" office:string-value="unfoldingWord/Katalon_tC_Create">
            <text:p>unfoldingWord/Katalon_tC_Creat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keybase_git_backup">
            <text:p>keybase_git_backu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keybase_git_backup">
            <text:p>https://github.com/unfoldingWord/keybase_git_backup</text:p>
          </table:table-cell>
          <table:table-cell office:value-type="string" office:string-value="2026-06-04T15:11:14Z">
            <text:p>2026-06-04T15:11:14Z</text:p>
          </table:table-cell>
          <table:table-cell office:value-type="string" office:string-value="">
            <text:p/>
          </table:table-cell>
          <table:table-cell office:value-type="string" office:string-value="unfoldingWord/keybase_git_backup">
            <text:p>unfoldingWord/keybase_git_backu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r1-data-scripts">
            <text:p>kr1-data-script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kr1-data-scripts">
            <text:p>https://github.com/unfoldingWord/kr1-data-scripts</text:p>
          </table:table-cell>
          <table:table-cell office:value-type="string" office:string-value="2025-12-12T04:31:59Z">
            <text:p>2025-12-12T04:31:59Z</text:p>
          </table:table-cell>
          <table:table-cell office:value-type="string" office:string-value="">
            <text:p/>
          </table:table-cell>
          <table:table-cell office:value-type="string" office:string-value="unfoldingWord/kr1-data-scripts">
            <text:p>unfoldingWord/kr1-data-scrip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mbda-tw-strongs-list-generator">
            <text:p>lambda-tw-strongs-list-generato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lambda-tw-strongs-list-generator">
            <text:p>https://github.com/unfoldingWord/lambda-tw-strongs-list-generator</text:p>
          </table:table-cell>
          <table:table-cell office:value-type="string" office:string-value="2025-09-10T12:36:11Z">
            <text:p>2025-09-10T12:36:11Z</text:p>
          </table:table-cell>
          <table:table-cell office:value-type="string" office:string-value="">
            <text:p/>
          </table:table-cell>
          <table:table-cell office:value-type="string" office:string-value="unfoldingWord/lambda-tw-strongs-list-generator">
            <text:p>unfoldingWord/lambda-tw-strongs-list-generato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nguage-search">
            <text:p>language-search</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https://github.com/unfoldingWord/language-search">
            <text:p>https://github.com/unfoldingWord/language-search</text:p>
          </table:table-cell>
          <table:table-cell office:value-type="string" office:string-value="2025-12-18T16:25:08Z">
            <text:p>2025-12-18T16:25:08Z</text:p>
          </table:table-cell>
          <table:table-cell office:value-type="string" office:string-value="">
            <text:p/>
          </table:table-cell>
          <table:table-cell office:value-type="string" office:string-value="unfoldingWord/language-search">
            <text:p>unfoldingWord/language-search</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exicon-poc">
            <text:p>lexicon-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lexicon-poc">
            <text:p>https://github.com/unfoldingWord-box3/lexicon-poc</text:p>
          </table:table-cell>
          <table:table-cell office:value-type="string" office:string-value="2021-10-20T10:56:31Z">
            <text:p>2021-10-20T10:56:31Z</text:p>
          </table:table-cell>
          <table:table-cell office:value-type="string" office:string-value="">
            <text:p/>
          </table:table-cell>
          <table:table-cell office:value-type="string" office:string-value="unfoldingWord-box3/lexicon-poc">
            <text:p>unfoldingWord-box3/lexicon-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oki-exporter">
            <text:p>loki-export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loki-exporter">
            <text:p>https://github.com/unfoldingWord/loki-exporter</text:p>
          </table:table-cell>
          <table:table-cell office:value-type="string" office:string-value="2026-05-08T16:01:37Z">
            <text:p>2026-05-08T16:01:37Z</text:p>
          </table:table-cell>
          <table:table-cell office:value-type="string" office:string-value="">
            <text:p/>
          </table:table-cell>
          <table:table-cell office:value-type="string" office:string-value="unfoldingWord/loki-exporter">
            <text:p>unfoldingWord/loki-expor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dia">
            <text:p>media</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media">
            <text:p>https://github.com/unfoldingWord-dev/media</text:p>
          </table:table-cell>
          <table:table-cell office:value-type="string" office:string-value="2015-06-23T21:37:51Z">
            <text:p>2015-06-23T21:37:51Z</text:p>
          </table:table-cell>
          <table:table-cell office:value-type="string" office:string-value="">
            <text:p/>
          </table:table-cell>
          <table:table-cell office:value-type="string" office:string-value="unfoldingWord-dev/media">
            <text:p>unfoldingWord-dev/med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trics">
            <text:p>metric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0">
            <text:p>0</text:p>
          </table:table-cell>
          <table:table-cell office:value-type="string" office:string-value="0">
            <text:p>0</text:p>
          </table:table-cell>
          <table:table-cell office:value-type="string" office:string-value="https://github.com/unfoldingWord/metrics">
            <text:p>https://github.com/unfoldingWord/metrics</text:p>
          </table:table-cell>
          <table:table-cell office:value-type="string" office:string-value="2026-02-18T15:31:37Z">
            <text:p>2026-02-18T15:31:37Z</text:p>
          </table:table-cell>
          <table:table-cell office:value-type="string" office:string-value="">
            <text:p/>
          </table:table-cell>
          <table:table-cell office:value-type="string" office:string-value="unfoldingWord/metrics">
            <text:p>unfoldingWord/metric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cell office:value-type="string" office:string-value="">
            <text:p/>
          </table:table-cell>
          <table:table-cell office:value-type="string" office:string-value="unfoldingWord-box3/mini-sb-handler">
            <text:p>unfoldingWord-box3/mini-sb-hand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initracker">
            <text:p>minitrac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https://github.com/unfoldingWord/minitracker">
            <text:p>https://github.com/unfoldingWord/minitracker</text:p>
          </table:table-cell>
          <table:table-cell office:value-type="string" office:string-value="2026-06-03T16:02:34Z">
            <text:p>2026-06-03T16:02:34Z</text:p>
          </table:table-cell>
          <table:table-cell office:value-type="string" office:string-value="">
            <text:p/>
          </table:table-cell>
          <table:table-cell office:value-type="string" office:string-value="unfoldingWord/minitracker">
            <text:p>unfoldingWord/minitrack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ionImport">
            <text:p>NotionImport</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NotionImport">
            <text:p>https://github.com/unfoldingWord-box3/NotionImport</text:p>
          </table:table-cell>
          <table:table-cell office:value-type="string" office:string-value="2023-10-23T20:12:59Z">
            <text:p>2023-10-23T20:12:59Z</text:p>
          </table:table-cell>
          <table:table-cell office:value-type="string" office:string-value="">
            <text:p/>
          </table:table-cell>
          <table:table-cell office:value-type="string" office:string-value="unfoldingWord-box3/NotionImport">
            <text:p>unfoldingWord-box3/Notion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smsg">
            <text:p>nsms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nsmsg">
            <text:p>https://github.com/unfoldingWord-dev/nsmsg</text:p>
          </table:table-cell>
          <table:table-cell office:value-type="string" office:string-value="2015-06-23T21:40:04Z">
            <text:p>2015-06-23T21:40:04Z</text:p>
          </table:table-cell>
          <table:table-cell office:value-type="string" office:string-value="unfoldingWord-dev/nsmsg">
            <text:p>unfoldingWord-dev/nsmsg</text:p>
          </table:table-cell>
          <table:table-cell office:value-type="string" office:string-value="unfoldingWord-dev/nsmsg">
            <text:p>unfoldingWord-dev/nsmsg</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cell office:value-type="string" office:string-value="">
            <text:p/>
          </table:table-cell>
          <table:table-cell office:value-type="string" office:string-value="unfoldingWord/obs-app">
            <text:p>unfoldingWord/obs-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comparer">
            <text:p>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bs-comparer">
            <text:p>https://github.com/unfoldingWord-dev/obs-comparer</text:p>
          </table:table-cell>
          <table:table-cell office:value-type="string" office:string-value="2015-04-11T06:23:30Z">
            <text:p>2015-04-11T06:23:30Z</text:p>
          </table:table-cell>
          <table:table-cell office:value-type="string" office:string-value="">
            <text:p/>
          </table:table-cell>
          <table:table-cell office:value-type="string" office:string-value="unfoldingWord-dev/obs-comparer">
            <text:p>unfoldingWord-dev/obs-compar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data">
            <text:p>obs-dat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ata">
            <text:p>https://github.com/unfoldingWord-dev/obs-data</text:p>
          </table:table-cell>
          <table:table-cell office:value-type="string" office:string-value="2018-03-24T13:00:11Z">
            <text:p>2018-03-24T13:00:11Z</text:p>
          </table:table-cell>
          <table:table-cell office:value-type="string" office:string-value="">
            <text:p/>
          </table:table-cell>
          <table:table-cell office:value-type="string" office:string-value="unfoldingWord-dev/obs-data">
            <text:p>unfoldingWord-dev/obs-dat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reader">
            <text:p>obs-reader</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reader">
            <text:p>https://github.com/unfoldingWord-dev/obs-reader</text:p>
          </table:table-cell>
          <table:table-cell office:value-type="string" office:string-value="2015-03-09T22:06:24Z">
            <text:p>2015-03-09T22:06:24Z</text:p>
          </table:table-cell>
          <table:table-cell office:value-type="string" office:string-value="">
            <text:p/>
          </table:table-cell>
          <table:table-cell office:value-type="string" office:string-value="unfoldingWord-dev/obs-reader">
            <text:p>unfoldingWord-dev/obs-read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web">
            <text:p>obs-web</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3">
            <text:p>3</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obs-web">
            <text:p>https://github.com/unfoldingWord/obs-web</text:p>
          </table:table-cell>
          <table:table-cell office:value-type="string" office:string-value="2026-04-27T00:53:46Z">
            <text:p>2026-04-27T00:53:46Z</text:p>
          </table:table-cell>
          <table:table-cell office:value-type="string" office:string-value="">
            <text:p/>
          </table:table-cell>
          <table:table-cell office:value-type="string" office:string-value="unfoldingWord/obs-web">
            <text:p>unfoldingWord/obs-we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_tools">
            <text:p>obs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_tools">
            <text:p>https://github.com/unfoldingWord-dev/obs_tools</text:p>
          </table:table-cell>
          <table:table-cell office:value-type="string" office:string-value="2016-08-29T19:48:09Z">
            <text:p>2016-08-29T19:48:09Z</text:p>
          </table:table-cell>
          <table:table-cell office:value-type="string" office:string-value="">
            <text:p/>
          </table:table-cell>
          <table:table-cell office:value-type="string" office:string-value="unfoldingWord-dev/obs_tools">
            <text:p>unfoldingWord-dev/obs_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dd-claude-plugin">
            <text:p>odd-claude-plugin</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odd-claude-plugin">
            <text:p>https://github.com/unfoldingWord/odd-claude-plugin</text:p>
          </table:table-cell>
          <table:table-cell office:value-type="string" office:string-value="2026-01-22T20:16:13Z">
            <text:p>2026-01-22T20:16:13Z</text:p>
          </table:table-cell>
          <table:table-cell office:value-type="string" office:string-value="">
            <text:p/>
          </table:table-cell>
          <table:table-cell office:value-type="string" office:string-value="unfoldingWord/odd-claude-plugin">
            <text:p>unfoldingWord/odd-claude-plugi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ld-tx-manager-lambda">
            <text:p>old-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lambda">
            <text:p>https://github.com/unfoldingWord-dev/old-tx-manager-lambda</text:p>
          </table:table-cell>
          <table:table-cell office:value-type="string" office:string-value="2017-01-23T14:56:14Z">
            <text:p>2017-01-23T14:56:14Z</text:p>
          </table:table-cell>
          <table:table-cell office:value-type="string" office:string-value="">
            <text:p/>
          </table:table-cell>
          <table:table-cell office:value-type="string" office:string-value="unfoldingWord-dev/old-tx-manager-lambda">
            <text:p>unfoldingWord-dev/old-tx-manager-lambd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g-language-resource-hook">
            <text:p>org-language-resource-hook</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org-language-resource-hook">
            <text:p>https://github.com/unfoldingWord-box3/org-language-resource-hook</text:p>
          </table:table-cell>
          <table:table-cell office:value-type="string" office:string-value="2022-06-14T06:26:30Z">
            <text:p>2022-06-14T06:26:30Z</text:p>
          </table:table-cell>
          <table:table-cell office:value-type="string" office:string-value="">
            <text:p/>
          </table:table-cell>
          <table:table-cell office:value-type="string" office:string-value="unfoldingWord-box3/org-language-resource-hook">
            <text:p>unfoldingWord-box3/org-language-resource-hoo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ges">
            <text:p>page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pages">
            <text:p>https://github.com/unfoldingWord-dev/pages</text:p>
          </table:table-cell>
          <table:table-cell office:value-type="string" office:string-value="2019-02-28T03:39:24Z">
            <text:p>2019-02-28T03:39:24Z</text:p>
          </table:table-cell>
          <table:table-cell office:value-type="string" office:string-value="">
            <text:p/>
          </table:table-cell>
          <table:table-cell office:value-type="string" office:string-value="unfoldingWord-dev/pages">
            <text:p>unfoldingWord-dev/pag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df-splitter">
            <text:p>pdf-splitter</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splitter">
            <text:p>https://github.com/unfoldingWord-box3/pdf-splitter</text:p>
          </table:table-cell>
          <table:table-cell office:value-type="string" office:string-value="2022-02-24T13:17:52Z">
            <text:p>2022-02-24T13:17:52Z</text:p>
          </table:table-cell>
          <table:table-cell office:value-type="string" office:string-value="">
            <text:p/>
          </table:table-cell>
          <table:table-cell office:value-type="string" office:string-value="unfoldingWord-box3/pdf-splitter">
            <text:p>unfoldingWord-box3/pdf-split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i-collab">
            <text:p>pi-collab</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0">
            <text:p>0</text:p>
          </table:table-cell>
          <table:table-cell office:value-type="string" office:string-value="0">
            <text:p>0</text:p>
          </table:table-cell>
          <table:table-cell office:value-type="string" office:string-value="https://github.com/unfoldingWord-dev/pi-collab">
            <text:p>https://github.com/unfoldingWord-dev/pi-collab</text:p>
          </table:table-cell>
          <table:table-cell office:value-type="string" office:string-value="2016-04-22T10:55:48Z">
            <text:p>2016-04-22T10:55:48Z</text:p>
          </table:table-cell>
          <table:table-cell office:value-type="string" office:string-value="">
            <text:p/>
          </table:table-cell>
          <table:table-cell office:value-type="string" office:string-value="unfoldingWord-dev/pi-collab">
            <text:p>unfoldingWord-dev/pi-colla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cell office:value-type="string" office:string-value="">
            <text:p/>
          </table:table-cell>
          <table:table-cell office:value-type="string" office:string-value="unfoldingWord-box3/proskomma-scripture-resources-rcl">
            <text:p>unfoldingWord-box3/proskomma-scripture-resources-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ublishingBlockchain">
            <text:p>PublishingBlockchain</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PublishingBlockchain">
            <text:p>https://github.com/unfoldingWord-dev/PublishingBlockchain</text:p>
          </table:table-cell>
          <table:table-cell office:value-type="string" office:string-value="2018-03-11T20:57:04Z">
            <text:p>2018-03-11T20:57:04Z</text:p>
          </table:table-cell>
          <table:table-cell office:value-type="string" office:string-value="">
            <text:p/>
          </table:table-cell>
          <table:table-cell office:value-type="string" office:string-value="unfoldingWord-dev/PublishingBlockchain">
            <text:p>unfoldingWord-dev/PublishingBlockchai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aws-tools">
            <text:p>python-aws-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python-aws-tools">
            <text:p>https://github.com/unfoldingWord-dev/python-aws-tools</text:p>
          </table:table-cell>
          <table:table-cell office:value-type="string" office:string-value="2017-08-23T22:31:23Z">
            <text:p>2017-08-23T22:31:23Z</text:p>
          </table:table-cell>
          <table:table-cell office:value-type="string" office:string-value="">
            <text:p/>
          </table:table-cell>
          <table:table-cell office:value-type="string" office:string-value="unfoldingWord-dev/python-aws-tools">
            <text:p>unfoldingWord-dev/python-aws-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gitea-client">
            <text:p>python-gitea-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2">
            <text:p>2</text:p>
          </table:table-cell>
          <table:table-cell office:value-type="string" office:string-value="0">
            <text:p>0</text:p>
          </table:table-cell>
          <table:table-cell office:value-type="string" office:string-value="https://github.com/unfoldingWord-dev/python-gitea-client">
            <text:p>https://github.com/unfoldingWord-dev/python-gitea-client</text:p>
          </table:table-cell>
          <table:table-cell office:value-type="string" office:string-value="2025-02-23T11:58:32Z">
            <text:p>2025-02-23T11:58:32Z</text:p>
          </table:table-cell>
          <table:table-cell office:value-type="string" office:string-value="">
            <text:p/>
          </table:table-cell>
          <table:table-cell office:value-type="string" office:string-value="unfoldingWord-dev/python-gitea-client">
            <text:p>unfoldingWord-dev/python-gitea-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resource-container">
            <text:p>python-resource-contain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https://github.com/unfoldingWord-dev/python-resource-container">
            <text:p>https://github.com/unfoldingWord-dev/python-resource-container</text:p>
          </table:table-cell>
          <table:table-cell office:value-type="string" office:string-value="2017-05-04T19:55:10Z">
            <text:p>2017-05-04T19:55:10Z</text:p>
          </table:table-cell>
          <table:table-cell office:value-type="string" office:string-value="">
            <text:p/>
          </table:table-cell>
          <table:table-cell office:value-type="string" office:string-value="unfoldingWord-dev/python-resource-container">
            <text:p>unfoldingWord-dev/python-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c-schema">
            <text:p>rc-schema</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https://github.com/unfoldingWord/rc-schema">
            <text:p>https://github.com/unfoldingWord/rc-schema</text:p>
          </table:table-cell>
          <table:table-cell office:value-type="string" office:string-value="2021-11-30T18:22:18Z">
            <text:p>2021-11-30T18:22:18Z</text:p>
          </table:table-cell>
          <table:table-cell office:value-type="string" office:string-value="">
            <text:p/>
          </table:table-cell>
          <table:table-cell office:value-type="string" office:string-value="unfoldingWord/rc-schema">
            <text:p>unfoldingWord/rc-schem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Container">
            <text:p>Resource-Container</text:p>
          </table:table-cell>
          <table:table-cell office:value-type="string" office:string-value="unfoldingWord-dev">
            <text:p>unfoldingWord-dev</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2">
            <text:p>2</text:p>
          </table:table-cell>
          <table:table-cell office:value-type="string" office:string-value="0">
            <text:p>0</text:p>
          </table:table-cell>
          <table:table-cell office:value-type="string" office:string-value="https://github.com/unfoldingWord-dev/Resource-Container">
            <text:p>https://github.com/unfoldingWord-dev/Resource-Container</text:p>
          </table:table-cell>
          <table:table-cell office:value-type="string" office:string-value="2025-10-09T10:27:37Z">
            <text:p>2025-10-09T10:27:37Z</text:p>
          </table:table-cell>
          <table:table-cell office:value-type="string" office:string-value="">
            <text:p/>
          </table:table-cell>
          <table:table-cell office:value-type="string" office:string-value="unfoldingWord-dev/Resource-Container">
            <text:p>unfoldingWord-dev/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unfoldingword/eslint-config']">
            <text:p>['gitea-react-toolkit', 'markdown-translatable', '@unfoldingword/eslint-config']</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cell office:value-type="string" office:string-value="">
            <text:p/>
          </table:table-cell>
          <table:table-cell office:value-type="string" office:string-value="unfoldingWord-box3/resource-container-rcl">
            <text:p>unfoldingWord-box3/resource-container-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cell office:value-type="string" office:string-value="">
            <text:p/>
          </table:table-cell>
          <table:table-cell office:value-type="string" office:string-value="unfoldingWord-dev/s3_list-zip">
            <text:p>unfoldingWord-dev/s3_list-zi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
            <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cell office:value-type="string" office:string-value="">
            <text:p/>
          </table:table-cell>
          <table:table-cell office:value-type="string" office:string-value="unfoldingWord-box3/scripture-as-graph">
            <text:p>unfoldingWord-box3/scripture-as-graph</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wordmap-lexer']">
            <text:p>['string-punctuation-tokenizer', 'tc-tool', 'usfm-js', 'wordmap-lexer']</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19-10-22T19:35:10Z">
            <text:p>2019-10-22T19:35:10Z</text:p>
          </table:table-cell>
          <table:table-cell office:value-type="string" office:string-value="">
            <text:p/>
          </table:table-cell>
          <table:table-cell office:value-type="string" office:string-value="unfoldingWord-dev/ScripturePane">
            <text:p>unfoldingWord-dev/ScripturePan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gadd">
            <text:p>sigadd</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sigadd">
            <text:p>https://github.com/unfoldingWord-dev/sigadd</text:p>
          </table:table-cell>
          <table:table-cell office:value-type="string" office:string-value="2015-04-01T22:00:28Z">
            <text:p>2015-04-01T22:00:28Z</text:p>
          </table:table-cell>
          <table:table-cell office:value-type="string" office:string-value="">
            <text:p/>
          </table:table-cell>
          <table:table-cell office:value-type="string" office:string-value="unfoldingWord-dev/sigadd">
            <text:p>unfoldingWord-dev/sigad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L_API_loader">
            <text:p>SIL_API_loader</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SIL_API_loader">
            <text:p>https://github.com/unfoldingWord-box3/SIL_API_loader</text:p>
          </table:table-cell>
          <table:table-cell office:value-type="string" office:string-value="2023-06-29T15:32:27Z">
            <text:p>2023-06-29T15:32:27Z</text:p>
          </table:table-cell>
          <table:table-cell office:value-type="string" office:string-value="">
            <text:p/>
          </table:table-cell>
          <table:table-cell office:value-type="string" office:string-value="unfoldingWord-box3/SIL_API_loader">
            <text:p>unfoldingWord-box3/SIL_API_load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cell office:value-type="string" office:string-value="">
            <text:p/>
          </table:table-cell>
          <table:table-cell office:value-type="string" office:string-value="unfoldingWord-box3/Simplify">
            <text:p>unfoldingWord-box3/Simplif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lack-lambda">
            <text:p>slack-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slack-lambda">
            <text:p>https://github.com/unfoldingWord-dev/slack-lambda</text:p>
          </table:table-cell>
          <table:table-cell office:value-type="string" office:string-value="2017-03-15T16:22:01Z">
            <text:p>2017-03-15T16:22:01Z</text:p>
          </table:table-cell>
          <table:table-cell office:value-type="string" office:string-value="">
            <text:p/>
          </table:table-cell>
          <table:table-cell office:value-type="string" office:string-value="unfoldingWord-dev/slack-lambda">
            <text:p>unfoldingWord-dev/slack-lambd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eechToText">
            <text:p>SpeechTo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eechToText">
            <text:p>https://github.com/unfoldingWord-box3/SpeechToText</text:p>
          </table:table-cell>
          <table:table-cell office:value-type="string" office:string-value="2024-03-13T21:24:03Z">
            <text:p>2024-03-13T21:24:03Z</text:p>
          </table:table-cell>
          <table:table-cell office:value-type="string" office:string-value="">
            <text:p/>
          </table:table-cell>
          <table:table-cell office:value-type="string" office:string-value="unfoldingWord-box3/SpeechToText">
            <text:p>unfoldingWord-box3/SpeechTo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AudioByText">
            <text:p>SplitAudioBy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litAudioByText">
            <text:p>https://github.com/unfoldingWord-box3/SplitAudioByText</text:p>
          </table:table-cell>
          <table:table-cell office:value-type="string" office:string-value="2025-03-06T20:43:12Z">
            <text:p>2025-03-06T20:43:12Z</text:p>
          </table:table-cell>
          <table:table-cell office:value-type="string" office:string-value="">
            <text:p/>
          </table:table-cell>
          <table:table-cell office:value-type="string" office:string-value="unfoldingWord-box3/SplitAudioByText">
            <text:p>unfoldingWord-box3/SplitAudioBy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9T18:54:12Z">
            <text:p>2026-06-09T18:54:12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
            <text:p/>
          </table:table-cell>
          <table:table-cell office:value-type="string" office:string-value="tc-create-app">
            <text:p>tc-create-app</text:p>
          </table:table-cell>
          <table:table-cell office:value-type="string" office:string-value="False">
            <text:p>False</text:p>
          </table:table-cell>
          <table:table-cell office:value-type="string" office:string-value="73">
            <text:p>73</text:p>
          </table:table-cell>
          <table:table-cell office:value-type="string" office:string-value="2022-02-22T21:12:10.659Z">
            <text:p>2022-02-22T21:12:10.659Z</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
            <text:p>['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73 downloads in the last year) and no detected local consumers.">
            <text:p>Package has low but nonzero npm usage (73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helps-skills">
            <text:p>tc-helps-skil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https://github.com/unfoldingWord/tc-helps-skills">
            <text:p>https://github.com/unfoldingWord/tc-helps-skills</text:p>
          </table:table-cell>
          <table:table-cell office:value-type="string" office:string-value="2026-04-07T21:29:27Z">
            <text:p>2026-04-07T21:29:27Z</text:p>
          </table:table-cell>
          <table:table-cell office:value-type="string" office:string-value="">
            <text:p/>
          </table:table-cell>
          <table:table-cell office:value-type="string" office:string-value="unfoldingWord/tc-helps-skills">
            <text:p>unfoldingWord/tc-helps-skil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indexeddb">
            <text:p>unfoldingWord/tc-study/@bt-synergy/catalog-adapter-indexeddb</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memory">
            <text:p>unfoldingWord/tc-study/@bt-synergy/catalog-adapter-memo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sqlite">
            <text:p>unfoldingWord/tc-study/@bt-synergy/catalog-adapter-sqli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cli">
            <text:p>unfoldingWord/tc-study/@bt-synergy/catalog-cl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manager">
            <text:p>unfoldingWord/tc-study/@bt-synergy/catalog-manag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door43-api">
            <text:p>unfoldingWord/tc-study/@bt-synergy/door43-ap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actions">
            <text:p>unfoldingWord/tc-study/@bt-synergy/resource-action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adapters">
            <text:p>unfoldingWord/tc-study/@bt-synergy/resource-adapt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bundler">
            <text:p>unfoldingWord/tc-study/@bt-synergy/resource-bu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ache">
            <text:p>unfoldingWord/tc-study/@bt-synergy/resource-cach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atalog">
            <text:p>unfoldingWord/tc-study/@bt-synergy/resource-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li">
            <text:p>unfoldingWord/tc-study/@bt-synergy/resource-cl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ckage-builder">
            <text:p>unfoldingWord/tc-study/@bt-synergy/resource-package-buil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nels">
            <text:p>unfoldingWord/tc-study/@bt-synergy/resource-panel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rsers">
            <text:p>unfoldingWord/tc-study/@bt-synergy/resource-pars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selection">
            <text:p>unfoldingWord/tc-study/@bt-synergy/resource-selectio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signals">
            <text:p>unfoldingWord/tc-study/@bt-synergy/resource-signal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types">
            <text:p>unfoldingWord/tc-study/@bt-synergy/resource-typ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loader">
            <text:p>unfoldingWord/tc-study/@bt-synergy/scripture-loa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nified-catalog-store">
            <text:p>unfoldingWord/tc-study/@bt-synergy/unified-catalog-stor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toolkit/resource-downloader">
            <text:p>unfoldingWord/tc-study/@bt-toolkit/resource-downloa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resource-panels-spike">
            <text:p>unfoldingWord/tc-study/resource-panels-spik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Daniel">
            <text:p>tCCreateQA-Daniel</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tCCreateQA-Daniel">
            <text:p>https://github.com/unfoldingWord/tCCreateQA-Daniel</text:p>
          </table:table-cell>
          <table:table-cell office:value-type="string" office:string-value="2023-02-15T18:34:00Z">
            <text:p>2023-02-15T18:34:00Z</text:p>
          </table:table-cell>
          <table:table-cell office:value-type="string" office:string-value="">
            <text:p/>
          </table:table-cell>
          <table:table-cell office:value-type="string" office:string-value="unfoldingWord/tCCreateQA-Daniel">
            <text:p>unfoldingWord/tCCreateQA-Danie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elsy">
            <text:p>tcCreateQA-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https://github.com/unfoldingWord/tcCreateQA-elsy">
            <text:p>https://github.com/unfoldingWord/tcCreateQA-elsy</text:p>
          </table:table-cell>
          <table:table-cell office:value-type="string" office:string-value="2022-04-21T19:00:59Z">
            <text:p>2022-04-21T19:00:59Z</text:p>
          </table:table-cell>
          <table:table-cell office:value-type="string" office:string-value="">
            <text:p/>
          </table:table-cell>
          <table:table-cell office:value-type="string" office:string-value="unfoldingWord/tcCreateQA-elsy">
            <text:p>unfoldingWord/tcCreateQA-els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d-legacy">
            <text:p>td-legac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d-legacy">
            <text:p>https://github.com/unfoldingWord/td-legacy</text:p>
          </table:table-cell>
          <table:table-cell office:value-type="string" office:string-value="2023-06-06T09:41:14Z">
            <text:p>2023-06-06T09:41:14Z</text:p>
          </table:table-cell>
          <table:table-cell office:value-type="string" office:string-value="">
            <text:p/>
          </table:table-cell>
          <table:table-cell office:value-type="string" office:string-value="unfoldingWord/td-legacy">
            <text:p>unfoldingWord/td-legac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neo4j-poc">
            <text:p>td-neo4j-poc</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ox3/td-neo4j-poc">
            <text:p>https://github.com/unfoldingWord-box3/td-neo4j-poc</text:p>
          </table:table-cell>
          <table:table-cell office:value-type="string" office:string-value="2019-04-25T18:44:29Z">
            <text:p>2019-04-25T18:44:29Z</text:p>
          </table:table-cell>
          <table:table-cell office:value-type="string" office:string-value="">
            <text:p/>
          </table:table-cell>
          <table:table-cell office:value-type="string" office:string-value="unfoldingWord-box3/td-neo4j-poc">
            <text:p>unfoldingWord-box3/td-neo4j-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
            <text:p>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_add_scripture_links">
            <text:p>tn_add_scripture_link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n_add_scripture_links">
            <text:p>https://github.com/unfoldingWord-dev/tn_add_scripture_links</text:p>
          </table:table-cell>
          <table:table-cell office:value-type="string" office:string-value="2025-07-29T19:12:09Z">
            <text:p>2025-07-29T19:12:09Z</text:p>
          </table:table-cell>
          <table:table-cell office:value-type="string" office:string-value="">
            <text:p/>
          </table:table-cell>
          <table:table-cell office:value-type="string" office:string-value="unfoldingWord-dev/tn_add_scripture_links">
            <text:p>unfoldingWord-dev/tn_add_scripture_link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ols">
            <text:p>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13">
            <text:p>13</text:p>
          </table:table-cell>
          <table:table-cell office:value-type="string" office:string-value="13">
            <text:p>13</text:p>
          </table:table-cell>
          <table:table-cell office:value-type="string" office:string-value="git@git.door43.org:unfoldingWord-dev/tx-dev-dcs.git">
            <text:p>git@git.door43.org:unfoldingWord-dev/tx-dev-dcs.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tools">
            <text:p>https://github.com/unfoldingWord-dev/tools</text:p>
          </table:table-cell>
          <table:table-cell office:value-type="string" office:string-value="2026-03-15T03:14:48Z">
            <text:p>2026-03-15T03:14:48Z</text:p>
          </table:table-cell>
          <table:table-cell office:value-type="string" office:string-value="">
            <text:p/>
          </table:table-cell>
          <table:table-cell office:value-type="string" office:string-value="unfoldingWord-dev/tools">
            <text:p>unfoldingWord-dev/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requirements">
            <text:p>tr-requiremen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requirements">
            <text:p>https://github.com/unfoldingWord-dev/tr-requirements</text:p>
          </table:table-cell>
          <table:table-cell office:value-type="string" office:string-value="2015-06-24T21:29:18Z">
            <text:p>2015-06-24T21:29:18Z</text:p>
          </table:table-cell>
          <table:table-cell office:value-type="string" office:string-value="">
            <text:p/>
          </table:table-cell>
          <table:table-cell office:value-type="string" office:string-value="unfoldingWord-dev/tr-requirements">
            <text:p>unfoldingWord-dev/tr-requiremen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cell office:value-type="string" office:string-value="">
            <text:p/>
          </table:table-cell>
          <table:table-cell office:value-type="string" office:string-value="unfoldingWord-box3/translation-helps-print-preview">
            <text:p>unfoldingWord-box3/translation-helps-print-preview</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uw-tsv-parser']">
            <text:p>['bible-reference-range', 'checking-tool-wrapper', 'gogs-client', 'selections', 'string-punctuation-tokenizer', 'tc-source-content-updater', 'tc-strings', 'tc-tool', 'tc-ui-toolkit', 'tsv-groupdata-parser', 'usfm-js', 'word-aligner', 'wordmap', 'wordmap-lexer', 'electronite', 'uw-tsv-parser']</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6">
            <text:p>13586</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cell office:value-type="string" office:string-value="">
            <text:p/>
          </table:table-cell>
          <table:table-cell office:value-type="string" office:string-value="unfoldingWord/translationCore">
            <text:p>unfoldingWord/translationCor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
            <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gogs-client', 'selections', 'string-punctuation-tokenizer', 'tc-ui-toolkit', 'usfm-js', 'word-aligner', 'wordmap-lexer', 'tc-strings']">
            <text:p>['checking-tool-wrapper', 'tc-tool', 'gogs-client', 'selections', 'string-punctuation-tokenizer', 'tc-ui-toolkit', 'usfm-js', 'word-aligner', 'wordmap-lexer', 'tc-strings']</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cell office:value-type="string" office:string-value="unfoldingWord/translationNotes">
            <text:p>unfoldingWord/translationNotes</text:p>
          </table:table-cell>
          <table:table-cell office:value-type="string" office:string-value="unfoldingWord/translationNotes">
            <text:p>unfoldingWord/translationNote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
            <text:p>translationNote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Notes">
            <text:p>https://github.com/unfoldingWord-dev/translationNotes</text:p>
          </table:table-cell>
          <table:table-cell office:value-type="string" office:string-value="2016-08-15T16:29:38Z">
            <text:p>2016-08-15T16:29:38Z</text:p>
          </table:table-cell>
          <table:table-cell office:value-type="string" office:string-value="">
            <text:p/>
          </table:table-cell>
          <table:table-cell office:value-type="string" office:string-value="unfoldingWord-dev/translationNotes">
            <text:p>unfoldingWord-dev/translationNot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Recorder-Info">
            <text:p>translationRecorde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1">
            <text:p>1</text:p>
          </table:table-cell>
          <table:table-cell office:value-type="string" office:string-value="0">
            <text:p>0</text:p>
          </table:table-cell>
          <table:table-cell office:value-type="string" office:string-value="https://github.com/unfoldingWord-dev/translationRecorder-Info">
            <text:p>https://github.com/unfoldingWord-dev/translationRecorder-Info</text:p>
          </table:table-cell>
          <table:table-cell office:value-type="string" office:string-value="2025-10-09T10:37:04Z">
            <text:p>2025-10-09T10:37:04Z</text:p>
          </table:table-cell>
          <table:table-cell office:value-type="string" office:string-value="">
            <text:p/>
          </table:table-cell>
          <table:table-cell office:value-type="string" office:string-value="unfoldingWord-dev/translationRecorder-Info">
            <text:p>unfoldingWord-dev/translationRecorder-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Studio-Info">
            <text:p>translationStudio-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Studio-Info">
            <text:p>https://github.com/unfoldingWord-dev/translationStudio-Info</text:p>
          </table:table-cell>
          <table:table-cell office:value-type="string" office:string-value="2025-10-09T10:40:07Z">
            <text:p>2025-10-09T10:40:07Z</text:p>
          </table:table-cell>
          <table:table-cell office:value-type="string" office:string-value="">
            <text:p/>
          </table:table-cell>
          <table:table-cell office:value-type="string" office:string-value="unfoldingWord-dev/translationStudio-Info">
            <text:p>unfoldingWord-dev/translationStudio-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
            <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gogs-client', 'selections', 'string-punctuation-tokenizer', 'tc-ui-toolkit', 'usfm-js', 'word-aligner', 'wordmap-lexer', 'tc-strings']">
            <text:p>['checking-tool-wrapper', 'tc-tool', 'gogs-client', 'selections', 'string-punctuation-tokenizer', 'tc-ui-toolkit', 'usfm-js', 'word-aligner', 'wordmap-lexer', 'tc-strings']</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cell office:value-type="string" office:string-value="unfoldingWord/translationWords">
            <text:p>unfoldingWord/translationWords</text:p>
          </table:table-cell>
          <table:table-cell office:value-type="string" office:string-value="unfoldingWord/translationWords">
            <text:p>unfoldingWord/translationWord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Words-tC">
            <text:p>translationWords-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Words-tC">
            <text:p>https://github.com/unfoldingWord-dev/translationWords-tC</text:p>
          </table:table-cell>
          <table:table-cell office:value-type="string" office:string-value="2016-08-15T16:26:26Z">
            <text:p>2016-08-15T16:26:26Z</text:p>
          </table:table-cell>
          <table:table-cell office:value-type="string" office:string-value="">
            <text:p/>
          </table:table-cell>
          <table:table-cell office:value-type="string" office:string-value="unfoldingWord-dev/translationWords-tC">
            <text:p>unfoldingWord-dev/translationWords-t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android">
            <text:p>ts-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651">
            <text:p>65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1">
            <text:p>61</text:p>
          </table:table-cell>
          <table:table-cell office:value-type="string" office:string-value="2302">
            <text:p>2302</text:p>
          </table:table-cell>
          <table:table-cell office:value-type="string" office:string-value="https://github.com/unfoldingWord-dev/ts-android">
            <text:p>https://github.com/unfoldingWord-dev/ts-android</text:p>
          </table:table-cell>
          <table:table-cell office:value-type="string" office:string-value="2026-04-22T14:45:07Z">
            <text:p>2026-04-22T14:45:07Z</text:p>
          </table:table-cell>
          <table:table-cell office:value-type="string" office:string-value="">
            <text:p/>
          </table:table-cell>
          <table:table-cell office:value-type="string" office:string-value="unfoldingWord-dev/ts-android">
            <text:p>unfoldingWord-dev/ts-android</text:p>
          </table:table-cell>
          <table:table-cell office:value-type="string" office:string-value="1-Manual review">
            <text:p>1-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desktop">
            <text:p>ts-deskto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182">
            <text:p>182</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29">
            <text:p>29</text:p>
          </table:table-cell>
          <table:table-cell office:value-type="string" office:string-value="14397">
            <text:p>14397</text:p>
          </table:table-cell>
          <table:table-cell office:value-type="string" office:string-value="https://github.com/unfoldingWord-dev/ts-desktop">
            <text:p>https://github.com/unfoldingWord-dev/ts-desktop</text:p>
          </table:table-cell>
          <table:table-cell office:value-type="string" office:string-value="2026-04-22T14:46:49Z">
            <text:p>2026-04-22T14:46:49Z</text:p>
          </table:table-cell>
          <table:table-cell office:value-type="string" office:string-value="">
            <text:p/>
          </table:table-cell>
          <table:table-cell office:value-type="string" office:string-value="unfoldingWord-dev/ts-desktop">
            <text:p>unfoldingWord-dev/ts-desktop</text:p>
          </table:table-cell>
          <table:table-cell office:value-type="string" office:string-value="1-Manual review">
            <text:p>1-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exports">
            <text:p>ts-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ts-exports">
            <text:p>https://github.com/unfoldingWord-dev/ts-exports</text:p>
          </table:table-cell>
          <table:table-cell office:value-type="string" office:string-value="2015-06-23T21:38:46Z">
            <text:p>2015-06-23T21:38:46Z</text:p>
          </table:table-cell>
          <table:table-cell office:value-type="string" office:string-value="">
            <text:p/>
          </table:table-cell>
          <table:table-cell office:value-type="string" office:string-value="unfoldingWord-dev/ts-exports">
            <text:p>unfoldingWord-dev/ts-expor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requirements">
            <text:p>ts-requirements</text:p>
          </table:table-cell>
          <table:table-cell office:value-type="string" office:string-value="unfoldingWord-dev">
            <text:p>unfoldingWord-dev</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131">
            <text:p>13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0">
            <text:p>0</text:p>
          </table:table-cell>
          <table:table-cell office:value-type="string" office:string-value="0">
            <text:p>0</text:p>
          </table:table-cell>
          <table:table-cell office:value-type="string" office:string-value="https://github.com/unfoldingWord-dev/ts-requirements">
            <text:p>https://github.com/unfoldingWord-dev/ts-requirements</text:p>
          </table:table-cell>
          <table:table-cell office:value-type="string" office:string-value="2016-12-07T22:47:45Z">
            <text:p>2016-12-07T22:47:45Z</text:p>
          </table:table-cell>
          <table:table-cell office:value-type="string" office:string-value="">
            <text:p/>
          </table:table-cell>
          <table:table-cell office:value-type="string" office:string-value="unfoldingWord-dev/ts-requirements">
            <text:p>unfoldingWord-dev/ts-requirements</text:p>
          </table:table-cell>
          <table:table-cell office:value-type="string" office:string-value="1-Manual review">
            <text:p>1-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tats">
            <text:p>ts-sta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s-stats">
            <text:p>https://github.com/unfoldingWord-dev/ts-stats</text:p>
          </table:table-cell>
          <table:table-cell office:value-type="string" office:string-value="2021-08-10T11:28:53Z">
            <text:p>2021-08-10T11:28:53Z</text:p>
          </table:table-cell>
          <table:table-cell office:value-type="string" office:string-value="">
            <text:p/>
          </table:table-cell>
          <table:table-cell office:value-type="string" office:string-value="unfoldingWord-dev/ts-stats">
            <text:p>unfoldingWord-dev/ts-sta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_consistency">
            <text:p>tw_consistenc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tw_consistency">
            <text:p>https://github.com/unfoldingWord-dev/tw_consistency</text:p>
          </table:table-cell>
          <table:table-cell office:value-type="string" office:string-value="2017-06-16T19:00:44Z">
            <text:p>2017-06-16T19:00:44Z</text:p>
          </table:table-cell>
          <table:table-cell office:value-type="string" office:string-value="">
            <text:p/>
          </table:table-cell>
          <table:table-cell office:value-type="string" office:string-value="unfoldingWord-dev/tw_consistency">
            <text:p>unfoldingWord-dev/tw_consistenc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in-ahk">
            <text:p>twin-ahk</text:p>
          </table:table-cell>
          <table:table-cell office:value-type="string" office:string-value="unfoldingWord-box3">
            <text:p>unfoldingWord-box3</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win-ahk">
            <text:p>https://github.com/unfoldingWord-box3/twin-ahk</text:p>
          </table:table-cell>
          <table:table-cell office:value-type="string" office:string-value="2024-05-21T01:35:54Z">
            <text:p>2024-05-21T01:35:54Z</text:p>
          </table:table-cell>
          <table:table-cell office:value-type="string" office:string-value="">
            <text:p/>
          </table:table-cell>
          <table:table-cell office:value-type="string" office:string-value="unfoldingWord-box3/twin-ahk">
            <text:p>unfoldingWord-box3/twin-ahk</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
            <text:p>tx</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
            <text:p>https://github.com/unfoldingWord-dev/tx</text:p>
          </table:table-cell>
          <table:table-cell office:value-type="string" office:string-value="2025-10-09T10:49:37Z">
            <text:p>2025-10-09T10:49:37Z</text:p>
          </table:table-cell>
          <table:table-cell office:value-type="string" office:string-value="">
            <text:p/>
          </table:table-cell>
          <table:table-cell office:value-type="string" office:string-value="unfoldingWord-dev/tx">
            <text:p>unfoldingWord-dev/tx</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
            <text:p>tx-dev</text:p>
          </table:table-cell>
          <table:table-cell office:value-type="string" office:string-value="unfoldingWord">
            <text:p>unfoldingWor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x-dev">
            <text:p>https://github.com/unfoldingWord/tx-dev</text:p>
          </table:table-cell>
          <table:table-cell office:value-type="string" office:string-value="2022-12-12T05:15:44Z">
            <text:p>2022-12-12T05:15:44Z</text:p>
          </table:table-cell>
          <table:table-cell office:value-type="string" office:string-value="">
            <text:p/>
          </table:table-cell>
          <table:table-cell office:value-type="string" office:string-value="unfoldingWord/tx-dev">
            <text:p>unfoldingWord/tx-dev</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cs">
            <text:p>tx-dev-dc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x-dev-dcs">
            <text:p>https://github.com/unfoldingWord/tx-dev-dcs</text:p>
          </table:table-cell>
          <table:table-cell office:value-type="string" office:string-value="2022-10-05T18:56:57Z">
            <text:p>2022-10-05T18:56:57Z</text:p>
          </table:table-cell>
          <table:table-cell office:value-type="string" office:string-value="">
            <text:p/>
          </table:table-cell>
          <table:table-cell office:value-type="string" office:string-value="unfoldingWord/tx-dev-dcs">
            <text:p>unfoldingWord/tx-dev-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oor43">
            <text:p>tx-dev-door43</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dev-door43">
            <text:p>https://github.com/unfoldingWord-dev/tx-dev-door43</text:p>
          </table:table-cell>
          <table:table-cell office:value-type="string" office:string-value="2021-07-12T21:58:43Z">
            <text:p>2021-07-12T21:58:43Z</text:p>
          </table:table-cell>
          <table:table-cell office:value-type="string" office:string-value="">
            <text:p/>
          </table:table-cell>
          <table:table-cell office:value-type="string" office:string-value="unfoldingWord-dev/tx-dev-door43">
            <text:p>unfoldingWord-dev/tx-dev-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oor43">
            <text:p>tx-door43</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door43">
            <text:p>https://github.com/unfoldingWord-dev/tx-door43</text:p>
          </table:table-cell>
          <table:table-cell office:value-type="string" office:string-value="2026-03-15T03:15:10Z">
            <text:p>2026-03-15T03:15:10Z</text:p>
          </table:table-cell>
          <table:table-cell office:value-type="string" office:string-value="">
            <text:p/>
          </table:table-cell>
          <table:table-cell office:value-type="string" office:string-value="unfoldingWord-dev/tx-door43">
            <text:p>unfoldingWord-dev/tx-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enqueue-job">
            <text:p>tx-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0">
            <text:p>20</text:p>
          </table:table-cell>
          <table:table-cell office:value-type="string" office:string-value="0">
            <text:p>0</text:p>
          </table:table-cell>
          <table:table-cell office:value-type="string" office:string-value="https://github.com/unfoldingWord/tx-enqueue-job">
            <text:p>https://github.com/unfoldingWord/tx-enqueue-job</text:p>
          </table:table-cell>
          <table:table-cell office:value-type="string" office:string-value="2024-02-06T15:23:21Z">
            <text:p>2024-02-06T15:23:21Z</text:p>
          </table:table-cell>
          <table:table-cell office:value-type="string" office:string-value="">
            <text:p/>
          </table:table-cell>
          <table:table-cell office:value-type="string" office:string-value="unfoldingWord/tx-enqueue-job">
            <text:p>unfoldingWord/tx-enqueue-job</text:p>
          </table:table-cell>
          <table:table-cell office:value-type="string" office:string-value="1-Manual review">
            <text:p>1-Manual review</text:p>
          </table:table-cell>
          <table:table-cell office:value-type="string" office:string-value="Repository has significant release history or GitHub downloads (20 releases, 0 downloads).">
            <text:p>Repository has significant release history or GitHub downloads (20 releases,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cell office:value-type="string" office:string-value="">
            <text:p/>
          </table:table-cell>
          <table:table-cell office:value-type="string" office:string-value="unfoldingWord-dev/tx-html2pdf">
            <text:p>unfoldingWord-dev/tx-html2pdf</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job-handler">
            <text:p>tx-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0">
            <text:p>40</text:p>
          </table:table-cell>
          <table:table-cell office:value-type="string" office:string-value="0">
            <text:p>0</text:p>
          </table:table-cell>
          <table:table-cell office:value-type="string" office:string-value="https://github.com/unfoldingWord/tx-job-handler">
            <text:p>https://github.com/unfoldingWord/tx-job-handler</text:p>
          </table:table-cell>
          <table:table-cell office:value-type="string" office:string-value="2024-06-21T20:23:02Z">
            <text:p>2024-06-21T20:23:02Z</text:p>
          </table:table-cell>
          <table:table-cell office:value-type="string" office:string-value="">
            <text:p/>
          </table:table-cell>
          <table:table-cell office:value-type="string" office:string-value="unfoldingWord/tx-job-handler">
            <text:p>unfoldingWord/tx-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d2html">
            <text:p>tx-md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1">
            <text:p>1</text:p>
          </table:table-cell>
          <table:table-cell office:value-type="string" office:string-value="0">
            <text:p>0</text:p>
          </table:table-cell>
          <table:table-cell office:value-type="string" office:string-value="https://github.com/unfoldingWord-dev/tx-md2html">
            <text:p>https://github.com/unfoldingWord-dev/tx-md2html</text:p>
          </table:table-cell>
          <table:table-cell office:value-type="string" office:string-value="2016-12-19T15:03:41Z">
            <text:p>2016-12-19T15:03:41Z</text:p>
          </table:table-cell>
          <table:table-cell office:value-type="string" office:string-value="">
            <text:p/>
          </table:table-cell>
          <table:table-cell office:value-type="string" office:string-value="unfoldingWord-dev/tx-md2html">
            <text:p>unfoldingWord-dev/tx-md2htm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redis-poc">
            <text:p>tx-redis-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tx-redis-poc">
            <text:p>https://github.com/unfoldingWord-box3/tx-redis-poc</text:p>
          </table:table-cell>
          <table:table-cell office:value-type="string" office:string-value="2023-10-12T20:54:09Z">
            <text:p>2023-10-12T20:54:09Z</text:p>
          </table:table-cell>
          <table:table-cell office:value-type="string" office:string-value="">
            <text:p/>
          </table:table-cell>
          <table:table-cell office:value-type="string" office:string-value="unfoldingWord-box3/tx-redis-poc">
            <text:p>unfoldingWord-box3/tx-redis-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ample-client">
            <text:p>tx-sample-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sample-client">
            <text:p>https://github.com/unfoldingWord-dev/tx-sample-client</text:p>
          </table:table-cell>
          <table:table-cell office:value-type="string" office:string-value="2016-12-19T15:14:47Z">
            <text:p>2016-12-19T15:14:47Z</text:p>
          </table:table-cell>
          <table:table-cell office:value-type="string" office:string-value="">
            <text:p/>
          </table:table-cell>
          <table:table-cell office:value-type="string" office:string-value="unfoldingWord-dev/tx-sample-client">
            <text:p>unfoldingWord-dev/tx-sample-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hared-tools">
            <text:p>tx-shared-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shared-tools">
            <text:p>https://github.com/unfoldingWord-dev/tx-shared-tools</text:p>
          </table:table-cell>
          <table:table-cell office:value-type="string" office:string-value="2016-09-06T13:14:39Z">
            <text:p>2016-09-06T13:14:39Z</text:p>
          </table:table-cell>
          <table:table-cell office:value-type="string" office:string-value="">
            <text:p/>
          </table:table-cell>
          <table:table-cell office:value-type="string" office:string-value="unfoldingWord-dev/tx-shared-tools">
            <text:p>unfoldingWord-dev/tx-shared-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usfm2html">
            <text:p>tx-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usfm2html">
            <text:p>https://github.com/unfoldingWord-dev/tx-usfm2html</text:p>
          </table:table-cell>
          <table:table-cell office:value-type="string" office:string-value="2019-02-19T12:45:43Z">
            <text:p>2019-02-19T12:45:43Z</text:p>
          </table:table-cell>
          <table:table-cell office:value-type="string" office:string-value="">
            <text:p/>
          </table:table-cell>
          <table:table-cell office:value-type="string" office:string-value="unfoldingWord-dev/tx-usfm2html">
            <text:p>unfoldingWord-dev/tx-usfm2htm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
            <text:p>tx-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
            <text:p>https://github.com/unfoldingWord-dev/tx-webhook</text:p>
          </table:table-cell>
          <table:table-cell office:value-type="string" office:string-value="2016-08-08T20:49:12Z">
            <text:p>2016-08-08T20:49:12Z</text:p>
          </table:table-cell>
          <table:table-cell office:value-type="string" office:string-value="">
            <text:p/>
          </table:table-cell>
          <table:table-cell office:value-type="string" office:string-value="unfoldingWord-dev/tx-webhook">
            <text:p>unfoldingWord-dev/tx-webhook</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client">
            <text:p>tx-webhook-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client">
            <text:p>https://github.com/unfoldingWord-dev/tx-webhook-client</text:p>
          </table:table-cell>
          <table:table-cell office:value-type="string" office:string-value="2016-09-22T16:25:43Z">
            <text:p>2016-09-22T16:25:43Z</text:p>
          </table:table-cell>
          <table:table-cell office:value-type="string" office:string-value="">
            <text:p/>
          </table:table-cell>
          <table:table-cell office:value-type="string" office:string-value="unfoldingWord-dev/tx-webhook-client">
            <text:p>unfoldingWord-dev/tx-webhook-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gnt-app">
            <text:p>ugnt-ap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ugnt-app">
            <text:p>https://github.com/unfoldingWord-dev/ugnt-app</text:p>
          </table:table-cell>
          <table:table-cell office:value-type="string" office:string-value="2016-12-12T16:32:16Z">
            <text:p>2016-12-12T16:32:16Z</text:p>
          </table:table-cell>
          <table:table-cell office:value-type="string" office:string-value="">
            <text:p/>
          </table:table-cell>
          <table:table-cell office:value-type="string" office:string-value="unfoldingWord-dev/ugnt-app">
            <text:p>unfoldingWord-dev/ugnt-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
            <text:p>unfoldingWord</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
            <text:p>https://github.com/unfoldingWord/unfoldingWord</text:p>
          </table:table-cell>
          <table:table-cell office:value-type="string" office:string-value="2025-10-02T14:13:18Z">
            <text:p>2025-10-02T14:13:18Z</text:p>
          </table:table-cell>
          <table:table-cell office:value-type="string" office:string-value="">
            <text:p/>
          </table:table-cell>
          <table:table-cell office:value-type="string" office:string-value="unfoldingWord/unfoldingWord">
            <text:p>unfoldingWord/unfoldingWor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Commentary-Info">
            <text:p>Unlocked-Bible-Commentary-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Commentary-Info">
            <text:p>https://github.com/unfoldingWord-dev/Unlocked-Bible-Commentary-Info</text:p>
          </table:table-cell>
          <table:table-cell office:value-type="string" office:string-value="2025-12-09T15:21:29Z">
            <text:p>2025-12-09T15:21:29Z</text:p>
          </table:table-cell>
          <table:table-cell office:value-type="string" office:string-value="">
            <text:p/>
          </table:table-cell>
          <table:table-cell office:value-type="string" office:string-value="unfoldingWord-dev/Unlocked-Bible-Commentary-Info">
            <text:p>unfoldingWord-dev/Unlocked-Bible-Commentary-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Notes-Info">
            <text:p>Unlocked-Bible-Notes-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Notes-Info">
            <text:p>https://github.com/unfoldingWord-dev/Unlocked-Bible-Notes-Info</text:p>
          </table:table-cell>
          <table:table-cell office:value-type="string" office:string-value="2025-12-09T15:21:13Z">
            <text:p>2025-12-09T15:21:13Z</text:p>
          </table:table-cell>
          <table:table-cell office:value-type="string" office:string-value="">
            <text:p/>
          </table:table-cell>
          <table:table-cell office:value-type="string" office:string-value="unfoldingWord-dev/Unlocked-Bible-Notes-Info">
            <text:p>unfoldingWord-dev/Unlocked-Bible-Notes-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ammar-Info">
            <text:p>Unlocked-Gramma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ammar-Info">
            <text:p>https://github.com/unfoldingWord-dev/Unlocked-Grammar-Info</text:p>
          </table:table-cell>
          <table:table-cell office:value-type="string" office:string-value="2025-10-09T11:10:42Z">
            <text:p>2025-10-09T11:10:42Z</text:p>
          </table:table-cell>
          <table:table-cell office:value-type="string" office:string-value="">
            <text:p/>
          </table:table-cell>
          <table:table-cell office:value-type="string" office:string-value="unfoldingWord-dev/Unlocked-Grammar-Info">
            <text:p>unfoldingWord-dev/Unlocked-Grammar-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Info">
            <text:p>Unlocked-Greek-Lexicon-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eek-Lexicon-Info">
            <text:p>https://github.com/unfoldingWord-dev/Unlocked-Greek-Lexicon-Info</text:p>
          </table:table-cell>
          <table:table-cell office:value-type="string" office:string-value="2025-10-09T11:26:58Z">
            <text:p>2025-10-09T11:26:58Z</text:p>
          </table:table-cell>
          <table:table-cell office:value-type="string" office:string-value="">
            <text:p/>
          </table:table-cell>
          <table:table-cell office:value-type="string" office:string-value="unfoldingWord-dev/Unlocked-Greek-Lexicon-Info">
            <text:p>unfoldingWord-dev/Unlocked-Greek-Lexicon-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Utils">
            <text:p>USFM-Uti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SFM-Utils">
            <text:p>https://github.com/unfoldingWord-dev/USFM-Utils</text:p>
          </table:table-cell>
          <table:table-cell office:value-type="string" office:string-value="2026-02-23T14:45:47Z">
            <text:p>2026-02-23T14:45:47Z</text:p>
          </table:table-cell>
          <table:table-cell office:value-type="string" office:string-value="">
            <text:p/>
          </table:table-cell>
          <table:table-cell office:value-type="string" office:string-value="unfoldingWord-dev/USFM-Utils">
            <text:p>unfoldingWord-dev/USFM-Uti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ndroid">
            <text:p>uw-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18">
            <text:p>18</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44">
            <text:p>44</text:p>
          </table:table-cell>
          <table:table-cell office:value-type="string" office:string-value="2302">
            <text:p>2302</text:p>
          </table:table-cell>
          <table:table-cell office:value-type="string" office:string-value="https://github.com/unfoldingWord-dev/uw-android">
            <text:p>https://github.com/unfoldingWord-dev/uw-android</text:p>
          </table:table-cell>
          <table:table-cell office:value-type="string" office:string-value="2025-10-02T14:11:55Z">
            <text:p>2025-10-02T14:11:55Z</text:p>
          </table:table-cell>
          <table:table-cell office:value-type="string" office:string-value="">
            <text:p/>
          </table:table-cell>
          <table:table-cell office:value-type="string" office:string-value="unfoldingWord-dev/uw-android">
            <text:p>unfoldingWord-dev/uw-android</text:p>
          </table:table-cell>
          <table:table-cell office:value-type="string" office:string-value="1-Manual review">
            <text:p>1-Manual review</text:p>
          </table:table-cell>
          <table:table-cell office:value-type="string" office:string-value="Repository has significant release history or GitHub downloads (44 releases, 2302 downloads).">
            <text:p>Repository has significant release history or GitHub downloads (44 releases, 2302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pi">
            <text:p>uw-api</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uw-api">
            <text:p>https://github.com/unfoldingWord-dev/uw-api</text:p>
          </table:table-cell>
          <table:table-cell office:value-type="string" office:string-value="2016-11-02T15:00:23Z">
            <text:p>2016-11-02T15:00:23Z</text:p>
          </table:table-cell>
          <table:table-cell office:value-type="string" office:string-value="">
            <text:p/>
          </table:table-cell>
          <table:table-cell office:value-type="string" office:string-value="unfoldingWord-dev/uw-api">
            <text:p>unfoldingWord-dev/uw-api</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ata-tools">
            <text:p>uw-data-tools</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uw-data-tools">
            <text:p>https://github.com/unfoldingWord-box3/uw-data-tools</text:p>
          </table:table-cell>
          <table:table-cell office:value-type="string" office:string-value="2021-11-30T10:14:38Z">
            <text:p>2021-11-30T10:14:38Z</text:p>
          </table:table-cell>
          <table:table-cell office:value-type="string" office:string-value="">
            <text:p/>
          </table:table-cell>
          <table:table-cell office:value-type="string" office:string-value="unfoldingWord-box3/uw-data-tools">
            <text:p>unfoldingWord-box3/uw-data-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ios">
            <text:p>uw-ios</text:p>
          </table:table-cell>
          <table:table-cell office:value-type="string" office:string-value="unfoldingWord-dev">
            <text:p>unfoldingWord-dev</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3">
            <text:p>3</text:p>
          </table:table-cell>
          <table:table-cell office:value-type="string" office:string-value="20">
            <text:p>20</text:p>
          </table:table-cell>
          <table:table-cell office:value-type="string" office:string-value="https://github.com/unfoldingWord-dev/uw-ios">
            <text:p>https://github.com/unfoldingWord-dev/uw-ios</text:p>
          </table:table-cell>
          <table:table-cell office:value-type="string" office:string-value="2025-10-02T14:12:49Z">
            <text:p>2025-10-02T14:12:49Z</text:p>
          </table:table-cell>
          <table:table-cell office:value-type="string" office:string-value="">
            <text:p/>
          </table:table-cell>
          <table:table-cell office:value-type="string" office:string-value="unfoldingWord-dev/uw-ios">
            <text:p>unfoldingWord-dev/uw-io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mobile-app">
            <text:p>uW-mobile-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dev/uW-mobile-app">
            <text:p>https://github.com/unfoldingWord-dev/uW-mobile-app</text:p>
          </table:table-cell>
          <table:table-cell office:value-type="string" office:string-value="2016-09-26T09:51:13Z">
            <text:p>2016-09-26T09:51:13Z</text:p>
          </table:table-cell>
          <table:table-cell office:value-type="string" office:string-value="">
            <text:p/>
          </table:table-cell>
          <table:table-cell office:value-type="string" office:string-value="unfoldingWord-dev/uW-mobile-app">
            <text:p>unfoldingWord-dev/uW-mobile-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df-conversion-tools">
            <text:p>uw-pdf-conversion-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df-conversion-tools">
            <text:p>https://github.com/unfoldingWord-dev/uw-pdf-conversion-tools</text:p>
          </table:table-cell>
          <table:table-cell office:value-type="string" office:string-value="2021-06-03T20:21:52Z">
            <text:p>2021-06-03T20:21:52Z</text:p>
          </table:table-cell>
          <table:table-cell office:value-type="string" office:string-value="">
            <text:p/>
          </table:table-cell>
          <table:table-cell office:value-type="string" office:string-value="unfoldingWord-dev/uw-pdf-conversion-tools">
            <text:p>unfoldingWord-dev/uw-pdf-conversion-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er">
            <text:p>uw-publish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er">
            <text:p>https://github.com/unfoldingWord-dev/uw-publisher</text:p>
          </table:table-cell>
          <table:table-cell office:value-type="string" office:string-value="2016-08-30T09:37:59Z">
            <text:p>2016-08-30T09:37:59Z</text:p>
          </table:table-cell>
          <table:table-cell office:value-type="string" office:string-value="">
            <text:p/>
          </table:table-cell>
          <table:table-cell office:value-type="string" office:string-value="unfoldingWord-dev/uw-publisher">
            <text:p>unfoldingWord-dev/uw-publish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ools-Collab">
            <text:p>uW-Tools-Colla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https://github.com/unfoldingWord/uW-Tools-Collab">
            <text:p>https://github.com/unfoldingWord/uW-Tools-Collab</text:p>
          </table:table-cell>
          <table:table-cell office:value-type="string" office:string-value="2025-09-12T15:52:50Z">
            <text:p>2025-09-12T15:52:50Z</text:p>
          </table:table-cell>
          <table:table-cell office:value-type="string" office:string-value="">
            <text:p/>
          </table:table-cell>
          <table:table-cell office:value-type="string" office:string-value="unfoldingWord/uW-Tools-Collab">
            <text:p>unfoldingWord/uW-Tools-Colla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site-resource-version-updater">
            <text:p>uw-website-resource-version-updat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w-website-resource-version-updater">
            <text:p>https://github.com/unfoldingWord/uw-website-resource-version-updater</text:p>
          </table:table-cell>
          <table:table-cell office:value-type="string" office:string-value="2025-06-04T22:06:08Z">
            <text:p>2025-06-04T22:06:08Z</text:p>
          </table:table-cell>
          <table:table-cell office:value-type="string" office:string-value="">
            <text:p/>
          </table:table-cell>
          <table:table-cell office:value-type="string" office:string-value="unfoldingWord/uw-website-resource-version-updater">
            <text:p>unfoldingWord/uw-website-resource-version-updat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_tools">
            <text:p>uw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w_tools">
            <text:p>https://github.com/unfoldingWord-dev/uw_tools</text:p>
          </table:table-cell>
          <table:table-cell office:value-type="string" office:string-value="2016-11-02T15:14:26Z">
            <text:p>2016-11-02T15:14:26Z</text:p>
          </table:table-cell>
          <table:table-cell office:value-type="string" office:string-value="">
            <text:p/>
          </table:table-cell>
          <table:table-cell office:value-type="string" office:string-value="unfoldingWord-dev/uw_tools">
            <text:p>unfoldingWord-dev/uw_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iewer-app-cordova">
            <text:p>viewer-app-cordova</text:p>
          </table:table-cell>
          <table:table-cell office:value-type="string" office:string-value="unfoldingWord-box3">
            <text:p>unfoldingWord-box3</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21">
            <text:p>21</text:p>
          </table:table-cell>
          <table:table-cell office:value-type="string" office:string-value="https://github.com/unfoldingWord-box3/viewer-app-cordova">
            <text:p>https://github.com/unfoldingWord-box3/viewer-app-cordova</text:p>
          </table:table-cell>
          <table:table-cell office:value-type="string" office:string-value="2022-11-09T09:01:40Z">
            <text:p>2022-11-09T09:01:40Z</text:p>
          </table:table-cell>
          <table:table-cell office:value-type="string" office:string-value="">
            <text:p/>
          </table:table-cell>
          <table:table-cell office:value-type="string" office:string-value="unfoldingWord-box3/viewer-app-cordova">
            <text:p>unfoldingWord-box3/viewer-app-cordov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
            <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string-punctuation-tokenizer', 'tc-strings']">
            <text:p>['gogs-client', 'selections', 'tc-tool', 'tc-ui-toolkit', 'usfm-js', 'word-aligner', 'wordmap', 'wordmap-lexer', 'string-punctuation-tokenizer', 'tc-strings']</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cell office:value-type="string" office:string-value="unfoldingWord/wordAlignment">
            <text:p>unfoldingWord/wordAlignment</text:p>
          </table:table-cell>
          <table:table-cell office:value-type="string" office:string-value="unfoldingWord/wordAlignment">
            <text:p>unfoldingWord/wordAlignmen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
            <text:p/>
          </table:table-cell>
          <table:table-cell office:value-type="string" office:string-value="wordmap-react-toolkit">
            <text:p>wordmap-react-toolkit</text:p>
          </table:table-cell>
          <table:table-cell office:value-type="string" office:string-value="False">
            <text:p>False</text:p>
          </table:table-cell>
          <table:table-cell office:value-type="string" office:string-value="225">
            <text:p>225</text:p>
          </table:table-cell>
          <table:table-cell office:value-type="string" office:string-value="2019-11-07T08:13:01.981Z">
            <text:p>2019-11-07T08:13:01.981Z</text:p>
          </table:table-cell>
          <table:table-cell office:value-type="string" office:string-value="">
            <text:p/>
          </table:table-cell>
          <table:table-cell office:value-type="string" office:string-value="['wordmap', 'wordmap-lexer', 'string-punctuation-tokenizer']">
            <text:p>['wordmap', 'wordmap-lexer', 'string-punctuation-tokenizer']</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cell office:value-type="string" office:string-value="">
            <text:p/>
          </table:table-cell>
          <table:table-cell office:value-type="string" office:string-value="unfoldingWord-box3/wordmap-react-toolkit">
            <text:p>unfoldingWord-box3/wordmap-react-toolki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225 downloads in the last year) and no detected local consumers.">
            <text:p>Package has low but nonzero npm usage (225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seed-app">
            <text:p>wordmap-seed-app</text:p>
          </table:table-cell>
          <table:table-cell office:value-type="string" office:string-value="unfoldingWord-box3">
            <text:p>unfoldingWord-box3</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wordmap-seed-app">
            <text:p>https://github.com/unfoldingWord-box3/wordmap-seed-app</text:p>
          </table:table-cell>
          <table:table-cell office:value-type="string" office:string-value="2023-02-23T22:52:12Z">
            <text:p>2023-02-23T22:52:12Z</text:p>
          </table:table-cell>
          <table:table-cell office:value-type="string" office:string-value="">
            <text:p/>
          </table:table-cell>
          <table:table-cell office:value-type="string" office:string-value="unfoldingWord-box3/wordmap-seed-app">
            <text:p>unfoldingWord-box3/wordmap-seed-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ld-language-map-rcl">
            <text:p>world-language-map-rcl</text:p>
          </table:table-cell>
          <table:table-cell office:value-type="string" office:string-value="False">
            <text:p>False</text:p>
          </table:table-cell>
          <table:table-cell office:value-type="string" office:string-value="116">
            <text:p>116</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cell office:value-type="string" office:string-value="">
            <text:p/>
          </table:table-cell>
          <table:table-cell office:value-type="string" office:string-value="unfoldingWord/world-language-map-rcl">
            <text:p>unfoldingWord/world-language-map-rc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6 downloads in the last year) and no detected local consumers.">
            <text:p>Package has low but nonzero npm usage (116 downloads in the last year) and no detected local consumers.</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1-03-10T14:25:09Z">
            <text:p>2021-03-10T14:25:09Z</text:p>
          </table:table-cell>
          <table:table-cell office:value-type="string" office:string-value="">
            <text:p/>
          </table:table-cell>
          <table:table-cell office:value-type="string" office:string-value="unfoldingWord-box3/admin-app-old">
            <text:p>unfoldingWord-box3/admin-app-old</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ml">
            <text:p>alignment-ml</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ml">
            <text:p>https://github.com/unfoldingWord-box3/alignment-ml</text:p>
          </table:table-cell>
          <table:table-cell office:value-type="string" office:string-value="2021-01-08T22:57:52Z">
            <text:p>2021-01-08T22:57:52Z</text:p>
          </table:table-cell>
          <table:table-cell office:value-type="string" office:string-value="">
            <text:p/>
          </table:table-cell>
          <table:table-cell office:value-type="string" office:string-value="unfoldingWord-box3/alignment-ml">
            <text:p>unfoldingWord-box3/alignment-m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string-punctuation-tokenizer']">
            <text:p>['bible-reference-range', 'tc-ui-toolkit', 'usfm-js', 'word-aligner', 'wordmap-lexer', 'string-punctuation-tokenizer']</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cell office:value-type="string" office:string-value="">
            <text:p/>
          </table:table-cell>
          <table:table-cell office:value-type="string" office:string-value="unfoldingWord-box3/alignment-playground">
            <text:p>unfoldingWord-box3/alignment-playground</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lignment-transferer">
            <text:p>alignment-transfer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dev/alignment-transferer">
            <text:p>https://github.com/unfoldingWord-dev/alignment-transferer</text:p>
          </table:table-cell>
          <table:table-cell office:value-type="string" office:string-value="2025-06-17T18:57:53Z">
            <text:p>2025-06-17T18:57:53Z</text:p>
          </table:table-cell>
          <table:table-cell office:value-type="string" office:string-value="">
            <text:p/>
          </table:table-cell>
          <table:table-cell office:value-type="string" office:string-value="unfoldingWord-dev/alignment-transferer">
            <text:p>unfoldingWord-dev/alignment-transfer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ref-pk-demo">
            <text:p>bible-ref-pk-demo</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ref-pk-demo">
            <text:p>https://github.com/unfoldingWord-box3/bible-ref-pk-demo</text:p>
          </table:table-cell>
          <table:table-cell office:value-type="string" office:string-value="2022-04-09T14:05:23Z">
            <text:p>2022-04-09T14:05:23Z</text:p>
          </table:table-cell>
          <table:table-cell office:value-type="string" office:string-value="">
            <text:p/>
          </table:table-cell>
          <table:table-cell office:value-type="string" office:string-value="unfoldingWord-box3/bible-ref-pk-demo">
            <text:p>unfoldingWord-box3/bible-ref-pk-demo</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3T18:25:41Z">
            <text:p>2026-06-03T18:25:41Z</text:p>
          </table:table-cell>
          <table:table-cell office:value-type="string" office:string-value="2026-06-03T18:25:34Z">
            <text:p>2026-06-03T18:25:3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03T18:25:59Z">
            <text:p>2026-06-03T18:25:59Z</text:p>
          </table:table-cell>
          <table:table-cell office:value-type="string" office:string-value="">
            <text:p/>
          </table:table-cell>
          <table:table-cell office:value-type="string" office:string-value="unfoldingWord/bt-servant-telegram-gateway">
            <text:p>unfoldingWord/bt-servant-telegram-gatewa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wordmap-lexer']">
            <text:p>['bible-reference-range', 'string-punctuation-tokenizer', 'tc-source-content-updater', 'tsv-groupdata-parser', 'usfm-js', 'uw-tsv-parser', 'wordmap-lexer']</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cell office:value-type="string" office:string-value="">
            <text:p/>
          </table:table-cell>
          <table:table-cell office:value-type="string" office:string-value="unfoldingWord-box3/checking-extension">
            <text:p>unfoldingWord-box3/checking-extens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
            <text:p/>
          </table:table-cell>
          <table:table-cell office:value-type="string" office:string-value="checking-tool-rcl">
            <text:p>checking-tool-rcl</text:p>
          </table:table-cell>
          <table:table-cell office:value-type="string" office:string-value="False">
            <text:p>False</text:p>
          </table:table-cell>
          <table:table-cell office:value-type="string" office:string-value="5895">
            <text:p>5895</text:p>
          </table:table-cell>
          <table:table-cell office:value-type="string" office:string-value="2025-10-20T15:58:23.259Z">
            <text:p>2025-10-20T15:58:23.259Z</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cell office:value-type="string" office:string-value="">
            <text:p/>
          </table:table-cell>
          <table:table-cell office:value-type="string" office:string-value="unfoldingWord/checking-tool-rcl">
            <text:p>unfoldingWord/checking-tool-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5895 downloads).">
            <text:p>Repository has GitHub dependents or at least 1,000 npm downloads in the last year (589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895 downloads in the last year).">
            <text:p>Package has detected local usage, GitHub dependents, or significant npm downloads (589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ncourse-pipeline">
            <text:p>concourse-pipeline</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concourse-pipeline">
            <text:p>https://github.com/unfoldingWord-dev/concourse-pipeline</text:p>
          </table:table-cell>
          <table:table-cell office:value-type="string" office:string-value="2023-08-12T13:51:42Z">
            <text:p>2023-08-12T13:51:42Z</text:p>
          </table:table-cell>
          <table:table-cell office:value-type="string" office:string-value="">
            <text:p/>
          </table:table-cell>
          <table:table-cell office:value-type="string" office:string-value="unfoldingWord-dev/concourse-pipeline">
            <text:p>unfoldingWord-dev/concourse-pipelin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migrate-org-repos">
            <text:p>dcs-migrate-org-repo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dev/dcs-migrate-org-repos">
            <text:p>https://github.com/unfoldingWord-dev/dcs-migrate-org-repos</text:p>
          </table:table-cell>
          <table:table-cell office:value-type="string" office:string-value="2021-05-10T13:39:48Z">
            <text:p>2021-05-10T13:39:48Z</text:p>
          </table:table-cell>
          <table:table-cell office:value-type="string" office:string-value="">
            <text:p/>
          </table:table-cell>
          <table:table-cell office:value-type="string" office:string-value="unfoldingWord-dev/dcs-migrate-org-repos">
            <text:p>unfoldingWord-dev/dcs-migrate-org-repo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dcs-react-hooks">
            <text:p>dcs-react-hooks</text:p>
          </table:table-cell>
          <table:table-cell office:value-type="string" office:string-value="False">
            <text:p>False</text:p>
          </table:table-cell>
          <table:table-cell office:value-type="string" office:string-value="178">
            <text:p>178</text:p>
          </table:table-cell>
          <table:table-cell office:value-type="string" office:string-value="2022-08-19T12:33:49.976Z">
            <text:p>2022-08-19T12:33:49.976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cell office:value-type="string" office:string-value="">
            <text:p/>
          </table:table-cell>
          <table:table-cell office:value-type="string" office:string-value="unfoldingWord/dcs-react-hooks">
            <text:p>unfoldingWord/dcs-react-hook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78 downloads).">
            <text:p>Repository has GitHub dependents or at least 1,000 npm downloads in the last year (17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8 downloads in the last year).">
            <text:p>Package has detected local usage, GitHub dependents, or significant npm downloads (17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ktop-app-template">
            <text:p>desktop-app-template</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template">
            <text:p>https://github.com/unfoldingWord-box3/desktop-app-template</text:p>
          </table:table-cell>
          <table:table-cell office:value-type="string" office:string-value="2025-07-20T10:57:23Z">
            <text:p>2025-07-20T10:57:23Z</text:p>
          </table:table-cell>
          <table:table-cell office:value-type="string" office:string-value="">
            <text:p/>
          </table:table-cell>
          <table:table-cell office:value-type="string" office:string-value="unfoldingWord-box3/desktop-app-template">
            <text:p>unfoldingWord-box3/desktop-app-templat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translation">
            <text:p>dokuwiki-plugin-translation</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translation">
            <text:p>https://github.com/unfoldingWord-dev/dokuwiki-plugin-translation</text:p>
          </table:table-cell>
          <table:table-cell office:value-type="string" office:string-value="2015-06-23T19:08:59Z">
            <text:p>2015-06-23T19:08:59Z</text:p>
          </table:table-cell>
          <table:table-cell office:value-type="string" office:string-value="">
            <text:p/>
          </table:table-cell>
          <table:table-cell office:value-type="string" office:string-value="unfoldingWord-dev/dokuwiki-plugin-translation">
            <text:p>unfoldingWord-dev/dokuwiki-plugin-translat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
            <text:p>door43-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24">
            <text:p>24</text:p>
          </table:table-cell>
          <table:table-cell office:value-type="string" office:string-value="0">
            <text:p>0</text:p>
          </table:table-cell>
          <table:table-cell office:value-type="string" office:string-value="https://github.com/unfoldingWord/door43-enqueue-job">
            <text:p>https://github.com/unfoldingWord/door43-enqueue-job</text:p>
          </table:table-cell>
          <table:table-cell office:value-type="string" office:string-value="2022-10-04T15:44:46Z">
            <text:p>2022-10-04T15:44:46Z</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test">
            <text:p>door43-enqueue-job-te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oor43-enqueue-job-test">
            <text:p>https://github.com/unfoldingWord/door43-enqueue-job-test</text:p>
          </table:table-cell>
          <table:table-cell office:value-type="string" office:string-value="2023-04-19T13:51:02Z">
            <text:p>2023-04-19T13:51:02Z</text:p>
          </table:table-cell>
          <table:table-cell office:value-type="string" office:string-value="">
            <text:p/>
          </table:table-cell>
          <table:table-cell office:value-type="string" office:string-value="unfoldingWord/door43-enqueue-job-test">
            <text:p>unfoldingWord/door43-enqueue-job-tes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library">
            <text:p>door43-librar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door43-library">
            <text:p>https://github.com/unfoldingWord/door43-library</text:p>
          </table:table-cell>
          <table:table-cell office:value-type="string" office:string-value="2023-08-08T13:52:06Z">
            <text:p>2023-08-08T13:52:06Z</text:p>
          </table:table-cell>
          <table:table-cell office:value-type="string" office:string-value="">
            <text:p/>
          </table:table-cell>
          <table:table-cell office:value-type="string" office:string-value="unfoldingWord/door43-library">
            <text:p>unfoldingWord/door43-librar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
            <text:p>electronite</text:p>
          </table:table-cell>
          <table:table-cell office:value-type="string" office:string-value="unfoldingWord">
            <text:p>unfoldingWord</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40">
            <text:p>40</text:p>
          </table:table-cell>
          <table:table-cell office:value-type="string" office:string-value="20976">
            <text:p>20976</text:p>
          </table:table-cell>
          <table:table-cell office:value-type="string" office:string-value="https://github.com/unfoldingWord/electronite">
            <text:p>https://github.com/unfoldingWord/electronite</text:p>
          </table:table-cell>
          <table:table-cell office:value-type="string" office:string-value="2026-02-15T19:31:44Z">
            <text:p>2026-02-15T19:31:44Z</text:p>
          </table:table-cell>
          <table:table-cell office:value-type="string" office:string-value="">
            <text:p/>
          </table:table-cell>
          <table:table-cell office:value-type="string" office:string-value="unfoldingWord/electronite">
            <text:p>unfoldingWord/electronit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builder">
            <text:p>electronite-build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builder">
            <text:p>https://github.com/unfoldingWord-dev/electronite-builder</text:p>
          </table:table-cell>
          <table:table-cell office:value-type="string" office:string-value="2023-09-18T17:12:15Z">
            <text:p>2023-09-18T17:12:15Z</text:p>
          </table:table-cell>
          <table:table-cell office:value-type="string" office:string-value="">
            <text:p/>
          </table:table-cell>
          <table:table-cell office:value-type="string" office:string-value="unfoldingWord-dev/electronite-builder">
            <text:p>unfoldingWord-dev/electronite-build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forge">
            <text:p>electronite-forg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https://github.com/unfoldingWord/electronite-forge">
            <text:p>https://github.com/unfoldingWord/electronite-forge</text:p>
          </table:table-cell>
          <table:table-cell office:value-type="string" office:string-value="2023-02-21T17:18:35Z">
            <text:p>2023-02-21T17:18:35Z</text:p>
          </table:table-cell>
          <table:table-cell office:value-type="string" office:string-value="">
            <text:p/>
          </table:table-cell>
          <table:table-cell office:value-type="string" office:string-value="unfoldingWord/electronite-forge">
            <text:p>unfoldingWord/electronite-forg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cell office:value-type="string" office:string-value="">
            <text:p/>
          </table:table-cell>
          <table:table-cell office:value-type="string" office:string-value="unfoldingWord-dev/electronite-packager">
            <text:p>unfoldingWord-dev/electronite-packag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
            <text:p>unfoldingWord/find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mui">
            <text:p>@findr/mu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mui">
            <text:p>unfoldingWord/findr/@findr/mui</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perf">
            <text:p>@findr/perf</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perf">
            <text:p>unfoldingWord/findr/@findr/perf</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react">
            <text:p>@findr/re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react">
            <text:p>unfoldingWord/findr/@findr/rea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text">
            <text:p>unfoldingWord/findr/@findr/tex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lask-github-webhook">
            <text:p>flask-github-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flask-github-webhook">
            <text:p>https://github.com/unfoldingWord-dev/flask-github-webhook</text:p>
          </table:table-cell>
          <table:table-cell office:value-type="string" office:string-value="2016-04-01T16:14:45Z">
            <text:p>2016-04-01T16:14:45Z</text:p>
          </table:table-cell>
          <table:table-cell office:value-type="string" office:string-value="">
            <text:p/>
          </table:table-cell>
          <table:table-cell office:value-type="string" office:string-value="unfoldingWord-dev/flask-github-webhook">
            <text:p>unfoldingWord-dev/flask-github-webhoo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ogs-client">
            <text:p>go-gogs-client</text:p>
          </table:table-cell>
          <table:table-cell office:value-type="string" office:string-value="unfoldingWord-dev">
            <text:p>unfoldingWord-dev</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https://github.com/unfoldingWord-dev/go-gogs-client">
            <text:p>https://github.com/unfoldingWord-dev/go-gogs-client</text:p>
          </table:table-cell>
          <table:table-cell office:value-type="string" office:string-value="2016-04-11T22:10:33Z">
            <text:p>2016-04-11T22:10:33Z</text:p>
          </table:table-cell>
          <table:table-cell office:value-type="string" office:string-value="">
            <text:p/>
          </table:table-cell>
          <table:table-cell office:value-type="string" office:string-value="unfoldingWord-dev/go-gogs-client">
            <text:p>unfoldingWord-dev/go-gogs-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rc2sb">
            <text:p>go-rc2sb</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go-rc2sb">
            <text:p>https://github.com/unfoldingWord/go-rc2sb</text:p>
          </table:table-cell>
          <table:table-cell office:value-type="string" office:string-value="2026-04-28T20:21:57Z">
            <text:p>2026-04-28T20:21:57Z</text:p>
          </table:table-cell>
          <table:table-cell office:value-type="string" office:string-value="">
            <text:p/>
          </table:table-cell>
          <table:table-cell office:value-type="string" office:string-value="unfoldingWord/go-rc2sb">
            <text:p>unfoldingWord/go-rc2s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ackathon-zpp">
            <text:p>hackathon-zpp</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https://github.com/unfoldingWord-dev/hackathon-zpp">
            <text:p>https://github.com/unfoldingWord-dev/hackathon-zpp</text:p>
          </table:table-cell>
          <table:table-cell office:value-type="string" office:string-value="2025-12-03T19:19:04Z">
            <text:p>2025-12-03T19:19:04Z</text:p>
          </table:table-cell>
          <table:table-cell office:value-type="string" office:string-value="">
            <text:p/>
          </table:table-cell>
          <table:table-cell office:value-type="string" office:string-value="unfoldingWord-dev/hackathon-zpp">
            <text:p>unfoldingWord-dev/hackathon-zp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cell office:value-type="string" office:string-value="">
            <text:p/>
          </table:table-cell>
          <table:table-cell office:value-type="string" office:string-value="unfoldingWord-dev/HebrewLexicon">
            <text:p>unfoldingWord-dev/HebrewLexic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
            <text:p/>
          </table:table-cell>
          <table:table-cell office:value-type="string" office:string-value="door43-client">
            <text:p>door43-client</text:p>
          </table:table-cell>
          <table:table-cell office:value-type="string" office:string-value="False">
            <text:p>False</text:p>
          </table:table-cell>
          <table:table-cell office:value-type="string" office:string-value="1556">
            <text:p>1556</text:p>
          </table:table-cell>
          <table:table-cell office:value-type="string" office:string-value="2019-11-06T17:33:42.928Z">
            <text:p>2019-11-06T17:33:42.928Z</text:p>
          </table:table-cell>
          <table:table-cell office:value-type="string" office:string-value="">
            <text:p/>
          </table:table-cell>
          <table:table-cell office:value-type="string" office:string-value="resource-container">
            <text:p>resource-container</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cell office:value-type="string" office:string-value="">
            <text:p/>
          </table:table-cell>
          <table:table-cell office:value-type="string" office:string-value="unfoldingWord-dev/node-door43-client">
            <text:p>unfoldingWord-dev/node-door43-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556 downloads).">
            <text:p>Repository has GitHub dependents or at least 1,000 npm downloads in the last year (1556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rc">
            <text:p>door43-rc</text:p>
          </table:table-cell>
          <table:table-cell office:value-type="string" office:string-value="True">
            <text:p>True</text:p>
          </table:table-cell>
          <table:table-cell office:value-type="string" office:string-value="1502">
            <text:p>1502</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cell office:value-type="string" office:string-value="">
            <text:p/>
          </table:table-cell>
          <table:table-cell office:value-type="string" office:string-value="unfoldingWord-dev/node-door43-rc">
            <text:p>unfoldingWord-dev/node-door43-rc</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502 downloads).">
            <text:p>Repository has GitHub dependents or at least 1,000 npm downloads in the last year (1502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tools">
            <text:p>noto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https://github.com/unfoldingWord-dev/nototools">
            <text:p>https://github.com/unfoldingWord-dev/nototools</text:p>
          </table:table-cell>
          <table:table-cell office:value-type="string" office:string-value="2019-04-16T02:34:59Z">
            <text:p>2019-04-16T02:34:59Z</text:p>
          </table:table-cell>
          <table:table-cell office:value-type="string" office:string-value="">
            <text:p/>
          </table:table-cell>
          <table:table-cell office:value-type="string" office:string-value="unfoldingWord-dev/nototools">
            <text:p>unfoldingWord-dev/noto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cell office:value-type="string" office:string-value="">
            <text:p/>
          </table:table-cell>
          <table:table-cell office:value-type="string" office:string-value="unfoldingWord-box3/obs-study">
            <text:p>unfoldingWord-box3/obs-stud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cell office:value-type="string" office:string-value="">
            <text:p/>
          </table:table-cell>
          <table:table-cell office:value-type="string" office:string-value="unfoldingWord/obt">
            <text:p>unfoldingWord/ob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
            <text:p>unfoldingWord/oce-editor-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base">
            <text:p>@oce-editor-tools/base</text:p>
          </table:table-cell>
          <table:table-cell office:value-type="string" office:string-value="">
            <text:p/>
          </table:table-cell>
          <table:table-cell office:value-type="string" office:string-value="1852">
            <text:p>1852</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base">
            <text:p>unfoldingWord/oce-editor-tools/@oce-editor-tools/bas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852 downloads).">
            <text:p>Repository has GitHub dependents or at least 1,000 npm downloads in the last year (185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52 downloads in the last year).">
            <text:p>Package has detected local usage, GitHub dependents, or significant npm downloads (185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base-core">
            <text:p>unfoldingWord/oce-editor-tools/@oce-editor-tools/base-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core">
            <text:p>@oce-editor-tools/joy-core</text:p>
          </table:table-cell>
          <table:table-cell office:value-type="string" office:string-value="">
            <text:p/>
          </table:table-cell>
          <table:table-cell office:value-type="string" office:string-value="407">
            <text:p>407</text:p>
          </table:table-cell>
          <table:table-cell office:value-type="string" office:string-value="2024-01-10T09:45:57.004Z">
            <text:p>2024-01-10T09:45:57.004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core">
            <text:p>unfoldingWord/oce-editor-tools/@oce-editor-tools/joy-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07 downloads).">
            <text:p>Repository has GitHub dependents or at least 1,000 npm downloads in the last year (40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7 downloads in the last year).">
            <text:p>Package has detected local usage, GitHub dependents, or significant npm downloads (40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pk">
            <text:p>@oce-editor-tools/joy-pk</text:p>
          </table:table-cell>
          <table:table-cell office:value-type="string" office:string-value="">
            <text:p/>
          </table:table-cell>
          <table:table-cell office:value-type="string" office:string-value="131">
            <text:p>131</text:p>
          </table:table-cell>
          <table:table-cell office:value-type="string" office:string-value="2024-01-10T09:47:45.958Z">
            <text:p>2024-01-10T09:47:45.958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pk">
            <text:p>unfoldingWord/oce-editor-tools/@oce-editor-tools/joy-p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31 downloads).">
            <text:p>Repository has GitHub dependents or at least 1,000 npm downloads in the last year (13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31 downloads in the last year).">
            <text:p>Package has detected local usage, GitHub dependents, or significant npm downloads (13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verse-navigator">
            <text:p>unfoldingWord/oce-editor-tools/@oce-editor-tools/joy-verse-naviga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core">
            <text:p>@oce-editor-tools/mui-core</text:p>
          </table:table-cell>
          <table:table-cell office:value-type="string" office:string-value="">
            <text:p/>
          </table:table-cell>
          <table:table-cell office:value-type="string" office:string-value="645">
            <text:p>645</text:p>
          </table:table-cell>
          <table:table-cell office:value-type="string" office:string-value="2024-01-10T09:42:28.550Z">
            <text:p>2024-01-10T09:42:28.55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core">
            <text:p>unfoldingWord/oce-editor-tools/@oce-editor-tools/mui-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45 downloads).">
            <text:p>Repository has GitHub dependents or at least 1,000 npm downloads in the last year (64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5 downloads in the last year).">
            <text:p>Package has detected local usage, GitHub dependents, or significant npm downloads (64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pk">
            <text:p>@oce-editor-tools/mui-pk</text:p>
          </table:table-cell>
          <table:table-cell office:value-type="string" office:string-value="">
            <text:p/>
          </table:table-cell>
          <table:table-cell office:value-type="string" office:string-value="337">
            <text:p>337</text:p>
          </table:table-cell>
          <table:table-cell office:value-type="string" office:string-value="2024-01-10T09:45:17.176Z">
            <text:p>2024-01-10T09:45:17.176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pk">
            <text:p>unfoldingWord/oce-editor-tools/@oce-editor-tools/mui-p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37 downloads).">
            <text:p>Repository has GitHub dependents or at least 1,000 npm downloads in the last year (33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7 downloads in the last year).">
            <text:p>Package has detected local usage, GitHub dependents, or significant npm downloads (33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simple">
            <text:p>@oce-editor-tools/mui-simple</text:p>
          </table:table-cell>
          <table:table-cell office:value-type="string" office:string-value="">
            <text:p/>
          </table:table-cell>
          <table:table-cell office:value-type="string" office:string-value="373">
            <text:p>373</text:p>
          </table:table-cell>
          <table:table-cell office:value-type="string" office:string-value="2024-01-10T09:45:39.010Z">
            <text:p>2024-01-10T09:45:39.01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simple">
            <text:p>unfoldingWord/oce-editor-tools/@oce-editor-tools/mui-simpl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73 downloads).">
            <text:p>Repository has GitHub dependents or at least 1,000 npm downloads in the last year (3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73 downloads in the last year).">
            <text:p>Package has detected local usage, GitHub dependents, or significant npm downloads (3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verse-navigator">
            <text:p>unfoldingWord/oce-editor-tools/@oce-editor-tools/mui-verse-naviga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pk-aligner">
            <text:p>unfoldingWord/oce-editor-tools/@oce-editor-tools/pk-alig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verse-mapper">
            <text:p>@oce-editor-tools/verse-mapper</text:p>
          </table:table-cell>
          <table:table-cell office:value-type="string" office:string-value="">
            <text:p/>
          </table:table-cell>
          <table:table-cell office:value-type="string" office:string-value="98">
            <text:p>98</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verse-mapper">
            <text:p>unfoldingWord/oce-editor-tools/@oce-editor-tools/verse-mapp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98 downloads).">
            <text:p>Repository has GitHub dependents or at least 1,000 npm downloads in the last year (9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8 downloads in the last year).">
            <text:p>Package has detected local usage, GitHub dependents, or significant npm downloads (9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gequery">
            <text:p>pagequery</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https://github.com/unfoldingWord-dev/pagequery">
            <text:p>https://github.com/unfoldingWord-dev/pagequery</text:p>
          </table:table-cell>
          <table:table-cell office:value-type="string" office:string-value="2015-12-11T18:59:22Z">
            <text:p>2015-12-11T18:59:22Z</text:p>
          </table:table-cell>
          <table:table-cell office:value-type="string" office:string-value="">
            <text:p/>
          </table:table-cell>
          <table:table-cell office:value-type="string" office:string-value="unfoldingWord-dev/pagequery">
            <text:p>unfoldingWord-dev/pagequer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web">
            <text:p>pankosmia-web</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https://github.com/unfoldingWord-box3/pankosmia-web">
            <text:p>https://github.com/unfoldingWord-box3/pankosmia-web</text:p>
          </table:table-cell>
          <table:table-cell office:value-type="string" office:string-value="2025-05-05T03:19:17Z">
            <text:p>2025-05-05T03:19:17Z</text:p>
          </table:table-cell>
          <table:table-cell office:value-type="string" office:string-value="">
            <text:p/>
          </table:table-cell>
          <table:table-cell office:value-type="string" office:string-value="unfoldingWord-box3/pankosmia-web">
            <text:p>unfoldingWord-box3/pankosmia-we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act-hooks">
            <text:p>proskomma-react-hook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10">
            <text:p>1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0">
            <text:p>0</text:p>
          </table:table-cell>
          <table:table-cell office:value-type="string" office:string-value="0">
            <text:p>0</text:p>
          </table:table-cell>
          <table:table-cell office:value-type="string" office:string-value="https://github.com/unfoldingWord/proskomma-react-hooks">
            <text:p>https://github.com/unfoldingWord/proskomma-react-hooks</text:p>
          </table:table-cell>
          <table:table-cell office:value-type="string" office:string-value="2022-06-17T15:50:39Z">
            <text:p>2022-06-17T15:50:39Z</text:p>
          </table:table-cell>
          <table:table-cell office:value-type="string" office:string-value="">
            <text:p/>
          </table:table-cell>
          <table:table-cell office:value-type="string" office:string-value="unfoldingWord/proskomma-react-hooks">
            <text:p>unfoldingWord/proskomma-react-hook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nder-preview">
            <text:p>proskomma-render-preview</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https://github.com/unfoldingWord-dev/proskomma-render-preview">
            <text:p>https://github.com/unfoldingWord-dev/proskomma-render-preview</text:p>
          </table:table-cell>
          <table:table-cell office:value-type="string" office:string-value="2022-03-22T12:58:28Z">
            <text:p>2022-03-22T12:58:28Z</text:p>
          </table:table-cell>
          <table:table-cell office:value-type="string" office:string-value="">
            <text:p/>
          </table:table-cell>
          <table:table-cell office:value-type="string" office:string-value="unfoldingWord-dev/proskomma-render-preview">
            <text:p>unfoldingWord-dev/proskomma-render-preview</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api-client">
            <text:p>python-dcs-api-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9">
            <text:p>9</text:p>
          </table:table-cell>
          <table:table-cell office:value-type="string" office:string-value="0">
            <text:p>0</text:p>
          </table:table-cell>
          <table:table-cell office:value-type="string" office:string-value="https://github.com/unfoldingWord/python-dcs-api-client">
            <text:p>https://github.com/unfoldingWord/python-dcs-api-client</text:p>
          </table:table-cell>
          <table:table-cell office:value-type="string" office:string-value="2022-10-04T15:56:11Z">
            <text:p>2022-10-04T15:56:11Z</text:p>
          </table:table-cell>
          <table:table-cell office:value-type="string" office:string-value="">
            <text:p/>
          </table:table-cell>
          <table:table-cell office:value-type="string" office:string-value="unfoldingWord/python-dcs-api-client">
            <text:p>unfoldingWord/python-dcs-api-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catalog-client">
            <text:p>python-dcs-catalog-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6">
            <text:p>6</text:p>
          </table:table-cell>
          <table:table-cell office:value-type="string" office:string-value="0">
            <text:p>0</text:p>
          </table:table-cell>
          <table:table-cell office:value-type="string" office:string-value="https://github.com/unfoldingWord/python-dcs-catalog-client">
            <text:p>https://github.com/unfoldingWord/python-dcs-catalog-client</text:p>
          </table:table-cell>
          <table:table-cell office:value-type="string" office:string-value="2022-10-04T15:55:38Z">
            <text:p>2022-10-04T15:55:38Z</text:p>
          </table:table-cell>
          <table:table-cell office:value-type="string" office:string-value="">
            <text:p/>
          </table:table-cell>
          <table:table-cell office:value-type="string" office:string-value="unfoldingWord/python-dcs-catalog-client">
            <text:p>unfoldingWord/python-dcs-catalog-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cell office:value-type="string" office:string-value="">
            <text:p/>
          </table:table-cell>
          <table:table-cell office:value-type="string" office:string-value="unfoldingWord-box3/react-library-starter">
            <text:p>unfoldingWord-box3/react-library-star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cell office:value-type="string" office:string-value="">
            <text:p/>
          </table:table-cell>
          <table:table-cell office:value-type="string" office:string-value="unfoldingWord-box3/react-to-electron-action">
            <text:p>unfoldingWord-box3/react-to-electron-act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poList">
            <text:p>RepoLis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6-06-16T19:51:50Z">
            <text:p>2026-06-16T19:51:50Z</text:p>
          </table:table-cell>
          <table:table-cell office:value-type="string" office:string-value="2026-06-16T19:51:46Z">
            <text:p>2026-06-16T19:51: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RepoList">
            <text:p>PhotoNomad0/RepoLis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RepoList">
            <text:p>https://github.com/unfoldingWord-box3/RepoList</text:p>
          </table:table-cell>
          <table:table-cell office:value-type="string" office:string-value="2026-06-16T19:51:55Z">
            <text:p>2026-06-16T19:51:55Z</text:p>
          </table:table-cell>
          <table:table-cell office:value-type="string" office:string-value="">
            <text:p/>
          </table:table-cell>
          <table:table-cell office:value-type="string" office:string-value="unfoldingWord-box3/RepoList">
            <text:p>unfoldingWord-box3/RepoLis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ableTTS_Editing">
            <text:p>StableTTS_Editing</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https://github.com/unfoldingWord-box3/StableTTS_Editing">
            <text:p>https://github.com/unfoldingWord-box3/StableTTS_Editing</text:p>
          </table:table-cell>
          <table:table-cell office:value-type="string" office:string-value="2025-03-06T14:31:54Z">
            <text:p>2025-03-06T14:31:54Z</text:p>
          </table:table-cell>
          <table:table-cell office:value-type="string" office:string-value="">
            <text:p/>
          </table:table-cell>
          <table:table-cell office:value-type="string" office:string-value="unfoldingWord-box3/StableTTS_Editing">
            <text:p>unfoldingWord-box3/StableTTS_Editing</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ggesting-word-aligner">
            <text:p>suggesting-word-aligne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box3/suggesting-word-aligner">
            <text:p>https://github.com/unfoldingWord-box3/suggesting-word-aligner</text:p>
          </table:table-cell>
          <table:table-cell office:value-type="string" office:string-value="2025-06-19T19:45:56Z">
            <text:p>2025-06-19T19:45:56Z</text:p>
          </table:table-cell>
          <table:table-cell office:value-type="string" office:string-value="">
            <text:p/>
          </table:table-cell>
          <table:table-cell office:value-type="string" office:string-value="unfoldingWord-box3/suggesting-word-aligner">
            <text:p>unfoldingWord-box3/suggesting-word-alig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cell office:value-type="string" office:string-value="">
            <text:p/>
          </table:table-cell>
          <table:table-cell office:value-type="string" office:string-value="unfoldingWord/t-core-submodule-updater">
            <text:p>unfoldingWord/t-core-submodule-upda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
            <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cell office:value-type="string" office:string-value="">
            <text:p/>
          </table:table-cell>
          <table:table-cell office:value-type="string" office:string-value="unfoldingWord-box3/tact">
            <text:p>unfoldingWord-box3/ta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create-app">
            <text:p>tc-create-app</text:p>
          </table:table-cell>
          <table:table-cell office:value-type="string" office:string-value="False">
            <text:p>False</text:p>
          </table:table-cell>
          <table:table-cell office:value-type="string" office:string-value="73">
            <text:p>73</text:p>
          </table:table-cell>
          <table:table-cell office:value-type="string" office:string-value="2022-02-22T21:12:10.659Z">
            <text:p>2022-02-22T21:12:10.659Z</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cell office:value-type="string" office:string-value="">
            <text:p/>
          </table:table-cell>
          <table:table-cell office:value-type="string" office:string-value="unfoldingWord-box3/tc-create-poc">
            <text:p>unfoldingWord-box3/tc-create-poc</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73 downloads).">
            <text:p>Repository has GitHub dependents or at least 1,000 npm downloads in the last year (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3 downloads in the last year).">
            <text:p>Package has detected local usage, GitHub dependents, or significant npm downloads (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electron-env">
            <text:p>tc-electron-env</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electron-env">
            <text:p>https://github.com/unfoldingWord/tc-electron-env</text:p>
          </table:table-cell>
          <table:table-cell office:value-type="string" office:string-value="2020-03-23T19:09:57Z">
            <text:p>2020-03-23T19:09:57Z</text:p>
          </table:table-cell>
          <table:table-cell office:value-type="string" office:string-value="">
            <text:p/>
          </table:table-cell>
          <table:table-cell office:value-type="string" office:string-value="unfoldingWord/tc-electron-env">
            <text:p>unfoldingWord/tc-electron-env</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6T05:40:18Z">
            <text:p>2026-06-06T05:40:18Z</text:p>
          </table:table-cell>
          <table:table-cell office:value-type="string" office:string-value="2026-05-05T16:33:43Z">
            <text:p>2026-05-05T16:33:43Z</text:p>
          </table:table-cell>
          <table:table-cell office:value-type="string" office:string-value="">
            <text:p/>
          </table:table-cell>
          <table:table-cell office:value-type="string" office:string-value="9">
            <text:p>9</text:p>
          </table:table-cell>
          <table:table-cell office:value-type="string" office:string-value="1">
            <text:p>1</text:p>
          </table:table-cell>
          <table:table-cell office:value-type="string" office:string-value="">
            <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text:p>['klappy', 'azrasgdc', 'abelpz', 'cursoragent']</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5-05T16:33:48Z">
            <text:p>2026-05-05T16:33:48Z</text:p>
          </table:table-cell>
          <table:table-cell office:value-type="string" office:string-value="">
            <text:p/>
          </table:table-cell>
          <table:table-cell office:value-type="string" office:string-value="unfoldingWord/translation-helps-mcp">
            <text:p>unfoldingWord/translation-helps-mc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extension">
            <text:p>translation-notes-extension</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notes-extension">
            <text:p>https://github.com/unfoldingWord-box3/translation-notes-extension</text:p>
          </table:table-cell>
          <table:table-cell office:value-type="string" office:string-value="2024-06-10T15:18:59Z">
            <text:p>2024-06-10T15:18:59Z</text:p>
          </table:table-cell>
          <table:table-cell office:value-type="string" office:string-value="">
            <text:p/>
          </table:table-cell>
          <table:table-cell office:value-type="string" office:string-value="unfoldingWord-box3/translation-notes-extension">
            <text:p>unfoldingWord-box3/translation-notes-extens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project">
            <text:p>translation-projec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ject">
            <text:p>https://github.com/unfoldingWord-box3/translation-project</text:p>
          </table:table-cell>
          <table:table-cell office:value-type="string" office:string-value="2024-06-10T15:22:27Z">
            <text:p>2024-06-10T15:22:27Z</text:p>
          </table:table-cell>
          <table:table-cell office:value-type="string" office:string-value="">
            <text:p/>
          </table:table-cell>
          <table:table-cell office:value-type="string" office:string-value="unfoldingWord-box3/translation-project">
            <text:p>unfoldingWord-box3/translation-proje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Tools">
            <text:p>USFM-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dev/USFM-Tools">
            <text:p>https://github.com/unfoldingWord-dev/USFM-Tools</text:p>
          </table:table-cell>
          <table:table-cell office:value-type="string" office:string-value="2025-12-05T16:07:19Z">
            <text:p>2025-12-05T16:07:19Z</text:p>
          </table:table-cell>
          <table:table-cell office:value-type="string" office:string-value="">
            <text:p/>
          </table:table-cell>
          <table:table-cell office:value-type="string" office:string-value="unfoldingWord-dev/USFM-Tools">
            <text:p>unfoldingWord-dev/USFM-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dex-editor">
            <text:p>uw-codex-edito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https://github.com/unfoldingWord-box3/uw-codex-editor">
            <text:p>https://github.com/unfoldingWord-box3/uw-codex-editor</text:p>
          </table:table-cell>
          <table:table-cell office:value-type="string" office:string-value="2024-03-28T07:20:52Z">
            <text:p>2024-03-28T07:20:52Z</text:p>
          </table:table-cell>
          <table:table-cell office:value-type="string" office:string-value="">
            <text:p/>
          </table:table-cell>
          <table:table-cell office:value-type="string" office:string-value="unfoldingWord-box3/uw-codex-editor">
            <text:p>unfoldingWord-box3/uw-codex-edi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
            <text:p/>
          </table:table-cell>
          <table:table-cell office:value-type="string" office:string-value="uw-editor">
            <text:p>uw-editor</text:p>
          </table:table-cell>
          <table:table-cell office:value-type="string" office:string-value="True">
            <text:p>True</text:p>
          </table:table-cell>
          <table:table-cell office:value-type="string" office:string-value="1183">
            <text:p>1183</text:p>
          </table:table-cell>
          <table:table-cell office:value-type="string" office:string-value="2023-03-21T14:43:38.471Z">
            <text:p>2023-03-21T14:43:38.471Z</text:p>
          </table:table-cell>
          <table:table-cell office:value-type="string" office:string-value="">
            <text:p/>
          </table:table-cell>
          <table:table-cell office:value-type="string" office:string-value="['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
            <text:p>['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cell office:value-type="string" office:string-value="">
            <text:p/>
          </table:table-cell>
          <table:table-cell office:value-type="string" office:string-value="unfoldingWord/uw-editor">
            <text:p>unfoldingWord/uw-edi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183 downloads).">
            <text:p>Repository has GitHub dependents or at least 1,000 npm downloads in the last year (1183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cell office:value-type="string" office:string-value="">
            <text:p/>
          </table:table-cell>
          <table:table-cell office:value-type="string" office:string-value="unfoldingWord-dev/uw-web">
            <text:p>unfoldingWord-dev/uw-we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cell office:value-type="string" office:string-value="">
            <text:p/>
          </table:table-cell>
          <table:table-cell office:value-type="string" office:string-value="unfoldingWord-box3/VscOceUsfmEdit">
            <text:p>unfoldingWord-box3/VscOceUsfmEdi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de-speech-to-text">
            <text:p>vscode-speech-to-tex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vscode-speech-to-text">
            <text:p>https://github.com/unfoldingWord-box3/vscode-speech-to-text</text:p>
          </table:table-cell>
          <table:table-cell office:value-type="string" office:string-value="2024-03-07T15:14:34Z">
            <text:p>2024-03-07T15:14:34Z</text:p>
          </table:table-cell>
          <table:table-cell office:value-type="string" office:string-value="">
            <text:p/>
          </table:table-cell>
          <table:table-cell office:value-type="string" office:string-value="unfoldingWord-box3/vscode-speech-to-text">
            <text:p>unfoldingWord-box3/vscode-speech-to-tex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hook-relay">
            <text:p>webhook-rela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https://github.com/unfoldingWord-dev/webhook-relay">
            <text:p>https://github.com/unfoldingWord-dev/webhook-relay</text:p>
          </table:table-cell>
          <table:table-cell office:value-type="string" office:string-value="2018-06-06T20:21:12Z">
            <text:p>2018-06-06T20:21:12Z</text:p>
          </table:table-cell>
          <table:table-cell office:value-type="string" office:string-value="">
            <text:p/>
          </table:table-cell>
          <table:table-cell office:value-type="string" office:string-value="unfoldingWord-dev/webhook-relay">
            <text:p>unfoldingWord-dev/webhook-rela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lignment-editor-rcl">
            <text:p>alignment-edi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cell office:value-type="string" office:string-value="">
            <text:p/>
          </table:table-cell>
          <table:table-cell office:value-type="string" office:string-value="unfoldingWord-box3/alignment-editor-rcl">
            <text:p>unfoldingWord-box3/alignment-editor-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ible-reference-range">
            <text:p>bible-reference-range</text:p>
          </table:table-cell>
          <table:table-cell office:value-type="string" office:string-value="False">
            <text:p>False</text:p>
          </table:table-cell>
          <table:table-cell office:value-type="string" office:string-value="16712">
            <text:p>16712</text:p>
          </table:table-cell>
          <table:table-cell office:value-type="string" office:string-value="2023-12-07T19:15:35.590Z">
            <text:p>2023-12-07T19:15:35.590Z</text:p>
          </table:table-cell>
          <table:table-cell office:value-type="string" office:string-value="['checking-extension', 'alignment-playground', 'translationCore', 'enhanced-word-aligner-rcl', 'tc-create-app', 'word-aligner-rcl', 'word-aligner-lib', 'single-scripture-rcl', 'translation-helps-rcl', 'scripture-resources-rcl', 'uw-quote-helpers', 'tsv-groupdata-parser', 'checking-tool-rcl', 'bible-reference-rcl', 'scripture-tsv', 'uw-bible-parser']">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cell office:value-type="string" office:string-value="">
            <text:p/>
          </table:table-cell>
          <table:table-cell office:value-type="string" office:string-value="unfoldingWord/bible-reference-range">
            <text:p>unfoldingWord/bible-reference-range</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712 downloads in the last year).">
            <text:p>Package has detected local usage, GitHub dependents, or significant npm downloads (1671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bible-reference-rcl">
            <text:p>bible-reference-rcl</text:p>
          </table:table-cell>
          <table:table-cell office:value-type="string" office:string-value="False">
            <text:p>False</text:p>
          </table:table-cell>
          <table:table-cell office:value-type="string" office:string-value="5135">
            <text:p>5135</text:p>
          </table:table-cell>
          <table:table-cell office:value-type="string" office:string-value="2024-06-04T12:40:10.075Z">
            <text:p>2024-06-04T12:40:10.075Z</text:p>
          </table:table-cell>
          <table:table-cell office:value-type="string" office:string-value="['bible-preview-app', 'gateway-edit', 'anchor-alignment-poc', 'create-app', 'greek-apparatus-app', 'door43-preview-app', 'bsa', 'scripture-tsv', 'gateway-translate', '@oce-editor-tools/joy-pk', '@oce-editor-tools/mui-pk']">
            <text:p>['bible-preview-app', 'gateway-edit', 'anchor-alignment-poc', 'create-app', 'greek-apparatus-app', 'door43-preview-app', 'bsa', 'scripture-tsv', 'gateway-translate', '@oce-editor-tools/joy-pk', '@oce-editor-tools/mui-pk']</text:p>
          </table:table-cell>
          <table:table-cell office:value-type="string" office:string-value="bible-reference-range">
            <text:p>bible-reference-range</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cell office:value-type="string" office:string-value="">
            <text:p/>
          </table:table-cell>
          <table:table-cell office:value-type="string" office:string-value="unfoldingWord/bible-reference-rcl">
            <text:p>unfoldingWord/bible-reference-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35 downloads in the last year).">
            <text:p>Package has detected local usage, GitHub dependents, or significant npm downloads (513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
            <text:p/>
          </table:table-cell>
          <table:table-cell office:value-type="string" office:string-value="book-package-rcl">
            <text:p>book-package-rcl</text:p>
          </table:table-cell>
          <table:table-cell office:value-type="string" office:string-value="False">
            <text:p>False</text:p>
          </table:table-cell>
          <table:table-cell office:value-type="string" office:string-value="2255">
            <text:p>2255</text:p>
          </table:table-cell>
          <table:table-cell office:value-type="string" office:string-value="2023-01-02T13:16:20.145Z">
            <text:p>2023-01-02T13:16:20.145Z</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cell office:value-type="string" office:string-value="">
            <text:p/>
          </table:table-cell>
          <table:table-cell office:value-type="string" office:string-value="unfoldingWord/book-package-rcl">
            <text:p>unfoldingWord/book-package-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55 downloads in the last year).">
            <text:p>Package has detected local usage, GitHub dependents, or significant npm downloads (225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
            <text:p/>
          </table:table-cell>
          <table:table-cell office:value-type="string" office:string-value="checking-tool-wrapper">
            <text:p>checking-tool-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wordmap-lexer', 'tc-strings']">
            <text:p>['gogs-client', 'selections', 'string-punctuation-tokenizer', 'tc-tool', 'tc-ui-toolkit', 'usfm-js', 'word-aligner', 'wordmap-lexer', 'tc-strings']</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cell office:value-type="string" office:string-value="">
            <text:p/>
          </table:table-cell>
          <table:table-cell office:value-type="string" office:string-value="unfoldingWord/checking-tool-wrapper">
            <text:p>unfoldingWord/checking-tool-wrapp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
            <text:p/>
          </table:table-cell>
          <table:table-cell office:value-type="string" office:string-value="datatable-translatable">
            <text:p>datatable-translatable</text:p>
          </table:table-cell>
          <table:table-cell office:value-type="string" office:string-value="False">
            <text:p>False</text:p>
          </table:table-cell>
          <table:table-cell office:value-type="string" office:string-value="3397">
            <text:p>3397</text:p>
          </table:table-cell>
          <table:table-cell office:value-type="string" office:string-value="2026-02-02T16:12:05.648Z">
            <text:p>2026-02-02T16:12:05.648Z</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cell office:value-type="string" office:string-value="">
            <text:p/>
          </table:table-cell>
          <table:table-cell office:value-type="string" office:string-value="unfoldingWord/datatable-translatable">
            <text:p>unfoldingWord/datatable-translatable</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97 downloads in the last year).">
            <text:p>Package has detected local usage, GitHub dependents, or significant npm downloads (339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dcs-branch-merger">
            <text:p>dcs-branch-merger</text:p>
          </table:table-cell>
          <table:table-cell office:value-type="string" office:string-value="False">
            <text:p>False</text:p>
          </table:table-cell>
          <table:table-cell office:value-type="string" office:string-value="3615">
            <text:p>3615</text:p>
          </table:table-cell>
          <table:table-cell office:value-type="string" office:string-value="2026-03-27T21:57:39.012Z">
            <text:p>2026-03-27T21:57:39.012Z</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cell office:value-type="string" office:string-value="">
            <text:p/>
          </table:table-cell>
          <table:table-cell office:value-type="string" office:string-value="unfoldingWord/dcs-branch-merger">
            <text:p>unfoldingWord/dcs-branch-merg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15 downloads in the last year).">
            <text:p>Package has detected local usage, GitHub dependents, or significant npm downloads (361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
            <text:p>dcs-js</text:p>
          </table:table-cell>
          <table:table-cell office:value-type="string" office:string-value="False">
            <text:p>False</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bible-preview-app', 'dcs-login', 'dcs-branch-merger', 'gateway-translate', 'dcs-react-hooks', 'dcs-js-example']">
            <text:p>['bible-preview-app', 'dcs-login', 'dcs-branch-merger', 'gateway-translate', 'dcs-react-hooks', 'dcs-js-example']</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cell office:value-type="string" office:string-value="">
            <text:p/>
          </table:table-cell>
          <table:table-cell office:value-type="string" office:string-value="unfoldingWord/dcs-js">
            <text:p>unfoldingWord/dcs-js</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7 downloads in the last year).">
            <text:p>Package has detected local usage, GitHub dependents, or significant npm downloads (60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ite">
            <text:p>electronite</text:p>
          </table:table-cell>
          <table:table-cell office:value-type="string" office:string-value="False">
            <text:p>False</text:p>
          </table:table-cell>
          <table:table-cell office:value-type="string" office:string-value="2609">
            <text:p>2609</text:p>
          </table:table-cell>
          <table:table-cell office:value-type="string" office:string-value="2026-01-22T21:05:02.866Z">
            <text:p>2026-01-22T21:05:02.866Z</text:p>
          </table:table-cell>
          <table:table-cell office:value-type="string" office:string-value="translationCore">
            <text:p>translationCore</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cell office:value-type="string" office:string-value="">
            <text:p/>
          </table:table-cell>
          <table:table-cell office:value-type="string" office:string-value="unfoldingWord-dev/electronite-cli">
            <text:p>unfoldingWord-dev/electronite-cli</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enhanced-word-aligner-rcl">
            <text:p>enhanced-word-aligner-rcl</text:p>
          </table:table-cell>
          <table:table-cell office:value-type="string" office:string-value="False">
            <text:p>False</text:p>
          </table:table-cell>
          <table:table-cell office:value-type="string" office:string-value="24656">
            <text:p>24656</text:p>
          </table:table-cell>
          <table:table-cell office:value-type="string" office:string-value="2026-06-02T13:32:18.685Z">
            <text:p>2026-06-02T13:32:18.685Z</text:p>
          </table:table-cell>
          <table:table-cell office:value-type="string" office:string-value="gateway-edit">
            <text:p>gateway-edit</text:p>
          </table:table-cell>
          <table:table-cell office:value-type="string" office:string-value="['bible-reference-range', 'uw-wordmapbooster', '@unfoldingword/eslint-config', 'usfm-js', 'word-aligner-rcl', 'string-punctuation-tokenizer', 'word-aligner', 'word-aligner-lib', 'wordmap', 'wordmap-lexer', 'uw-tsv-parser', 'tc-strings']">
            <text:p>['bible-reference-range', 'uw-wordmapbooster', '@unfoldingword/eslint-config', 'usfm-js', 'word-aligner-rcl', 'string-punctuation-tokenizer', 'word-aligner', 'word-aligner-lib', 'wordmap', 'wordmap-lexer', 'uw-tsv-parser', 'tc-strings']</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cell office:value-type="string" office:string-value="">
            <text:p/>
          </table:table-cell>
          <table:table-cell office:value-type="string" office:string-value="unfoldingWord/enhanced-word-aligner-rcl">
            <text:p>unfoldingWord/enhanced-word-aligner-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656 downloads in the last year).">
            <text:p>Package has detected local usage, GitHub dependents, or significant npm downloads (2465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
            <text:p/>
          </table:table-cell>
          <table:table-cell office:value-type="string" office:string-value="epitelete-html">
            <text:p>epitelete-html</text:p>
          </table:table-cell>
          <table:table-cell office:value-type="string" office:string-value="False">
            <text:p>False</text:p>
          </table:table-cell>
          <table:table-cell office:value-type="string" office:string-value="10010">
            <text:p>10010</text:p>
          </table:table-cell>
          <table:table-cell office:value-type="string" office:string-value="2023-07-16T00:28:17.570Z">
            <text:p>2023-07-16T00:28:17.570Z</text:p>
          </table:table-cell>
          <table:table-cell office:value-type="string" office:string-value="['beta-bibel-wiki', 'OCE Oak Edit', 'oce-oak-render', 'uw-editor', '@oce-editor-tools/base-core', '@oce-editor-tools/joy-core', '@oce-editor-tools/joy-pk', '@oce-editor-tools/mui-core', '@oce-editor-tools/mui-pk', '@oce-editor-tools/mui-simple', '@oce-editor-tools/pk-aligner']">
            <text:p>['beta-bibel-wiki', 'OCE Oak Edit', 'oce-oak-render', 'uw-editor',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cell office:value-type="string" office:string-value="">
            <text:p/>
          </table:table-cell>
          <table:table-cell office:value-type="string" office:string-value="unfoldingWord/epitelete-html">
            <text:p>unfoldingWord/epitelete-htm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010 downloads in the last year).">
            <text:p>Package has detected local usage, GitHub dependents, or significant npm downloads (1001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c-create-app', 'gitea-offline-poc', 'enhanced-word-aligner-rcl', 'gitea-react-toolkit', 'single-scripture-rcl', 'scripture-resources-rcl', 'datatable-translatable', 'markdown-translatable', 'dcs-react-hooks', 'resource-workspace-rcl']">
            <text:p>['simple-text-editor-rcl', 'tc-create-app', 'gitea-offline-poc', 'enhanced-word-aligner-rcl', 'gitea-react-toolkit', 'single-scripture-rcl', 'scripture-resources-rcl', 'datatable-translatable', 'markdown-translatable', 'dcs-react-hooks', 'resource-workspace-rcl']</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
            <text:p/>
          </table:table-cell>
          <table:table-cell office:value-type="string" office:string-value="gitea-react-toolkit">
            <text:p>gitea-react-toolkit</text:p>
          </table:table-cell>
          <table:table-cell office:value-type="string" office:string-value="False">
            <text:p>False</text:p>
          </table:table-cell>
          <table:table-cell office:value-type="string" office:string-value="17473">
            <text:p>17473</text:p>
          </table:table-cell>
          <table:table-cell office:value-type="string" office:string-value="2026-05-12T13:15:42.563Z">
            <text:p>2026-05-12T13:15:42.563Z</text:p>
          </table:table-cell>
          <table:table-cell office:value-type="string" office:string-value="['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office:string-value="['markdown-translatable', '@unfoldingword/eslint-config']">
            <text:p>['markdown-translatable', '@unfoldingword/eslint-config']</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cell office:value-type="string" office:string-value="">
            <text:p/>
          </table:table-cell>
          <table:table-cell office:value-type="string" office:string-value="unfoldingWord/gitea-react-toolkit">
            <text:p>unfoldingWord/gitea-react-toolkit</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473 downloads in the last year).">
            <text:p>Package has detected local usage, GitHub dependents, or significant npm downloads (174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
            <text:p/>
          </table:table-cell>
          <table:table-cell office:value-type="string" office:string-value="markdown-translatable">
            <text:p>markdown-translatable</text:p>
          </table:table-cell>
          <table:table-cell office:value-type="string" office:string-value="False">
            <text:p>False</text:p>
          </table:table-cell>
          <table:table-cell office:value-type="string" office:string-value="18050">
            <text:p>18050</text:p>
          </table:table-cell>
          <table:table-cell office:value-type="string" office:string-value="2023-03-07T15:00:29.476Z">
            <text:p>2023-03-07T15:00:29.476Z</text:p>
          </table:table-cell>
          <table:table-cell office:value-type="string" office:string-value="['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office:string-value="@unfoldingword/eslint-config">
            <text:p>@unfoldingword/eslint-config</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cell office:value-type="string" office:string-value="">
            <text:p/>
          </table:table-cell>
          <table:table-cell office:value-type="string" office:string-value="unfoldingWord/markdown-translatable">
            <text:p>unfoldingWord/markdown-translatable</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050 downloads in the last year).">
            <text:p>Package has detected local usage, GitHub dependents, or significant npm downloads (1805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gogs-client">
            <text:p>gogs-client</text:p>
          </table:table-cell>
          <table:table-cell office:value-type="string" office:string-value="False">
            <text:p>False</text:p>
          </table:table-cell>
          <table:table-cell office:value-type="string" office:string-value="6728">
            <text:p>6728</text:p>
          </table:table-cell>
          <table:table-cell office:value-type="string" office:string-value="2016-07-13T00:07:45.833Z">
            <text:p>2016-07-13T00:07:45.833Z</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cell office:value-type="string" office:string-value="">
            <text:p/>
          </table:table-cell>
          <table:table-cell office:value-type="string" office:string-value="unfoldingWord-dev/node-gogs-client">
            <text:p>unfoldingWord-dev/node-gogs-client</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resource-container">
            <text:p>resource-container</text:p>
          </table:table-cell>
          <table:table-cell office:value-type="string" office:string-value="False">
            <text:p>False</text:p>
          </table:table-cell>
          <table:table-cell office:value-type="string" office:string-value="3150">
            <text:p>3150</text:p>
          </table:table-cell>
          <table:table-cell office:value-type="string" office:string-value="2017-02-28T01:01:07.451Z">
            <text:p>2017-02-28T01:01:07.451Z</text:p>
          </table:table-cell>
          <table:table-cell office:value-type="string" office:string-value="door43-client">
            <text:p>door43-client</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cell office:value-type="string" office:string-value="">
            <text:p/>
          </table:table-cell>
          <table:table-cell office:value-type="string" office:string-value="unfoldingWord-dev/node-resource-container">
            <text:p>unfoldingWord-dev/node-resource-contain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50 downloads in the last year).">
            <text:p>Package has detected local usage, GitHub dependents, or significant npm downloads (315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wl-generator">
            <text:p>twl-generator</text:p>
          </table:table-cell>
          <table:table-cell office:value-type="string" office:string-value="False">
            <text:p>False</text:p>
          </table:table-cell>
          <table:table-cell office:value-type="string" office:string-value="5594">
            <text:p>5594</text:p>
          </table:table-cell>
          <table:table-cell office:value-type="string" office:string-value="2026-06-16T10:00:58.589Z">
            <text:p>2026-06-16T10:00:58.589Z</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16T21:45:05Z">
            <text:p>2026-06-16T21:45:05Z</text:p>
          </table:table-cell>
          <table:table-cell office:value-type="string" office:string-value="">
            <text:p/>
          </table:table-cell>
          <table:table-cell office:value-type="string" office:string-value="unfoldingWord/node-twl-generator">
            <text:p>unfoldingWord/node-twl-generato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594 downloads in the last year).">
            <text:p>Package has detected local usage, GitHub dependents, or significant npm downloads (559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resource-workspace-rcl">
            <text:p>resource-workspace-rcl</text:p>
          </table:table-cell>
          <table:table-cell office:value-type="string" office:string-value="False">
            <text:p>False</text:p>
          </table:table-cell>
          <table:table-cell office:value-type="string" office:string-value="2803">
            <text:p>2803</text:p>
          </table:table-cell>
          <table:table-cell office:value-type="string" office:string-value="2023-06-13T13:51:03.803Z">
            <text:p>2023-06-13T13:51:03.803Z</text:p>
          </table:table-cell>
          <table:table-cell office:value-type="string" office:string-value="['next-js-template', 'gateway-edit', 'admin-app', 'create-app', 'gateway-admin', 'bsa', 'gateway-translate']">
            <text:p>['next-js-template', 'gateway-edit', 'admin-app', 'create-app', 'gateway-admin', 'bsa', 'gateway-translate']</text:p>
          </table:table-cell>
          <table:table-cell office:value-type="string" office:string-value="['@unfoldingword/eslint-config', 'gitea-react-toolkit', 'markdown-translatable', 'scripture-resources-rcl', 'translation-helps-rcl', 'bible-reference-range', 'dcs-branch-merger', 'tc-ui-toolkit', 'word-aligner', 'string-punctuation-tokenizer', 'usfm-js', 'wordmap-lexer', 'uw-quote-helpers', 'dcs-js', 'tsv-groupdata-parser', 'uw-bible-parser', 'uw-tsv-parser']">
            <text:p>['@unfoldingword/eslint-config', 'gitea-react-toolkit', 'markdown-translatable', 'scripture-resources-rcl', 'translation-helps-rcl', 'bible-reference-range', 'dcs-branch-merger', 'tc-ui-toolkit', 'word-aligner', 'string-punctuation-tokenizer', 'usfm-js', 'wordmap-lexer', 'uw-quote-helpers', 'dcs-js', 'tsv-groupdata-parser', 'uw-bible-parser', 'uw-tsv-parser']</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cell office:value-type="string" office:string-value="">
            <text:p/>
          </table:table-cell>
          <table:table-cell office:value-type="string" office:string-value="unfoldingWord/resource-workspace-rcl">
            <text:p>unfoldingWord/resource-workspace-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803 downloads in the last year).">
            <text:p>Package has detected local usage, GitHub dependents, or significant npm downloads (280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
            <text:p/>
          </table:table-cell>
          <table:table-cell office:value-type="string" office:string-value="scripture-resources-rcl">
            <text:p>scripture-resources-rcl</text:p>
          </table:table-cell>
          <table:table-cell office:value-type="string" office:string-value="False">
            <text:p>False</text:p>
          </table:table-cell>
          <table:table-cell office:value-type="string" office:string-value="15048">
            <text:p>15048</text:p>
          </table:table-cell>
          <table:table-cell office:value-type="string" office:string-value="2026-03-19T13:24:25.124Z">
            <text:p>2026-03-19T13:24:25.124Z</text:p>
          </table:table-cell>
          <table:table-cell office:value-type="string" office:string-value="['next-js-template', 'pdf-generator-rcl', 'tc-create-app', 'gateway-edit', 'create-app', 'greek-apparatus-app', 'book-package-viewer-poc', 'pdf-generator', 'gateway-admin', 'single-scripture-rcl', 'translation-helps-rcl', 'bsa', 'gateway-translate', 'resource-workspace-rcl', 'resource-checker']">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office:string-value="['bible-reference-range', 'gitea-react-toolkit', 'markdown-translatable', 'string-punctuation-tokenizer', 'tc-ui-toolkit', 'usfm-js', 'uw-quote-helpers', 'word-aligner', '@unfoldingword/eslint-config', 'wordmap-lexer', 'tsv-groupdata-parser', 'uw-bible-parser', 'uw-tsv-parser']">
            <text:p>['bible-reference-range', 'gitea-react-toolkit', 'markdown-translatable', 'string-punctuation-tokenizer', 'tc-ui-toolkit', 'usfm-js', 'uw-quote-helpers', 'word-aligner', '@unfoldingword/eslint-config', 'wordmap-lexer', 'tsv-groupdata-parser', 'uw-bible-parser', 'uw-tsv-parser']</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cell office:value-type="string" office:string-value="">
            <text:p/>
          </table:table-cell>
          <table:table-cell office:value-type="string" office:string-value="unfoldingWord/scripture-resources-rcl">
            <text:p>unfoldingWord/scripture-resources-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048 downloads in the last year).">
            <text:p>Package has detected local usage, GitHub dependents, or significant npm downloads (1504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scripture-tsv">
            <text:p>scripture-tsv</text:p>
          </table:table-cell>
          <table:table-cell office:value-type="string" office:string-value="False">
            <text:p>False</text:p>
          </table:table-cell>
          <table:table-cell office:value-type="string" office:string-value="2669">
            <text:p>2669</text:p>
          </table:table-cell>
          <table:table-cell office:value-type="string" office:string-value="2024-05-02T21:03:03.412Z">
            <text:p>2024-05-02T21:03:03.412Z</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cell office:value-type="string" office:string-value="">
            <text:p/>
          </table:table-cell>
          <table:table-cell office:value-type="string" office:string-value="unfoldingWord/scripture-tsv">
            <text:p>unfoldingWord/scripture-tsv</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69 downloads in the last year).">
            <text:p>Package has detected local usage, GitHub dependents, or significant npm downloads (266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elections">
            <text:p>sele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cell office:value-type="string" office:string-value="">
            <text:p/>
          </table:table-cell>
          <table:table-cell office:value-type="string" office:string-value="unfoldingWord/selections">
            <text:p>unfoldingWord/selections</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simple-text-editor-rcl">
            <text:p>simple-text-editor-rcl</text:p>
          </table:table-cell>
          <table:table-cell office:value-type="string" office:string-value="False">
            <text:p>False</text:p>
          </table:table-cell>
          <table:table-cell office:value-type="string" office:string-value="3912">
            <text:p>3912</text:p>
          </table:table-cell>
          <table:table-cell office:value-type="string" office:string-value="2022-06-09T23:15:38.322Z">
            <text:p>2022-06-09T23:15:38.322Z</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cell office:value-type="string" office:string-value="">
            <text:p/>
          </table:table-cell>
          <table:table-cell office:value-type="string" office:string-value="unfoldingWord-box3/simple-text-editor-rcl">
            <text:p>unfoldingWord-box3/simple-text-editor-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912 downloads in the last year).">
            <text:p>Package has detected local usage, GitHub dependents, or significant npm downloads (391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
            <text:p/>
          </table:table-cell>
          <table:table-cell office:value-type="string" office:string-value="single-scripture-rcl">
            <text:p>single-scripture-rcl</text:p>
          </table:table-cell>
          <table:table-cell office:value-type="string" office:string-value="False">
            <text:p>False</text:p>
          </table:table-cell>
          <table:table-cell office:value-type="string" office:string-value="9774">
            <text:p>9774</text:p>
          </table:table-cell>
          <table:table-cell office:value-type="string" office:string-value="2026-04-16T17:29:58.529Z">
            <text:p>2026-04-16T17:29:58.529Z</text:p>
          </table:table-cell>
          <table:table-cell office:value-type="string" office:string-value="['next-js-template', 'gateway-edit', 'create-app', 'gateway-admin']">
            <text:p>['next-js-template', 'gateway-edit', 'create-app', 'gateway-admin']</text:p>
          </table:table-cell>
          <table:table-cell office:value-type="string" office:string-value="['@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
            <text:p>['@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cell office:value-type="string" office:string-value="">
            <text:p/>
          </table:table-cell>
          <table:table-cell office:value-type="string" office:string-value="unfoldingWord/single-scripture-rcl">
            <text:p>unfoldingWord/single-scripture-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774 downloads in the last year).">
            <text:p>Package has detected local usage, GitHub dependents, or significant npm downloads (977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
            <text:p/>
          </table:table-cell>
          <table:table-cell office:value-type="string" office:string-value="string-punctuation-tokenizer">
            <text:p>string-punctuation-tokenizer</text:p>
          </table:table-cell>
          <table:table-cell office:value-type="string" office:string-value="False">
            <text:p>False</text:p>
          </table:table-cell>
          <table:table-cell office:value-type="string" office:string-value="98082">
            <text:p>98082</text:p>
          </table:table-cell>
          <table:table-cell office:value-type="string" office:string-value="2021-08-25T21:55:46.406Z">
            <text:p>2021-08-25T21:55:46.406Z</text:p>
          </table:table-cell>
          <table:table-cell office:value-type="string" office:string-value="['checking-extension', 'anchor-alignment-poc', 'greek-apparatus-app', 'pdf-generator', 'tsv-quote-converters', 'translationCore', 'string-punctuation-tokenizer', 'word-aligner-rcl', 'word-aligner-lib', 'word-aligner', 'scripture-resources-rcl', 'uw-quote-helpers', 'tsv-groupdata-parser', 'tc-source-content-updater', 'checking-tool-rcl', 'tc-ui-toolkit', 'checking-tool-wrapper', 'wordmap-lexer', 'ScripturePane', '@oce-editor-tools/pk-aligner']">
            <text:p>['checking-extension', 'anchor-alignment-poc', 'greek-apparatus-app', 'pdf-generator', 'tsv-quote-converters', 'translationCore',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office:string-value="['string-punctuation-tokenizer', 'wordmap-lexer']">
            <text:p>['string-punctuation-tokenizer', 'wordmap-lexer']</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cell office:value-type="string" office:string-value="">
            <text:p/>
          </table:table-cell>
          <table:table-cell office:value-type="string" office:string-value="unfoldingWord/string-punctuation-tokenizer">
            <text:p>unfoldingWord/string-punctuation-tokeniz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ource-content-updater">
            <text:p>tc-source-content-updater</text:p>
          </table:table-cell>
          <table:table-cell office:value-type="string" office:string-value="False">
            <text:p>False</text:p>
          </table:table-cell>
          <table:table-cell office:value-type="string" office:string-value="7777">
            <text:p>7777</text:p>
          </table:table-cell>
          <table:table-cell office:value-type="string" office:string-value="2025-10-28T18:16:22.466Z">
            <text:p>2025-10-28T18:16:22.466Z</text:p>
          </table:table-cell>
          <table:table-cell office:value-type="string" office:string-value="['checking-extension', 'pdf-generator', 'translationCore', 'checking-tool-rcl']">
            <text:p>['checking-extension', 'pdf-generator', 'translationCore', 'checking-tool-rcl']</text:p>
          </table:table-cell>
          <table:table-cell office:value-type="string" office:string-value="['string-punctuation-tokenizer', 'tsv-groupdata-parser', 'usfm-js', 'wordmap-lexer', 'bible-reference-range', 'uw-tsv-parser']">
            <text:p>['string-punctuation-tokenizer', 'tsv-groupdata-parser', 'usfm-js', 'wordmap-lexer', 'bible-reference-range', 'uw-tsv-parser']</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cell office:value-type="string" office:string-value="">
            <text:p/>
          </table:table-cell>
          <table:table-cell office:value-type="string" office:string-value="unfoldingWord/tc-source-content-updater">
            <text:p>unfoldingWord/tc-source-content-updat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777 downloads in the last year).">
            <text:p>Package has detected local usage, GitHub dependents, or significant npm downloads (777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trings">
            <text:p>tc-string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cell office:value-type="string" office:string-value="">
            <text:p/>
          </table:table-cell>
          <table:table-cell office:value-type="string" office:string-value="unfoldingWord/tc-strings">
            <text:p>unfoldingWord/tc-strings</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wordAlignment', 'checking-tool-wrapper', 'VerseCheck', 'toolTemplate', 'ScripturePane']">
            <text:p>['translationCore', 'translationNotes', 'translationWords', 'wordAlignment', 'checking-tool-wrapper', 'VerseCheck', 'toolTemplate', 'ScripturePane']</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cell office:value-type="string" office:string-value="">
            <text:p/>
          </table:table-cell>
          <table:table-cell office:value-type="string" office:string-value="unfoldingWord/tc-tool">
            <text:p>unfoldingWord/tc-too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
            <text:p/>
          </table:table-cell>
          <table:table-cell office:value-type="string" office:string-value="tc-ui-toolkit">
            <text:p>tc-ui-toolkit</text:p>
          </table:table-cell>
          <table:table-cell office:value-type="string" office:string-value="False">
            <text:p>False</text:p>
          </table:table-cell>
          <table:table-cell office:value-type="string" office:string-value="29502">
            <text:p>29502</text:p>
          </table:table-cell>
          <table:table-cell office:value-type="string" office:string-value="2024-12-31T18:53:34.752Z">
            <text:p>2024-12-31T18:53:34.752Z</text:p>
          </table:table-cell>
          <table:table-cell office:value-type="string" office:string-value="['alignment-playground', 'next-js-template', 'gateway-edit', 'translationCore', 'wordAlignment', 'gateway-admin', 'tc-create-app', 'single-scripture-rcl', 'translation-helps-rcl', 'scripture-resources-rcl', 'bsa', 'checking-tool-wrapper']">
            <text:p>['alignment-playground', 'next-js-template', 'gateway-edit', 'translationCore', 'wordAlignment', 'gateway-admin', 'tc-create-app', 'single-scripture-rcl', 'translation-helps-rcl', 'scripture-resources-rcl', 'bsa', 'checking-tool-wrapper']</text:p>
          </table:table-cell>
          <table:table-cell office:value-type="string" office:string-value="['string-punctuation-tokenizer', 'word-aligner', 'usfm-js', 'wordmap-lexer']">
            <text:p>['string-punctuation-tokenizer', 'word-aligner', 'usfm-js', 'wordmap-lexer']</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cell office:value-type="string" office:string-value="">
            <text:p/>
          </table:table-cell>
          <table:table-cell office:value-type="string" office:string-value="unfoldingWord/tc-ui-toolkit">
            <text:p>unfoldingWord/tc-ui-toolkit</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502 downloads in the last year).">
            <text:p>Package has detected local usage, GitHub dependents, or significant npm downloads (2950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
            <text:p/>
          </table:table-cell>
          <table:table-cell office:value-type="string" office:string-value="translation-helps-rcl">
            <text:p>translation-helps-rcl</text:p>
          </table:table-cell>
          <table:table-cell office:value-type="string" office:string-value="False">
            <text:p>False</text:p>
          </table:table-cell>
          <table:table-cell office:value-type="string" office:string-value="15003">
            <text:p>15003</text:p>
          </table:table-cell>
          <table:table-cell office:value-type="string" office:string-value="2026-03-27T22:01:47.002Z">
            <text:p>2026-03-27T22:01:47.002Z</text:p>
          </table:table-cell>
          <table:table-cell office:value-type="string" office:string-value="['next-js-template', 'gateway-edit', 'admin-app', 'create-app', 'gateway-admin', 'single-scripture-rcl', 'bsa', 'gateway-translate', 'uw-editor', 'resource-workspace-rcl']">
            <text:p>['next-js-template', 'gateway-edit', 'admin-app', 'create-app', 'gateway-admin', 'single-scripture-rcl', 'bsa', 'gateway-translate', 'uw-editor', 'resource-workspace-rcl']</text:p>
          </table:table-cell>
          <table:table-cell office:value-type="string" office:string-value="['bible-reference-range', 'dcs-branch-merger', 'gitea-react-toolkit', 'markdown-translatable', 'scripture-resources-rcl', 'tc-ui-toolkit', 'word-aligner', 'string-punctuation-tokenizer', 'usfm-js', 'wordmap-lexer', '@unfoldingword/eslint-config', 'dcs-js', 'uw-quote-helpers', 'tsv-groupdata-parser', 'uw-bible-parser', 'uw-tsv-parser']">
            <text:p>['bible-reference-range', 'dcs-branch-merger', 'gitea-react-toolkit', 'markdown-translatable', 'scripture-resources-rcl', 'tc-ui-toolkit', 'word-aligner', 'string-punctuation-tokenizer', 'usfm-js', 'wordmap-lexer', '@unfoldingword/eslint-config', 'dcs-js', 'uw-quote-helpers', 'tsv-groupdata-parser', 'uw-bible-parser', 'uw-tsv-parser']</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cell office:value-type="string" office:string-value="">
            <text:p/>
          </table:table-cell>
          <table:table-cell office:value-type="string" office:string-value="unfoldingWord/translation-helps-rcl">
            <text:p>unfoldingWord/translation-helps-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003 downloads in the last year).">
            <text:p>Package has detected local usage, GitHub dependents, or significant npm downloads (1500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
            <text:p/>
          </table:table-cell>
          <table:table-cell office:value-type="string" office:string-value="tsv-groupdata-parser">
            <text:p>tsv-groupdata-parser</text:p>
          </table:table-cell>
          <table:table-cell office:value-type="string" office:string-value="False">
            <text:p>False</text:p>
          </table:table-cell>
          <table:table-cell office:value-type="string" office:string-value="6418">
            <text:p>6418</text:p>
          </table:table-cell>
          <table:table-cell office:value-type="string" office:string-value="2024-10-16T17:43:33.516Z">
            <text:p>2024-10-16T17:43:33.516Z</text:p>
          </table:table-cell>
          <table:table-cell office:value-type="string" office:string-value="['checking-extension', 'pdf-generator', 'translationCore', 'uw-quote-helpers', 'tc-source-content-updater', 'checking-tool-rcl']">
            <text:p>['checking-extension', 'pdf-generator', 'translationCore', 'uw-quote-helpers', 'tc-source-content-updater', 'checking-tool-rcl']</text:p>
          </table:table-cell>
          <table:table-cell office:value-type="string" office:string-value="['bible-reference-range', 'uw-tsv-parser', 'string-punctuation-tokenizer', 'wordmap-lexer']">
            <text:p>['bible-reference-range', 'uw-tsv-parser', 'string-punctuation-tokenizer', 'wordmap-lexer']</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cell office:value-type="string" office:string-value="">
            <text:p/>
          </table:table-cell>
          <table:table-cell office:value-type="string" office:string-value="unfoldingWord/tsv-groupdata-parser">
            <text:p>unfoldingWord/tsv-groupdata-pars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18 downloads in the last year).">
            <text:p>Package has detected local usage, GitHub dependents, or significant npm downloads (641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l-generator', 'tsv-twl-creation-app', 'tsv7-tn-cleanup-app', 'add-gl-quotes-to-tsv-files']">
            <text:p>['twl-generator', 'tsv-twl-creation-app', 'tsv7-tn-cleanup-app', 'add-gl-quotes-to-tsv-files']</text:p>
          </table:table-cell>
          <table:table-cell office:value-type="string" office:string-value="['string-punctuation-tokenizer', 'wordmap-lexer']">
            <text:p>['string-punctuation-tokenizer', 'wordmap-lexer']</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17T06:45:34Z">
            <text:p>2026-06-17T06:45:34Z</text:p>
          </table:table-cell>
          <table:table-cell office:value-type="string" office:string-value="">
            <text:p/>
          </table:table-cell>
          <table:table-cell office:value-type="string" office:string-value="unfoldingWord/tsv-quote-converters">
            <text:p>unfoldingWord/tsv-quote-converters</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alignment-remover">
            <text:p>usfm-alignment-remo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l-generator', 'door43-preview-app', 'door43-preview-renderers']">
            <text:p>['twl-generator', 'door43-preview-app', 'door43-preview-renderers']</text:p>
          </table:table-cell>
          <table:table-cell office:value-type="string" office:string-value="usfm-js">
            <text:p>usfm-js</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cell office:value-type="string" office:string-value="">
            <text:p/>
          </table:table-cell>
          <table:table-cell office:value-type="string" office:string-value="unfoldingWord/usfm-alignment-remover-app">
            <text:p>unfoldingWord/usfm-alignment-remover-app</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ranslation-helps', 'qa-app', 'alignment-playground', 'tc-create-app', 'greek-apparatus-app', 'pdf-generator', 'scripture-as-graph', 'cskillbp-prompt-over-code', 'zulip-bot', 'tsv-twl-creation-app', 'translationCore', 'wordAlignment', 'uw-content-validation', 'door43-preview-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
            <text:p>['checking-extension', 'translation-helps', 'qa-app', 'alignment-playground', 'tc-create-app', 'greek-apparatus-app', 'pdf-generator', 'scripture-as-graph', 'cskillbp-prompt-over-code', 'zulip-bot', 'tsv-twl-creation-app', 'translationCore', 'wordAlignment', 'uw-content-validation', 'door43-preview-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cell office:value-type="string" office:string-value="">
            <text:p/>
          </table:table-cell>
          <table:table-cell office:value-type="string" office:string-value="unfoldingWord/usfm-js">
            <text:p>unfoldingWord/usfm-js</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09:33:50Z">
            <text:p>2026-06-07T09:33:50Z</text:p>
          </table:table-cell>
          <table:table-cell office:value-type="string" office:string-value="2026-06-07T09:31:31Z">
            <text:p>2026-06-07T09:31:31Z</text:p>
          </table:table-cell>
          <table:table-cell office:value-type="string" office:string-value="">
            <text:p/>
          </table:table-cell>
          <table:table-cell office:value-type="string" office:string-value="80">
            <text:p>80</text:p>
          </table:table-cell>
          <table:table-cell office:value-type="string" office:string-value="2">
            <text:p>2</text:p>
          </table:table-cell>
          <table:table-cell office:value-type="string" office:string-value="">
            <text:p/>
          </table:table-cell>
          <table:table-cell office:value-type="string" office:string-value="uw-content-validation">
            <text:p>uw-content-validation</text:p>
          </table:table-cell>
          <table:table-cell office:value-type="string" office:string-value="False">
            <text:p>False</text:p>
          </table:table-cell>
          <table:table-cell office:value-type="string" office:string-value="2070">
            <text:p>2070</text:p>
          </table:table-cell>
          <table:table-cell office:value-type="string" office:string-value="2026-06-07T09:30:48.456Z">
            <text:p>2026-06-07T09:30:48.456Z</text:p>
          </table:table-cell>
          <table:table-cell office:value-type="string" office:string-value="['tc-create-app', 'content-validation-app', 'gateway-admin', 'catalog-next-toolkit']">
            <text:p>['tc-create-app', 'content-validation-app', 'gateway-admin', 'catalog-next-toolkit']</text:p>
          </table:table-cell>
          <table:table-cell office:value-type="string" office:string-value="usfm-js">
            <text:p>usfm-js</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07T09:31:36Z">
            <text:p>2026-06-07T09:31:36Z</text:p>
          </table:table-cell>
          <table:table-cell office:value-type="string" office:string-value="">
            <text:p/>
          </table:table-cell>
          <table:table-cell office:value-type="string" office:string-value="unfoldingWord/uw-content-validation">
            <text:p>unfoldingWord/uw-content-validation</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070 downloads in the last year).">
            <text:p>Package has detected local usage, GitHub dependents, or significant npm downloads (207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
            <text:p/>
          </table:table-cell>
          <table:table-cell office:value-type="string" office:string-value="uw-languages-rcl">
            <text:p>uw-languages-rcl</text:p>
          </table:table-cell>
          <table:table-cell office:value-type="string" office:string-value="False">
            <text:p>False</text:p>
          </table:table-cell>
          <table:table-cell office:value-type="string" office:string-value="1220">
            <text:p>1220</text:p>
          </table:table-cell>
          <table:table-cell office:value-type="string" office:string-value="2026-05-28T16:01:32.183Z">
            <text:p>2026-05-28T16:01:32.183Z</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cell office:value-type="string" office:string-value="">
            <text:p/>
          </table:table-cell>
          <table:table-cell office:value-type="string" office:string-value="unfoldingWord/uw-languages-rcl">
            <text:p>unfoldingWord/uw-languages-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20 downloads in the last year).">
            <text:p>Package has detected local usage, GitHub dependents, or significant npm downloads (122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uw-proskomma">
            <text:p>uw-proskomma</text:p>
          </table:table-cell>
          <table:table-cell office:value-type="string" office:string-value="False">
            <text:p>False</text:p>
          </table:table-cell>
          <table:table-cell office:value-type="string" office:string-value="2361">
            <text:p>2361</text:p>
          </table:table-cell>
          <table:table-cell office:value-type="string" office:string-value="2022-07-13T12:06:56.761Z">
            <text:p>2022-07-13T12:06:56.761Z</text:p>
          </table:table-cell>
          <table:table-cell office:value-type="string" office:string-value="['proskomma-scripture-resources-rcl', 'epitelete-html']">
            <text:p>['proskomma-scripture-resources-rcl', 'epitelete-html']</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cell office:value-type="string" office:string-value="">
            <text:p/>
          </table:table-cell>
          <table:table-cell office:value-type="string" office:string-value="unfoldingWord-box3/uw-proskomma">
            <text:p>unfoldingWord-box3/uw-proskomma</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61 downloads in the last year).">
            <text:p>Package has detected local usage, GitHub dependents, or significant npm downloads (236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quote-helpers">
            <text:p>uw-quote-helpers</text:p>
          </table:table-cell>
          <table:table-cell office:value-type="string" office:string-value="False">
            <text:p>False</text:p>
          </table:table-cell>
          <table:table-cell office:value-type="string" office:string-value="3142">
            <text:p>3142</text:p>
          </table:table-cell>
          <table:table-cell office:value-type="string" office:string-value="2025-01-17T14:55:12.819Z">
            <text:p>2025-01-17T14:55:12.819Z</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wordmap-lexer', 'uw-tsv-parser']">
            <text:p>['bible-reference-range', 'string-punctuation-tokenizer', 'tsv-groupdata-parser', 'usfm-js', 'uw-bible-parser', 'wordmap-lexer', 'uw-tsv-parser']</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cell office:value-type="string" office:string-value="">
            <text:p/>
          </table:table-cell>
          <table:table-cell office:value-type="string" office:string-value="unfoldingWord/uw-quote-helpers">
            <text:p>unfoldingWord/uw-quote-helpers</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42 downloads in the last year).">
            <text:p>Package has detected local usage, GitHub dependents, or significant npm downloads (314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cell office:value-type="string" office:string-value="">
            <text:p/>
          </table:table-cell>
          <table:table-cell office:value-type="string" office:string-value="unfoldingWord/uw-scripture-parser">
            <text:p>unfoldingWord/uw-scripture-pars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uw-tsv-parser">
            <text:p>uw-tsv-parser</text:p>
          </table:table-cell>
          <table:table-cell office:value-type="string" office:string-value="False">
            <text:p>False</text:p>
          </table:table-cell>
          <table:table-cell office:value-type="string" office:string-value="4619">
            <text:p>4619</text:p>
          </table:table-cell>
          <table:table-cell office:value-type="string" office:string-value="2022-02-02T14:06:17.344Z">
            <text:p>2022-02-02T14:06:17.344Z</text:p>
          </table:table-cell>
          <table:table-cell office:value-type="string" office:string-value="['checking-extension', 'gateway-admin', 'tc-create-app', 'word-aligner-rcl', 'tsv-groupdata-parser', 'checking-tool-rcl']">
            <text:p>['checking-extension', 'gateway-admin', 'tc-create-app', 'word-aligner-rcl', 'tsv-groupdata-parser', 'checking-tool-rcl']</text:p>
          </table:table-cell>
          <table:table-cell office:value-type="string" office:string-value="">
            <text:p/>
          </table:table-cell>
          <table:table-cell office:value-type="string" office:string-value="">
            <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cell office:value-type="string" office:string-value="">
            <text:p/>
          </table:table-cell>
          <table:table-cell office:value-type="string" office:string-value="unfoldingWord/uw-tsv-parser">
            <text:p>unfoldingWord/uw-tsv-pars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619 downloads in the last year).">
            <text:p>Package has detected local usage, GitHub dependents, or significant npm downloads (461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
            <text:p/>
          </table:table-cell>
          <table:table-cell office:value-type="string" office:string-value="uw-word-count">
            <text:p>uw-word-count</text:p>
          </table:table-cell>
          <table:table-cell office:value-type="string" office:string-value="False">
            <text:p>False</text:p>
          </table:table-cell>
          <table:table-cell office:value-type="string" office:string-value="365">
            <text:p>365</text:p>
          </table:table-cell>
          <table:table-cell office:value-type="string" office:string-value="2020-07-15T14:01:25.409Z">
            <text:p>2020-07-15T14:01:25.409Z</text:p>
          </table:table-cell>
          <table:table-cell office:value-type="string" office:string-value="book-package-rcl">
            <text:p>book-package-rcl</text:p>
          </table:table-cell>
          <table:table-cell office:value-type="string" office:string-value="usfm-js">
            <text:p>usfm-js</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5 downloads in the last year).">
            <text:p>Package has detected local usage, GitHub dependents, or significant npm downloads (36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
            <text:p>word-aligner</text:p>
          </table:table-cell>
          <table:table-cell office:value-type="string" office:string-value="False">
            <text:p>False</text:p>
          </table:table-cell>
          <table:table-cell office:value-type="string" office:string-value="44675">
            <text:p>44675</text:p>
          </table:table-cell>
          <table:table-cell office:value-type="string" office:string-value="2026-05-24T21:22:13.663Z">
            <text:p>2026-05-24T21:22:13.663Z</text:p>
          </table:table-cell>
          <table:table-cell office:value-type="string" office:string-value="['alignment-playground', 'next-js-template', 'gateway-edit', 'translationCore', 'wordAlignment', 'gateway-admin', 'tc-create-app', 'word-aligner-rcl', 'word-aligner-lib', 'single-scripture-rcl', 'translation-helps-rcl', 'scripture-resources-rcl', 'bsa', 'checking-tool-rcl', 'tc-ui-toolkit', 'checking-tool-wrapper']">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office:string-value="['string-punctuation-tokenizer', 'usfm-js', 'wordmap-lexer']">
            <text:p>['string-punctuation-tokenizer', 'usfm-js', 'wordmap-lexer']</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cell office:value-type="string" office:string-value="">
            <text:p/>
          </table:table-cell>
          <table:table-cell office:value-type="string" office:string-value="unfoldingWord/word-aligner">
            <text:p>unfoldingWord/word-align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4675 downloads in the last year).">
            <text:p>Package has detected local usage, GitHub dependents, or significant npm downloads (4467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lib">
            <text:p>word-aligner-lib</text:p>
          </table:table-cell>
          <table:table-cell office:value-type="string" office:string-value="False">
            <text:p>False</text:p>
          </table:table-cell>
          <table:table-cell office:value-type="string" office:string-value="4741">
            <text:p>4741</text:p>
          </table:table-cell>
          <table:table-cell office:value-type="string" office:string-value="2026-05-24T22:38:01.649Z">
            <text:p>2026-05-24T22:38:01.649Z</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cell office:value-type="string" office:string-value="">
            <text:p/>
          </table:table-cell>
          <table:table-cell office:value-type="string" office:string-value="unfoldingWord/word-aligner-lib">
            <text:p>unfoldingWord/word-aligner-lib</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741 downloads in the last year).">
            <text:p>Package has detected local usage, GitHub dependents, or significant npm downloads (474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
            <text:p/>
          </table:table-cell>
          <table:table-cell office:value-type="string" office:string-value="word-aligner-rcl">
            <text:p>word-aligner-rcl</text:p>
          </table:table-cell>
          <table:table-cell office:value-type="string" office:string-value="False">
            <text:p>False</text:p>
          </table:table-cell>
          <table:table-cell office:value-type="string" office:string-value="16522">
            <text:p>16522</text:p>
          </table:table-cell>
          <table:table-cell office:value-type="string" office:string-value="2026-05-24T23:03:19.258Z">
            <text:p>2026-05-24T23:03:19.258Z</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c-strings']">
            <text:p>['bible-reference-range', 'string-punctuation-tokenizer', 'usfm-js', 'word-aligner', 'word-aligner-lib', 'wordmap', 'wordmap-lexer', 'uw-tsv-parser', 'tc-strings']</text:p>
          </table:table-cell>
          <table:table-cell office:value-type="string" office:string-value="['unfoldingWord/word-aligner', 'unfoldingWord/single-scripture-rcl', 'unfoldingWord/gateway-edit', 'unfoldingWord/door43-preview-app', 'unfoldingWord-box3/word-aligner-extension', 'unfoldingWord/oce-editor-tools']">
            <text:p>['unfoldingWord/word-aligner', 'unfoldingWord/single-scripture-rcl', 'unfoldingWord/gateway-edit', 'unfoldingWord/door43-preview-app', 'unfoldingWord-box3/word-aligner-extension',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22 downloads in the last year).">
            <text:p>Package has detected local usage, GitHub dependents, or significant npm downloads (1652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
            <text:p/>
          </table:table-cell>
          <table:table-cell office:value-type="string" office:string-value="wordmap">
            <text:p>wordma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wordmap-react-toolkit', 'translationCore', 'wordAlignment', 'word-aligner-rcl', 'uw-wordmapbooster']">
            <text:p>['wordmap-mt', 'wordmap-react-toolkit', 'translationCore', 'wordAlignment', 'word-aligner-rcl', 'uw-wordmapbooster']</text:p>
          </table:table-cell>
          <table:table-cell office:value-type="string" office:string-value="wordmap-lexer">
            <text:p>wordmap-lexer</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cell office:value-type="string" office:string-value="">
            <text:p/>
          </table:table-cell>
          <table:table-cell office:value-type="string" office:string-value="unfoldingWord/wordMAP">
            <text:p>unfoldingWord/wordMAP</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lexer">
            <text:p>wordmap-lex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alignment-playground', 'wordmap-react-toolkit', 'translationCore', 'wordAlignment', 'string-punctuation-tokenizer', 'word-aligner-rcl', 'word-aligner-lib', 'uw-wordmapbooster', 'checking-tool-rcl', 'wordmap', 'wordmap-usfm']">
            <text:p>['wordmap-mt', 'alignment-playground', 'wordmap-react-toolkit', 'translationCore', 'wordAlignment', 'string-punctuation-tokenizer', 'word-aligner-rcl', 'word-aligner-lib', 'uw-wordmapbooster', 'checking-tool-rcl', 'wordmap', 'wordmap-usfm']</text:p>
          </table:table-cell>
          <table:table-cell office:value-type="string" office:string-value="string-punctuation-tokenizer">
            <text:p>string-punctuation-tokenizer</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cell office:value-type="string" office:string-value="">
            <text:p/>
          </table:table-cell>
          <table:table-cell office:value-type="string" office:string-value="unfoldingWord/wordMAP-lexer">
            <text:p>unfoldingWord/wordMAP-lex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cell office:value-type="string" office:string-value="">
            <text:p/>
          </table:table-cell>
          <table:table-cell office:value-type="string" office:string-value="unfoldingWord/wordmapbooster">
            <text:p>unfoldingWord/wordmapbooster</text:p>
          </table:table-cell>
          <table:table-cell office:value-type="string" office:string-value="3-Keep - locally used">
            <text:p>3-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vd-ar">
            <text:p>avd-a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avd-ar">
            <text:p>https://github.com/unfoldingWord/avd-ar</text:p>
          </table:table-cell>
          <table:table-cell office:value-type="string" office:string-value="2023-01-28T16:52:17Z">
            <text:p>2023-01-28T16:52:17Z</text:p>
          </table:table-cell>
          <table:table-cell office:value-type="string" office:string-value="">
            <text:p/>
          </table:table-cell>
          <table:table-cell office:value-type="string" office:string-value="unfoldingWord/avd-ar">
            <text:p>unfoldingWord/avd-a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Bootstrap43">
            <text:p>unfoldingWord-dev/Bootstrap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ign">
            <text:p>design</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esign">
            <text:p>https://github.com/unfoldingWord-dev/design</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design">
            <text:p>unfoldingWord-dev/desig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cell office:value-type="string" office:string-value="">
            <text:p/>
          </table:table-cell>
          <table:table-cell office:value-type="string" office:string-value="unfoldingWord/discourse-mermaid">
            <text:p>unfoldingWord/discourse-mermai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slack-invite">
            <text:p>dokuwiki-slack-invite</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slack-invite">
            <text:p>https://github.com/unfoldingWord-dev/dokuwiki-slack-invite</text:p>
          </table:table-cell>
          <table:table-cell office:value-type="string" office:string-value="2023-01-27T20:30:22Z">
            <text:p>2023-01-27T20:30:22Z</text:p>
          </table:table-cell>
          <table:table-cell office:value-type="string" office:string-value="">
            <text:p/>
          </table:table-cell>
          <table:table-cell office:value-type="string" office:string-value="unfoldingWord-dev/dokuwiki-slack-invite">
            <text:p>unfoldingWord-dev/dokuwiki-slack-inv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text:p>Door43</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17">
            <text:p>17</text:p>
          </table:table-cell>
          <table:table-cell office:value-type="string" office:string-value="0">
            <text:p>0</text:p>
          </table:table-cell>
          <table:table-cell office:value-type="string" office:string-value="['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Door43">
            <text:p>https://github.com/unfoldingWord-dev/Door43</text:p>
          </table:table-cell>
          <table:table-cell office:value-type="string" office:string-value="2026-03-15T03:14:44Z">
            <text:p>2026-03-15T03:14:44Z</text:p>
          </table:table-cell>
          <table:table-cell office:value-type="string" office:string-value="">
            <text:p/>
          </table:table-cell>
          <table:table-cell office:value-type="string" office:string-value="unfoldingWord-dev/Door43">
            <text:p>unfoldingWord-dev/Door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acceptance-tests">
            <text:p>door43-acceptance-tes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or43-acceptance-tests">
            <text:p>https://github.com/unfoldingWord-dev/door43-acceptance-tests</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door43-acceptance-tests">
            <text:p>unfoldingWord-dev/door43-acceptance-test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cell office:value-type="string" office:string-value="">
            <text:p/>
          </table:table-cell>
          <table:table-cell office:value-type="string" office:string-value="unfoldingWord/door43-preview-server">
            <text:p>unfoldingWord/door43-preview-serv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oject-pages">
            <text:p>door43-project-pages</text:p>
          </table:table-cell>
          <table:table-cell office:value-type="string" office:string-value="unfoldingWord-dev">
            <text:p>unfoldingWord-dev</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https://github.com/unfoldingWord-dev/door43-project-pages">
            <text:p>https://github.com/unfoldingWord-dev/door43-project-pages</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door43-project-pages">
            <text:p>unfoldingWord-dev/door43-project-pag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
            <text:p>electron</text:p>
          </table:table-cell>
          <table:table-cell office:value-type="string" office:string-value="unfoldingWord-box3">
            <text:p>unfoldingWord-box3</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https://github.com/unfoldingWord-box3/electron">
            <text:p>https://github.com/unfoldingWord-box3/electron</text:p>
          </table:table-cell>
          <table:table-cell office:value-type="string" office:string-value="2023-01-28T00:48:49Z">
            <text:p>2023-01-28T00:48:49Z</text:p>
          </table:table-cell>
          <table:table-cell office:value-type="string" office:string-value="">
            <text:p/>
          </table:table-cell>
          <table:table-cell office:value-type="string" office:string-value="unfoldingWord-box3/electron">
            <text:p>unfoldingWord-box3/electro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etherpad-lite">
            <text:p>unfoldingWord-dev/etherpad-l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cell office:value-type="string" office:string-value="">
            <text:p/>
          </table:table-cell>
          <table:table-cell office:value-type="string" office:string-value="unfoldingWord-dev/example_tool">
            <text:p>unfoldingWord-dev/example_too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d-exports">
            <text:p>md-export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md-exports">
            <text:p>https://github.com/unfoldingWord-dev/md-export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md-exports">
            <text:p>unfoldingWord-dev/md-export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diaWiki-USFMTag">
            <text:p>MediaWiki-USFMTag</text:p>
          </table:table-cell>
          <table:table-cell office:value-type="string" office:string-value="unfoldingWord">
            <text:p>unfoldingWord</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0">
            <text:p>0</text:p>
          </table:table-cell>
          <table:table-cell office:value-type="string" office:string-value="0">
            <text:p>0</text:p>
          </table:table-cell>
          <table:table-cell office:value-type="string" office:string-value="https://github.com/unfoldingWord/MediaWiki-USFMTag">
            <text:p>https://github.com/unfoldingWord/MediaWiki-USFMTag</text:p>
          </table:table-cell>
          <table:table-cell office:value-type="string" office:string-value="2026-02-23T14:45:18Z">
            <text:p>2026-02-23T14:45:18Z</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obile-JWiki">
            <text:p>Mobile-JWiki</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https://github.com/unfoldingWord-dev/Mobile-JWiki">
            <text:p>https://github.com/unfoldingWord-dev/Mobile-JWiki</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Mobile-JWiki">
            <text:p>unfoldingWord-dev/Mobile-JWik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cell office:value-type="string" office:string-value="">
            <text:p/>
          </table:table-cell>
          <table:table-cell office:value-type="string" office:string-value="unfoldingWord-box3/MultiplatformFrameworks">
            <text:p>unfoldingWord-box3/MultiplatformFramework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agios_plugins">
            <text:p>nagios_plugin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https://github.com/unfoldingWord-dev/nagios_plugins">
            <text:p>https://github.com/unfoldingWord-dev/nagios_plugin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nagios_plugins">
            <text:p>unfoldingWord-dev/nagios_plugin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cell office:value-type="string" office:string-value="">
            <text:p/>
          </table:table-cell>
          <table:table-cell office:value-type="string" office:string-value="unfoldingWord-dev/node-dcs-api-client">
            <text:p>unfoldingWord-dev/node-dcs-api-clien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m">
            <text:p>obs-am</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am">
            <text:p>https://github.com/unfoldingWord/obs-am</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am">
            <text:p>unfoldingWord/obs-am</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ndroid">
            <text:p>OBS-Android</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Android">
            <text:p>https://github.com/unfoldingWord-dev/OBS-Android</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Android">
            <text:p>unfoldingWord-dev/OBS-Androi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bn">
            <text:p>obs-b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bn">
            <text:p>https://github.com/unfoldingWord/obs-bn</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bn">
            <text:p>unfoldingWord/obs-b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ceb">
            <text:p>obs-ceb</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ceb">
            <text:p>https://github.com/unfoldingWord/obs-ceb</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ceb">
            <text:p>unfoldingWord/obs-c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door43">
            <text:p>obs-door43</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oor43">
            <text:p>https://github.com/unfoldingWord-dev/obs-door43</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obs-door43">
            <text:p>unfoldingWord-dev/obs-door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n">
            <text:p>obs-e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obs-en">
            <text:p>https://github.com/unfoldingWord/obs-en</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en">
            <text:p>unfoldingWord/obs-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
            <text:p>obs-es</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obs-es">
            <text:p>https://github.com/unfoldingWord/obs-es</text:p>
          </table:table-cell>
          <table:table-cell office:value-type="string" office:string-value="2023-01-28T16:58:16Z">
            <text:p>2023-01-28T16:58:16Z</text:p>
          </table:table-cell>
          <table:table-cell office:value-type="string" office:string-value="">
            <text:p/>
          </table:table-cell>
          <table:table-cell office:value-type="string" office:string-value="unfoldingWord/obs-es">
            <text:p>unfoldingWord/obs-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419">
            <text:p>obs-es-419</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es-419">
            <text:p>https://github.com/unfoldingWord/obs-es-419</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es-419">
            <text:p>unfoldingWord/obs-es-419</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a">
            <text:p>obs-f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a">
            <text:p>https://github.com/unfoldingWord/obs-fa</text:p>
          </table:table-cell>
          <table:table-cell office:value-type="string" office:string-value="2023-01-28T16:58:16Z">
            <text:p>2023-01-28T16:58:16Z</text:p>
          </table:table-cell>
          <table:table-cell office:value-type="string" office:string-value="">
            <text:p/>
          </table:table-cell>
          <table:table-cell office:value-type="string" office:string-value="unfoldingWord/obs-fa">
            <text:p>unfoldingWord/obs-f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r">
            <text:p>obs-f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r">
            <text:p>https://github.com/unfoldingWord/obs-f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fr">
            <text:p>unfoldingWord/obs-f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aj-x-ymnk">
            <text:p>obs-gaj-x-ymnk</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aj-x-ymnk">
            <text:p>https://github.com/unfoldingWord/obs-gaj-x-ymnk</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gaj-x-ymnk">
            <text:p>unfoldingWord/obs-gaj-x-ymnk</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of">
            <text:p>obs-gof</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of">
            <text:p>https://github.com/unfoldingWord/obs-gof</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gof">
            <text:p>unfoldingWord/obs-gof</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u">
            <text:p>obs-g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u">
            <text:p>https://github.com/unfoldingWord/obs-gu</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gu">
            <text:p>unfoldingWord/obs-g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a">
            <text:p>obs-h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a">
            <text:p>https://github.com/unfoldingWord/obs-ha</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ha">
            <text:p>unfoldingWord/obs-h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i">
            <text:p>obs-h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i">
            <text:p>https://github.com/unfoldingWord/obs-hi</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hi">
            <text:p>unfoldingWord/obs-h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mr">
            <text:p>obs-hmr</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mr">
            <text:p>https://github.com/unfoldingWord/obs-hmr</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hmr">
            <text:p>unfoldingWord/obs-hm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u">
            <text:p>obs-hu</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u">
            <text:p>https://github.com/unfoldingWord/obs-hu</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hu">
            <text:p>unfoldingWord/obs-h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iOS">
            <text:p>OBS-iO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iOS">
            <text:p>https://github.com/unfoldingWord-dev/OBS-iOS</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iOS">
            <text:p>unfoldingWord-dev/OBS-iO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lpx">
            <text:p>obs-lpx</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https://github.com/unfoldingWord/obs-lpx">
            <text:p>https://github.com/unfoldingWord/obs-lpx</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lpx">
            <text:p>unfoldingWord/obs-lpx</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Mobile">
            <text:p>unfoldingWord-dev/OBS-Mobil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r">
            <text:p>obs-m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mr">
            <text:p>https://github.com/unfoldingWord/obs-mr</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mr">
            <text:p>unfoldingWord/obs-m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ne">
            <text:p>obs-ne</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ne">
            <text:p>https://github.com/unfoldingWord/obs-ne</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ne">
            <text:p>unfoldingWord/obs-n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or">
            <text:p>obs-o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or">
            <text:p>https://github.com/unfoldingWord/obs-or</text:p>
          </table:table-cell>
          <table:table-cell office:value-type="string" office:string-value="2023-01-28T16:58:21Z">
            <text:p>2023-01-28T16:58:21Z</text:p>
          </table:table-cell>
          <table:table-cell office:value-type="string" office:string-value="">
            <text:p/>
          </table:table-cell>
          <table:table-cell office:value-type="string" office:string-value="unfoldingWord/obs-or">
            <text:p>unfoldingWord/obs-o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a">
            <text:p>obs-p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a">
            <text:p>https://github.com/unfoldingWord/obs-pa</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pa">
            <text:p>unfoldingWord/obs-p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df">
            <text:p>obs-pdf</text:p>
          </table:table-cell>
          <table:table-cell office:value-type="string" office:string-value="unfoldingWord">
            <text:p>unfoldingWord</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obs-pdf">
            <text:p>https://github.com/unfoldingWord/obs-pdf</text:p>
          </table:table-cell>
          <table:table-cell office:value-type="string" office:string-value="2025-09-09T09:10:04Z">
            <text:p>2025-09-09T09:10:04Z</text:p>
          </table:table-cell>
          <table:table-cell office:value-type="string" office:string-value="">
            <text:p/>
          </table:table-cell>
          <table:table-cell office:value-type="string" office:string-value="unfoldingWord/obs-pdf">
            <text:p>unfoldingWord/obs-pdf</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t-br">
            <text:p>obs-pt-b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t-br">
            <text:p>https://github.com/unfoldingWord/obs-pt-b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pt-br">
            <text:p>unfoldingWord/obs-pt-b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ru">
            <text:p>obs-r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ru">
            <text:p>https://github.com/unfoldingWord/obs-ru</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ru">
            <text:p>unfoldingWord/obs-r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gj">
            <text:p>obs-sgj</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sgj">
            <text:p>https://github.com/unfoldingWord/obs-sgj</text:p>
          </table:table-cell>
          <table:table-cell office:value-type="string" office:string-value="2023-01-28T17:00:18Z">
            <text:p>2023-01-28T17:00:18Z</text:p>
          </table:table-cell>
          <table:table-cell office:value-type="string" office:string-value="">
            <text:p/>
          </table:table-cell>
          <table:table-cell office:value-type="string" office:string-value="unfoldingWord/obs-sgj">
            <text:p>unfoldingWord/obs-sgj</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dj">
            <text:p>obs-tdj</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dj">
            <text:p>https://github.com/unfoldingWord/obs-tdj</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tdj">
            <text:p>unfoldingWord/obs-tdj</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l">
            <text:p>obs-tl</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bs-tl">
            <text:p>https://github.com/unfoldingWord/obs-tl</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tl">
            <text:p>unfoldingWord/obs-t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pi">
            <text:p>obs-tp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pi">
            <text:p>https://github.com/unfoldingWord/obs-tpi</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tpi">
            <text:p>unfoldingWord/obs-tp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
            <text:p>obs-t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tr">
            <text:p>https://github.com/unfoldingWord/obs-t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tr">
            <text:p>unfoldingWord/obs-t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anslation-App">
            <text:p>OBS-Translation-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OBS-Translation-App">
            <text:p>https://github.com/unfoldingWord-dev/OBS-Translation-App</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OBS-Translation-App">
            <text:p>unfoldingWord-dev/OBS-Translation-App</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ur">
            <text:p>obs-u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ur">
            <text:p>https://github.com/unfoldingWord/obs-ur</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ur">
            <text:p>unfoldingWord/obs-u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vi">
            <text:p>obs-v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vi">
            <text:p>https://github.com/unfoldingWord/obs-vi</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vi">
            <text:p>unfoldingWord/obs-v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d-tx-manager">
            <text:p>old-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
            <text:p>https://github.com/unfoldingWord-dev/old-tx-manager</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old-tx-manager">
            <text:p>unfoldingWord-dev/old-tx-manag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cell office:value-type="string" office:string-value="">
            <text:p/>
          </table:table-cell>
          <table:table-cell office:value-type="string" office:string-value="unfoldingWord/open-components-hackathon-website">
            <text:p>unfoldingWord/open-components-hackathon-webs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cell office:value-type="string" office:string-value="">
            <text:p/>
          </table:table-cell>
          <table:table-cell office:value-type="string" office:string-value="unfoldingWord/orthography-app-BE">
            <text:p>unfoldingWord/orthography-app-B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FE">
            <text:p>orthography-app-FE</text:p>
          </table:table-cell>
          <table:table-cell office:value-type="string" office:string-value="unfoldingWord">
            <text:p>unfoldingWord</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FE">
            <text:p>https://github.com/unfoldingWord/orthography-app-FE</text:p>
          </table:table-cell>
          <table:table-cell office:value-type="string" office:string-value="2026-04-16T08:08:11Z">
            <text:p>2026-04-16T08:08:11Z</text:p>
          </table:table-cell>
          <table:table-cell office:value-type="string" office:string-value="">
            <text:p/>
          </table:table-cell>
          <table:table-cell office:value-type="string" office:string-value="unfoldingWord/orthography-app-FE">
            <text:p>unfoldingWord/orthography-app-F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proposed_changes_module">
            <text:p>unfoldingWord-dev/proposed_changes_modul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ub.distantshores.org">
            <text:p>pub.distantshores.org</text:p>
          </table:table-cell>
          <table:table-cell office:value-type="string" office:string-value="unfoldingWord-dev">
            <text:p>unfoldingWord-dev</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pub.distantshores.org">
            <text:p>https://github.com/unfoldingWord-dev/pub.distantshores.org</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pub.distantshores.org">
            <text:p>unfoldingWord-dev/pub.distantshores.org</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resource-checker">
            <text:p>resource-che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cell office:value-type="string" office:string-value="">
            <text:p/>
          </table:table-cell>
          <table:table-cell office:value-type="string" office:string-value="unfoldingWord-dev/ResourceChecker">
            <text:p>unfoldingWord-dev/ResourceCheck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bmachine">
            <text:p>submachine</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submachine">
            <text:p>https://github.com/unfoldingWord-dev/submachine</text:p>
          </table:table-cell>
          <table:table-cell office:value-type="string" office:string-value="2025-10-28T15:18:59Z">
            <text:p>2025-10-28T15:18:59Z</text:p>
          </table:table-cell>
          <table:table-cell office:value-type="string" office:string-value="">
            <text:p/>
          </table:table-cell>
          <table:table-cell office:value-type="string" office:string-value="unfoldingWord-dev/submachine">
            <text:p>unfoldingWord-dev/submachin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cell office:value-type="string" office:string-value="">
            <text:p/>
          </table:table-cell>
          <table:table-cell office:value-type="string" office:string-value="unfoldingWord-dev/tC_Resources">
            <text:p>unfoldingWord-dev/tC_Resourc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
            <text:p>td</text:p>
          </table:table-cell>
          <table:table-cell office:value-type="string" office:string-value="unfoldingWord-box3">
            <text:p>unfoldingWord-box3</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0">
            <text:p>0</text:p>
          </table:table-cell>
          <table:table-cell office:value-type="string" office:string-value="0">
            <text:p>0</text:p>
          </table:table-cell>
          <table:table-cell office:value-type="string" office:string-value="https://github.com/unfoldingWord-box3/td">
            <text:p>https://github.com/unfoldingWord-box3/td</text:p>
          </table:table-cell>
          <table:table-cell office:value-type="string" office:string-value="2023-12-05T16:03:25Z">
            <text:p>2023-12-05T16:03:25Z</text:p>
          </table:table-cell>
          <table:table-cell office:value-type="string" office:string-value="">
            <text:p/>
          </table:table-cell>
          <table:table-cell office:value-type="string" office:string-value="unfoldingWord-box3/td">
            <text:p>unfoldingWord-box3/t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CompassionateFatherApp">
            <text:p>TheCompassionateFather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0">
            <text:p>0</text:p>
          </table:table-cell>
          <table:table-cell office:value-type="string" office:string-value="0">
            <text:p>0</text:p>
          </table:table-cell>
          <table:table-cell office:value-type="string" office:string-value="https://github.com/unfoldingWord-dev/TheCompassionateFatherApp">
            <text:p>https://github.com/unfoldingWord-dev/TheCompassionateFatherApp</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TheCompassionateFatherApp">
            <text:p>unfoldingWord-dev/TheCompassionateFatherApp</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translation_academy">
            <text:p>unfoldingWord-dev/translation_academy</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translationCore-PoC">
            <text:p>unfoldingWord-dev/translationCore-PoC</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atabaseWeb">
            <text:p>translationDatabaseWeb</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150">
            <text:p>15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atabaseWeb">
            <text:p>https://github.com/unfoldingWord-dev/translationDatabaseWeb</text:p>
          </table:table-cell>
          <table:table-cell office:value-type="string" office:string-value="2023-12-05T16:16:56Z">
            <text:p>2023-12-05T16:16:56Z</text:p>
          </table:table-cell>
          <table:table-cell office:value-type="string" office:string-value="">
            <text:p/>
          </table:table-cell>
          <table:table-cell office:value-type="string" office:string-value="unfoldingWord-dev/translationDatabaseWeb">
            <text:p>unfoldingWord-dev/translationDatabaseW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b-tools">
            <text:p>translationdb-tools</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b-tools">
            <text:p>https://github.com/unfoldingWord-dev/translationdb-tool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ranslationdb-tools">
            <text:p>unfoldingWord-dev/translationdb-tool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cell office:value-type="string" office:string-value="">
            <text:p/>
          </table:table-cell>
          <table:table-cell office:value-type="string" office:string-value="unfoldingWord-dev/translationHelps">
            <text:p>unfoldingWord-dev/translationHelp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
            <text:p>translationKeyboard</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24">
            <text:p>24</text:p>
          </table:table-cell>
          <table:table-cell office:value-type="string" office:string-value="729">
            <text:p>729</text:p>
          </table:table-cell>
          <table:table-cell office:value-type="string" office:string-value="https://github.com/unfoldingWord-dev/translationKeyboard">
            <text:p>https://github.com/unfoldingWord-dev/translationKeyboard</text:p>
          </table:table-cell>
          <table:table-cell office:value-type="string" office:string-value="2024-03-11T22:35:12Z">
            <text:p>2024-03-11T22:35:12Z</text:p>
          </table:table-cell>
          <table:table-cell office:value-type="string" office:string-value="">
            <text:p/>
          </table:table-cell>
          <table:table-cell office:value-type="string" office:string-value="unfoldingWord-dev/translationKeyboard">
            <text:p>unfoldingWord-dev/translationKeyboar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ranslationKeyboardWeb">
            <text:p>unfoldingWord-dev/translationKeyboardW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erver">
            <text:p>ts-serv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0">
            <text:p>0</text:p>
          </table:table-cell>
          <table:table-cell office:value-type="string" office:string-value="0">
            <text:p>0</text:p>
          </table:table-cell>
          <table:table-cell office:value-type="string" office:string-value="https://github.com/unfoldingWord-dev/ts-server">
            <text:p>https://github.com/unfoldingWord-dev/ts-server</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s-server">
            <text:p>unfoldingWord-dev/ts-serv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2-catalog-backport">
            <text:p>ts-v2-catalog-backport</text:p>
          </table:table-cell>
          <table:table-cell office:value-type="string" office:string-value="unfoldingWord">
            <text:p>unfoldingWord</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
            <text:p>2</text:p>
          </table:table-cell>
          <table:table-cell office:value-type="string" office:string-value="0">
            <text:p>0</text:p>
          </table:table-cell>
          <table:table-cell office:value-type="string" office:string-value="https://github.com/unfoldingWord/ts-v2-catalog-backport">
            <text:p>https://github.com/unfoldingWord/ts-v2-catalog-backport</text:p>
          </table:table-cell>
          <table:table-cell office:value-type="string" office:string-value="2025-09-09T08:54:13Z">
            <text:p>2025-09-09T08:54:13Z</text:p>
          </table:table-cell>
          <table:table-cell office:value-type="string" office:string-value="">
            <text:p/>
          </table:table-cell>
          <table:table-cell office:value-type="string" office:string-value="unfoldingWord/ts-v2-catalog-backport">
            <text:p>unfoldingWord/ts-v2-catalog-backpor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
            <text:p>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5">
            <text:p>5</text:p>
          </table:table-cell>
          <table:table-cell office:value-type="string" office:string-value="0">
            <text:p>0</text:p>
          </table:table-cell>
          <table:table-cell office:value-type="string" office:string-value="https://github.com/unfoldingWord-dev/tx-manager">
            <text:p>https://github.com/unfoldingWord-dev/tx-manager</text:p>
          </table:table-cell>
          <table:table-cell office:value-type="string" office:string-value="2024-05-22T13:48:54Z">
            <text:p>2024-05-22T13:48:54Z</text:p>
          </table:table-cell>
          <table:table-cell office:value-type="string" office:string-value="">
            <text:p/>
          </table:table-cell>
          <table:table-cell office:value-type="string" office:string-value="unfoldingWord-dev/tx-manager">
            <text:p>unfoldingWord-dev/tx-manag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lambda">
            <text:p>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manager-lambda">
            <text:p>https://github.com/unfoldingWord-dev/tx-manager-lambda</text:p>
          </table:table-cell>
          <table:table-cell office:value-type="string" office:string-value="2025-10-09T10:59:32Z">
            <text:p>2025-10-09T10:59:32Z</text:p>
          </table:table-cell>
          <table:table-cell office:value-type="string" office:string-value="">
            <text:p/>
          </table:table-cell>
          <table:table-cell office:value-type="string" office:string-value="unfoldingWord-dev/tx-manager-lambda">
            <text:p>unfoldingWord-dev/tx-manager-lambd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imple-usfm2html">
            <text:p>tx-simple-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tx-simple-usfm2html">
            <text:p>https://github.com/unfoldingWord-dev/tx-simple-usfm2html</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tx-simple-usfm2html">
            <text:p>unfoldingWord-dev/tx-simple-usfm2htm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db-en">
            <text:p>ud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db-en">
            <text:p>https://github.com/unfoldingWord/udb-en</text:p>
          </table:table-cell>
          <table:table-cell office:value-type="string" office:string-value="2023-01-28T16:52:17Z">
            <text:p>2023-01-28T16:52:17Z</text:p>
          </table:table-cell>
          <table:table-cell office:value-type="string" office:string-value="">
            <text:p/>
          </table:table-cell>
          <table:table-cell office:value-type="string" office:string-value="unfoldingWord/udb-en">
            <text:p>unfoldingWord/udb-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en">
            <text:p>ul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lb-en">
            <text:p>https://github.com/unfoldingWord/ulb-en</text:p>
          </table:table-cell>
          <table:table-cell office:value-type="string" office:string-value="2025-12-05T15:37:06Z">
            <text:p>2025-12-05T15:37:06Z</text:p>
          </table:table-cell>
          <table:table-cell office:value-type="string" office:string-value="">
            <text:p/>
          </table:table-cell>
          <table:table-cell office:value-type="string" office:string-value="unfoldingWord/ulb-en">
            <text:p>unfoldingWord/ulb-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pt-br">
            <text:p>ulb-pt-b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ulb-pt-br">
            <text:p>https://github.com/unfoldingWord/ulb-pt-br</text:p>
          </table:table-cell>
          <table:table-cell office:value-type="string" office:string-value="2023-01-28T16:52:17Z">
            <text:p>2023-01-28T16:52:17Z</text:p>
          </table:table-cell>
          <table:table-cell office:value-type="string" office:string-value="">
            <text:p/>
          </table:table-cell>
          <table:table-cell office:value-type="string" office:string-value="unfoldingWord/ulb-pt-br">
            <text:p>unfoldingWord/ulb-pt-b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cell office:value-type="string" office:string-value="">
            <text:p/>
          </table:table-cell>
          <table:table-cell office:value-type="string" office:string-value="unfoldingWord/unfoldingWord.github.io-old">
            <text:p>unfoldingWord/unfoldingWord.github.io-ol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
            <text:p>Unlocked-Greek-Lexico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Lexicon">
            <text:p>https://github.com/unfoldingWord/Unlocked-Greek-Lexicon</text:p>
          </table:table-cell>
          <table:table-cell office:value-type="string" office:string-value="2023-01-28T16:52:17Z">
            <text:p>2023-01-28T16:52:17Z</text:p>
          </table:table-cell>
          <table:table-cell office:value-type="string" office:string-value="">
            <text:p/>
          </table:table-cell>
          <table:table-cell office:value-type="string" office:string-value="unfoldingWord/Unlocked-Greek-Lexicon">
            <text:p>unfoldingWord/Unlocked-Greek-Lexico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New-Testament">
            <text:p>Unlocked-Greek-New-Testament</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New-Testament">
            <text:p>https://github.com/unfoldingWord/Unlocked-Greek-New-Testament</text:p>
          </table:table-cell>
          <table:table-cell office:value-type="string" office:string-value="2025-12-28T01:08:22Z">
            <text:p>2025-12-28T01:08:22Z</text:p>
          </table:table-cell>
          <table:table-cell office:value-type="string" office:string-value="">
            <text:p/>
          </table:table-cell>
          <table:table-cell office:value-type="string" office:string-value="unfoldingWord/Unlocked-Greek-New-Testament">
            <text:p>unfoldingWord/Unlocked-Greek-New-Testamen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
            <text:p>uw-publish</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
            <text:p>https://github.com/unfoldingWord-dev/uw-publish</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uw-publish">
            <text:p>unfoldingWord-dev/uw-publish</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uwadmin">
            <text:p>unfoldingWord-dev/uwadmi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cell office:value-type="string" office:string-value="">
            <text:p/>
          </table:table-cell>
          <table:table-cell office:value-type="string" office:string-value="unfoldingWord-dev/VerseCheck">
            <text:p>unfoldingWord-dev/VerseCheck</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site">
            <text:p>websi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https://github.com/unfoldingWord/website">
            <text:p>https://github.com/unfoldingWord/website</text:p>
          </table:table-cell>
          <table:table-cell office:value-type="string" office:string-value="2025-12-03T19:14:44Z">
            <text:p>2025-12-03T19:14:44Z</text:p>
          </table:table-cell>
          <table:table-cell office:value-type="string" office:string-value="">
            <text:p/>
          </table:table-cell>
          <table:table-cell office:value-type="string" office:string-value="unfoldingWord/website">
            <text:p>unfoldingWord/webs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udget-report">
            <text:p>budget-report</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02T19:21:13Z">
            <text:p>2026-06-02T19:21:1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udget-report">
            <text:p>https://github.com/unfoldingWord/budget-report</text:p>
          </table:table-cell>
          <table:table-cell office:value-type="string" office:string-value="2026-06-02T19:21:17Z">
            <text:p>2026-06-02T19:21:17Z</text:p>
          </table:table-cell>
          <table:table-cell office:value-type="string" office:string-value="">
            <text:p/>
          </table:table-cell>
          <table:table-cell office:value-type="string" office:string-value="unfoldingWord/budget-report">
            <text:p>unfoldingWord/budget-repor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skills">
            <text:p>claude-skill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7T14:34:28Z">
            <text:p>2026-06-17T14:34:2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claude-skills">
            <text:p>https://github.com/unfoldingWord/claude-skills</text:p>
          </table:table-cell>
          <table:table-cell office:value-type="string" office:string-value="2026-06-17T14:39:48Z">
            <text:p>2026-06-17T14:39:48Z</text:p>
          </table:table-cell>
          <table:table-cell office:value-type="string" office:string-value="">
            <text:p/>
          </table:table-cell>
          <table:table-cell office:value-type="string" office:string-value="unfoldingWord/claude-skills">
            <text:p>unfoldingWord/claude-skil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w-zipodt">
            <text:p>dw-zipodt</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w-zipodt">
            <text:p>https://github.com/unfoldingWord-dev/dw-zipodt</text:p>
          </table:table-cell>
          <table:table-cell office:value-type="string" office:string-value="2015-05-28T21:07:46Z">
            <text:p>2015-05-28T21:07:46Z</text:p>
          </table:table-cell>
          <table:table-cell office:value-type="string" office:string-value="">
            <text:p/>
          </table:table-cell>
          <table:table-cell office:value-type="string" office:string-value="unfoldingWord-dev/dw-zipodt">
            <text:p>unfoldingWord-dev/dw-zipod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gineering-practices">
            <text:p>engineering-practic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https://github.com/unfoldingWord/engineering-practices">
            <text:p>https://github.com/unfoldingWord/engineering-practices</text:p>
          </table:table-cell>
          <table:table-cell office:value-type="string" office:string-value="2026-05-06T21:10:18Z">
            <text:p>2026-05-06T21:10:18Z</text:p>
          </table:table-cell>
          <table:table-cell office:value-type="string" office:string-value="">
            <text:p/>
          </table:table-cell>
          <table:table-cell office:value-type="string" office:string-value="unfoldingWord/engineering-practices">
            <text:p>unfoldingWord/engineering-practice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_database_private">
            <text:p>gl_database_priva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private">
            <text:p>https://github.com/unfoldingWord/gl_database_private</text:p>
          </table:table-cell>
          <table:table-cell office:value-type="string" office:string-value="2021-12-15T21:34:33Z">
            <text:p>2021-12-15T21:34:33Z</text:p>
          </table:table-cell>
          <table:table-cell office:value-type="string" office:string-value="">
            <text:p/>
          </table:table-cell>
          <table:table-cell office:value-type="string" office:string-value="unfoldingWord/gl_database_private">
            <text:p>unfoldingWord/gl_database_privat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usfm2html-cli">
            <text:p>node-usfm2html-cli</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usfm2html-cli">
            <text:p>https://github.com/unfoldingWord/node-usfm2html-cli</text:p>
          </table:table-cell>
          <table:table-cell office:value-type="string" office:string-value="2026-05-14T23:44:56Z">
            <text:p>2026-05-14T23:44:56Z</text:p>
          </table:table-cell>
          <table:table-cell office:value-type="string" office:string-value="">
            <text:p/>
          </table:table-cell>
          <table:table-cell office:value-type="string" office:string-value="unfoldingWord/node-usfm2html-cli">
            <text:p>unfoldingWord/node-usfm2html-cli</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print-preview-tools">
            <text:p>oce-print-preview-too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ce-print-preview-tools">
            <text:p>https://github.com/unfoldingWord/oce-print-preview-tools</text:p>
          </table:table-cell>
          <table:table-cell office:value-type="string" office:string-value="2023-12-14T00:56:44Z">
            <text:p>2023-12-14T00:56:44Z</text:p>
          </table:table-cell>
          <table:table-cell office:value-type="string" office:string-value="">
            <text:p/>
          </table:table-cell>
          <table:table-cell office:value-type="string" office:string-value="unfoldingWord/oce-print-preview-tools">
            <text:p>unfoldingWord/oce-print-preview-too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opulate-gl-quote-rcl">
            <text:p>populate-gl-quote-rcl</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box3/populate-gl-quote-rcl">
            <text:p>https://github.com/unfoldingWord-box3/populate-gl-quote-rcl</text:p>
          </table:table-cell>
          <table:table-cell office:value-type="string" office:string-value="2022-09-23T16:15:55Z">
            <text:p>2022-09-23T16:15:55Z</text:p>
          </table:table-cell>
          <table:table-cell office:value-type="string" office:string-value="">
            <text:p/>
          </table:table-cell>
          <table:table-cell office:value-type="string" office:string-value="unfoldingWord-box3/populate-gl-quote-rcl">
            <text:p>unfoldingWord-box3/populate-gl-quote-rcl</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aplos-integration">
            <text:p>salesforce-aplos-integration</text:p>
          </table:table-cell>
          <table:table-cell office:value-type="string" office:string-value="unfoldingWord">
            <text:p>unfoldingWord</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aplos-integration">
            <text:p>https://github.com/unfoldingWord/salesforce-aplos-integration</text:p>
          </table:table-cell>
          <table:table-cell office:value-type="string" office:string-value="2023-08-29T19:51:55Z">
            <text:p>2023-08-29T19:51:55Z</text:p>
          </table:table-cell>
          <table:table-cell office:value-type="string" office:string-value="">
            <text:p/>
          </table:table-cell>
          <table:table-cell office:value-type="string" office:string-value="unfoldingWord/salesforce-aplos-integration">
            <text:p>unfoldingWord/salesforce-aplos-integration</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core">
            <text:p>salesforc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core">
            <text:p>https://github.com/unfoldingWord/salesforce-core</text:p>
          </table:table-cell>
          <table:table-cell office:value-type="string" office:string-value="2024-08-28T14:52:21Z">
            <text:p>2024-08-28T14:52:21Z</text:p>
          </table:table-cell>
          <table:table-cell office:value-type="string" office:string-value="">
            <text:p/>
          </table:table-cell>
          <table:table-cell office:value-type="string" office:string-value="unfoldingWord/salesforce-core">
            <text:p>unfoldingWord/salesforce-cor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ore">
            <text:p>salesforce-donation-page-package-cor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ore">
            <text:p>https://github.com/unfoldingWord/salesforce-donation-page-package-core</text:p>
          </table:table-cell>
          <table:table-cell office:value-type="string" office:string-value="2020-05-11T18:43:28Z">
            <text:p>2020-05-11T18:43:28Z</text:p>
          </table:table-cell>
          <table:table-cell office:value-type="string" office:string-value="">
            <text:p/>
          </table:table-cell>
          <table:table-cell office:value-type="string" office:string-value="unfoldingWord/salesforce-donation-page-package-core">
            <text:p>unfoldingWord/salesforce-donation-page-package-cor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2020-05-11T18:43:58Z">
            <text:p>2020-05-11T18:43:58Z</text:p>
          </table:table-cell>
          <table:table-cell office:value-type="string" office:string-value="">
            <text:p/>
          </table:table-cell>
          <table:table-cell office:value-type="string" office:string-value="unfoldingWord/salesforce-donation-page-package-customizations">
            <text:p>unfoldingWord/salesforce-donation-page-package-customization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hiny-app-outputs-report">
            <text:p>shiny-app-outputs-report</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shiny-app-outputs-report">
            <text:p>https://github.com/unfoldingWord/shiny-app-outputs-report</text:p>
          </table:table-cell>
          <table:table-cell office:value-type="string" office:string-value="2024-01-29T17:00:31Z">
            <text:p>2024-01-29T17:00:31Z</text:p>
          </table:table-cell>
          <table:table-cell office:value-type="string" office:string-value="">
            <text:p/>
          </table:table-cell>
          <table:table-cell office:value-type="string" office:string-value="unfoldingWord/shiny-app-outputs-report">
            <text:p>unfoldingWord/shiny-app-outputs-repor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2-poc">
            <text:p>tc-create-2-poc</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create-2-poc">
            <text:p>https://github.com/unfoldingWord/tc-create-2-poc</text:p>
          </table:table-cell>
          <table:table-cell office:value-type="string" office:string-value="2020-12-17T16:24:38Z">
            <text:p>2020-12-17T16:24:38Z</text:p>
          </table:table-cell>
          <table:table-cell office:value-type="string" office:string-value="">
            <text:p/>
          </table:table-cell>
          <table:table-cell office:value-type="string" office:string-value="unfoldingWord/tc-create-2-poc">
            <text:p>unfoldingWord/tc-create-2-poc</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website">
            <text:p>tc-web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https://github.com/unfoldingWord/tc-website">
            <text:p>https://github.com/unfoldingWord/tc-website</text:p>
          </table:table-cell>
          <table:table-cell office:value-type="string" office:string-value="2026-04-17T14:27:01Z">
            <text:p>2026-04-17T14:27:01Z</text:p>
          </table:table-cell>
          <table:table-cell office:value-type="string" office:string-value="">
            <text:p/>
          </table:table-cell>
          <table:table-cell office:value-type="string" office:string-value="unfoldingWord/tc-website">
            <text:p>unfoldingWord/tc-websit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erraform">
            <text:p>terraform</text:p>
          </table:table-cell>
          <table:table-cell office:value-type="string" office:string-value="unfoldingWord">
            <text:p>unfoldingWord</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erraform">
            <text:p>https://github.com/unfoldingWord/terraform</text:p>
          </table:table-cell>
          <table:table-cell office:value-type="string" office:string-value="2023-07-04T15:33:16Z">
            <text:p>2023-07-04T15:33:16Z</text:p>
          </table:table-cell>
          <table:table-cell office:value-type="string" office:string-value="">
            <text:p/>
          </table:table-cell>
          <table:table-cell office:value-type="string" office:string-value="unfoldingWord/terraform">
            <text:p>unfoldingWord/terraform</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tsv7-to-tsv8">
            <text:p>tn-tsv7-to-tsv8</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tn-tsv7-to-tsv8">
            <text:p>https://github.com/unfoldingWord/tn-tsv7-to-tsv8</text:p>
          </table:table-cell>
          <table:table-cell office:value-type="string" office:string-value="2024-11-14T10:49:22Z">
            <text:p>2024-11-14T10:49:22Z</text:p>
          </table:table-cell>
          <table:table-cell office:value-type="string" office:string-value="">
            <text:p/>
          </table:table-cell>
          <table:table-cell office:value-type="string" office:string-value="unfoldingWord/tn-tsv7-to-tsv8">
            <text:p>unfoldingWord/tn-tsv7-to-tsv8</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fw_redirects">
            <text:p>uf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https://github.com/unfoldingWord/ufw_redirects">
            <text:p>https://github.com/unfoldingWord/ufw_redirects</text:p>
          </table:table-cell>
          <table:table-cell office:value-type="string" office:string-value="2026-06-02T19:41:33Z">
            <text:p>2026-06-02T19:41:33Z</text:p>
          </table:table-cell>
          <table:table-cell office:value-type="string" office:string-value="">
            <text:p/>
          </table:table-cell>
          <table:table-cell office:value-type="string" office:string-value="unfoldingWord/ufw_redirects">
            <text:p>unfoldingWord/ufw_redirect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Bible-Maps">
            <text:p>uW-Bible-Map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uW-Bible-Maps">
            <text:p>https://github.com/unfoldingWord-dev/uW-Bible-Maps</text:p>
          </table:table-cell>
          <table:table-cell office:value-type="string" office:string-value="2015-11-18T15:24:04Z">
            <text:p>2015-11-18T15:24:04Z</text:p>
          </table:table-cell>
          <table:table-cell office:value-type="string" office:string-value="">
            <text:p/>
          </table:table-cell>
          <table:table-cell office:value-type="string" office:string-value="unfoldingWord-dev/uW-Bible-Maps">
            <text:p>unfoldingWord-dev/uW-Bible-Map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ev-skills">
            <text:p>uw-dev-skill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uw-dev-skills">
            <text:p>https://github.com/unfoldingWord/uw-dev-skills</text:p>
          </table:table-cell>
          <table:table-cell office:value-type="string" office:string-value="2026-05-11T16:50:29Z">
            <text:p>2026-05-11T16:50:29Z</text:p>
          </table:table-cell>
          <table:table-cell office:value-type="string" office:string-value="">
            <text:p/>
          </table:table-cell>
          <table:table-cell office:value-type="string" office:string-value="unfoldingWord/uw-dev-skills">
            <text:p>unfoldingWord/uw-dev-skil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zulip-mcp">
            <text:p>uw-zulip-mc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0">
            <text:p>0</text:p>
          </table:table-cell>
          <table:table-cell office:value-type="string" office:string-value="0">
            <text:p>0</text:p>
          </table:table-cell>
          <table:table-cell office:value-type="string" office:string-value="https://github.com/unfoldingWord/uw-zulip-mcp">
            <text:p>https://github.com/unfoldingWord/uw-zulip-mcp</text:p>
          </table:table-cell>
          <table:table-cell office:value-type="string" office:string-value="2026-05-29T15:06:34Z">
            <text:p>2026-05-29T15:06:34Z</text:p>
          </table:table-cell>
          <table:table-cell office:value-type="string" office:string-value="">
            <text:p/>
          </table:table-cell>
          <table:table-cell office:value-type="string" office:string-value="unfoldingWord/uw-zulip-mcp">
            <text:p>unfoldingWord/uw-zulip-mcp</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zulip-files">
            <text:p>zulip-file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0">
            <text:p>0</text:p>
          </table:table-cell>
          <table:table-cell office:value-type="string" office:string-value="0">
            <text:p>0</text:p>
          </table:table-cell>
          <table:table-cell office:value-type="string" office:string-value="https://github.com/unfoldingWord/zulip-files">
            <text:p>https://github.com/unfoldingWord/zulip-files</text:p>
          </table:table-cell>
          <table:table-cell office:value-type="string" office:string-value="2026-02-21T13:15:10Z">
            <text:p>2026-02-21T13:15:10Z</text:p>
          </table:table-cell>
          <table:table-cell office:value-type="string" office:string-value="">
            <text:p/>
          </table:table-cell>
          <table:table-cell office:value-type="string" office:string-value="unfoldingWord/zulip-files">
            <text:p>unfoldingWord/zulip-file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
      <table:named-expressions/>
      <table:database-ranges>
        <table:database-range table:name="__Anonymous_Sheet_DB__0" table:target-range-address="Repositories.A1:Repositories.AD546">
          <table:sort>
            <table:sort-by table:field-number="2"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8">00/00/0000</text:date>, <text:time style:data-style-name="N2" text:time-value="08:35:00.70891497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18T08:36:40.370243174</dc:date>
    <meta:editing-duration>PT20H13M43S</meta:editing-duration>
    <meta:editing-cycles>16</meta:editing-cycles>
    <meta:document-statistic meta:table-count="1" meta:cell-count="17536" meta:object-count="0"/>
  </office:meta>
</office:document-meta>
</file>