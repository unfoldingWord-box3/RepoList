
<file path=META-INF/manifest.xml><?xml version="1.0" encoding="utf-8"?>
<manifest:manifest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manifest="urn:oasis:names:tc:opendocument:xmlns:manifest:1.0" office:version="1.2">
  <office:automatic-styles/>
  <office:body>
    <office:spreadsheet>
      <table:table table:name="Repositories">
        <table:table-row>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47:17Z">
            <text:p>2026-06-10T12:47:17Z</text:p>
          </table:table-cell>
          <table:table-cell office:value-type="string" office:string-value="2026-06-10T12:47:16Z">
            <text:p>2026-06-10T12:47: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0T12:47:23Z">
            <text:p>2026-06-10T12:47:2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2:58:52Z">
            <text:p>2026-06-10T12:58:52Z</text:p>
          </table:table-cell>
          <table:table-cell office:value-type="string" office:string-value="2026-06-10T12:58:51Z">
            <text:p>2026-06-10T12:58:5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0T12:59:00Z">
            <text:p>2026-06-10T12:59:0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20:04:13Z">
            <text:p>2026-06-05T20:04:13Z</text:p>
          </table:table-cell>
          <table:table-cell office:value-type="string" office:string-value="2026-06-05T20:04:11Z">
            <text:p>2026-06-05T20:04:1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05T20:04:17Z">
            <text:p>2026-06-05T20:04:17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No longer used candidate">
            <text:p>No longer used candidate</text:p>
          </table:table-cell>
          <table:table-cell office:value-type="string" office:string-value="Repository name suggests it may be old, legacy, deprecated, obsolete, archived, or a backup.">
            <text:p>Repository name suggests it may be old, legacy, deprecated, obsolete, archived, or a backup.</text:p>
          </table:table-cell>
          <table:table-cell office:value-type="string" office:string-value="">
            <text:p/>
          </table:table-cell>
          <table:table-cell office:value-type="string" office:string-value="">
            <text:p/>
          </table:table-cell>
        </table:table-row>
        <table:table-row>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No longer used candidate">
            <text:p>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8">
            <text:p>5898</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5898 downloads).">
            <text:p>Repository has GitHub dependents or at least 1,000 npm downloads in the last year (58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8 downloads in the last year).">
            <text:p>Package has detected local usage, GitHub dependents, or significant npm downloads (5898 downloads in the last year).</text:p>
          </table:table-cell>
        </table:table-row>
        <table:table-row>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dcs-react-hooks">
            <text:p>dcs-react-hooks</text:p>
          </table:table-cell>
          <table:table-cell office:value-type="string" office:string-value="False">
            <text:p>False</text:p>
          </table:table-cell>
          <table:table-cell office:value-type="string" office:string-value="179">
            <text:p>179</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79 downloads).">
            <text:p>Repository has GitHub dependents or at least 1,000 npm downloads in the last year (17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9 downloads in the last year).">
            <text:p>Package has detected local usage, GitHub dependents, or significant npm downloads (179 downloads in the last year).</text:p>
          </table:table-cell>
        </table:table-row>
        <table:table-row>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rc">
            <text:p>door43-rc</text:p>
          </table:table-cell>
          <table:table-cell office:value-type="string" office:string-value="True">
            <text:p>True</text:p>
          </table:table-cell>
          <table:table-cell office:value-type="string" office:string-value="1504">
            <text:p>1504</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504 downloads).">
            <text:p>Repository has GitHub dependents or at least 1,000 npm downloads in the last year (1504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core">
            <text:p>@oce-editor-tools/joy-core</text:p>
          </table:table-cell>
          <table:table-cell office:value-type="string" office:string-value="">
            <text:p/>
          </table:table-cell>
          <table:table-cell office:value-type="string" office:string-value="405">
            <text:p>405</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405 downloads).">
            <text:p>Repository has GitHub dependents or at least 1,000 npm downloads in the last year (40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5 downloads in the last year).">
            <text:p>Package has detected local usage, GitHub dependents, or significant npm downloads (405 downloads in the last year).</text:p>
          </table:table-cell>
        </table:table-row>
        <table:table-row>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pk">
            <text:p>@oce-editor-tools/joy-pk</text:p>
          </table:table-cell>
          <table:table-cell office:value-type="string" office:string-value="">
            <text:p/>
          </table:table-cell>
          <table:table-cell office:value-type="string" office:string-value="129">
            <text:p>129</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29 downloads).">
            <text:p>Repository has GitHub dependents or at least 1,000 npm downloads in the last year (129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9 downloads in the last year).">
            <text:p>Package has detected local usage, GitHub dependents, or significant npm downloads (129 downloads in the last year).</text:p>
          </table:table-cell>
        </table:table-row>
        <table:table-row>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core">
            <text:p>@oce-editor-tools/mui-core</text:p>
          </table:table-cell>
          <table:table-cell office:value-type="string" office:string-value="">
            <text:p/>
          </table:table-cell>
          <table:table-cell office:value-type="string" office:string-value="641">
            <text:p>641</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641 downloads).">
            <text:p>Repository has GitHub dependents or at least 1,000 npm downloads in the last year (64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 downloads in the last year).">
            <text:p>Package has detected local usage, GitHub dependents, or significant npm downloads (641 downloads in the last year).</text:p>
          </table:table-cell>
        </table:table-row>
        <table:table-row>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pk">
            <text:p>@oce-editor-tools/mui-pk</text:p>
          </table:table-cell>
          <table:table-cell office:value-type="string" office:string-value="">
            <text:p/>
          </table:table-cell>
          <table:table-cell office:value-type="string" office:string-value="335">
            <text:p>335</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35 downloads).">
            <text:p>Repository has GitHub dependents or at least 1,000 npm downloads in the last year (33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5 downloads in the last year).">
            <text:p>Package has detected local usage, GitHub dependents, or significant npm downloads (335 downloads in the last year).</text:p>
          </table:table-cell>
        </table:table-row>
        <table:table-row>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1">
            <text:p>371</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371 downloads).">
            <text:p>Repository has GitHub dependents or at least 1,000 npm downloads in the last year (37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1 downloads in the last year).">
            <text:p>Package has detected local usage, GitHub dependents, or significant npm downloads (371 downloads in the last year).</text:p>
          </table:table-cell>
        </table:table-row>
        <table:table-row>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6">
            <text:p>96</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96 downloads).">
            <text:p>Repository has GitHub dependents or at least 1,000 npm downloads in the last year (96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 downloads in the last year).">
            <text:p>Package has detected local usage, GitHub dependents, or significant npm downloads (96 downloads in the last year).</text:p>
          </table:table-cell>
        </table:table-row>
        <table:table-row>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74 downloads).">
            <text:p>Repository has GitHub dependents or at least 1,000 npm downloads in the last year (74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4 downloads in the last year).">
            <text:p>Package has detected local usage, GitHub dependents, or significant npm downloads (74 downloads in the last year).</text:p>
          </table:table-cell>
        </table:table-row>
        <table:table-row>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uw-editor">
            <text:p>uw-editor</text:p>
          </table:table-cell>
          <table:table-cell office:value-type="string" office:string-value="True">
            <text:p>True</text:p>
          </table:table-cell>
          <table:table-cell office:value-type="string" office:string-value="1163">
            <text:p>116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1163 downloads).">
            <text:p>Repository has GitHub dependents or at least 1,000 npm downloads in the last year (116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Keep - externally used">
            <text:p>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574">
            <text:p>16574</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74 downloads in the last year).">
            <text:p>Package has detected local usage, GitHub dependents, or significant npm downloads (16574 downloads in the last year).</text:p>
          </table:table-cell>
        </table:table-row>
        <table:table-row>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42">
            <text:p>5142</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42 downloads in the last year).">
            <text:p>Package has detected local usage, GitHub dependents, or significant npm downloads (5142 downloads in the last year).</text:p>
          </table:table-cell>
        </table:table-row>
        <table:table-row>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4">
            <text:p>3614</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4 downloads in the last year).">
            <text:p>Package has detected local usage, GitHub dependents, or significant npm downloads (3614 downloads in the last year).</text:p>
          </table:table-cell>
        </table:table-row>
        <table:table-row>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electronite">
            <text:p>electronite</text:p>
          </table:table-cell>
          <table:table-cell office:value-type="string" office:string-value="False">
            <text:p>False</text:p>
          </table:table-cell>
          <table:table-cell office:value-type="string" office:string-value="2608">
            <text:p>2608</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2">
            <text:p>24652</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2 downloads in the last year).">
            <text:p>Package has detected local usage, GitHub dependents, or significant npm downloads (24652 downloads in the last year).</text:p>
          </table:table-cell>
        </table:table-row>
        <table:table-row>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epitelete-html">
            <text:p>epitelete-html</text:p>
          </table:table-cell>
          <table:table-cell office:value-type="string" office:string-value="False">
            <text:p>False</text:p>
          </table:table-cell>
          <table:table-cell office:value-type="string" office:string-value="9613">
            <text:p>9613</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613 downloads in the last year).">
            <text:p>Package has detected local usage, GitHub dependents, or significant npm downloads (9613 downloads in the last year).</text:p>
          </table:table-cell>
        </table:table-row>
        <table:table-row>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68">
            <text:p>17468</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68 downloads in the last year).">
            <text:p>Package has detected local usage, GitHub dependents, or significant npm downloads (17468 downloads in the last year).</text:p>
          </table:table-cell>
        </table:table-row>
        <table:table-row>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gogs-client">
            <text:p>gogs-client</text:p>
          </table:table-cell>
          <table:table-cell office:value-type="string" office:string-value="False">
            <text:p>False</text:p>
          </table:table-cell>
          <table:table-cell office:value-type="string" office:string-value="6726">
            <text:p>6726</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07">
            <text:p>3107</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07 downloads in the last year).">
            <text:p>Package has detected local usage, GitHub dependents, or significant npm downloads (3107 downloads in the last year).</text:p>
          </table:table-cell>
        </table:table-row>
        <table:table-row>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53:21Z">
            <text:p>2026-06-05T07:53:21Z</text:p>
          </table:table-cell>
          <table:table-cell office:value-type="string" office:string-value="2026-06-05T07:53:19Z">
            <text:p>2026-06-05T07:53: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wl-generator">
            <text:p>twl-generator</text:p>
          </table:table-cell>
          <table:table-cell office:value-type="string" office:string-value="False">
            <text:p>False</text:p>
          </table:table-cell>
          <table:table-cell office:value-type="string" office:string-value="5434">
            <text:p>5434</text:p>
          </table:table-cell>
          <table:table-cell office:value-type="string" office:string-value="2026-06-05T07:54:21.337Z">
            <text:p>2026-06-05T07:54:21.337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05T07:53:25Z">
            <text:p>2026-06-05T07:53:2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434 downloads in the last year).">
            <text:p>Package has detected local usage, GitHub dependents, or significant npm downloads (5434 downloads in the last year).</text:p>
          </table:table-cell>
        </table:table-row>
        <table:table-row>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783">
            <text:p>278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783 downloads in the last year).">
            <text:p>Package has detected local usage, GitHub dependents, or significant npm downloads (2783 downloads in the last year).</text:p>
          </table:table-cell>
        </table:table-row>
        <table:table-row>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217">
            <text:p>15217</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217 downloads in the last year).">
            <text:p>Package has detected local usage, GitHub dependents, or significant npm downloads (15217 downloads in the last year).</text:p>
          </table:table-cell>
        </table:table-row>
        <table:table-row>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scripture-tsv">
            <text:p>scripture-tsv</text:p>
          </table:table-cell>
          <table:table-cell office:value-type="string" office:string-value="False">
            <text:p>False</text:p>
          </table:table-cell>
          <table:table-cell office:value-type="string" office:string-value="2648">
            <text:p>2648</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48 downloads in the last year).">
            <text:p>Package has detected local usage, GitHub dependents, or significant npm downloads (2648 downloads in the last year).</text:p>
          </table:table-cell>
        </table:table-row>
        <table:table-row>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896">
            <text:p>3896</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896 downloads in the last year).">
            <text:p>Package has detected local usage, GitHub dependents, or significant npm downloads (3896 downloads in the last year).</text:p>
          </table:table-cell>
        </table:table-row>
        <table:table-row>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56">
            <text:p>9756</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56 downloads in the last year).">
            <text:p>Package has detected local usage, GitHub dependents, or significant npm downloads (9756 downloads in the last year).</text:p>
          </table:table-cell>
        </table:table-row>
        <table:table-row>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7848">
            <text:p>97848</text:p>
          </table:table-cell>
          <table:table-cell office:value-type="string" office:string-value="2021-08-25T21:55:46.406Z">
            <text:p>2021-08-25T21:55:46.406Z</text:p>
          </table:table-cell>
          <table:table-cell office:value-type="string" office:string-value="['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47">
            <text:p>774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47 downloads in the last year).">
            <text:p>Package has detected local usage, GitHub dependents, or significant npm downloads (7747 downloads in the last year).</text:p>
          </table:table-cell>
        </table:table-row>
        <table:table-row>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tc-ui-toolkit">
            <text:p>tc-ui-toolkit</text:p>
          </table:table-cell>
          <table:table-cell office:value-type="string" office:string-value="False">
            <text:p>False</text:p>
          </table:table-cell>
          <table:table-cell office:value-type="string" office:string-value="29495">
            <text:p>29495</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495 downloads in the last year).">
            <text:p>Package has detected local usage, GitHub dependents, or significant npm downloads (29495 downloads in the last year).</text:p>
          </table:table-cell>
        </table:table-row>
        <table:table-row>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4995">
            <text:p>14995</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4995 downloads in the last year).">
            <text:p>Package has detected local usage, GitHub dependents, or significant npm downloads (14995 downloads in the last year).</text:p>
          </table:table-cell>
        </table:table-row>
        <table:table-row>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398">
            <text:p>639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398 downloads in the last year).">
            <text:p>Package has detected local usage, GitHub dependents, or significant npm downloads (6398 downloads in the last year).</text:p>
          </table:table-cell>
        </table:table-row>
        <table:table-row>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5T07:47:31Z">
            <text:p>2026-06-05T07:47:31Z</text:p>
          </table:table-cell>
          <table:table-cell office:value-type="string" office:string-value="2026-06-05T07:47:29Z">
            <text:p>2026-06-05T07:47: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twl-creation-app', 'twl-generator', 'tsv7-tn-cleanup-app', 'add-gl-quotes-to-tsv-files']">
            <text:p>['tsv-twl-creation-app', 'twl-generator',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05T07:47:35Z">
            <text:p>2026-06-05T07:47:3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wl-generator', 'door43-preview-renderers']">
            <text:p>['door43-preview-app', 'twl-generator',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52">
            <text:p>2052</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52 downloads in the last year).">
            <text:p>Package has detected local usage, GitHub dependents, or significant npm downloads (2052 downloads in the last year).</text:p>
          </table:table-cell>
        </table:table-row>
        <table:table-row>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uw-languages-rcl">
            <text:p>uw-languages-rcl</text:p>
          </table:table-cell>
          <table:table-cell office:value-type="string" office:string-value="False">
            <text:p>False</text:p>
          </table:table-cell>
          <table:table-cell office:value-type="string" office:string-value="1201">
            <text:p>1201</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01 downloads in the last year).">
            <text:p>Package has detected local usage, GitHub dependents, or significant npm downloads (1201 downloads in the last year).</text:p>
          </table:table-cell>
        </table:table-row>
        <table:table-row>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proskomma">
            <text:p>uw-proskomma</text:p>
          </table:table-cell>
          <table:table-cell office:value-type="string" office:string-value="False">
            <text:p>False</text:p>
          </table:table-cell>
          <table:table-cell office:value-type="string" office:string-value="2345">
            <text:p>2345</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45 downloads in the last year).">
            <text:p>Package has detected local usage, GitHub dependents, or significant npm downloads (2345 downloads in the last year).</text:p>
          </table:table-cell>
        </table:table-row>
        <table:table-row>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quote-helpers">
            <text:p>uw-quote-helpers</text:p>
          </table:table-cell>
          <table:table-cell office:value-type="string" office:string-value="False">
            <text:p>False</text:p>
          </table:table-cell>
          <table:table-cell office:value-type="string" office:string-value="3135">
            <text:p>3135</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35 downloads in the last year).">
            <text:p>Package has detected local usage, GitHub dependents, or significant npm downloads (3135 downloads in the last year).</text:p>
          </table:table-cell>
        </table:table-row>
        <table:table-row>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uw-tsv-parser">
            <text:p>uw-tsv-parser</text:p>
          </table:table-cell>
          <table:table-cell office:value-type="string" office:string-value="False">
            <text:p>False</text:p>
          </table:table-cell>
          <table:table-cell office:value-type="string" office:string-value="4593">
            <text:p>4593</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593 downloads in the last year).">
            <text:p>Package has detected local usage, GitHub dependents, or significant npm downloads (4593 downloads in the last year).</text:p>
          </table:table-cell>
        </table:table-row>
        <table:table-row>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uw-word-count">
            <text:p>uw-word-count</text:p>
          </table:table-cell>
          <table:table-cell office:value-type="string" office:string-value="False">
            <text:p>False</text:p>
          </table:table-cell>
          <table:table-cell office:value-type="string" office:string-value="345">
            <text:p>34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45 downloads in the last year).">
            <text:p>Package has detected local usage, GitHub dependents, or significant npm downloads (345 downloads in the last year).</text:p>
          </table:table-cell>
        </table:table-row>
        <table:table-row>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word-aligner">
            <text:p>word-aligner</text:p>
          </table:table-cell>
          <table:table-cell office:value-type="string" office:string-value="False">
            <text:p>False</text:p>
          </table:table-cell>
          <table:table-cell office:value-type="string" office:string-value="44656">
            <text:p>44656</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56 downloads in the last year).">
            <text:p>Package has detected local usage, GitHub dependents, or significant npm downloads (44656 downloads in the last year).</text:p>
          </table:table-cell>
        </table:table-row>
        <table:table-row>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aligner-lib">
            <text:p>word-aligner-lib</text:p>
          </table:table-cell>
          <table:table-cell office:value-type="string" office:string-value="False">
            <text:p>False</text:p>
          </table:table-cell>
          <table:table-cell office:value-type="string" office:string-value="4730">
            <text:p>4730</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30 downloads in the last year).">
            <text:p>Package has detected local usage, GitHub dependents, or significant npm downloads (4730 downloads in the last year).</text:p>
          </table:table-cell>
        </table:table-row>
        <table:table-row>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word-aligner-rcl">
            <text:p>word-aligner-rcl</text:p>
          </table:table-cell>
          <table:table-cell office:value-type="string" office:string-value="False">
            <text:p>False</text:p>
          </table:table-cell>
          <table:table-cell office:value-type="string" office:string-value="16507">
            <text:p>16507</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07 downloads in the last year).">
            <text:p>Package has detected local usage, GitHub dependents, or significant npm downloads (16507 downloads in the last year).</text:p>
          </table:table-cell>
        </table:table-row>
        <table:table-row>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Keep - locally used">
            <text:p>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30T15:04:02Z">
            <text:p>2026-04-30T15:04:02Z</text:p>
          </table:table-cell>
          <table:table-cell office:value-type="string" office:string-value="2026-04-30T15:04:01Z">
            <text:p>2026-04-30T15:04:01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4-30T15:09:54Z">
            <text:p>2026-04-30T15:09:5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8:26:02Z">
            <text:p>2026-06-10T18:26:02Z</text:p>
          </table:table-cell>
          <table:table-cell office:value-type="string" office:string-value="2026-05-28T15:55:55Z">
            <text:p>2026-05-28T15:55:55Z</text:p>
          </table:table-cell>
          <table:table-cell office:value-type="string" office:string-value="">
            <text:p/>
          </table:table-cell>
          <table:table-cell office:value-type="string" office:string-value="89">
            <text:p>89</text:p>
          </table:table-cell>
          <table:table-cell office:value-type="string" office:string-value="9">
            <text:p>9</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5-28T15:56:00Z">
            <text:p>2026-05-28T15:56: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6">
            <text:p>186</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6 downloads in the last year) and no detected local consumers.">
            <text:p>Package has low but nonzero npm usage (186 downloads in the last year) and no detected local consumers.</text:p>
          </table:table-cell>
        </table:table-row>
        <table:table-row>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tc-create-app">
            <text:p>tc-create-app</text:p>
          </table:table-cell>
          <table:table-cell office:value-type="string" office:string-value="False">
            <text:p>False</text:p>
          </table:table-cell>
          <table:table-cell office:value-type="string" office:string-value="74">
            <text:p>74</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4 downloads in the last year) and no detected local consumers.">
            <text:p>Package has low but nonzero npm usage (74 downloads in the last year) and no detected local consumers.</text:p>
          </table:table-cell>
        </table:table-row>
        <table:table-row>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Manual review">
            <text:p>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Manual review">
            <text:p>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Manual review">
            <text:p>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Manual review">
            <text:p>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Manual review">
            <text:p>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Manual review">
            <text:p>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book-package-app">
            <text:p>book-package-app</text:p>
          </table:table-cell>
          <table:table-cell office:value-type="string" office:string-value="False">
            <text:p>False</text:p>
          </table:table-cell>
          <table:table-cell office:value-type="string" office:string-value="114">
            <text:p>114</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4 downloads in the last year) and no detected local consumers.">
            <text:p>Package has low but nonzero npm usage (114 downloads in the last year) and no detected local consumers.</text:p>
          </table:table-cell>
        </table:table-row>
        <table:table-row>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Needs review">
            <text:p>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2017-03-14T20:52:36Z">
            <text:p>2017-03-14T20:52: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Dead - archived">
            <text:p>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office:version="1.2">
  <office:meta>
    <meta:generator>ODFPY/1.4.1</meta:generator>
  </office:meta>
</office:document-meta>
</file>