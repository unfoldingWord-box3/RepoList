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3.5346in"/>
    </style:style>
    <style:style style:name="co3" style:family="table-column">
      <style:table-column-properties fo:break-before="auto" style:column-width="1.5508in"/>
    </style:style>
    <style:style style:name="co4" style:family="table-column">
      <style:table-column-properties fo:break-before="auto" style:column-width="0.998in"/>
    </style:style>
    <style:style style:name="co5" style:family="table-column">
      <style:table-column-properties fo:break-before="auto" style:column-width="0.7811in"/>
    </style:style>
    <style:style style:name="co6" style:family="table-column">
      <style:table-column-properties fo:break-before="auto" style:column-width="1.8516in"/>
    </style:style>
    <style:style style:name="co7" style:family="table-column">
      <style:table-column-properties fo:break-before="auto" style:column-width="1.6953in"/>
    </style:style>
    <style:style style:name="co8" style:family="table-column">
      <style:table-column-properties fo:break-before="auto" style:column-width="1.3709in"/>
    </style:style>
    <style:style style:name="co9" style:family="table-column">
      <style:table-column-properties fo:break-before="auto" style:column-width="2.8016in"/>
    </style:style>
    <style:style style:name="co10" style:family="table-column">
      <style:table-column-properties fo:break-before="auto" style:column-width="1.322in"/>
    </style:style>
    <style:style style:name="co11" style:family="table-column">
      <style:table-column-properties fo:break-before="auto" style:column-width="1.8992in"/>
    </style:style>
    <style:style style:name="co12" style:family="table-column">
      <style:table-column-properties fo:break-before="auto" style:column-width="1.4783in"/>
    </style:style>
    <style:style style:name="co13" style:family="table-column">
      <style:table-column-properties fo:break-before="auto" style:column-width="2.3209in"/>
    </style:style>
    <style:style style:name="co14" style:family="table-column">
      <style:table-column-properties fo:break-before="auto" style:column-width="2.3563in"/>
    </style:style>
    <style:style style:name="co15" style:family="table-column">
      <style:table-column-properties fo:break-before="auto" style:column-width="1.5634in"/>
    </style:style>
    <style:style style:name="co16" style:family="table-column">
      <style:table-column-properties fo:break-before="auto" style:column-width="2.152in"/>
    </style:style>
    <style:style style:name="co17" style:family="table-column">
      <style:table-column-properties fo:break-before="auto" style:column-width="5.4228in"/>
    </style:style>
    <style:style style:name="co18" style:family="table-column">
      <style:table-column-properties fo:break-before="auto" style:column-width="1.4425in"/>
    </style:style>
    <style:style style:name="co19" style:family="table-column">
      <style:table-column-properties fo:break-before="auto" style:column-width="1.539in"/>
    </style:style>
    <style:style style:name="co20" style:family="table-column">
      <style:table-column-properties fo:break-before="auto" style:column-width="2.0681in"/>
    </style:style>
    <style:style style:name="co21" style:family="table-column">
      <style:table-column-properties fo:break-before="auto" style:column-width="1.7193in"/>
    </style:style>
    <style:style style:name="co22" style:family="table-column">
      <style:table-column-properties fo:break-before="auto" style:column-width="3.7154in"/>
    </style:style>
    <style:style style:name="co23" style:family="table-column">
      <style:table-column-properties fo:break-before="auto" style:column-width="6.7937in"/>
    </style:style>
    <style:style style:name="co24" style:family="table-column">
      <style:table-column-properties fo:break-before="auto" style:column-width="2.9575in"/>
    </style:style>
    <style:style style:name="co2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047in" fo:break-before="auto" style:use-optimal-row-height="true"/>
    </style:style>
    <style:style style:name="ro3" style:family="table-row">
      <style:table-row-properties style:row-height="0.7402in" fo:break-before="auto" style:use-optimal-row-height="true"/>
    </style:style>
    <style:style style:name="ro4" style:family="table-row">
      <style:table-row-properties style:row-height="0.3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ce1"/>
        <table:table-column table:style-name="co8" table:number-columns-repeated="2" table:default-cell-style-name="ce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0" table:default-cell-style-name="Default"/>
        <table:table-column table:style-name="co22" table:default-cell-style-name="Default"/>
        <table:table-column table:style-name="co16" table:default-cell-style-name="Default"/>
        <table:table-column table:style-name="co23" table:default-cell-style-name="Default"/>
        <table:table-column table:style-name="co24" table:default-cell-style-name="Default"/>
        <table:table-column table:style-name="co25"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is submodule of">
            <text:p>is submodule of</text:p>
          </table:table-cell>
          <table:table-cell office:value-type="string" office:string-value="repo full name">
            <text:p>repo full nam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wordmap-lexer', 'markdown-translatable', '@unfoldingword/eslint-config', 'bible-reference-range']">
            <text:p>['alignment-editor-rcl', 'bible-reference-rcl', 'gitea-react-toolkit', 'string-punctuation-tokenizer', 'wordmap-lexer', 'markdown-translatable', '@unfoldingword/eslint-config', 'bible-reference-range']</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
            <text:p/>
          </table:table-cell>
          <table:table-cell office:value-type="string" office:string-value="unfoldingWord/baruch">
            <text:p>unfoldingWord/baruc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bible-reference-range']">
            <text:p>['bible-reference-rcl', 'dcs-js', 'bible-reference-range']</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unfoldingword/eslint-config', 'bible-reference-range', 'string-punctuation-tokenizer', 'tc-ui-toolkit', 'usfm-js', 'uw-quote-helpers', 'word-aligner', 'wordmap-lexer', 'tsv-groupdata-parser', 'uw-bible-parser', 'uw-tsv-parser']">
            <text:p>['gitea-react-toolkit', 'markdown-translatable', 'scripture-resources-rcl', '@unfoldingword/eslint-config', 'bible-reference-range', 'string-punctuation-tokenizer', 'tc-ui-toolkit', 'usfm-js', 'uw-quote-helpers', 'word-aligner', 'wordmap-lexer', 'tsv-groupdata-parser', 'uw-bible-parser', 'uw-tsv-parser']</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2:45:39Z">
            <text:p>2026-06-16T22:45:39Z</text:p>
          </table:table-cell>
          <table:table-cell office:value-type="string" office:string-value="2026-06-16T22:45:39Z">
            <text:p>2026-06-16T22:45: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claude', 'bp-assistant bot']">
            <text:p>['benjamin-test', 'deferredreward', 'stephenwunrow',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6T22:45:44Z">
            <text:p>2026-06-16T22:45:44Z</text:p>
          </table:table-cell>
          <table:table-cell office:value-type="string" office:string-value="">
            <text:p/>
          </table:table-cell>
          <table:table-cell office:value-type="string" office:string-value="unfoldingWord/bp-assistant">
            <text:p>unfoldingWord/bp-assistan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14:59:01Z">
            <text:p>2026-06-17T14:59:01Z</text:p>
          </table:table-cell>
          <table:table-cell office:value-type="string" office:string-value="2026-06-17T14:58:59Z">
            <text:p>2026-06-17T14:58: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7T15:03:26Z">
            <text:p>2026-06-17T15:03:26Z</text:p>
          </table:table-cell>
          <table:table-cell office:value-type="string" office:string-value="">
            <text:p/>
          </table:table-cell>
          <table:table-cell office:value-type="string" office:string-value="unfoldingWord/bp-assistant-skills">
            <text:p>unfoldingWord/bp-assistant-skil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
            <text:p/>
          </table:table-cell>
          <table:table-cell office:value-type="string" office:string-value="unfoldingWord-box3/desktop-app-liminal">
            <text:p>unfoldingWord-box3/desktop-app-limina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
            <text:p/>
          </table:table-cell>
          <table:table-cell office:value-type="string" office:string-value="unfoldingWord/fia-mcp">
            <text:p>unfoldingWord/fia-mc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
            <text:p/>
          </table:table-cell>
          <table:table-cell office:value-type="string" office:string-value="unfoldingWord/fred-zulip-bot-worker">
            <text:p>unfoldingWord/fred-zulip-bot-work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
            <text:p/>
          </table:table-cell>
          <table:table-cell office:value-type="string" office:string-value="unfoldingWord/node-cli-add-gl-quotes-to-tsv-files">
            <text:p>unfoldingWord/node-cli-add-gl-quotes-to-tsv-fil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
            <text:p/>
          </table:table-cell>
          <table:table-cell office:value-type="string" office:string-value="unfoldingWord/oce-oak-edit">
            <text:p>unfoldingWord/oce-oak-edi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uw-proskomma']">
            <text:p>['epitelete-html', 'uw-proskomma']</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wordmap-lexer', 'bible-reference-range', 'gitea-react-toolkit', 'markdown-translatable', 'tc-ui-toolkit', 'uw-quote-helpers', 'word-aligner', '@unfoldingword/eslint-config', 'uw-tsv-parser', 'uw-bible-parser']">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
            <text:p/>
          </table:table-cell>
          <table:table-cell office:value-type="string" office:string-value="unfoldingWord-box3/sample-react-component-library">
            <text:p>unfoldingWord-box3/sample-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unfoldingword/eslint-config']">
            <text:p>['simple-text-editor-rcl', '@unfoldingword/eslint-config']</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
            <text:p/>
          </table:table-cell>
          <table:table-cell office:value-type="string" office:string-value="unfoldingWord-dev/t_pane">
            <text:p>unfoldingWord-dev/t_pa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
            <text:p>unfoldingWord/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indexeddb">
            <text:p>unfoldingWord/tc-study/@bt-synergy/cache-adapter-indexedd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memory">
            <text:p>unfoldingWord/tc-study/@bt-synergy/cache-adapter-memo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sqlite">
            <text:p>unfoldingWord/tc-study/@bt-synergy/cache-adapter-sqli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linked-panels">
            <text:p>unfoldingWord/tc-study/@bt-synergy/linked-pane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mobile">
            <text:p>unfoldingWord/tc-study/@bt-synergy/mobil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navigation">
            <text:p>unfoldingWord/tc-study/@bt-synergy/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
            <text:p>unfoldingWord/tc-study/@bt-synergy/package-buil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engine">
            <text:p>unfoldingWord/tc-study/@bt-synergy/package-builder-engi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core">
            <text:p>unfoldingWord/tc-study/@bt-synergy/package-creator-c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state">
            <text:p>unfoldingWord/tc-study/@bt-synergy/package-creator-st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eb">
            <text:p>unfoldingWord/tc-study/@bt-synergy/package-cre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orkflow">
            <text:p>unfoldingWord/tc-study/@bt-synergy/package-creator-workflo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storage">
            <text:p>unfoldingWord/tc-study/@bt-synergy/package-storag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
            <text:p>unfoldingWord/tc-study/@bt-synergy/passage-set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cli">
            <text:p>unfoldingWord/tc-study/@bt-synergy/passage-sets-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hared">
            <text:p>unfoldingWord/tc-study/@bt-synergy/shared</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tudy-store">
            <text:p>unfoldingWord/tc-study/@bt-synergy/study-st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oc-generator-cli">
            <text:p>unfoldingWord/tc-study/@bt-synergy/toc-generator-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academy-loader">
            <text:p>unfoldingWord/tc-study/@bt-synergy/translation-academy-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notes-loader">
            <text:p>unfoldingWord/tc-study/@bt-synergy/translation-note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questions-loader">
            <text:p>unfoldingWord/tc-study/@bt-synergy/translation-question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inks-loader">
            <text:p>unfoldingWord/tc-study/@bt-synergy/translation-words-link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oader">
            <text:p>unfoldingWord/tc-study/@bt-synergy/translation-word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i-controls">
            <text:p>unfoldingWord/tc-study/@bt-synergy/ui-contro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sfm-processor">
            <text:p>unfoldingWord/tc-study/@bt-synergy/usfm-process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ible-web">
            <text:p>unfoldingWord/tc-study/bible-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linked-panels-spike">
            <text:p>unfoldingWord/tc-study/linked-panels-spik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c-study">
            <text:p>unfoldingWord/tc-study/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oc-generator-web">
            <text:p>unfoldingWord/tc-study/toc-gener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1-15T22:01:51Z">
            <text:p>2022-11-15T22:01:51Z</text:p>
          </table:table-cell>
          <table:table-cell office:value-type="string" office:string-value="2022-11-15T22:01:47Z">
            <text:p>2022-11-15T22:0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2-11-15T23:06:04Z">
            <text:p>2022-11-15T23:06:04Z</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
            <text:p/>
          </table:table-cell>
          <table:table-cell office:value-type="string" office:string-value="unfoldingWord-box3/tq-app">
            <text:p>unfoldingWord-box3/tq-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
            <text:p/>
          </table:table-cell>
          <table:table-cell office:value-type="string" office:string-value="unfoldingWord-box3/translation-helps">
            <text:p>unfoldingWord-box3/translation-help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string-punctuation-tokenizer', 'usfm-alignment-remover', 'wordmap-lexer']">
            <text:p>['tsv-quote-converters', 'twl-generator', 'usfm-js', 'string-punctuation-tokenizer', 'usfm-alignment-remover', 'wordmap-lex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cell office:value-type="string" office:string-value="">
            <text:p/>
          </table:table-cell>
          <table:table-cell office:value-type="string" office:string-value="unfoldingWord/tsv-twl-creation-app">
            <text:p>unfoldingWord/tsv-twl-creati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string-punctuation-tokenizer', 'wordmap-lexer']">
            <text:p>['tsv-quote-converters', 'string-punctuation-tokenizer', 'wordmap-lex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
            <text:p/>
          </table:table-cell>
          <table:table-cell office:value-type="string" office:string-value="unfoldingWord/tsv7-tn-cleanup-app">
            <text:p>unfoldingWord/tsv7-tn-cleanup-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4-01-08T23:29:10Z">
            <text:p>2024-01-08T23:29:10Z</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5-11-03T19:05:31Z">
            <text:p>2025-11-03T19:05:31Z</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
            <text:p/>
          </table:table-cell>
          <table:table-cell office:value-type="string" office:string-value="unfoldingWord/wordMAP-usfm">
            <text:p>unfoldingWord/wordMAP-usfm</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
            <text:p/>
          </table:table-cell>
          <table:table-cell office:value-type="string" office:string-value="unfoldingWord/.github">
            <text:p>unfoldingWord/.githu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
            <text:p/>
          </table:table-cell>
          <table:table-cell office:value-type="string" office:string-value="unfoldingWord-dev/api-index">
            <text:p>unfoldingWord-dev/api-inde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
            <text:p/>
          </table:table-cell>
          <table:table-cell office:value-type="string" office:string-value="unfoldingWord-box3/aquifer-to-dcs">
            <text:p>unfoldingWord-box3/aquifer-to-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irch Champeon ">
            <text:p>Birch Champeon </text:p>
          </table:table-cell>
          <table:table-cell office:value-type="string" office:string-value="x">
            <text:p>x</text:p>
          </table:table-cell>
          <table:table-cell office:value-type="string" office:string-value="">
            <text:p/>
          </table:table-cell>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
            <text:p/>
          </table:table-cell>
          <table:table-cell office:value-type="string" office:string-value="book-package-app">
            <text:p>book-package-app</text:p>
          </table:table-cell>
          <table:table-cell office:value-type="string" office:string-value="False">
            <text:p>False</text:p>
          </table:table-cell>
          <table:table-cell office:value-type="string" office:string-value="115">
            <text:p>115</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usfm-js', 'uw-word-count']">
            <text:p>['book-package-rcl', 'usfm-js', 'uw-word-count']</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5 downloads in the last year) and no detected local consumers.">
            <text:p>Package has low but nonzero npm usage (11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
            <text:p/>
          </table:table-cell>
          <table:table-cell office:value-type="string" office:string-value="unfoldingWord/Brown-Driver-Briggs-Enhanced">
            <text:p>unfoldingWord/Brown-Driver-Briggs-Enhanc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7">
            <text:p>47</text:p>
          </table:table-cell>
          <table:table-cell office:value-type="string" office:string-value="0">
            <text:p>0</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
            <text:p/>
          </table:table-cell>
          <table:table-cell office:value-type="string" office:string-value="unfoldingWord/bt-servant-admin-portal">
            <text:p>unfoldingWord/bt-servant-admin-port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
            <text:p/>
          </table:table-cell>
          <table:table-cell office:value-type="string" office:string-value="unfoldingWord/bt-servant-engine">
            <text:p>unfoldingWord/bt-servant-engin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
            <text:p/>
          </table:table-cell>
          <table:table-cell office:value-type="string" office:string-value="unfoldingWord/bt-servant-engine-data-loaders">
            <text:p>unfoldingWord/bt-servant-engine-data-load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
            <text:p/>
          </table:table-cell>
          <table:table-cell office:value-type="string" office:string-value="unfoldingWord/bt-servant-kb-worker">
            <text:p>unfoldingWord/bt-servant-kb-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
            <text:p/>
          </table:table-cell>
          <table:table-cell office:value-type="string" office:string-value="unfoldingWord/bt-servant-log-viewer">
            <text:p>unfoldingWord/bt-servant-log-view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
            <text:p/>
          </table:table-cell>
          <table:table-cell office:value-type="string" office:string-value="unfoldingWord/bt-servant-message-broker">
            <text:p>unfoldingWord/bt-servant-message-bro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
            <text:p/>
          </table:table-cell>
          <table:table-cell office:value-type="string" office:string-value="unfoldingWord/bt-servant-report-sender">
            <text:p>unfoldingWord/bt-servant-report-sen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signal-gateway">
            <text:p>bt-servant-signal-gateway</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16T21:44:04Z">
            <text:p>2026-06-16T21:44:04Z</text:p>
          </table:table-cell>
          <table:table-cell office:value-type="string" office:string-value="2026-06-16T18:47:12Z">
            <text:p>2026-06-16T18:47:12Z</text:p>
          </table:table-cell>
          <table:table-cell office:value-type="string" office:string-value="">
            <text:p/>
          </table:table-cell>
          <table:table-cell office:value-type="string" office:string-value="12">
            <text:p>12</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signal-gateway">
            <text:p>https://github.com/unfoldingWord/bt-servant-signal-gateway</text:p>
          </table:table-cell>
          <table:table-cell office:value-type="string" office:string-value="2026-06-16T18:48:35Z">
            <text:p>2026-06-16T18:48:35Z</text:p>
          </table:table-cell>
          <table:table-cell office:value-type="string" office:string-value="">
            <text:p/>
          </table:table-cell>
          <table:table-cell office:value-type="string" office:string-value="unfoldingWord/bt-servant-signal-gateway">
            <text:p>unfoldingWord/bt-servant-signal-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
            <text:p/>
          </table:table-cell>
          <table:table-cell office:value-type="string" office:string-value="unfoldingWord/bt-servant-site">
            <text:p>unfoldingWord/bt-servant-s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
            <text:p/>
          </table:table-cell>
          <table:table-cell office:value-type="string" office:string-value="unfoldingWord/bt-servant-telemetry">
            <text:p>unfoldingWord/bt-servant-telemet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17:48:59Z">
            <text:p>2026-06-13T17:48:59Z</text:p>
          </table:table-cell>
          <table:table-cell office:value-type="string" office:string-value="2026-06-13T17:48:58Z">
            <text:p>2026-06-13T17:48:58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3T17:49:02Z">
            <text:p>2026-06-13T17:49:02Z</text:p>
          </table:table-cell>
          <table:table-cell office:value-type="string" office:string-value="">
            <text:p/>
          </table:table-cell>
          <table:table-cell office:value-type="string" office:string-value="unfoldingWord/bt-servant-web-client">
            <text:p>unfoldingWord/bt-servant-web-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5:25:46Z">
            <text:p>2026-06-17T15:25:46Z</text:p>
          </table:table-cell>
          <table:table-cell office:value-type="string" office:string-value="2026-06-17T15:25:36Z">
            <text:p>2026-06-17T15:25:36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5:27:01Z">
            <text:p>2026-06-17T15:27:01Z</text:p>
          </table:table-cell>
          <table:table-cell office:value-type="string" office:string-value="">
            <text:p/>
          </table:table-cell>
          <table:table-cell office:value-type="string" office:string-value="unfoldingWord/bt-servant-whatsapp-gateway">
            <text:p>unfoldingWord/bt-servant-whatsapp-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5:26:25Z">
            <text:p>2026-06-17T15:26:25Z</text:p>
          </table:table-cell>
          <table:table-cell office:value-type="string" office:string-value="2026-06-16T21:32:07Z">
            <text:p>2026-06-16T21:32:07Z</text:p>
          </table:table-cell>
          <table:table-cell office:value-type="string" office:string-value="">
            <text:p/>
          </table:table-cell>
          <table:table-cell office:value-type="string" office:string-value="110">
            <text:p>110</text:p>
          </table:table-cell>
          <table:table-cell office:value-type="string" office:string-value="10">
            <text:p>10</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6T21:33:14Z">
            <text:p>2026-06-16T21:33:14Z</text:p>
          </table:table-cell>
          <table:table-cell office:value-type="string" office:string-value="">
            <text:p/>
          </table:table-cell>
          <table:table-cell office:value-type="string" office:string-value="unfoldingWord/bt-servant-worker">
            <text:p>unfoldingWord/bt-servant-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
            <text:p/>
          </table:table-cell>
          <table:table-cell office:value-type="string" office:string-value="unfoldingWord/cloudfront_logprocessor">
            <text:p>unfoldingWord/cloudfront_logprocess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8">
            <text:p>188</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8 downloads in the last year) and no detected local consumers.">
            <text:p>Package has low but nonzero npm usage (188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09:29:35Z">
            <text:p>2026-06-03T09:29:35Z</text:p>
          </table:table-cell>
          <table:table-cell office:value-type="string" office:string-value="2026-06-03T09:29:29Z">
            <text:p>2026-06-03T09:2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03T09:29:39Z">
            <text:p>2026-06-03T09:29:39Z</text:p>
          </table:table-cell>
          <table:table-cell office:value-type="string" office:string-value="">
            <text:p/>
          </table:table-cell>
          <table:table-cell office:value-type="string" office:string-value="unfoldingWord/cyber-security-report">
            <text:p>unfoldingWord/cyber-security-re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
            <text:p/>
          </table:table-cell>
          <table:table-cell office:value-type="string" office:string-value="unfoldingWord/data_tracking_import">
            <text:p>unfoldingWord/data_tracking_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
            <text:p/>
          </table:table-cell>
          <table:table-cell office:value-type="string" office:string-value="unfoldingWord/data_tracking_wrangler">
            <text:p>unfoldingWord/data_tracking_wrang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
            <text:p/>
          </table:table-cell>
          <table:table-cell office:value-type="string" office:string-value="unfoldingWord/dbbackupr2">
            <text:p>unfoldingWord/dbbackupr2</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
            <text:p/>
          </table:table-cell>
          <table:table-cell office:value-type="string" office:string-value="unfoldingWord/dcs">
            <text:p>unfoldingWord/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
            <text:p/>
          </table:table-cell>
          <table:table-cell office:value-type="string" office:string-value="unfoldingWord/dcs-docs">
            <text:p>unfoldingWord/dcs-do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
            <text:p/>
          </table:table-cell>
          <table:table-cell office:value-type="string" office:string-value="unfoldingWord/dcs-homepage">
            <text:p>unfoldingWord/dcs-homepag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
            <text:p/>
          </table:table-cell>
          <table:table-cell office:value-type="string" office:string-value="unfoldingWord/dcs-local">
            <text:p>unfoldingWord/dcs-loc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07 downloads in the last year) and no detected local consumers.">
            <text:p>Package has low but nonzero npm usage (607 downloads in the last year) and no detected local consumers.</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unfoldingWord-dev/dcs-profile-unfoldingword-mirrored">
            <text:p>unfoldingWord-dev/dcs-profile-unfoldingword-mirrored</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unfoldingWord-dev/dokuwiki-enhancedindexer">
            <text:p>unfoldingWord-dev/dokuwiki-enhancedindexer</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unfoldingWord-dev/Dokuwiki-USFMTag">
            <text:p>unfoldingWord-dev/Dokuwiki-USFMTa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bible-reference-range', 'string-punctuation-tokenizer', 'word-aligner', 'word-aligner-lib', 'wordmap', 'wordmap-lexer', 'uw-tsv-parser', 'tsv-groupdata-parser', 'uw-bible-parser', 'tc-strings']">
            <text:p>['bible-reference-rcl', 'usfm-alignment-remover', 'usfm-js', 'uw-quote-helpers', 'word-aligner-rcl', 'bible-reference-range', 'string-punctuation-tokenizer', 'word-aligner', 'word-aligner-lib', 'wordmap', 'wordmap-lexer', 'uw-tsv-parser', 'tsv-groupdata-parser', 'uw-bible-parser', 'tc-strings']</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
            <text:p/>
          </table:table-cell>
          <table:table-cell office:value-type="string" office:string-value="unfoldingWord/door43.org">
            <text:p>unfoldingWord/door43.or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
            <text:p/>
          </table:table-cell>
          <table:table-cell office:value-type="string" office:string-value="unfoldingWord/download-link-tracker">
            <text:p>unfoldingWord/download-link-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unfoldingWord-dev/dw-gitcommit">
            <text:p>unfoldingWord-dev/dw-gitcommi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
            <text:p/>
          </table:table-cell>
          <table:table-cell office:value-type="string" office:string-value="unfoldingWord/dw_redirects">
            <text:p>unfoldingWord/dw_redirec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Ian Lindsley">
            <text:p>Ian Lindsley</text:p>
          </table:table-cell>
          <table:table-cell office:value-type="string" office:string-value="x">
            <text:p>x</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
            <text:p/>
          </table:table-cell>
          <table:table-cell office:value-type="string" office:string-value="unfoldingWord/en_obs_tf">
            <text:p>unfoldingWord/en_obs_tf</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
            <text:p/>
          </table:table-cell>
          <table:table-cell office:value-type="string" office:string-value="unfoldingWord-dev/exports">
            <text:p>unfoldingWord-dev/expor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
            <text:p/>
          </table:table-cell>
          <table:table-cell office:value-type="string" office:string-value="unfoldingWord/fia-kb">
            <text:p>unfoldingWord/fia-k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
            <text:p/>
          </table:table-cell>
          <table:table-cell office:value-type="string" office:string-value="unfoldingWord/fred-mcp">
            <text:p>unfoldingWord/fred-mc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
            <text:p/>
          </table:table-cell>
          <table:table-cell office:value-type="string" office:string-value="unfoldingWord/fred-zulip-bot">
            <text:p>unfoldingWord/fred-zulip-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
            <text:p/>
          </table:table-cell>
          <table:table-cell office:value-type="string" office:string-value="unfoldingWord/gateway-admin">
            <text:p>unfoldingWord/gateway-adm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
            <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1">
            <text:p>71</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wordmap-lexer', 'markdown-translatable', '@unfoldingword/eslint-config', 'bible-reference-range', 'tc-ui-toolkit', 'uw-quote-helpers', 'word-aligner', 'tsv-groupdata-parser', 'uw-bible-parser', 'uw-tsv-parser']">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
            <text:p/>
          </table:table-cell>
          <table:table-cell office:value-type="string" office:string-value="unfoldingWord/GWE-Tests">
            <text:p>unfoldingWord/GWE-Tes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
            <text:p/>
          </table:table-cell>
          <table:table-cell office:value-type="string" office:string-value="unfoldingWord-dev/hubot">
            <text:p>unfoldingWord-dev/hu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
            <text:p/>
          </table:table-cell>
          <table:table-cell office:value-type="string" office:string-value="unfoldingWord/inventoryst">
            <text:p>unfoldingWord/inventorys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
            <text:p/>
          </table:table-cell>
          <table:table-cell office:value-type="string" office:string-value="unfoldingWord/keybase_git_backup">
            <text:p>unfoldingWord/keybase_git_backu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
            <text:p/>
          </table:table-cell>
          <table:table-cell office:value-type="string" office:string-value="unfoldingWord/kr1-data-scripts">
            <text:p>unfoldingWord/kr1-data-scrip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
            <text:p/>
          </table:table-cell>
          <table:table-cell office:value-type="string" office:string-value="unfoldingWord/language-search">
            <text:p>unfoldingWord/language-search</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ohan de Joode">
            <text:p>Johan de Joode</text:p>
          </table:table-cell>
          <table:table-cell office:value-type="string" office:string-value="x">
            <text:p>x</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
            <text:p/>
          </table:table-cell>
          <table:table-cell office:value-type="string" office:string-value="unfoldingWord/loki-exporter">
            <text:p>unfoldingWord/loki-expor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
            <text:p/>
          </table:table-cell>
          <table:table-cell office:value-type="string" office:string-value="unfoldingWord-dev/media">
            <text:p>unfoldingWord-dev/med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
            <text:p/>
          </table:table-cell>
          <table:table-cell office:value-type="string" office:string-value="unfoldingWord/metrics">
            <text:p>unfoldingWord/metric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
            <text:p/>
          </table:table-cell>
          <table:table-cell office:value-type="string" office:string-value="unfoldingWord/minitracker">
            <text:p>unfoldingWord/mini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unfoldingWord-dev/nsmsg">
            <text:p>unfoldingWord-dev/nsms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
            <text:p/>
          </table:table-cell>
          <table:table-cell office:value-type="string" office:string-value="unfoldingWord/obs-app">
            <text:p>unfoldingWord/obs-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
            <text:p/>
          </table:table-cell>
          <table:table-cell office:value-type="string" office:string-value="unfoldingWord-dev/obs-data">
            <text:p>unfoldingWord-dev/obs-dat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x">
            <text:p>x</text:p>
          </table:table-cell>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
            <text:p/>
          </table:table-cell>
          <table:table-cell office:value-type="string" office:string-value="unfoldingWord/obs-web">
            <text:p>unfoldingWord/obs-we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
            <text:p/>
          </table:table-cell>
          <table:table-cell office:value-type="string" office:string-value="unfoldingWord/odd-claude-plugin">
            <text:p>unfoldingWord/odd-claude-plug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
            <text:p/>
          </table:table-cell>
          <table:table-cell office:value-type="string" office:string-value="unfoldingWord-dev/pages">
            <text:p>unfoldingWord-dev/pag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
            <text:p/>
          </table:table-cell>
          <table:table-cell office:value-type="string" office:string-value="unfoldingWord/rc-schema">
            <text:p>unfoldingWord/rc-schem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
            <text:p/>
          </table:table-cell>
          <table:table-cell office:value-type="string" office:string-value="unfoldingWord-dev/Resource-Container">
            <text:p>unfoldingWord-dev/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wordmap-lexer']">
            <text:p>['string-punctuation-tokenizer', 'tc-tool', 'usfm-js', 'wordmap-lexer']</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19-10-22T19:35:10Z">
            <text:p>2019-10-22T19:35:10Z</text:p>
          </table:table-cell>
          <table:table-cell office:value-type="string" office:string-value="">
            <text:p/>
          </table:table-cell>
          <table:table-cell office:value-type="string" office:string-value="unfoldingWord-dev/ScripturePane">
            <text:p>unfoldingWord-dev/ScripturePan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
            <text:p/>
          </table:table-cell>
          <table:table-cell office:value-type="string" office:string-value="unfoldingWord-dev/sigadd">
            <text:p>unfoldingWord-dev/sigad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3 downloads in the last year) and no detected local consumers.">
            <text:p>Package has low but nonzero npm usage (73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
            <text:p/>
          </table:table-cell>
          <table:table-cell office:value-type="string" office:string-value="unfoldingWord/td-legacy">
            <text:p>unfoldingWord/td-lega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git@git.door43.org:unfoldingWord-dev/tx-dev-dcs.git">
            <text:p>git@git.door43.org:unfoldingWord-dev/tx-dev-dcs.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
            <text:p/>
          </table:table-cell>
          <table:table-cell office:value-type="string" office:string-value="unfoldingWord-dev/tools">
            <text:p>unfoldingWord-dev/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uw-tsv-parser']">
            <text:p>['bible-reference-range', 'checking-tool-wrapper', 'gogs-client', 'selections', 'string-punctuation-tokenizer', 'tc-source-content-updater', 'tc-strings', 'tc-tool', 'tc-ui-toolkit', 'tsv-groupdata-parser', 'usfm-js', 'word-aligner', 'wordmap', 'wordmap-lexer', 'electronite', 'uw-tsv-parser']</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6">
            <text:p>13586</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unfoldingWord/translationNotes">
            <text:p>unfoldingWord/translationNote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16-08-15T16:29:38Z">
            <text:p>2016-08-15T16:29:38Z</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unfoldingWord/translationWords">
            <text:p>unfoldingWord/translationWord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1-Manual review">
            <text:p>1-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1-Manual review">
            <text:p>1-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1-Manual review">
            <text:p>1-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
            <text:p/>
          </table:table-cell>
          <table:table-cell office:value-type="string" office:string-value="unfoldingWord-dev/ts-stats">
            <text:p>unfoldingWord-dev/ts-sta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
            <text:p/>
          </table:table-cell>
          <table:table-cell office:value-type="string" office:string-value="unfoldingWord-dev/tx">
            <text:p>unfoldingWord-dev/t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
            <text:p/>
          </table:table-cell>
          <table:table-cell office:value-type="string" office:string-value="unfoldingWord/tx-dev">
            <text:p>unfoldingWord/tx-dev</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
            <text:p/>
          </table:table-cell>
          <table:table-cell office:value-type="string" office:string-value="unfoldingWord/tx-dev-dcs">
            <text:p>unfoldingWord/tx-dev-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1-Manual review">
            <text:p>1-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
            <text:p/>
          </table:table-cell>
          <table:table-cell office:value-type="string" office:string-value="unfoldingWord-dev/ugnt-app">
            <text:p>unfoldingWord-dev/ugnt-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1-Manual review">
            <text:p>1-Manual review</text:p>
          </table:table-cell>
          <table:table-cell office:value-type="string" office:string-value="Repository has significant release history or GitHub downloads (44 releases, 2302 downloads).">
            <text:p>Repository has significant release history or GitHub downloads (44 releases, 2302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
            <text:p/>
          </table:table-cell>
          <table:table-cell office:value-type="string" office:string-value="unfoldingWord-dev/uw-api">
            <text:p>unfoldingWord-dev/uw-api</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
            <text:p/>
          </table:table-cell>
          <table:table-cell office:value-type="string" office:string-value="unfoldingWord-dev/uw-ios">
            <text:p>unfoldingWord-dev/uw-io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string-punctuation-tokenizer', 'tc-strings']">
            <text:p>['gogs-client', 'selections', 'tc-tool', 'tc-ui-toolkit', 'usfm-js', 'word-aligner', 'wordmap', 'wordmap-lexer', 'string-punctuation-tokenizer', 'tc-strings']</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unfoldingWord/wordAlignment">
            <text:p>unfoldingWord/wordAlignmen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
            <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25">
            <text:p>225</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string-punctuation-tokenizer']">
            <text:p>['wordmap', 'wordmap-lexer', 'string-punctuation-tokeniz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25 downloads in the last year) and no detected local consumers.">
            <text:p>Package has low but nonzero npm usage (22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6">
            <text:p>116</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6 downloads in the last year) and no detected local consumers.">
            <text:p>Package has low but nonzero npm usage (116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
            <text:p/>
          </table:table-cell>
          <table:table-cell office:value-type="string" office:string-value="unfoldingWord-box3/admin-app-old">
            <text:p>unfoldingWord-box3/admin-app-ol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string-punctuation-tokenizer']">
            <text:p>['bible-reference-range', 'tc-ui-toolkit', 'usfm-js', 'word-aligner', 'wordmap-lexer', 'string-punctuation-tokeniz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
            <text:p/>
          </table:table-cell>
          <table:table-cell office:value-type="string" office:string-value="unfoldingWord-dev/alignment-transferer">
            <text:p>unfoldingWord-dev/alignment-transfer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3T18:25:41Z">
            <text:p>2026-06-03T18:25:41Z</text:p>
          </table:table-cell>
          <table:table-cell office:value-type="string" office:string-value="2026-06-03T18:25:34Z">
            <text:p>2026-06-03T18:25:3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03T18:25:59Z">
            <text:p>2026-06-03T18:25:59Z</text:p>
          </table:table-cell>
          <table:table-cell office:value-type="string" office:string-value="">
            <text:p/>
          </table:table-cell>
          <table:table-cell office:value-type="string" office:string-value="unfoldingWord/bt-servant-telegram-gateway">
            <text:p>unfoldingWord/bt-servant-telegram-gatew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wordmap-lexer']">
            <text:p>['bible-reference-range', 'string-punctuation-tokenizer', 'tc-source-content-updater', 'tsv-groupdata-parser', 'usfm-js', 'uw-tsv-parser', 'wordmap-lex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
            <text:p/>
          </table:table-cell>
          <table:table-cell office:value-type="string" office:string-value="checking-tool-rcl">
            <text:p>checking-tool-rcl</text:p>
          </table:table-cell>
          <table:table-cell office:value-type="string" office:string-value="False">
            <text:p>False</text:p>
          </table:table-cell>
          <table:table-cell office:value-type="string" office:string-value="5895">
            <text:p>5895</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895 downloads).">
            <text:p>Repository has GitHub dependents or at least 1,000 npm downloads in the last year (589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895 downloads in the last year).">
            <text:p>Package has detected local usage, GitHub dependents, or significant npm downloads (589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dcs-react-hooks">
            <text:p>dcs-react-hooks</text:p>
          </table:table-cell>
          <table:table-cell office:value-type="string" office:string-value="False">
            <text:p>False</text:p>
          </table:table-cell>
          <table:table-cell office:value-type="string" office:string-value="178">
            <text:p>178</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78 downloads).">
            <text:p>Repository has GitHub dependents or at least 1,000 npm downloads in the last year (17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8 downloads in the last year).">
            <text:p>Package has detected local usage, GitHub dependents, or significant npm downloads (17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0976">
            <text:p>20976</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
            <text:p>unfoldingWord/find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
            <text:p/>
          </table:table-cell>
          <table:table-cell office:value-type="string" office:string-value="unfoldingWord/go-rc2sb">
            <text:p>unfoldingWord/go-rc2s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door43-client">
            <text:p>door43-client</text:p>
          </table:table-cell>
          <table:table-cell office:value-type="string" office:string-value="False">
            <text:p>False</text:p>
          </table:table-cell>
          <table:table-cell office:value-type="string" office:string-value="1556">
            <text:p>1556</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56 downloads).">
            <text:p>Repository has GitHub dependents or at least 1,000 npm downloads in the last year (155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rc">
            <text:p>door43-rc</text:p>
          </table:table-cell>
          <table:table-cell office:value-type="string" office:string-value="True">
            <text:p>True</text:p>
          </table:table-cell>
          <table:table-cell office:value-type="string" office:string-value="1502">
            <text:p>1502</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02 downloads).">
            <text:p>Repository has GitHub dependents or at least 1,000 npm downloads in the last year (1502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
            <text:p/>
          </table:table-cell>
          <table:table-cell office:value-type="string" office:string-value="unfoldingWord/obt">
            <text:p>unfoldingWord/ob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
            <text:p>@oce-editor-tools/base</text:p>
          </table:table-cell>
          <table:table-cell office:value-type="string" office:string-value="">
            <text:p/>
          </table:table-cell>
          <table:table-cell office:value-type="string" office:string-value="1852">
            <text:p>1852</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852 downloads).">
            <text:p>Repository has GitHub dependents or at least 1,000 npm downloads in the last year (18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2 downloads in the last year).">
            <text:p>Package has detected local usage, GitHub dependents, or significant npm downloads (185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core">
            <text:p>@oce-editor-tools/joy-core</text:p>
          </table:table-cell>
          <table:table-cell office:value-type="string" office:string-value="">
            <text:p/>
          </table:table-cell>
          <table:table-cell office:value-type="string" office:string-value="407">
            <text:p>407</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07 downloads).">
            <text:p>Repository has GitHub dependents or at least 1,000 npm downloads in the last year (40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7 downloads in the last year).">
            <text:p>Package has detected local usage, GitHub dependents, or significant npm downloads (4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pk">
            <text:p>@oce-editor-tools/joy-pk</text:p>
          </table:table-cell>
          <table:table-cell office:value-type="string" office:string-value="">
            <text:p/>
          </table:table-cell>
          <table:table-cell office:value-type="string" office:string-value="131">
            <text:p>131</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31 downloads).">
            <text:p>Repository has GitHub dependents or at least 1,000 npm downloads in the last year (1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1 downloads in the last year).">
            <text:p>Package has detected local usage, GitHub dependents, or significant npm downloads (13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core">
            <text:p>@oce-editor-tools/mui-core</text:p>
          </table:table-cell>
          <table:table-cell office:value-type="string" office:string-value="">
            <text:p/>
          </table:table-cell>
          <table:table-cell office:value-type="string" office:string-value="645">
            <text:p>645</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45 downloads).">
            <text:p>Repository has GitHub dependents or at least 1,000 npm downloads in the last year (64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5 downloads in the last year).">
            <text:p>Package has detected local usage, GitHub dependents, or significant npm downloads (64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pk">
            <text:p>@oce-editor-tools/mui-pk</text:p>
          </table:table-cell>
          <table:table-cell office:value-type="string" office:string-value="">
            <text:p/>
          </table:table-cell>
          <table:table-cell office:value-type="string" office:string-value="337">
            <text:p>337</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37 downloads).">
            <text:p>Repository has GitHub dependents or at least 1,000 npm downloads in the last year (33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7 downloads in the last year).">
            <text:p>Package has detected local usage, GitHub dependents, or significant npm downloads (33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3">
            <text:p>373</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73 downloads).">
            <text:p>Repository has GitHub dependents or at least 1,000 npm downloads in the last year (3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3 downloads in the last year).">
            <text:p>Package has detected local usage, GitHub dependents, or significant npm downloads (3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8">
            <text:p>98</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8 downloads).">
            <text:p>Repository has GitHub dependents or at least 1,000 npm downloads in the last year (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8 downloads in the last year).">
            <text:p>Package has detected local usage, GitHub dependents, or significant npm downloads (9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16T19:51:50Z">
            <text:p>2026-06-16T19:51:50Z</text:p>
          </table:table-cell>
          <table:table-cell office:value-type="string" office:string-value="2026-06-16T19:51:46Z">
            <text:p>2026-06-16T19:51: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RepoList">
            <text:p>https://github.com/unfoldingWord-box3/RepoList</text:p>
          </table:table-cell>
          <table:table-cell office:value-type="string" office:string-value="2026-06-16T19:51:55Z">
            <text:p>2026-06-16T19:51:55Z</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
            <text:p/>
          </table:table-cell>
          <table:table-cell office:value-type="string" office:string-value="unfoldingWord-box3/tact">
            <text:p>unfoldingWord-box3/t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73 downloads).">
            <text:p>Repository has GitHub dependents or at least 1,000 npm downloads in the last year (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3 downloads in the last year).">
            <text:p>Package has detected local usage, GitHub dependents, or significant npm downloads (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6T05:40:18Z">
            <text:p>2026-06-06T05:40:18Z</text:p>
          </table:table-cell>
          <table:table-cell office:value-type="string" office:string-value="2026-05-05T16:33:43Z">
            <text:p>2026-05-05T16:33:43Z</text:p>
          </table:table-cell>
          <table:table-cell office:value-type="string" office:string-value="">
            <text:p/>
          </table:table-cell>
          <table:table-cell office:value-type="string" office:string-value="9">
            <text:p>9</text:p>
          </table:table-cell>
          <table:table-cell office:value-type="string" office:string-value="1">
            <text:p>1</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text:p>['klappy', 'azrasgdc',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
            <text:p/>
          </table:table-cell>
          <table:table-cell office:value-type="string" office:string-value="uw-editor">
            <text:p>uw-editor</text:p>
          </table:table-cell>
          <table:table-cell office:value-type="string" office:string-value="True">
            <text:p>True</text:p>
          </table:table-cell>
          <table:table-cell office:value-type="string" office:string-value="1183">
            <text:p>1183</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
            <text:p/>
          </table:table-cell>
          <table:table-cell office:value-type="string" office:string-value="unfoldingWord/uw-editor">
            <text:p>unfoldingWord/uw-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183 downloads).">
            <text:p>Repository has GitHub dependents or at least 1,000 npm downloads in the last year (1183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
            <text:p/>
          </table:table-cell>
          <table:table-cell office:value-type="string" office:string-value="unfoldingWord-dev/uw-web">
            <text:p>unfoldingWord-dev/uw-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712">
            <text:p>16712</text:p>
          </table:table-cell>
          <table:table-cell office:value-type="string" office:string-value="2023-12-07T19:15:35.590Z">
            <text:p>2023-12-07T19:15:35.590Z</text:p>
          </table:table-cell>
          <table:table-cell office:value-type="string" office:string-value="['checking-extension', 'alignment-playground', 'translationCore', 'enhanced-word-aligner-rcl', 'tc-create-app', 'word-aligner-rcl', 'word-aligner-lib', 'single-scripture-rcl', 'translation-helps-rcl', 'scripture-resources-rcl', 'uw-quote-helpers', 'tsv-groupdata-parser', 'checking-tool-rcl', 'bible-reference-rcl', 'scripture-tsv', 'uw-bible-parser']">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712 downloads in the last year).">
            <text:p>Package has detected local usage, GitHub dependents, or significant npm downloads (1671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35">
            <text:p>5135</text:p>
          </table:table-cell>
          <table:table-cell office:value-type="string" office:string-value="2024-06-04T12:40:10.075Z">
            <text:p>2024-06-04T12:40:10.075Z</text:p>
          </table:table-cell>
          <table:table-cell office:value-type="string" office:string-value="['bible-preview-app', 'gateway-edit', 'anchor-alignment-poc', 'create-app', 'greek-apparatus-app', 'door43-preview-app', 'bsa', 'scripture-tsv', 'gateway-translate', '@oce-editor-tools/joy-pk', '@oce-editor-tools/mui-pk']">
            <text:p>['bible-preview-app', 'gateway-edit', 'anchor-alignment-poc', 'create-app', 'greek-apparatus-app', 'door43-preview-app', 'bsa', 'scripture-tsv', 'gateway-translate',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35 downloads in the last year).">
            <text:p>Package has detected local usage, GitHub dependents, or significant npm downloads (513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
            <text:p/>
          </table:table-cell>
          <table:table-cell office:value-type="string" office:string-value="book-package-rcl">
            <text:p>book-package-rcl</text:p>
          </table:table-cell>
          <table:table-cell office:value-type="string" office:string-value="False">
            <text:p>False</text:p>
          </table:table-cell>
          <table:table-cell office:value-type="string" office:string-value="2255">
            <text:p>2255</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55 downloads in the last year).">
            <text:p>Package has detected local usage, GitHub dependents, or significant npm downloads (225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
            <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wordmap-lexer', 'tc-strings']">
            <text:p>['gogs-client', 'selections', 'string-punctuation-tokenizer', 'tc-tool', 'tc-ui-toolkit', 'usfm-js', 'word-aligner', 'wordmap-lexer', 'tc-strings']</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
            <text:p/>
          </table:table-cell>
          <table:table-cell office:value-type="string" office:string-value="unfoldingWord/checking-tool-wrapper">
            <text:p>unfoldingWord/checking-tool-wrapp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
            <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dcs-branch-merger">
            <text:p>dcs-branch-merger</text:p>
          </table:table-cell>
          <table:table-cell office:value-type="string" office:string-value="False">
            <text:p>False</text:p>
          </table:table-cell>
          <table:table-cell office:value-type="string" office:string-value="3615">
            <text:p>3615</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15 downloads in the last year).">
            <text:p>Package has detected local usage, GitHub dependents, or significant npm downloads (361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False">
            <text:p>False</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bible-preview-app', 'dcs-login', 'dcs-branch-merger', 'gateway-translate', 'dcs-react-hooks', 'dcs-js-example']">
            <text:p>['bible-preview-app', 'dcs-login', 'dcs-branch-merger', 'gateway-translate', 'dcs-react-hooks', 'dcs-js-example']</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
            <text:p/>
          </table:table-cell>
          <table:table-cell office:value-type="string" office:string-value="unfoldingWord/dcs-js">
            <text:p>unfoldingWord/dcs-j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7 downloads in the last year).">
            <text:p>Package has detected local usage, GitHub dependents, or significant npm downloads (6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ite">
            <text:p>electronite</text:p>
          </table:table-cell>
          <table:table-cell office:value-type="string" office:string-value="False">
            <text:p>False</text:p>
          </table:table-cell>
          <table:table-cell office:value-type="string" office:string-value="2609">
            <text:p>2609</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656">
            <text:p>24656</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string-punctuation-tokenizer', 'word-aligner', 'word-aligner-lib', 'wordmap', 'wordmap-lexer', 'uw-tsv-parser', 'tc-strings']">
            <text:p>['bible-reference-range', 'uw-wordmapbooster', '@unfoldingword/eslint-config', 'usfm-js', 'word-aligner-rcl', 'string-punctuation-tokenizer', 'word-aligner', 'word-aligner-lib', 'wordmap', 'wordmap-lexer', 'uw-tsv-parser', 'tc-strings']</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656 downloads in the last year).">
            <text:p>Package has detected local usage, GitHub dependents, or significant npm downloads (2465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
            <text:p/>
          </table:table-cell>
          <table:table-cell office:value-type="string" office:string-value="epitelete-html">
            <text:p>epitelete-html</text:p>
          </table:table-cell>
          <table:table-cell office:value-type="string" office:string-value="False">
            <text:p>False</text:p>
          </table:table-cell>
          <table:table-cell office:value-type="string" office:string-value="10010">
            <text:p>10010</text:p>
          </table:table-cell>
          <table:table-cell office:value-type="string" office:string-value="2023-07-16T00:28:17.570Z">
            <text:p>2023-07-16T00:28:17.570Z</text:p>
          </table:table-cell>
          <table:table-cell office:value-type="string" office:string-value="['beta-bibel-wiki', 'OCE Oak Edit', 'oce-oak-render', 'uw-editor', '@oce-editor-tools/base-core', '@oce-editor-tools/joy-core', '@oce-editor-tools/joy-pk', '@oce-editor-tools/mui-core', '@oce-editor-tools/mui-pk', '@oce-editor-tools/mui-simple', '@oce-editor-tools/pk-aligner']">
            <text:p>['beta-bibel-wiki', 'OCE Oak Edit', 'oce-oak-render', 'uw-editor',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10 downloads in the last year).">
            <text:p>Package has detected local usage, GitHub dependents, or significant npm downloads (1001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c-create-app', 'gitea-offline-poc', 'enhanced-word-aligner-rcl', 'gitea-react-toolkit', 'single-scripture-rcl', 'scripture-resources-rcl', 'datatable-translatable', 'markdown-translatable', 'dcs-react-hooks', 'resource-workspace-rcl']">
            <text:p>['simple-text-editor-rcl', 'tc-create-app', 'gitea-offline-poc', 'enhanced-word-aligner-rcl', 'gitea-react-toolkit', 'single-scripture-rcl', 'scripture-resources-rcl', 'datatable-translatable', 'markdown-translatable', 'dcs-react-hooks', 'resource-workspace-rcl']</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
            <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473">
            <text:p>17473</text:p>
          </table:table-cell>
          <table:table-cell office:value-type="string" office:string-value="2026-05-12T13:15:42.563Z">
            <text:p>2026-05-12T13:15:42.563Z</text:p>
          </table:table-cell>
          <table:table-cell office:value-type="string" office:string-value="['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473 downloads in the last year).">
            <text:p>Package has detected local usage, GitHub dependents, or significant npm downloads (174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50">
            <text:p>18050</text:p>
          </table:table-cell>
          <table:table-cell office:value-type="string" office:string-value="2023-03-07T15:00:29.476Z">
            <text:p>2023-03-07T15:00:29.476Z</text:p>
          </table:table-cell>
          <table:table-cell office:value-type="string" office:string-value="['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50 downloads in the last year).">
            <text:p>Package has detected local usage, GitHub dependents, or significant npm downloads (1805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gogs-client">
            <text:p>gogs-client</text:p>
          </table:table-cell>
          <table:table-cell office:value-type="string" office:string-value="False">
            <text:p>False</text:p>
          </table:table-cell>
          <table:table-cell office:value-type="string" office:string-value="6728">
            <text:p>6728</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50">
            <text:p>3150</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50 downloads in the last year).">
            <text:p>Package has detected local usage, GitHub dependents, or significant npm downloads (315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wl-generator">
            <text:p>twl-generator</text:p>
          </table:table-cell>
          <table:table-cell office:value-type="string" office:string-value="False">
            <text:p>False</text:p>
          </table:table-cell>
          <table:table-cell office:value-type="string" office:string-value="5594">
            <text:p>5594</text:p>
          </table:table-cell>
          <table:table-cell office:value-type="string" office:string-value="2026-06-16T10:00:58.589Z">
            <text:p>2026-06-16T10:00:58.589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594 downloads in the last year).">
            <text:p>Package has detected local usage, GitHub dependents, or significant npm downloads (559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803">
            <text:p>2803</text:p>
          </table:table-cell>
          <table:table-cell office:value-type="string" office:string-value="2023-06-13T13:51:03.803Z">
            <text:p>2023-06-13T13:51:03.803Z</text:p>
          </table:table-cell>
          <table:table-cell office:value-type="string" office:string-value="['next-js-template', 'gateway-edit', 'admin-app', 'create-app', 'gateway-admin', 'bsa', 'gateway-translate']">
            <text:p>['next-js-template', 'gateway-edit', 'admin-app', 'create-app', 'gateway-admin', 'bsa', 'gateway-translate']</text:p>
          </table:table-cell>
          <table:table-cell office:value-type="string" office:string-value="['@unfoldingword/eslint-config', 'gitea-react-toolkit', 'markdown-translatable', 'scripture-resources-rcl', 'translation-helps-rcl', 'bible-reference-range', 'dcs-branch-merger', 'tc-ui-toolkit', 'word-aligner', 'string-punctuation-tokenizer', 'usfm-js', 'wordmap-lexer', 'uw-quote-helpers', 'dcs-js', 'tsv-groupdata-parser', 'uw-bible-parser', 'uw-tsv-parser']">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03 downloads in the last year).">
            <text:p>Package has detected local usage, GitHub dependents, or significant npm downloads (280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
            <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5048">
            <text:p>15048</text:p>
          </table:table-cell>
          <table:table-cell office:value-type="string" office:string-value="2026-03-19T13:24:25.124Z">
            <text:p>2026-03-19T13:24:25.124Z</text:p>
          </table:table-cell>
          <table:table-cell office:value-type="string" office:string-value="['next-js-template', 'pdf-generator-rcl', 'tc-create-app', 'gateway-edit', 'create-app', 'greek-apparatus-app', 'book-package-viewer-poc', 'pdf-generator', 'gateway-admin', 'single-scripture-rcl', 'translation-helps-rcl', 'bsa', 'gateway-translate', 'resource-workspace-rcl', 'resource-checker']">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office:string-value="['bible-reference-range', 'gitea-react-toolkit', 'markdown-translatable', 'string-punctuation-tokenizer', 'tc-ui-toolkit', 'usfm-js', 'uw-quote-helpers', 'word-aligner', '@unfoldingword/eslint-config', 'wordmap-lexer', 'tsv-groupdata-parser', 'uw-bible-parser', 'uw-tsv-parser']">
            <text:p>['bible-reference-range', 'gitea-react-toolkit', 'markdown-translatable', 'string-punctuation-tokenizer', 'tc-ui-toolkit', 'usfm-js', 'uw-quote-helpers', 'word-aligner', '@unfoldingword/eslint-config', 'wordmap-lexer', 'tsv-groupdata-parser', 'uw-bible-parser', 'uw-tsv-parser']</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048 downloads in the last year).">
            <text:p>Package has detected local usage, GitHub dependents, or significant npm downloads (1504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scripture-tsv">
            <text:p>scripture-tsv</text:p>
          </table:table-cell>
          <table:table-cell office:value-type="string" office:string-value="False">
            <text:p>False</text:p>
          </table:table-cell>
          <table:table-cell office:value-type="string" office:string-value="2669">
            <text:p>2669</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9 downloads in the last year).">
            <text:p>Package has detected local usage, GitHub dependents, or significant npm downloads (266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
            <text:p/>
          </table:table-cell>
          <table:table-cell office:value-type="string" office:string-value="unfoldingWord/selections">
            <text:p>unfoldingWord/selection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912">
            <text:p>3912</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912 downloads in the last year).">
            <text:p>Package has detected local usage, GitHub dependents, or significant npm downloads (391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
            <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774">
            <text:p>9774</text:p>
          </table:table-cell>
          <table:table-cell office:value-type="string" office:string-value="2026-04-16T17:29:58.529Z">
            <text:p>2026-04-16T17:29:58.529Z</text:p>
          </table:table-cell>
          <table:table-cell office:value-type="string" office:string-value="['next-js-template', 'gateway-edit', 'create-app', 'gateway-admin']">
            <text:p>['next-js-template', 'gateway-edit', 'create-app', 'gateway-admin']</text:p>
          </table:table-cell>
          <table:table-cell office:value-type="string" office:string-value="['@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74 downloads in the last year).">
            <text:p>Package has detected local usage, GitHub dependents, or significant npm downloads (977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8082">
            <text:p>98082</text:p>
          </table:table-cell>
          <table:table-cell office:value-type="string" office:string-value="2021-08-25T21:55:46.406Z">
            <text:p>2021-08-25T21:55:46.406Z</text:p>
          </table:table-cell>
          <table:table-cell office:value-type="string" office:string-value="['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
            <text:p>['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777">
            <text:p>7777</text:p>
          </table:table-cell>
          <table:table-cell office:value-type="string" office:string-value="2025-10-28T18:16:22.466Z">
            <text:p>2025-10-28T18:16:22.466Z</text:p>
          </table:table-cell>
          <table:table-cell office:value-type="string" office:string-value="['checking-extension', 'pdf-generator', 'translationCore', 'checking-tool-rcl']">
            <text:p>['checking-extension', 'pdf-generator', 'translationCore', 'checking-tool-rcl']</text:p>
          </table:table-cell>
          <table:table-cell office:value-type="string" office:string-value="['string-punctuation-tokenizer', 'tsv-groupdata-parser', 'usfm-js', 'wordmap-lexer', 'bible-reference-range', 'uw-tsv-parser']">
            <text:p>['string-punctuation-tokenizer', 'tsv-groupdata-parser', 'usfm-js', 'wordmap-lexer', 'bible-reference-range', 'uw-tsv-parser']</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777 downloads in the last year).">
            <text:p>Package has detected local usage, GitHub dependents, or significant npm downloads (777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
            <text:p/>
          </table:table-cell>
          <table:table-cell office:value-type="string" office:string-value="unfoldingWord/tc-strings">
            <text:p>unfoldingWord/tc-string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wordAlignment', 'checking-tool-wrapper', 'VerseCheck', 'toolTemplate', 'ScripturePane']">
            <text:p>['translationCore', 'translationNotes', 'translationWords', 'wordAlignment', 'checking-tool-wrapper', 'VerseCheck', 'toolTemplate', 'ScripturePan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
            <text:p/>
          </table:table-cell>
          <table:table-cell office:value-type="string" office:string-value="unfoldingWord/tc-tool">
            <text:p>unfoldingWord/tc-too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
            <text:p/>
          </table:table-cell>
          <table:table-cell office:value-type="string" office:string-value="tc-ui-toolkit">
            <text:p>tc-ui-toolkit</text:p>
          </table:table-cell>
          <table:table-cell office:value-type="string" office:string-value="False">
            <text:p>False</text:p>
          </table:table-cell>
          <table:table-cell office:value-type="string" office:string-value="29502">
            <text:p>29502</text:p>
          </table:table-cell>
          <table:table-cell office:value-type="string" office:string-value="2024-12-31T18:53:34.752Z">
            <text:p>2024-12-31T18:53:34.752Z</text:p>
          </table:table-cell>
          <table:table-cell office:value-type="string" office:string-value="['alignment-playground', 'next-js-template', 'gateway-edit', 'translationCore', 'wordAlignment', 'gateway-admin', 'tc-create-app', 'single-scripture-rcl', 'translation-helps-rcl', 'scripture-resources-rcl', 'bsa', 'checking-tool-wrapper']">
            <text:p>['alignment-playground', 'next-js-template', 'gateway-edit', 'translationCore', 'wordAlignment', 'gateway-admin', 'tc-create-app', 'single-scripture-rcl', 'translation-helps-rcl', 'scripture-resources-rcl', 'bsa', 'checking-tool-wrapper']</text:p>
          </table:table-cell>
          <table:table-cell office:value-type="string" office:string-value="['string-punctuation-tokenizer', 'word-aligner', 'usfm-js', 'wordmap-lexer']">
            <text:p>['string-punctuation-tokenizer', 'word-aligner', 'usfm-js', 'wordmap-lexer']</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02 downloads in the last year).">
            <text:p>Package has detected local usage, GitHub dependents, or significant npm downloads (2950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
            <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5003">
            <text:p>15003</text:p>
          </table:table-cell>
          <table:table-cell office:value-type="string" office:string-value="2026-03-27T22:01:47.002Z">
            <text:p>2026-03-27T22:01:47.002Z</text:p>
          </table:table-cell>
          <table:table-cell office:value-type="string" office:string-value="['next-js-template', 'gateway-edit', 'admin-app', 'create-app', 'gateway-admin', 'single-scripture-rcl', 'bsa', 'gateway-translate', 'uw-editor', 'resource-workspace-rcl']">
            <text:p>['next-js-template', 'gateway-edit', 'admin-app', 'create-app', 'gateway-admin', 'single-scripture-rcl', 'bsa', 'gateway-translate', 'uw-editor', 'resource-workspace-rcl']</text:p>
          </table:table-cell>
          <table:table-cell office:value-type="string" office:string-value="['bible-reference-range', 'dcs-branch-merger', 'gitea-react-toolkit', 'markdown-translatable', 'scripture-resources-rcl', 'tc-ui-toolkit', 'word-aligner', 'string-punctuation-tokenizer', 'usfm-js', 'wordmap-lexer', '@unfoldingword/eslint-config', 'dcs-js', 'uw-quote-helpers', 'tsv-groupdata-parser', 'uw-bible-parser', 'uw-tsv-parser']">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003 downloads in the last year).">
            <text:p>Package has detected local usage, GitHub dependents, or significant npm downloads (1500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
            <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418">
            <text:p>6418</text:p>
          </table:table-cell>
          <table:table-cell office:value-type="string" office:string-value="2024-10-16T17:43:33.516Z">
            <text:p>2024-10-16T17:43:33.516Z</text:p>
          </table:table-cell>
          <table:table-cell office:value-type="string" office:string-value="['checking-extension', 'pdf-generator', 'translationCore', 'uw-quote-helpers', 'tc-source-content-updater', 'checking-tool-rcl']">
            <text:p>['checking-extension', 'pdf-generator', 'translationCore', 'uw-quote-helpers', 'tc-source-content-updater', 'checking-tool-rcl']</text:p>
          </table:table-cell>
          <table:table-cell office:value-type="string" office:string-value="['bible-reference-range', 'uw-tsv-parser', 'string-punctuation-tokenizer', 'wordmap-lexer']">
            <text:p>['bible-reference-range', 'uw-tsv-parser', 'string-punctuation-tokenizer', 'wordmap-lex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8 downloads in the last year).">
            <text:p>Package has detected local usage, GitHub dependents, or significant npm downloads (641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wordmap-lexer']">
            <text:p>['string-punctuation-tokenizer', 'wordmap-lex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
            <text:p>['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
            <text:p/>
          </table:table-cell>
          <table:table-cell office:value-type="string" office:string-value="unfoldingWord/usfm-js">
            <text:p>unfoldingWord/usfm-j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
            <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70">
            <text:p>2070</text:p>
          </table:table-cell>
          <table:table-cell office:value-type="string" office:string-value="2026-06-07T09:30:48.456Z">
            <text:p>2026-06-07T09:30:48.456Z</text:p>
          </table:table-cell>
          <table:table-cell office:value-type="string" office:string-value="['tc-create-app', 'content-validation-app', 'gateway-admin', 'catalog-next-toolkit']">
            <text:p>['tc-create-app', 'content-validation-app', 'gateway-admin', 'catalog-next-toolkit']</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70 downloads in the last year).">
            <text:p>Package has detected local usage, GitHub dependents, or significant npm downloads (207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
            <text:p/>
          </table:table-cell>
          <table:table-cell office:value-type="string" office:string-value="uw-languages-rcl">
            <text:p>uw-languages-rcl</text:p>
          </table:table-cell>
          <table:table-cell office:value-type="string" office:string-value="False">
            <text:p>False</text:p>
          </table:table-cell>
          <table:table-cell office:value-type="string" office:string-value="1220">
            <text:p>1220</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20 downloads in the last year).">
            <text:p>Package has detected local usage, GitHub dependents, or significant npm downloads (122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proskomma">
            <text:p>uw-proskomma</text:p>
          </table:table-cell>
          <table:table-cell office:value-type="string" office:string-value="False">
            <text:p>False</text:p>
          </table:table-cell>
          <table:table-cell office:value-type="string" office:string-value="2361">
            <text:p>2361</text:p>
          </table:table-cell>
          <table:table-cell office:value-type="string" office:string-value="2022-07-13T12:06:56.761Z">
            <text:p>2022-07-13T12:06:56.761Z</text:p>
          </table:table-cell>
          <table:table-cell office:value-type="string" office:string-value="['proskomma-scripture-resources-rcl', 'epitelete-html']">
            <text:p>['proskomma-scripture-resources-rcl', 'epitelete-htm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61 downloads in the last year).">
            <text:p>Package has detected local usage, GitHub dependents, or significant npm downloads (236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quote-helpers">
            <text:p>uw-quote-helpers</text:p>
          </table:table-cell>
          <table:table-cell office:value-type="string" office:string-value="False">
            <text:p>False</text:p>
          </table:table-cell>
          <table:table-cell office:value-type="string" office:string-value="3142">
            <text:p>3142</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wordmap-lexer', 'uw-tsv-parser']">
            <text:p>['bible-reference-range', 'string-punctuation-tokenizer', 'tsv-groupdata-parser', 'usfm-js', 'uw-bible-parser', 'wordmap-lexer', 'uw-tsv-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42 downloads in the last year).">
            <text:p>Package has detected local usage, GitHub dependents, or significant npm downloads (314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tsv-parser">
            <text:p>uw-tsv-parser</text:p>
          </table:table-cell>
          <table:table-cell office:value-type="string" office:string-value="False">
            <text:p>False</text:p>
          </table:table-cell>
          <table:table-cell office:value-type="string" office:string-value="4619">
            <text:p>4619</text:p>
          </table:table-cell>
          <table:table-cell office:value-type="string" office:string-value="2022-02-02T14:06:17.344Z">
            <text:p>2022-02-02T14:06:17.344Z</text:p>
          </table:table-cell>
          <table:table-cell office:value-type="string" office:string-value="['checking-extension', 'gateway-admin', 'tc-create-app', 'word-aligner-rcl', 'tsv-groupdata-parser', 'checking-tool-rcl']">
            <text:p>['checking-extension', 'gateway-admin', 'tc-create-app', 'word-aligner-rcl', 'tsv-groupdata-parser', 'checking-tool-rcl']</text:p>
          </table:table-cell>
          <table:table-cell office:value-type="string" office:string-value="">
            <text:p/>
          </table:table-cell>
          <table:table-cell office:value-type="string" office:string-value="">
            <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19 downloads in the last year).">
            <text:p>Package has detected local usage, GitHub dependents, or significant npm downloads (461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
            <text:p/>
          </table:table-cell>
          <table:table-cell office:value-type="string" office:string-value="uw-word-count">
            <text:p>uw-word-count</text:p>
          </table:table-cell>
          <table:table-cell office:value-type="string" office:string-value="False">
            <text:p>False</text:p>
          </table:table-cell>
          <table:table-cell office:value-type="string" office:string-value="365">
            <text:p>365</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5 downloads in the last year).">
            <text:p>Package has detected local usage, GitHub dependents, or significant npm downloads (36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
            <text:p>word-aligner</text:p>
          </table:table-cell>
          <table:table-cell office:value-type="string" office:string-value="False">
            <text:p>False</text:p>
          </table:table-cell>
          <table:table-cell office:value-type="string" office:string-value="44675">
            <text:p>44675</text:p>
          </table:table-cell>
          <table:table-cell office:value-type="string" office:string-value="2026-05-24T21:22:13.663Z">
            <text:p>2026-05-24T21:22:13.663Z</text:p>
          </table:table-cell>
          <table:table-cell office:value-type="string" office:string-value="['alignment-playground', 'next-js-template', 'gateway-edit', 'translationCore', 'wordAlignment', 'gateway-admin', 'tc-create-app', 'word-aligner-rcl', 'word-aligner-lib', 'single-scripture-rcl', 'translation-helps-rcl', 'scripture-resources-rcl', 'bsa', 'checking-tool-rcl', 'tc-ui-toolkit', 'checking-tool-wrapper']">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office:string-value="['string-punctuation-tokenizer', 'usfm-js', 'wordmap-lexer']">
            <text:p>['string-punctuation-tokenizer', 'usfm-js', 'wordmap-lexer']</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675 downloads in the last year).">
            <text:p>Package has detected local usage, GitHub dependents, or significant npm downloads (4467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lib">
            <text:p>word-aligner-lib</text:p>
          </table:table-cell>
          <table:table-cell office:value-type="string" office:string-value="False">
            <text:p>False</text:p>
          </table:table-cell>
          <table:table-cell office:value-type="string" office:string-value="4741">
            <text:p>4741</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741 downloads in the last year).">
            <text:p>Package has detected local usage, GitHub dependents, or significant npm downloads (474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
            <text:p/>
          </table:table-cell>
          <table:table-cell office:value-type="string" office:string-value="word-aligner-rcl">
            <text:p>word-aligner-rcl</text:p>
          </table:table-cell>
          <table:table-cell office:value-type="string" office:string-value="False">
            <text:p>False</text:p>
          </table:table-cell>
          <table:table-cell office:value-type="string" office:string-value="16522">
            <text:p>16522</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c-strings']">
            <text:p>['bible-reference-range', 'string-punctuation-tokenizer', 'usfm-js', 'word-aligner', 'word-aligner-lib', 'wordmap', 'wordmap-lexer', 'uw-tsv-parser', 'tc-strings']</text:p>
          </table:table-cell>
          <table:table-cell office:value-type="string" office:string-value="['unfoldingWord/word-aligner', 'unfoldingWord/single-scripture-rcl', 'unfoldingWord/gateway-edit', 'unfoldingWord/door43-preview-app', 'unfoldingWord-box3/word-aligner-extension', 'unfoldingWord/oce-editor-tools']">
            <text:p>['unfoldingWord/word-aligner', 'unfoldingWord/single-scripture-rcl', 'unfoldingWord/gateway-edit', 'unfoldingWord/door43-preview-app', 'unfoldingWord-box3/word-aligner-extension',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22 downloads in the last year).">
            <text:p>Package has detected local usage, GitHub dependents, or significant npm downloads (1652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
            <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wordmap-react-toolkit', 'translationCore', 'wordAlignment', 'word-aligner-rcl', 'uw-wordmapbooster']">
            <text:p>['wordmap-mt', 'wordmap-react-toolkit', 'translationCore', 'wordAlignment', 'word-aligner-rcl', 'uw-wordmapbooster']</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
            <text:p/>
          </table:table-cell>
          <table:table-cell office:value-type="string" office:string-value="unfoldingWord/wordMAP">
            <text:p>unfoldingWord/wordMAP</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alignment-playground', 'wordmap-react-toolkit', 'translationCore', 'wordAlignment', 'string-punctuation-tokenizer', 'word-aligner-rcl', 'word-aligner-lib', 'uw-wordmapbooster', 'checking-tool-rcl', 'wordmap', 'wordmap-usfm']">
            <text:p>['wordmap-mt', 'alignment-playground', 'wordmap-react-toolkit', 'translationCore', 'wordAlignment', 'string-punctuation-tokenizer', 'word-aligner-rcl', 'word-aligner-lib', 'uw-wordmapbooster', 'checking-tool-rcl', 'wordmap', 'wordmap-usfm']</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
            <text:p/>
          </table:table-cell>
          <table:table-cell office:value-type="string" office:string-value="unfoldingWord/avd-ar">
            <text:p>unfoldingWord/avd-a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esign">
            <text:p>unfoldingWord-dev/desig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
            <text:p/>
          </table:table-cell>
          <table:table-cell office:value-type="string" office:string-value="unfoldingWord-dev/Door43">
            <text:p>unfoldingWord-dev/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am">
            <text:p>unfoldingWord/obs-am</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bn">
            <text:p>unfoldingWord/obs-b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ceb">
            <text:p>unfoldingWord/obs-c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en">
            <text:p>unfoldingWord/obs-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es">
            <text:p>unfoldingWord/obs-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es-419">
            <text:p>unfoldingWord/obs-es-419</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fa">
            <text:p>unfoldingWord/obs-f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fr">
            <text:p>unfoldingWord/obs-f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gof">
            <text:p>unfoldingWord/obs-go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gu">
            <text:p>unfoldingWord/obs-g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ha">
            <text:p>unfoldingWord/obs-h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i">
            <text:p>unfoldingWord/obs-h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mr">
            <text:p>unfoldingWord/obs-h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hu">
            <text:p>unfoldingWord/obs-h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iOS">
            <text:p>unfoldingWord-dev/OBS-iO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lpx">
            <text:p>unfoldingWord/obs-lpx</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mr">
            <text:p>unfoldingWord/obs-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ne">
            <text:p>unfoldingWord/obs-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
            <text:p/>
          </table:table-cell>
          <table:table-cell office:value-type="string" office:string-value="unfoldingWord/obs-or">
            <text:p>unfoldingWord/obs-o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a">
            <text:p>unfoldingWord/obs-p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
            <text:p/>
          </table:table-cell>
          <table:table-cell office:value-type="string" office:string-value="unfoldingWord/obs-pdf">
            <text:p>unfoldingWord/obs-pd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t-br">
            <text:p>unfoldingWord/obs-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ru">
            <text:p>unfoldingWord/obs-r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
            <text:p/>
          </table:table-cell>
          <table:table-cell office:value-type="string" office:string-value="unfoldingWord/obs-sgj">
            <text:p>unfoldingWord/obs-sg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dj">
            <text:p>unfoldingWord/obs-td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l">
            <text:p>unfoldingWord/obs-t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pi">
            <text:p>unfoldingWord/obs-tp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r">
            <text:p>unfoldingWord/obs-t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ur">
            <text:p>unfoldingWord/obs-u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vi">
            <text:p>unfoldingWord/obs-v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
            <text:p/>
          </table:table-cell>
          <table:table-cell office:value-type="string" office:string-value="unfoldingWord-box3/td">
            <text:p>unfoldingWord-box3/t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
            <text:p/>
          </table:table-cell>
          <table:table-cell office:value-type="string" office:string-value="unfoldingWord/udb-en">
            <text:p>unfoldingWord/ud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
            <text:p/>
          </table:table-cell>
          <table:table-cell office:value-type="string" office:string-value="unfoldingWord/ulb-en">
            <text:p>unfoldingWord/ul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
            <text:p/>
          </table:table-cell>
          <table:table-cell office:value-type="string" office:string-value="unfoldingWord/ulb-pt-br">
            <text:p>unfoldingWord/ulb-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uwadmin">
            <text:p>unfoldingWord-dev/uwadmi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cell office:value-type="string" office:string-value="">
            <text:p/>
          </table:table-cell>
          <table:table-cell office:value-type="string" office:string-value="unfoldingWord/website">
            <text:p>unfoldingWord/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02T19:21:17Z">
            <text:p>2026-06-02T19:21:17Z</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6-17T14:39:48Z">
            <text:p>2026-06-17T14:39:48Z</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cell office:value-type="string" office:string-value="">
            <text:p/>
          </table:table-cell>
          <table:table-cell office:value-type="string" office:string-value="unfoldingWord/tc-website">
            <text:p>unfoldingWord/tc-websi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cell office:value-type="string" office:string-value="">
            <text:p/>
          </table:table-cell>
          <table:table-cell office:value-type="string" office:string-value="unfoldingWord/terraform">
            <text:p>unfoldingWord/terraform</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cell office:value-type="string" office:string-value="">
            <text:p/>
          </table:table-cell>
          <table:table-cell office:value-type="string" office:string-value="unfoldingWord/uw-zulip-mcp">
            <text:p>unfoldingWord/uw-zulip-mcp</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cell office:value-type="string" office:string-value="">
            <text:p/>
          </table:table-cell>
          <table:table-cell office:value-type="string" office:string-value="unfoldingWord/zulip-files">
            <text:p>unfoldingWord/zulip-fil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
      <table:named-expressions/>
      <table:database-ranges>
        <table:database-range table:name="__Anonymous_Sheet_DB__0" table:target-range-address="Repositories.A1:Repositories.AD546">
          <table:sort>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8">00/00/0000</text:date>, <text:time style:data-style-name="N2" text:time-value="08:35:00.70891497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8T08:36:40.370243174</dc:date>
    <meta:editing-duration>PT20H13M43S</meta:editing-duration>
    <meta:editing-cycles>16</meta:editing-cycles>
    <meta:document-statistic meta:table-count="1" meta:cell-count="17536" meta:object-count="0"/>
  </office:meta>
</office:document-meta>
</file>