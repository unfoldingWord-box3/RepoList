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756in"/>
    </style:style>
    <style:style style:name="co2" style:family="table-column">
      <style:table-column-properties fo:break-before="auto" style:column-width="1.6591in"/>
    </style:style>
    <style:style style:name="co3" style:family="table-column">
      <style:table-column-properties fo:break-before="auto" style:column-width="0.9736in"/>
    </style:style>
    <style:style style:name="co4" style:family="table-column">
      <style:table-column-properties fo:break-before="auto" style:column-width="0.8409in"/>
    </style:style>
    <style:style style:name="co5" style:family="table-column">
      <style:table-column-properties fo:break-before="auto" style:column-width="0.7319in"/>
    </style:style>
    <style:style style:name="co6" style:family="table-column">
      <style:table-column-properties fo:break-before="auto" style:column-width="1.7516in"/>
    </style:style>
    <style:style style:name="co7" style:family="table-column">
      <style:table-column-properties fo:break-before="auto" style:column-width="1.3362in"/>
    </style:style>
    <style:style style:name="co8" style:family="table-column">
      <style:table-column-properties fo:break-before="auto" style:column-width="1.1374in"/>
    </style:style>
    <style:style style:name="co9" style:family="table-column">
      <style:table-column-properties fo:break-before="auto" style:column-width="2.0283in"/>
    </style:style>
    <style:style style:name="co10" style:family="table-column">
      <style:table-column-properties fo:break-before="auto" style:column-width="0.889in"/>
    </style:style>
    <style:style style:name="co11" style:family="table-column">
      <style:table-column-properties fo:break-before="auto" style:column-width="1.0882in"/>
    </style:style>
    <style:style style:name="co12" style:family="table-column">
      <style:table-column-properties fo:break-before="auto" style:column-width="2.9783in"/>
    </style:style>
    <style:style style:name="co13" style:family="table-column">
      <style:table-column-properties fo:break-before="auto" style:column-width="1.8902in"/>
    </style:style>
    <style:style style:name="co14" style:family="table-column">
      <style:table-column-properties fo:break-before="auto" style:column-width="1.6028in"/>
    </style:style>
    <style:style style:name="co15" style:family="table-column">
      <style:table-column-properties fo:break-before="auto" style:column-width="3.6917in"/>
    </style:style>
    <style:style style:name="co16" style:family="table-column">
      <style:table-column-properties fo:break-before="auto" style:column-width="1.9in"/>
    </style:style>
    <style:style style:name="co17" style:family="table-column">
      <style:table-column-properties fo:break-before="auto" style:column-width="6.6409in"/>
    </style:style>
    <style:style style:name="co18" style:family="table-column">
      <style:table-column-properties fo:break-before="auto" style:column-width="2.4543in"/>
    </style:style>
    <style:style style:name="co19" style:family="table-column">
      <style:table-column-properties fo:break-before="auto" style:column-width="6.4035in"/>
    </style:style>
    <style:style style:name="ro1" style:family="table-row">
      <style:table-row-properties style:row-height="0.178in" fo:break-before="auto" style:use-optimal-row-height="true"/>
    </style:style>
    <style:style style:name="ro2" style:family="table-row">
      <style:table-row-properties style:row-height="0.7035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8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7" table:default-cell-style-name="ce3"/>
        <table:table-column table:style-name="co8" table:default-cell-style-name="ce3"/>
        <table:table-column table:style-name="co9" table:default-cell-style-name="Default"/>
        <table:table-column table:style-name="co10" table:number-columns-repeated="4" table:default-cell-style-name="Default"/>
        <table:table-column table:style-name="co11" table:default-cell-style-name="Default"/>
        <table:table-column table:style-name="co10" table:default-cell-style-name="Default"/>
        <table:table-column table:style-name="co12" table:default-cell-style-name="Default"/>
        <table:table-column table:style-name="co10" table:number-columns-repeated="2" table:default-cell-style-name="ce3"/>
        <table:table-column table:style-name="co13" table:default-cell-style-name="Default"/>
        <table:table-column table:style-name="co14" table:default-cell-style-name="ce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0" table:number-columns-repeated="16357" table:default-cell-style-name="Default"/>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unfoldingWord-box3/admin-app">
            <text:p>unfoldingWord-box3/admin-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unfoldingWord-box3/anchor-alignment-poc">
            <text:p>unfoldingWord-box3/anchor-alignment-poc</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unfoldingWord-box3/audio-obs-navigator">
            <text:p>unfoldingWord-box3/audio-obs-navigato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unfoldingWord-box3/audio-quiz">
            <text:p>unfoldingWord-box3/audio-qui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unfoldingWord-dev/Autographa">
            <text:p>unfoldingWord-dev/Autographa</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unfoldingWord/baruch">
            <text:p>unfoldingWord/baruch</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unfoldingWord-box3/beta-bibel-demo">
            <text:p>unfoldingWord-box3/beta-bibel-demo</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unfoldingWord-box3/bible-preview-app">
            <text:p>unfoldingWord-box3/bible-preview-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unfoldingWord-box3/book-package-viewer-poc">
            <text:p>unfoldingWord-box3/book-package-viewer-poc</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47:17Z">
            <text:p>2026-06-10T12:47:17Z</text:p>
          </table:table-cell>
          <table:table-cell office:value-type="string" office:string-value="2026-06-10T12:47:16Z">
            <text:p>2026-06-10T12:47: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0T12:47:23Z">
            <text:p>2026-06-10T12:47:23Z</text:p>
          </table:table-cell>
          <table:table-cell office:value-type="string" office:string-value="unfoldingWord/bp-assistant">
            <text:p>unfoldingWord/bp-assistant</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58:52Z">
            <text:p>2026-06-10T12:58:52Z</text:p>
          </table:table-cell>
          <table:table-cell office:value-type="string" office:string-value="2026-06-10T12:58:51Z">
            <text:p>2026-06-10T12:58:5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0T12:59:00Z">
            <text:p>2026-06-10T12:59:00Z</text:p>
          </table:table-cell>
          <table:table-cell office:value-type="string" office:string-value="unfoldingWord/bp-assistant-skills">
            <text:p>unfoldingWord/bp-assistant-skill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browser-app">
            <text:p>unfoldingWord-box3/checking-app-theia/browser-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CheckingApp">
            <text:p>unfoldingWord-box3/checking-app-theia/Checking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CheckingTool">
            <text:p>unfoldingWord-box3/checking-app-theia/CheckingTool</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startChecking">
            <text:p>unfoldingWord-box3/checking-app-theia/startChecking</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unfoldingWord-dev/checkingRubric_tool">
            <text:p>unfoldingWord-dev/checkingRubric_tool</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unfoldingWord-box3/codex-sb-handler">
            <text:p>unfoldingWord-box3/codex-sb-handl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unfoldingWord-dev/comment_box">
            <text:p>unfoldingWord-dev/comment_box</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unfoldingWord/dbbackupr2">
            <text:p>unfoldingWord/dbbackupr2</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unfoldingWord-box3/desktop-app-liminal">
            <text:p>unfoldingWord-box3/desktop-app-liminal</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unfoldingWord/fia-mcp">
            <text:p>unfoldingWord/fia-mc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unfoldingWord/fred-zulip-bot-worker">
            <text:p>unfoldingWord/fred-zulip-bot-work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unfoldingWord-box3/gitea-offline-poc">
            <text:p>unfoldingWord-box3/gitea-offline-poc</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unfoldingWord-box3/gutenberg-project">
            <text:p>unfoldingWord-box3/gutenberg-project</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unfoldingWord/keybase_git_backup">
            <text:p>unfoldingWord/keybase_git_backup</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unfoldingWord-box3/lang-as-graph">
            <text:p>unfoldingWord-box3/lang-as-graph</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unfoldingWord-box3/md-converter-app">
            <text:p>unfoldingWord-box3/md-converter-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unfoldingWord-box3/next-js-template">
            <text:p>unfoldingWord-box3/next-js-templat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unfoldingWord/node-cli-add-gl-quotes-to-tsv-files">
            <text:p>unfoldingWord/node-cli-add-gl-quotes-to-tsv-file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unfoldingWord-box3/obs-audio-navigation">
            <text:p>unfoldingWord-box3/obs-audio-navigation</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unfoldingWord-box3/obs-pdf-poc">
            <text:p>unfoldingWord-box3/obs-pdf-poc</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unfoldingWord-dev/obsidian-uw-rc-link-opener">
            <text:p>unfoldingWord-dev/obsidian-uw-rc-link-open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unfoldingWord/oce-oak-edit">
            <text:p>unfoldingWord/oce-oak-edit</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unfoldingWord/oce-oak-render">
            <text:p>unfoldingWord/oce-oak-ren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unfoldingWord-dev/old-tx-manager-lambda">
            <text:p>unfoldingWord-dev/old-tx-manager-lambda</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unfoldingWord/open-languages">
            <text:p>unfoldingWord/open-language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unfoldingWord-box3/passage-recorder-app">
            <text:p>unfoldingWord-box3/passage-recorder-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unfoldingWord-box3/pdf-generator">
            <text:p>unfoldingWord-box3/pdf-generato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unfoldingWord-box3/RecordVoice">
            <text:p>unfoldingWord-box3/RecordVoic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unfoldingWord-box3/sample-react-component-library">
            <text:p>unfoldingWord-box3/sample-react-component-library</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unfoldingWord-box3/simple-text-editor-app">
            <text:p>unfoldingWord-box3/simple-text-editor-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unfoldingWord-dev/t_pane">
            <text:p>unfoldingWord-dev/t_pan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
            <text:p>unfoldingWord/tc-study</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che-adapter-indexeddb">
            <text:p>unfoldingWord/tc-study/@bt-synergy/cache-adapter-indexeddb</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che-adapter-memory">
            <text:p>unfoldingWord/tc-study/@bt-synergy/cache-adapter-memory</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che-adapter-sqlite">
            <text:p>unfoldingWord/tc-study/@bt-synergy/cache-adapter-sqlit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linked-panels">
            <text:p>unfoldingWord/tc-study/@bt-synergy/linked-panel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mobile">
            <text:p>unfoldingWord/tc-study/@bt-synergy/mobil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navigation">
            <text:p>unfoldingWord/tc-study/@bt-synergy/navigation</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builder">
            <text:p>unfoldingWord/tc-study/@bt-synergy/package-buil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builder-engine">
            <text:p>unfoldingWord/tc-study/@bt-synergy/package-builder-engin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core">
            <text:p>unfoldingWord/tc-study/@bt-synergy/package-creator-cor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state">
            <text:p>unfoldingWord/tc-study/@bt-synergy/package-creator-stat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web">
            <text:p>unfoldingWord/tc-study/@bt-synergy/package-creator-web</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workflow">
            <text:p>unfoldingWord/tc-study/@bt-synergy/package-creator-workflow</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storage">
            <text:p>unfoldingWord/tc-study/@bt-synergy/package-storag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ssage-sets">
            <text:p>unfoldingWord/tc-study/@bt-synergy/passage-set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ssage-sets-cli">
            <text:p>unfoldingWord/tc-study/@bt-synergy/passage-sets-cli</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hared">
            <text:p>unfoldingWord/tc-study/@bt-synergy/shared</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tudy-store">
            <text:p>unfoldingWord/tc-study/@bt-synergy/study-stor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oc-generator-cli">
            <text:p>unfoldingWord/tc-study/@bt-synergy/toc-generator-cli</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academy-loader">
            <text:p>unfoldingWord/tc-study/@bt-synergy/translation-academy-loa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notes-loader">
            <text:p>unfoldingWord/tc-study/@bt-synergy/translation-notes-loa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questions-loader">
            <text:p>unfoldingWord/tc-study/@bt-synergy/translation-questions-loa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words-links-loader">
            <text:p>unfoldingWord/tc-study/@bt-synergy/translation-words-links-loa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words-loader">
            <text:p>unfoldingWord/tc-study/@bt-synergy/translation-words-load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ui-controls">
            <text:p>unfoldingWord/tc-study/@bt-synergy/ui-control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usfm-processor">
            <text:p>unfoldingWord/tc-study/@bt-synergy/usfm-processo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ible-web">
            <text:p>unfoldingWord/tc-study/bible-web</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linked-panels-spike">
            <text:p>unfoldingWord/tc-study/linked-panels-spik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tc-study">
            <text:p>unfoldingWord/tc-study/tc-study</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toc-generator-web">
            <text:p>unfoldingWord/tc-study/toc-generator-web</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unfoldingWord/tc-tsv-converter">
            <text:p>unfoldingWord/tc-tsv-convert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unfoldingWord/td-legacy">
            <text:p>unfoldingWord/td-legacy</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browser-app">
            <text:p>unfoldingWord-box3/theia-examples/browser-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electron-app">
            <text:p>unfoldingWord-box3/theia-examples/electron-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empty">
            <text:p>unfoldingWord-box3/theia-examples/empty</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unfoldingWord-dev/toolTemplate">
            <text:p>unfoldingWord-dev/toolTemplate</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unfoldingWord-box3/tq-app">
            <text:p>unfoldingWord-box3/tq-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unfoldingWord-box3/translate-markdown-poc">
            <text:p>unfoldingWord-box3/translate-markdown-poc</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unfoldingWord-box3/translation-helps">
            <text:p>unfoldingWord-box3/translation-help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unfoldingWord-box3/translation-manager-poc">
            <text:p>unfoldingWord-box3/translation-manager-poc</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unfoldingWord-box3/translation-process">
            <text:p>unfoldingWord-box3/translation-proces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unfoldingWord-box3/tsv-editor">
            <text:p>unfoldingWord-box3/tsv-edito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20:04:13Z">
            <text:p>2026-06-05T20:04:13Z</text:p>
          </table:table-cell>
          <table:table-cell office:value-type="string" office:string-value="2026-06-05T20:04:11Z">
            <text:p>2026-06-05T20:04:1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05T20:04:17Z">
            <text:p>2026-06-05T20:04:17Z</text:p>
          </table:table-cell>
          <table:table-cell office:value-type="string" office:string-value="unfoldingWord/tsv-twl-creation-app">
            <text:p>unfoldingWord/tsv-twl-creation-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unfoldingWord/tsv7-tn-cleanup-app">
            <text:p>unfoldingWord/tsv7-tn-cleanup-app</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unfoldingWord/unfoldingWord">
            <text:p>unfoldingWord/unfoldingWord</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unfoldingWord/usfm-js-wrapper">
            <text:p>unfoldingWord/usfm-js-wrapper</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unfoldingWord-box3/uw-metadata-react-component-library">
            <text:p>unfoldingWord-box3/uw-metadata-react-component-library</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unfoldingWord/uw-pdf-preview">
            <text:p>unfoldingWord/uw-pdf-preview</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unfoldingWord-box3/word-aligner-extension">
            <text:p>unfoldingWord-box3/word-aligner-extension</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unfoldingWord-box3/wordMAP-mt">
            <text:p>unfoldingWord-box3/wordMAP-mt</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unfoldingWord/wordMAP-usfm">
            <text:p>unfoldingWord/wordMAP-usfm</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unfoldingWord-box3/admin-app-old">
            <text:p>unfoldingWord-box3/admin-app-old</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unfoldingWord-box3/alignment-ml">
            <text:p>unfoldingWord-box3/alignment-ml</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unfoldingWord-box3/alignment-playground">
            <text:p>unfoldingWord-box3/alignment-playground</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unfoldingWord-dev/alignment-transferer">
            <text:p>unfoldingWord-dev/alignment-transfer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unfoldingWord-box3/bible-ref-pk-demo">
            <text:p>unfoldingWord-box3/bible-ref-pk-demo</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unfoldingWord-dev/Bootstrap43">
            <text:p>unfoldingWord-dev/Bootstrap43</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unfoldingWord/bt-servant-telegram-gateway">
            <text:p>unfoldingWord/bt-servant-telegram-gateway</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unfoldingWord-box3/checking-extension">
            <text:p>unfoldingWord-box3/checking-extensio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8">
            <text:p>5898</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unfoldingWord/checking-tool-rcl">
            <text:p>unfoldingWord/checking-tool-rcl</text:p>
          </table:table-cell>
          <table:table-cell office:value-type="string" office:string-value="Keep - externally used">
            <text:p>Keep - externally used</text:p>
          </table:table-cell>
          <table:table-cell office:value-type="string" office:string-value="Repository has GitHub dependents or at least 1,000 npm downloads in the last year (5898 downloads).">
            <text:p>Repository has GitHub dependents or at least 1,000 npm downloads in the last year (58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8 downloads in the last year).">
            <text:p>Package has detected local usage, GitHub dependents, or significant npm downloads (5898 downloads in the last year).</text:p>
          </table:table-cell>
        </table:table-row>
        <table:table-row>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unfoldingWord-dev/concourse-pipeline">
            <text:p>unfoldingWord-dev/concourse-pipelin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unfoldingWord-dev/dcs-migrate-org-repos">
            <text:p>unfoldingWord-dev/dcs-migrate-org-repo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dcs-react-hooks">
            <text:p>dcs-react-hooks</text:p>
          </table:table-cell>
          <table:table-cell office:value-type="string" office:string-value="False">
            <text:p>False</text:p>
          </table:table-cell>
          <table:table-cell office:value-type="string" office:string-value="179">
            <text:p>179</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unfoldingWord/dcs-react-hooks">
            <text:p>unfoldingWord/dcs-react-hook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79 downloads).">
            <text:p>Repository has GitHub dependents or at least 1,000 npm downloads in the last year (17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9 downloads in the last year).">
            <text:p>Package has detected local usage, GitHub dependents, or significant npm downloads (179 downloads in the last year).</text:p>
          </table:table-cell>
        </table:table-row>
        <table:table-row>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unfoldingWord-box3/desktop-app-template">
            <text:p>unfoldingWord-box3/desktop-app-templat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unfoldingWord-dev/dokuwiki-plugin-translation">
            <text:p>unfoldingWord-dev/dokuwiki-plugin-translatio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unfoldingWord/door43-enqueue-job">
            <text:p>unfoldingWord/door43-enqueue-job</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unfoldingWord/door43-enqueue-job-test">
            <text:p>unfoldingWord/door43-enqueue-job-tes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unfoldingWord/door43-library">
            <text:p>unfoldingWord/door43-library</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unfoldingWord/door43-preview-server">
            <text:p>unfoldingWord/door43-preview-serv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unfoldingWord-dev/door43-project-pages">
            <text:p>unfoldingWord-dev/door43-project-page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unfoldingWord-box3/electron">
            <text:p>unfoldingWord-box3/electro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unfoldingWord/electronite">
            <text:p>unfoldingWord/electronit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unfoldingWord-dev/electronite-builder">
            <text:p>unfoldingWord-dev/electronite-build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unfoldingWord/electronite-forge">
            <text:p>unfoldingWord/electronite-forg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unfoldingWord-dev/electronite-packager">
            <text:p>unfoldingWord-dev/electronite-packag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unfoldingWord-dev/etherpad-lite">
            <text:p>unfoldingWord-dev/etherpad-lit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
            <text:p>unfoldingWord/find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mui">
            <text:p>unfoldingWord/findr/@findr/mui</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perf">
            <text:p>unfoldingWord/findr/@findr/perf</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react">
            <text:p>unfoldingWord/findr/@findr/reac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text">
            <text:p>unfoldingWord/findr/@findr/tex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unfoldingWord-dev/flask-github-webhook">
            <text:p>unfoldingWord-dev/flask-github-webhook</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unfoldingWord-dev/go-gogs-client">
            <text:p>unfoldingWord-dev/go-gogs-clien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unfoldingWord/go-rc2sb">
            <text:p>unfoldingWord/go-rc2sb</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unfoldingWord-dev/hackathon-zpp">
            <text:p>unfoldingWord-dev/hackathon-zpp</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unfoldingWord-dev/HebrewLexicon">
            <text:p>unfoldingWord-dev/HebrewLexico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unfoldingWord-dev/Mobile-JWiki">
            <text:p>unfoldingWord-dev/Mobile-JWiki</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unfoldingWord-dev/node-door43-client">
            <text:p>unfoldingWord-dev/node-door43-clien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1504">
            <text:p>1504</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unfoldingWord-dev/node-door43-rc">
            <text:p>unfoldingWord-dev/node-door43-rc</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504 downloads).">
            <text:p>Repository has GitHub dependents or at least 1,000 npm downloads in the last year (1504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unfoldingWord-dev/nototools">
            <text:p>unfoldingWord-dev/nototool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unfoldingWord-dev/OBS-Mobile">
            <text:p>unfoldingWord-dev/OBS-Mobil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unfoldingWord-box3/obs-study">
            <text:p>unfoldingWord-box3/obs-study</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unfoldingWord/obt">
            <text:p>unfoldingWord/ob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
            <text:p>unfoldingWord/oce-editor-tool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base">
            <text:p>unfoldingWord/oce-editor-tools/@oce-editor-tools/bas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base-core">
            <text:p>unfoldingWord/oce-editor-tools/@oce-editor-tools/base-cor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405">
            <text:p>405</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joy-core">
            <text:p>unfoldingWord/oce-editor-tools/@oce-editor-tools/joy-cor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405 downloads).">
            <text:p>Repository has GitHub dependents or at least 1,000 npm downloads in the last year (40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5 downloads in the last year).">
            <text:p>Package has detected local usage, GitHub dependents, or significant npm downloads (405 downloads in the last year).</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29">
            <text:p>129</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joy-pk">
            <text:p>unfoldingWord/oce-editor-tools/@oce-editor-tools/joy-pk</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29 downloads).">
            <text:p>Repository has GitHub dependents or at least 1,000 npm downloads in the last year (12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9 downloads in the last year).">
            <text:p>Package has detected local usage, GitHub dependents, or significant npm downloads (129 downloads in the last year).</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joy-verse-navigator">
            <text:p>unfoldingWord/oce-editor-tools/@oce-editor-tools/joy-verse-navigato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641">
            <text:p>641</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core">
            <text:p>unfoldingWord/oce-editor-tools/@oce-editor-tools/mui-cor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641 downloads).">
            <text:p>Repository has GitHub dependents or at least 1,000 npm downloads in the last year (64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 downloads in the last year).">
            <text:p>Package has detected local usage, GitHub dependents, or significant npm downloads (641 downloads in the last year).</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335">
            <text:p>335</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pk">
            <text:p>unfoldingWord/oce-editor-tools/@oce-editor-tools/mui-pk</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35 downloads).">
            <text:p>Repository has GitHub dependents or at least 1,000 npm downloads in the last year (33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5 downloads in the last year).">
            <text:p>Package has detected local usage, GitHub dependents, or significant npm downloads (335 downloads in the last year).</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1">
            <text:p>37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simple">
            <text:p>unfoldingWord/oce-editor-tools/@oce-editor-tools/mui-simpl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71 downloads).">
            <text:p>Repository has GitHub dependents or at least 1,000 npm downloads in the last year (3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1 downloads in the last year).">
            <text:p>Package has detected local usage, GitHub dependents, or significant npm downloads (371 downloads in the last year).</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verse-navigator">
            <text:p>unfoldingWord/oce-editor-tools/@oce-editor-tools/mui-verse-navigato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pk-aligner">
            <text:p>unfoldingWord/oce-editor-tools/@oce-editor-tools/pk-align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6">
            <text:p>96</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verse-mapper">
            <text:p>unfoldingWord/oce-editor-tools/@oce-editor-tools/verse-mapp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96 downloads).">
            <text:p>Repository has GitHub dependents or at least 1,000 npm downloads in the last year (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 downloads in the last year).">
            <text:p>Package has detected local usage, GitHub dependents, or significant npm downloads (96 downloads in the last year).</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unfoldingWord/open-components-hackathon-website">
            <text:p>unfoldingWord/open-components-hackathon-website</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unfoldingWord-dev/pagequery">
            <text:p>unfoldingWord-dev/pagequery</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unfoldingWord-box3/pankosmia-web">
            <text:p>unfoldingWord-box3/pankosmia-web</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unfoldingWord/proskomma-react-hooks">
            <text:p>unfoldingWord/proskomma-react-hook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unfoldingWord-dev/proskomma-render-preview">
            <text:p>unfoldingWord-dev/proskomma-render-preview</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unfoldingWord/python-dcs-api-client">
            <text:p>unfoldingWord/python-dcs-api-clien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unfoldingWord/python-dcs-catalog-client">
            <text:p>unfoldingWord/python-dcs-catalog-clien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unfoldingWord-box3/react-library-starter">
            <text:p>unfoldingWord-box3/react-library-start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unfoldingWord-box3/react-to-electron-action">
            <text:p>unfoldingWord-box3/react-to-electron-actio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unfoldingWord-dev/ResourceChecker">
            <text:p>unfoldingWord-dev/ResourceCheck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unfoldingWord-box3/StableTTS_Editing">
            <text:p>unfoldingWord-box3/StableTTS_Editing</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unfoldingWord-box3/suggesting-word-aligner">
            <text:p>unfoldingWord-box3/suggesting-word-align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unfoldingWord/t-core-submodule-updater">
            <text:p>unfoldingWord/t-core-submodule-update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unfoldingWord-box3/tact">
            <text:p>unfoldingWord-box3/tac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unfoldingWord-box3/tc-create-poc">
            <text:p>unfoldingWord-box3/tc-create-poc</text:p>
          </table:table-cell>
          <table:table-cell office:value-type="string" office:string-value="Keep - externally used">
            <text:p>Keep - externally used</text:p>
          </table:table-cell>
          <table:table-cell office:value-type="string" office:string-value="Repository has GitHub dependents or at least 1,000 npm downloads in the last year (74 downloads).">
            <text:p>Repository has GitHub dependents or at least 1,000 npm downloads in the last year (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4 downloads in the last year).">
            <text:p>Package has detected local usage, GitHub dependents, or significant npm downloads (74 downloads in the last year).</text:p>
          </table:table-cell>
        </table:table-row>
        <table:table-row>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unfoldingWord/tc-electron-env">
            <text:p>unfoldingWord/tc-electron-env</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unfoldingWord/translation-helps-mcp">
            <text:p>unfoldingWord/translation-helps-mcp</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unfoldingWord-box3/translation-notes-extension">
            <text:p>unfoldingWord-box3/translation-notes-extensio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unfoldingWord-box3/translation-project">
            <text:p>unfoldingWord-box3/translation-projec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unfoldingWord-dev/USFM-Tools">
            <text:p>unfoldingWord-dev/USFM-Tools</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unfoldingWord-box3/uw-codex-editor">
            <text:p>unfoldingWord-box3/uw-codex-edito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uw-editor">
            <text:p>uw-editor</text:p>
          </table:table-cell>
          <table:table-cell office:value-type="string" office:string-value="True">
            <text:p>True</text:p>
          </table:table-cell>
          <table:table-cell office:value-type="string" office:string-value="1163">
            <text:p>116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unfoldingWord/uw-editor">
            <text:p>unfoldingWord/uw-editor</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163 downloads).">
            <text:p>Repository has GitHub dependents or at least 1,000 npm downloads in the last year (116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unfoldingWord-dev/uw-web">
            <text:p>unfoldingWord-dev/uw-web</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unfoldingWord-box3/VscOceUsfmEdit">
            <text:p>unfoldingWord-box3/VscOceUsfmEdi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unfoldingWord-box3/vscode-speech-to-text">
            <text:p>unfoldingWord-box3/vscode-speech-to-text</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unfoldingWord-box3/VscUsfmEditAlign">
            <text:p>unfoldingWord-box3/VscUsfmEditAlign</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unfoldingWord-dev/webhook-relay">
            <text:p>unfoldingWord-dev/webhook-relay</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unfoldingWord-box3/alignment-editor-rcl">
            <text:p>unfoldingWord-box3/alignment-editor-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574">
            <text:p>16574</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unfoldingWord/bible-reference-range">
            <text:p>unfoldingWord/bible-reference-range</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74 downloads in the last year).">
            <text:p>Package has detected local usage, GitHub dependents, or significant npm downloads (16574 downloads in the last year).</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42">
            <text:p>5142</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unfoldingWord/bible-reference-rcl">
            <text:p>unfoldingWord/bible-reference-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2 downloads in the last year).">
            <text:p>Package has detected local usage, GitHub dependents, or significant npm downloads (5142 downloads in the last year).</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unfoldingWord/book-package-rcl">
            <text:p>unfoldingWord/book-package-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unfoldingWord/checking-tool-wrapper">
            <text:p>unfoldingWord/checking-tool-wrapp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unfoldingWord/datatable-translatable">
            <text:p>unfoldingWord/datatable-translatable</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4">
            <text:p>3614</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unfoldingWord/dcs-branch-merger">
            <text:p>unfoldingWord/dcs-branch-merg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4 downloads in the last year).">
            <text:p>Package has detected local usage, GitHub dependents, or significant npm downloads (3614 downloads in the last year).</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unfoldingWord/dcs-js">
            <text:p>unfoldingWord/dcs-js</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electronite">
            <text:p>electronite</text:p>
          </table:table-cell>
          <table:table-cell office:value-type="string" office:string-value="False">
            <text:p>False</text:p>
          </table:table-cell>
          <table:table-cell office:value-type="string" office:string-value="2608">
            <text:p>2608</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unfoldingWord-dev/electronite-cli">
            <text:p>unfoldingWord-dev/electronite-cli</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2">
            <text:p>24652</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unfoldingWord/enhanced-word-aligner-rcl">
            <text:p>unfoldingWord/enhanced-word-aligner-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2 downloads in the last year).">
            <text:p>Package has detected local usage, GitHub dependents, or significant npm downloads (24652 downloads in the last year).</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epitelete-html">
            <text:p>epitelete-html</text:p>
          </table:table-cell>
          <table:table-cell office:value-type="string" office:string-value="False">
            <text:p>False</text:p>
          </table:table-cell>
          <table:table-cell office:value-type="string" office:string-value="9613">
            <text:p>9613</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unfoldingWord/epitelete-html">
            <text:p>unfoldingWord/epitelete-htm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13 downloads in the last year).">
            <text:p>Package has detected local usage, GitHub dependents, or significant npm downloads (9613 downloads in the last year).</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unfoldingWord/eslint-config">
            <text:p>unfoldingWord/eslint-config</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68">
            <text:p>17468</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unfoldingWord/gitea-react-toolkit">
            <text:p>unfoldingWord/gitea-react-toolkit</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68 downloads in the last year).">
            <text:p>Package has detected local usage, GitHub dependents, or significant npm downloads (17468 downloads in the last year).</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unfoldingWord/markdown-translatable">
            <text:p>unfoldingWord/markdown-translatable</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726">
            <text:p>6726</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unfoldingWord-dev/node-gogs-client">
            <text:p>unfoldingWord-dev/node-gogs-client</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07">
            <text:p>3107</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unfoldingWord-dev/node-resource-container">
            <text:p>unfoldingWord-dev/node-resource-contain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07 downloads in the last year).">
            <text:p>Package has detected local usage, GitHub dependents, or significant npm downloads (3107 downloads in the last year).</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53:21Z">
            <text:p>2026-06-05T07:53:21Z</text:p>
          </table:table-cell>
          <table:table-cell office:value-type="string" office:string-value="2026-06-05T07:53:19Z">
            <text:p>2026-06-05T07:53: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434">
            <text:p>5434</text:p>
          </table:table-cell>
          <table:table-cell office:value-type="string" office:string-value="2026-06-05T07:54:21.337Z">
            <text:p>2026-06-05T07:54:21.337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05T07:53:25Z">
            <text:p>2026-06-05T07:53:25Z</text:p>
          </table:table-cell>
          <table:table-cell office:value-type="string" office:string-value="unfoldingWord/node-twl-generator">
            <text:p>unfoldingWord/node-twl-generato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434 downloads in the last year).">
            <text:p>Package has detected local usage, GitHub dependents, or significant npm downloads (5434 downloads in the last year).</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783">
            <text:p>278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unfoldingWord/resource-workspace-rcl">
            <text:p>unfoldingWord/resource-workspace-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783 downloads in the last year).">
            <text:p>Package has detected local usage, GitHub dependents, or significant npm downloads (2783 downloads in the last year).</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217">
            <text:p>15217</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unfoldingWord/scripture-resources-rcl">
            <text:p>unfoldingWord/scripture-resources-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217 downloads in the last year).">
            <text:p>Package has detected local usage, GitHub dependents, or significant npm downloads (15217 downloads in the last year).</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scripture-tsv">
            <text:p>scripture-tsv</text:p>
          </table:table-cell>
          <table:table-cell office:value-type="string" office:string-value="False">
            <text:p>False</text:p>
          </table:table-cell>
          <table:table-cell office:value-type="string" office:string-value="2648">
            <text:p>2648</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unfoldingWord/scripture-tsv">
            <text:p>unfoldingWord/scripture-tsv</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48 downloads in the last year).">
            <text:p>Package has detected local usage, GitHub dependents, or significant npm downloads (2648 downloads in the last year).</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unfoldingWord/selections">
            <text:p>unfoldingWord/selections</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96">
            <text:p>3896</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unfoldingWord-box3/simple-text-editor-rcl">
            <text:p>unfoldingWord-box3/simple-text-editor-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6 downloads in the last year).">
            <text:p>Package has detected local usage, GitHub dependents, or significant npm downloads (3896 downloads in the last year).</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56">
            <text:p>9756</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unfoldingWord/single-scripture-rcl">
            <text:p>unfoldingWord/single-scripture-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56 downloads in the last year).">
            <text:p>Package has detected local usage, GitHub dependents, or significant npm downloads (9756 downloads in the last year).</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7848">
            <text:p>97848</text:p>
          </table:table-cell>
          <table:table-cell office:value-type="string" office:string-value="2021-08-25T21:55:46.406Z">
            <text:p>2021-08-25T21:55:46.406Z</text:p>
          </table:table-cell>
          <table:table-cell office:value-type="string" office:string-value="['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unfoldingWord/string-punctuation-tokenizer">
            <text:p>unfoldingWord/string-punctuation-tokeniz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47">
            <text:p>774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unfoldingWord/tc-source-content-updater">
            <text:p>unfoldingWord/tc-source-content-updat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47 downloads in the last year).">
            <text:p>Package has detected local usage, GitHub dependents, or significant npm downloads (7747 downloads in the last year).</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unfoldingWord/tc-strings">
            <text:p>unfoldingWord/tc-strings</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unfoldingWord/tc-tool">
            <text:p>unfoldingWord/tc-too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tc-ui-toolkit">
            <text:p>tc-ui-toolkit</text:p>
          </table:table-cell>
          <table:table-cell office:value-type="string" office:string-value="False">
            <text:p>False</text:p>
          </table:table-cell>
          <table:table-cell office:value-type="string" office:string-value="29495">
            <text:p>29495</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unfoldingWord/tc-ui-toolkit">
            <text:p>unfoldingWord/tc-ui-toolkit</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495 downloads in the last year).">
            <text:p>Package has detected local usage, GitHub dependents, or significant npm downloads (29495 downloads in the last year).</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4995">
            <text:p>14995</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unfoldingWord/translation-helps-rcl">
            <text:p>unfoldingWord/translation-helps-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4995 downloads in the last year).">
            <text:p>Package has detected local usage, GitHub dependents, or significant npm downloads (14995 downloads in the last year).</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398">
            <text:p>639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unfoldingWord/tsv-groupdata-parser">
            <text:p>unfoldingWord/tsv-groupdata-pars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398 downloads in the last year).">
            <text:p>Package has detected local usage, GitHub dependents, or significant npm downloads (6398 downloads in the last year).</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47:31Z">
            <text:p>2026-06-05T07:47:31Z</text:p>
          </table:table-cell>
          <table:table-cell office:value-type="string" office:string-value="2026-06-05T07:47:29Z">
            <text:p>2026-06-05T07:47: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twl-creation-app', 'twl-generator', 'tsv7-tn-cleanup-app', 'add-gl-quotes-to-tsv-files']">
            <text:p>['tsv-twl-creation-app', 'twl-generator',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05T07:47:35Z">
            <text:p>2026-06-05T07:47:35Z</text:p>
          </table:table-cell>
          <table:table-cell office:value-type="string" office:string-value="unfoldingWord/tsv-quote-converters">
            <text:p>unfoldingWord/tsv-quote-converters</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wl-generator', 'door43-preview-renderers']">
            <text:p>['door43-preview-app', 'twl-generator',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unfoldingWord/usfm-alignment-remover-app">
            <text:p>unfoldingWord/usfm-alignment-remover-app</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unfoldingWord/usfm-js">
            <text:p>unfoldingWord/usfm-js</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52">
            <text:p>2052</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unfoldingWord/uw-content-validation">
            <text:p>unfoldingWord/uw-content-validation</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52 downloads in the last year).">
            <text:p>Package has detected local usage, GitHub dependents, or significant npm downloads (2052 downloads in the last year).</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uw-languages-rcl">
            <text:p>uw-languages-rcl</text:p>
          </table:table-cell>
          <table:table-cell office:value-type="string" office:string-value="False">
            <text:p>False</text:p>
          </table:table-cell>
          <table:table-cell office:value-type="string" office:string-value="1201">
            <text:p>1201</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unfoldingWord/uw-languages-rcl">
            <text:p>unfoldingWord/uw-languages-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01 downloads in the last year).">
            <text:p>Package has detected local usage, GitHub dependents, or significant npm downloads (1201 downloads in the last year).</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proskomma">
            <text:p>uw-proskomma</text:p>
          </table:table-cell>
          <table:table-cell office:value-type="string" office:string-value="False">
            <text:p>False</text:p>
          </table:table-cell>
          <table:table-cell office:value-type="string" office:string-value="2345">
            <text:p>2345</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unfoldingWord-box3/uw-proskomma">
            <text:p>unfoldingWord-box3/uw-proskomma</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45 downloads in the last year).">
            <text:p>Package has detected local usage, GitHub dependents, or significant npm downloads (2345 downloads in the last year).</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3135">
            <text:p>3135</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unfoldingWord/uw-quote-helpers">
            <text:p>unfoldingWord/uw-quote-helpers</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35 downloads in the last year).">
            <text:p>Package has detected local usage, GitHub dependents, or significant npm downloads (3135 downloads in the last year).</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unfoldingWord/uw-scripture-parser">
            <text:p>unfoldingWord/uw-scripture-pars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tsv-parser">
            <text:p>uw-tsv-parser</text:p>
          </table:table-cell>
          <table:table-cell office:value-type="string" office:string-value="False">
            <text:p>False</text:p>
          </table:table-cell>
          <table:table-cell office:value-type="string" office:string-value="4593">
            <text:p>4593</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unfoldingWord/uw-tsv-parser">
            <text:p>unfoldingWord/uw-tsv-pars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93 downloads in the last year).">
            <text:p>Package has detected local usage, GitHub dependents, or significant npm downloads (4593 downloads in the last year).</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uw-word-count">
            <text:p>uw-word-count</text:p>
          </table:table-cell>
          <table:table-cell office:value-type="string" office:string-value="False">
            <text:p>False</text:p>
          </table:table-cell>
          <table:table-cell office:value-type="string" office:string-value="345">
            <text:p>34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unfoldingWord/uw-word-count">
            <text:p>unfoldingWord/uw-word-count</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45 downloads in the last year).">
            <text:p>Package has detected local usage, GitHub dependents, or significant npm downloads (345 downloads in the last year).</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word-aligner">
            <text:p>word-aligner</text:p>
          </table:table-cell>
          <table:table-cell office:value-type="string" office:string-value="False">
            <text:p>False</text:p>
          </table:table-cell>
          <table:table-cell office:value-type="string" office:string-value="44656">
            <text:p>44656</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unfoldingWord/word-aligner">
            <text:p>unfoldingWord/word-align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56 downloads in the last year).">
            <text:p>Package has detected local usage, GitHub dependents, or significant npm downloads (44656 downloads in the last year).</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4730">
            <text:p>4730</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unfoldingWord/word-aligner-lib">
            <text:p>unfoldingWord/word-aligner-lib</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30 downloads in the last year).">
            <text:p>Package has detected local usage, GitHub dependents, or significant npm downloads (4730 downloads in the last year).</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word-aligner-rcl">
            <text:p>word-aligner-rcl</text:p>
          </table:table-cell>
          <table:table-cell office:value-type="string" office:string-value="False">
            <text:p>False</text:p>
          </table:table-cell>
          <table:table-cell office:value-type="string" office:string-value="16507">
            <text:p>16507</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unfoldingWord/word-aligner-rcl">
            <text:p>unfoldingWord/word-aligner-rcl</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07 downloads in the last year).">
            <text:p>Package has detected local usage, GitHub dependents, or significant npm downloads (16507 downloads in the last year).</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unfoldingWord/wordMAP">
            <text:p>unfoldingWord/wordMAP</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unfoldingWord/wordMAP-lexer">
            <text:p>unfoldingWord/wordMAP-lex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unfoldingWord/wordmapbooster">
            <text:p>unfoldingWord/wordmapbooster</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unfoldingWord-dev/android-door43-client">
            <text:p>unfoldingWord-dev/android-door43-clien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unfoldingWord-dev/android-resource-container">
            <text:p>unfoldingWord-dev/android-resource-contain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unfoldingWord-box3/aquifer-to-dcs">
            <text:p>unfoldingWord-box3/aquifer-to-dc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unfoldingWord/bt-servant-admin-portal">
            <text:p>unfoldingWord/bt-servant-admin-porta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unfoldingWord/bt-servant-engine">
            <text:p>unfoldingWord/bt-servant-engin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unfoldingWord/bt-servant-engine-data-loaders">
            <text:p>unfoldingWord/bt-servant-engine-data-loader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unfoldingWord/bt-servant-kb-worker">
            <text:p>unfoldingWord/bt-servant-kb-work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unfoldingWord/bt-servant-log-viewer">
            <text:p>unfoldingWord/bt-servant-log-view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unfoldingWord/bt-servant-message-broker">
            <text:p>unfoldingWord/bt-servant-message-brok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unfoldingWord/bt-servant-report-sender">
            <text:p>unfoldingWord/bt-servant-report-send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unfoldingWord/bt-servant-site">
            <text:p>unfoldingWord/bt-servant-sit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unfoldingWord/bt-servant-telemetry">
            <text:p>unfoldingWord/bt-servant-telemetry</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unfoldingWord/bt-servant-web-client">
            <text:p>unfoldingWord/bt-servant-web-clien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30T15:04:02Z">
            <text:p>2026-04-30T15:04:02Z</text:p>
          </table:table-cell>
          <table:table-cell office:value-type="string" office:string-value="2026-04-30T15:04:01Z">
            <text:p>2026-04-30T15:04:01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4-30T15:09:54Z">
            <text:p>2026-04-30T15:09:54Z</text:p>
          </table:table-cell>
          <table:table-cell office:value-type="string" office:string-value="unfoldingWord/bt-servant-whatsapp-gateway">
            <text:p>unfoldingWord/bt-servant-whatsapp-gateway</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8:26:02Z">
            <text:p>2026-06-10T18:26:02Z</text:p>
          </table:table-cell>
          <table:table-cell office:value-type="string" office:string-value="2026-05-28T15:55:55Z">
            <text:p>2026-05-28T15:55:55Z</text:p>
          </table:table-cell>
          <table:table-cell office:value-type="string" office:string-value="">
            <text:p/>
          </table:table-cell>
          <table:table-cell office:value-type="string" office:string-value="89">
            <text:p>89</text:p>
          </table:table-cell>
          <table:table-cell office:value-type="string" office:string-value="9">
            <text:p>9</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5-28T15:56:00Z">
            <text:p>2026-05-28T15:56:00Z</text:p>
          </table:table-cell>
          <table:table-cell office:value-type="string" office:string-value="unfoldingWord/bt-servant-worker">
            <text:p>unfoldingWord/bt-servant-work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unfoldingWord/catalog-next-toolkit">
            <text:p>unfoldingWord/catalog-next-toolki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6">
            <text:p>186</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unfoldingWord-box3/content-validation-app">
            <text:p>unfoldingWord-box3/content-validation-app</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6 downloads in the last year) and no detected local consumers.">
            <text:p>Package has low but nonzero npm usage (186 downloads in the last year) and no detected local consumers.</text:p>
          </table:table-cell>
        </table:table-row>
        <table:table-row>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unfoldingWord-dev/d43-catalog">
            <text:p>unfoldingWord-dev/d43-catalog</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unfoldingWord/dcs">
            <text:p>unfoldingWord/dc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unfoldingWord-dev/dcs-api-merge-poc">
            <text:p>unfoldingWord-dev/dcs-api-merge-poc</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unfoldingWord-dev/dcs-api-resolve-conflicts-poc">
            <text:p>unfoldingWord-dev/dcs-api-resolve-conflicts-poc</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unfoldingWord/dcs-catalog-accordion-rcl">
            <text:p>unfoldingWord/dcs-catalog-accordion-rc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unfoldingWord-dev/dcs-docker">
            <text:p>unfoldingWord-dev/dcs-dock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unfoldingWord/dcs-docs">
            <text:p>unfoldingWord/dcs-doc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unfoldingWord-box3/dcs-file-version-diff-tool">
            <text:p>unfoldingWord-box3/dcs-file-version-diff-too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unfoldingWord/dcs-home-page-old">
            <text:p>unfoldingWord/dcs-home-page-old</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unfoldingWord/dcs-homepage">
            <text:p>unfoldingWord/dcs-homepag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unfoldingWord/dcs-local">
            <text:p>unfoldingWord/dcs-loca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unfoldingWord-box3/dcs-login">
            <text:p>unfoldingWord-box3/dcs-login</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
            <text:p>unfoldingWord/dcs-package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dcs-js">
            <text:p>unfoldingWord/dcs-packages/dcs-j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dcs-js-example">
            <text:p>unfoldingWord/dcs-packages/dcs-js-exampl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dcs-ts">
            <text:p>unfoldingWord/dcs-packages/dcs-t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vite-project">
            <text:p>unfoldingWord/dcs-packages/vite-projec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unfoldingWord-dev/dcs-profile-blank">
            <text:p>unfoldingWord-dev/dcs-profile-blank</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unfoldingWord-dev/dcs-profile-unfoldingword">
            <text:p>unfoldingWord-dev/dcs-profile-unfoldingword</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unfoldingWord/dcs-templates">
            <text:p>unfoldingWord/dcs-template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unfoldingWord-box3/dcs-vanilla">
            <text:p>unfoldingWord-box3/dcs-vanilla</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unfoldingWord-dev/Door43">
            <text:p>unfoldingWord-dev/Door43</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unfoldingWord-dev/door43-acceptance-tests">
            <text:p>unfoldingWord-dev/door43-acceptance-test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unfoldingWord/door43-catalog-job-handler">
            <text:p>unfoldingWord/door43-catalog-job-handl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unfoldingWord/door43-job-handler">
            <text:p>unfoldingWord/door43-job-handl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unfoldingWord/door43-preview-actions">
            <text:p>unfoldingWord/door43-preview-action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unfoldingWord/door43-preview-app">
            <text:p>unfoldingWord/door43-preview-app</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unfoldingWord-box3/door43-preview-rcl">
            <text:p>unfoldingWord-box3/door43-preview-rc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unfoldingWord/door43-preview-renderers">
            <text:p>unfoldingWord/door43-preview-renderer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unfoldingWord/door43.org">
            <text:p>unfoldingWord/door43.org</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unfoldingWord/gateway-admin">
            <text:p>unfoldingWord/gateway-admin</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unfoldingWord/gateway-edit">
            <text:p>unfoldingWord/gateway-edi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unfoldingWord-box3/gateway-edit-POC">
            <text:p>unfoldingWord-box3/gateway-edit-POC</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unfoldingWord/gateway-translate">
            <text:p>unfoldingWord/gateway-translat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unfoldingWord-box3/graphql-catalog-next">
            <text:p>unfoldingWord-box3/graphql-catalog-nex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unfoldingWord-box3/hello-dcs-react-component-library">
            <text:p>unfoldingWord-box3/hello-dcs-react-component-library</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unfoldingWord/Katalon-gatewayEdit-Elsy">
            <text:p>unfoldingWord/Katalon-gatewayEdit-Elsy</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unfoldingWord/Katalon-gatewayEdit-Koz">
            <text:p>unfoldingWord/Katalon-gatewayEdit-Ko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unfoldingWord-dev/node-dcs-api-client">
            <text:p>unfoldingWord-dev/node-dcs-api-clien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unfoldingWord/obs-app">
            <text:p>unfoldingWord/obs-app</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unfoldingWord-dev/obs-door43">
            <text:p>unfoldingWord-dev/obs-door43</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unfoldingWord-box3/org-language-resource-hook">
            <text:p>unfoldingWord-box3/org-language-resource-hook</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unfoldingWord-box3/proskomma-scripture-resources-rcl">
            <text:p>unfoldingWord-box3/proskomma-scripture-resources-rc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unfoldingWord-dev/python-resource-container">
            <text:p>unfoldingWord-dev/python-resource-contain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unfoldingWord-dev/Resource-Container">
            <text:p>unfoldingWord-dev/Resource-Contain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unfoldingWord-box3/resource-container-rcl">
            <text:p>unfoldingWord-box3/resource-container-rcl</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unfoldingWord-box3/scripture-as-graph">
            <text:p>unfoldingWord-box3/scripture-as-graph</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unfoldingWord-dev/ScripturePane">
            <text:p>unfoldingWord-dev/ScripturePan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unfoldingWord/tc-create-app">
            <text:p>unfoldingWord/tc-create-app</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4 downloads in the last year) and no detected local consumers.">
            <text:p>Package has low but nonzero npm usage (74 downloads in the last year) and no detected local consumers.</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adapter-indexeddb">
            <text:p>unfoldingWord/tc-study/@bt-synergy/catalog-adapter-indexeddb</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adapter-memory">
            <text:p>unfoldingWord/tc-study/@bt-synergy/catalog-adapter-memory</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adapter-sqlite">
            <text:p>unfoldingWord/tc-study/@bt-synergy/catalog-adapter-sqlit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cli">
            <text:p>unfoldingWord/tc-study/@bt-synergy/catalog-cli</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manager">
            <text:p>unfoldingWord/tc-study/@bt-synergy/catalog-manag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door43-api">
            <text:p>unfoldingWord/tc-study/@bt-synergy/door43-api</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actions">
            <text:p>unfoldingWord/tc-study/@bt-synergy/resource-action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adapters">
            <text:p>unfoldingWord/tc-study/@bt-synergy/resource-adapter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bundler">
            <text:p>unfoldingWord/tc-study/@bt-synergy/resource-bundl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cache">
            <text:p>unfoldingWord/tc-study/@bt-synergy/resource-cach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catalog">
            <text:p>unfoldingWord/tc-study/@bt-synergy/resource-catalog</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cli">
            <text:p>unfoldingWord/tc-study/@bt-synergy/resource-cli</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package-builder">
            <text:p>unfoldingWord/tc-study/@bt-synergy/resource-package-build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panels">
            <text:p>unfoldingWord/tc-study/@bt-synergy/resource-panel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parsers">
            <text:p>unfoldingWord/tc-study/@bt-synergy/resource-parser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selection">
            <text:p>unfoldingWord/tc-study/@bt-synergy/resource-selection</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signals">
            <text:p>unfoldingWord/tc-study/@bt-synergy/resource-signal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types">
            <text:p>unfoldingWord/tc-study/@bt-synergy/resource-type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cripture-loader">
            <text:p>unfoldingWord/tc-study/@bt-synergy/scripture-load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unified-catalog-store">
            <text:p>unfoldingWord/tc-study/@bt-synergy/unified-catalog-stor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toolkit/resource-downloader">
            <text:p>unfoldingWord/tc-study/@bt-toolkit/resource-download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resource-panels-spike">
            <text:p>unfoldingWord/tc-study/resource-panels-spik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unfoldingWord-dev/tC_Resources">
            <text:p>unfoldingWord-dev/tC_Resource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unfoldingWord-dev/tn_add_scripture_links">
            <text:p>unfoldingWord-dev/tn_add_scripture_link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unfoldingWord/translationCore">
            <text:p>unfoldingWord/translationCore</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unfoldingWord-dev/translationCore-PoC">
            <text:p>unfoldingWord-dev/translationCore-PoC</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unfoldingWord-dev/ts-android">
            <text:p>unfoldingWord-dev/ts-android</text:p>
          </table:table-cell>
          <table:table-cell office:value-type="string" office:string-value="Manual review">
            <text:p>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unfoldingWord-dev/ts-desktop">
            <text:p>unfoldingWord-dev/ts-desktop</text:p>
          </table:table-cell>
          <table:table-cell office:value-type="string" office:string-value="Manual review">
            <text:p>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unfoldingWord-dev/ts-requirements">
            <text:p>unfoldingWord-dev/ts-requirements</text:p>
          </table:table-cell>
          <table:table-cell office:value-type="string" office:string-value="Manual review">
            <text:p>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unfoldingWord/ts-v2-catalog-backport">
            <text:p>unfoldingWord/ts-v2-catalog-backport</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unfoldingWord/tx-dev-dcs">
            <text:p>unfoldingWord/tx-dev-dcs</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unfoldingWord-dev/tx-dev-door43">
            <text:p>unfoldingWord-dev/tx-dev-door43</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unfoldingWord-dev/tx-door43">
            <text:p>unfoldingWord-dev/tx-door43</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unfoldingWord/tx-enqueue-job">
            <text:p>unfoldingWord/tx-enqueue-job</text:p>
          </table:table-cell>
          <table:table-cell office:value-type="string" office:string-value="Manual review">
            <text:p>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unfoldingWord/tx-job-handler">
            <text:p>unfoldingWord/tx-job-handl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unfoldingWord-dev/uw-android">
            <text:p>unfoldingWord-dev/uw-android</text:p>
          </table:table-cell>
          <table:table-cell office:value-type="string" office:string-value="Manual review">
            <text:p>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unfoldingWord/uw-website-resource-version-updater">
            <text:p>unfoldingWord/uw-website-resource-version-updater</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unfoldingWord/.github">
            <text:p>unfoldingWord/.github</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unfoldingWord-dev/android-event-buffer">
            <text:p>unfoldingWord-dev/android-event-buff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unfoldingWord-dev/android-foreground">
            <text:p>unfoldingWord-dev/android-foreground</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unfoldingWord-dev/android-gogs-client">
            <text:p>unfoldingWord-dev/android-gogs-clien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unfoldingWord-dev/android-http">
            <text:p>unfoldingWord-dev/android-htt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unfoldingWord-dev/android-logger">
            <text:p>unfoldingWord-dev/android-logg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unfoldingWord-dev/android-task-manager">
            <text:p>unfoldingWord-dev/android-task-manag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unfoldingWord-dev/api-index">
            <text:p>unfoldingWord-dev/api-index</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unfoldingWord/blank-project-template">
            <text:p>unfoldingWord/blank-project-template</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book-package-app">
            <text:p>book-package-app</text:p>
          </table:table-cell>
          <table:table-cell office:value-type="string" office:string-value="False">
            <text:p>False</text:p>
          </table:table-cell>
          <table:table-cell office:value-type="string" office:string-value="114">
            <text:p>114</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unfoldingWord/book-package-app">
            <text:p>unfoldingWord/book-package-ap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4 downloads in the last year) and no detected local consumers.">
            <text:p>Package has low but nonzero npm usage (114 downloads in the last year) and no detected local consumers.</text:p>
          </table:table-cell>
        </table:table-row>
        <table:table-row>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unfoldingWord/Brown-Driver-Briggs-Enhanced">
            <text:p>unfoldingWord/Brown-Driver-Briggs-Enhanced</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unfoldingWord-box3/chamilo2obsidian">
            <text:p>unfoldingWord-box3/chamilo2obsidian</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
            <text:p>unfoldingWord-box3/checking-app-theia</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unfoldingWord/claude_security_sentinel">
            <text:p>unfoldingWord/claude_security_sentinel</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unfoldingWord/cloudfront_logprocessor">
            <text:p>unfoldingWord/cloudfront_logprocesso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unfoldingWord/cyber-security-report">
            <text:p>unfoldingWord/cyber-security-repor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unfoldingWord/data_tracking_import">
            <text:p>unfoldingWord/data_tracking_impor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unfoldingWord/data_tracking_wrangler">
            <text:p>unfoldingWord/data_tracking_wrangl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unfoldingWord-dev/dokuwiki-obs-comparer">
            <text:p>unfoldingWord-dev/dokuwiki-obs-compar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unfoldingWord-dev/dokuwiki-plugin-obs">
            <text:p>unfoldingWord-dev/dokuwiki-plugin-ob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unfoldingWord-dev/dokuwiki-plugin-obs-audio-upload">
            <text:p>unfoldingWord-dev/dokuwiki-plugin-obs-audio-upload</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unfoldingWord-dev/dokuwiki-plugin-obs-review">
            <text:p>unfoldingWord-dev/dokuwiki-plugin-obs-review</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unfoldingWord-dev/dokuwiki-plugin-register">
            <text:p>unfoldingWord-dev/dokuwiki-plugin-regist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unfoldingWord-dev/dokuwiki-plugin-shared">
            <text:p>unfoldingWord-dev/dokuwiki-plugin-shared</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unfoldingWord-dev/dokuwiki-to-rc">
            <text:p>unfoldingWord-dev/dokuwiki-to-rc</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unfoldingWord-dev/dokuwiki-usfm-import">
            <text:p>unfoldingWord-dev/dokuwiki-usfm-impor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unfoldingWord/download-link-tracker">
            <text:p>unfoldingWord/download-link-track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unfoldingWord/dw_redirects">
            <text:p>unfoldingWord/dw_redirec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unfoldingWord/en_obs_tf">
            <text:p>unfoldingWord/en_obs_tf</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unfoldingWord-dev/ExampleCheckingApp-tC">
            <text:p>unfoldingWord-dev/ExampleCheckingApp-tC</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unfoldingWord-dev/exports">
            <text:p>unfoldingWord-dev/expor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unfoldingWord/fia-kb">
            <text:p>unfoldingWord/fia-kb</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unfoldingWord/fred-mcp">
            <text:p>unfoldingWord/fred-mc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unfoldingWord/fred-zulip-bot">
            <text:p>unfoldingWord/fred-zulip-bo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unfoldingWord-box3/gl-database-visualizations">
            <text:p>unfoldingWord-box3/gl-database-visualization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unfoldingWord/gl_database">
            <text:p>unfoldingWord/gl_database</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unfoldingWord/gl_database_code">
            <text:p>unfoldingWord/gl_database_code</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unfoldingWord-dev/gogs-custom">
            <text:p>unfoldingWord-dev/gogs-custom</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unfoldingWord-dev/gogs_auto_scaling">
            <text:p>unfoldingWord-dev/gogs_auto_scaling</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unfoldingWord-box3/greek-apparatus-app">
            <text:p>unfoldingWord-box3/greek-apparatus-ap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unfoldingWord/GWE-Tests">
            <text:p>unfoldingWord/GWE-Tes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unfoldingWord-box3/hello-world-react-component-library">
            <text:p>unfoldingWord-box3/hello-world-react-component-library</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unfoldingWord-dev/hubot">
            <text:p>unfoldingWord-dev/hubo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unfoldingWord/inventoryst">
            <text:p>unfoldingWord/inventorys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unfoldingWord/Katalon_MD-TSV_Converter_Koz">
            <text:p>unfoldingWord/Katalon_MD-TSV_Converter_Ko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unfoldingWord/Katalon_tC_Create">
            <text:p>unfoldingWord/Katalon_tC_Create</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unfoldingWord/kr1-data-scripts">
            <text:p>unfoldingWord/kr1-data-scrip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unfoldingWord/lambda-tw-strongs-list-generator">
            <text:p>unfoldingWord/lambda-tw-strongs-list-generato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unfoldingWord/language-search">
            <text:p>unfoldingWord/language-search</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unfoldingWord-box3/lexicon-poc">
            <text:p>unfoldingWord-box3/lexicon-poc</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unfoldingWord/loki-exporter">
            <text:p>unfoldingWord/loki-export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unfoldingWord-dev/media">
            <text:p>unfoldingWord-dev/media</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unfoldingWord/metrics">
            <text:p>unfoldingWord/metric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unfoldingWord-box3/mini-sb-handler">
            <text:p>unfoldingWord-box3/mini-sb-handl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unfoldingWord/minitracker">
            <text:p>unfoldingWord/minitrack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unfoldingWord-box3/NotionImport">
            <text:p>unfoldingWord-box3/NotionImpor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unfoldingWord-dev/obs-comparer">
            <text:p>unfoldingWord-dev/obs-compar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unfoldingWord-dev/obs-data">
            <text:p>unfoldingWord-dev/obs-data</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unfoldingWord-dev/obs-reader">
            <text:p>unfoldingWord-dev/obs-read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unfoldingWord/obs-web">
            <text:p>unfoldingWord/obs-web</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unfoldingWord-dev/obs_tools">
            <text:p>unfoldingWord-dev/obs_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unfoldingWord/odd-claude-plugin">
            <text:p>unfoldingWord/odd-claude-plugin</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unfoldingWord-dev/pages">
            <text:p>unfoldingWord-dev/page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unfoldingWord-box3/pdf-splitter">
            <text:p>unfoldingWord-box3/pdf-splitt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unfoldingWord-dev/pi-collab">
            <text:p>unfoldingWord-dev/pi-collab</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unfoldingWord-dev/PublishingBlockchain">
            <text:p>unfoldingWord-dev/PublishingBlockchain</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unfoldingWord-dev/python-aws-tools">
            <text:p>unfoldingWord-dev/python-aws-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unfoldingWord-dev/python-gitea-client">
            <text:p>unfoldingWord-dev/python-gitea-clien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unfoldingWord/rc-schema">
            <text:p>unfoldingWord/rc-schema</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unfoldingWord-dev/s3_list-zip">
            <text:p>unfoldingWord-dev/s3_list-zi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unfoldingWord-dev/sigadd">
            <text:p>unfoldingWord-dev/sigadd</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unfoldingWord-box3/SIL_API_loader">
            <text:p>unfoldingWord-box3/SIL_API_load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unfoldingWord-box3/Simplify">
            <text:p>unfoldingWord-box3/Simplify</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unfoldingWord-dev/slack-lambda">
            <text:p>unfoldingWord-dev/slack-lambda</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unfoldingWord-box3/SpeechToText">
            <text:p>unfoldingWord-box3/SpeechToTex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unfoldingWord-box3/SplitAudioByText">
            <text:p>unfoldingWord-box3/SplitAudioByTex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unfoldingWord/tc-helps-skills">
            <text:p>unfoldingWord/tc-helps-skil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unfoldingWord/tCCreateQA-Daniel">
            <text:p>unfoldingWord/tCCreateQA-Daniel</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unfoldingWord/tcCreateQA-elsy">
            <text:p>unfoldingWord/tcCreateQA-elsy</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unfoldingWord-box3/td-neo4j-poc">
            <text:p>unfoldingWord-box3/td-neo4j-poc</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
            <text:p>unfoldingWord-box3/theia-example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unfoldingWord-dev/tools">
            <text:p>unfoldingWord-dev/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unfoldingWord-dev/tr-requirements">
            <text:p>unfoldingWord-dev/tr-requiremen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unfoldingWord-box3/translation-helps-print-preview">
            <text:p>unfoldingWord-box3/translation-helps-print-preview</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unfoldingWord-dev/translationNotes">
            <text:p>unfoldingWord-dev/translationNote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unfoldingWord-dev/translationRecorder-Info">
            <text:p>unfoldingWord-dev/translationRecorder-Info</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unfoldingWord-dev/translationStudio-Info">
            <text:p>unfoldingWord-dev/translationStudio-Info</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unfoldingWord-dev/translationWords-tC">
            <text:p>unfoldingWord-dev/translationWords-tC</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unfoldingWord-dev/ts-exports">
            <text:p>unfoldingWord-dev/ts-expor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unfoldingWord-dev/ts-stats">
            <text:p>unfoldingWord-dev/ts-stat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unfoldingWord-dev/tw_consistency">
            <text:p>unfoldingWord-dev/tw_consistency</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unfoldingWord-box3/twin-ahk">
            <text:p>unfoldingWord-box3/twin-ahk</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unfoldingWord-dev/tx">
            <text:p>unfoldingWord-dev/tx</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unfoldingWord/tx-dev">
            <text:p>unfoldingWord/tx-dev</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unfoldingWord-dev/tx-html2pdf">
            <text:p>unfoldingWord-dev/tx-html2pdf</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unfoldingWord-dev/tx-md2html">
            <text:p>unfoldingWord-dev/tx-md2html</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unfoldingWord-box3/tx-redis-poc">
            <text:p>unfoldingWord-box3/tx-redis-poc</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unfoldingWord-dev/tx-sample-client">
            <text:p>unfoldingWord-dev/tx-sample-clien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unfoldingWord-dev/tx-shared-tools">
            <text:p>unfoldingWord-dev/tx-shared-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unfoldingWord-dev/tx-usfm2html">
            <text:p>unfoldingWord-dev/tx-usfm2html</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unfoldingWord-dev/tx-webhook">
            <text:p>unfoldingWord-dev/tx-webhook</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unfoldingWord-dev/tx-webhook-client">
            <text:p>unfoldingWord-dev/tx-webhook-clien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unfoldingWord-dev/ugnt-app">
            <text:p>unfoldingWord-dev/ugnt-ap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unfoldingWord-dev/Unlocked-Bible-Commentary-Info">
            <text:p>unfoldingWord-dev/Unlocked-Bible-Commentary-Info</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unfoldingWord-dev/Unlocked-Bible-Notes-Info">
            <text:p>unfoldingWord-dev/Unlocked-Bible-Notes-Info</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unfoldingWord-dev/Unlocked-Grammar-Info">
            <text:p>unfoldingWord-dev/Unlocked-Grammar-Info</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unfoldingWord-dev/Unlocked-Greek-Lexicon-Info">
            <text:p>unfoldingWord-dev/Unlocked-Greek-Lexicon-Info</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unfoldingWord-dev/USFM-Utils">
            <text:p>unfoldingWord-dev/USFM-Uti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unfoldingWord-dev/uw-api">
            <text:p>unfoldingWord-dev/uw-api</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unfoldingWord-box3/uw-data-tools">
            <text:p>unfoldingWord-box3/uw-data-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unfoldingWord-dev/uw-ios">
            <text:p>unfoldingWord-dev/uw-io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unfoldingWord-dev/uW-mobile-app">
            <text:p>unfoldingWord-dev/uW-mobile-ap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unfoldingWord-dev/uw-pdf-conversion-tools">
            <text:p>unfoldingWord-dev/uw-pdf-conversion-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unfoldingWord-dev/uw-publisher">
            <text:p>unfoldingWord-dev/uw-publisher</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unfoldingWord/uW-Tools-Collab">
            <text:p>unfoldingWord/uW-Tools-Collab</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unfoldingWord-dev/uw_tools">
            <text:p>unfoldingWord-dev/uw_tools</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unfoldingWord-box3/viewer-app-cordova">
            <text:p>unfoldingWord-box3/viewer-app-cordova</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unfoldingWord-box3/wordmap-react-toolkit">
            <text:p>unfoldingWord-box3/wordmap-react-toolkit</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unfoldingWord-box3/wordmap-seed-app">
            <text:p>unfoldingWord-box3/wordmap-seed-app</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unfoldingWord/world-language-map-rcl">
            <text:p>unfoldingWord/world-language-map-rcl</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unfoldingWord/avd-ar">
            <text:p>unfoldingWord/avd-a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unfoldingWord/discourse-mermaid">
            <text:p>unfoldingWord/discourse-mermaid</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unfoldingWord-dev/dokuwiki-slack-invite">
            <text:p>unfoldingWord-dev/dokuwiki-slack-invite</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unfoldingWord-dev/example_tool">
            <text:p>unfoldingWord-dev/example_tool</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unfoldingWord-dev/md-exports">
            <text:p>unfoldingWord-dev/md-export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unfoldingWord/MediaWiki-USFMTag">
            <text:p>unfoldingWord/MediaWiki-USFMTag</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unfoldingWord-box3/MultiplatformFrameworks">
            <text:p>unfoldingWord-box3/MultiplatformFramework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unfoldingWord-dev/nagios_plugins">
            <text:p>unfoldingWord-dev/nagios_plugin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unfoldingWord/obs-am">
            <text:p>unfoldingWord/obs-am</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unfoldingWord-dev/OBS-Android">
            <text:p>unfoldingWord-dev/OBS-Android</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unfoldingWord/obs-bn">
            <text:p>unfoldingWord/obs-bn</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unfoldingWord/obs-ceb">
            <text:p>unfoldingWord/obs-ceb</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unfoldingWord/obs-en">
            <text:p>unfoldingWord/obs-en</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unfoldingWord/obs-es">
            <text:p>unfoldingWord/obs-e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unfoldingWord/obs-es-419">
            <text:p>unfoldingWord/obs-es-419</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unfoldingWord/obs-fa">
            <text:p>unfoldingWord/obs-fa</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unfoldingWord/obs-fr">
            <text:p>unfoldingWord/obs-f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unfoldingWord/obs-gaj-x-ymnk">
            <text:p>unfoldingWord/obs-gaj-x-ymnk</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unfoldingWord/obs-gof">
            <text:p>unfoldingWord/obs-gof</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unfoldingWord/obs-gu">
            <text:p>unfoldingWord/obs-gu</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unfoldingWord/obs-ha">
            <text:p>unfoldingWord/obs-ha</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unfoldingWord/obs-hi">
            <text:p>unfoldingWord/obs-hi</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unfoldingWord/obs-hmr">
            <text:p>unfoldingWord/obs-hm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unfoldingWord/obs-hu">
            <text:p>unfoldingWord/obs-hu</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unfoldingWord-dev/OBS-iOS">
            <text:p>unfoldingWord-dev/OBS-iO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unfoldingWord/obs-lpx">
            <text:p>unfoldingWord/obs-lpx</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unfoldingWord/obs-mr">
            <text:p>unfoldingWord/obs-m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unfoldingWord/obs-ne">
            <text:p>unfoldingWord/obs-ne</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unfoldingWord/obs-or">
            <text:p>unfoldingWord/obs-o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unfoldingWord/obs-pa">
            <text:p>unfoldingWord/obs-pa</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unfoldingWord/obs-pdf">
            <text:p>unfoldingWord/obs-pdf</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unfoldingWord/obs-pt-br">
            <text:p>unfoldingWord/obs-pt-b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unfoldingWord/obs-ru">
            <text:p>unfoldingWord/obs-ru</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unfoldingWord/obs-sgj">
            <text:p>unfoldingWord/obs-sgj</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unfoldingWord/obs-tdj">
            <text:p>unfoldingWord/obs-tdj</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unfoldingWord/obs-tpi">
            <text:p>unfoldingWord/obs-tpi</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unfoldingWord/obs-tr">
            <text:p>unfoldingWord/obs-t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unfoldingWord-dev/OBS-Translation-App">
            <text:p>unfoldingWord-dev/OBS-Translation-App</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unfoldingWord/obs-ur">
            <text:p>unfoldingWord/obs-u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unfoldingWord/obs-vi">
            <text:p>unfoldingWord/obs-vi</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unfoldingWord-dev/old-tx-manager">
            <text:p>unfoldingWord-dev/old-tx-manage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unfoldingWord/orthography-app-BE">
            <text:p>unfoldingWord/orthography-app-BE</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unfoldingWord/orthography-app-FE">
            <text:p>unfoldingWord/orthography-app-FE</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unfoldingWord-dev/proposed_changes_module">
            <text:p>unfoldingWord-dev/proposed_changes_module</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unfoldingWord-dev/pub.distantshores.org">
            <text:p>unfoldingWord-dev/pub.distantshores.org</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unfoldingWord-dev/submachine">
            <text:p>unfoldingWord-dev/submachine</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unfoldingWord-box3/td">
            <text:p>unfoldingWord-box3/td</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unfoldingWord-dev/TheCompassionateFatherApp">
            <text:p>unfoldingWord-dev/TheCompassionateFatherApp</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unfoldingWord-dev/translation_academy">
            <text:p>unfoldingWord-dev/translation_academy</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unfoldingWord-dev/translationDatabaseWeb">
            <text:p>unfoldingWord-dev/translationDatabaseWeb</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unfoldingWord-dev/translationdb-tools">
            <text:p>unfoldingWord-dev/translationdb-tool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unfoldingWord-dev/translationHelps">
            <text:p>unfoldingWord-dev/translationHelps</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unfoldingWord-dev/translationKeyboard">
            <text:p>unfoldingWord-dev/translationKeyboard</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unfoldingWord-dev/translationKeyboardWeb">
            <text:p>unfoldingWord-dev/translationKeyboardWeb</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unfoldingWord-dev/ts-server">
            <text:p>unfoldingWord-dev/ts-serve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unfoldingWord-dev/tx-manager">
            <text:p>unfoldingWord-dev/tx-manage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unfoldingWord-dev/tx-manager-lambda">
            <text:p>unfoldingWord-dev/tx-manager-lambda</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unfoldingWord-dev/tx-simple-usfm2html">
            <text:p>unfoldingWord-dev/tx-simple-usfm2html</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unfoldingWord/udb-en">
            <text:p>unfoldingWord/udb-en</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unfoldingWord/ulb-en">
            <text:p>unfoldingWord/ulb-en</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unfoldingWord/ulb-pt-br">
            <text:p>unfoldingWord/ulb-pt-br</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unfoldingWord/unfoldingWord.github.io-old">
            <text:p>unfoldingWord/unfoldingWord.github.io-old</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unfoldingWord/Unlocked-Greek-Lexicon">
            <text:p>unfoldingWord/Unlocked-Greek-Lexicon</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unfoldingWord/Unlocked-Greek-New-Testament">
            <text:p>unfoldingWord/Unlocked-Greek-New-Testament</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unfoldingWord-dev/uw-publish">
            <text:p>unfoldingWord-dev/uw-publish</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unfoldingWord-dev/uwadmin">
            <text:p>unfoldingWord-dev/uwadmin</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unfoldingWord-dev/VerseCheck">
            <text:p>unfoldingWord-dev/VerseCheck</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unfoldingWord/budget-report">
            <text:p>unfoldingWord/budget-report</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7T17:00:21Z">
            <text:p>2026-05-07T17:00: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5-07T17:00:32Z">
            <text:p>2026-05-07T17:00:32Z</text:p>
          </table:table-cell>
          <table:table-cell office:value-type="string" office:string-value="unfoldingWord/claude-skills">
            <text:p>unfoldingWord/claude-skill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unfoldingWord-dev/design">
            <text:p>unfoldingWord-dev/design</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unfoldingWord-dev/dw-zipodt">
            <text:p>unfoldingWord-dev/dw-zipodt</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unfoldingWord/engineering-practices">
            <text:p>unfoldingWord/engineering-practice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unfoldingWord/gl_database_private">
            <text:p>unfoldingWord/gl_database_private</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unfoldingWord/node-usfm2html-cli">
            <text:p>unfoldingWord/node-usfm2html-cli</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unfoldingWord/obs-tl">
            <text:p>unfoldingWord/obs-tl</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unfoldingWord/oce-print-preview-tools">
            <text:p>unfoldingWord/oce-print-preview-tool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unfoldingWord-box3/populate-gl-quote-rcl">
            <text:p>unfoldingWord-box3/populate-gl-quote-rcl</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unfoldingWord/salesforce-aplos-integration">
            <text:p>unfoldingWord/salesforce-aplos-integration</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unfoldingWord/salesforce-core">
            <text:p>unfoldingWord/salesforce-core</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unfoldingWord/salesforce-donation-page-package-core">
            <text:p>unfoldingWord/salesforce-donation-page-package-core</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unfoldingWord/salesforce-donation-page-package-customizations">
            <text:p>unfoldingWord/salesforce-donation-page-package-customization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unfoldingWord/shiny-app-outputs-report">
            <text:p>unfoldingWord/shiny-app-outputs-report</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unfoldingWord/tc-create-2-poc">
            <text:p>unfoldingWord/tc-create-2-poc</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unfoldingWord/tc-website">
            <text:p>unfoldingWord/tc-website</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unfoldingWord/terraform">
            <text:p>unfoldingWord/terraform</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unfoldingWord/tn-tsv7-to-tsv8">
            <text:p>unfoldingWord/tn-tsv7-to-tsv8</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unfoldingWord/ufw_redirects">
            <text:p>unfoldingWord/ufw_redirect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unfoldingWord-dev/uW-Bible-Maps">
            <text:p>unfoldingWord-dev/uW-Bible-Map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unfoldingWord/uw-dev-skills">
            <text:p>unfoldingWord/uw-dev-skill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unfoldingWord/uw-zulip-mcp">
            <text:p>unfoldingWord/uw-zulip-mcp</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unfoldingWord/website">
            <text:p>unfoldingWord/website</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unfoldingWord/zulip-files">
            <text:p>unfoldingWord/zulip-files</text:p>
          </table:table-cell>
          <table:table-cell office:value-type="string" office:string-value="Protected private">
            <text:p>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 style:data-style-name="N2" text:time-value="10:33:43.0268162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6T11:16:59.078406015</dc:date>
    <meta:editing-duration>PT41M24S</meta:editing-duration>
    <meta:editing-cycles>4</meta:editing-cycles>
    <meta:document-statistic meta:table-count="1" meta:cell-count="14742" meta:object-count="0"/>
  </office:meta>
</office:document-meta>
</file>