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ce style:name="Arial Unicode MS1"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automatic-styles>
    <style:style style:name="co1" style:family="table-column">
      <style:table-column-properties fo:break-before="auto" style:column-width="2.0638in"/>
    </style:style>
    <style:style style:name="co2" style:family="table-column">
      <style:table-column-properties fo:break-before="auto" style:column-width="0.55in"/>
    </style:style>
    <style:style style:name="co3" style:family="table-column">
      <style:table-column-properties fo:break-before="auto" style:column-width="0.3957in"/>
    </style:style>
    <style:style style:name="co4" style:family="table-column">
      <style:table-column-properties fo:break-before="auto" style:column-width="3.202in"/>
    </style:style>
    <style:style style:name="co5" style:family="table-column">
      <style:table-column-properties fo:break-before="auto" style:column-width="1.2346in"/>
    </style:style>
    <style:style style:name="co6" style:family="table-column">
      <style:table-column-properties fo:break-before="auto" style:column-width="1.0902in"/>
    </style:style>
    <style:style style:name="co7" style:family="table-column">
      <style:table-column-properties fo:break-before="auto" style:column-width="0.6075in"/>
    </style:style>
    <style:style style:name="co8" style:family="table-column">
      <style:table-column-properties fo:break-before="auto" style:column-width="0.4634in"/>
    </style:style>
    <style:style style:name="co9" style:family="table-column">
      <style:table-column-properties fo:break-before="auto" style:column-width="1.3984in"/>
    </style:style>
    <style:style style:name="co10" style:family="table-column">
      <style:table-column-properties fo:break-before="auto" style:column-width="1.2154in"/>
    </style:style>
    <style:style style:name="co11" style:family="table-column">
      <style:table-column-properties fo:break-before="auto" style:column-width="1.0134in"/>
    </style:style>
    <style:style style:name="co12" style:family="table-column">
      <style:table-column-properties fo:break-before="auto" style:column-width="2.0256in"/>
    </style:style>
    <style:style style:name="co13" style:family="table-column">
      <style:table-column-properties fo:break-before="auto" style:column-width="0.8874in"/>
    </style:style>
    <style:style style:name="co14" style:family="table-column">
      <style:table-column-properties fo:break-before="auto" style:column-width="2.9807in"/>
    </style:style>
    <style:style style:name="co15" style:family="table-column">
      <style:table-column-properties fo:break-before="auto" style:column-width="1.8902in"/>
    </style:style>
    <style:style style:name="co16" style:family="table-column">
      <style:table-column-properties fo:break-before="auto" style:column-width="1.7457in"/>
    </style:style>
    <style:style style:name="co17" style:family="table-column">
      <style:table-column-properties fo:break-before="auto" style:column-width="4.302in"/>
    </style:style>
    <style:style style:name="co18" style:family="table-column">
      <style:table-column-properties fo:break-before="auto" style:column-width="1.9866in"/>
    </style:style>
    <style:style style:name="co19" style:family="table-column">
      <style:table-column-properties fo:break-before="auto" style:column-width="7.1665in"/>
    </style:style>
    <style:style style:name="co20" style:family="table-column">
      <style:table-column-properties fo:break-before="auto" style:column-width="2.45in"/>
    </style:style>
    <style:style style:name="co21" style:family="table-column">
      <style:table-column-properties fo:break-before="auto" style:column-width="6.4047in"/>
    </style:style>
    <style:style style:name="co22" style:family="table-column">
      <style:table-column-properties fo:break-before="auto" style:column-width="0.9744in"/>
    </style:style>
    <style:style style:name="co23"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epositories">
      <style:table-properties table:display="true" style:writing-mode="lr-tb"/>
    </style:style>
    <style:style style:name="ta2" style:family="table" style:master-page-name="PageStyle_5f_Keep">
      <style:table-properties table:display="true" style:writing-mode="lr-tb"/>
    </style:style>
    <style:style style:name="ta3" style:family="table" style:master-page-name="PageStyle_5f_Trash">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si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4" table:default-cell-style-name="Default"/>
        <table:table-column table:style-name="co6" table:default-cell-style-name="Default"/>
        <table:table-column table:style-name="co13" table:default-cell-style-name="Default"/>
        <table:table-column table:style-name="co14" table:default-cell-style-name="Default"/>
        <table:table-column table:style-name="co13"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22" table:number-columns-repeated="992" table:default-cell-style-name="Default"/>
        <table:table-row table:style-name="ro1">
          <table:table-cell table:style-name="ce1" office:value-type="string" calcext:value-type="string">
            <text:p>Ask</text:p>
          </table:table-cell>
          <table:table-cell table:style-name="ce4" office:value-type="string" calcext:value-type="string">
            <text:p>Archive</text:p>
          </table:table-cell>
          <table:table-cell table:style-name="ce4" office:value-type="string" calcext:value-type="string">
            <text:p>Keep</text:p>
          </table:table-cell>
          <table:table-cell table:style-name="ce1" office:value-type="string" calcext:value-type="string">
            <text:p>repo name</text:p>
          </table:table-cell>
          <table:table-cell table:style-name="ce1" office:value-type="string" calcext:value-type="string">
            <text:p>organization name</text:p>
          </table:table-cell>
          <table:table-cell table:style-name="ce1" office:value-type="string" calcext:value-type="string">
            <text:p>language</text:p>
          </table:table-cell>
          <table:table-cell table:style-name="ce1" office:value-type="string" calcext:value-type="string">
            <text:p>archived</text:p>
          </table:table-cell>
          <table:table-cell table:style-name="ce1" office:value-type="string" calcext:value-type="string">
            <text:p>is fork</text:p>
          </table:table-cell>
          <table:table-cell table:style-name="ce1" office:value-type="string" calcext:value-type="string">
            <text:p>pushed at</text:p>
          </table:table-cell>
          <table:table-cell table:style-name="ce1" office:value-type="string" calcext:value-type="string">
            <text:p>last commit date</text:p>
          </table:table-cell>
          <table:table-cell table:style-name="ce4" office:value-type="string" calcext:value-type="string">
            <text:p>last release date</text:p>
          </table:table-cell>
          <table:table-cell table:style-name="ce4" office:value-type="string" calcext:value-type="string">
            <text:p>open issues count</text:p>
          </table:table-cell>
          <table:table-cell table:style-name="ce4" office:value-type="string" calcext:value-type="string">
            <text:p>open prs count</text:p>
          </table:table-cell>
          <table:table-cell table:style-name="ce1" office:value-type="string" calcext:value-type="string">
            <text:p>git submodules</text:p>
          </table:table-cell>
          <table:table-cell table:style-name="ce1" office:value-type="string" calcext:value-type="string">
            <text:p>npmjs package name</text:p>
          </table:table-cell>
          <table:table-cell table:style-name="ce1" office:value-type="string" calcext:value-type="string">
            <text:p>npm is deprecated</text:p>
          </table:table-cell>
          <table:table-cell table:style-name="ce1" office:value-type="string" calcext:value-type="string">
            <text:p>npmjs downloads last year</text:p>
          </table:table-cell>
          <table:table-cell table:style-name="ce1" office:value-type="string" calcext:value-type="string">
            <text:p>npmjs last published</text:p>
          </table:table-cell>
          <table:table-cell table:style-name="ce1" office:value-type="string" calcext:value-type="string">
            <text:p>npmjs used by</text:p>
          </table:table-cell>
          <table:table-cell table:style-name="ce1" office:value-type="string" calcext:value-type="string">
            <text:p>npmjs uses</text:p>
          </table:table-cell>
          <table:table-cell table:style-name="ce1" office:value-type="string" calcext:value-type="string">
            <text:p>github dependents</text:p>
          </table:table-cell>
          <table:table-cell table:style-name="ce1" office:value-type="string" calcext:value-type="string">
            <text:p>github contributors</text:p>
          </table:table-cell>
          <table:table-cell table:style-name="ce1" office:value-type="string" calcext:value-type="string">
            <text:p>github release count</text:p>
          </table:table-cell>
          <table:table-cell table:style-name="ce1" office:value-type="string" calcext:value-type="string">
            <text:p>github downloads</text:p>
          </table:table-cell>
          <table:table-cell table:style-name="ce1" office:value-type="string" calcext:value-type="string">
            <text:p>repo url</text:p>
          </table:table-cell>
          <table:table-cell table:style-name="ce4" office:value-type="string" calcext:value-type="string">
            <text:p>last edit date</text:p>
          </table:table-cell>
          <table:table-cell table:style-name="ce4" office:value-type="string" calcext:value-type="string">
            <text:p>is submodule of</text:p>
          </table:table-cell>
          <table:table-cell table:style-name="ce1" office:value-type="string" calcext:value-type="string">
            <text:p>repo full name</text:p>
          </table:table-cell>
          <table:table-cell table:style-name="ce4" office:value-type="string" calcext:value-type="string">
            <text:p>classification</text:p>
          </table:table-cell>
          <table:table-cell table:style-name="ce1" office:value-type="string" calcext:value-type="string">
            <text:p>classification reason</text:p>
          </table:table-cell>
          <table:table-cell table:style-name="ce4" office:value-type="string" calcext:value-type="string">
            <text:p>npmjs classification</text:p>
          </table:table-cell>
          <table:table-cell table:style-name="ce1" office:value-type="string" calcext:value-type="string">
            <text:p>npmjs classification reason</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dmin-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3-12T02:03:11Z</text:p>
          </table:table-cell>
          <table:table-cell table:style-name="ce1" office:value-type="string" calcext:value-type="string">
            <text:p>2021-03-12T02:03:0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admin-app</text:p>
          </table:table-cell>
          <table:table-cell table:style-name="ce1" table:number-columns-repeated="4"/>
          <table:table-cell table:style-name="ce1" office:value-type="string" calcext:value-type="string">
            <text:p>['gitea-react-toolkit', 'translation-helps-rcl', 'resource-workspace-rcl']</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dmin-app" xlink:type="simple">https://github.com/unfoldingWord-box3/admin-app</text:a></text:p>
          </table:table-cell>
          <table:table-cell table:style-name="ce4" office:value-type="string" calcext:value-type="string">
            <text:p>2021-03-12T02:03:10Z</text:p>
          </table:table-cell>
          <table:table-cell table:style-name="ce4"/>
          <table:table-cell table:style-name="ce1" office:value-type="string" calcext:value-type="string">
            <text:p>unfoldingWord-box3/admin-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chor-alignment-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21T18:55:52Z</text:p>
          </table:table-cell>
          <table:table-cell table:style-name="ce1" office:value-type="string" calcext:value-type="string">
            <text:p>2021-07-06T04:48:26Z</text:p>
          </table:table-cell>
          <table:table-cell table:style-name="ce4"/>
          <table:table-cell table:number-columns-repeated="2" table:style-name="ce4" office:value-type="float" office:value="2" calcext:value-type="float">
            <text:p>2</text:p>
          </table:table-cell>
          <table:table-cell table:style-name="ce1"/>
          <table:table-cell table:style-name="ce1" office:value-type="string" calcext:value-type="string">
            <text:p>anchor-alignment-poc</text:p>
          </table:table-cell>
          <table:table-cell table:style-name="ce1" table:number-columns-repeated="4"/>
          <table:table-cell table:style-name="ce1" office:value-type="string" calcext:value-type="string">
            <text:p>['alignment-editor-rcl', 'bible-reference-rcl', 'gitea-react-toolkit', 'string-punctuation-tokenizer']</text:p>
          </table:table-cell>
          <table:table-cell table:style-name="ce1"/>
          <table:table-cell table:style-name="ce1" office:value-type="string" calcext:value-type="string">
            <text:p>['ancientTexts-net', 'klappy', 'themikej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nchor-alignment-poc" xlink:type="simple">https://github.com/unfoldingWord-box3/anchor-alignment-poc</text:a></text:p>
          </table:table-cell>
          <table:table-cell table:style-name="ce4" office:value-type="string" calcext:value-type="string">
            <text:p>2021-08-09T17:50:41Z</text:p>
          </table:table-cell>
          <table:table-cell table:style-name="ce4"/>
          <table:table-cell table:style-name="ce1" office:value-type="string" calcext:value-type="string">
            <text:p>unfoldingWord-box3/anchor-alignment-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udio-obs-navigator</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08T13:58:29Z</text:p>
          </table:table-cell>
          <table:table-cell table:style-name="ce1" office:value-type="string" calcext:value-type="string">
            <text:p>2024-03-08T12:08:48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audio-obs-navigator</text:p>
          </table:table-cell>
          <table:table-cell table:style-name="ce1" table:number-columns-repeated="6"/>
          <table:table-cell table:style-name="ce1" office:value-type="string" calcext:value-type="string">
            <text:p>['kintsoogi', 'blm',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udio-obs-navigator" xlink:type="simple">https://github.com/unfoldingWord-box3/audio-obs-navigator</text:a></text:p>
          </table:table-cell>
          <table:table-cell table:style-name="ce4" office:value-type="string" calcext:value-type="string">
            <text:p>2024-03-05T18:54:24Z</text:p>
          </table:table-cell>
          <table:table-cell table:style-name="ce4"/>
          <table:table-cell table:style-name="ce1" office:value-type="string" calcext:value-type="string">
            <text:p>unfoldingWord-box3/audio-obs-navigato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udio-quiz</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9T13:55:01Z</text:p>
          </table:table-cell>
          <table:table-cell table:style-name="ce1" office:value-type="string" calcext:value-type="string">
            <text:p>2024-01-19T13:53:4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oor43-preview-app</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udio-quiz" xlink:type="simple">https://github.com/unfoldingWord-box3/audio-quiz</text:a></text:p>
          </table:table-cell>
          <table:table-cell table:style-name="ce4" office:value-type="string" calcext:value-type="string">
            <text:p>2024-02-28T16:05:13Z</text:p>
          </table:table-cell>
          <table:table-cell table:style-name="ce4"/>
          <table:table-cell table:style-name="ce1" office:value-type="string" calcext:value-type="string">
            <text:p>unfoldingWord-box3/audio-quiz</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utographa</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35:21Z</text:p>
          </table:table-cell>
          <table:table-cell table:style-name="ce1" office:value-type="string" calcext:value-type="string">
            <text:p>2019-04-15T16:35:18Z</text:p>
          </table:table-cell>
          <table:table-cell table:style-name="ce4"/>
          <table:table-cell table:style-name="ce4" office:value-type="float" office:value="12" calcext:value-type="float">
            <text:p>12</text:p>
          </table:table-cell>
          <table:table-cell table:style-name="ce4" office:value-type="float" office:value="0" calcext:value-type="float">
            <text:p>0</text:p>
          </table:table-cell>
          <table:table-cell table:style-name="ce1"/>
          <table:table-cell table:style-name="ce1" office:value-type="string" calcext:value-type="string">
            <text:p>Autographa</text:p>
          </table:table-cell>
          <table:table-cell table:style-name="ce1" table:number-columns-repeated="6"/>
          <table:table-cell table:style-name="ce1" office:value-type="string" calcext:value-type="string">
            <text:p>['nbajpai9', 'ayushnig', 'sandeeponrails', 'klappy', 'ImgBotApp',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utographa" xlink:type="simple">https://github.com/unfoldingWord-dev/Autographa</text:a></text:p>
          </table:table-cell>
          <table:table-cell table:style-name="ce4" office:value-type="string" calcext:value-type="string">
            <text:p>2019-10-22T20:35:02Z</text:p>
          </table:table-cell>
          <table:table-cell table:style-name="ce4"/>
          <table:table-cell table:style-name="ce1" office:value-type="string" calcext:value-type="string">
            <text:p>unfoldingWord-dev/Autographa</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aruch</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20T22:23:08Z</text:p>
          </table:table-cell>
          <table:table-cell table:style-name="ce1" office:value-type="string" calcext:value-type="string">
            <text:p>2026-04-20T22:22:00Z</text:p>
          </table:table-cell>
          <table:table-cell table:style-name="ce4"/>
          <table:table-cell table:style-name="ce4" office:value-type="float" office:value="6" calcext:value-type="float">
            <text:p>6</text:p>
          </table:table-cell>
          <table:table-cell table:style-name="ce4" office:value-type="float" office:value="1" calcext:value-type="float">
            <text:p>1</text:p>
          </table:table-cell>
          <table:table-cell table:style-name="ce1"/>
          <table:table-cell table:style-name="ce1" office:value-type="string" calcext:value-type="string">
            <text:p>baruch</text:p>
          </table:table-cell>
          <table:table-cell table:style-name="ce1" table:number-columns-repeated="6"/>
          <table:table-cell table:style-name="ce1" office:value-type="string" calcext:value-type="string">
            <text:p>['IanLindsley', 'ILindsley', 'clau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aruch" xlink:type="simple">https://github.com/unfoldingWord/baruch</text:a></text:p>
          </table:table-cell>
          <table:table-cell table:style-name="ce4" office:value-type="string" calcext:value-type="string">
            <text:p>2026-04-20T22:22:05Z</text:p>
          </table:table-cell>
          <table:table-cell table:style-name="ce4"/>
          <table:table-cell table:style-name="ce1" office:value-type="string" calcext:value-type="string">
            <text:p>unfoldingWord/baruch</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beta-bibel-demo</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08T14:50:24Z</text:p>
          </table:table-cell>
          <table:table-cell table:style-name="ce1" office:value-type="string" calcext:value-type="string">
            <text:p>2024-07-26T16:13:5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eta-bibel-wiki</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beta-bibel-demo" xlink:type="simple">https://github.com/unfoldingWord-box3/beta-bibel-demo</text:a></text:p>
          </table:table-cell>
          <table:table-cell table:style-name="ce4" office:value-type="string" calcext:value-type="string">
            <text:p>2024-08-08T16:43:06Z</text:p>
          </table:table-cell>
          <table:table-cell table:style-name="ce4"/>
          <table:table-cell table:style-name="ce1" office:value-type="string" calcext:value-type="string">
            <text:p>unfoldingWord-box3/beta-bibel-demo</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bible-preview-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11T10:48:37Z</text:p>
          </table:table-cell>
          <table:table-cell table:style-name="ce1" office:value-type="string" calcext:value-type="string">
            <text:p>2023-10-11T10:45:2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ible-preview-app</text:p>
          </table:table-cell>
          <table:table-cell table:style-name="ce1" table:number-columns-repeated="4"/>
          <table:table-cell table:style-name="ce1" office:value-type="string" calcext:value-type="string">
            <text:p>['bible-reference-rcl', 'dcs-js']</text:p>
          </table:table-cell>
          <table:table-cell table:style-name="ce1"/>
          <table:table-cell table:style-name="ce1" office:value-type="string" calcext:value-type="string">
            <text:p>['richmahn',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bible-preview-app" xlink:type="simple">https://github.com/unfoldingWord-box3/bible-preview-app</text:a></text:p>
          </table:table-cell>
          <table:table-cell table:style-name="ce4" office:value-type="string" calcext:value-type="string">
            <text:p>2023-08-01T17:31:54Z</text:p>
          </table:table-cell>
          <table:table-cell table:style-name="ce4"/>
          <table:table-cell table:style-name="ce1" office:value-type="string" calcext:value-type="string">
            <text:p>unfoldingWord-box3/bible-preview-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book-package-viewer-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19T16:22:36Z</text:p>
          </table:table-cell>
          <table:table-cell table:style-name="ce1" office:value-type="string" calcext:value-type="string">
            <text:p>2020-10-19T16:21:5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ook-package-viewer-poc</text:p>
          </table:table-cell>
          <table:table-cell table:style-name="ce1" table:number-columns-repeated="4"/>
          <table:table-cell table:style-name="ce1" office:value-type="string" calcext:value-type="string">
            <text:p>['gitea-react-toolkit', 'markdown-translatable', 'scripture-resources-rcl']</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book-package-viewer-poc" xlink:type="simple">https://github.com/unfoldingWord-box3/book-package-viewer-poc</text:a></text:p>
          </table:table-cell>
          <table:table-cell table:style-name="ce4" office:value-type="string" calcext:value-type="string">
            <text:p>2020-10-21T20:48:29Z</text:p>
          </table:table-cell>
          <table:table-cell table:style-name="ce4"/>
          <table:table-cell table:style-name="ce1" office:value-type="string" calcext:value-type="string">
            <text:p>unfoldingWord-box3/book-package-viewer-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p-assista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6T22:45:3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zulip-bot</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benjamin-test', 'deferredreward', 'stephenwunrow', 'claude', 'bp-assistant 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p-assistant" xlink:type="simple">https://github.com/unfoldingWord/bp-assistant</text:a></text:p>
          </table:table-cell>
          <table:table-cell table:style-name="ce4" office:value-type="string" calcext:value-type="string">
            <text:p>2026-06-16T22:45:44Z</text:p>
          </table:table-cell>
          <table:table-cell table:style-name="ce4"/>
          <table:table-cell table:style-name="ce1" office:value-type="string" calcext:value-type="string">
            <text:p>unfoldingWord/bp-assistant</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p-assistant-skill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4:59:01Z</text:p>
          </table:table-cell>
          <table:table-cell table:style-name="ce1" office:value-type="string" calcext:value-type="string">
            <text:p>2026-06-17T14:58:59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cskillbp-prompt-over-code</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BW Bot', 'deferredreward', 'benjamin-test', 'stephenwunrow', 'Nightly Issue 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p-assistant-skills" xlink:type="simple">https://github.com/unfoldingWord/bp-assistant-skills</text:a></text:p>
          </table:table-cell>
          <table:table-cell table:style-name="ce4" office:value-type="string" calcext:value-type="string">
            <text:p>2026-06-17T15:03:26Z</text:p>
          </table:table-cell>
          <table:table-cell table:style-name="ce4"/>
          <table:table-cell table:style-name="ce1" office:value-type="string" calcext:value-type="string">
            <text:p>unfoldingWord/bp-assistant-skill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hecking-app-theia/brows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rowser-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browse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hecking-app-theia/Checking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hecking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Checking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hecking-app-theia/CheckingTool</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heckingTool</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CheckingTool</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hecking-app-theia/startChecking</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tartChecking</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startChecking</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heckingRubric_tool</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28:23Z</text:p>
          </table:table-cell>
          <table:table-cell table:style-name="ce1" office:value-type="string" calcext:value-type="string">
            <text:p>2019-04-15T16:28:18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heckingRubricTool</text:p>
          </table:table-cell>
          <table:table-cell table:style-name="ce1" table:number-columns-repeated="6"/>
          <table:table-cell table:style-name="ce1" office:value-type="string" calcext:value-type="string">
            <text:p>['mannycolon', 'ihoegen', 'ImgBotAp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checkingRubric_tool" xlink:type="simple">https://github.com/unfoldingWord-dev/checkingRubric_tool</text:a></text:p>
          </table:table-cell>
          <table:table-cell table:style-name="ce4" office:value-type="string" calcext:value-type="string">
            <text:p>2019-10-22T19:40:10Z</text:p>
          </table:table-cell>
          <table:table-cell table:style-name="ce4"/>
          <table:table-cell table:style-name="ce1" office:value-type="string" calcext:value-type="string">
            <text:p>unfoldingWord-dev/checkingRubric_tool</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odex-sb-handler</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12-03T13:53:2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b-handler-sample</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odex-sb-handler" xlink:type="simple">https://github.com/unfoldingWord-box3/codex-sb-handler</text:a></text:p>
          </table:table-cell>
          <table:table-cell table:style-name="ce4" office:value-type="string" calcext:value-type="string">
            <text:p>2024-12-03T13:57:40Z</text:p>
          </table:table-cell>
          <table:table-cell table:style-name="ce4"/>
          <table:table-cell table:style-name="ce1" office:value-type="string" calcext:value-type="string">
            <text:p>unfoldingWord-box3/codex-sb-handl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omment_box</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3-13T15:21:35Z</text:p>
          </table:table-cell>
          <table:table-cell table:style-name="ce1" office:value-type="string" calcext:value-type="string">
            <text:p>2017-03-13T15:19:3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ommentBox</text:p>
          </table:table-cell>
          <table:table-cell table:style-name="ce1" table:number-columns-repeated="6"/>
          <table:table-cell table:style-name="ce1" office:value-type="string" calcext:value-type="string">
            <text:p>['mannycolon', 'ihoegen',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comment_box" xlink:type="simple">https://github.com/unfoldingWord-dev/comment_box</text:a></text:p>
          </table:table-cell>
          <table:table-cell table:style-name="ce4" office:value-type="string" calcext:value-type="string">
            <text:p>2019-10-22T19:37:22Z</text:p>
          </table:table-cell>
          <table:table-cell table:style-name="ce4"/>
          <table:table-cell table:style-name="ce1" office:value-type="string" calcext:value-type="string">
            <text:p>unfoldingWord-dev/comment_box</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desktop-app-limina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15T13:09:17Z</text:p>
          </table:table-cell>
          <table:table-cell table:style-name="ce1" office:value-type="string" calcext:value-type="string">
            <text:p>2025-05-13T00:55:06Z</text:p>
          </table:table-cell>
          <table:table-cell table:style-name="ce4"/>
          <table:table-cell table:number-columns-repeated="2" table:style-name="ce4" office:value-type="float" office:value="2" calcext:value-type="float">
            <text:p>2</text:p>
          </table:table-cell>
          <table:table-cell table:style-name="ce1"/>
          <table:table-cell table:style-name="ce1" office:value-type="string" calcext:value-type="string">
            <text:p>pankosmia-app-builder</text:p>
          </table:table-cell>
          <table:table-cell table:style-name="ce1" table:number-columns-repeated="6"/>
          <table:table-cell table:style-name="ce1" office:value-type="string" calcext:value-type="string">
            <text:p>['RUN-Projects', 'mvahowe', 'PhotoNomad0',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esktop-app-liminal" xlink:type="simple">https://github.com/unfoldingWord-box3/desktop-app-liminal</text:a></text:p>
          </table:table-cell>
          <table:table-cell table:style-name="ce4" office:value-type="string" calcext:value-type="string">
            <text:p>2025-05-14T14:59:15Z</text:p>
          </table:table-cell>
          <table:table-cell table:style-name="ce4"/>
          <table:table-cell table:style-name="ce1" office:value-type="string" calcext:value-type="string">
            <text:p>unfoldingWord-box3/desktop-app-liminal</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fia-mc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1T19:28:14Z</text:p>
          </table:table-cell>
          <table:table-cell table:style-name="ce1" office:value-type="string" calcext:value-type="string">
            <text:p>2026-03-11T19:28:02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fia-mcp</text:p>
          </table:table-cell>
          <table:table-cell table:style-name="ce1" table:number-columns-repeated="6"/>
          <table:table-cell table:style-name="ce1" office:value-type="string" calcext:value-type="string">
            <text:p>['ILindsley', '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a-mcp" xlink:type="simple">https://github.com/unfoldingWord/fia-mcp</text:a></text:p>
          </table:table-cell>
          <table:table-cell table:style-name="ce4" office:value-type="string" calcext:value-type="string">
            <text:p>2026-03-11T19:28:18Z</text:p>
          </table:table-cell>
          <table:table-cell table:style-name="ce4"/>
          <table:table-cell table:style-name="ce1" office:value-type="string" calcext:value-type="string">
            <text:p>unfoldingWord/fia-mc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fred-zulip-bot-work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09T16:01:3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fred-zulip-bot-worker</text:p>
          </table:table-cell>
          <table:table-cell table:style-name="ce1" table:number-columns-repeated="6"/>
          <table:table-cell table:style-name="ce1" office:value-type="string" calcext:value-type="string">
            <text:p>['IanLindsley',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red-zulip-bot-worker" xlink:type="simple">https://github.com/unfoldingWord/fred-zulip-bot-worker</text:a></text:p>
          </table:table-cell>
          <table:table-cell table:style-name="ce4" office:value-type="string" calcext:value-type="string">
            <text:p>2026-05-09T16:01:43Z</text:p>
          </table:table-cell>
          <table:table-cell table:style-name="ce4"/>
          <table:table-cell table:style-name="ce1" office:value-type="string" calcext:value-type="string">
            <text:p>unfoldingWord/fred-zulip-bot-work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itea-offline-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13:35:32Z</text:p>
          </table:table-cell>
          <table:table-cell table:style-name="ce1" office:value-type="string" calcext:value-type="string">
            <text:p>2020-08-12T19:36:04Z</text:p>
          </table:table-cell>
          <table:table-cell table:style-name="ce4"/>
          <table:table-cell table:number-columns-repeated="2" table:style-name="ce4" office:value-type="float" office:value="20" calcext:value-type="float">
            <text:p>20</text:p>
          </table:table-cell>
          <table:table-cell table:style-name="ce1"/>
          <table:table-cell table:style-name="ce1" office:value-type="string" calcext:value-type="string">
            <text:p>gitea-offline-poc</text:p>
          </table:table-cell>
          <table:table-cell table:style-name="ce1" table:number-columns-repeated="4"/>
          <table:table-cell table:style-name="ce1" office:value-type="string" calcext:value-type="string">
            <text:p>['gitea-react-toolkit', '@unfoldingword/eslint-config', 'markdown-translatable']</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itea-offline-poc" xlink:type="simple">https://github.com/unfoldingWord-box3/gitea-offline-poc</text:a></text:p>
          </table:table-cell>
          <table:table-cell table:style-name="ce4" office:value-type="string" calcext:value-type="string">
            <text:p>2020-08-12T19:36:13Z</text:p>
          </table:table-cell>
          <table:table-cell table:style-name="ce4"/>
          <table:table-cell table:style-name="ce1" office:value-type="string" calcext:value-type="string">
            <text:p>unfoldingWord-box3/gitea-offline-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office:value-type="string" calcext:value-type="string">
            <text:p>Richard Mahn</text:p>
          </table:table-cell>
          <table:table-cell table:style-name="ce4" office:value-type="string" calcext:value-type="string">
            <text:p>x</text:p>
          </table:table-cell>
          <table:table-cell table:style-name="ce4"/>
          <table:table-cell table:style-name="ce1" office:value-type="string" calcext:value-type="string">
            <text:p>gutenberg-projec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3-01T21:14:08Z</text:p>
          </table:table-cell>
          <table:table-cell table:style-name="ce1" office:value-type="string" calcext:value-type="string">
            <text:p>2022-03-01T21:14:0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bs-pdf-poc</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utenberg-project" xlink:type="simple">https://github.com/unfoldingWord-box3/gutenberg-project</text:a></text:p>
          </table:table-cell>
          <table:table-cell table:style-name="ce4" office:value-type="string" calcext:value-type="string">
            <text:p>2022-03-01T21:05:23Z</text:p>
          </table:table-cell>
          <table:table-cell table:style-name="ce4"/>
          <table:table-cell table:style-name="ce1" office:value-type="string" calcext:value-type="string">
            <text:p>unfoldingWord-box3/gutenberg-project</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lang-as-graph</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5T01:22:08Z</text:p>
          </table:table-cell>
          <table:table-cell table:style-name="ce1" office:value-type="string" calcext:value-type="string">
            <text:p>2020-07-21T13:00:01Z</text:p>
          </table:table-cell>
          <table:table-cell table:style-name="ce4"/>
          <table:table-cell table:number-columns-repeated="2" table:style-name="ce4" office:value-type="float" office:value="5" calcext:value-type="float">
            <text:p>5</text:p>
          </table:table-cell>
          <table:table-cell table:style-name="ce1"/>
          <table:table-cell table:style-name="ce1" office:value-type="string" calcext:value-type="string">
            <text:p>language-database-poc</text:p>
          </table:table-cell>
          <table:table-cell table:style-name="ce1" table:number-columns-repeated="6"/>
          <table:table-cell table:style-name="ce1" office:value-type="string" calcext:value-type="string">
            <text:p>['ivanmhale',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lang-as-graph" xlink:type="simple">https://github.com/unfoldingWord-box3/lang-as-graph</text:a></text:p>
          </table:table-cell>
          <table:table-cell table:style-name="ce4" office:value-type="string" calcext:value-type="string">
            <text:p>2020-07-21T13:00:12Z</text:p>
          </table:table-cell>
          <table:table-cell table:style-name="ce4"/>
          <table:table-cell table:style-name="ce1" office:value-type="string" calcext:value-type="string">
            <text:p>unfoldingWord-box3/lang-as-graph</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md-converter-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2-20T19:28:22Z</text:p>
          </table:table-cell>
          <table:table-cell table:style-name="ce4"/>
          <table:table-cell table:style-name="ce4" office:value-type="float" office:value="30" calcext:value-type="float">
            <text:p>30</text:p>
          </table:table-cell>
          <table:table-cell table:style-name="ce4" office:value-type="float" office:value="0" calcext:value-type="float">
            <text:p>0</text:p>
          </table:table-cell>
          <table:table-cell table:style-name="ce1"/>
          <table:table-cell table:style-name="ce1" office:value-type="string" calcext:value-type="string">
            <text:p>md-tsv-converter-app</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mannycolon', 'PhotoNomad0', 'ImgBotAp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md-converter-app" xlink:type="simple">https://github.com/unfoldingWord-box3/md-converter-app</text:a></text:p>
          </table:table-cell>
          <table:table-cell table:style-name="ce4" office:value-type="string" calcext:value-type="string">
            <text:p>2021-12-20T19:28:57Z</text:p>
          </table:table-cell>
          <table:table-cell table:style-name="ce4"/>
          <table:table-cell table:style-name="ce1" office:value-type="string" calcext:value-type="string">
            <text:p>unfoldingWord-box3/md-converte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next-js-template</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9-26T15:07:50Z</text:p>
          </table:table-cell>
          <table:table-cell table:style-name="ce4"/>
          <table:table-cell table:style-name="ce4" office:value-type="float" office:value="20" calcext:value-type="float">
            <text:p>20</text:p>
          </table:table-cell>
          <table:table-cell table:style-name="ce4" office:value-type="float" office:value="0" calcext:value-type="float">
            <text:p>0</text:p>
          </table:table-cell>
          <table:table-cell table:style-name="ce1"/>
          <table:table-cell table:style-name="ce1" office:value-type="string" calcext:value-type="string">
            <text:p>next-js-template</text:p>
          </table:table-cell>
          <table:table-cell table:style-name="ce1" table:number-columns-repeated="4"/>
          <table:table-cell table:style-name="ce1" office:value-type="string" calcext:value-type="string">
            <text:p>['gitea-react-toolkit', 'markdown-translatable', 'resource-workspace-rcl', 'scripture-resources-rcl', 'single-scripture-rcl', 'tc-ui-toolkit', 'translation-helps-rcl', 'word-aligner']</text:p>
          </table:table-cell>
          <table:table-cell table:style-name="ce1"/>
          <table:table-cell table:style-name="ce1" office:value-type="string" calcext:value-type="string">
            <text:p>['mandolyte', 'superdav42', 'mannycolon', '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next-js-template" xlink:type="simple">https://github.com/unfoldingWord-box3/next-js-template</text:a></text:p>
          </table:table-cell>
          <table:table-cell table:style-name="ce4" office:value-type="string" calcext:value-type="string">
            <text:p>2022-06-17T15:46:29Z</text:p>
          </table:table-cell>
          <table:table-cell table:style-name="ce4"/>
          <table:table-cell table:style-name="ce1" office:value-type="string" calcext:value-type="string">
            <text:p>unfoldingWord-box3/next-js-templat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node-cli-add-gl-quotes-to-tsv-file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03T22:53:14Z</text:p>
          </table:table-cell>
          <table:table-cell table:style-name="ce1" office:value-type="string" calcext:value-type="string">
            <text:p>2025-11-03T22:53:12Z</text:p>
          </table:table-cell>
          <table:table-cell table:style-name="ce4" office:value-type="string" calcext:value-type="string">
            <text:p>2025-04-23T20:48:30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add-gl-quotes-to-tsv-files</text:p>
          </table:table-cell>
          <table:table-cell table:style-name="ce1" table:number-columns-repeated="4"/>
          <table:table-cell table:style-name="ce1" office:value-type="string" calcext:value-type="string">
            <text:p>tsv-quote-converters</text:p>
          </table:table-cell>
          <table:table-cell table:style-name="ce1"/>
          <table:table-cell table:style-name="ce1" office:value-type="string" calcext:value-type="string">
            <text:p>richmahn</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node-cli-add-gl-quotes-to-tsv-files" xlink:type="simple">https://github.com/unfoldingWord/node-cli-add-gl-quotes-to-tsv-files</text:a></text:p>
          </table:table-cell>
          <table:table-cell table:style-name="ce4" office:value-type="string" calcext:value-type="string">
            <text:p>2025-11-03T22:53:18Z</text:p>
          </table:table-cell>
          <table:table-cell table:style-name="ce4"/>
          <table:table-cell table:style-name="ce1" office:value-type="string" calcext:value-type="string">
            <text:p>unfoldingWord/node-cli-add-gl-quotes-to-tsv-file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bs-audio-navigat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7-05T11:05:5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bs-audio-navigation</text:p>
          </table:table-cell>
          <table:table-cell table:style-name="ce1" table:number-columns-repeated="6"/>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obs-audio-navigation" xlink:type="simple">https://github.com/unfoldingWord-box3/obs-audio-navigation</text:a></text:p>
          </table:table-cell>
          <table:table-cell table:style-name="ce4" office:value-type="string" calcext:value-type="string">
            <text:p>2024-07-05T11:13:09Z</text:p>
          </table:table-cell>
          <table:table-cell table:style-name="ce4"/>
          <table:table-cell table:style-name="ce1" office:value-type="string" calcext:value-type="string">
            <text:p>unfoldingWord-box3/obs-audio-navigation</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bs-pdf-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26T01:31:57Z</text:p>
          </table:table-cell>
          <table:table-cell table:style-name="ce1" office:value-type="string" calcext:value-type="string">
            <text:p>2023-04-26T01:31:5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bs-pdf-poc</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obs-pdf-poc" xlink:type="simple">https://github.com/unfoldingWord-box3/obs-pdf-poc</text:a></text:p>
          </table:table-cell>
          <table:table-cell table:style-name="ce4" office:value-type="string" calcext:value-type="string">
            <text:p>2021-11-03T19:29:18Z</text:p>
          </table:table-cell>
          <table:table-cell table:style-name="ce4"/>
          <table:table-cell table:style-name="ce1" office:value-type="string" calcext:value-type="string">
            <text:p>unfoldingWord-box3/obs-pdf-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office:value-type="string" calcext:value-type="string">
            <text:p>Richard Mahn</text:p>
          </table:table-cell>
          <table:table-cell table:style-name="ce4" office:value-type="string" calcext:value-type="string">
            <text:p>x</text:p>
          </table:table-cell>
          <table:table-cell table:style-name="ce4"/>
          <table:table-cell table:style-name="ce1" office:value-type="string" calcext:value-type="string">
            <text:p>obsidian-uw-rc-link-opener</text:p>
          </table:table-cell>
          <table:table-cell table:style-name="ce1" office:value-type="string" calcext:value-type="string">
            <text:p>unfoldingWord-dev</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08T17:40:36Z</text:p>
          </table:table-cell>
          <table:table-cell table:style-name="ce1" office:value-type="string" calcext:value-type="string">
            <text:p>2021-06-08T17:40:33Z</text:p>
          </table:table-cell>
          <table:table-cell table:style-name="ce4" office:value-type="string" calcext:value-type="string">
            <text:p>2021-06-07T19:26:06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uw-rc-link-opener</text:p>
          </table:table-cell>
          <table:table-cell table:style-name="ce1" table:number-columns-repeated="6"/>
          <table:table-cell table:style-name="ce1" office:value-type="string" calcext:value-type="string">
            <text:p>richmahn</text:p>
          </table:table-cell>
          <table:table-cell table:style-name="ce1" office:value-type="float" office:value="1" calcext:value-type="float">
            <text:p>1</text:p>
          </table:table-cell>
          <table:table-cell table:style-name="ce1" office:value-type="float" office:value="8" calcext:value-type="float">
            <text:p>8</text:p>
          </table:table-cell>
          <table:table-cell table:style-name="ce5" office:value-type="string" calcext:value-type="string">
            <text:p><text:a xlink:href="https://github.com/unfoldingWord-dev/obsidian-uw-rc-link-opener" xlink:type="simple">https://github.com/unfoldingWord-dev/obsidian-uw-rc-link-opener</text:a></text:p>
          </table:table-cell>
          <table:table-cell table:style-name="ce4" office:value-type="string" calcext:value-type="string">
            <text:p>2021-06-08T17:40:39Z</text:p>
          </table:table-cell>
          <table:table-cell table:style-name="ce4"/>
          <table:table-cell table:style-name="ce1" office:value-type="string" calcext:value-type="string">
            <text:p>unfoldingWord-dev/obsidian-uw-rc-link-open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ce-oak-ed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7T07:56:18Z</text:p>
          </table:table-cell>
          <table:table-cell table:style-name="ce1" office:value-type="string" calcext:value-type="string">
            <text:p>2024-01-11T12:01:38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CE Oak Edit</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oak-edit" xlink:type="simple">https://github.com/unfoldingWord/oce-oak-edit</text:a></text:p>
          </table:table-cell>
          <table:table-cell table:style-name="ce4" office:value-type="string" calcext:value-type="string">
            <text:p>2023-09-18T05:39:45Z</text:p>
          </table:table-cell>
          <table:table-cell table:style-name="ce4"/>
          <table:table-cell table:style-name="ce1" office:value-type="string" calcext:value-type="string">
            <text:p>unfoldingWord/oce-oak-edit</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ce-oak-rend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1-12T14:27:0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ce-oak-render</text:p>
          </table:table-cell>
          <table:table-cell table:style-name="ce1" table:number-columns-repeated="4"/>
          <table:table-cell table:style-name="ce1" office:value-type="string" calcext:value-type="string">
            <text:p>epitelete-html</text:p>
          </table:table-cell>
          <table:table-cell table:style-name="ce1"/>
          <table:table-cell table:style-name="ce1" office:value-type="string" calcext:value-type="string">
            <text:p>['larsgson',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oak-render" xlink:type="simple">https://github.com/unfoldingWord/oce-oak-render</text:a></text:p>
          </table:table-cell>
          <table:table-cell table:style-name="ce4" office:value-type="string" calcext:value-type="string">
            <text:p>2023-09-13T16:01:45Z</text:p>
          </table:table-cell>
          <table:table-cell table:style-name="ce4"/>
          <table:table-cell table:style-name="ce1" office:value-type="string" calcext:value-type="string">
            <text:p>unfoldingWord/oce-oak-ren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pen-languag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06T18:22:40Z</text:p>
          </table:table-cell>
          <table:table-cell table:style-name="ce1" office:value-type="string" calcext:value-type="string">
            <text:p>2025-02-06T18:22:3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penlanguages</text:p>
          </table:table-cell>
          <table:table-cell table:style-name="ce1" table:number-columns-repeated="6"/>
          <table:table-cell table:style-name="ce1" office:value-type="string" calcext:value-type="string">
            <text:p>samuelj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pen-languages" xlink:type="simple">https://github.com/unfoldingWord/open-languages</text:a></text:p>
          </table:table-cell>
          <table:table-cell table:style-name="ce4" office:value-type="string" calcext:value-type="string">
            <text:p>2025-02-06T18:22:44Z</text:p>
          </table:table-cell>
          <table:table-cell table:style-name="ce4"/>
          <table:table-cell table:style-name="ce1" office:value-type="string" calcext:value-type="string">
            <text:p>unfoldingWord/open-language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office:value-type="string" calcext:value-type="string">
            <text:p>abelper54@gmail.com</text:p>
          </table:table-cell>
          <table:table-cell table:style-name="ce4" table:number-columns-repeated="2"/>
          <table:table-cell table:style-name="ce1" office:value-type="string" calcext:value-type="string">
            <text:p>passage-record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11T15:50:11Z</text:p>
          </table:table-cell>
          <table:table-cell table:style-name="ce1" office:value-type="string" calcext:value-type="string">
            <text:p>2025-06-11T15:49:10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scripture-simple-recor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assage-recorder-app" xlink:type="simple">https://github.com/unfoldingWord-box3/passage-recorder-app</text:a></text:p>
          </table:table-cell>
          <table:table-cell table:style-name="ce4" office:value-type="string" calcext:value-type="string">
            <text:p>2025-06-11T16:03:07Z</text:p>
          </table:table-cell>
          <table:table-cell table:style-name="ce4"/>
          <table:table-cell table:style-name="ce1" office:value-type="string" calcext:value-type="string">
            <text:p>unfoldingWord-box3/passage-recorde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pdf-generato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09T16:44:00Z</text:p>
          </table:table-cell>
          <table:table-cell table:style-name="ce1" office:value-type="string" calcext:value-type="string">
            <text:p>2020-10-09T16:43:5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pdf-generator</text:p>
          </table:table-cell>
          <table:table-cell table:style-name="ce1" table:number-columns-repeated="4"/>
          <table:table-cell table:style-name="ce1" office:value-type="string" calcext:value-type="string">
            <text:p>['scripture-resources-rcl', 'string-punctuation-tokenizer', 'tc-source-content-updater', 'tsv-groupdata-parse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df-generator" xlink:type="simple">https://github.com/unfoldingWord-box3/pdf-generator</text:a></text:p>
          </table:table-cell>
          <table:table-cell table:style-name="ce4" office:value-type="string" calcext:value-type="string">
            <text:p>2020-10-09T16:44:02Z</text:p>
          </table:table-cell>
          <table:table-cell table:style-name="ce4"/>
          <table:table-cell table:style-name="ce1" office:value-type="string" calcext:value-type="string">
            <text:p>unfoldingWord-box3/pdf-generato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RecordVoice</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06T14:13:55Z</text:p>
          </table:table-cell>
          <table:table-cell table:style-name="ce1" office:value-type="string" calcext:value-type="string">
            <text:p>2024-03-06T14:13:5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record-voice</text:p>
          </table:table-cell>
          <table:table-cell table:style-name="ce1" table:number-columns-repeated="6"/>
          <table:table-cell table:style-name="ce1" office:value-type="string" calcext:value-type="string">
            <text:p>bl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cordVoice" xlink:type="simple">https://github.com/unfoldingWord-box3/RecordVoice</text:a></text:p>
          </table:table-cell>
          <table:table-cell table:style-name="ce4" office:value-type="string" calcext:value-type="string">
            <text:p>2024-03-05T16:10:13Z</text:p>
          </table:table-cell>
          <table:table-cell table:style-name="ce4"/>
          <table:table-cell table:style-name="ce1" office:value-type="string" calcext:value-type="string">
            <text:p>unfoldingWord-box3/RecordVoic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sample-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7-28T16:44:35Z</text:p>
          </table:table-cell>
          <table:table-cell table:style-name="ce1" office:value-type="string" calcext:value-type="string">
            <text:p>2020-07-28T16:43:2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ample-react-component-library</text:p>
          </table:table-cell>
          <table:table-cell table:style-name="ce1" table:number-columns-repeated="6"/>
          <table:table-cell table:style-name="ce1" office:value-type="string" calcext:value-type="string">
            <text:p>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ample-react-component-library" xlink:type="simple">https://github.com/unfoldingWord-box3/sample-react-component-library</text:a></text:p>
          </table:table-cell>
          <table:table-cell table:style-name="ce4" office:value-type="string" calcext:value-type="string">
            <text:p>2020-07-28T16:44:37Z</text:p>
          </table:table-cell>
          <table:table-cell table:style-name="ce4"/>
          <table:table-cell table:style-name="ce1" office:value-type="string" calcext:value-type="string">
            <text:p>unfoldingWord-box3/sample-react-component-librar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simple-text-editor-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2T23:50:37Z</text:p>
          </table:table-cell>
          <table:table-cell table:style-name="ce1" office:value-type="string" calcext:value-type="string">
            <text:p>2022-05-09T18:19:08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simple-text-editor-app</text:p>
          </table:table-cell>
          <table:table-cell table:style-name="ce1" table:number-columns-repeated="4"/>
          <table:table-cell table:style-name="ce1" office:value-type="string" calcext:value-type="string">
            <text:p>simple-text-editor-rcl</text:p>
          </table:table-cell>
          <table:table-cell table:style-name="ce1"/>
          <table:table-cell table:style-name="ce1" office:value-type="string" calcext:value-type="string">
            <text:p>['klappy', 'RUN-Project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imple-text-editor-app" xlink:type="simple">https://github.com/unfoldingWord-box3/simple-text-editor-app</text:a></text:p>
          </table:table-cell>
          <table:table-cell table:style-name="ce4" office:value-type="string" calcext:value-type="string">
            <text:p>2021-11-29T20:26:55Z</text:p>
          </table:table-cell>
          <table:table-cell table:style-name="ce4"/>
          <table:table-cell table:style-name="ce1" office:value-type="string" calcext:value-type="string">
            <text:p>unfoldingWord-box3/simple-text-edito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_pan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09T21:08:27Z</text:p>
          </table:table-cell>
          <table:table-cell table:style-name="ce1" office:value-type="string" calcext:value-type="string">
            <text:p>2016-11-17T09:19:4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Pane</text:p>
          </table:table-cell>
          <table:table-cell table:style-name="ce1" table:number-columns-repeated="6"/>
          <table:table-cell table:style-name="ce1" office:value-type="string" calcext:value-type="string">
            <text:p>['ihoegen', 'Sterling (Jay) Scott', 'mannycolon', 'RoyalSi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_pane" xlink:type="simple">https://github.com/unfoldingWord-dev/t_pane</text:a></text:p>
          </table:table-cell>
          <table:table-cell table:style-name="ce4" office:value-type="string" calcext:value-type="string">
            <text:p>2019-10-22T19:34:26Z</text:p>
          </table:table-cell>
          <table:table-cell table:style-name="ce4"/>
          <table:table-cell table:style-name="ce1" office:value-type="string" calcext:value-type="string">
            <text:p>unfoldingWord-dev/t_pan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monorepo</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cache-adapter-indexedd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che-adapter-indexedd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che-adapter-indexeddb</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cache-adapter-memo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che-adapter-memory</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che-adapter-memor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cache-adapter-sql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che-adapter-sqli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che-adapter-sqlit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linked-pane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linked-pane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linked-panel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mobil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mobile</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mobil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navigation</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navigation</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navigation</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ckage-buil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buil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buil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ckage-builder-engin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builder-engin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builder-engin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ckage-creator-c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creator-c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creator-cor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ckage-creator-sta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creator-sta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creator-stat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ckage-creator-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creator-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creator-web</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ckage-creator-workflow</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creator-workflow</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creator-workflow</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ckage-storag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ckage-storag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ckage-storag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ssage-set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ssage-set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ssage-set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passage-sets-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passage-sets-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passage-sets-cli</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shared</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hared</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hared</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study-st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tudy-st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tudy-stor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toc-generator-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oc-generator-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oc-generator-cli</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translation-academy-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academy-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academy-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translation-note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note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notes-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translation-question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question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questions-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translation-words-link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words-link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words-links-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translation-words-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translation-words-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translation-words-load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ui-contro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ui-contro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ui-control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t-synergy/usfm-processo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usfm-processor</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usfm-processo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bible-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ible-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ible-web</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linked-panels-spik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linked-panels-spik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linked-panels-spik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tc-stud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tc-study</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tc-stud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c-study/toc-generator-we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toc-generator-we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toc-generator-web</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office:value-type="string" calcext:value-type="string">
            <text:p>tc-tsv-conver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1-15T22:01:51Z</text:p>
          </table:table-cell>
          <table:table-cell table:style-name="ce1" office:value-type="string" calcext:value-type="string">
            <text:p>2022-11-15T22:01: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sv-converter</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tsv-converter" xlink:type="simple">https://github.com/unfoldingWord/tc-tsv-converter</text:a></text:p>
          </table:table-cell>
          <table:table-cell table:style-name="ce4" office:value-type="string" calcext:value-type="string">
            <text:p>2022-11-15T23:06:04Z</text:p>
          </table:table-cell>
          <table:table-cell table:style-name="ce4"/>
          <table:table-cell table:style-name="ce1" office:value-type="string" calcext:value-type="string">
            <text:p>unfoldingWord/tc-tsv-convert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heia-examples/browser-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rowser-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heia-examples" xlink:type="simple">https://github.com/unfoldingWord-box3/theia-examples</text:a></text:p>
          </table:table-cell>
          <table:table-cell table:style-name="ce4" office:value-type="string" calcext:value-type="string">
            <text:p>2025-01-22T21:00:21Z</text:p>
          </table:table-cell>
          <table:table-cell table:style-name="ce4"/>
          <table:table-cell table:style-name="ce1" office:value-type="string" calcext:value-type="string">
            <text:p>unfoldingWord-box3/theia-examples/browser-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heia-examples/electron-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lectron-app</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heia-examples" xlink:type="simple">https://github.com/unfoldingWord-box3/theia-examples</text:a></text:p>
          </table:table-cell>
          <table:table-cell table:style-name="ce4" office:value-type="string" calcext:value-type="string">
            <text:p>2025-01-22T21:00:21Z</text:p>
          </table:table-cell>
          <table:table-cell table:style-name="ce4"/>
          <table:table-cell table:style-name="ce1" office:value-type="string" calcext:value-type="string">
            <text:p>unfoldingWord-box3/theia-examples/electron-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heia-examples/empty</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mpty</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heia-examples" xlink:type="simple">https://github.com/unfoldingWord-box3/theia-examples</text:a></text:p>
          </table:table-cell>
          <table:table-cell table:style-name="ce4" office:value-type="string" calcext:value-type="string">
            <text:p>2025-01-22T21:00:21Z</text:p>
          </table:table-cell>
          <table:table-cell table:style-name="ce4"/>
          <table:table-cell table:style-name="ce1" office:value-type="string" calcext:value-type="string">
            <text:p>unfoldingWord-box3/theia-examples/empt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oolTemplat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5T16:34:11Z</text:p>
          </table:table-cell>
          <table:table-cell table:style-name="ce1" office:value-type="string" calcext:value-type="string">
            <text:p>2019-04-15T16:34:08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oolTemplate</text:p>
          </table:table-cell>
          <table:table-cell table:style-name="ce1" table:number-columns-repeated="4"/>
          <table:table-cell table:style-name="ce1" office:value-type="string" calcext:value-type="string">
            <text:p>tc-tool</text:p>
          </table:table-cell>
          <table:table-cell table:style-name="ce1"/>
          <table:table-cell table:style-name="ce1" office:value-type="string" calcext:value-type="string">
            <text:p>['klappy', 'da1nerd', 'ImgBotApp',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oolTemplate" xlink:type="simple">https://github.com/unfoldingWord-dev/toolTemplate</text:a></text:p>
          </table:table-cell>
          <table:table-cell table:style-name="ce4" office:value-type="string" calcext:value-type="string">
            <text:p>2019-10-22T19:38:20Z</text:p>
          </table:table-cell>
          <table:table-cell table:style-name="ce4"/>
          <table:table-cell table:style-name="ce1" office:value-type="string" calcext:value-type="string">
            <text:p>unfoldingWord-dev/toolTemplate</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3" office:value-type="string" calcext:value-type="string">
            <text:p><text:a xlink:href="mailto:abelper54@gmail.com" xlink:type="simple">abelper54@gmail.com</text:a></text:p>
          </table:table-cell>
          <table:table-cell table:style-name="ce4"/>
          <table:table-cell table:style-name="ce4" office:value-type="string" calcext:value-type="string">
            <text:p>x</text:p>
          </table:table-cell>
          <table:table-cell table:style-name="ce1" office:value-type="string" calcext:value-type="string">
            <text:p>tq-app</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28T12:54:36Z</text:p>
          </table:table-cell>
          <table:table-cell table:style-name="ce1" office:value-type="string" calcext:value-type="string">
            <text:p>2025-07-28T12:54:32Z</text:p>
          </table:table-cell>
          <table:table-cell table:style-name="ce4"/>
          <table:table-cell table:style-name="ce4" office:value-type="float" office:value="6" calcext:value-type="float">
            <text:p>6</text:p>
          </table:table-cell>
          <table:table-cell table:style-name="ce4" office:value-type="float" office:value="0" calcext:value-type="float">
            <text:p>0</text:p>
          </table:table-cell>
          <table:table-cell table:style-name="ce1"/>
          <table:table-cell table:style-name="ce1" office:value-type="string" calcext:value-type="string">
            <text:p>qa-app</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q-app" xlink:type="simple">https://github.com/unfoldingWord-box3/tq-app</text:a></text:p>
          </table:table-cell>
          <table:table-cell table:style-name="ce4" office:value-type="string" calcext:value-type="string">
            <text:p>2025-07-30T15:49:01Z</text:p>
          </table:table-cell>
          <table:table-cell table:style-name="ce4"/>
          <table:table-cell table:style-name="ce1" office:value-type="string" calcext:value-type="string">
            <text:p>unfoldingWord-box3/tq-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ranslate-markdown-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03T17:34:50Z</text:p>
          </table:table-cell>
          <table:table-cell table:style-name="ce1" office:value-type="string" calcext:value-type="string">
            <text:p>2019-04-03T17:22:3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e-markdown</text:p>
          </table:table-cell>
          <table:table-cell table:style-name="ce1" table:number-columns-repeated="6"/>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e-markdown-poc" xlink:type="simple">https://github.com/unfoldingWord-box3/translate-markdown-poc</text:a></text:p>
          </table:table-cell>
          <table:table-cell table:style-name="ce4" office:value-type="string" calcext:value-type="string">
            <text:p>2023-05-20T15:31:34Z</text:p>
          </table:table-cell>
          <table:table-cell table:style-name="ce4"/>
          <table:table-cell table:style-name="ce1" office:value-type="string" calcext:value-type="string">
            <text:p>unfoldingWord-box3/translate-markdown-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ranslation-help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5T02:36:16Z</text:p>
          </table:table-cell>
          <table:table-cell table:style-name="ce1" office:value-type="string" calcext:value-type="string">
            <text:p>2022-11-09T09:01:0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ion-help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klappy', 'yakob-aleksandrovich']</text:p>
          </table:table-cell>
          <table:table-cell table:style-name="ce1" office:value-type="float" office:value="1" calcext:value-type="float">
            <text:p>1</text:p>
          </table:table-cell>
          <table:table-cell table:style-name="ce1" office:value-type="float" office:value="14" calcext:value-type="float">
            <text:p>14</text:p>
          </table:table-cell>
          <table:table-cell table:style-name="ce5" office:value-type="string" calcext:value-type="string">
            <text:p><text:a xlink:href="https://github.com/unfoldingWord-box3/translation-helps" xlink:type="simple">https://github.com/unfoldingWord-box3/translation-helps</text:a></text:p>
          </table:table-cell>
          <table:table-cell table:style-name="ce4" office:value-type="string" calcext:value-type="string">
            <text:p>2025-10-02T14:12:21Z</text:p>
          </table:table-cell>
          <table:table-cell table:style-name="ce4"/>
          <table:table-cell table:style-name="ce1" office:value-type="string" calcext:value-type="string">
            <text:p>unfoldingWord-box3/translation-help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ranslation-manager-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11T11:37:33Z</text:p>
          </table:table-cell>
          <table:table-cell table:style-name="ce1" office:value-type="string" calcext:value-type="string">
            <text:p>2020-01-28T22:33:18Z</text:p>
          </table:table-cell>
          <table:table-cell table:style-name="ce4"/>
          <table:table-cell table:number-columns-repeated="2" table:style-name="ce4" office:value-type="float" office:value="24" calcext:value-type="float">
            <text:p>24</text:p>
          </table:table-cell>
          <table:table-cell table:style-name="ce1"/>
          <table:table-cell table:style-name="ce1" office:value-type="string" calcext:value-type="string">
            <text:p>translation-manager-react-component-library</text:p>
          </table:table-cell>
          <table:table-cell table:style-name="ce1" table:number-columns-repeated="6"/>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manager-poc" xlink:type="simple">https://github.com/unfoldingWord-box3/translation-manager-poc</text:a></text:p>
          </table:table-cell>
          <table:table-cell table:style-name="ce4" office:value-type="string" calcext:value-type="string">
            <text:p>2020-01-28T22:33:45Z</text:p>
          </table:table-cell>
          <table:table-cell table:style-name="ce4"/>
          <table:table-cell table:style-name="ce1" office:value-type="string" calcext:value-type="string">
            <text:p>unfoldingWord-box3/translation-manager-poc</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ranslation-proces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3-22T14:32:16Z</text:p>
          </table:table-cell>
          <table:table-cell table:style-name="ce1" office:value-type="string" calcext:value-type="string">
            <text:p>2019-03-22T14:30:5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ion-process</text:p>
          </table:table-cell>
          <table:table-cell table:style-name="ce1" table:number-columns-repeated="6"/>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process" xlink:type="simple">https://github.com/unfoldingWord-box3/translation-process</text:a></text:p>
          </table:table-cell>
          <table:table-cell table:style-name="ce4" office:value-type="string" calcext:value-type="string">
            <text:p>2019-03-22T14:32:18Z</text:p>
          </table:table-cell>
          <table:table-cell table:style-name="ce4"/>
          <table:table-cell table:style-name="ce1" office:value-type="string" calcext:value-type="string">
            <text:p>unfoldingWord-box3/translation-process</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tsv-edito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10T00:13:59Z</text:p>
          </table:table-cell>
          <table:table-cell table:style-name="ce1" office:value-type="string" calcext:value-type="string">
            <text:p>2019-04-10T00:12:5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sv-editor</text:p>
          </table:table-cell>
          <table:table-cell table:style-name="ce1" table:number-columns-repeated="4"/>
          <table:table-cell table:style-name="ce1" office:value-type="string" calcext:value-type="string">
            <text:p>markdown-translatable</text:p>
          </table:table-cell>
          <table:table-cell table:style-name="ce1"/>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sv-editor" xlink:type="simple">https://github.com/unfoldingWord-box3/tsv-editor</text:a></text:p>
          </table:table-cell>
          <table:table-cell table:style-name="ce4" office:value-type="string" calcext:value-type="string">
            <text:p>2019-04-10T00:14:01Z</text:p>
          </table:table-cell>
          <table:table-cell table:style-name="ce4"/>
          <table:table-cell table:style-name="ce1" office:value-type="string" calcext:value-type="string">
            <text:p>unfoldingWord-box3/tsv-edito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sv-twl-creation-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10:51:14Z</text:p>
          </table:table-cell>
          <table:table-cell table:style-name="ce1" office:value-type="string" calcext:value-type="string">
            <text:p>2026-06-16T10:50:55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tsv-twl-creation-app</text:p>
          </table:table-cell>
          <table:table-cell table:style-name="ce1" table:number-columns-repeated="4"/>
          <table:table-cell table:style-name="ce1" office:value-type="string" calcext:value-type="string">
            <text:p>['tsv-quote-converters', 'twl-generato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sv-twl-creation-app" xlink:type="simple">https://github.com/unfoldingWord/tsv-twl-creation-app</text:a></text:p>
          </table:table-cell>
          <table:table-cell table:style-name="ce4" office:value-type="string" calcext:value-type="string">
            <text:p>2026-06-16T10:51:18Z</text:p>
          </table:table-cell>
          <table:table-cell table:style-name="ce4"/>
          <table:table-cell table:style-name="ce1" office:value-type="string" calcext:value-type="string">
            <text:p>unfoldingWord/tsv-twl-creation-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sv7-tn-cleanup-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1T23:11:16Z</text:p>
          </table:table-cell>
          <table:table-cell table:style-name="ce1" office:value-type="string" calcext:value-type="string">
            <text:p>2025-12-11T23:11:1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tsv7-tn-cleanup-app</text:p>
          </table:table-cell>
          <table:table-cell table:style-name="ce1" table:number-columns-repeated="4"/>
          <table:table-cell table:style-name="ce1" office:value-type="string" calcext:value-type="string">
            <text:p>tsv-quote-converter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sv7-tn-cleanup-app" xlink:type="simple">https://github.com/unfoldingWord/tsv7-tn-cleanup-app</text:a></text:p>
          </table:table-cell>
          <table:table-cell table:style-name="ce4" office:value-type="string" calcext:value-type="string">
            <text:p>2025-12-11T23:11:20Z</text:p>
          </table:table-cell>
          <table:table-cell table:style-name="ce4"/>
          <table:table-cell table:style-name="ce1" office:value-type="string" calcext:value-type="string">
            <text:p>unfoldingWord/tsv7-tn-cleanup-app</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usfm-js-wr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26T18:46:35Z</text:p>
          </table:table-cell>
          <table:table-cell table:style-name="ce1" office:value-type="string" calcext:value-type="string">
            <text:p>2020-05-26T18:45:2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sfm-js-wrapper</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RobH12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sfm-js-wrapper" xlink:type="simple">https://github.com/unfoldingWord/usfm-js-wrapper</text:a></text:p>
          </table:table-cell>
          <table:table-cell table:style-name="ce4" office:value-type="string" calcext:value-type="string">
            <text:p>2020-05-26T20:17:20Z</text:p>
          </table:table-cell>
          <table:table-cell table:style-name="ce4"/>
          <table:table-cell table:style-name="ce1" office:value-type="string" calcext:value-type="string">
            <text:p>unfoldingWord/usfm-js-wrapper</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uw-metadata-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0T17:08:07Z</text:p>
          </table:table-cell>
          <table:table-cell table:style-name="ce1" office:value-type="string" calcext:value-type="string">
            <text:p>2020-05-07T19:30:02Z</text:p>
          </table:table-cell>
          <table:table-cell table:style-name="ce4"/>
          <table:table-cell table:number-columns-repeated="2" table:style-name="ce4" office:value-type="float" office:value="5" calcext:value-type="float">
            <text:p>5</text:p>
          </table:table-cell>
          <table:table-cell table:style-name="ce1"/>
          <table:table-cell table:style-name="ce1" office:value-type="string" calcext:value-type="string">
            <text:p>scripture-burrito-react-jsonschema-form</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uw-metadata-react-component-library" xlink:type="simple">https://github.com/unfoldingWord-box3/uw-metadata-react-component-library</text:a></text:p>
          </table:table-cell>
          <table:table-cell table:style-name="ce4" office:value-type="string" calcext:value-type="string">
            <text:p>2020-05-07T19:30:12Z</text:p>
          </table:table-cell>
          <table:table-cell table:style-name="ce4"/>
          <table:table-cell table:style-name="ce1" office:value-type="string" calcext:value-type="string">
            <text:p>unfoldingWord-box3/uw-metadata-react-component-library</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uw-pdf-preview</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22T16:08:39Z</text:p>
          </table:table-cell>
          <table:table-cell table:style-name="ce1" office:value-type="string" calcext:value-type="string">
            <text:p>2022-11-08T16:01:2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w-pdf-preview</text:p>
          </table:table-cell>
          <table:table-cell table:style-name="ce1" table:number-columns-repeated="6"/>
          <table:table-cell table:style-name="ce1" office:value-type="string" calcext:value-type="string">
            <text:p>['superdav42', 'mandolyte', '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pdf-preview" xlink:type="simple">https://github.com/unfoldingWord/uw-pdf-preview</text:a></text:p>
          </table:table-cell>
          <table:table-cell table:style-name="ce4" office:value-type="string" calcext:value-type="string">
            <text:p>2022-11-08T15:51:52Z</text:p>
          </table:table-cell>
          <table:table-cell table:style-name="ce4"/>
          <table:table-cell table:style-name="ce1" office:value-type="string" calcext:value-type="string">
            <text:p>unfoldingWord/uw-pdf-preview</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office:value-type="string" calcext:value-type="string">
            <text:p>word-aligner-extens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7T18:59:55Z</text:p>
          </table:table-cell>
          <table:table-cell table:style-name="ce1" office:value-type="string" calcext:value-type="string">
            <text:p>2024-01-17T18:59:48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aligner-react-vite</text:p>
          </table:table-cell>
          <table:table-cell table:style-name="ce1" table:number-columns-repeated="6"/>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word-aligner-extension" xlink:type="simple">https://github.com/unfoldingWord-box3/word-aligner-extension</text:a></text:p>
          </table:table-cell>
          <table:table-cell table:style-name="ce4" office:value-type="string" calcext:value-type="string">
            <text:p>2024-01-08T23:29:10Z</text:p>
          </table:table-cell>
          <table:table-cell table:style-name="ce4"/>
          <table:table-cell table:style-name="ce1" office:value-type="string" calcext:value-type="string">
            <text:p>unfoldingWord-box3/word-aligner-extension</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office:value-type="string" calcext:value-type="string">
            <text:p>wordMAP-m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1-03T19:05:2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map-mt</text:p>
          </table:table-cell>
          <table:table-cell table:style-name="ce1" table:number-columns-repeated="4"/>
          <table:table-cell table:style-name="ce1" office:value-type="string" calcext:value-type="string">
            <text:p>['wordmap', 'wordmap-lexer']</text:p>
          </table:table-cell>
          <table:table-cell table:style-name="ce1"/>
          <table:table-cell table:style-name="ce1" office:value-type="string" calcext:value-type="string">
            <text:p>['da1nerd',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wordMAP-mt" xlink:type="simple">https://github.com/unfoldingWord-box3/wordMAP-mt</text:a></text:p>
          </table:table-cell>
          <table:table-cell table:style-name="ce4" office:value-type="string" calcext:value-type="string">
            <text:p>2025-11-03T19:05:31Z</text:p>
          </table:table-cell>
          <table:table-cell table:style-name="ce4"/>
          <table:table-cell table:style-name="ce1" office:value-type="string" calcext:value-type="string">
            <text:p>unfoldingWord-box3/wordMAP-mt</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office:value-type="string" calcext:value-type="string">
            <text:p>wordMAP-usfm</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3-05T21:01:50Z</text:p>
          </table:table-cell>
          <table:table-cell table:style-name="ce1" office:value-type="string" calcext:value-type="string">
            <text:p>2019-03-05T21:01:1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map-usfm</text:p>
          </table:table-cell>
          <table:table-cell table:style-name="ce1" table:number-columns-repeated="4"/>
          <table:table-cell table:style-name="ce1" office:value-type="string" calcext:value-type="string">
            <text:p>['usfm-js', 'wordmap-lexer']</text:p>
          </table:table-cell>
          <table:table-cell table:style-name="ce1"/>
          <table:table-cell table:style-name="ce1" office:value-type="string" calcext:value-type="string">
            <text:p>['da1nerd', 'klappy', 'mannycolon', 'dependabot-support',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MAP-usfm" xlink:type="simple">https://github.com/unfoldingWord/wordMAP-usfm</text:a></text:p>
          </table:table-cell>
          <table:table-cell table:style-name="ce4" office:value-type="string" calcext:value-type="string">
            <text:p>2022-11-13T22:45:42Z</text:p>
          </table:table-cell>
          <table:table-cell table:style-name="ce4"/>
          <table:table-cell table:style-name="ce1" office:value-type="string" calcext:value-type="string">
            <text:p>unfoldingWord/wordMAP-usfm</text:p>
          </table:table-cell>
          <table:table-cell table:style-name="ce4" office:value-type="string" calcext:value-type="string">
            <text:p>0-No longer used candidate</text:p>
          </table:table-cell>
          <table:table-cell table:style-name="ce1" office:value-type="string" calcext:value-type="string">
            <text:p>Repository has an npm package but no detected usage or downloads in the last year (0 npm downloads).</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ithub</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9-27T02:01:3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irchamp', '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ithub" xlink:type="simple">https://github.com/unfoldingWord/.github</text:a></text:p>
          </table:table-cell>
          <table:table-cell table:style-name="ce4" office:value-type="string" calcext:value-type="string">
            <text:p>2023-06-23T17:54:35Z</text:p>
          </table:table-cell>
          <table:table-cell table:style-name="ce4"/>
          <table:table-cell table:style-name="ce1" office:value-type="string" calcext:value-type="string">
            <text:p>unfoldingWord/.githu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droid-door43-client</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05T23:50:09Z</text:p>
          </table:table-cell>
          <table:table-cell table:style-name="ce1" office:value-type="string" calcext:value-type="string">
            <text:p>2017-04-05T23:50:0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andreradroi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door43-client" xlink:type="simple">https://github.com/unfoldingWord-dev/android-door43-client</text:a></text:p>
          </table:table-cell>
          <table:table-cell table:style-name="ce4" office:value-type="string" calcext:value-type="string">
            <text:p>2016-08-30T17:57:37Z</text:p>
          </table:table-cell>
          <table:table-cell table:style-name="ce4"/>
          <table:table-cell table:style-name="ce1" office:value-type="string" calcext:value-type="string">
            <text:p>unfoldingWord-dev/android-door43-clien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droid-event-buff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7T23:36:28Z</text:p>
          </table:table-cell>
          <table:table-cell table:style-name="ce1" office:value-type="string" calcext:value-type="string">
            <text:p>2017-02-07T23:35:5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event-buffer" xlink:type="simple">https://github.com/unfoldingWord-dev/android-event-buffer</text:a></text:p>
          </table:table-cell>
          <table:table-cell table:style-name="ce4" office:value-type="string" calcext:value-type="string">
            <text:p>2017-01-05T01:22:50Z</text:p>
          </table:table-cell>
          <table:table-cell table:style-name="ce4"/>
          <table:table-cell table:style-name="ce1" office:value-type="string" calcext:value-type="string">
            <text:p>unfoldingWord-dev/android-event-buff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droid-foregroun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23T18:30:54Z</text:p>
          </table:table-cell>
          <table:table-cell table:style-name="ce1" office:value-type="string" calcext:value-type="string">
            <text:p>2017-02-23T18:30: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foreground" xlink:type="simple">https://github.com/unfoldingWord-dev/android-foreground</text:a></text:p>
          </table:table-cell>
          <table:table-cell table:style-name="ce4" office:value-type="string" calcext:value-type="string">
            <text:p>2017-02-10T22:11:12Z</text:p>
          </table:table-cell>
          <table:table-cell table:style-name="ce4"/>
          <table:table-cell table:style-name="ce1" office:value-type="string" calcext:value-type="string">
            <text:p>unfoldingWord-dev/android-foregroun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droid-gogs-client</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30T23:42:39Z</text:p>
          </table:table-cell>
          <table:table-cell table:style-name="ce1" office:value-type="string" calcext:value-type="string">
            <text:p>2019-04-30T23:42:38Z</text:p>
          </table:table-cell>
          <table:table-cell table:style-name="ce4" office:value-type="string" calcext:value-type="string">
            <text:p>2016-02-29T21:22:22Z</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dev/android-gogs-client" xlink:type="simple">https://github.com/unfoldingWord-dev/android-gogs-client</text:a></text:p>
          </table:table-cell>
          <table:table-cell table:style-name="ce4" office:value-type="string" calcext:value-type="string">
            <text:p>2024-12-11T07:18:00Z</text:p>
          </table:table-cell>
          <table:table-cell table:style-name="ce4"/>
          <table:table-cell table:style-name="ce1" office:value-type="string" calcext:value-type="string">
            <text:p>unfoldingWord-dev/android-gogs-clien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droid-htt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26T20:08:26Z</text:p>
          </table:table-cell>
          <table:table-cell table:style-name="ce1" office:value-type="string" calcext:value-type="string">
            <text:p>2019-04-26T20:06:5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http" xlink:type="simple">https://github.com/unfoldingWord-dev/android-http</text:a></text:p>
          </table:table-cell>
          <table:table-cell table:style-name="ce4" office:value-type="string" calcext:value-type="string">
            <text:p>2019-04-26T20:08:03Z</text:p>
          </table:table-cell>
          <table:table-cell table:style-name="ce4"/>
          <table:table-cell table:style-name="ce1" office:value-type="string" calcext:value-type="string">
            <text:p>unfoldingWord-dev/android-htt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droid-logg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19T22:57:41Z</text:p>
          </table:table-cell>
          <table:table-cell table:style-name="ce1" office:value-type="string" calcext:value-type="string">
            <text:p>2017-04-19T22:57:3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jsarabia']</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logger" xlink:type="simple">https://github.com/unfoldingWord-dev/android-logger</text:a></text:p>
          </table:table-cell>
          <table:table-cell table:style-name="ce4" office:value-type="string" calcext:value-type="string">
            <text:p>2016-02-27T02:27:42Z</text:p>
          </table:table-cell>
          <table:table-cell table:style-name="ce4"/>
          <table:table-cell table:style-name="ce1" office:value-type="string" calcext:value-type="string">
            <text:p>unfoldingWord-dev/android-logg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droid-resource-contain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4-05T23:48:40Z</text:p>
          </table:table-cell>
          <table:table-cell table:style-name="ce1" office:value-type="string" calcext:value-type="string">
            <text:p>2016-12-29T08:05:2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resource-container" xlink:type="simple">https://github.com/unfoldingWord-dev/android-resource-container</text:a></text:p>
          </table:table-cell>
          <table:table-cell table:style-name="ce4" office:value-type="string" calcext:value-type="string">
            <text:p>2017-03-07T23:44:50Z</text:p>
          </table:table-cell>
          <table:table-cell table:style-name="ce4"/>
          <table:table-cell table:style-name="ce1" office:value-type="string" calcext:value-type="string">
            <text:p>unfoldingWord-dev/android-resource-contain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ndroid-task-manager</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3-21T21:14:27Z</text:p>
          </table:table-cell>
          <table:table-cell table:style-name="ce1" office:value-type="string" calcext:value-type="string">
            <text:p>2017-03-21T21:14:1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ndroid-task-manager" xlink:type="simple">https://github.com/unfoldingWord-dev/android-task-manager</text:a></text:p>
          </table:table-cell>
          <table:table-cell table:style-name="ce4" office:value-type="string" calcext:value-type="string">
            <text:p>2016-06-15T00:18:45Z</text:p>
          </table:table-cell>
          <table:table-cell table:style-name="ce4"/>
          <table:table-cell table:style-name="ce1" office:value-type="string" calcext:value-type="string">
            <text:p>unfoldingWord-dev/android-task-manag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api-index</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06T14:56:54Z</text:p>
          </table:table-cell>
          <table:table-cell table:style-name="ce1" office:value-type="string" calcext:value-type="string">
            <text:p>2023-10-06T14:56:5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 'codemis', 'yakob-aleksandrovich', 'da1nerd', 'phillip-hopper', 'RoyalSi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pi-index" xlink:type="simple">https://github.com/unfoldingWord-dev/api-index</text:a></text:p>
          </table:table-cell>
          <table:table-cell table:style-name="ce4" office:value-type="string" calcext:value-type="string">
            <text:p>2023-10-06T14:53:06Z</text:p>
          </table:table-cell>
          <table:table-cell table:style-name="ce4"/>
          <table:table-cell table:style-name="ce1" office:value-type="string" calcext:value-type="string">
            <text:p>unfoldingWord-dev/api-index</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aquifer-to-dcs</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9T15:49:00Z</text:p>
          </table:table-cell>
          <table:table-cell table:style-name="ce1" office:value-type="string" calcext:value-type="string">
            <text:p>2025-03-29T15:48: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quifer-to-dcs" xlink:type="simple">https://github.com/unfoldingWord-box3/aquifer-to-dcs</text:a></text:p>
          </table:table-cell>
          <table:table-cell table:style-name="ce4" office:value-type="string" calcext:value-type="string">
            <text:p>2025-03-29T15:49:03Z</text:p>
          </table:table-cell>
          <table:table-cell table:style-name="ce4"/>
          <table:table-cell table:style-name="ce1" office:value-type="string" calcext:value-type="string">
            <text:p>unfoldingWord-box3/aquifer-to-dc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blank-project-templat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3T18:30:41Z</text:p>
          </table:table-cell>
          <table:table-cell table:style-name="ce1" office:value-type="string" calcext:value-type="string">
            <text:p>2021-12-01T16:36:14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lank-project-template" xlink:type="simple">https://github.com/unfoldingWord/blank-project-template</text:a></text:p>
          </table:table-cell>
          <table:table-cell table:style-name="ce4" office:value-type="string" calcext:value-type="string">
            <text:p>2022-08-20T15:23:15Z</text:p>
          </table:table-cell>
          <table:table-cell table:style-name="ce4"/>
          <table:table-cell table:style-name="ce1" office:value-type="string" calcext:value-type="string">
            <text:p>unfoldingWord/blank-project-template</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birch.champeon@unfoldingword.org" xlink:type="simple">Birch Champeon </text:a></text:p>
          </table:table-cell>
          <table:table-cell table:style-name="ce4" office:value-type="string" calcext:value-type="string">
            <text:p>x</text:p>
          </table:table-cell>
          <table:table-cell table:style-name="ce4"/>
          <table:table-cell table:style-name="ce1" office:value-type="string" calcext:value-type="string">
            <text:p>book-package-ap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02:24:43Z</text:p>
          </table:table-cell>
          <table:table-cell table:style-name="ce1" office:value-type="string" calcext:value-type="string">
            <text:p>2023-01-02T13:23:19Z</text:p>
          </table:table-cell>
          <table:table-cell table:style-name="ce4" office:value-type="string" calcext:value-type="string">
            <text:p>2020-03-30T14:42:12Z</text:p>
          </table:table-cell>
          <table:table-cell table:style-name="ce4" office:value-type="float" office:value="24" calcext:value-type="float">
            <text:p>24</text:p>
          </table:table-cell>
          <table:table-cell table:style-name="ce4" office:value-type="float" office:value="17" calcext:value-type="float">
            <text:p>17</text:p>
          </table:table-cell>
          <table:table-cell table:style-name="ce1"/>
          <table:table-cell table:style-name="ce1" office:value-type="string" calcext:value-type="string">
            <text:p>book-package-app</text:p>
          </table:table-cell>
          <table:table-cell table:style-name="ce1" table:formula="of:=FALSE()" office:value-type="float" office:value="0" calcext:value-type="float">
            <text:p>0</text:p>
          </table:table-cell>
          <table:table-cell table:style-name="ce1" office:value-type="float" office:value="115" calcext:value-type="float">
            <text:p>115</text:p>
          </table:table-cell>
          <table:table-cell table:style-name="ce1" office:value-type="string" calcext:value-type="string">
            <text:p>2020-07-15T14:29:05.613Z</text:p>
          </table:table-cell>
          <table:table-cell table:style-name="ce1"/>
          <table:table-cell table:style-name="ce1" office:value-type="string" calcext:value-type="string">
            <text:p>book-package-rcl</text:p>
          </table:table-cell>
          <table:table-cell table:style-name="ce1"/>
          <table:table-cell table:style-name="ce1" office:value-type="string" calcext:value-type="string">
            <text:p>['mandolyte', 'dependabot[bot]', 'jag3773']</text:p>
          </table:table-cell>
          <table:table-cell table:style-name="ce1" office:value-type="float" office:value="7" calcext:value-type="float">
            <text:p>7</text:p>
          </table:table-cell>
          <table:table-cell table:style-name="ce1" office:value-type="float" office:value="55" calcext:value-type="float">
            <text:p>55</text:p>
          </table:table-cell>
          <table:table-cell table:style-name="ce5" office:value-type="string" calcext:value-type="string">
            <text:p><text:a xlink:href="https://github.com/unfoldingWord/book-package-app" xlink:type="simple">https://github.com/unfoldingWord/book-package-app</text:a></text:p>
          </table:table-cell>
          <table:table-cell table:style-name="ce4" office:value-type="string" calcext:value-type="string">
            <text:p>2021-12-17T13:15:30Z</text:p>
          </table:table-cell>
          <table:table-cell table:style-name="ce4"/>
          <table:table-cell table:style-name="ce1" office:value-type="string" calcext:value-type="string">
            <text:p>unfoldingWord/book-package-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115 downloads in the last year) and no detected local consumers.</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rown-Driver-Briggs-Enhanced</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5-02T13:05:04Z</text:p>
          </table:table-cell>
          <table:table-cell table:style-name="ce1" office:value-type="string" calcext:value-type="string">
            <text:p>2023-05-02T13:03:35Z</text:p>
          </table:table-cell>
          <table:table-cell table:style-name="ce4"/>
          <table:table-cell table:style-name="ce4" office:value-type="float" office:value="3" calcext:value-type="float">
            <text:p>3</text:p>
          </table:table-cell>
          <table:table-cell table:style-name="ce4" office:value-type="float" office:value="1" calcext:value-type="float">
            <text:p>1</text:p>
          </table:table-cell>
          <table:table-cell table:style-name="ce1" table:number-columns-repeated="8"/>
          <table:table-cell table:style-name="ce1" office:value-type="string" calcext:value-type="string">
            <text:p>['jdejoode', '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rown-Driver-Briggs-Enhanced" xlink:type="simple">https://github.com/unfoldingWord/Brown-Driver-Briggs-Enhanced</text:a></text:p>
          </table:table-cell>
          <table:table-cell table:style-name="ce4" office:value-type="string" calcext:value-type="string">
            <text:p>2026-05-17T13:44:58Z</text:p>
          </table:table-cell>
          <table:table-cell table:style-name="ce4"/>
          <table:table-cell table:style-name="ce1" office:value-type="string" calcext:value-type="string">
            <text:p>unfoldingWord/Brown-Driver-Briggs-Enhance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admin-porta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3T22:11:43Z</text:p>
          </table:table-cell>
          <table:table-cell table:style-name="ce4"/>
          <table:table-cell table:style-name="ce4" office:value-type="float" office:value="47" calcext:value-type="float">
            <text:p>47</text:p>
          </table:table-cell>
          <table:table-cell table:style-name="ce4" office:value-type="float" office:value="0" calcext:value-type="float">
            <text:p>0</text:p>
          </table:table-cell>
          <table:table-cell table:style-name="ce1"/>
          <table:table-cell table:style-name="ce1" office:value-type="string" calcext:value-type="string">
            <text:p>bt-servant-admin-portal</text:p>
          </table:table-cell>
          <table:table-cell table:style-name="ce1" table:number-columns-repeated="6"/>
          <table:table-cell table:style-name="ce1" office:value-type="string" calcext:value-type="string">
            <text:p>['claude', 'sethstoll3', 'IanLindsley', 'ILindsley', 'deferredrewa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admin-portal" xlink:type="simple">https://github.com/unfoldingWord/bt-servant-admin-portal</text:a></text:p>
          </table:table-cell>
          <table:table-cell table:style-name="ce4" office:value-type="string" calcext:value-type="string">
            <text:p>2026-06-13T22:11:48Z</text:p>
          </table:table-cell>
          <table:table-cell table:style-name="ce4"/>
          <table:table-cell table:style-name="ce1" office:value-type="string" calcext:value-type="string">
            <text:p>unfoldingWord/bt-servant-admin-porta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engine</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3T20:10:31Z</text:p>
          </table:table-cell>
          <table:table-cell table:style-name="ce1" office:value-type="string" calcext:value-type="string">
            <text:p>2026-01-16T14:04:11Z</text:p>
          </table:table-cell>
          <table:table-cell table:style-name="ce4" office:value-type="string" calcext:value-type="string">
            <text:p>2026-04-24T14:42:44Z</text:p>
          </table:table-cell>
          <table:table-cell table:style-name="ce4" office:value-type="float" office:value="35" calcext:value-type="float">
            <text:p>35</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ILindsley', 'IanLindsley', 'abiatarprado', 'Claude Assistant', 'claude', 'Gemini', 'yakob-aleksandrovich', 'Ian Lindsley', 'Fly.io']</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5" office:value-type="string" calcext:value-type="string">
            <text:p><text:a xlink:href="https://github.com/unfoldingWord/bt-servant-engine" xlink:type="simple">https://github.com/unfoldingWord/bt-servant-engine</text:a></text:p>
          </table:table-cell>
          <table:table-cell table:style-name="ce4" office:value-type="string" calcext:value-type="string">
            <text:p>2026-01-16T14:04:21Z</text:p>
          </table:table-cell>
          <table:table-cell table:style-name="ce4"/>
          <table:table-cell table:style-name="ce1" office:value-type="string" calcext:value-type="string">
            <text:p>unfoldingWord/bt-servant-engin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engine-data-loader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15T00:36:38Z</text:p>
          </table:table-cell>
          <table:table-cell table:style-name="ce1" office:value-type="string" calcext:value-type="string">
            <text:p>2026-01-15T00:36:3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engine-data-loaders" xlink:type="simple">https://github.com/unfoldingWord/bt-servant-engine-data-loaders</text:a></text:p>
          </table:table-cell>
          <table:table-cell table:style-name="ce4" office:value-type="string" calcext:value-type="string">
            <text:p>2026-01-15T00:36:42Z</text:p>
          </table:table-cell>
          <table:table-cell table:style-name="ce4"/>
          <table:table-cell table:style-name="ce1" office:value-type="string" calcext:value-type="string">
            <text:p>unfoldingWord/bt-servant-engine-data-loader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kb-worker</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4T00:09: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kb-worker" xlink:type="simple">https://github.com/unfoldingWord/bt-servant-kb-worker</text:a></text:p>
          </table:table-cell>
          <table:table-cell table:style-name="ce4" office:value-type="string" calcext:value-type="string">
            <text:p>2026-03-14T00:10:02Z</text:p>
          </table:table-cell>
          <table:table-cell table:style-name="ce4"/>
          <table:table-cell table:style-name="ce1" office:value-type="string" calcext:value-type="string">
            <text:p>unfoldingWord/bt-servant-kb-work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log-viewer</text:p>
          </table:table-cell>
          <table:table-cell table:style-name="ce1" office:value-type="string" calcext:value-type="string">
            <text:p>unfoldingWord</text:p>
          </table:table-cell>
          <table:table-cell table:style-name="ce1" office:value-type="string" calcext:value-type="string">
            <text:p>Svelt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16T23:13:39Z</text:p>
          </table:table-cell>
          <table:table-cell table:style-name="ce1" office:value-type="string" calcext:value-type="string">
            <text:p>2026-01-16T23:13:06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claude', 'ILindsley', 'IanLindsley', 'codex', 'Codex Assistan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log-viewer" xlink:type="simple">https://github.com/unfoldingWord/bt-servant-log-viewer</text:a></text:p>
          </table:table-cell>
          <table:table-cell table:style-name="ce4" office:value-type="string" calcext:value-type="string">
            <text:p>2026-01-16T23:13:43Z</text:p>
          </table:table-cell>
          <table:table-cell table:style-name="ce4"/>
          <table:table-cell table:style-name="ce1" office:value-type="string" calcext:value-type="string">
            <text:p>unfoldingWord/bt-servant-log-view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message-brok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20T00:14:28Z</text:p>
          </table:table-cell>
          <table:table-cell table:style-name="ce1" office:value-type="string" calcext:value-type="string">
            <text:p>2026-02-20T00:13:37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claude', '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message-broker" xlink:type="simple">https://github.com/unfoldingWord/bt-servant-message-broker</text:a></text:p>
          </table:table-cell>
          <table:table-cell table:style-name="ce4" office:value-type="string" calcext:value-type="string">
            <text:p>2026-02-20T00:14:18Z</text:p>
          </table:table-cell>
          <table:table-cell table:style-name="ce4"/>
          <table:table-cell table:style-name="ce1" office:value-type="string" calcext:value-type="string">
            <text:p>unfoldingWord/bt-servant-message-brok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report-send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7T16:47:37Z</text:p>
          </table:table-cell>
          <table:table-cell table:style-name="ce1" office:value-type="string" calcext:value-type="string">
            <text:p>2025-12-17T16:47: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laude', 'IanLindsley',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report-sender" xlink:type="simple">https://github.com/unfoldingWord/bt-servant-report-sender</text:a></text:p>
          </table:table-cell>
          <table:table-cell table:style-name="ce4" office:value-type="string" calcext:value-type="string">
            <text:p>2025-12-17T16:47:41Z</text:p>
          </table:table-cell>
          <table:table-cell table:style-name="ce4"/>
          <table:table-cell table:style-name="ce1" office:value-type="string" calcext:value-type="string">
            <text:p>unfoldingWord/bt-servant-report-send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signal-gateway</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21:44:04Z</text:p>
          </table:table-cell>
          <table:table-cell table:style-name="ce1" office:value-type="string" calcext:value-type="string">
            <text:p>2026-06-16T18:47:12Z</text:p>
          </table:table-cell>
          <table:table-cell table:style-name="ce4"/>
          <table:table-cell table:style-name="ce4" office:value-type="float" office:value="12" calcext:value-type="float">
            <text:p>12</text:p>
          </table:table-cell>
          <table:table-cell table:style-name="ce4" office:value-type="float" office:value="1" calcext:value-type="float">
            <text:p>1</text:p>
          </table:table-cell>
          <table:table-cell table:style-name="ce1" table:number-columns-repeated="8"/>
          <table:table-cell table:style-name="ce1" office:value-type="string" calcext:value-type="string">
            <text:p>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signal-gateway" xlink:type="simple">https://github.com/unfoldingWord/bt-servant-signal-gateway</text:a></text:p>
          </table:table-cell>
          <table:table-cell table:style-name="ce4" office:value-type="string" calcext:value-type="string">
            <text:p>2026-06-16T18:48:35Z</text:p>
          </table:table-cell>
          <table:table-cell table:style-name="ce4"/>
          <table:table-cell table:style-name="ce1" office:value-type="string" calcext:value-type="string">
            <text:p>unfoldingWord/bt-servant-signal-gatewa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si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16T19:38:3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BincyJ', 'sethstoll3']</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bt-servant-site" xlink:type="simple">https://github.com/unfoldingWord/bt-servant-site</text:a></text:p>
          </table:table-cell>
          <table:table-cell table:style-name="ce4" office:value-type="string" calcext:value-type="string">
            <text:p>2026-05-16T19:38:38Z</text:p>
          </table:table-cell>
          <table:table-cell table:style-name="ce4"/>
          <table:table-cell table:style-name="ce1" office:value-type="string" calcext:value-type="string">
            <text:p>unfoldingWord/bt-servant-sit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telemet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0T14:16:52Z</text:p>
          </table:table-cell>
          <table:table-cell table:style-name="ce1" office:value-type="string" calcext:value-type="string">
            <text:p>2026-06-10T14:14:55Z</text:p>
          </table:table-cell>
          <table:table-cell table:style-name="ce4"/>
          <table:table-cell table:style-name="ce4" office:value-type="float" office:value="8" calcext:value-type="float">
            <text:p>8</text:p>
          </table:table-cell>
          <table:table-cell table:style-name="ce4" office:value-type="float" office:value="0" calcext:value-type="float">
            <text:p>0</text:p>
          </table:table-cell>
          <table:table-cell table:style-name="ce1"/>
          <table:table-cell table:style-name="ce1" office:value-type="string" calcext:value-type="string">
            <text:p>bt-servant-telemetry</text:p>
          </table:table-cell>
          <table:table-cell table:style-name="ce1" table:number-columns-repeated="6"/>
          <table:table-cell table:style-name="ce1" office:value-type="string" calcext:value-type="string">
            <text:p>['IanLindsley', 'claude',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telemetry" xlink:type="simple">https://github.com/unfoldingWord/bt-servant-telemetry</text:a></text:p>
          </table:table-cell>
          <table:table-cell table:style-name="ce4" office:value-type="string" calcext:value-type="string">
            <text:p>2026-06-10T14:19:53Z</text:p>
          </table:table-cell>
          <table:table-cell table:style-name="ce4"/>
          <table:table-cell table:style-name="ce1" office:value-type="string" calcext:value-type="string">
            <text:p>unfoldingWord/bt-servant-telemetr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web-clien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3T17:48:59Z</text:p>
          </table:table-cell>
          <table:table-cell table:style-name="ce1" office:value-type="string" calcext:value-type="string">
            <text:p>2026-06-13T17:48:58Z</text:p>
          </table:table-cell>
          <table:table-cell table:style-name="ce4"/>
          <table:table-cell table:style-name="ce4" office:value-type="float" office:value="7" calcext:value-type="float">
            <text:p>7</text:p>
          </table:table-cell>
          <table:table-cell table:style-name="ce4" office:value-type="float" office:value="1" calcext:value-type="float">
            <text:p>1</text:p>
          </table:table-cell>
          <table:table-cell table:style-name="ce1"/>
          <table:table-cell table:style-name="ce1" office:value-type="string" calcext:value-type="string">
            <text:p>bt-servant-web-client</text:p>
          </table:table-cell>
          <table:table-cell table:style-name="ce1" table:number-columns-repeated="6"/>
          <table:table-cell table:style-name="ce1" office:value-type="string" calcext:value-type="string">
            <text:p>['ILindsley', 'IanLindsley', 'claude', 'sethstoll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web-client" xlink:type="simple">https://github.com/unfoldingWord/bt-servant-web-client</text:a></text:p>
          </table:table-cell>
          <table:table-cell table:style-name="ce4" office:value-type="string" calcext:value-type="string">
            <text:p>2026-06-13T17:49:02Z</text:p>
          </table:table-cell>
          <table:table-cell table:style-name="ce4"/>
          <table:table-cell table:style-name="ce1" office:value-type="string" calcext:value-type="string">
            <text:p>unfoldingWord/bt-servant-web-clien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whatsapp-gatewa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5:25:46Z</text:p>
          </table:table-cell>
          <table:table-cell table:style-name="ce1" office:value-type="string" calcext:value-type="string">
            <text:p>2026-06-17T15:25:36Z</text:p>
          </table:table-cell>
          <table:table-cell table:style-name="ce4"/>
          <table:table-cell table:style-name="ce4" office:value-type="float" office:value="8" calcext:value-type="float">
            <text:p>8</text:p>
          </table:table-cell>
          <table:table-cell table:style-name="ce4" office:value-type="float" office:value="0" calcext:value-type="float">
            <text:p>0</text:p>
          </table:table-cell>
          <table:table-cell table:style-name="ce1"/>
          <table:table-cell table:style-name="ce1" office:value-type="string" calcext:value-type="string">
            <text:p>bt-servant-whatsapp-gateway</text:p>
          </table:table-cell>
          <table:table-cell table:style-name="ce1" table:number-columns-repeated="6"/>
          <table:table-cell table:style-name="ce1" office:value-type="string" calcext:value-type="string">
            <text:p>['ILindsley', 'IanLindsley', 'clau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whatsapp-gateway" xlink:type="simple">https://github.com/unfoldingWord/bt-servant-whatsapp-gateway</text:a></text:p>
          </table:table-cell>
          <table:table-cell table:style-name="ce4" office:value-type="string" calcext:value-type="string">
            <text:p>2026-06-17T15:27:01Z</text:p>
          </table:table-cell>
          <table:table-cell table:style-name="ce4"/>
          <table:table-cell table:style-name="ce1" office:value-type="string" calcext:value-type="string">
            <text:p>unfoldingWord/bt-servant-whatsapp-gatewa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work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5:26:25Z</text:p>
          </table:table-cell>
          <table:table-cell table:style-name="ce1" office:value-type="string" calcext:value-type="string">
            <text:p>2026-06-16T21:32:07Z</text:p>
          </table:table-cell>
          <table:table-cell table:style-name="ce4"/>
          <table:table-cell table:style-name="ce4" office:value-type="float" office:value="110" calcext:value-type="float">
            <text:p>110</text:p>
          </table:table-cell>
          <table:table-cell table:style-name="ce4" office:value-type="float" office:value="10" calcext:value-type="float">
            <text:p>10</text:p>
          </table:table-cell>
          <table:table-cell table:style-name="ce1"/>
          <table:table-cell table:style-name="ce1" office:value-type="string" calcext:value-type="string">
            <text:p>bt-servant-worker</text:p>
          </table:table-cell>
          <table:table-cell table:style-name="ce1" table:number-columns-repeated="6"/>
          <table:table-cell table:style-name="ce1" office:value-type="string" calcext:value-type="string">
            <text:p>['claude', 'IanLindsley', 'ILindsley', 'deferredreward', 'sethstoll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worker" xlink:type="simple">https://github.com/unfoldingWord/bt-servant-worker</text:a></text:p>
          </table:table-cell>
          <table:table-cell table:style-name="ce4" office:value-type="string" calcext:value-type="string">
            <text:p>2026-06-16T21:33:14Z</text:p>
          </table:table-cell>
          <table:table-cell table:style-name="ce4"/>
          <table:table-cell table:style-name="ce1" office:value-type="string" calcext:value-type="string">
            <text:p>unfoldingWord/bt-servant-work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atalog-next-toolki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15T13:39:30Z</text:p>
          </table:table-cell>
          <table:table-cell table:style-name="ce1" office:value-type="string" calcext:value-type="string">
            <text:p>2021-06-15T13:39:27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catalog-next-toolkit</text:p>
          </table:table-cell>
          <table:table-cell table:style-name="ce1" table:number-columns-repeated="4"/>
          <table:table-cell table:style-name="ce1" office:value-type="string" calcext:value-type="string">
            <text:p>uw-content-validation</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atalog-next-toolkit" xlink:type="simple">https://github.com/unfoldingWord/catalog-next-toolkit</text:a></text:p>
          </table:table-cell>
          <table:table-cell table:style-name="ce4" office:value-type="string" calcext:value-type="string">
            <text:p>2021-06-15T13:39:33Z</text:p>
          </table:table-cell>
          <table:table-cell table:style-name="ce4"/>
          <table:table-cell table:style-name="ce1" office:value-type="string" calcext:value-type="string">
            <text:p>unfoldingWord/catalog-next-toolki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hamilo2obsidian</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13T23:30:29Z</text:p>
          </table:table-cell>
          <table:table-cell table:style-name="ce1" office:value-type="string" calcext:value-type="string">
            <text:p>2022-12-13T23:30:2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amilo2obsidian" xlink:type="simple">https://github.com/unfoldingWord-box3/chamilo2obsidian</text:a></text:p>
          </table:table-cell>
          <table:table-cell table:style-name="ce4" office:value-type="string" calcext:value-type="string">
            <text:p>2022-12-12T20:50:51Z</text:p>
          </table:table-cell>
          <table:table-cell table:style-name="ce4"/>
          <table:table-cell table:style-name="ce1" office:value-type="string" calcext:value-type="string">
            <text:p>unfoldingWord-box3/chamilo2obsidian</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hecking-app-theia</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20T20:08:48Z</text:p>
          </table:table-cell>
          <table:table-cell table:style-name="ce1" office:value-type="string" calcext:value-type="string">
            <text:p>2025-03-20T20:08:4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hecking-app-theia" xlink:type="simple">https://github.com/unfoldingWord-box3/checking-app-theia</text:a></text:p>
          </table:table-cell>
          <table:table-cell table:style-name="ce4" office:value-type="string" calcext:value-type="string">
            <text:p>2025-03-20T20:08:52Z</text:p>
          </table:table-cell>
          <table:table-cell table:style-name="ce4"/>
          <table:table-cell table:style-name="ce1" office:value-type="string" calcext:value-type="string">
            <text:p>unfoldingWord-box3/checking-app-thei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laude_security_sentinel</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02T19:57:42Z</text:p>
          </table:table-cell>
          <table:table-cell table:style-name="ce1" office:value-type="string" calcext:value-type="string">
            <text:p>2026-03-02T19:57: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laude_security_sentinel" xlink:type="simple">https://github.com/unfoldingWord/claude_security_sentinel</text:a></text:p>
          </table:table-cell>
          <table:table-cell table:style-name="ce4" office:value-type="string" calcext:value-type="string">
            <text:p>2026-05-22T15:02:16Z</text:p>
          </table:table-cell>
          <table:table-cell table:style-name="ce4"/>
          <table:table-cell table:style-name="ce1" office:value-type="string" calcext:value-type="string">
            <text:p>unfoldingWord/claude_security_sentine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cloudfront_logprocesso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15:53:05Z</text:p>
          </table:table-cell>
          <table:table-cell table:style-name="ce1" office:value-type="string" calcext:value-type="string">
            <text:p>2026-06-03T15:53:0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ap-Jan Swijnenburg', 'yakob-aleksandrovich', 'elgohr',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loudfront_logprocessor" xlink:type="simple">https://github.com/unfoldingWord/cloudfront_logprocessor</text:a></text:p>
          </table:table-cell>
          <table:table-cell table:style-name="ce4" office:value-type="string" calcext:value-type="string">
            <text:p>2026-06-03T15:57:01Z</text:p>
          </table:table-cell>
          <table:table-cell table:style-name="ce4"/>
          <table:table-cell table:style-name="ce1" office:value-type="string" calcext:value-type="string">
            <text:p>unfoldingWord/cloudfront_logprocesso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content-validation-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3-29T11:54:08Z</text:p>
          </table:table-cell>
          <table:table-cell table:style-name="ce1" office:value-type="string" calcext:value-type="string">
            <text:p>2021-03-29T11:54:05Z</text:p>
          </table:table-cell>
          <table:table-cell table:style-name="ce4"/>
          <table:table-cell table:style-name="ce4" office:value-type="float" office:value="8" calcext:value-type="float">
            <text:p>8</text:p>
          </table:table-cell>
          <table:table-cell table:style-name="ce4" office:value-type="float" office:value="0" calcext:value-type="float">
            <text:p>0</text:p>
          </table:table-cell>
          <table:table-cell table:style-name="ce1"/>
          <table:table-cell table:style-name="ce1" office:value-type="string" calcext:value-type="string">
            <text:p>content-validation-app</text:p>
          </table:table-cell>
          <table:table-cell table:style-name="ce1" table:formula="of:=FALSE()" office:value-type="float" office:value="0" calcext:value-type="float">
            <text:p>0</text:p>
          </table:table-cell>
          <table:table-cell table:style-name="ce1" office:value-type="float" office:value="188" calcext:value-type="float">
            <text:p>188</text:p>
          </table:table-cell>
          <table:table-cell table:style-name="ce1" office:value-type="string" calcext:value-type="string">
            <text:p>2020-09-16T21:52:51.640Z</text:p>
          </table:table-cell>
          <table:table-cell table:style-name="ce1"/>
          <table:table-cell table:style-name="ce1" office:value-type="string" calcext:value-type="string">
            <text:p>uw-content-validation</text:p>
          </table:table-cell>
          <table:table-cell table:style-name="ce1"/>
          <table:table-cell table:style-name="ce1" office:value-type="string" calcext:value-type="string">
            <text:p>['PhotoNomad0',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content-validation-app" xlink:type="simple">https://github.com/unfoldingWord-box3/content-validation-app</text:a></text:p>
          </table:table-cell>
          <table:table-cell table:style-name="ce4" office:value-type="string" calcext:value-type="string">
            <text:p>2021-03-29T11:54:10Z</text:p>
          </table:table-cell>
          <table:table-cell table:style-name="ce4"/>
          <table:table-cell table:style-name="ce1" office:value-type="string" calcext:value-type="string">
            <text:p>unfoldingWord-box3/content-validation-app</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has low but nonzero npm usage (188 downloads in the last year) and no detected local consumers.</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cyber-security-re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09:29:35Z</text:p>
          </table:table-cell>
          <table:table-cell table:style-name="ce1" office:value-type="string" calcext:value-type="string">
            <text:p>2026-06-03T09:29:2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yber-security-report" xlink:type="simple">https://github.com/unfoldingWord/cyber-security-report</text:a></text:p>
          </table:table-cell>
          <table:table-cell table:style-name="ce4" office:value-type="string" calcext:value-type="string">
            <text:p>2026-06-03T09:29:39Z</text:p>
          </table:table-cell>
          <table:table-cell table:style-name="ce4"/>
          <table:table-cell table:style-name="ce1" office:value-type="string" calcext:value-type="string">
            <text:p>unfoldingWord/cyber-security-repor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table:number-columns-repeated="2"/>
          <table:table-cell table:style-name="ce1" office:value-type="string" calcext:value-type="string">
            <text:p>d43-catalog</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10-21T07:58:13Z</text:p>
          </table:table-cell>
          <table:table-cell table:style-name="ce4"/>
          <table:table-cell table:style-name="ce4" office:value-type="float" office:value="25" calcext:value-type="float">
            <text:p>25</text:p>
          </table:table-cell>
          <table:table-cell table:style-name="ce4" office:value-type="float" office:value="14" calcext:value-type="float">
            <text:p>14</text:p>
          </table:table-cell>
          <table:table-cell table:style-name="ce1" table:number-columns-repeated="8"/>
          <table:table-cell table:style-name="ce1" office:value-type="string" calcext:value-type="string">
            <text:p>['da1nerd', 'Thomas Klemz', 'Richard Mahn', 'richmahn', 'jag3773', 'phillip-hopper', 'Phil Hopper', 'PhotoNomad0', 'RoyalSix', 'rbnswartz', 'RobH123', 'Sterling (Jay) Scott',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43-catalog" xlink:type="simple">https://github.com/unfoldingWord-dev/d43-catalog</text:a></text:p>
          </table:table-cell>
          <table:table-cell table:style-name="ce4" office:value-type="string" calcext:value-type="string">
            <text:p>2024-10-21T07:58:18Z</text:p>
          </table:table-cell>
          <table:table-cell table:style-name="ce4"/>
          <table:table-cell table:style-name="ce1" office:value-type="string" calcext:value-type="string">
            <text:p>unfoldingWord-dev/d43-catalog</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data_tracking_im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03T19:14:01Z</text:p>
          </table:table-cell>
          <table:table-cell table:style-name="ce1" office:value-type="string" calcext:value-type="string">
            <text:p>2026-02-03T19:13:59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yakob-aleksandrovich', 'IanLindsley', 'drcox63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ata_tracking_import" xlink:type="simple">https://github.com/unfoldingWord/data_tracking_import</text:a></text:p>
          </table:table-cell>
          <table:table-cell table:style-name="ce4" office:value-type="string" calcext:value-type="string">
            <text:p>2026-02-03T19:14:08Z</text:p>
          </table:table-cell>
          <table:table-cell table:style-name="ce4"/>
          <table:table-cell table:style-name="ce1" office:value-type="string" calcext:value-type="string">
            <text:p>unfoldingWord/data_tracking_impor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data_tracking_wrangler</text:p>
          </table:table-cell>
          <table:table-cell table:style-name="ce1" office:value-type="string" calcext:value-type="string">
            <text:p>unfoldingWord</text:p>
          </table:table-cell>
          <table:table-cell table:style-name="ce1" office:value-type="string" calcext:value-type="string">
            <text:p>R</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02T16:38:51Z</text:p>
          </table:table-cell>
          <table:table-cell table:style-name="ce1" office:value-type="string" calcext:value-type="string">
            <text:p>2025-12-02T16:38: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drcox633', 'Derek Co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ata_tracking_wrangler" xlink:type="simple">https://github.com/unfoldingWord/data_tracking_wrangler</text:a></text:p>
          </table:table-cell>
          <table:table-cell table:style-name="ce4" office:value-type="string" calcext:value-type="string">
            <text:p>2025-12-02T16:38:55Z</text:p>
          </table:table-cell>
          <table:table-cell table:style-name="ce4"/>
          <table:table-cell table:style-name="ce1" office:value-type="string" calcext:value-type="string">
            <text:p>unfoldingWord/data_tracking_wrangl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dbbackupr2</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27T12:19:22Z</text:p>
          </table:table-cell>
          <table:table-cell table:style-name="ce1" office:value-type="string" calcext:value-type="string">
            <text:p>2025-11-27T12:19:17Z</text:p>
          </table:table-cell>
          <table:table-cell table:style-name="ce4" office:value-type="string" calcext:value-type="string">
            <text:p>2024-07-09T13:34:50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style-name="ce1" office:value-type="float" office:value="2" calcext:value-type="float">
            <text:p>2</text:p>
          </table:table-cell>
          <table:table-cell table:style-name="ce1" office:value-type="float" office:value="9" calcext:value-type="float">
            <text:p>9</text:p>
          </table:table-cell>
          <table:table-cell table:style-name="ce5" office:value-type="string" calcext:value-type="string">
            <text:p><text:a xlink:href="https://github.com/unfoldingWord/dbbackupr2" xlink:type="simple">https://github.com/unfoldingWord/dbbackupr2</text:a></text:p>
          </table:table-cell>
          <table:table-cell table:style-name="ce4" office:value-type="string" calcext:value-type="string">
            <text:p>2025-11-27T12:19:25Z</text:p>
          </table:table-cell>
          <table:table-cell table:style-name="ce4"/>
          <table:table-cell table:style-name="ce1" office:value-type="string" calcext:value-type="string">
            <text:p>unfoldingWord/dbbackupr2</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dcs</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4T01:06:51Z</text:p>
          </table:table-cell>
          <table:table-cell table:style-name="ce1" office:value-type="string" calcext:value-type="string">
            <text:p>2026-04-19T02:36:29Z</text:p>
          </table:table-cell>
          <table:table-cell table:style-name="ce4" office:value-type="string" calcext:value-type="string">
            <text:p>2026-06-03T23:53:30Z</text:p>
          </table:table-cell>
          <table:table-cell table:style-name="ce4" office:value-type="float" office:value="48" calcext:value-type="float">
            <text:p>48</text:p>
          </table:table-cell>
          <table:table-cell table:style-name="ce4" office:value-type="float" office:value="7" calcext:value-type="float">
            <text:p>7</text:p>
          </table:table-cell>
          <table:table-cell table:style-name="ce1" table:number-columns-repeated="8"/>
          <table:table-cell table:style-name="ce6" office:value-type="string" calcext:value-type="string">
            <text:p>['unknwon', 'lunny', 'GiteaBot', 'silverwind', 'wxiaoguang', 'zeripath', '6543', 'techknowlogick', 'KN4CK3R', 'ethantkoenig', 'lafriks', 'yp05327', 'jolheiser', 'yardenshoham', 'Gusted', 'richmahn', 'fuxiaohei', 'sapk', 'wolfogre', 'a1012112796', 'andreynering', 'tboerger', 'Zettat123', 'appleboy', 'strk', 'CirnoT', 'slene', 'guillep2k', 'mrsdizzie', 'bkcsoft', 'delvh', 'JakobDev', 'adelowo', 'HesterG', 'kerwin612', 'codeskyblue', 'noerw', 'jpraet', 'Bwko', 'brechtvl', 'denyskon', 'nanguanlin6', 'psmit', 'typeless', 'davidsvantesson', 'kolaente', 'earl-warren', 'cez81', 'metalmatze', 'TheFox0x7', 'qwerty287', 'sillyguodong', 'kdumontnu', 'jonasfranz', 'Morlinest', 'ChristopherHX', 'nanoant', 'CaiCandong', 'harryzcy', 'daviian', 'tyroneyeh', 'Thomas Boerger', 'kemzeb', 'jaqra', 'thehowl', 'nussjustin-hmmh', 'dependabot[bot]', 'fanningert', 'sebastian-sauer', '0rax', 'puni9869', 'bircni', 'fnkr', 'bagasme', 'SagePtr', 'singuliere', 'Cherrg', 'hiifong', 'saitho', 'n0toose', 'nussjustin', '42wim', 'gary-kim', 'compressed', 'crystaldust', 'charles7668', 'Xinyu Zhou', 'NorthRealm', 'Josh Frye', 'eeyrjmr', 'Copilot', 'bohde', '0xBAADF00D', 'bytedream', 'Fluf', 'metiftikci', 'axifive', 'BLumia', 'justusbunsi', 'thibaultmeyer', 'pgaskin', 'odinuge', 'CL-Jeremy', 'makhov', 'geek1011', 'Sergio Benitez', 'pat-s', 'acusti', 'fsologureng', 'genedna', 'sebastianertz', 'chriswatt', 'jtran', 'pboguslawski', 'Gibheer', 'crohr', 'lstahlman', 'soudy', 'mscherer', 'luzpaz', 'DblK', 'michaelkuhn', 'mhartkorn', 'Jack Hay', 'Gogs', 'zokkis', 'fnetX', 'blueworrybear', 'wULLSnpAXbWZGYDYyhWTKKspEQoaYxXyhoisqHf', 'oliverpool', 'realaravinth', 'BetaCat0', 'manfer', 'HEREYUA', 'HarshitOnGitHub', 'hickford', 'Nick', 'romdum', 'bugreport0', 'sonjek', 'tstorch', 'philip-peterson', 'joubertredrat', 'AdamMajer', 'clarfonthey', '8ctopus', 'Avelino', 'bhalbright', 'anbraten', 'donbowman', 'gzsombor', 'badhezi', 'Tony Tsang', 'github-actions[bot]', 'alrs', 'ExplodingDragon', 'parnic', 'jamesorlakin', 'lanceju', 'stevegt', 'johanvdw', 'shashvat-kedia', 'silentcodeg', 'm0sth8', 'wqweto', 'drsybren', 'PEN²', 'kaz', 'filipnavara', 'evolvedlight', 'wackbyte', 'jacksonpan', 'xiaoxiao', 'crystalcommunication', 'cloudchamb3r', 'xf-', 'allonsy', 'cipherboy', 'aswild', 'minecrafter', 'angus-g', 'bsofiato', 'eltociear', 'das7pad', 'jcracknell', 'nagos', 'kevans91', 'Sebastian Jackel', 'linquize', 'MTecknology', 'nicolai86', 'rogerluo410', 'rremer', 'tamalsaha', 'tobiasbp', 'xwjdsh', 'fundon', 'harryxu', 'laofo', 'merlleu', 'ngourdon', 'rock2dust', 'sahinakkaya', 'lutinglt', 'jamesa', 'Stefan-Code', 'cassiozareck', 'willemvd', 'ashimokawa', '99rgosse', 'Alexey Makhov', 'Ryuno-Ki', 'changchaishi', 'muesli', 'AJ ONeal', 'exmex', 'garymoon', 'gwymor', 'webjoel', 'apricote', 'JulienTant', 'kjellkvinge', 'L0veSunshine', 'mkuhlmann', 'andmarios', 'chadoe', 'MCF', 'gnat', 'cristaloleg', 'petergardfjall', '0rzech', 'Piotr Orzechowski', 'rafh', 'invliD', 'ScionOfDesign', 'S7evinK', 'roblabla', 'rfwatson', 'couling', 'HoffmannP', 'PeterDaveHello', 'kecrily', 'denji', 'segevfiner', 'Vedran', 'POPSuL', 'everhopingandwaiting', 'kakwa', 'modmew8', 'chk1', 'Makonike', 'MayMeow', 'romankl', 'cornelk', 'dsseng', 'ciarand', 'bkmgit', 'andrew-boyarshin', 'AlbertoGP', 'Eekle', 'eneuschild', 'yzzyx', 'Juneezee', 'eryx', 'fabian-z', 'LefsFlare', 'Michael Dyrynda', 'viceice', 'me-heer', 'michaelboke', 'llikeitt', 'mattwalo32', 'lukbukkit', 'gabriel-vasile', 'bimakw', 'denghongcai', 'sungam3r', 'jeblair', 'kvaster', 'vtemian', 'WGH-', 'typed-sigterm', 'vizv', 'Yixin Hao', 'aceArt-GmbH', 'bobemoe', 'Preovaleo', 'proailurus', 'crackcomm', 'Tekaoh', 'ericLemanissier', 'jladbrook', 'junoberryferry', 'luojiyin1987', 'mpeter50', 'n194', 'nodiscc', 'oscarlofwenhamn', 'pkuphy', 'vnkmpf', 'william-allspice', 'xinyu', 'xkcdstickfig', 'zhsso', 'dnmgns', 'dubeg', 'James Anderson', 'kzmi', 'ivanvc', 'algernon', 'fsiddi', 'EpicCoder', 'djcas9', 'mrexodia', 'diseaz', 'divbhasin', 'barracks510', 'Chri-s', 'skyline75489', 'brymut', 'andrewimeson', 'BlenderDefender', 'arthuroy', 'moltam', 'Stanislav', 'twang2218', 'Sorien', 'slingamn', 'rvillablanca', 'pbor', 'nuno-silva', 'ndarilek', 'emonty', 'Michael Stroucken', 'melroy89', 'Mai-Lapyst', 'mqudsi', 'xor-gate', 'jbgomond', 'Simon Pistache', 'Simon Legner', 'Simon', 'Siarhei Navatski', 'Shyim', 'Shuanglei Tao', 'Shaun', 'Sergey Zolotarev', 'Sebastian Brückner', 'Schwobaland', 'Sasha Varlamov', 'Sandro', 'Samuel FORESTIER', 'Simon Priet', 'Sondre Nilsen', 'Stanley Hu', 'SteveTheEngineer', 'Success Go', 'Sumit', 'Surya Purohit', 'Tchoupinax', 'Thiago Avelino', 'Thomas Loubiou', 'Thomas McWork', 'Tim Biermann', 'Tobias Balle-Petersen', 'Tobias Kunicke', 'Toni', 'Prox501', 'MysticBoy', 'Naohisa Murakami', 'Nathan Zadoks', 'Naxdy', 'Nicholas Pease', 'Nicolas Lenz', 'OhDaeto', 'Oleksandr Redko', 'Pascal Zimmermann', 'Patrick DeVivo', 'Patrick Lühne', 'Paul Brackin', 'Pedro Alves', 'Petr Vaněk', 'Pheng Heong TAN', 'Philippe Barsalou', 'Philippe Kueck', 'PineBale', 'Quentin', 'Rachid Zarouali', 'René Schaar', 'Richard Coleman', 'Richie B2B', 'Robin', 'Rodrigo Saboya', 'Rongjian Zhang', 'Rowan Bohde', 'Roy Marples', 'Rui Chen', 'Russell Aunger', 'ktprograms', 'leonklingele', 'lonix1', 'mainboarder', 'manuelluis', 'mcheng89', 'miles@Oscar', 'mlpo', 'nekrondev', 'nemoinho', 'neon', 'nitul1991', 'pricly-yellow', 'pseudocoder', 'puffybsd', 'rugk', 'satnam72', 'sommerf-lf', 'sotho', 'spaeps', 'successgo', 'ttys3', 'vee w', 'ya', 'yasuokav', 'yearski', 'yshyuk', '来自村里的小螃蟹', '胡玮文', '마누엘', 'Toni Villena', 'Viktor Yakovchuk', 'Vitaliy Vasilenko', 'Vladimir Smagin', 'Wayne Starr', 'Wiktor Kwapisiewicz', 'Will 保哥', 'YISH', 'YaFou', 'Yehonatan Ezron', 'Zisu Zhang', 'alex', 'bit', 'btrepp', 'capvor', 'coldWater', 'crapStone', 'dennis-smurf', 'endo0911engineer', 'esell', 'euank', 'flynnnnnnnnnn', 'gempir', 'glaszig', 'guyzmo', 'iszla', 'jwdeitch', 'katsu', 'koalp', 'clee', 'chrisshyi', 'chrullrich', 'cboylan', 'clinta', 'CodeDoctorDE', 'cody-vibe', 'carnott-snap', 'Cosmin Stroe', 'DanielMatiasCarvalho', 'h3xx', 'Xiol', 'danielflira', 'dmach', 'DanielOaks', 'nephatrine', 'daniil-pankratov', 'thionic', 'silverkorn', 'dvejmz', 'davmrtl', 'David Svantesson', 'deiwin', 'dhuan', 'dominikschulz', 'mhaeuser', 'DrMaxNix', 'Exagone313', 'Kamil Domański', '0x5c', 'andruwa13', 'Sonic853', 'f0086', 'abheekda1', 'AdamKorcz', 'albang', 'msoedov', 'AlexMaryW', 'McRaeAlex', 'alvaroaleman', 'AndrewBezold', 'ErebusBat', 'andre-hub', 'anton-khimich', 'tuxillo', 'th3noname', 'ashmckenzie', 'abh', 'BNolet', 'kimbj95', 'baijum', 'balki', 'renbaoshuo', 'BElluu', 'memorion', 'benyanke', 'bwenrich', 'bminer', 'cennis91', 'KazzmanK', 'Km', 'Kristian Antonsen', 'Luca Beltrame', 'Lucas Azevedo', 'Lucien Kerl', 'M4RKUS-11111', 'MaeIsBad', 'Mageti', 'ManInDark', 'Marat Radchenko', 'Marcell Mars', 'Martin Delille', 'Martin Michaelis', 'Mashiro', 'Matt Hamilton', 'Max P.', 'Max Wipfli', 'Maxim Slipenko', 'MeIchthys', 'Meano', 'Meisam', 'Mithilesh Gupta', 'Mohamed Sekour', 'Mohit Swarnkar', 'Morgan Bazalgette', 'Mulia Nasution', 'Mura Li', 'Myers Carpenter', 'raxetul', 'EnricoFerro', 'faridtsl', 'nothub', 'frankli0324', 'gabrielsimoes', 'hakito', 'gramakri', 'gregkare', 'gsvd', 'hhenkel', 'henrygoodman', 'hoitih', 'Infinoid', 'InonS', 'Jörg Thalheim', 'Julien Palard', 'jnlin', 'joaopms', 'jorgesumle', 'jayczech23', 'aqtrans', 'Jookia', 'LaoQi', 'johnmaguire', 'jim-kirisame', 'MrGussio', 'Rukenshia', 'jakob30061', 'Kreyren', 'Sebastian Weigand', 'Semenets V. Pavel', 'Sergey Bugaev', 'Sergey Dryabzhinsky', 'Sergey Romanov', 'Sergey Sharybin', 'Stanislas Dolcini', 'Sebastian T. T.', 'Sebastian Luino', 'Sebastian Grabowski', 'Sebastian Ertz', 'Sean Keery', 'Scott Yeager', 'Scarsz', 'Saulius Gurklys', 'Saswat Padhi', 'Spencer Taylor', 'SpaWn2KiLl', 'Soputtra San', 'Songlin Yang', 'SohnyBohny', 'Snowball_233', 'SlavikZ', 'Sl@ny', 'SjonHortensius', 'Sina Siadat', 'SimonErm', 'Silke', 'Sijmen Schoon', 'Sienna Lloyd', 'Shikiryu', 'Shikaku', 'Shafi Ahmed', 'Sergio Schvezov', 'Roman Egunkov', 'Romain Beaumont', 'Rolf Kaiser', 'Roland Koebler', 'Rohan Guliani', 'Robin Schoonover', 'Roberto Santalla', 'Robert Ștefan', 'Robert Sprunk', 'Robert Speicher', 'Robert Rauch', 'Robert Lützner', 'Robert Kaussow', 'Robert A. Nowak', 'Rob Gonnella', 'Risu', 'Nuyube', 'Sasha Melentyev', 'Sascha Bannier', 'Saren Currie', 'Sandro Jäckel', 'SandeshPyakurel', 'Sandeep Bhat', 'Sambhav Saggi', 'SahAssar', 'Rémi Saurel', 'Râu Cao', 'Ryo Hanafusa', 'Rychu', 'Ryan Halliday', 'Ryan', 'Ross Smith II', 'Ross Golder', 'Rory McNamara', 'Viktor Szakats', 'Tomcat', 'Tom', 'Tohka', 'Tobias Florek', 'Timur Makarchuk', 'Timothée Ravier', 'Timon van der Berg', 'Timon Engelke', 'Timo Schindler', 'Timo Myyrä', 'Timo Ley', 'Timo Gurr', 'TimberBro', 'Tim', 'Tiago Pires', 'Théo LUDWIG', 'Victor Polevoy', 'Victor', 'Vasily Mikhaylichenko', 'Vasil Mikhalenya', 'Vasek Sraier', 'Val Lorentz', 'Upstream8022', 'Trolli Schmittlauch', 'Tris Forster', 'Travis Parker', 'Track3', 'Tosone', 'Tony Narlock', 'Tony Homrich', 'Tony', 'Tomás Warynyca', 'Tomeamis', 'Sven Seeberg', 'Sven', 'Sveinn Thorarinsson', 'Sunny Wan', 'Success', 'Stormxx', 'Steven Pav', 'Steven Noonan', 'Steve Russo', 'Sternik', 'Stephen Solka', 'Stephen J. Fuhry', 'Stephen Holdaway', 'Steffen Schröter', 'Stefan Kalscheuer', 'Stefan Bethke', 'Stefan', 'Théo BOUGE', 'Thorben', 'Thomas Laroche', 'Thomas Keppler', 'Thomas E Lackey', 'Thomas Desveaux', 'Thomas Beutlich', 'Thomas Andrade', 'ThetaDev', 'TheBrokenRail', 'The Magician', 'The Gitter Badger', 'Terence Le Huu Phuong', 'Tait Hoyem', 'TLZ', 'TATHAGATA ROY', 'T.J. Yang', 'Nick Meyer', 'Nicholas Smith', 'NiTRoeSE', 'Netduma Luke M', 'NekoBit', 'Neha Prasad', 'Neel', 'Neal Caffery', 'Navneet', 'Nathan Zook', 'Nathan Smith', 'NateScarlet', 'Nate Levesque', 'Najib Idrissi', 'Nabapadma-sarker', 'NZTim', 'N. L. H', 'Nulo', 'Nulo (he/him)', 'Nolann', 'Noel Jackson', 'Noah Snelson', 'NintenHero', 'Nils Dralle', 'Niko Hoffrén', 'Niklas Goerke', 'Nikko Miu', 'Nikita Vakula', 'Nicolas Ferrari', 'Nicolas Da Mutten', 'Nicolas Auvray', 'Nicola Scattaglia', 'Nico Schieder', 'Nico Mandery', 'Niclas Kroon', 'MiloCubed', 'Mikko Hellsing', 'Mike Schwörer', 'Mike Rochefort', 'Mike Gerber', 'Mike Cifelli', 'Mike', 'Mikaela Suomalainen', 'Miguel de la Cruz', 'Michel Roux', 'Michel Ganguin', 'Michal Suchánek', 'Michal', 'Michael de Wit', 'Michael Vetter', 'Michael Svobodin', 'Dionysios Kakouris', 'Mykhailo', 'Muhammed TİFTİKÇİ', 'Muh Muhten', 'MrMars98', 'MrDevil', 'Moshi Binyamini', 'Morten Klim Sørensen', 'Moritz Rosenthal', 'Moritz Poldrack', 'Moritz Jörg', 'Moritz Heiber', 'Moritz', 'Mopcho', 'Monty Taylor', 'MomentQYC', 'Mohammad Hadi Hosseinpour', 'MisterCavespider', 'Mingzhu Yan', 'Rinat', 'Rafael', 'QuaSoft', 'PsychoMario', 'Prasad Katti', 'Pranav Nachnekar', 'Pourya Daneshvar', 'Pontus Leitzler', 'Pofilo', 'Pilou', 'Pierre-Alexis Ciavaldini', 'Pierre Baillet', 'Philippe Chataignon', 'PhilippHomann', 'Philipp A. Beckmann', 'Philip Miglinci', 'PhilAtWysdom', 'Phil Hopper', 'RickyMa', 'Richard Ulmer', 'Richard Schneeman', 'Richard Nienaber', 'Richard Mahn', 'Richard Bukovansky', 'RiceChuan', 'Restray', 'Reo', 'Renato Caldas', 'Renato Aquino', 'Raymond', 'Raphael Kruse', 'Ramon Fischer', 'Ralph-Wang', 'Rakshith Ravi', 'RainboWu', 'Rafael de Mattos', 'Patryk Krawaczyński', 'Patrik', 'Patrick Geneva', 'Patrick Aljord', 'Pablo Saavedra', 'PJ Eby', 'PE1NUT', 'Oymate', 'OvermindDL1', 'Otto Richter (fnetX)', 'Oscar Costa', 'Origami404', 'OptionalValue', 'Ondřej Čertík', 'Omar Assadi', 'Okunev Yu Dmitry', 'Peyton Duncan', 'Peter Verraedt', 'Peter Udeh', 'Peter Dave Hello', 'Peter Colberg', 'Peter', 'Pedro Nishiyama', 'Pavel Korovin', 'Pavel Ezhov', 'Pavel', 'Pavanipogula', 'Paulo E. Castro', 'Paulo Chen', 'Paul Tötterman', 'Paul Strickland', 'Paul Barton', 'Paul', 'siddweiker', 'rekayno', 'rebeckanylander', 'raphael10241024', 'raoulb', 'quantonganh', 'pvgoran', 'programkode', 'pmdematagoda', 'plsnp', 'pitpalme', 'pgodwin', 'pengqiseven', 'opyale', 'omeid', 'oGi4i', 'nubenum', 'nu_no', 'shxsun', 'shashank-netapp', 'shakeme', 'shafi-VM', 'sergemedvid', 'semlanik', 'sdvcrx', 'scribblemaniac', 'schaffman5', 's-hamann', 'rune', 'rstular', 'rojaro', 'rj1', 'rinsuki', 'riastradh', 'renothing', 'rektide', 'melkor0', 'me2seeks', 'mcnesium', 'mayswind', 'maxm123', 'mavenbline', 'masegaloeh', 'mappu', 'majianhan', 'maiki', 'maicss', 'luto', 'lsd-techno', 'linweijie2012', 'lifegpc', 'lif', 'lengyuqu', 'confusedsushi', 'novaeye', 'norohind', 'niphor', 'nickolas360', 'naoki kuroda', 'n0emis', 'mzroot', 'muhfaris', 'mrm2m', 'mrburns', 'morpheyesh', 'morphelinho', 'mohammed ahmed', 'minijaws', 'mikolaj holysz', 'micw', 'mevius4', '박상철', 'zenofile', 'yy', 'yutotnh', 'yusifeng', 'yisiliang', 'ydelafollye', 'yan', 'yaggytter', 'xtexChooser', 'xpy', 'xin-u', 'xiaox', 'xgitea', 'xenofem', 'xdch47', 'xDShot', '阿卡林刘', '谈笑风生间', '花墨', '胖梁', '缘生', '木木田', '我没有抓狂', '奶爸', '原俊杰', '冯天书', 'ひのしば / hinoshiba', 'ʿAhed ʿid', 'Óscar García Amor', 'zuzuviewer', 'znegva', 'zjjhot', 'zhuharev', 'zhangnew', 'tomholford', 'tobyzxj', 'toby.zxj', 'tklein23', 'tiny6996', 'thigg', 'techwolf12', 'taziden', 'tarelda', 'surefire', 'sunboyy', 'suisseWalter', 'succcubbus', 'stroucki', 'stephen mcquay', 'spacetourist', 'soumyadey', 'sollyu', 'wienans', 'wanglinzhizhi', 'wangjingcun', 'vz', 'vincent', 'viktike', 'velengel', 'vadim s. sabinich', 'unclejack', 'ulnanlu', 'uli-heller', 'ucodi', 'twitchyliquid64', 'tuxmaster5000', 'tryfail', 'ayb', 'awwalker', 'atzoum', 'anthony-zh', 'alphazeba', 'aloupfor', 'ahab', 'agrn', 'Zoupers Zou', 'Zoran Peričić', 'Zer00CooL', 'Zeno', 'Zachery Hostens', 'ZHOU Cheng', 'Yuwei Ba', 'Yuriy Khlynovskiy', 'Young Hu', 'Yoan Blanc', 'colorfulberry', 'cnphpbb', 'chavacava', 'charles-plutohealth', 'chai2010', 'cezar97', 'cchangwen', 'camlafit', 'caiwp', 'burbon', 'buckybytes', 'bt90', 'briolantonio', 'bradder555', 'blemasle', 'bibaijin', 'William Friesen', 'Will Norris', 'Will Kelly', 'Will Glynn', 'Wiktor Żurawik', 'Wesley van Tilburg', 'WeebDataHoarder', 'Wars', 'Wang', 'W-Mark Kubacki', 'W Anders', 'Volodymyr Stelmashchuk', 'Vladimir Sysoev', 'Vladimir Panteleev', 'Vladimir Buyanov', 'Vitaly Zhuravlev', 'Vitaliy Filippov', 'Vinoth Kumar', 'Yevhen Pavlov', 'Yaşar Çiv', 'Yakov5776', 'Yakov', 'YR Chen', 'Xing Hong', 'Xijiang Yu', 'Xaver Maierhofer', 'WÁNG Xuěruì', 'Wyall', 'Wolfgang Reithmeier', 'WinterCabbage', 'Wind0r', 'William Roush', 'William Mantly Jr', 'William Le Pommelet', 'William Hilton', 'leigh capili', 'josetduarte', 'jklippel', 'jiangjianxiao', 'jess', 'jeremiepozzigithub', 'jason19970210', 'james yang', 'istiak101', 'isotas38', 'iliyan ivanov', 'idk', 'hr-98', 'himaaaatti', 'helix84', 'hazy', 'haytona', 'hana', 'hamkido', 'leavesster', 'l2dy', 'l-jonas', 'kralo', 'koyu', 'kodermho', 'koalajoe23', 'kiatt210', 'kevinlin18', 'kekero', 'katherine', 'juliengarcia', 'juju2013', 'js6pak', 'jpicht', 'jpellegrini', 'eladyn', 'editfund-founder', 'dosera', 'dicarne', 'derelm', 'derSuessmann', 'ddelpero', 'darrinsmart', 'dark-angel', 'dankm', 'danigm', 'da Kai', 'cui', 'cstyles', 'crito', 'crazeteam', 'contra-bit', 'h7x4', 'guangwu', 'gsilvan', 'gordon--', 'gima', 'gesangtome', 'gdeverlant', 'fzerorubigd', 'fnetX (aka fralix)', 'flufmonster', 'flozzone', 'firesoft-de', 'finga', 'f0x52', 'estetsenko', 'eric-j-ason', 'epk', 'eleith', 'Daniel Vos', 'Daniel Theophanes', 'Daniel Peukert', 'Daniel Kilimnik', 'Daniel Gunzinger', 'Daniel Grier', 'Daniel Balko', 'Daniel Aleksandersen', 'Daniel', 'Dan Čermák', 'Dan Morrill', 'Dan Molik', 'Dan McGregor', 'Damien Pollet', 'Damien Goutte-Gattat', 'Damien Gaignon', 'Damien Cassou', 'Dingjun', 'Diep Pham', 'Diana', 'Dhruv Manilawala', 'Deyong Zhu', 'Deoren Moor', 'Dennis Menschel', 'Dennis Keitzel', 'Dejan Kitic', 'Dawid Góra', 'David Øvrelid', 'David Hulick', 'David Crocker', 'Darren Hoo', 'Dario Louzado', 'Daniil Gentili', 'Daniel YC Lin', 'Daniel Wendler (@cassandra)', 'Claudius Ellsel', 'Clar Charr', 'ChubbyNinja', 'Christopher Thomas', 'Christopher Medlin', 'Christopher', 'Christophe Le Guern', 'Christoph König', 'Christoph Handel', 'Christoph Burgdorf', 'ChristianSch', 'Christian Weiske', 'Christian Köberl', 'Christian Dietrich', 'Chris Woodward', 'Chris Sexton', 'Chris Copeland', 'Anthony Vanelverdinghe', 'Dalai Felinto', 'DaanSelen', 'DWE', 'DHANUSH VANARASA', 'D', 'Cypherpunk Samurai', 'CyberFlame', 'Cuong Manh Le', 'Cum Gun', 'Cristian Le', 'CrimsonEdgeHope', 'Cory Todd', 'Cory Sanin', 'Corben Dallas', 'ConcurrentCrab', 'CommanderRoot', 'CodeShakingSheep', 'Clint Armstrong', 'GWDx', 'Filippo Valsorda', 'Fernando San Julián', 'Ferdinand Thiessen', 'Feodor Fitsner', 'Felix W. Dekker', 'Felix Victor', 'FabioFortini', 'Fabien Benetou', 'Fabian Meyer', 'Fabian Braun', 'Excellencedev', 'Evur', 'Evan Tobin', 'Evan Sherwood', 'Eugene', 'Etienne Bruines', 'Erwan Colin', 'Eric Lesiuta', 'Fábio Barkoski', 'FreeCipher', 'Fredrik Eriksson', 'Fredrik Ekre', 'François M', 'Franz Schmidt', 'Frank Villaro-Dixon', 'Francesco Siddi', 'Francesco Antognazza', 'Forest Johnson', 'Folke', 'Flutterlice', 'Florin Hillebrand', 'FlorianBen', 'Florian Klink', 'Florian Hülsmann', 'Florian Eitel', 'Florian / sinnlosername', 'Dryusdan', 'Drew Noel', 'Drew Bowering', 'Drew', 'Dr. Tobias Quathamer', 'Donlon', 'Dong Nguyen', 'Dominik Rubo', 'Dominik Rimpf', 'Dominik Liebler', 'Dominik Heidler', 'Dofri Jónsson', 'Dmitry Yu Okunev', 'Dmitry Neverov', 'Dmitry Doroshev', 'Divyun Raje Vaid', 'Discusal Media', 'Eric Hawicz', 'Eric Belhomme', 'Enrico', 'Emily', 'Emanuel Angelo', 'Elisei Roca', 'Elijah Oyekunle', 'Ehsan Shirvanian', 'Edward Zhang', 'Edip Emre Bodur', 'Ed Silkworth', 'EV3R4', 'E14', 'Dustin Firebaugh', 'Duncan', 'DuckDuckWhale', 'Andrei Yankovich', 'Andreas Svanberg', 'Andreas Fischer', 'Andre Polykanine', 'Anders Eurenius Runvald', 'Anderi Azuki', 'Amoo Hesam', 'Ambrose Chua', 'Alukardd', 'Allen Conlon', 'Aliaksandr Mianzhynski', 'Alexey Terentyev', 'Alexandru Bucur', 'Alexandros Nicolaides', 'Alexander Shimchik', 'Alexander Neumann', 'Alexander McRae', 'Alexander Lunegov', 'Anthony Quéré', 'Ankit R Gadiya', 'Angus Gibson', 'Andy Leap', 'Andy Harrison', 'André Rosenhammer', 'Andrzej Ressel', 'Andrey Nering', 'Andrey Esin', 'Andrey Arapov', 'Andrew Youngwerth', 'Andrew Tomaka', 'Andrew Phillips', 'Andrew Melnick', 'Andrew Burns', 'Andrew Buettner', 'Andrew', 'Andres Mazzo', 'Aidan Fitzgerald', 'Adyanth H', 'Adrian Sieber', 'Adrian POIGET', 'Adrian Hirt', 'Adi', 'Adel Qalieh', 'Adam Szatyin', 'Adam', 'Abner', 'Aaron Walker', 'Aaron Meese', 'Aam Surganda', 'AHOHNMYC', '7FM', '24601', '0xflotus', 'Alex Ward', 'Alex Papadimoulis', 'Alex Blackie', 'Alex', 'Alessandro Ferrari', 'Aleksandr Denisovich', 'Aleksandr Bulyshchenko', 'Alejandro Leal', 'Albin Hedman', 'Alberty Pascal', 'Albert ARIBAUD', 'Albert', 'Alan Pope', 'Akshay Mankar', 'Akkariin Meiko', 'Akhan Zhakiyanov', 'Aindriú Mac Giolla Eoin', 'Chl', 'BurritoVoid', 'Bryan Johnson', 'Bruno Raoult', 'Bruno Bigras', 'Bruno', 'Bram Hagens', 'Bradley D. Thornton', 'Brad Nabholz', 'Bogdan Petrea', 'Bobonium', 'Bob Vandevliet', 'BoYanZh', 'Blender Defender', 'Björn Heinrichs', 'Björn', 'Bjoern Petri', 'Bjarne Koll', 'Chih-Hsuan Yen', 'Chester', 'Cheng', 'Chen Chao Shih', 'Chaz Reid', 'Charles', 'Chance Zibolski', 'Cedric Ziel', 'Carsten Klein', 'Carlos Gutierrez', 'Carlos Felgueiras', 'Campbell He', 'Cameron Braid', 'Calvin K', 'Caellion', 'Cacciuc', 'Bård Aase', 'ByLCY', 'Baltazár Radics', 'B-OnTheGo', 'Ayaka', 'Avahe Kellenberger', 'Atilla Lonny', 'Atakan Goktepe', 'Ashley Nelson', 'Artemis Tosini', 'Arnaud Morin', 'Arif Er', 'Arif', 'Archer', 'Anudeep Reddy', 'António Meireles', 'Antonio Facciolo', 'Anton Skorokhod', 'Antoine Goutenoir', 'Anthony Wang', 'Bian Jiaping', 'Bernhard Fröhlich', 'Berk Demirkır', 'Benjamin Pollack', 'Benjamin Peng', 'Benjamin Loison', 'Benedikt Kroll', 'Bence Sántha', 'Ben Niemann', 'Ben Harris', 'Begley Brothers (Development)', 'Beda Schmid', 'BeYonme', 'Bas Stottelaar', 'Bart van der Braak', 'Bart', 'Barbossa', 'Lukas Treyer', 'Leon Busch-George', 'Leo', 'LeenHawk', 'LePau', 'Laurent Cahour', 'Lasse Brandt Thomsen', 'Lars Kistner', 'Lars Hvam', 'Lars Gregori', 'Laica Lunasys', 'LFlare', 'L.E.R', 'Kyungmin Bae', 'Kyle P Davis', 'Kurt Madel', 'Kunal Mehta', 'Kuba Tyszko', 'Krzysztof Jeziorny', 'Lukas Prettenthaler', 'Lukas Dietrich', 'Lukas Bestle', 'Lukas', 'Luka Dornhecker', 'Lucas Queiroz', 'Luca Zulberti', 'Luca Söthe', 'Lubomir I. Ivanov', 'Loutro', 'Lourens', 'Louis Matthijssen', 'Louis', 'Linus Groh', 'Linkjay', 'Limian Wang', 'Liam Cottam', 'Lewis Cowles', 'Kevin Samuel', 'Kevin Burke', 'Keith Rutkowski', 'Kazushi (Jam) Marukawa', 'Kausthubh J Rao', 'Kasi Reddy', 'Karthik Bhandary', 'Karsten Lehmann', 'Karl T', 'Karl Heinz Marbaise', 'Kane', 'Kai Leonhardt', 'K Kovacs', 'Jürgen Hötzel', 'Justin Sievenpiper', 'Justin Ray Vrooman', 'Jake Howard', 'Kroytz', 'Konrad Pozniak', 'Konctantin', 'Koichi MATSUMOTO', 'Koen Wilde', 'Knud Hollander', 'Klaus Vink Slott', 'Kirill Sorokin', 'Kirill Bolashev', 'Kindyroo', 'Kilisei', 'Kiel Hurley', 'Kiara Grouwstra', 'Khaled Yakdan', 'Khaled Hamed', 'Kevin Zúñiga', 'Kevin Schweikert', 'Michael Santos', 'Maxim Zhiburt', 'Maxim Tkachenko', 'MaxWebZ', 'Max Wittig', 'Maurizio Porrato', 'Mattias Persson', 'Matthias Schoettle', 'Matthias Niess', 'Matthias Kappeller', 'Matthias Beckert', 'Matthew Richardson', 'Matthew R. McDougal', 'Matthew Bramer', 'Matthew Baird', 'Matt Butcher', 'Matt Arnold', 'Mathieu Gagnon', 'Mathew Robinson', 'Michael Peppler', 'Michael Owoc', 'Michael Litvak', 'Michael Kuhn', 'Michael Horstmann', 'Michael Hoang', 'Michael Grigoryan', 'Michael Crosby', 'Michael B.', 'Micash', 'Micah Kepe', 'Meng Zhuo', 'Mechiel Lukkien', 'Md Ferdous Alam', 'May', 'Maximilian Weiler', 'Marco Blessing', 'Marcin Kuźmiński', 'Marc Schiller', 'Marc Brückner', 'Manush Dodunekov', 'Manuel Valls Fernández', 'Manuel', 'Maarten Becker', 'MATTENN', 'M. Zhou', 'LyricWulf', 'Lydia Sevelt', 'Lycolia Rizzim', 'Luohao Wang', 'Luo Yifei', 'Luke Wyatt', 'Luke H-W', 'Matheus Sampaio Queiroga', 'Masudur Rahman', 'Mason', 'Marty', 'Martin Strob', 'Martin Scholz', 'Martin Hebnes Pedersen', 'Martin Garton', 'Martin', 'Martijn de Boer', 'Marshmallow', 'Markus Amshove', 'Mark Ormesher', 'Mario Lubenka', 'Marin Jankovski', 'Marge Bouvier', 'Illya Marchenko', 'Igor Rzegocki', 'Ian Wienand', 'IT-AlexKor', 'Håkon Harnes', 'Hyungsub (Danny) Kim', 'Hypo', 'Hussain Khalil', 'Hui Hui', 'Hubert Wawrzyńczyk', 'Howie Zhao', 'HoshinoRei', 'Holger Schmidt', 'HeySora', 'Henry', 'Henrique Pimentel', 'Henrique Corrêa', 'Henrik Bengtsson', 'Jacob Parry', 'Jackson Stewart', 'Jack Vine', 'JIUN-TAI NIEN', 'Iwan Budi Kusnanto', 'Iván Valdés', 'Ivan Tkatchev', 'Ivan Marban', 'Ivan Fedorov', 'Ion Jaureguialzo Sarasola', 'InsanusMokrassar', 'Ing. Jaroslav Šafka', 'Ilya Nurullin', 'Ilya', 'Gnanakeethan Balasubramaniam', 'Gjergji Ramku', 'Girish Ramakrishnan', 'Ghanem', 'Gernot Eger', 'Gerben', 'Ger Schinkel', 'George Merlocco', 'George Harvey', 'Georg Dangl', 'Gennady Kovshenin', 'Garrit Franke', 'Garionion', 'Galen Suen', 'Gabriel Jackson', 'Gabriel', 'Heath Dutton🕴️', 'Hasnain Lakhani', 'Haruo Kinoshita', 'Harry Vince', 'Hakermann420', 'Győrvári Gábor', 'Gwilherm Folliot', 'Gustavo Paes', 'Gustavo Marin', 'Guo Y.K', 'Guillermo Bonvehí', 'Guilhem Marion', 'Guido Diepen', 'Grzegorz Alibożek', 'Gregor Santner', 'Gregor Gramlich', 'Greg Myers', 'Grace', 'Justin R. Cutler', 'Jorge Ou', 'Jordan', 'Joona Hoikkala', 'Jone Marius Vignes', 'Jonathan Lozada D', 'Jonathan Hult', 'Jonathan Herlin', 'Jonas Östanbäck', 'Jon Keim', 'Jon Davies', 'Johnny Oskarsson', 'Johan Van de Wauw', 'Jofkos', 'Joel Wetzell', 'JoeGruffins', 'Joe Constant', 'Jochen Rill', 'Jochen Peters', 'Justin Clift', 'JustAnotherArchivist', 'Junsik Kong', 'Jun Hsieh ♞', 'Julien Reichardt', 'Julien Pivotto', 'Julian Scholle', 'Juan Pablo Santos Rodríguez', 'Jqs7', 'João Tiago', 'José Olivio M. Pedrosa', 'José Carlos', 'Joshua Delsman', 'Joshdike', 'Josh Kalderimis', 'Joseph Crail', 'Josef Fröhle', 'Jorrit Klein Bramel', 'Jason', 'Jannis Pohl', 'Jannik Beyerstedt', 'Jan-Eric Schober', 'Jan Tojnar', 'Jan Oliver Oelerich', 'Jan Breuer', 'Jamie Schouten', 'James Robinson', 'James Ravenscroft', 'James Mills', 'James Liu', 'James Cleverley-Prance', 'Jakub Stasiak', 'Jakub Arbet', 'Jakub', 'Jake Scott', 'Job', 'Joakim Pettersen', 'Joakim Olsson', 'Jiri Vlasak', 'Jimmy', 'Jim Paris', 'Jim Lin', 'Jiaxin Zhu', 'Jesstern Rays', 'Jesse Lucas', 'Jesse Laprade', 'Jeremy', 'Jeremie Deray', 'Jeff Stein', 'Jeff Geerling', 'Jason Song', 'Jason Duan']</text:p>
          </table:table-cell>
          <table:table-cell table:style-name="ce1" office:value-type="float" office:value="104" calcext:value-type="float">
            <text:p>104</text:p>
          </table:table-cell>
          <table:table-cell table:style-name="ce1" office:value-type="float" office:value="1040" calcext:value-type="float">
            <text:p>1040</text:p>
          </table:table-cell>
          <table:table-cell table:style-name="ce5" office:value-type="string" calcext:value-type="string">
            <text:p><text:a xlink:href="https://github.com/unfoldingWord/dcs" xlink:type="simple">https://github.com/unfoldingWord/dcs</text:a></text:p>
          </table:table-cell>
          <table:table-cell table:style-name="ce4" office:value-type="string" calcext:value-type="string">
            <text:p>2026-04-19T02:36:49Z</text:p>
          </table:table-cell>
          <table:table-cell table:style-name="ce4"/>
          <table:table-cell table:style-name="ce1" office:value-type="string" calcext:value-type="string">
            <text:p>unfoldingWord/dc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table:number-columns-repeated="2"/>
          <table:table-cell table:style-name="ce1" office:value-type="string" calcext:value-type="string">
            <text:p>dcs-api-merge-poc</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1-06T21:01:02Z</text:p>
          </table:table-cell>
          <table:table-cell table:style-name="ce1" office:value-type="string" calcext:value-type="string">
            <text:p>2020-11-09T17:00: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ttur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api-merge-poc" xlink:type="simple">https://github.com/unfoldingWord-dev/dcs-api-merge-poc</text:a></text:p>
          </table:table-cell>
          <table:table-cell table:style-name="ce4" office:value-type="string" calcext:value-type="string">
            <text:p>2020-11-09T17:01:06Z</text:p>
          </table:table-cell>
          <table:table-cell table:style-name="ce4"/>
          <table:table-cell table:style-name="ce1" office:value-type="string" calcext:value-type="string">
            <text:p>unfoldingWord-dev/dcs-api-merge-poc</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table:number-columns-repeated="2"/>
          <table:table-cell table:style-name="ce1" office:value-type="string" calcext:value-type="string">
            <text:p>dcs-api-resolve-conflicts-poc</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1-13T22:23:24Z</text:p>
          </table:table-cell>
          <table:table-cell table:style-name="ce1" office:value-type="string" calcext:value-type="string">
            <text:p>2020-11-13T22:23:1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api-resolve-conflicts-poc" xlink:type="simple">https://github.com/unfoldingWord-dev/dcs-api-resolve-conflicts-poc</text:a></text:p>
          </table:table-cell>
          <table:table-cell table:style-name="ce4" office:value-type="string" calcext:value-type="string">
            <text:p>2020-11-13T22:23:27Z</text:p>
          </table:table-cell>
          <table:table-cell table:style-name="ce4"/>
          <table:table-cell table:style-name="ce1" office:value-type="string" calcext:value-type="string">
            <text:p>unfoldingWord-dev/dcs-api-resolve-conflicts-poc</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table:number-columns-repeated="2"/>
          <table:table-cell table:style-name="ce1" office:value-type="string" calcext:value-type="string">
            <text:p>dcs-catalog-accordion-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4T14:08:03Z</text:p>
          </table:table-cell>
          <table:table-cell table:style-name="ce1" office:value-type="string" calcext:value-type="string">
            <text:p>2026-06-04T14:02:01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catalog-accordion-rcl</text:p>
          </table:table-cell>
          <table:table-cell table:style-name="ce1" table:number-columns-repeated="6"/>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catalog-accordion-rcl" xlink:type="simple">https://github.com/unfoldingWord/dcs-catalog-accordion-rcl</text:a></text:p>
          </table:table-cell>
          <table:table-cell table:style-name="ce4" office:value-type="string" calcext:value-type="string">
            <text:p>2026-06-04T14:09:25Z</text:p>
          </table:table-cell>
          <table:table-cell table:style-name="ce4"/>
          <table:table-cell table:style-name="ce1" office:value-type="string" calcext:value-type="string">
            <text:p>unfoldingWord/dcs-catalog-accordion-rc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table:number-columns-repeated="2"/>
          <table:table-cell table:style-name="ce1" office:value-type="string" calcext:value-type="string">
            <text:p>dcs-dock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3T21:16:12Z</text:p>
          </table:table-cell>
          <table:table-cell table:style-name="ce1" office:value-type="string" calcext:value-type="string">
            <text:p>2021-05-13T21:16:06Z</text:p>
          </table:table-cell>
          <table:table-cell table:style-name="ce4"/>
          <table:table-cell table:number-columns-repeated="2" table:style-name="ce4" office:value-type="float" office:value="0" calcext:value-type="float">
            <text:p>0</text:p>
          </table:table-cell>
          <table:table-cell table:style-name="ce1" office:value-type="string" calcext:value-type="string">
            <text:p>['git@github.com:unfoldingWord-dev/dcs-profile-default.git', 'git@github.com:unfoldingword-dev/dcs-profile-blank.git', 'git@github.com:unfoldingWord-dev/dcs-profile-unfoldingword-mirrored.git']</text:p>
          </table:table-cell>
          <table:table-cell table:style-name="ce1" office:value-type="string" calcext:value-type="string">
            <text:p>dcs-docker</text:p>
          </table:table-cell>
          <table:table-cell table:style-name="ce1" table:number-columns-repeated="6"/>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docker" xlink:type="simple">https://github.com/unfoldingWord-dev/dcs-docker</text:a></text:p>
          </table:table-cell>
          <table:table-cell table:style-name="ce4" office:value-type="string" calcext:value-type="string">
            <text:p>2021-05-13T21:16:14Z</text:p>
          </table:table-cell>
          <table:table-cell table:style-name="ce4"/>
          <table:table-cell table:style-name="ce1" office:value-type="string" calcext:value-type="string">
            <text:p>unfoldingWord-dev/dcs-dock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office:value-type="string" calcext:value-type="string">
            <text:p>dcs-doc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25T23:31:19Z</text:p>
          </table:table-cell>
          <table:table-cell table:style-name="ce1" office:value-type="string" calcext:value-type="string">
            <text:p>2021-07-19T02:07: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enovate-bot', 'biilmann', 'Darin Dimitroff', 'dependabot-preview[bot]', 'renovate[bot]', 'calavera', 'erquhart', 'atomtigerzoo', 'bdougie', 'MattSturgeon', 'darindimitroff', 'Benaiah', 'verythorough', 'nolessafool', 'ojn', 'sibiraj-s', 'tinymachine', 'MadeByMike', 'burmecia', 'colorful-tones', 'Gerald Onyango', 'jwithington', 'kalinchernev', 'joshua-scott', 'Marek Lichtner', 'miguelmayo', 'okabrionz', 'thinlines', 'DotTech', 'dhrp', 'TomDeS', 'tomsaleeba', 'tomanistor', 'trys', 'bryankang', 'dependabot[bot]', 'leopuleo', 'midzer', 'ramigs', 'SherG', 'swyxio', 'tech4him1', 'undefined undefined', 'Aaron Hnatiw', 'deveth0', 'walexnelson', 'corford', 'Christopher Geary', 'crgeary', 'damonqin', 'danielpost', 'DavidRayner', 'wedi', 'easherma', 'hdlopes', 'janKollars', 'jpalmieri', 'joe6pack', 'jpbassalot', 'dzello', 'kahwee', 'kcollasarundell', 'kleink']</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docs" xlink:type="simple">https://github.com/unfoldingWord/dcs-docs</text:a></text:p>
          </table:table-cell>
          <table:table-cell table:style-name="ce4" office:value-type="string" calcext:value-type="string">
            <text:p>2022-02-25T23:02:31Z</text:p>
          </table:table-cell>
          <table:table-cell table:style-name="ce4"/>
          <table:table-cell table:style-name="ce1" office:value-type="string" calcext:value-type="string">
            <text:p>unfoldingWord/dcs-doc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cs-file-version-diff-too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2T17:56:46Z</text:p>
          </table:table-cell>
          <table:table-cell table:style-name="ce1" office:value-type="string" calcext:value-type="string">
            <text:p>2022-08-19T21:40:58Z</text:p>
          </table:table-cell>
          <table:table-cell table:style-name="ce4"/>
          <table:table-cell table:style-name="ce4" office:value-type="float" office:value="7" calcext:value-type="float">
            <text:p>7</text:p>
          </table:table-cell>
          <table:table-cell table:style-name="ce4" office:value-type="float" office:value="2" calcext:value-type="float">
            <text:p>2</text:p>
          </table:table-cell>
          <table:table-cell table:style-name="ce1"/>
          <table:table-cell table:style-name="ce1" office:value-type="string" calcext:value-type="string">
            <text:p>dcs-file-version-diff-tool</text:p>
          </table:table-cell>
          <table:table-cell table:style-name="ce1" table:number-columns-repeated="6"/>
          <table:table-cell table:style-name="ce1" office:value-type="string" calcext:value-type="string">
            <text:p>['klappy', 'danielklapp',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cs-file-version-diff-tool" xlink:type="simple">https://github.com/unfoldingWord-box3/dcs-file-version-diff-tool</text:a></text:p>
          </table:table-cell>
          <table:table-cell table:style-name="ce4" office:value-type="string" calcext:value-type="string">
            <text:p>2022-08-20T00:16:31Z</text:p>
          </table:table-cell>
          <table:table-cell table:style-name="ce4"/>
          <table:table-cell table:style-name="ce1" office:value-type="string" calcext:value-type="string">
            <text:p>unfoldingWord-box3/dcs-file-version-diff-too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cs-home-page-old</text:p>
          </table:table-cell>
          <table:table-cell table:style-name="ce1" office:value-type="string" calcext:value-type="string">
            <text:p>unfoldingWord</text:p>
          </table:table-cell>
          <table:table-cell table:style-name="ce1" office:value-type="string" calcext:value-type="string">
            <text:p>Dockerfil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13T23:56:37Z</text:p>
          </table:table-cell>
          <table:table-cell table:style-name="ce1" office:value-type="string" calcext:value-type="string">
            <text:p>2023-01-13T23:55: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home-page-old" xlink:type="simple">https://github.com/unfoldingWord/dcs-home-page-old</text:a></text:p>
          </table:table-cell>
          <table:table-cell table:style-name="ce4" office:value-type="string" calcext:value-type="string">
            <text:p>2023-01-31T23:27:02Z</text:p>
          </table:table-cell>
          <table:table-cell table:style-name="ce4"/>
          <table:table-cell table:style-name="ce1" office:value-type="string" calcext:value-type="string">
            <text:p>unfoldingWord/dcs-home-page-old</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dcs-homepage</text:p>
          </table:table-cell>
          <table:table-cell table:style-name="ce1" office:value-type="string" calcext:value-type="string">
            <text:p>unfoldingWord</text:p>
          </table:table-cell>
          <table:table-cell table:style-name="ce1" office:value-type="string" calcext:value-type="string">
            <text:p>Go Templat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03T16:01:2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homepage" xlink:type="simple">https://github.com/unfoldingWord/dcs-homepage</text:a></text:p>
          </table:table-cell>
          <table:table-cell table:style-name="ce4" office:value-type="string" calcext:value-type="string">
            <text:p>2026-06-03T16:04:29Z</text:p>
          </table:table-cell>
          <table:table-cell table:style-name="ce4"/>
          <table:table-cell table:style-name="ce1" office:value-type="string" calcext:value-type="string">
            <text:p>unfoldingWord/dcs-homepag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cs-local</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01T18:06:35Z</text:p>
          </table:table-cell>
          <table:table-cell table:style-name="ce1" office:value-type="string" calcext:value-type="string">
            <text:p>2023-12-01T18:06: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local" xlink:type="simple">https://github.com/unfoldingWord/dcs-local</text:a></text:p>
          </table:table-cell>
          <table:table-cell table:style-name="ce4" office:value-type="string" calcext:value-type="string">
            <text:p>2023-10-06T04:52:20Z</text:p>
          </table:table-cell>
          <table:table-cell table:style-name="ce4"/>
          <table:table-cell table:style-name="ce1" office:value-type="string" calcext:value-type="string">
            <text:p>unfoldingWord/dcs-loca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cs-logi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06T18:17:54Z</text:p>
          </table:table-cell>
          <table:table-cell table:style-name="ce1" office:value-type="string" calcext:value-type="string">
            <text:p>2023-04-06T18:17:5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login</text:p>
          </table:table-cell>
          <table:table-cell table:style-name="ce1" table:number-columns-repeated="4"/>
          <table:table-cell table:style-name="ce1" office:value-type="string" calcext:value-type="string">
            <text:p>dcs-js</text:p>
          </table:table-cell>
          <table:table-cell table:style-name="ce1"/>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cs-login" xlink:type="simple">https://github.com/unfoldingWord-box3/dcs-login</text:a></text:p>
          </table:table-cell>
          <table:table-cell table:style-name="ce4" office:value-type="string" calcext:value-type="string">
            <text:p>2023-04-04T15:43:56Z</text:p>
          </table:table-cell>
          <table:table-cell table:style-name="ce4"/>
          <table:table-cell table:style-name="ce1" office:value-type="string" calcext:value-type="string">
            <text:p>unfoldingWord-box3/dcs-login</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3" office:value-type="string" calcext:value-type="string">
            <text:p><text:a xlink:href="mailto:abelper54@gmail.com" xlink:type="simple">abelper54@gmail.com</text:a></text:p>
          </table:table-cell>
          <table:table-cell table:style-name="ce4" table:number-columns-repeated="2"/>
          <table:table-cell table:style-name="ce1" office:value-type="string" calcext:value-type="string">
            <text:p>dcs-packag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package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3" office:value-type="string" calcext:value-type="string">
            <text:p><text:a xlink:href="mailto:abelper54@gmail.com" xlink:type="simple">abelper54@gmail.com</text:a></text:p>
          </table:table-cell>
          <table:table-cell table:style-name="ce4" table:number-columns-repeated="2"/>
          <table:table-cell table:style-name="ce1" office:value-type="string" calcext:value-type="string">
            <text:p>dcs-packages/dcs-j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js</text:p>
          </table:table-cell>
          <table:table-cell table:style-name="ce1"/>
          <table:table-cell table:style-name="ce1" office:value-type="float" office:value="607" calcext:value-type="float">
            <text:p>607</text:p>
          </table:table-cell>
          <table:table-cell table:style-name="ce1" office:value-type="string" calcext:value-type="string">
            <text:p>2022-11-02T13:18:25.384Z</text:p>
          </table:table-cell>
          <table:table-cell table:style-name="ce1" table:number-columns-repeated="3"/>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dcs-j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has low but nonzero npm usage (607 downloads in the last year) and no detected local consumers.</text:p>
          </table:table-cell>
          <table:table-cell table:number-columns-repeated="992"/>
        </table:table-row>
        <table:table-row table:style-name="ro1">
          <table:table-cell table:style-name="ce3" office:value-type="string" calcext:value-type="string">
            <text:p><text:a xlink:href="mailto:abelper54@gmail.com" xlink:type="simple">abelper54@gmail.com</text:a></text:p>
          </table:table-cell>
          <table:table-cell table:style-name="ce4" table:number-columns-repeated="2"/>
          <table:table-cell table:style-name="ce1" office:value-type="string" calcext:value-type="string">
            <text:p>dcs-packages/dcs-js-exampl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js-example</text:p>
          </table:table-cell>
          <table:table-cell table:style-name="ce1" table:number-columns-repeated="4"/>
          <table:table-cell table:style-name="ce1" office:value-type="string" calcext:value-type="string">
            <text:p>dcs-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dcs-js-exampl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3" office:value-type="string" calcext:value-type="string">
            <text:p><text:a xlink:href="mailto:abelper54@gmail.com" xlink:type="simple">abelper54@gmail.com</text:a></text:p>
          </table:table-cell>
          <table:table-cell table:style-name="ce4" table:number-columns-repeated="2"/>
          <table:table-cell table:style-name="ce1" office:value-type="string" calcext:value-type="string">
            <text:p>dcs-packages/dcs-t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cs-t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dcs-t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3" office:value-type="string" calcext:value-type="string">
            <text:p><text:a xlink:href="mailto:abelper54@gmail.com" xlink:type="simple">abelper54@gmail.com</text:a></text:p>
          </table:table-cell>
          <table:table-cell table:style-name="ce4" table:number-columns-repeated="2"/>
          <table:table-cell table:style-name="ce1" office:value-type="string" calcext:value-type="string">
            <text:p>dcs-packages/vite-projec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9T13:00:38Z</text:p>
          </table:table-cell>
          <table:table-cell table:style-name="ce1" office:value-type="string" calcext:value-type="string">
            <text:p>2022-08-29T12:59:2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vite-project</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packages" xlink:type="simple">https://github.com/unfoldingWord/dcs-packages</text:a></text:p>
          </table:table-cell>
          <table:table-cell table:style-name="ce4" office:value-type="string" calcext:value-type="string">
            <text:p>2022-08-25T21:38:49Z</text:p>
          </table:table-cell>
          <table:table-cell table:style-name="ce4"/>
          <table:table-cell table:style-name="ce1" office:value-type="string" calcext:value-type="string">
            <text:p>unfoldingWord/dcs-packages/vite-projec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office:value-type="string" calcext:value-type="string">
            <text:p>dcs-profile-blank</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1:05:04Z</text:p>
          </table:table-cell>
          <table:table-cell table:style-name="ce1" office:value-type="string" calcext:value-type="string">
            <text:p>2021-05-11T21:04: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profile-blank" xlink:type="simple">https://github.com/unfoldingWord-dev/dcs-profile-blank</text:a></text:p>
          </table:table-cell>
          <table:table-cell table:style-name="ce4" office:value-type="string" calcext:value-type="string">
            <text:p>2021-05-11T21:05:08Z</text:p>
          </table:table-cell>
          <table:table-cell table:style-name="ce4"/>
          <table:table-cell table:style-name="ce1" office:value-type="string" calcext:value-type="string">
            <text:p>unfoldingWord-dev/dcs-profile-blank</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office:value-type="string" calcext:value-type="string">
            <text:p>dcs-profile-unfoldingword</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1:28:28Z</text:p>
          </table:table-cell>
          <table:table-cell table:style-name="ce1" office:value-type="string" calcext:value-type="string">
            <text:p>2021-05-11T21:04: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profile-unfoldingword" xlink:type="simple">https://github.com/unfoldingWord-dev/dcs-profile-unfoldingword</text:a></text:p>
          </table:table-cell>
          <table:table-cell table:style-name="ce4" office:value-type="string" calcext:value-type="string">
            <text:p>2021-05-11T21:28:35Z</text:p>
          </table:table-cell>
          <table:table-cell table:style-name="ce4"/>
          <table:table-cell table:style-name="ce1" office:value-type="string" calcext:value-type="string">
            <text:p>unfoldingWord-dev/dcs-profile-unfoldingword</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office:value-type="string" calcext:value-type="string">
            <text:p>dcs-profile-unfoldingword-mirrored</text:p>
          </table:table-cell>
          <table:table-cell table:style-name="ce1" office:value-type="string" calcext:value-type="string">
            <text:p>unfoldingWord-dev</text:p>
          </table:table-cell>
          <table:table-cell table:style-name="ce1" office:value-type="string" calcext:value-type="string">
            <text:p>VB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5-11T20:44:48Z</text:p>
          </table:table-cell>
          <table:table-cell table:style-name="ce1" office:value-type="string" calcext:value-type="string">
            <text:p>2021-05-06T17:19:2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profile-unfoldingword-mirrored" xlink:type="simple">https://github.com/unfoldingWord-dev/dcs-profile-unfoldingword-mirrored</text:a></text:p>
          </table:table-cell>
          <table:table-cell table:style-name="ce4" office:value-type="string" calcext:value-type="string">
            <text:p>2021-05-11T20:44:52Z</text:p>
          </table:table-cell>
          <table:table-cell table:style-name="ce4" office:value-type="string" calcext:value-type="string">
            <text:p>unfoldingWord-dev/dcs-profile-unfoldingword-mirrored</text:p>
          </table:table-cell>
          <table:table-cell table:style-name="ce1" office:value-type="string" calcext:value-type="string">
            <text:p>unfoldingWord-dev/dcs-profile-unfoldingword-mirrored</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office:value-type="string" calcext:value-type="string">
            <text:p>dcs-template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1-27T10:22:11Z</text:p>
          </table:table-cell>
          <table:table-cell table:style-name="ce1" office:value-type="string" calcext:value-type="string">
            <text:p>2023-11-27T10:22:0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foxprog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templates" xlink:type="simple">https://github.com/unfoldingWord/dcs-templates</text:a></text:p>
          </table:table-cell>
          <table:table-cell table:style-name="ce4" office:value-type="string" calcext:value-type="string">
            <text:p>2023-09-27T18:53:50Z</text:p>
          </table:table-cell>
          <table:table-cell table:style-name="ce4"/>
          <table:table-cell table:style-name="ce1" office:value-type="string" calcext:value-type="string">
            <text:p>unfoldingWord/dcs-template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office:value-type="string" calcext:value-type="string">
            <text:p>x</text:p>
          </table:table-cell>
          <table:table-cell table:style-name="ce4"/>
          <table:table-cell table:style-name="ce1" office:value-type="string" calcext:value-type="string">
            <text:p>dcs-vanilla</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1-25T15:47:26Z</text:p>
          </table:table-cell>
          <table:table-cell table:style-name="ce1" office:value-type="string" calcext:value-type="string">
            <text:p>2025-01-25T15:47:1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cs-vanilla" xlink:type="simple">https://github.com/unfoldingWord-box3/dcs-vanilla</text:a></text:p>
          </table:table-cell>
          <table:table-cell table:style-name="ce4" office:value-type="string" calcext:value-type="string">
            <text:p>2025-01-25T15:47:15Z</text:p>
          </table:table-cell>
          <table:table-cell table:style-name="ce4"/>
          <table:table-cell table:style-name="ce1" office:value-type="string" calcext:value-type="string">
            <text:p>unfoldingWord-box3/dcs-vanilla</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enhancedindex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1-15T12:01:11Z</text:p>
          </table:table-cell>
          <table:table-cell table:style-name="ce1" office:value-type="string" calcext:value-type="string">
            <text:p>2016-01-15T12:01:0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superdav42', 'Phil Hopper',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enhancedindexer" xlink:type="simple">https://github.com/unfoldingWord-dev/dokuwiki-enhancedindexer</text:a></text:p>
          </table:table-cell>
          <table:table-cell table:style-name="ce4" office:value-type="string" calcext:value-type="string">
            <text:p>2016-01-14T18:53:56Z</text:p>
          </table:table-cell>
          <table:table-cell table:style-name="ce4" office:value-type="string" calcext:value-type="string">
            <text:p>unfoldingWord-dev/dokuwiki-enhancedindexer</text:p>
          </table:table-cell>
          <table:table-cell table:style-name="ce1" office:value-type="string" calcext:value-type="string">
            <text:p>unfoldingWord-dev/dokuwiki-enhancedindexer</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obs-compar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23T01:03:31Z</text:p>
          </table:table-cell>
          <table:table-cell table:style-name="ce1" office:value-type="string" calcext:value-type="string">
            <text:p>2015-06-02T01:42:2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obs-comparer" xlink:type="simple">https://github.com/unfoldingWord-dev/dokuwiki-obs-comparer</text:a></text:p>
          </table:table-cell>
          <table:table-cell table:style-name="ce4" office:value-type="string" calcext:value-type="string">
            <text:p>2015-05-29T18:20:26Z</text:p>
          </table:table-cell>
          <table:table-cell table:style-name="ce4"/>
          <table:table-cell table:style-name="ce1" office:value-type="string" calcext:value-type="string">
            <text:p>unfoldingWord-dev/dokuwiki-obs-compar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plugin-obs</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8:35:18Z</text:p>
          </table:table-cell>
          <table:table-cell table:style-name="ce1" office:value-type="string" calcext:value-type="string">
            <text:p>2015-05-23T18:26:1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 'Jesse A. Griffin', 'Apach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obs" xlink:type="simple">https://github.com/unfoldingWord-dev/dokuwiki-plugin-obs</text:a></text:p>
          </table:table-cell>
          <table:table-cell table:style-name="ce4" office:value-type="string" calcext:value-type="string">
            <text:p>2015-06-23T18:57:35Z</text:p>
          </table:table-cell>
          <table:table-cell table:style-name="ce4"/>
          <table:table-cell table:style-name="ce1" office:value-type="string" calcext:value-type="string">
            <text:p>unfoldingWord-dev/dokuwiki-plugin-ob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plugin-obs-audio-upload</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7:13:24Z</text:p>
          </table:table-cell>
          <table:table-cell table:style-name="ce1" office:value-type="string" calcext:value-type="string">
            <text:p>2015-05-23T17:13:23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obs-audio-upload" xlink:type="simple">https://github.com/unfoldingWord-dev/dokuwiki-plugin-obs-audio-upload</text:a></text:p>
          </table:table-cell>
          <table:table-cell table:style-name="ce4" office:value-type="string" calcext:value-type="string">
            <text:p>2015-03-19T19:30:11Z</text:p>
          </table:table-cell>
          <table:table-cell table:style-name="ce4"/>
          <table:table-cell table:style-name="ce1" office:value-type="string" calcext:value-type="string">
            <text:p>unfoldingWord-dev/dokuwiki-plugin-obs-audio-uploa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plugin-obs-review</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10T19:51:00Z</text:p>
          </table:table-cell>
          <table:table-cell table:style-name="ce1" office:value-type="string" calcext:value-type="string">
            <text:p>2015-06-10T19:50: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obs-review" xlink:type="simple">https://github.com/unfoldingWord-dev/dokuwiki-plugin-obs-review</text:a></text:p>
          </table:table-cell>
          <table:table-cell table:style-name="ce4" office:value-type="string" calcext:value-type="string">
            <text:p>2015-04-13T19:33:48Z</text:p>
          </table:table-cell>
          <table:table-cell table:style-name="ce4"/>
          <table:table-cell table:style-name="ce1" office:value-type="string" calcext:value-type="string">
            <text:p>unfoldingWord-dev/dokuwiki-plugin-obs-review</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plugin-regist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3T16:59:10Z</text:p>
          </table:table-cell>
          <table:table-cell table:style-name="ce1" office:value-type="string" calcext:value-type="string">
            <text:p>2015-05-23T16:59: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register" xlink:type="simple">https://github.com/unfoldingWord-dev/dokuwiki-plugin-register</text:a></text:p>
          </table:table-cell>
          <table:table-cell table:style-name="ce4" office:value-type="string" calcext:value-type="string">
            <text:p>2015-03-12T19:17:46Z</text:p>
          </table:table-cell>
          <table:table-cell table:style-name="ce4"/>
          <table:table-cell table:style-name="ce1" office:value-type="string" calcext:value-type="string">
            <text:p>unfoldingWord-dev/dokuwiki-plugin-regist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plugin-shared</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10T19:50:16Z</text:p>
          </table:table-cell>
          <table:table-cell table:style-name="ce1" office:value-type="string" calcext:value-type="string">
            <text:p>2015-06-10T19:50:1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 Hopper',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shared" xlink:type="simple">https://github.com/unfoldingWord-dev/dokuwiki-plugin-shared</text:a></text:p>
          </table:table-cell>
          <table:table-cell table:style-name="ce4" office:value-type="string" calcext:value-type="string">
            <text:p>2015-06-04T20:09:16Z</text:p>
          </table:table-cell>
          <table:table-cell table:style-name="ce4"/>
          <table:table-cell table:style-name="ce1" office:value-type="string" calcext:value-type="string">
            <text:p>unfoldingWord-dev/dokuwiki-plugin-share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to-rc</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9-29T23:38:30Z</text:p>
          </table:table-cell>
          <table:table-cell table:style-name="ce1" office:value-type="string" calcext:value-type="string">
            <text:p>2016-12-20T20:45:22Z</text:p>
          </table:table-cell>
          <table:table-cell table:style-name="ce4"/>
          <table:table-cell table:number-columns-repeated="2" table:style-name="ce4" office:value-type="float" office:value="1" calcext:value-type="float">
            <text:p>1</text:p>
          </table:table-cell>
          <table:table-cell table:style-name="ce1" table:number-columns-repeated="8"/>
          <table:table-cell table:style-name="ce1" office:value-type="string" calcext:value-type="string">
            <text:p>['Phil Hopper',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to-rc" xlink:type="simple">https://github.com/unfoldingWord-dev/dokuwiki-to-rc</text:a></text:p>
          </table:table-cell>
          <table:table-cell table:style-name="ce4" office:value-type="string" calcext:value-type="string">
            <text:p>2016-09-24T19:55:06Z</text:p>
          </table:table-cell>
          <table:table-cell table:style-name="ce4"/>
          <table:table-cell table:style-name="ce1" office:value-type="string" calcext:value-type="string">
            <text:p>unfoldingWord-dev/dokuwiki-to-r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usfm-import</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11T18:33:11Z</text:p>
          </table:table-cell>
          <table:table-cell table:style-name="ce1" office:value-type="string" calcext:value-type="string">
            <text:p>2015-05-11T18:31:01Z</text:p>
          </table:table-cell>
          <table:table-cell table:style-name="ce4"/>
          <table:table-cell table:style-name="ce4" office:value-type="float" office:value="4" calcext:value-type="float">
            <text:p>4</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yvonnel098</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usfm-import" xlink:type="simple">https://github.com/unfoldingWord-dev/dokuwiki-usfm-import</text:a></text:p>
          </table:table-cell>
          <table:table-cell table:style-name="ce4" office:value-type="string" calcext:value-type="string">
            <text:p>2015-06-23T19:07:28Z</text:p>
          </table:table-cell>
          <table:table-cell table:style-name="ce4"/>
          <table:table-cell table:style-name="ce1" office:value-type="string" calcext:value-type="string">
            <text:p>unfoldingWord-dev/dokuwiki-usfm-impor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USFMTag</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1-28T15:18:48Z</text:p>
          </table:table-cell>
          <table:table-cell table:style-name="ce1" office:value-type="string" calcext:value-type="string">
            <text:p>2016-01-28T15:18:47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unfoldingWord/MediaWiki-USFMTag</text:p>
          </table:table-cell>
          <table:table-cell table:style-name="ce1" office:value-type="string" calcext:value-type="string">
            <text:p>['yvonnel098', 'Distant Shores Media', 'jag3773', 'root', 'Door43', 'Phil Hopper', 'phillip-hopper', 'Richard Mahn',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USFMTag" xlink:type="simple">https://github.com/unfoldingWord-dev/Dokuwiki-USFMTag</text:a></text:p>
          </table:table-cell>
          <table:table-cell table:style-name="ce4" office:value-type="string" calcext:value-type="string">
            <text:p>2022-07-27T07:42:16Z</text:p>
          </table:table-cell>
          <table:table-cell table:style-name="ce4" office:value-type="string" calcext:value-type="string">
            <text:p>unfoldingWord-dev/Dokuwiki-USFMTag</text:p>
          </table:table-cell>
          <table:table-cell table:style-name="ce1" office:value-type="string" calcext:value-type="string">
            <text:p>unfoldingWord-dev/Dokuwiki-USFMTag</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or43-catalog-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4-02T14:43:48Z</text:p>
          </table:table-cell>
          <table:table-cell table:style-name="ce1" office:value-type="string" calcext:value-type="string">
            <text:p>2023-04-02T14:40:57Z</text:p>
          </table:table-cell>
          <table:table-cell table:style-name="ce4" office:value-type="string" calcext:value-type="string">
            <text:p>2023-04-02T14:43:48Z</text:p>
          </table:table-cell>
          <table:table-cell table:number-columns-repeated="2" table:style-name="ce4" office:value-type="float" office:value="1" calcext:value-type="float">
            <text:p>1</text:p>
          </table:table-cell>
          <table:table-cell table:style-name="ce1" table:number-columns-repeated="8"/>
          <table:table-cell table:style-name="ce1" office:value-type="string" calcext:value-type="string">
            <text:p>['richmahn', 'da1nerd']</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5" office:value-type="string" calcext:value-type="string">
            <text:p><text:a xlink:href="https://github.com/unfoldingWord/door43-catalog-job-handler" xlink:type="simple">https://github.com/unfoldingWord/door43-catalog-job-handler</text:a></text:p>
          </table:table-cell>
          <table:table-cell table:style-name="ce4" office:value-type="string" calcext:value-type="string">
            <text:p>2022-10-04T15:44:21Z</text:p>
          </table:table-cell>
          <table:table-cell table:style-name="ce4"/>
          <table:table-cell table:style-name="ce1" office:value-type="string" calcext:value-type="string">
            <text:p>unfoldingWord/door43-catalog-job-handl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or43-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23T20:41:34Z</text:p>
          </table:table-cell>
          <table:table-cell table:style-name="ce1" office:value-type="string" calcext:value-type="string">
            <text:p>2024-01-23T20:20:22Z</text:p>
          </table:table-cell>
          <table:table-cell table:style-name="ce4" office:value-type="string" calcext:value-type="string">
            <text:p>2024-01-23T20:41:34Z</text:p>
          </table:table-cell>
          <table:table-cell table:number-columns-repeated="2" table:style-name="ce4" office:value-type="float" office:value="2" calcext:value-type="float">
            <text:p>2</text:p>
          </table:table-cell>
          <table:table-cell table:style-name="ce1" table:number-columns-repeated="8"/>
          <table:table-cell table:style-name="ce1" office:value-type="string" calcext:value-type="string">
            <text:p>['RobH123', 'richmahn', 'Robert Hunt', 'jag3773', 'yakob-aleksandrovich']</text:p>
          </table:table-cell>
          <table:table-cell table:style-name="ce1" office:value-type="float" office:value="38" calcext:value-type="float">
            <text:p>38</text:p>
          </table:table-cell>
          <table:table-cell table:style-name="ce1" office:value-type="float" office:value="0" calcext:value-type="float">
            <text:p>0</text:p>
          </table:table-cell>
          <table:table-cell table:style-name="ce5" office:value-type="string" calcext:value-type="string">
            <text:p><text:a xlink:href="https://github.com/unfoldingWord/door43-job-handler" xlink:type="simple">https://github.com/unfoldingWord/door43-job-handler</text:a></text:p>
          </table:table-cell>
          <table:table-cell table:style-name="ce4" office:value-type="string" calcext:value-type="string">
            <text:p>2024-02-06T15:21:33Z</text:p>
          </table:table-cell>
          <table:table-cell table:style-name="ce4"/>
          <table:table-cell table:style-name="ce1" office:value-type="string" calcext:value-type="string">
            <text:p>unfoldingWord/door43-job-handl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or43-preview-action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1-23T22:32:56Z</text:p>
          </table:table-cell>
          <table:table-cell table:style-name="ce1" office:value-type="string" calcext:value-type="string">
            <text:p>2025-11-23T22:32:5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preview-actions" xlink:type="simple">https://github.com/unfoldingWord/door43-preview-actions</text:a></text:p>
          </table:table-cell>
          <table:table-cell table:style-name="ce4" office:value-type="string" calcext:value-type="string">
            <text:p>2025-11-23T22:33:00Z</text:p>
          </table:table-cell>
          <table:table-cell table:style-name="ce4"/>
          <table:table-cell table:style-name="ce1" office:value-type="string" calcext:value-type="string">
            <text:p>unfoldingWord/door43-preview-action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or43-preview-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6T13:21:54Z</text:p>
          </table:table-cell>
          <table:table-cell table:style-name="ce1" office:value-type="string" calcext:value-type="string">
            <text:p>2026-06-06T13:21:08Z</text:p>
          </table:table-cell>
          <table:table-cell table:style-name="ce4" office:value-type="string" calcext:value-type="string">
            <text:p>2026-06-06T13:21:54Z</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1"/>
          <table:table-cell table:style-name="ce1" office:value-type="string" calcext:value-type="string">
            <text:p>door43-preview-app</text:p>
          </table:table-cell>
          <table:table-cell table:style-name="ce1" table:number-columns-repeated="4"/>
          <table:table-cell table:style-name="ce1" office:value-type="string" calcext:value-type="string">
            <text:p>['bible-reference-rcl', 'usfm-alignment-remover', 'usfm-js', 'uw-quote-helpers', 'word-aligner-rcl']</text:p>
          </table:table-cell>
          <table:table-cell table:style-name="ce1"/>
          <table:table-cell table:style-name="ce1" office:value-type="string" calcext:value-type="string">
            <text:p>['richmahn', 'larsgson', 'PhotoNomad0']</text:p>
          </table:table-cell>
          <table:table-cell table:style-name="ce1" office:value-type="float" office:value="26" calcext:value-type="float">
            <text:p>26</text:p>
          </table:table-cell>
          <table:table-cell table:style-name="ce1" office:value-type="float" office:value="0" calcext:value-type="float">
            <text:p>0</text:p>
          </table:table-cell>
          <table:table-cell table:style-name="ce5" office:value-type="string" calcext:value-type="string">
            <text:p><text:a xlink:href="https://github.com/unfoldingWord/door43-preview-app" xlink:type="simple">https://github.com/unfoldingWord/door43-preview-app</text:a></text:p>
          </table:table-cell>
          <table:table-cell table:style-name="ce4" office:value-type="string" calcext:value-type="string">
            <text:p>2026-06-06T13:21:13Z</text:p>
          </table:table-cell>
          <table:table-cell table:style-name="ce4"/>
          <table:table-cell table:style-name="ce1" office:value-type="string" calcext:value-type="string">
            <text:p>unfoldingWord/door43-preview-app</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or43-preview-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20T16:57:57Z</text:p>
          </table:table-cell>
          <table:table-cell table:style-name="ce1" office:value-type="string" calcext:value-type="string">
            <text:p>2020-10-20T16:57:1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pdf-generator-rcl</text:p>
          </table:table-cell>
          <table:table-cell table:style-name="ce1" table:number-columns-repeated="4"/>
          <table:table-cell table:style-name="ce1" office:value-type="string" calcext:value-type="string">
            <text:p>['gitea-react-toolkit', 'markdown-translatable', 'scripture-resources-rcl']</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oor43-preview-rcl" xlink:type="simple">https://github.com/unfoldingWord-box3/door43-preview-rcl</text:a></text:p>
          </table:table-cell>
          <table:table-cell table:style-name="ce4" office:value-type="string" calcext:value-type="string">
            <text:p>2022-06-14T15:16:13Z</text:p>
          </table:table-cell>
          <table:table-cell table:style-name="ce4"/>
          <table:table-cell table:style-name="ce1" office:value-type="string" calcext:value-type="string">
            <text:p>unfoldingWord-box3/door43-preview-rc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or43-preview-render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1T16:15:26Z</text:p>
          </table:table-cell>
          <table:table-cell table:style-name="ce1" office:value-type="string" calcext:value-type="string">
            <text:p>2026-02-11T16:15:2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oor43-preview-renderers</text:p>
          </table:table-cell>
          <table:table-cell table:style-name="ce1" table:number-columns-repeated="4"/>
          <table:table-cell table:style-name="ce1" office:value-type="string" calcext:value-type="string">
            <text:p>['usfm-alignment-remover', 'usfm-js']</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preview-renderers" xlink:type="simple">https://github.com/unfoldingWord/door43-preview-renderers</text:a></text:p>
          </table:table-cell>
          <table:table-cell table:style-name="ce4" office:value-type="string" calcext:value-type="string">
            <text:p>2026-02-11T16:15:30Z</text:p>
          </table:table-cell>
          <table:table-cell table:style-name="ce4"/>
          <table:table-cell table:style-name="ce1" office:value-type="string" calcext:value-type="string">
            <text:p>unfoldingWord/door43-preview-renderer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5" office:value-type="string" calcext:value-type="string">
            <text:p><text:a xlink:href="http://door43.org/" xlink:type="simple">door43.org</text:a></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4T16:02:14Z</text:p>
          </table:table-cell>
          <table:table-cell table:style-name="ce1" office:value-type="string" calcext:value-type="string">
            <text:p>2024-04-11T03:45:41Z</text:p>
          </table:table-cell>
          <table:table-cell table:style-name="ce4"/>
          <table:table-cell table:style-name="ce4" office:value-type="float" office:value="103" calcext:value-type="float">
            <text:p>103</text:p>
          </table:table-cell>
          <table:table-cell table:style-name="ce4" office:value-type="float" office:value="18" calcext:value-type="float">
            <text:p>18</text:p>
          </table:table-cell>
          <table:table-cell table:style-name="ce1"/>
          <table:table-cell table:style-name="ce5" office:value-type="string" calcext:value-type="string">
            <text:p><text:a xlink:href="http://door43.org/" xlink:type="simple">door43.org</text:a></text:p>
          </table:table-cell>
          <table:table-cell table:style-name="ce1" table:number-columns-repeated="6"/>
          <table:table-cell table:style-name="ce1" office:value-type="string" calcext:value-type="string">
            <text:p>['richmahn', 'jag3773', 'RobH123', 'PhotoNomad0', 'Phil Hopper', 'codemis', 'Richard Mahn', 'phillip-hopper', 'dependabot[bot]', 'yakob-aleksandrovich', 'bspidel', 'ethantkoenig', 'dependabot-preview[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org" xlink:type="simple">https://github.com/unfoldingWord/door43.org</text:a></text:p>
          </table:table-cell>
          <table:table-cell table:style-name="ce4" office:value-type="string" calcext:value-type="string">
            <text:p>2026-03-15T03:14:46Z</text:p>
          </table:table-cell>
          <table:table-cell table:style-name="ce4"/>
          <table:table-cell table:style-name="ce1" office:value-type="string" calcext:value-type="string">
            <text:p>unfoldingWord/door43.org</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download-link-tracke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6T21:39:43Z</text:p>
          </table:table-cell>
          <table:table-cell table:style-name="ce1" office:value-type="string" calcext:value-type="string">
            <text:p>2025-06-06T21:39: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wnload-link-tracker" xlink:type="simple">https://github.com/unfoldingWord/download-link-tracker</text:a></text:p>
          </table:table-cell>
          <table:table-cell table:style-name="ce4" office:value-type="string" calcext:value-type="string">
            <text:p>2025-06-06T21:39:46Z</text:p>
          </table:table-cell>
          <table:table-cell table:style-name="ce4"/>
          <table:table-cell table:style-name="ce1" office:value-type="string" calcext:value-type="string">
            <text:p>unfoldingWord/download-link-track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w-gitcommit</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4-08T17:34:08Z</text:p>
          </table:table-cell>
          <table:table-cell table:style-name="ce1" office:value-type="string" calcext:value-type="string">
            <text:p>2016-04-08T17:34: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esse A. Griffin', 'woolfg', 'danny0838', 'root', 'richmahn', 'birkirb', 'Dave Pearc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w-gitcommit" xlink:type="simple">https://github.com/unfoldingWord-dev/dw-gitcommit</text:a></text:p>
          </table:table-cell>
          <table:table-cell table:style-name="ce4" office:value-type="string" calcext:value-type="string">
            <text:p>2016-04-08T13:55:39Z</text:p>
          </table:table-cell>
          <table:table-cell table:style-name="ce4" office:value-type="string" calcext:value-type="string">
            <text:p>unfoldingWord-dev/dw-gitcommit</text:p>
          </table:table-cell>
          <table:table-cell table:style-name="ce1" office:value-type="string" calcext:value-type="string">
            <text:p>unfoldingWord-dev/dw-gitcommit</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dw_redirec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4T14:42:42Z</text:p>
          </table:table-cell>
          <table:table-cell table:style-name="ce1" office:value-type="string" calcext:value-type="string">
            <text:p>2020-05-14T14:42: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w_redirects" xlink:type="simple">https://github.com/unfoldingWord/dw_redirects</text:a></text:p>
          </table:table-cell>
          <table:table-cell table:style-name="ce4" office:value-type="string" calcext:value-type="string">
            <text:p>2020-05-14T14:42:44Z</text:p>
          </table:table-cell>
          <table:table-cell table:style-name="ce4"/>
          <table:table-cell table:style-name="ce1" office:value-type="string" calcext:value-type="string">
            <text:p>unfoldingWord/dw_redirec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ian.lindsley@unfoldingword.org" xlink:type="simple">Ian Lindsley</text:a></text:p>
          </table:table-cell>
          <table:table-cell table:style-name="ce4" office:value-type="string" calcext:value-type="string">
            <text:p>x</text:p>
          </table:table-cell>
          <table:table-cell table:style-name="ce4"/>
          <table:table-cell table:style-name="ce1" office:value-type="string" calcext:value-type="string">
            <text:p>en_obs_tf</text:p>
          </table:table-cell>
          <table:table-cell table:style-name="ce1" office:value-type="string" calcext:value-type="string">
            <text:p>unfoldingWord</text:p>
          </table:table-cell>
          <table:table-cell table:style-name="ce1" office:value-type="string" calcext:value-type="string">
            <text:p>S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16T19:50:46Z</text:p>
          </table:table-cell>
          <table:table-cell table:style-name="ce1" office:value-type="string" calcext:value-type="string">
            <text:p>2023-08-16T19:37: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anLindsley', 'github-actions[bot]', 'morganrdvs',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n_obs_tf" xlink:type="simple">https://github.com/unfoldingWord/en_obs_tf</text:a></text:p>
          </table:table-cell>
          <table:table-cell table:style-name="ce4" office:value-type="string" calcext:value-type="string">
            <text:p>2023-06-07T19:49:43Z</text:p>
          </table:table-cell>
          <table:table-cell table:style-name="ce4"/>
          <table:table-cell table:style-name="ce1" office:value-type="string" calcext:value-type="string">
            <text:p>unfoldingWord/en_obs_tf</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ExampleCheckingApp-tC</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6-08-15T16:27:5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xampleCheckingApp-tC" xlink:type="simple">https://github.com/unfoldingWord-dev/ExampleCheckingApp-tC</text:a></text:p>
          </table:table-cell>
          <table:table-cell table:style-name="ce4" office:value-type="string" calcext:value-type="string">
            <text:p>2016-08-15T16:27:49Z</text:p>
          </table:table-cell>
          <table:table-cell table:style-name="ce4"/>
          <table:table-cell table:style-name="ce1" office:value-type="string" calcext:value-type="string">
            <text:p>unfoldingWord-dev/ExampleCheckingApp-t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expor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8-05T19:30:09Z</text:p>
          </table:table-cell>
          <table:table-cell table:style-name="ce1" office:value-type="string" calcext:value-type="string">
            <text:p>2014-08-05T19:30:0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oor43', 'dsmedia',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xports" xlink:type="simple">https://github.com/unfoldingWord-dev/exports</text:a></text:p>
          </table:table-cell>
          <table:table-cell table:style-name="ce4" office:value-type="string" calcext:value-type="string">
            <text:p>2015-06-23T21:38:19Z</text:p>
          </table:table-cell>
          <table:table-cell table:style-name="ce4"/>
          <table:table-cell table:style-name="ce1" office:value-type="string" calcext:value-type="string">
            <text:p>unfoldingWord-dev/expor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fia-k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13T19:46:18Z</text:p>
          </table:table-cell>
          <table:table-cell table:style-name="ce1" office:value-type="string" calcext:value-type="string">
            <text:p>2026-03-13T19:45:5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a-kb" xlink:type="simple">https://github.com/unfoldingWord/fia-kb</text:a></text:p>
          </table:table-cell>
          <table:table-cell table:style-name="ce4" office:value-type="string" calcext:value-type="string">
            <text:p>2026-03-13T19:46:02Z</text:p>
          </table:table-cell>
          <table:table-cell table:style-name="ce4"/>
          <table:table-cell table:style-name="ce1" office:value-type="string" calcext:value-type="string">
            <text:p>unfoldingWord/fia-k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fred-mcp</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7T01:50:37Z</text:p>
          </table:table-cell>
          <table:table-cell table:style-name="ce1" office:value-type="string" calcext:value-type="string">
            <text:p>2026-05-07T01:50:3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anLindsley', 'clau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red-mcp" xlink:type="simple">https://github.com/unfoldingWord/fred-mcp</text:a></text:p>
          </table:table-cell>
          <table:table-cell table:style-name="ce4" office:value-type="string" calcext:value-type="string">
            <text:p>2026-05-07T01:50:40Z</text:p>
          </table:table-cell>
          <table:table-cell table:style-name="ce4"/>
          <table:table-cell table:style-name="ce1" office:value-type="string" calcext:value-type="string">
            <text:p>unfoldingWord/fred-mc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fred-zulip-bo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07T20:31:27Z</text:p>
          </table:table-cell>
          <table:table-cell table:style-name="ce1" office:value-type="string" calcext:value-type="string">
            <text:p>2025-10-07T20:31:2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jl011', 'Codex Assistant', 'ILindsley', 'abiatarprado', 'IanLindsley', 'drcox63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red-zulip-bot" xlink:type="simple">https://github.com/unfoldingWord/fred-zulip-bot</text:a></text:p>
          </table:table-cell>
          <table:table-cell table:style-name="ce4" office:value-type="string" calcext:value-type="string">
            <text:p>2025-10-07T20:31:31Z</text:p>
          </table:table-cell>
          <table:table-cell table:style-name="ce4"/>
          <table:table-cell table:style-name="ce1" office:value-type="string" calcext:value-type="string">
            <text:p>unfoldingWord/fred-zulip-bo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gateway-admin</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7T10:38:09Z</text:p>
          </table:table-cell>
          <table:table-cell table:style-name="ce1" office:value-type="string" calcext:value-type="string">
            <text:p>2026-06-07T10:38:05Z</text:p>
          </table:table-cell>
          <table:table-cell table:style-name="ce4" office:value-type="string" calcext:value-type="string">
            <text:p>2024-10-21T20:57:32Z</text:p>
          </table:table-cell>
          <table:table-cell table:style-name="ce4" office:value-type="float" office:value="43" calcext:value-type="float">
            <text:p>43</text:p>
          </table:table-cell>
          <table:table-cell table:style-name="ce4" office:value-type="float" office:value="0" calcext:value-type="float">
            <text:p>0</text:p>
          </table:table-cell>
          <table:table-cell table:style-name="ce1"/>
          <table:table-cell table:style-name="ce1" office:value-type="string" calcext:value-type="string">
            <text:p>gateway-admin</text:p>
          </table:table-cell>
          <table:table-cell table:style-name="ce1" table:number-columns-repeated="4"/>
          <table:table-cell table:style-name="ce1" office:value-type="string" calcext:value-type="string">
            <text:p>['dcs-branch-merger', 'gitea-react-toolkit', 'markdown-translatable', 'resource-workspace-rcl', 'scripture-resources-rcl', 'single-scripture-rcl', 'tc-ui-toolkit', 'translation-helps-rcl', 'uw-content-validation', 'uw-tsv-parser', 'word-aligner']</text:p>
          </table:table-cell>
          <table:table-cell table:style-name="ce1"/>
          <table:table-cell table:style-name="ce1" office:value-type="string" calcext:value-type="string">
            <text:p>['mandolyte', 'superdav42', 'richmahn', 'theNerd247', 'mannycolon', 'birchamp', 'abelpz', 'Joel-C-Johnson', 'PhotoNomad0']</text:p>
          </table:table-cell>
          <table:table-cell table:style-name="ce1" office:value-type="float" office:value="7" calcext:value-type="float">
            <text:p>7</text:p>
          </table:table-cell>
          <table:table-cell table:style-name="ce1" office:value-type="float" office:value="0" calcext:value-type="float">
            <text:p>0</text:p>
          </table:table-cell>
          <table:table-cell table:style-name="ce5" office:value-type="string" calcext:value-type="string">
            <text:p><text:a xlink:href="https://github.com/unfoldingWord/gateway-admin" xlink:type="simple">https://github.com/unfoldingWord/gateway-admin</text:a></text:p>
          </table:table-cell>
          <table:table-cell table:style-name="ce4" office:value-type="string" calcext:value-type="string">
            <text:p>2026-06-07T10:38:10Z</text:p>
          </table:table-cell>
          <table:table-cell table:style-name="ce4"/>
          <table:table-cell table:style-name="ce1" office:value-type="string" calcext:value-type="string">
            <text:p>unfoldingWord/gateway-admin</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gateway-ed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0T16:31:52Z</text:p>
          </table:table-cell>
          <table:table-cell table:style-name="ce1" office:value-type="string" calcext:value-type="string">
            <text:p>2026-06-04T14:54:50Z</text:p>
          </table:table-cell>
          <table:table-cell table:style-name="ce4" office:value-type="string" calcext:value-type="string">
            <text:p>2026-06-10T15:30:42Z</text:p>
          </table:table-cell>
          <table:table-cell table:style-name="ce4" office:value-type="float" office:value="152" calcext:value-type="float">
            <text:p>152</text:p>
          </table:table-cell>
          <table:table-cell table:style-name="ce4" office:value-type="float" office:value="11" calcext:value-type="float">
            <text:p>11</text:p>
          </table:table-cell>
          <table:table-cell table:style-name="ce1"/>
          <table:table-cell table:style-name="ce1" office:value-type="string" calcext:value-type="string">
            <text:p>gateway-edit</text:p>
          </table:table-cell>
          <table:table-cell table:style-name="ce1" table:number-columns-repeated="4"/>
          <table:table-cell table:style-name="ce1" office:value-type="string" calcext:value-type="string">
            <text:p>['bible-reference-rcl', 'enhanced-word-aligner-rcl', 'gitea-react-toolkit', 'markdown-translatable', 'resource-workspace-rcl', 'scripture-resources-rcl', 'scripture-tsv', 'single-scripture-rcl', 'tc-ui-toolkit', 'translation-helps-rcl', 'word-aligner', 'word-aligner-rcl']</text:p>
          </table:table-cell>
          <table:table-cell table:style-name="ce1"/>
          <table:table-cell table:style-name="ce1" office:value-type="string" calcext:value-type="string">
            <text:p>['PhotoNomad0', 'mannycolon', 'kintsoogi', 'abelpz', 'Joel-C-Johnson', 'richmahn', 'theNerd247', 'benjamin-test', 'jincypjose', 'larsgson', 'mandolyte', 'claude', 'elsylambert']</text:p>
          </table:table-cell>
          <table:table-cell table:style-name="ce1" office:value-type="float" office:value="20" calcext:value-type="float">
            <text:p>20</text:p>
          </table:table-cell>
          <table:table-cell table:style-name="ce1" office:value-type="float" office:value="2" calcext:value-type="float">
            <text:p>2</text:p>
          </table:table-cell>
          <table:table-cell table:style-name="ce5" office:value-type="string" calcext:value-type="string">
            <text:p><text:a xlink:href="https://github.com/unfoldingWord/gateway-edit" xlink:type="simple">https://github.com/unfoldingWord/gateway-edit</text:a></text:p>
          </table:table-cell>
          <table:table-cell table:style-name="ce4" office:value-type="string" calcext:value-type="string">
            <text:p>2026-06-04T14:55:14Z</text:p>
          </table:table-cell>
          <table:table-cell table:style-name="ce4"/>
          <table:table-cell table:style-name="ce1" office:value-type="string" calcext:value-type="string">
            <text:p>unfoldingWord/gateway-edi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ateway-edit-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1-22T13:29:02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gateway-edit</text:p>
          </table:table-cell>
          <table:table-cell table:style-name="ce1" table:number-columns-repeated="4"/>
          <table:table-cell table:style-name="ce1" office:value-type="string" calcext:value-type="string">
            <text:p>['bible-reference-rcl', 'gitea-react-toolkit', 'markdown-translatable', 'resource-workspace-rcl', 'scripture-resources-rcl', 'single-scripture-rcl', 'tc-ui-toolkit', 'translation-helps-rcl', 'word-aligner']</text:p>
          </table:table-cell>
          <table:table-cell table:style-name="ce1"/>
          <table:table-cell table:style-name="ce1" office:value-type="string" calcext:value-type="string">
            <text:p>['PhotoNomad0', 'mannycolon', 'Joel-C-Johnson',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ateway-edit-POC" xlink:type="simple">https://github.com/unfoldingWord-box3/gateway-edit-POC</text:a></text:p>
          </table:table-cell>
          <table:table-cell table:style-name="ce4" office:value-type="string" calcext:value-type="string">
            <text:p>2021-11-22T13:29:05Z</text:p>
          </table:table-cell>
          <table:table-cell table:style-name="ce4"/>
          <table:table-cell table:style-name="ce1" office:value-type="string" calcext:value-type="string">
            <text:p>unfoldingWord-box3/gateway-edit-POC</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4"/>
          <table:table-cell table:style-name="ce4" office:value-type="string" calcext:value-type="string">
            <text:p>x</text:p>
          </table:table-cell>
          <table:table-cell table:style-name="ce1" office:value-type="string" calcext:value-type="string">
            <text:p>gateway-translat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12T08:42:40Z</text:p>
          </table:table-cell>
          <table:table-cell table:style-name="ce1" office:value-type="string" calcext:value-type="string">
            <text:p>2024-01-10T13:38:37Z</text:p>
          </table:table-cell>
          <table:table-cell table:style-name="ce4" office:value-type="string" calcext:value-type="string">
            <text:p>2024-01-12T13:59:58Z</text:p>
          </table:table-cell>
          <table:table-cell table:style-name="ce4" office:value-type="float" office:value="35" calcext:value-type="float">
            <text:p>35</text:p>
          </table:table-cell>
          <table:table-cell table:style-name="ce4" office:value-type="float" office:value="5" calcext:value-type="float">
            <text:p>5</text:p>
          </table:table-cell>
          <table:table-cell table:style-name="ce1"/>
          <table:table-cell table:style-name="ce1" office:value-type="string" calcext:value-type="string">
            <text:p>gateway-translate</text:p>
          </table:table-cell>
          <table:table-cell table:style-name="ce1" table:number-columns-repeated="4"/>
          <table:table-cell table:style-name="ce1" office:value-type="string" calcext:value-type="string">
            <text:p>['bible-reference-rcl', 'dcs-js', 'resource-workspace-rcl', 'scripture-resources-rcl', 'translation-helps-rcl']</text:p>
          </table:table-cell>
          <table:table-cell table:style-name="ce1"/>
          <table:table-cell table:style-name="ce1" office:value-type="string" calcext:value-type="string">
            <text:p>['mandolyte', 'larsgson', 'superdav42', 'abelpz', 'theNerd247', 'richmahn', 'elsylambert', 'jincypjose']</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gateway-translate" xlink:type="simple">https://github.com/unfoldingWord/gateway-translate</text:a></text:p>
          </table:table-cell>
          <table:table-cell table:style-name="ce4" office:value-type="string" calcext:value-type="string">
            <text:p>2023-01-21T16:44:36Z</text:p>
          </table:table-cell>
          <table:table-cell table:style-name="ce4"/>
          <table:table-cell table:style-name="ce1" office:value-type="string" calcext:value-type="string">
            <text:p>unfoldingWord/gateway-translat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l-database-visualizations</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27T04:38:12Z</text:p>
          </table:table-cell>
          <table:table-cell table:style-name="ce1" office:value-type="string" calcext:value-type="string">
            <text:p>2024-06-27T04:38: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inu-alexander',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l-database-visualizations" xlink:type="simple">https://github.com/unfoldingWord-box3/gl-database-visualizations</text:a></text:p>
          </table:table-cell>
          <table:table-cell table:style-name="ce4" office:value-type="string" calcext:value-type="string">
            <text:p>2024-06-27T04:38:16Z</text:p>
          </table:table-cell>
          <table:table-cell table:style-name="ce4"/>
          <table:table-cell table:style-name="ce1" office:value-type="string" calcext:value-type="string">
            <text:p>unfoldingWord-box3/gl-database-visualization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delete</text:p>
          </table:table-cell>
          <table:table-cell table:style-name="ce4"/>
          <table:table-cell table:style-name="ce1" office:value-type="string" calcext:value-type="string">
            <text:p>gl_databas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2-10T15:16:33Z</text:p>
          </table:table-cell>
          <table:table-cell table:style-name="ce1" office:value-type="string" calcext:value-type="string">
            <text:p>2021-01-21T20:44: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l_database" xlink:type="simple">https://github.com/unfoldingWord/gl_database</text:a></text:p>
          </table:table-cell>
          <table:table-cell table:style-name="ce4" office:value-type="string" calcext:value-type="string">
            <text:p>2021-01-21T20:44:49Z</text:p>
          </table:table-cell>
          <table:table-cell table:style-name="ce4"/>
          <table:table-cell table:style-name="ce1" office:value-type="string" calcext:value-type="string">
            <text:p>unfoldingWord/gl_database</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delete</text:p>
          </table:table-cell>
          <table:table-cell table:style-name="ce4"/>
          <table:table-cell table:style-name="ce1" office:value-type="string" calcext:value-type="string">
            <text:p>gl_database_cod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1-10-14T15:01:4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l_database_code" xlink:type="simple">https://github.com/unfoldingWord/gl_database_code</text:a></text:p>
          </table:table-cell>
          <table:table-cell table:style-name="ce4" office:value-type="string" calcext:value-type="string">
            <text:p>2021-10-14T15:01:45Z</text:p>
          </table:table-cell>
          <table:table-cell table:style-name="ce4"/>
          <table:table-cell table:style-name="ce1" office:value-type="string" calcext:value-type="string">
            <text:p>unfoldingWord/gl_database_code</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ogs-custom</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01T04:12:23Z</text:p>
          </table:table-cell>
          <table:table-cell table:style-name="ce1" office:value-type="string" calcext:value-type="string">
            <text:p>2017-05-01T04:09:1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Gogs', 'richmahn', 'bspidel', 'jag3773', 'Root@gi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gogs-custom" xlink:type="simple">https://github.com/unfoldingWord-dev/gogs-custom</text:a></text:p>
          </table:table-cell>
          <table:table-cell table:style-name="ce4" office:value-type="string" calcext:value-type="string">
            <text:p>2025-10-02T14:14:06Z</text:p>
          </table:table-cell>
          <table:table-cell table:style-name="ce4"/>
          <table:table-cell table:style-name="ce1" office:value-type="string" calcext:value-type="string">
            <text:p>unfoldingWord-dev/gogs-custom</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ogs_auto_scaling</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5-20T10:45:3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 'root',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gogs_auto_scaling" xlink:type="simple">https://github.com/unfoldingWord-dev/gogs_auto_scaling</text:a></text:p>
          </table:table-cell>
          <table:table-cell table:style-name="ce4" office:value-type="string" calcext:value-type="string">
            <text:p>2022-05-20T10:45:41Z</text:p>
          </table:table-cell>
          <table:table-cell table:style-name="ce4"/>
          <table:table-cell table:style-name="ce1" office:value-type="string" calcext:value-type="string">
            <text:p>unfoldingWord-dev/gogs_auto_scaling</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raphql-catalog-nex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6-08T15:35:33Z</text:p>
          </table:table-cell>
          <table:table-cell table:style-name="ce1" office:value-type="string" calcext:value-type="string">
            <text:p>2021-06-08T15:35:20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mannycolon', 'kavitharaju', '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raphql-catalog-next" xlink:type="simple">https://github.com/unfoldingWord-box3/graphql-catalog-next</text:a></text:p>
          </table:table-cell>
          <table:table-cell table:style-name="ce4" office:value-type="string" calcext:value-type="string">
            <text:p>2021-06-08T15:35:23Z</text:p>
          </table:table-cell>
          <table:table-cell table:style-name="ce4"/>
          <table:table-cell table:style-name="ce1" office:value-type="string" calcext:value-type="string">
            <text:p>unfoldingWord-box3/graphql-catalog-next</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reek-apparatus-app</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2-18T21:03:03Z</text:p>
          </table:table-cell>
          <table:table-cell table:style-name="ce1" office:value-type="string" calcext:value-type="string">
            <text:p>2020-12-14T15:55:47Z</text:p>
          </table:table-cell>
          <table:table-cell table:style-name="ce4"/>
          <table:table-cell table:style-name="ce4" office:value-type="float" office:value="21" calcext:value-type="float">
            <text:p>21</text:p>
          </table:table-cell>
          <table:table-cell table:style-name="ce4" office:value-type="float" office:value="0" calcext:value-type="float">
            <text:p>0</text:p>
          </table:table-cell>
          <table:table-cell table:style-name="ce1"/>
          <table:table-cell table:style-name="ce1" office:value-type="string" calcext:value-type="string">
            <text:p>greek-apparatus-app</text:p>
          </table:table-cell>
          <table:table-cell table:style-name="ce1" table:formula="of:=FALSE()" office:value-type="float" office:value="0" calcext:value-type="float">
            <text:p>0</text:p>
          </table:table-cell>
          <table:table-cell table:style-name="ce1" office:value-type="float" office:value="71" calcext:value-type="float">
            <text:p>71</text:p>
          </table:table-cell>
          <table:table-cell table:style-name="ce1" office:value-type="string" calcext:value-type="string">
            <text:p>2020-12-11T16:05:46.321Z</text:p>
          </table:table-cell>
          <table:table-cell table:style-name="ce1"/>
          <table:table-cell table:style-name="ce1" office:value-type="string" calcext:value-type="string">
            <text:p>['bible-reference-rcl', 'datatable-translatable', 'gitea-react-toolkit', 'scripture-resources-rcl', 'string-punctuation-tokenizer', 'usfm-js']</text:p>
          </table:table-cell>
          <table:table-cell table:style-name="ce1"/>
          <table:table-cell table:style-name="ce1" office:value-type="string" calcext:value-type="string">
            <text:p>['richmahn', 'mannycolon', 'ancientTexts-ne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greek-apparatus-app" xlink:type="simple">https://github.com/unfoldingWord-box3/greek-apparatus-app</text:a></text:p>
          </table:table-cell>
          <table:table-cell table:style-name="ce4" office:value-type="string" calcext:value-type="string">
            <text:p>2021-02-11T13:51:27Z</text:p>
          </table:table-cell>
          <table:table-cell table:style-name="ce4"/>
          <table:table-cell table:style-name="ce1" office:value-type="string" calcext:value-type="string">
            <text:p>unfoldingWord-box3/greek-apparatus-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71 downloads in the last year) and no detected local consumers.</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GWE-Tes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7-29T13:32:2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WE-Tests" xlink:type="simple">https://github.com/unfoldingWord/GWE-Tests</text:a></text:p>
          </table:table-cell>
          <table:table-cell table:style-name="ce4" office:value-type="string" calcext:value-type="string">
            <text:p>2024-07-29T13:32:27Z</text:p>
          </table:table-cell>
          <table:table-cell table:style-name="ce4"/>
          <table:table-cell table:style-name="ce1" office:value-type="string" calcext:value-type="string">
            <text:p>unfoldingWord/GWE-Tes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hello-dcs-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27T00:47:55Z</text:p>
          </table:table-cell>
          <table:table-cell table:style-name="ce1" office:value-type="string" calcext:value-type="string">
            <text:p>2022-12-16T08:48:26Z</text:p>
          </table:table-cell>
          <table:table-cell table:style-name="ce4"/>
          <table:table-cell table:number-columns-repeated="2" table:style-name="ce4" office:value-type="float" office:value="6" calcext:value-type="float">
            <text:p>6</text:p>
          </table:table-cell>
          <table:table-cell table:style-name="ce1"/>
          <table:table-cell table:style-name="ce1" office:value-type="string" calcext:value-type="string">
            <text:p>hello-dcs-react-component-library</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 'dependabot[bot]',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hello-dcs-react-component-library" xlink:type="simple">https://github.com/unfoldingWord-box3/hello-dcs-react-component-library</text:a></text:p>
          </table:table-cell>
          <table:table-cell table:style-name="ce4" office:value-type="string" calcext:value-type="string">
            <text:p>2022-06-14T15:15:13Z</text:p>
          </table:table-cell>
          <table:table-cell table:style-name="ce4"/>
          <table:table-cell table:style-name="ce1" office:value-type="string" calcext:value-type="string">
            <text:p>unfoldingWord-box3/hello-dcs-react-component-librar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hello-world-react-component-librar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2T07:49:26Z</text:p>
          </table:table-cell>
          <table:table-cell table:style-name="ce1" office:value-type="string" calcext:value-type="string">
            <text:p>2022-02-23T21:09:04Z</text:p>
          </table:table-cell>
          <table:table-cell table:style-name="ce4"/>
          <table:table-cell table:style-name="ce4" office:value-type="float" office:value="32" calcext:value-type="float">
            <text:p>32</text:p>
          </table:table-cell>
          <table:table-cell table:style-name="ce4" office:value-type="float" office:value="27" calcext:value-type="float">
            <text:p>27</text:p>
          </table:table-cell>
          <table:table-cell table:style-name="ce1"/>
          <table:table-cell table:style-name="ce1" office:value-type="string" calcext:value-type="string">
            <text:p>hello-world-react-component-library</text:p>
          </table:table-cell>
          <table:table-cell table:style-name="ce1" table:formula="of:=FALSE()" office:value-type="float" office:value="0" calcext:value-type="float">
            <text:p>0</text:p>
          </table:table-cell>
          <table:table-cell table:style-name="ce1" office:value-type="float" office:value="199" calcext:value-type="float">
            <text:p>199</text:p>
          </table:table-cell>
          <table:table-cell table:style-name="ce1" office:value-type="string" calcext:value-type="string">
            <text:p>2019-09-25T16:00:59.747Z</text:p>
          </table:table-cell>
          <table:table-cell table:style-name="ce1" table:number-columns-repeated="3"/>
          <table:table-cell table:style-name="ce1" office:value-type="string" calcext:value-type="string">
            <text:p>['klappy', 'RoyalSix',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hello-world-react-component-library" xlink:type="simple">https://github.com/unfoldingWord-box3/hello-world-react-component-library</text:a></text:p>
          </table:table-cell>
          <table:table-cell table:style-name="ce4" office:value-type="string" calcext:value-type="string">
            <text:p>2022-06-14T15:18:39Z</text:p>
          </table:table-cell>
          <table:table-cell table:style-name="ce4"/>
          <table:table-cell table:style-name="ce1" office:value-type="string" calcext:value-type="string">
            <text:p>unfoldingWord-box3/hello-world-react-component-librar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199 downloads in the last year) and no detected local consumers.</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hubot</text:p>
          </table:table-cell>
          <table:table-cell table:style-name="ce1" office:value-type="string" calcext:value-type="string">
            <text:p>unfoldingWord-dev</text:p>
          </table:table-cell>
          <table:table-cell table:style-name="ce1" office:value-type="string" calcext:value-type="string">
            <text:p>Coffe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01T19:40:08Z</text:p>
          </table:table-cell>
          <table:table-cell table:style-name="ce1" office:value-type="string" calcext:value-type="string">
            <text:p>2016-12-01T19:40:00Z</text:p>
          </table:table-cell>
          <table:table-cell table:style-name="ce4"/>
          <table:table-cell table:style-name="ce4" office:value-type="float" office:value="25" calcext:value-type="float">
            <text:p>25</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jag3773', 'superdav42', 'Simi Shonowo', 'root', 'Richard Mahn', 'richmahn', 'hubot', 'markalolo', 'richmahn@gmail.co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hubot" xlink:type="simple">https://github.com/unfoldingWord-dev/hubot</text:a></text:p>
          </table:table-cell>
          <table:table-cell table:style-name="ce4" office:value-type="string" calcext:value-type="string">
            <text:p>2016-12-01T19:33:07Z</text:p>
          </table:table-cell>
          <table:table-cell table:style-name="ce4"/>
          <table:table-cell table:style-name="ce1" office:value-type="string" calcext:value-type="string">
            <text:p>unfoldingWord-dev/hubo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inventorys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02T09:43:44Z</text:p>
          </table:table-cell>
          <table:table-cell table:style-name="ce1" office:value-type="string" calcext:value-type="string">
            <text:p>2026-04-02T09:43:4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inventoryst" xlink:type="simple">https://github.com/unfoldingWord/inventoryst</text:a></text:p>
          </table:table-cell>
          <table:table-cell table:style-name="ce4" office:value-type="string" calcext:value-type="string">
            <text:p>2026-04-02T09:43:48Z</text:p>
          </table:table-cell>
          <table:table-cell table:style-name="ce4"/>
          <table:table-cell table:style-name="ce1" office:value-type="string" calcext:value-type="string">
            <text:p>unfoldingWord/inventorys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Katalon-gatewayEdit-Els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9-01T17:44:59Z</text:p>
          </table:table-cell>
          <table:table-cell table:style-name="ce1" office:value-type="string" calcext:value-type="string">
            <text:p>2021-09-01T17:44:5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itsonlambert', '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atalon-gatewayEdit-Elsy" xlink:type="simple">https://github.com/unfoldingWord/Katalon-gatewayEdit-Elsy</text:a></text:p>
          </table:table-cell>
          <table:table-cell table:style-name="ce4" office:value-type="string" calcext:value-type="string">
            <text:p>2021-09-01T17:45:03Z</text:p>
          </table:table-cell>
          <table:table-cell table:style-name="ce4"/>
          <table:table-cell table:style-name="ce1" office:value-type="string" calcext:value-type="string">
            <text:p>unfoldingWord/Katalon-gatewayEdit-Els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Katalon-gatewayEdit-Koz</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1T04:27:45Z</text:p>
          </table:table-cell>
          <table:table-cell table:style-name="ce1" office:value-type="string" calcext:value-type="string">
            <text:p>2021-05-22T18:43: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atalon-gatewayEdit-Koz" xlink:type="simple">https://github.com/unfoldingWord/Katalon-gatewayEdit-Koz</text:a></text:p>
          </table:table-cell>
          <table:table-cell table:style-name="ce4" office:value-type="string" calcext:value-type="string">
            <text:p>2021-05-22T18:43:04Z</text:p>
          </table:table-cell>
          <table:table-cell table:style-name="ce4"/>
          <table:table-cell table:style-name="ce1" office:value-type="string" calcext:value-type="string">
            <text:p>unfoldingWord/Katalon-gatewayEdit-Koz</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Katalon_MD-TSV_Converter_Koz</text:p>
          </table:table-cell>
          <table:table-cell table:style-name="ce1" office:value-type="string" calcext:value-type="string">
            <text:p>unfoldingWord</text:p>
          </table:table-cell>
          <table:table-cell table:style-name="ce1" office:value-type="string" calcext:value-type="string">
            <text:p>Groovy</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1T04:35:46Z</text:p>
          </table:table-cell>
          <table:table-cell table:style-name="ce1" office:value-type="string" calcext:value-type="string">
            <text:p>2021-07-01T04:33:4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ckozi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atalon_MD-TSV_Converter_Koz" xlink:type="simple">https://github.com/unfoldingWord/Katalon_MD-TSV_Converter_Koz</text:a></text:p>
          </table:table-cell>
          <table:table-cell table:style-name="ce4" office:value-type="string" calcext:value-type="string">
            <text:p>2021-07-01T04:36:22Z</text:p>
          </table:table-cell>
          <table:table-cell table:style-name="ce4"/>
          <table:table-cell table:style-name="ce1" office:value-type="string" calcext:value-type="string">
            <text:p>unfoldingWord/Katalon_MD-TSV_Converter_Koz</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Katalon_tC_Create</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08T17:16:23Z</text:p>
          </table:table-cell>
          <table:table-cell table:style-name="ce1" office:value-type="string" calcext:value-type="string">
            <text:p>2021-07-08T17:16:0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ckozie', 'ccko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atalon_tC_Create" xlink:type="simple">https://github.com/unfoldingWord/Katalon_tC_Create</text:a></text:p>
          </table:table-cell>
          <table:table-cell table:style-name="ce4" office:value-type="string" calcext:value-type="string">
            <text:p>2021-07-08T17:16:26Z</text:p>
          </table:table-cell>
          <table:table-cell table:style-name="ce4"/>
          <table:table-cell table:style-name="ce1" office:value-type="string" calcext:value-type="string">
            <text:p>unfoldingWord/Katalon_tC_Create</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keybase_git_backup</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4T15:07:37Z</text:p>
          </table:table-cell>
          <table:table-cell table:style-name="ce1" office:value-type="string" calcext:value-type="string">
            <text:p>2026-06-04T15:07:3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elgoh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eybase_git_backup" xlink:type="simple">https://github.com/unfoldingWord/keybase_git_backup</text:a></text:p>
          </table:table-cell>
          <table:table-cell table:style-name="ce4" office:value-type="string" calcext:value-type="string">
            <text:p>2026-06-04T15:11:14Z</text:p>
          </table:table-cell>
          <table:table-cell table:style-name="ce4"/>
          <table:table-cell table:style-name="ce1" office:value-type="string" calcext:value-type="string">
            <text:p>unfoldingWord/keybase_git_backu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kr1-data-script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2T04:31:56Z</text:p>
          </table:table-cell>
          <table:table-cell table:style-name="ce1" office:value-type="string" calcext:value-type="string">
            <text:p>2025-12-12T04:31:5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IanLindsley', 'drcox63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kr1-data-scripts" xlink:type="simple">https://github.com/unfoldingWord/kr1-data-scripts</text:a></text:p>
          </table:table-cell>
          <table:table-cell table:style-name="ce4" office:value-type="string" calcext:value-type="string">
            <text:p>2025-12-12T04:31:59Z</text:p>
          </table:table-cell>
          <table:table-cell table:style-name="ce4"/>
          <table:table-cell table:style-name="ce1" office:value-type="string" calcext:value-type="string">
            <text:p>unfoldingWord/kr1-data-scrip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lambda-tw-strongs-list-generator</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9-10T12:36:08Z</text:p>
          </table:table-cell>
          <table:table-cell table:style-name="ce1" office:value-type="string" calcext:value-type="string">
            <text:p>2025-09-10T12:36: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lambda-tw-strongs-list-generator" xlink:type="simple">https://github.com/unfoldingWord/lambda-tw-strongs-list-generator</text:a></text:p>
          </table:table-cell>
          <table:table-cell table:style-name="ce4" office:value-type="string" calcext:value-type="string">
            <text:p>2025-09-10T12:36:11Z</text:p>
          </table:table-cell>
          <table:table-cell table:style-name="ce4"/>
          <table:table-cell table:style-name="ce1" office:value-type="string" calcext:value-type="string">
            <text:p>unfoldingWord/lambda-tw-strongs-list-generato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language-search</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18T16:25:04Z</text:p>
          </table:table-cell>
          <table:table-cell table:style-name="ce1" office:value-type="string" calcext:value-type="string">
            <text:p>2025-12-18T16:25:0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root', 'paltma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language-search" xlink:type="simple">https://github.com/unfoldingWord/language-search</text:a></text:p>
          </table:table-cell>
          <table:table-cell table:style-name="ce4" office:value-type="string" calcext:value-type="string">
            <text:p>2025-12-18T16:25:08Z</text:p>
          </table:table-cell>
          <table:table-cell table:style-name="ce4"/>
          <table:table-cell table:style-name="ce1" office:value-type="string" calcext:value-type="string">
            <text:p>unfoldingWord/language-search</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johan.dejoode@unfoldingword.org" xlink:type="simple">Johan de Joode</text:a></text:p>
          </table:table-cell>
          <table:table-cell table:style-name="ce4" office:value-type="string" calcext:value-type="string">
            <text:p>x</text:p>
          </table:table-cell>
          <table:table-cell table:style-name="ce4"/>
          <table:table-cell table:style-name="ce1" office:value-type="string" calcext:value-type="string">
            <text:p>lexicon-poc</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0-20T10:56:21Z</text:p>
          </table:table-cell>
          <table:table-cell table:style-name="ce1" office:value-type="string" calcext:value-type="string">
            <text:p>2021-10-20T10:56:0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dejoo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lexicon-poc" xlink:type="simple">https://github.com/unfoldingWord-box3/lexicon-poc</text:a></text:p>
          </table:table-cell>
          <table:table-cell table:style-name="ce4" office:value-type="string" calcext:value-type="string">
            <text:p>2021-10-20T10:56:31Z</text:p>
          </table:table-cell>
          <table:table-cell table:style-name="ce4"/>
          <table:table-cell table:style-name="ce1" office:value-type="string" calcext:value-type="string">
            <text:p>unfoldingWord-box3/lexicon-po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loki-export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8T16:01:29Z</text:p>
          </table:table-cell>
          <table:table-cell table:style-name="ce1" office:value-type="string" calcext:value-type="string">
            <text:p>2026-05-08T16:01:2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elgoh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loki-exporter" xlink:type="simple">https://github.com/unfoldingWord/loki-exporter</text:a></text:p>
          </table:table-cell>
          <table:table-cell table:style-name="ce4" office:value-type="string" calcext:value-type="string">
            <text:p>2026-05-08T16:01:37Z</text:p>
          </table:table-cell>
          <table:table-cell table:style-name="ce4"/>
          <table:table-cell table:style-name="ce1" office:value-type="string" calcext:value-type="string">
            <text:p>unfoldingWord/loki-export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media</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7-28T19:30:07Z</text:p>
          </table:table-cell>
          <table:table-cell table:style-name="ce1" office:value-type="string" calcext:value-type="string">
            <text:p>2014-07-28T19:30:0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oor43', 'Distant Shores Media',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media" xlink:type="simple">https://github.com/unfoldingWord-dev/media</text:a></text:p>
          </table:table-cell>
          <table:table-cell table:style-name="ce4" office:value-type="string" calcext:value-type="string">
            <text:p>2015-06-23T21:37:51Z</text:p>
          </table:table-cell>
          <table:table-cell table:style-name="ce4"/>
          <table:table-cell table:style-name="ce1" office:value-type="string" calcext:value-type="string">
            <text:p>unfoldingWord-dev/medi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metric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8T15:31:33Z</text:p>
          </table:table-cell>
          <table:table-cell table:style-name="ce1" office:value-type="string" calcext:value-type="string">
            <text:p>2026-02-18T15:31:28Z</text:p>
          </table:table-cell>
          <table:table-cell table:style-name="ce4"/>
          <table:table-cell table:number-columns-repeated="2" table:style-name="ce4" office:value-type="float" office:value="2" calcext:value-type="float">
            <text:p>2</text:p>
          </table:table-cell>
          <table:table-cell table:style-name="ce1" table:number-columns-repeated="8"/>
          <table:table-cell table:style-name="ce1" office:value-type="string" calcext:value-type="string">
            <text:p>['jag3773', 'yakob-aleksandrovich', 'richmahn', 'bspidel', 'jesse@unfoldingword.org', 'Jaap-Jan Swijnenburg', 'dependabot[bot]', 'elgoh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metrics" xlink:type="simple">https://github.com/unfoldingWord/metrics</text:a></text:p>
          </table:table-cell>
          <table:table-cell table:style-name="ce4" office:value-type="string" calcext:value-type="string">
            <text:p>2026-02-18T15:31:37Z</text:p>
          </table:table-cell>
          <table:table-cell table:style-name="ce4"/>
          <table:table-cell table:style-name="ce1" office:value-type="string" calcext:value-type="string">
            <text:p>unfoldingWord/metric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mini-sb-handle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9-12T09:53:14Z</text:p>
          </table:table-cell>
          <table:table-cell table:style-name="ce1" office:value-type="string" calcext:value-type="string">
            <text:p>2024-09-12T09:53: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mini-sb-handler" xlink:type="simple">https://github.com/unfoldingWord-box3/mini-sb-handler</text:a></text:p>
          </table:table-cell>
          <table:table-cell table:style-name="ce4" office:value-type="string" calcext:value-type="string">
            <text:p>2024-09-12T09:53:19Z</text:p>
          </table:table-cell>
          <table:table-cell table:style-name="ce4"/>
          <table:table-cell table:style-name="ce1" office:value-type="string" calcext:value-type="string">
            <text:p>unfoldingWord-box3/mini-sb-handl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minitrack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3T15:58:11Z</text:p>
          </table:table-cell>
          <table:table-cell table:style-name="ce1" office:value-type="string" calcext:value-type="string">
            <text:p>2026-06-03T15:58:1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minitracker" xlink:type="simple">https://github.com/unfoldingWord/minitracker</text:a></text:p>
          </table:table-cell>
          <table:table-cell table:style-name="ce4" office:value-type="string" calcext:value-type="string">
            <text:p>2026-06-03T16:02:34Z</text:p>
          </table:table-cell>
          <table:table-cell table:style-name="ce4"/>
          <table:table-cell table:style-name="ce1" office:value-type="string" calcext:value-type="string">
            <text:p>unfoldingWord/minitrack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NotionImport</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10-23T20:23:2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NotionImport" xlink:type="simple">https://github.com/unfoldingWord-box3/NotionImport</text:a></text:p>
          </table:table-cell>
          <table:table-cell table:style-name="ce4" office:value-type="string" calcext:value-type="string">
            <text:p>2023-10-23T20:12:59Z</text:p>
          </table:table-cell>
          <table:table-cell table:style-name="ce4"/>
          <table:table-cell table:style-name="ce1" office:value-type="string" calcext:value-type="string">
            <text:p>unfoldingWord-box3/NotionImpor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nsmsg</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2-24T19:58:22Z</text:p>
          </table:table-cell>
          <table:table-cell table:style-name="ce1" office:value-type="string" calcext:value-type="string">
            <text:p>2015-02-24T19:55: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vonnel098</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smsg" xlink:type="simple">https://github.com/unfoldingWord-dev/nsmsg</text:a></text:p>
          </table:table-cell>
          <table:table-cell table:style-name="ce4" office:value-type="string" calcext:value-type="string">
            <text:p>2015-06-23T21:40:04Z</text:p>
          </table:table-cell>
          <table:table-cell table:style-name="ce4" office:value-type="string" calcext:value-type="string">
            <text:p>unfoldingWord-dev/nsmsg</text:p>
          </table:table-cell>
          <table:table-cell table:style-name="ce1" office:value-type="string" calcext:value-type="string">
            <text:p>unfoldingWord-dev/nsmsg</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obs-ap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5T15:14:30Z</text:p>
          </table:table-cell>
          <table:table-cell table:style-name="ce1" office:value-type="string" calcext:value-type="string">
            <text:p>2026-05-05T15:14:21Z</text:p>
          </table:table-cell>
          <table:table-cell table:style-name="ce4" office:value-type="string" calcext:value-type="string">
            <text:p>2025-06-03T04:28:11Z</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1"/>
          <table:table-cell table:style-name="ce1" office:value-type="string" calcext:value-type="string">
            <text:p>obs-app</text:p>
          </table:table-cell>
          <table:table-cell table:style-name="ce1" table:number-columns-repeated="6"/>
          <table:table-cell table:style-name="ce1" office:value-type="string" calcext:value-type="string">
            <text:p>['abelpz', 'eliaspinero']</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5" office:value-type="string" calcext:value-type="string">
            <text:p><text:a xlink:href="https://github.com/unfoldingWord/obs-app" xlink:type="simple">https://github.com/unfoldingWord/obs-app</text:a></text:p>
          </table:table-cell>
          <table:table-cell table:style-name="ce4" office:value-type="string" calcext:value-type="string">
            <text:p>2026-05-05T15:16:31Z</text:p>
          </table:table-cell>
          <table:table-cell table:style-name="ce4"/>
          <table:table-cell table:style-name="ce1" office:value-type="string" calcext:value-type="string">
            <text:p>unfoldingWord/obs-app</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bs-comparer</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4-11T06:23:30Z</text:p>
          </table:table-cell>
          <table:table-cell table:style-name="ce1" office:value-type="string" calcext:value-type="string">
            <text:p>2015-04-11T06:23:3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comparer" xlink:type="simple">https://github.com/unfoldingWord-dev/obs-comparer</text:a></text:p>
          </table:table-cell>
          <table:table-cell table:style-name="ce4" office:value-type="string" calcext:value-type="string">
            <text:p>2015-04-11T06:23:30Z</text:p>
          </table:table-cell>
          <table:table-cell table:style-name="ce4"/>
          <table:table-cell table:style-name="ce1" office:value-type="string" calcext:value-type="string">
            <text:p>unfoldingWord-dev/obs-compar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bs-dat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3-24T13:00:10Z</text:p>
          </table:table-cell>
          <table:table-cell table:style-name="ce1" office:value-type="string" calcext:value-type="string">
            <text:p>2018-03-24T12:59: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data" xlink:type="simple">https://github.com/unfoldingWord-dev/obs-data</text:a></text:p>
          </table:table-cell>
          <table:table-cell table:style-name="ce4" office:value-type="string" calcext:value-type="string">
            <text:p>2018-03-24T13:00:11Z</text:p>
          </table:table-cell>
          <table:table-cell table:style-name="ce4"/>
          <table:table-cell table:style-name="ce1" office:value-type="string" calcext:value-type="string">
            <text:p>unfoldingWord-dev/obs-dat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bs-reader</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9-24T19:15:38Z</text:p>
          </table:table-cell>
          <table:table-cell table:style-name="ce1" office:value-type="string" calcext:value-type="string">
            <text:p>2015-09-24T19:15:3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newmanr19', 'jag3773', 'phillip-hopper', 'root',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reader" xlink:type="simple">https://github.com/unfoldingWord-dev/obs-reader</text:a></text:p>
          </table:table-cell>
          <table:table-cell table:style-name="ce4" office:value-type="string" calcext:value-type="string">
            <text:p>2015-03-09T22:06:24Z</text:p>
          </table:table-cell>
          <table:table-cell table:style-name="ce4"/>
          <table:table-cell table:style-name="ce1" office:value-type="string" calcext:value-type="string">
            <text:p>unfoldingWord-dev/obs-read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table:table-cell table:style-name="ce4" office:value-type="string" calcext:value-type="string">
            <text:p>x</text:p>
          </table:table-cell>
          <table:table-cell table:style-name="ce1" office:value-type="string" calcext:value-type="string">
            <text:p>obs-web</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27T11:32:33Z</text:p>
          </table:table-cell>
          <table:table-cell table:style-name="ce1" office:value-type="string" calcext:value-type="string">
            <text:p>2023-01-03T21:29:18Z</text:p>
          </table:table-cell>
          <table:table-cell table:style-name="ce4"/>
          <table:table-cell table:style-name="ce4" office:value-type="float" office:value="3" calcext:value-type="float">
            <text:p>3</text:p>
          </table:table-cell>
          <table:table-cell table:style-name="ce4" office:value-type="float" office:value="2" calcext:value-type="float">
            <text:p>2</text:p>
          </table:table-cell>
          <table:table-cell table:style-name="ce1" table:number-columns-repeated="8"/>
          <table:table-cell table:style-name="ce1" office:value-type="string" calcext:value-type="string">
            <text:p>['richmahn', 'Phil Hopper', 'phillip-hopper', 'yakob-aleksandrovich', 'dependabot[bot]',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web" xlink:type="simple">https://github.com/unfoldingWord/obs-web</text:a></text:p>
          </table:table-cell>
          <table:table-cell table:style-name="ce4" office:value-type="string" calcext:value-type="string">
            <text:p>2026-04-27T00:53:46Z</text:p>
          </table:table-cell>
          <table:table-cell table:style-name="ce4"/>
          <table:table-cell table:style-name="ce1" office:value-type="string" calcext:value-type="string">
            <text:p>unfoldingWord/obs-we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bs_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4T11:48:14Z</text:p>
          </table:table-cell>
          <table:table-cell table:style-name="ce1" office:value-type="string" calcext:value-type="string">
            <text:p>2016-12-20T14:11:4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_tools" xlink:type="simple">https://github.com/unfoldingWord-dev/obs_tools</text:a></text:p>
          </table:table-cell>
          <table:table-cell table:style-name="ce4" office:value-type="string" calcext:value-type="string">
            <text:p>2016-08-29T19:48:09Z</text:p>
          </table:table-cell>
          <table:table-cell table:style-name="ce4"/>
          <table:table-cell table:style-name="ce1" office:value-type="string" calcext:value-type="string">
            <text:p>unfoldingWord-dev/obs_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odd-claude-plugin</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2T20:16:10Z</text:p>
          </table:table-cell>
          <table:table-cell table:style-name="ce1" office:value-type="string" calcext:value-type="string">
            <text:p>2026-01-22T20:16: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laude', 'Ian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dd-claude-plugin" xlink:type="simple">https://github.com/unfoldingWord/odd-claude-plugin</text:a></text:p>
          </table:table-cell>
          <table:table-cell table:style-name="ce4" office:value-type="string" calcext:value-type="string">
            <text:p>2026-01-22T20:16:13Z</text:p>
          </table:table-cell>
          <table:table-cell table:style-name="ce4"/>
          <table:table-cell table:style-name="ce1" office:value-type="string" calcext:value-type="string">
            <text:p>unfoldingWord/odd-claude-plugin</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ld-tx-manager-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19T15:13:30Z</text:p>
          </table:table-cell>
          <table:table-cell table:style-name="ce1" office:value-type="string" calcext:value-type="string">
            <text:p>2016-12-19T15:13: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Gogs',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ld-tx-manager-lambda" xlink:type="simple">https://github.com/unfoldingWord-dev/old-tx-manager-lambda</text:a></text:p>
          </table:table-cell>
          <table:table-cell table:style-name="ce4" office:value-type="string" calcext:value-type="string">
            <text:p>2017-01-23T14:56:14Z</text:p>
          </table:table-cell>
          <table:table-cell table:style-name="ce4"/>
          <table:table-cell table:style-name="ce1" office:value-type="string" calcext:value-type="string">
            <text:p>unfoldingWord-dev/old-tx-manager-lambd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org-language-resource-hook</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06-14T06:26:3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org-language-resource-hook" xlink:type="simple">https://github.com/unfoldingWord-box3/org-language-resource-hook</text:a></text:p>
          </table:table-cell>
          <table:table-cell table:style-name="ce4" office:value-type="string" calcext:value-type="string">
            <text:p>2022-06-14T06:26:30Z</text:p>
          </table:table-cell>
          <table:table-cell table:style-name="ce4"/>
          <table:table-cell table:style-name="ce1" office:value-type="string" calcext:value-type="string">
            <text:p>unfoldingWord-box3/org-language-resource-hook</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pages</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10-21T15:55:23Z</text:p>
          </table:table-cell>
          <table:table-cell table:style-name="ce1" office:value-type="string" calcext:value-type="string">
            <text:p>2014-10-21T15:55:2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oor43', 'Distant Shores Media', 'Jesse A. Griffin',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ages" xlink:type="simple">https://github.com/unfoldingWord-dev/pages</text:a></text:p>
          </table:table-cell>
          <table:table-cell table:style-name="ce4" office:value-type="string" calcext:value-type="string">
            <text:p>2019-02-28T03:39:24Z</text:p>
          </table:table-cell>
          <table:table-cell table:style-name="ce4"/>
          <table:table-cell table:style-name="ce1" office:value-type="string" calcext:value-type="string">
            <text:p>unfoldingWord-dev/page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table:number-columns-repeated="2"/>
          <table:table-cell table:style-name="ce1" office:value-type="string" calcext:value-type="string">
            <text:p>pdf-splitter</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24T13:19:57Z</text:p>
          </table:table-cell>
          <table:table-cell table:style-name="ce1" office:value-type="string" calcext:value-type="string">
            <text:p>2022-02-24T13:19:5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df-splitter" xlink:type="simple">https://github.com/unfoldingWord-box3/pdf-splitter</text:a></text:p>
          </table:table-cell>
          <table:table-cell table:style-name="ce4" office:value-type="string" calcext:value-type="string">
            <text:p>2022-02-24T13:17:52Z</text:p>
          </table:table-cell>
          <table:table-cell table:style-name="ce4"/>
          <table:table-cell table:style-name="ce1" office:value-type="string" calcext:value-type="string">
            <text:p>unfoldingWord-box3/pdf-splitt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pi-collab</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4T20:40:08Z</text:p>
          </table:table-cell>
          <table:table-cell table:style-name="ce1" office:value-type="string" calcext:value-type="string">
            <text:p>2015-05-24T20:40:01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knutsenm', 'Jesse A. Griffin', 'jag3773', 'Shay Haye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i-collab" xlink:type="simple">https://github.com/unfoldingWord-dev/pi-collab</text:a></text:p>
          </table:table-cell>
          <table:table-cell table:style-name="ce4" office:value-type="string" calcext:value-type="string">
            <text:p>2016-04-22T10:55:48Z</text:p>
          </table:table-cell>
          <table:table-cell table:style-name="ce4"/>
          <table:table-cell table:style-name="ce1" office:value-type="string" calcext:value-type="string">
            <text:p>unfoldingWord-dev/pi-colla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proskomma-scripture-resources-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4-29T14:02:08Z</text:p>
          </table:table-cell>
          <table:table-cell table:style-name="ce1" office:value-type="string" calcext:value-type="string">
            <text:p>2021-02-05T16:34:0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proskomma-scripture-resources-rcl</text:p>
          </table:table-cell>
          <table:table-cell table:style-name="ce1" table:number-columns-repeated="4"/>
          <table:table-cell table:style-name="ce1" office:value-type="string" calcext:value-type="string">
            <text:p>uw-proskomma</text:p>
          </table:table-cell>
          <table:table-cell table:style-name="ce1"/>
          <table:table-cell table:style-name="ce1" office:value-type="string" calcext:value-type="string">
            <text:p>['mvahowe',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roskomma-scripture-resources-rcl" xlink:type="simple">https://github.com/unfoldingWord-box3/proskomma-scripture-resources-rcl</text:a></text:p>
          </table:table-cell>
          <table:table-cell table:style-name="ce4" office:value-type="string" calcext:value-type="string">
            <text:p>2022-06-14T15:15:43Z</text:p>
          </table:table-cell>
          <table:table-cell table:style-name="ce4"/>
          <table:table-cell table:style-name="ce1" office:value-type="string" calcext:value-type="string">
            <text:p>unfoldingWord-box3/proskomma-scripture-resources-rc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PublishingBlockchain</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5-12-22T23:26:1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ublishingBlockchain" xlink:type="simple">https://github.com/unfoldingWord-dev/PublishingBlockchain</text:a></text:p>
          </table:table-cell>
          <table:table-cell table:style-name="ce4" office:value-type="string" calcext:value-type="string">
            <text:p>2018-03-11T20:57:04Z</text:p>
          </table:table-cell>
          <table:table-cell table:style-name="ce4"/>
          <table:table-cell table:style-name="ce1" office:value-type="string" calcext:value-type="string">
            <text:p>unfoldingWord-dev/PublishingBlockchain</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python-aws-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6-30T18:36:54Z</text:p>
          </table:table-cell>
          <table:table-cell table:style-name="ce1" office:value-type="string" calcext:value-type="string">
            <text:p>2017-06-30T18:36: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ython-aws-tools" xlink:type="simple">https://github.com/unfoldingWord-dev/python-aws-tools</text:a></text:p>
          </table:table-cell>
          <table:table-cell table:style-name="ce4" office:value-type="string" calcext:value-type="string">
            <text:p>2017-08-23T22:31:23Z</text:p>
          </table:table-cell>
          <table:table-cell table:style-name="ce4"/>
          <table:table-cell table:style-name="ce1" office:value-type="string" calcext:value-type="string">
            <text:p>unfoldingWord-dev/python-aws-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python-gitea-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0-05T01:46:07Z</text:p>
          </table:table-cell>
          <table:table-cell table:style-name="ce1" office:value-type="string" calcext:value-type="string">
            <text:p>2020-10-05T01:43:14Z</text:p>
          </table:table-cell>
          <table:table-cell table:style-name="ce4" office:value-type="string" calcext:value-type="string">
            <text:p>2020-10-02T16:00:43Z</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1" table:number-columns-repeated="8"/>
          <table:table-cell table:style-name="ce1" office:value-type="string" calcext:value-type="string">
            <text:p>['ethantkoenig', 'richmahn', 'da1nerd', 'guyzmo', 'costibleotu', 'evrardjp', 'jag3773', 'Richard Mahn', 'pyhedgehog']</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dev/python-gitea-client" xlink:type="simple">https://github.com/unfoldingWord-dev/python-gitea-client</text:a></text:p>
          </table:table-cell>
          <table:table-cell table:style-name="ce4" office:value-type="string" calcext:value-type="string">
            <text:p>2025-02-23T11:58:32Z</text:p>
          </table:table-cell>
          <table:table-cell table:style-name="ce4"/>
          <table:table-cell table:style-name="ce1" office:value-type="string" calcext:value-type="string">
            <text:p>unfoldingWord-dev/python-gitea-clien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python-resource-contain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2-05T23:06:00Z</text:p>
          </table:table-cell>
          <table:table-cell table:style-name="ce1" office:value-type="string" calcext:value-type="string">
            <text:p>2018-02-05T23:05:1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jeremymlan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ython-resource-container" xlink:type="simple">https://github.com/unfoldingWord-dev/python-resource-container</text:a></text:p>
          </table:table-cell>
          <table:table-cell table:style-name="ce4" office:value-type="string" calcext:value-type="string">
            <text:p>2017-05-04T19:55:10Z</text:p>
          </table:table-cell>
          <table:table-cell table:style-name="ce4"/>
          <table:table-cell table:style-name="ce1" office:value-type="string" calcext:value-type="string">
            <text:p>unfoldingWord-dev/python-resource-contain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rc-schema</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8-10T21:21:4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RobH12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rc-schema" xlink:type="simple">https://github.com/unfoldingWord/rc-schema</text:a></text:p>
          </table:table-cell>
          <table:table-cell table:style-name="ce4" office:value-type="string" calcext:value-type="string">
            <text:p>2021-11-30T18:22:18Z</text:p>
          </table:table-cell>
          <table:table-cell table:style-name="ce4"/>
          <table:table-cell table:style-name="ce1" office:value-type="string" calcext:value-type="string">
            <text:p>unfoldingWord/rc-schem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Resource-Container</text:p>
          </table:table-cell>
          <table:table-cell table:style-name="ce1" office:value-type="string" calcext:value-type="string">
            <text:p>unfoldingWord-dev</text:p>
          </table:table-cell>
          <table:table-cell table:style-name="ce1" office:value-type="string" calcext:value-type="string">
            <text:p>Makefile</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09T10:27:34Z</text:p>
          </table:table-cell>
          <table:table-cell table:style-name="ce1" office:value-type="string" calcext:value-type="string">
            <text:p>2025-10-09T10:27:33Z</text:p>
          </table:table-cell>
          <table:table-cell table:style-name="ce4"/>
          <table:table-cell table:style-name="ce4" office:value-type="float" office:value="6" calcext:value-type="float">
            <text:p>6</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 'jag3773', 'yakob-aleksandrovich', 'PhotoNomad0', 'RobH123', 'timjore']</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dev/Resource-Container" xlink:type="simple">https://github.com/unfoldingWord-dev/Resource-Container</text:a></text:p>
          </table:table-cell>
          <table:table-cell table:style-name="ce4" office:value-type="string" calcext:value-type="string">
            <text:p>2025-10-09T10:27:37Z</text:p>
          </table:table-cell>
          <table:table-cell table:style-name="ce4"/>
          <table:table-cell table:style-name="ce1" office:value-type="string" calcext:value-type="string">
            <text:p>unfoldingWord-dev/Resource-Contain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3" office:value-type="string" calcext:value-type="string">
            <text:p><text:a xlink:href="mailto:rich.mahn@unfoldingword.org" xlink:type="simple">Richard Mahn</text:a></text:p>
          </table:table-cell>
          <table:table-cell table:style-name="ce4" table:number-columns-repeated="2"/>
          <table:table-cell table:style-name="ce1" office:value-type="string" calcext:value-type="string">
            <text:p>resource-container-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6T06:31:27Z</text:p>
          </table:table-cell>
          <table:table-cell table:style-name="ce1" office:value-type="string" calcext:value-type="string">
            <text:p>2021-03-10T16:03:18Z</text:p>
          </table:table-cell>
          <table:table-cell table:style-name="ce4"/>
          <table:table-cell table:number-columns-repeated="2" table:style-name="ce4" office:value-type="float" office:value="23" calcext:value-type="float">
            <text:p>23</text:p>
          </table:table-cell>
          <table:table-cell table:style-name="ce1"/>
          <table:table-cell table:style-name="ce1" office:value-type="string" calcext:value-type="string">
            <text:p>resource-container-rcl</text:p>
          </table:table-cell>
          <table:table-cell table:style-name="ce1" table:number-columns-repeated="4"/>
          <table:table-cell table:style-name="ce1" office:value-type="string" calcext:value-type="string">
            <text:p>['gitea-react-toolkit', 'markdown-translatable']</text:p>
          </table:table-cell>
          <table:table-cell table:style-name="ce1"/>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source-container-rcl" xlink:type="simple">https://github.com/unfoldingWord-box3/resource-container-rcl</text:a></text:p>
          </table:table-cell>
          <table:table-cell table:style-name="ce4" office:value-type="string" calcext:value-type="string">
            <text:p>2022-06-14T15:16:49Z</text:p>
          </table:table-cell>
          <table:table-cell table:style-name="ce4"/>
          <table:table-cell table:style-name="ce1" office:value-type="string" calcext:value-type="string">
            <text:p>unfoldingWord-box3/resource-container-rcl</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s3_list-zip</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2-19T22:47:48Z</text:p>
          </table:table-cell>
          <table:table-cell table:style-name="ce1" office:value-type="string" calcext:value-type="string">
            <text:p>2016-02-19T22:47:3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odemi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3_list-zip" xlink:type="simple">https://github.com/unfoldingWord-dev/s3_list-zip</text:a></text:p>
          </table:table-cell>
          <table:table-cell table:style-name="ce4" office:value-type="string" calcext:value-type="string">
            <text:p>2016-02-19T21:11:59Z</text:p>
          </table:table-cell>
          <table:table-cell table:style-name="ce4"/>
          <table:table-cell table:style-name="ce1" office:value-type="string" calcext:value-type="string">
            <text:p>unfoldingWord-dev/s3_list-zi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scripture-as-graph</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30T20:47:55Z</text:p>
          </table:table-cell>
          <table:table-cell table:style-name="ce1" office:value-type="string" calcext:value-type="string">
            <text:p>2020-07-22T12:31:01Z</text:p>
          </table:table-cell>
          <table:table-cell table:style-name="ce4"/>
          <table:table-cell table:number-columns-repeated="2" table:style-name="ce4" office:value-type="float" office:value="10" calcext:value-type="float">
            <text:p>10</text:p>
          </table:table-cell>
          <table:table-cell table:style-name="ce1"/>
          <table:table-cell table:style-name="ce1" office:value-type="string" calcext:value-type="string">
            <text:p>scripture-as-graph</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mvahowe',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cripture-as-graph" xlink:type="simple">https://github.com/unfoldingWord-box3/scripture-as-graph</text:a></text:p>
          </table:table-cell>
          <table:table-cell table:style-name="ce4" office:value-type="string" calcext:value-type="string">
            <text:p>2020-07-22T12:31:12Z</text:p>
          </table:table-cell>
          <table:table-cell table:style-name="ce4"/>
          <table:table-cell table:style-name="ce1" office:value-type="string" calcext:value-type="string">
            <text:p>unfoldingWord-box3/scripture-as-graph</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2" office:value-type="string" calcext:value-type="string">
            <text:p><text:a xlink:href="mailto:bruce.mclean@unfoldingword.org" xlink:type="simple">Bruce Mclean</text:a></text:p>
          </table:table-cell>
          <table:table-cell table:style-name="ce4" office:value-type="string" calcext:value-type="string">
            <text:p>x</text:p>
          </table:table-cell>
          <table:table-cell table:style-name="ce4"/>
          <table:table-cell table:style-name="ce1" office:value-type="string" calcext:value-type="string">
            <text:p>ScripturePan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17T19:59:54Z</text:p>
          </table:table-cell>
          <table:table-cell table:style-name="ce1" office:value-type="string" calcext:value-type="string">
            <text:p>2018-05-17T19:59:5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cripturePane</text:p>
          </table:table-cell>
          <table:table-cell table:style-name="ce1" table:number-columns-repeated="4"/>
          <table:table-cell table:style-name="ce1" office:value-type="string" calcext:value-type="string">
            <text:p>['string-punctuation-tokenizer', 'tc-tool', 'usfm-js']</text:p>
          </table:table-cell>
          <table:table-cell table:style-name="ce1"/>
          <table:table-cell table:style-name="ce1" office:value-type="string" calcext:value-type="string">
            <text:p>['mannycolon', 'PhotoNomad0', 'da1nerd', 'klappy', 'RoyalSix', 'EllDoubleYew', 'cdwhitfield73', 'Sterling (Jay) Scott', 'ihoegen', 'richmahn', 'bspidel', 'Richard 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cripturePane" xlink:type="simple">https://github.com/unfoldingWord-dev/ScripturePane</text:a></text:p>
          </table:table-cell>
          <table:table-cell table:style-name="ce4" office:value-type="string" calcext:value-type="string">
            <text:p>2019-10-22T19:35:10Z</text:p>
          </table:table-cell>
          <table:table-cell table:style-name="ce4"/>
          <table:table-cell table:style-name="ce1" office:value-type="string" calcext:value-type="string">
            <text:p>unfoldingWord-dev/ScripturePan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sigadd</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4-01T22:00:27Z</text:p>
          </table:table-cell>
          <table:table-cell table:style-name="ce1" office:value-type="string" calcext:value-type="string">
            <text:p>2015-04-01T22:00: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Jesse A. Griffin',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igadd" xlink:type="simple">https://github.com/unfoldingWord-dev/sigadd</text:a></text:p>
          </table:table-cell>
          <table:table-cell table:style-name="ce4" office:value-type="string" calcext:value-type="string">
            <text:p>2015-04-01T22:00:28Z</text:p>
          </table:table-cell>
          <table:table-cell table:style-name="ce4"/>
          <table:table-cell table:style-name="ce1" office:value-type="string" calcext:value-type="string">
            <text:p>unfoldingWord-dev/sigad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IL_API_loader</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29T18:35:44Z</text:p>
          </table:table-cell>
          <table:table-cell table:style-name="ce1" office:value-type="string" calcext:value-type="string">
            <text:p>2023-06-29T18:35:3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IL_API_loader" xlink:type="simple">https://github.com/unfoldingWord-box3/SIL_API_loader</text:a></text:p>
          </table:table-cell>
          <table:table-cell table:style-name="ce4" office:value-type="string" calcext:value-type="string">
            <text:p>2023-06-29T15:32:27Z</text:p>
          </table:table-cell>
          <table:table-cell table:style-name="ce4"/>
          <table:table-cell table:style-name="ce1" office:value-type="string" calcext:value-type="string">
            <text:p>unfoldingWord-box3/SIL_API_load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implif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8-15T20:16:3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implify" xlink:type="simple">https://github.com/unfoldingWord-box3/Simplify</text:a></text:p>
          </table:table-cell>
          <table:table-cell table:style-name="ce4" office:value-type="string" calcext:value-type="string">
            <text:p>2024-08-15T20:16:40Z</text:p>
          </table:table-cell>
          <table:table-cell table:style-name="ce4"/>
          <table:table-cell table:style-name="ce1" office:value-type="string" calcext:value-type="string">
            <text:p>unfoldingWord-box3/Simplif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slack-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23T16:07:31Z</text:p>
          </table:table-cell>
          <table:table-cell table:style-name="ce1" office:value-type="string" calcext:value-type="string">
            <text:p>2017-05-23T15:38:4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 Hopper', 'phillip-hopper', 'PhotoNomad0', 'jag3773',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lack-lambda" xlink:type="simple">https://github.com/unfoldingWord-dev/slack-lambda</text:a></text:p>
          </table:table-cell>
          <table:table-cell table:style-name="ce4" office:value-type="string" calcext:value-type="string">
            <text:p>2017-03-15T16:22:01Z</text:p>
          </table:table-cell>
          <table:table-cell table:style-name="ce4"/>
          <table:table-cell table:style-name="ce1" office:value-type="string" calcext:value-type="string">
            <text:p>unfoldingWord-dev/slack-lambd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peechToTex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3-14T13:49:53Z</text:p>
          </table:table-cell>
          <table:table-cell table:style-name="ce1" office:value-type="string" calcext:value-type="string">
            <text:p>2024-03-14T13:49: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peechToText" xlink:type="simple">https://github.com/unfoldingWord-box3/SpeechToText</text:a></text:p>
          </table:table-cell>
          <table:table-cell table:style-name="ce4" office:value-type="string" calcext:value-type="string">
            <text:p>2024-03-13T21:24:03Z</text:p>
          </table:table-cell>
          <table:table-cell table:style-name="ce4"/>
          <table:table-cell table:style-name="ce1" office:value-type="string" calcext:value-type="string">
            <text:p>unfoldingWord-box3/SpeechToTex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plitAudioByTex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3-06T20:43:08Z</text:p>
          </table:table-cell>
          <table:table-cell table:style-name="ce1" office:value-type="string" calcext:value-type="string">
            <text:p>2025-03-06T20:43: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plitAudioByText" xlink:type="simple">https://github.com/unfoldingWord-box3/SplitAudioByText</text:a></text:p>
          </table:table-cell>
          <table:table-cell table:style-name="ce4" office:value-type="string" calcext:value-type="string">
            <text:p>2025-03-06T20:43:12Z</text:p>
          </table:table-cell>
          <table:table-cell table:style-name="ce4"/>
          <table:table-cell table:style-name="ce1" office:value-type="string" calcext:value-type="string">
            <text:p>unfoldingWord-box3/SplitAudioByTex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c-create-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9T18:54:12Z</text:p>
          </table:table-cell>
          <table:table-cell table:style-name="ce1" office:value-type="string" calcext:value-type="string">
            <text:p>2026-05-28T16:04:14Z</text:p>
          </table:table-cell>
          <table:table-cell table:style-name="ce4" office:value-type="string" calcext:value-type="string">
            <text:p>2026-06-10T15:01:15Z</text:p>
          </table:table-cell>
          <table:table-cell table:style-name="ce4" office:value-type="float" office:value="291" calcext:value-type="float">
            <text:p>291</text:p>
          </table:table-cell>
          <table:table-cell table:style-name="ce4" office:value-type="float" office:value="20" calcext:value-type="float">
            <text:p>20</text:p>
          </table:table-cell>
          <table:table-cell table:style-name="ce1"/>
          <table:table-cell table:style-name="ce1" office:value-type="string" calcext:value-type="string">
            <text:p>tc-create-app</text:p>
          </table:table-cell>
          <table:table-cell table:style-name="ce1" table:formula="of:=FALSE()" office:value-type="float" office:value="0" calcext:value-type="float">
            <text:p>0</text:p>
          </table:table-cell>
          <table:table-cell table:style-name="ce1" office:value-type="float" office:value="73" calcext:value-type="float">
            <text:p>73</text:p>
          </table:table-cell>
          <table:table-cell table:style-name="ce1" office:value-type="string" calcext:value-type="string">
            <text:p>2022-02-22T21:12:10.659Z</text:p>
          </table:table-cell>
          <table:table-cell table:style-name="ce1"/>
          <table:table-cell table:style-name="ce1" office:value-type="string" calcext:value-type="string">
            <text:p>['bible-reference-range', 'datatable-translatable', 'dcs-branch-merger', 'gitea-react-toolkit', 'markdown-translatable', 'scripture-resources-rcl', 'tc-ui-toolkit', 'usfm-js', 'uw-content-validation', 'uw-languages-rcl', 'uw-tsv-parser', 'word-aligner', '@unfoldingword/eslint-config']</text:p>
          </table:table-cell>
          <table:table-cell table:style-name="ce1"/>
          <table:table-cell table:style-name="ce1" office:value-type="string" calcext:value-type="string">
            <text:p>['ancientTexts-net', 'klappy', 'mandolyte', 'RoyalSix', 'Joel-C-Johnson', 'dependabot[bot]', 'jincypjose', 'abelpz', 'Sterling (Jay) Scott', 'actions-user', 'PhotoNomad0', 'superdav42', 'dependabot-preview[bot]', 'larsgson', 'jag3773', 'Birch Champeon', 'theNerd247', 'richmahn', 'elsylambert', 'LijuJacob08', 'mannycolon', 'birchamp', 'eliaspinero', 'revant.cherian']</text:p>
          </table:table-cell>
          <table:table-cell table:style-name="ce1" office:value-type="float" office:value="36" calcext:value-type="float">
            <text:p>36</text:p>
          </table:table-cell>
          <table:table-cell table:style-name="ce1" office:value-type="float" office:value="0" calcext:value-type="float">
            <text:p>0</text:p>
          </table:table-cell>
          <table:table-cell table:style-name="ce5" office:value-type="string" calcext:value-type="string">
            <text:p><text:a xlink:href="https://github.com/unfoldingWord/tc-create-app" xlink:type="simple">https://github.com/unfoldingWord/tc-create-app</text:a></text:p>
          </table:table-cell>
          <table:table-cell table:style-name="ce4" office:value-type="string" calcext:value-type="string">
            <text:p>2026-05-28T16:04:51Z</text:p>
          </table:table-cell>
          <table:table-cell table:style-name="ce4"/>
          <table:table-cell table:style-name="ce1" office:value-type="string" calcext:value-type="string">
            <text:p>unfoldingWord/tc-create-app</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has low but nonzero npm usage (73 downloads in the last year) and no detected local consumer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helps-skill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07T21:29:21Z</text:p>
          </table:table-cell>
          <table:table-cell table:style-name="ce1" office:value-type="string" calcext:value-type="string">
            <text:p>2026-04-07T21:29:0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irchamp', 'Birch Champe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helps-skills" xlink:type="simple">https://github.com/unfoldingWord/tc-helps-skills</text:a></text:p>
          </table:table-cell>
          <table:table-cell table:style-name="ce4" office:value-type="string" calcext:value-type="string">
            <text:p>2026-04-07T21:29:27Z</text:p>
          </table:table-cell>
          <table:table-cell table:style-name="ce4"/>
          <table:table-cell table:style-name="ce1" office:value-type="string" calcext:value-type="string">
            <text:p>unfoldingWord/tc-helps-skil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catalog-adapter-indexeddb</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adapter-indexeddb</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adapter-indexeddb</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catalog-adapter-memor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adapter-memory</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adapter-memory</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catalog-adapter-sql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adapter-sqlit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adapter-sqlit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catalog-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cli</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catalog-manag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catalog-manag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catalog-manag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door43-ap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door43-ap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door43-api</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action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action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action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adapter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adapter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adapter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bundl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bundl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bundl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cach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cach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cach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catalog</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catalog</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catalog</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cl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cli</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cli</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package-buil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package-buil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package-build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pane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pane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panel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parser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parser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parser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selection</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selection</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selection</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signal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signal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signal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resource-type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resource-types</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resource-type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scripture-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cripture-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cripture-load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scripture-resourc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cripture-resourc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cripture-resourc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scripture-resourc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scripture-resourc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scripture-resourc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synergy/unified-catalog-stor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synergy/unified-catalog-stor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synergy/unified-catalog-stor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bt-toolkit/resource-download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bt-toolkit/resource-downloader</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bt-toolkit/resource-download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udy/resource-panels-spik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9:02:37Z</text:p>
          </table:table-cell>
          <table:table-cell table:style-name="ce1" office:value-type="string" calcext:value-type="string">
            <text:p>2026-05-11T19:02:27Z</text:p>
          </table:table-cell>
          <table:table-cell table:style-name="ce4"/>
          <table:table-cell table:style-name="ce4" office:value-type="float" office:value="13" calcext:value-type="float">
            <text:p>13</text:p>
          </table:table-cell>
          <table:table-cell table:style-name="ce4" office:value-type="float" office:value="0" calcext:value-type="float">
            <text:p>0</text:p>
          </table:table-cell>
          <table:table-cell table:style-name="ce1"/>
          <table:table-cell table:style-name="ce1" office:value-type="string" calcext:value-type="string">
            <text:p>resource-panels-spike</text:p>
          </table:table-cell>
          <table:table-cell table:style-name="ce1" table:number-columns-repeated="6"/>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udy" xlink:type="simple">https://github.com/unfoldingWord/tc-study</text:a></text:p>
          </table:table-cell>
          <table:table-cell table:style-name="ce4" office:value-type="string" calcext:value-type="string">
            <text:p>2026-05-11T19:02:48Z</text:p>
          </table:table-cell>
          <table:table-cell table:style-name="ce4"/>
          <table:table-cell table:style-name="ce1" office:value-type="string" calcext:value-type="string">
            <text:p>unfoldingWord/tc-study/resource-panels-spik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CreateQA-Daniel</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15T18:34:01Z</text:p>
          </table:table-cell>
          <table:table-cell table:style-name="ce1" office:value-type="string" calcext:value-type="string">
            <text:p>2023-02-15T18:34:0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ambe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CreateQA-Daniel" xlink:type="simple">https://github.com/unfoldingWord/tCCreateQA-Daniel</text:a></text:p>
          </table:table-cell>
          <table:table-cell table:style-name="ce4" office:value-type="string" calcext:value-type="string">
            <text:p>2023-02-15T18:34:00Z</text:p>
          </table:table-cell>
          <table:table-cell table:style-name="ce4"/>
          <table:table-cell table:style-name="ce1" office:value-type="string" calcext:value-type="string">
            <text:p>unfoldingWord/tCCreateQA-Danie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cCreateQA-els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3-02-14T15:33:5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lsylitsonlambert', 'elsylambert', 'Elsy Lit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CreateQA-elsy" xlink:type="simple">https://github.com/unfoldingWord/tcCreateQA-elsy</text:a></text:p>
          </table:table-cell>
          <table:table-cell table:style-name="ce4" office:value-type="string" calcext:value-type="string">
            <text:p>2022-04-21T19:00:59Z</text:p>
          </table:table-cell>
          <table:table-cell table:style-name="ce4"/>
          <table:table-cell table:style-name="ce1" office:value-type="string" calcext:value-type="string">
            <text:p>unfoldingWord/tcCreateQA-els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d-legac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1-29T16:24:41Z</text:p>
          </table:table-cell>
          <table:table-cell table:style-name="ce1" office:value-type="string" calcext:value-type="string">
            <text:p>2023-11-29T16:24:3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d-legacy" xlink:type="simple">https://github.com/unfoldingWord/td-legacy</text:a></text:p>
          </table:table-cell>
          <table:table-cell table:style-name="ce4" office:value-type="string" calcext:value-type="string">
            <text:p>2023-06-06T09:41:14Z</text:p>
          </table:table-cell>
          <table:table-cell table:style-name="ce4"/>
          <table:table-cell table:style-name="ce1" office:value-type="string" calcext:value-type="string">
            <text:p>unfoldingWord/td-legac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d-neo4j-poc</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4-25T18:44:28Z</text:p>
          </table:table-cell>
          <table:table-cell table:style-name="ce1" office:value-type="string" calcext:value-type="string">
            <text:p>2019-04-25T18:44:2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d-neo4j-poc" xlink:type="simple">https://github.com/unfoldingWord-box3/td-neo4j-poc</text:a></text:p>
          </table:table-cell>
          <table:table-cell table:style-name="ce4" office:value-type="string" calcext:value-type="string">
            <text:p>2019-04-25T18:44:29Z</text:p>
          </table:table-cell>
          <table:table-cell table:style-name="ce4"/>
          <table:table-cell table:style-name="ce1" office:value-type="string" calcext:value-type="string">
            <text:p>unfoldingWord-box3/td-neo4j-po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heia-examples</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2-17T23:09:51Z</text:p>
          </table:table-cell>
          <table:table-cell table:style-name="ce1" office:value-type="string" calcext:value-type="string">
            <text:p>2025-01-07T19:51: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heia-examples" xlink:type="simple">https://github.com/unfoldingWord-box3/theia-examples</text:a></text:p>
          </table:table-cell>
          <table:table-cell table:style-name="ce4" office:value-type="string" calcext:value-type="string">
            <text:p>2025-01-22T21:00:21Z</text:p>
          </table:table-cell>
          <table:table-cell table:style-name="ce4"/>
          <table:table-cell table:style-name="ce1" office:value-type="string" calcext:value-type="string">
            <text:p>unfoldingWord-box3/theia-example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n_add_scripture_link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7-29T19:11:11Z</text:p>
          </table:table-cell>
          <table:table-cell table:style-name="ce1" office:value-type="string" calcext:value-type="string">
            <text:p>2025-07-29T19:11: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n_add_scripture_links" xlink:type="simple">https://github.com/unfoldingWord-dev/tn_add_scripture_links</text:a></text:p>
          </table:table-cell>
          <table:table-cell table:style-name="ce4" office:value-type="string" calcext:value-type="string">
            <text:p>2025-07-29T19:12:09Z</text:p>
          </table:table-cell>
          <table:table-cell table:style-name="ce4"/>
          <table:table-cell table:style-name="ce1" office:value-type="string" calcext:value-type="string">
            <text:p>unfoldingWord-dev/tn_add_scripture_link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9T15:52:11Z</text:p>
          </table:table-cell>
          <table:table-cell table:style-name="ce1" office:value-type="string" calcext:value-type="string">
            <text:p>2024-04-19T15:51:24Z</text:p>
          </table:table-cell>
          <table:table-cell table:style-name="ce4"/>
          <table:table-cell table:number-columns-repeated="2" table:style-name="ce4" office:value-type="float" office:value="13" calcext:value-type="float">
            <text:p>13</text:p>
          </table:table-cell>
          <table:table-cell table:style-name="ce1" office:value-type="string" calcext:value-type="string">
            <text:p>git@git.door43.org:unfoldingWord-dev/tx-dev-dcs.git</text:p>
          </table:table-cell>
          <table:table-cell table:style-name="ce1" table:number-columns-repeated="7"/>
          <table:table-cell table:style-name="ce1" office:value-type="string" calcext:value-type="string">
            <text:p>['richmahn', 'lversaw', 'Jesse A. Griffin', 'Richard Mahn', 'root', 'phillip-hopper', 'RobH123', 'alerque', 'Phil Hopper', 'jag3773', 'Jesse Griffin', 'Tim', 'Distant Shores Media', 'PhotoNomad0', 'dboerschlein', 'Door43', 'Gogs', 'da1nerd', 'PurpleGuitar', 'Apache Production', 'bspidel', 'superdav42', 'Apache', 'Ricahrd Mahn', 'Rich Mahn',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ools" xlink:type="simple">https://github.com/unfoldingWord-dev/tools</text:a></text:p>
          </table:table-cell>
          <table:table-cell table:style-name="ce4" office:value-type="string" calcext:value-type="string">
            <text:p>2026-03-15T03:14:48Z</text:p>
          </table:table-cell>
          <table:table-cell table:style-name="ce4"/>
          <table:table-cell table:style-name="ce1" office:value-type="string" calcext:value-type="string">
            <text:p>unfoldingWord-dev/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requiremen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6-24T21:33:04Z</text:p>
          </table:table-cell>
          <table:table-cell table:style-name="ce1" office:value-type="string" calcext:value-type="string">
            <text:p>2015-06-24T21:33:02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Jesse A. Griffin',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requirements" xlink:type="simple">https://github.com/unfoldingWord-dev/tr-requirements</text:a></text:p>
          </table:table-cell>
          <table:table-cell table:style-name="ce4" office:value-type="string" calcext:value-type="string">
            <text:p>2015-06-24T21:29:18Z</text:p>
          </table:table-cell>
          <table:table-cell table:style-name="ce4"/>
          <table:table-cell table:style-name="ce1" office:value-type="string" calcext:value-type="string">
            <text:p>unfoldingWord-dev/tr-requiremen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helps-print-preview</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20T21:25:08Z</text:p>
          </table:table-cell>
          <table:table-cell table:style-name="ce1" office:value-type="string" calcext:value-type="string">
            <text:p>2022-06-20T21:25:06Z</text:p>
          </table:table-cell>
          <table:table-cell table:style-name="ce4"/>
          <table:table-cell table:style-name="ce4" office:value-type="float" office:value="7" calcext:value-type="float">
            <text:p>7</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klappy', 'abelpz', 'richmahn', 'bircham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helps-print-preview" xlink:type="simple">https://github.com/unfoldingWord-box3/translation-helps-print-preview</text:a></text:p>
          </table:table-cell>
          <table:table-cell table:style-name="ce4" office:value-type="string" calcext:value-type="string">
            <text:p>2022-06-17T15:46:05Z</text:p>
          </table:table-cell>
          <table:table-cell table:style-name="ce4"/>
          <table:table-cell table:style-name="ce1" office:value-type="string" calcext:value-type="string">
            <text:p>unfoldingWord-box3/translation-helps-print-preview</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3T19:05:56Z</text:p>
          </table:table-cell>
          <table:table-cell table:style-name="ce4" office:value-type="string" calcext:value-type="string">
            <text:p>2026-01-12T14:46:30Z</text:p>
          </table:table-cell>
          <table:table-cell table:style-name="ce4" office:value-type="float" office:value="642" calcext:value-type="float">
            <text:p>642</text:p>
          </table:table-cell>
          <table:table-cell table:style-name="ce4" office:value-type="float" office:value="13" calcext:value-type="float">
            <text:p>13</text:p>
          </table:table-cell>
          <table:table-cell table:style-name="ce1" office:value-type="string" calcext:value-type="string">
            <text:p>['https://github.com/unfoldingWord/translationWords.git', 'https://github.com/unfoldingWord/wordAlignment.git', 'https://github.com/unfoldingWord/translationNotes.git']</text:p>
          </table:table-cell>
          <table:table-cell table:style-name="ce1" office:value-type="string" calcext:value-type="string">
            <text:p>translationCore</text:p>
          </table:table-cell>
          <table:table-cell table:style-name="ce1" table:number-columns-repeated="4"/>
          <table:table-cell table:style-name="ce1" office:value-type="string" calcext:value-type="string">
            <text:p>['bible-reference-range', 'checking-tool-wrapper', 'gogs-client', 'selections', 'string-punctuation-tokenizer', 'tc-source-content-updater', 'tc-strings', 'tc-tool', 'tc-ui-toolkit', 'tsv-groupdata-parser', 'usfm-js', 'word-aligner', 'wordmap', 'wordmap-lexer', 'electronite']</text:p>
          </table:table-cell>
          <table:table-cell table:style-name="ce1"/>
          <table:table-cell table:style-name="ce1" office:value-type="string" calcext:value-type="string">
            <text:p>['mannycolon', 'PhotoNomad0', 'da1nerd', 'RoyalSix', 'ihoegen', 'klappy', 'translationCore Updater', 'richmahn', 'Bruce McLean 1', 'Sterling (Jay) Scott', 'EllDoubleYew', 'therealsamf', 'bspidel', 'cdwhitfield73', 'lancelebanoff', 'EvanWiederspan', 'loganlebanoff', 'Gfuen', 'Richard Mahn', 'translationCore User', 'blm', 'Luke Wilson', 'Jay Scott', 'NateRuiz', 'dependabot-support', 'vleong2332', 'jag3773', 'birchamp', 'dependabot[bot]', 'yakob-aleksandrovich']</text:p>
          </table:table-cell>
          <table:table-cell table:style-name="ce1" office:value-type="float" office:value="89" calcext:value-type="float">
            <text:p>89</text:p>
          </table:table-cell>
          <table:table-cell table:style-name="ce1" office:value-type="float" office:value="13586" calcext:value-type="float">
            <text:p>13586</text:p>
          </table:table-cell>
          <table:table-cell table:style-name="ce5" office:value-type="string" calcext:value-type="string">
            <text:p><text:a xlink:href="https://github.com/unfoldingWord/translationCore" xlink:type="simple">https://github.com/unfoldingWord/translationCore</text:a></text:p>
          </table:table-cell>
          <table:table-cell table:style-name="ce4" office:value-type="string" calcext:value-type="string">
            <text:p>2026-06-13T19:06:00Z</text:p>
          </table:table-cell>
          <table:table-cell table:style-name="ce4"/>
          <table:table-cell table:style-name="ce1" office:value-type="string" calcext:value-type="string">
            <text:p>unfoldingWord/translationCore</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ranslationNote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12:38Z</text:p>
          </table:table-cell>
          <table:table-cell table:style-name="ce4"/>
          <table:table-cell table:style-name="ce4" office:value-type="float" office:value="16" calcext:value-type="float">
            <text:p>16</text:p>
          </table:table-cell>
          <table:table-cell table:style-name="ce4" office:value-type="float" office:value="15" calcext:value-type="float">
            <text:p>15</text:p>
          </table:table-cell>
          <table:table-cell table:style-name="ce1"/>
          <table:table-cell table:style-name="ce1" office:value-type="string" calcext:value-type="string">
            <text:p>translationNotes</text:p>
          </table:table-cell>
          <table:table-cell table:style-name="ce1" table:number-columns-repeated="4"/>
          <table:table-cell table:style-name="ce1" office:value-type="string" calcext:value-type="string">
            <text:p>['checking-tool-wrapper', 'tc-tool']</text:p>
          </table:table-cell>
          <table:table-cell table:style-name="ce1"/>
          <table:table-cell table:style-name="ce1" office:value-type="string" calcext:value-type="string">
            <text:p>['mannycolon', 'da1nerd', 'ihoegen', 'RoyalSix', 'PhotoNomad0', 'klappy', 'cdwhitfield73', 'Sterling (Jay) Scott', 'EllDoubleYew', 'dependabot[bot]', 'ImgBotApp', 'jag3773',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ranslationNotes" xlink:type="simple">https://github.com/unfoldingWord/translationNotes</text:a></text:p>
          </table:table-cell>
          <table:table-cell table:style-name="ce4" office:value-type="string" calcext:value-type="string">
            <text:p>2026-06-12T12:12:56Z</text:p>
          </table:table-cell>
          <table:table-cell table:style-name="ce4" office:value-type="string" calcext:value-type="string">
            <text:p>unfoldingWord/translationNotes</text:p>
          </table:table-cell>
          <table:table-cell table:style-name="ce1" office:value-type="string" calcext:value-type="string">
            <text:p>unfoldingWord/translationNotes</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Note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15T16:29:39Z</text:p>
          </table:table-cell>
          <table:table-cell table:style-name="ce1" office:value-type="string" calcext:value-type="string">
            <text:p>2016-08-15T16:29:3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Notes" xlink:type="simple">https://github.com/unfoldingWord-dev/translationNotes</text:a></text:p>
          </table:table-cell>
          <table:table-cell table:style-name="ce4" office:value-type="string" calcext:value-type="string">
            <text:p>2016-08-15T16:29:38Z</text:p>
          </table:table-cell>
          <table:table-cell table:style-name="ce4"/>
          <table:table-cell table:style-name="ce1" office:value-type="string" calcext:value-type="string">
            <text:p>unfoldingWord-dev/translationNote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Recorder-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37:00Z</text:p>
          </table:table-cell>
          <table:table-cell table:style-name="ce4" office:value-type="string" calcext:value-type="string">
            <text:p>2017-05-10T20:33:49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hrisJarka', 'yakob-aleksandrovich', 'jag3773']</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ev/translationRecorder-Info" xlink:type="simple">https://github.com/unfoldingWord-dev/translationRecorder-Info</text:a></text:p>
          </table:table-cell>
          <table:table-cell table:style-name="ce4" office:value-type="string" calcext:value-type="string">
            <text:p>2025-10-09T10:37:04Z</text:p>
          </table:table-cell>
          <table:table-cell table:style-name="ce4"/>
          <table:table-cell table:style-name="ce1" office:value-type="string" calcext:value-type="string">
            <text:p>unfoldingWord-dev/translationRecorder-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Studio-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40: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gamer78', 'ChrisJarka', 'yakob-aleksandrovich',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Studio-Info" xlink:type="simple">https://github.com/unfoldingWord-dev/translationStudio-Info</text:a></text:p>
          </table:table-cell>
          <table:table-cell table:style-name="ce4" office:value-type="string" calcext:value-type="string">
            <text:p>2025-10-09T10:40:07Z</text:p>
          </table:table-cell>
          <table:table-cell table:style-name="ce4"/>
          <table:table-cell table:style-name="ce1" office:value-type="string" calcext:value-type="string">
            <text:p>unfoldingWord-dev/translationStudio-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translationWord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11:06Z</text:p>
          </table:table-cell>
          <table:table-cell table:style-name="ce4" office:value-type="string" calcext:value-type="string">
            <text:p>2019-02-06T21:36:33Z</text:p>
          </table:table-cell>
          <table:table-cell table:style-name="ce4" office:value-type="float" office:value="17" calcext:value-type="float">
            <text:p>17</text:p>
          </table:table-cell>
          <table:table-cell table:style-name="ce4" office:value-type="float" office:value="16" calcext:value-type="float">
            <text:p>16</text:p>
          </table:table-cell>
          <table:table-cell table:style-name="ce1"/>
          <table:table-cell table:style-name="ce1" office:value-type="string" calcext:value-type="string">
            <text:p>translationWords</text:p>
          </table:table-cell>
          <table:table-cell table:style-name="ce1" table:number-columns-repeated="4"/>
          <table:table-cell table:style-name="ce1" office:value-type="string" calcext:value-type="string">
            <text:p>['checking-tool-wrapper', 'tc-tool']</text:p>
          </table:table-cell>
          <table:table-cell table:style-name="ce1"/>
          <table:table-cell table:style-name="ce1" office:value-type="string" calcext:value-type="string">
            <text:p>['mannycolon', 'da1nerd', 'RoyalSix', 'PhotoNomad0', 'ihoegen', 'klappy', 'Sterling (Jay) Scott', 'cdwhitfield73', 'richmahn', 'Richard Mahn', 'dependabot-support', 'EllDoubleYew', 'dependabot[bot]', 'bspidel', 'ImgBotApp', 'jag3773']</text:p>
          </table:table-cell>
          <table:table-cell table:style-name="ce1" office:value-type="float" office:value="5" calcext:value-type="float">
            <text:p>5</text:p>
          </table:table-cell>
          <table:table-cell table:style-name="ce1" office:value-type="float" office:value="0" calcext:value-type="float">
            <text:p>0</text:p>
          </table:table-cell>
          <table:table-cell table:style-name="ce5" office:value-type="string" calcext:value-type="string">
            <text:p><text:a xlink:href="https://github.com/unfoldingWord/translationWords" xlink:type="simple">https://github.com/unfoldingWord/translationWords</text:a></text:p>
          </table:table-cell>
          <table:table-cell table:style-name="ce4" office:value-type="string" calcext:value-type="string">
            <text:p>2026-06-12T12:11:14Z</text:p>
          </table:table-cell>
          <table:table-cell table:style-name="ce4" office:value-type="string" calcext:value-type="string">
            <text:p>unfoldingWord/translationWords</text:p>
          </table:table-cell>
          <table:table-cell table:style-name="ce1" office:value-type="string" calcext:value-type="string">
            <text:p>unfoldingWord/translationWords</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Words-tC</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15T19:12:57Z</text:p>
          </table:table-cell>
          <table:table-cell table:style-name="ce1" office:value-type="string" calcext:value-type="string">
            <text:p>2016-08-15T16:26:1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Words-tC" xlink:type="simple">https://github.com/unfoldingWord-dev/translationWords-tC</text:a></text:p>
          </table:table-cell>
          <table:table-cell table:style-name="ce4" office:value-type="string" calcext:value-type="string">
            <text:p>2016-08-15T16:26:26Z</text:p>
          </table:table-cell>
          <table:table-cell table:style-name="ce4"/>
          <table:table-cell table:style-name="ce1" office:value-type="string" calcext:value-type="string">
            <text:p>unfoldingWord-dev/translationWords-t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s-androi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07-26T16:17:42Z</text:p>
          </table:table-cell>
          <table:table-cell table:style-name="ce1" office:value-type="string" calcext:value-type="string">
            <text:p>2019-07-26T16:15:31Z</text:p>
          </table:table-cell>
          <table:table-cell table:style-name="ce4" office:value-type="string" calcext:value-type="string">
            <text:p>2019-07-29T13:45:34Z</text:p>
          </table:table-cell>
          <table:table-cell table:style-name="ce4" office:value-type="float" office:value="651" calcext:value-type="float">
            <text:p>65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 'PhotoNomad0', 'jshuma', 'andreradroid', 'jag3773', 'HannaJaicks', 'benjore', 'mondele', 'sea-liesch']</text:p>
          </table:table-cell>
          <table:table-cell table:style-name="ce1" office:value-type="float" office:value="61" calcext:value-type="float">
            <text:p>61</text:p>
          </table:table-cell>
          <table:table-cell table:style-name="ce1" office:value-type="float" office:value="2302" calcext:value-type="float">
            <text:p>2302</text:p>
          </table:table-cell>
          <table:table-cell table:style-name="ce5" office:value-type="string" calcext:value-type="string">
            <text:p><text:a xlink:href="https://github.com/unfoldingWord-dev/ts-android" xlink:type="simple">https://github.com/unfoldingWord-dev/ts-android</text:a></text:p>
          </table:table-cell>
          <table:table-cell table:style-name="ce4" office:value-type="string" calcext:value-type="string">
            <text:p>2026-04-22T14:45:07Z</text:p>
          </table:table-cell>
          <table:table-cell table:style-name="ce4"/>
          <table:table-cell table:style-name="ce1" office:value-type="string" calcext:value-type="string">
            <text:p>unfoldingWord-dev/ts-android</text:p>
          </table:table-cell>
          <table:table-cell table:style-name="ce4" office:value-type="string" calcext:value-type="string">
            <text:p>1-Manual review</text:p>
          </table:table-cell>
          <table:table-cell table:style-name="ce1" office:value-type="string" calcext:value-type="string">
            <text:p>Repository has at least 50 open issues (651 open issue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s-desktop</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17T00:09:31Z</text:p>
          </table:table-cell>
          <table:table-cell table:style-name="ce1" office:value-type="string" calcext:value-type="string">
            <text:p>2019-11-11T14:08:52Z</text:p>
          </table:table-cell>
          <table:table-cell table:style-name="ce4" office:value-type="string" calcext:value-type="string">
            <text:p>2019-11-11T14:16:17Z</text:p>
          </table:table-cell>
          <table:table-cell table:style-name="ce4" office:value-type="float" office:value="182" calcext:value-type="float">
            <text:p>182</text:p>
          </table:table-cell>
          <table:table-cell table:style-name="ce4" office:value-type="float" office:value="11" calcext:value-type="float">
            <text:p>11</text:p>
          </table:table-cell>
          <table:table-cell table:style-name="ce1" table:number-columns-repeated="8"/>
          <table:table-cell table:style-name="ce1" office:value-type="string" calcext:value-type="string">
            <text:p>['cdwhitfield73', 'da1nerd', 'Thomas Klemz', 'vleong2332', 'Travis CI', 'kbuildsyourdotcom', 'EmmittJ', 'Delmar Hager', 'jag3773', 'a-gundy', 'jeremymlane', 'dhager7', 'soccerhand', 'Travis-CI']</text:p>
          </table:table-cell>
          <table:table-cell table:style-name="ce1" office:value-type="float" office:value="29" calcext:value-type="float">
            <text:p>29</text:p>
          </table:table-cell>
          <table:table-cell table:style-name="ce1" office:value-type="float" office:value="14397" calcext:value-type="float">
            <text:p>14397</text:p>
          </table:table-cell>
          <table:table-cell table:style-name="ce5" office:value-type="string" calcext:value-type="string">
            <text:p><text:a xlink:href="https://github.com/unfoldingWord-dev/ts-desktop" xlink:type="simple">https://github.com/unfoldingWord-dev/ts-desktop</text:a></text:p>
          </table:table-cell>
          <table:table-cell table:style-name="ce4" office:value-type="string" calcext:value-type="string">
            <text:p>2026-04-22T14:46:49Z</text:p>
          </table:table-cell>
          <table:table-cell table:style-name="ce4"/>
          <table:table-cell table:style-name="ce1" office:value-type="string" calcext:value-type="string">
            <text:p>unfoldingWord-dev/ts-desktop</text:p>
          </table:table-cell>
          <table:table-cell table:style-name="ce4" office:value-type="string" calcext:value-type="string">
            <text:p>1-Manual review</text:p>
          </table:table-cell>
          <table:table-cell table:style-name="ce1" office:value-type="string" calcext:value-type="string">
            <text:p>Repository has at least 50 open issues (182 open issue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s-export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4-06-13T20:29:55Z</text:p>
          </table:table-cell>
          <table:table-cell table:style-name="ce1" office:value-type="string" calcext:value-type="string">
            <text:p>2014-06-13T20:29:4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s-exports" xlink:type="simple">https://github.com/unfoldingWord-dev/ts-exports</text:a></text:p>
          </table:table-cell>
          <table:table-cell table:style-name="ce4" office:value-type="string" calcext:value-type="string">
            <text:p>2015-06-23T21:38:46Z</text:p>
          </table:table-cell>
          <table:table-cell table:style-name="ce4"/>
          <table:table-cell table:style-name="ce1" office:value-type="string" calcext:value-type="string">
            <text:p>unfoldingWord-dev/ts-expor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s-requirements</text:p>
          </table:table-cell>
          <table:table-cell table:style-name="ce1" office:value-type="string" calcext:value-type="string">
            <text:p>unfoldingWord-dev</text:p>
          </table:table-cell>
          <table:table-cell table:style-name="ce1" office:value-type="string" calcext:value-type="string">
            <text:p>Cucumber</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6-03-25T20:23:25Z</text:p>
          </table:table-cell>
          <table:table-cell table:style-name="ce4"/>
          <table:table-cell table:style-name="ce4" office:value-type="float" office:value="131" calcext:value-type="float">
            <text:p>13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 'RRohrsse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s-requirements" xlink:type="simple">https://github.com/unfoldingWord-dev/ts-requirements</text:a></text:p>
          </table:table-cell>
          <table:table-cell table:style-name="ce4" office:value-type="string" calcext:value-type="string">
            <text:p>2016-12-07T22:47:45Z</text:p>
          </table:table-cell>
          <table:table-cell table:style-name="ce4"/>
          <table:table-cell table:style-name="ce1" office:value-type="string" calcext:value-type="string">
            <text:p>unfoldingWord-dev/ts-requirements</text:p>
          </table:table-cell>
          <table:table-cell table:style-name="ce4" office:value-type="string" calcext:value-type="string">
            <text:p>1-Manual review</text:p>
          </table:table-cell>
          <table:table-cell table:style-name="ce1" office:value-type="string" calcext:value-type="string">
            <text:p>Repository has at least 50 open issues (131 open issue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s-stat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8-10T11:28:50Z</text:p>
          </table:table-cell>
          <table:table-cell table:style-name="ce1" office:value-type="string" calcext:value-type="string">
            <text:p>2021-08-10T11:28: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s-stats" xlink:type="simple">https://github.com/unfoldingWord-dev/ts-stats</text:a></text:p>
          </table:table-cell>
          <table:table-cell table:style-name="ce4" office:value-type="string" calcext:value-type="string">
            <text:p>2021-08-10T11:28:53Z</text:p>
          </table:table-cell>
          <table:table-cell table:style-name="ce4"/>
          <table:table-cell table:style-name="ce1" office:value-type="string" calcext:value-type="string">
            <text:p>unfoldingWord-dev/ts-stat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w_consistency</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8-22T12:10:23Z</text:p>
          </table:table-cell>
          <table:table-cell table:style-name="ce1" office:value-type="string" calcext:value-type="string">
            <text:p>2017-08-22T12:10:1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w_consistency" xlink:type="simple">https://github.com/unfoldingWord-dev/tw_consistency</text:a></text:p>
          </table:table-cell>
          <table:table-cell table:style-name="ce4" office:value-type="string" calcext:value-type="string">
            <text:p>2017-06-16T19:00:44Z</text:p>
          </table:table-cell>
          <table:table-cell table:style-name="ce4"/>
          <table:table-cell table:style-name="ce1" office:value-type="string" calcext:value-type="string">
            <text:p>unfoldingWord-dev/tw_consistency</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win-ahk</text:p>
          </table:table-cell>
          <table:table-cell table:style-name="ce1" office:value-type="string" calcext:value-type="string">
            <text:p>unfoldingWord-box3</text:p>
          </table:table-cell>
          <table:table-cell table:style-name="ce1" office:value-type="string" calcext:value-type="string">
            <text:p>AutoHotkey</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5-21T01:35:5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win-ahk" xlink:type="simple">https://github.com/unfoldingWord-box3/twin-ahk</text:a></text:p>
          </table:table-cell>
          <table:table-cell table:style-name="ce4" office:value-type="string" calcext:value-type="string">
            <text:p>2024-05-21T01:35:54Z</text:p>
          </table:table-cell>
          <table:table-cell table:style-name="ce4"/>
          <table:table-cell table:style-name="ce1" office:value-type="string" calcext:value-type="string">
            <text:p>unfoldingWord-box3/twin-ahk</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0:49:3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yakob-aleksandrovich',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 xlink:type="simple">https://github.com/unfoldingWord-dev/tx</text:a></text:p>
          </table:table-cell>
          <table:table-cell table:style-name="ce4" office:value-type="string" calcext:value-type="string">
            <text:p>2025-10-09T10:49:37Z</text:p>
          </table:table-cell>
          <table:table-cell table:style-name="ce4"/>
          <table:table-cell table:style-name="ce1" office:value-type="string" calcext:value-type="string">
            <text:p>unfoldingWord-dev/tx</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dev</text:p>
          </table:table-cell>
          <table:table-cell table:style-name="ce1" office:value-type="string" calcext:value-type="string">
            <text:p>unfoldingWord</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18T23:02:42Z</text:p>
          </table:table-cell>
          <table:table-cell table:style-name="ce1" office:value-type="string" calcext:value-type="string">
            <text:p>2023-10-18T23:02:39Z</text:p>
          </table:table-cell>
          <table:table-cell table:style-name="ce4"/>
          <table:table-cell table:number-columns-repeated="2" table:style-name="ce4" office:value-type="float" office:value="0" calcext:value-type="float">
            <text:p>0</text:p>
          </table:table-cell>
          <table:table-cell table:style-name="ce1" office:value-type="string" calcext:value-type="string">
            <text:p>['git@github.com:unfoldingword-dev/door43-enqueue-job.git', 'git@github.com:unfoldingword-dev/door43-job-handler.git', 'git@github.com:unfoldingword-dev/tx-enqueue-job.git', 'git@github.com:unfoldingword-dev/tx-job-handler.git', 'git@github.com:unfoldingWord-dev/tx-dev-dcs.git', 'git@github.com:unfoldingword-dev/door43.org.git', 'git@github.com:unfoldingword-dev/tx-pdf.git', 'git@github.com:unfoldingword-dev/tx-pdf-job-handler.git']</text:p>
          </table:table-cell>
          <table:table-cell table:style-name="ce1" table:number-columns-repeated="7"/>
          <table:table-cell table:style-name="ce1" office:value-type="string" calcext:value-type="string">
            <text:p>['richmahn',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x-dev" xlink:type="simple">https://github.com/unfoldingWord/tx-dev</text:a></text:p>
          </table:table-cell>
          <table:table-cell table:style-name="ce4" office:value-type="string" calcext:value-type="string">
            <text:p>2022-12-12T05:15:44Z</text:p>
          </table:table-cell>
          <table:table-cell table:style-name="ce4"/>
          <table:table-cell table:style-name="ce1" office:value-type="string" calcext:value-type="string">
            <text:p>unfoldingWord/tx-dev</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dev-dc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2-09T21:13:08Z</text:p>
          </table:table-cell>
          <table:table-cell table:style-name="ce1" office:value-type="string" calcext:value-type="string">
            <text:p>2021-08-25T20:47:0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x-dev-dcs" xlink:type="simple">https://github.com/unfoldingWord/tx-dev-dcs</text:a></text:p>
          </table:table-cell>
          <table:table-cell table:style-name="ce4" office:value-type="string" calcext:value-type="string">
            <text:p>2022-10-05T18:56:57Z</text:p>
          </table:table-cell>
          <table:table-cell table:style-name="ce4"/>
          <table:table-cell table:style-name="ce1" office:value-type="string" calcext:value-type="string">
            <text:p>unfoldingWord/tx-dev-dcs</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dev-door43</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7-12T22:01:02Z</text:p>
          </table:table-cell>
          <table:table-cell table:style-name="ce1" office:value-type="string" calcext:value-type="string">
            <text:p>2021-07-12T21:58:4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dev-door43" xlink:type="simple">https://github.com/unfoldingWord-dev/tx-dev-door43</text:a></text:p>
          </table:table-cell>
          <table:table-cell table:style-name="ce4" office:value-type="string" calcext:value-type="string">
            <text:p>2021-07-12T21:58:43Z</text:p>
          </table:table-cell>
          <table:table-cell table:style-name="ce4"/>
          <table:table-cell table:style-name="ce1" office:value-type="string" calcext:value-type="string">
            <text:p>unfoldingWord-dev/tx-dev-door43</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door43</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6T12:06:34Z</text:p>
          </table:table-cell>
          <table:table-cell table:style-name="ce1" office:value-type="string" calcext:value-type="string">
            <text:p>2016-12-20T05:51:2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richmahn', 'Gog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door43" xlink:type="simple">https://github.com/unfoldingWord-dev/tx-door43</text:a></text:p>
          </table:table-cell>
          <table:table-cell table:style-name="ce4" office:value-type="string" calcext:value-type="string">
            <text:p>2026-03-15T03:15:10Z</text:p>
          </table:table-cell>
          <table:table-cell table:style-name="ce4"/>
          <table:table-cell table:style-name="ce1" office:value-type="string" calcext:value-type="string">
            <text:p>unfoldingWord-dev/tx-door43</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enqueue-jo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7T01:28:53Z</text:p>
          </table:table-cell>
          <table:table-cell table:style-name="ce1" office:value-type="string" calcext:value-type="string">
            <text:p>2024-01-25T16:47:13Z</text:p>
          </table:table-cell>
          <table:table-cell table:style-name="ce4" office:value-type="string" calcext:value-type="string">
            <text:p>2024-01-25T16:51:03Z</text:p>
          </table:table-cell>
          <table:table-cell table:number-columns-repeated="2" table:style-name="ce4" office:value-type="float" office:value="2" calcext:value-type="float">
            <text:p>2</text:p>
          </table:table-cell>
          <table:table-cell table:style-name="ce1" table:number-columns-repeated="8"/>
          <table:table-cell table:style-name="ce1" office:value-type="string" calcext:value-type="string">
            <text:p>['RobH123', 'richmahn', 'jag3773', 'yakob-aleksandrovich']</text:p>
          </table:table-cell>
          <table:table-cell table:style-name="ce1" office:value-type="float" office:value="20" calcext:value-type="float">
            <text:p>20</text:p>
          </table:table-cell>
          <table:table-cell table:style-name="ce1" office:value-type="float" office:value="0" calcext:value-type="float">
            <text:p>0</text:p>
          </table:table-cell>
          <table:table-cell table:style-name="ce5" office:value-type="string" calcext:value-type="string">
            <text:p><text:a xlink:href="https://github.com/unfoldingWord/tx-enqueue-job" xlink:type="simple">https://github.com/unfoldingWord/tx-enqueue-job</text:a></text:p>
          </table:table-cell>
          <table:table-cell table:style-name="ce4" office:value-type="string" calcext:value-type="string">
            <text:p>2024-02-06T15:23:21Z</text:p>
          </table:table-cell>
          <table:table-cell table:style-name="ce4"/>
          <table:table-cell table:style-name="ce1" office:value-type="string" calcext:value-type="string">
            <text:p>unfoldingWord/tx-enqueue-job</text:p>
          </table:table-cell>
          <table:table-cell table:style-name="ce4" office:value-type="string" calcext:value-type="string">
            <text:p>1-Manual review</text:p>
          </table:table-cell>
          <table:table-cell table:style-name="ce1" office:value-type="string" calcext:value-type="string">
            <text:p>Repository has significant release history or GitHub downloads (20 releases,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html2pdf</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20T05:32:39Z</text:p>
          </table:table-cell>
          <table:table-cell table:style-name="ce1" office:value-type="string" calcext:value-type="string">
            <text:p>2016-12-20T05:32: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Gogs',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html2pdf" xlink:type="simple">https://github.com/unfoldingWord-dev/tx-html2pdf</text:a></text:p>
          </table:table-cell>
          <table:table-cell table:style-name="ce4" office:value-type="string" calcext:value-type="string">
            <text:p>2016-12-19T14:55:26Z</text:p>
          </table:table-cell>
          <table:table-cell table:style-name="ce4"/>
          <table:table-cell table:style-name="ce1" office:value-type="string" calcext:value-type="string">
            <text:p>unfoldingWord-dev/tx-html2pdf</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job-handler</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4-06-21T20:22:59Z</text:p>
          </table:table-cell>
          <table:table-cell table:style-name="ce4" office:value-type="string" calcext:value-type="string">
            <text:p>2024-01-23T20:41:06Z</text:p>
          </table:table-cell>
          <table:table-cell table:number-columns-repeated="2" table:style-name="ce4" office:value-type="float" office:value="4" calcext:value-type="float">
            <text:p>4</text:p>
          </table:table-cell>
          <table:table-cell table:style-name="ce1" table:number-columns-repeated="8"/>
          <table:table-cell table:style-name="ce1" office:value-type="string" calcext:value-type="string">
            <text:p>['RobH123', 'richmahn', 'dependabot[bot]', 'jag3773']</text:p>
          </table:table-cell>
          <table:table-cell table:style-name="ce1" office:value-type="float" office:value="40" calcext:value-type="float">
            <text:p>40</text:p>
          </table:table-cell>
          <table:table-cell table:style-name="ce1" office:value-type="float" office:value="0" calcext:value-type="float">
            <text:p>0</text:p>
          </table:table-cell>
          <table:table-cell table:style-name="ce5" office:value-type="string" calcext:value-type="string">
            <text:p><text:a xlink:href="https://github.com/unfoldingWord/tx-job-handler" xlink:type="simple">https://github.com/unfoldingWord/tx-job-handler</text:a></text:p>
          </table:table-cell>
          <table:table-cell table:style-name="ce4" office:value-type="string" calcext:value-type="string">
            <text:p>2024-06-21T20:23:02Z</text:p>
          </table:table-cell>
          <table:table-cell table:style-name="ce4"/>
          <table:table-cell table:style-name="ce1" office:value-type="string" calcext:value-type="string">
            <text:p>unfoldingWord/tx-job-handl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md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2-05T00:42:08Z</text:p>
          </table:table-cell>
          <table:table-cell table:style-name="ce1" office:value-type="string" calcext:value-type="string">
            <text:p>2017-01-18T18:02:4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richmahn', 'Phil Hopper', 'phillip-hopper', 'Gogs']</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ev/tx-md2html" xlink:type="simple">https://github.com/unfoldingWord-dev/tx-md2html</text:a></text:p>
          </table:table-cell>
          <table:table-cell table:style-name="ce4" office:value-type="string" calcext:value-type="string">
            <text:p>2016-12-19T15:03:41Z</text:p>
          </table:table-cell>
          <table:table-cell table:style-name="ce4"/>
          <table:table-cell table:style-name="ce1" office:value-type="string" calcext:value-type="string">
            <text:p>unfoldingWord-dev/tx-md2htm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redis-poc</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0-20T13:53:17Z</text:p>
          </table:table-cell>
          <table:table-cell table:style-name="ce1" office:value-type="string" calcext:value-type="string">
            <text:p>2023-10-20T13:53:1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x-redis-poc" xlink:type="simple">https://github.com/unfoldingWord-box3/tx-redis-poc</text:a></text:p>
          </table:table-cell>
          <table:table-cell table:style-name="ce4" office:value-type="string" calcext:value-type="string">
            <text:p>2023-10-12T20:54:09Z</text:p>
          </table:table-cell>
          <table:table-cell table:style-name="ce4"/>
          <table:table-cell table:style-name="ce1" office:value-type="string" calcext:value-type="string">
            <text:p>unfoldingWord-box3/tx-redis-poc</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sample-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20T05:54:47Z</text:p>
          </table:table-cell>
          <table:table-cell table:style-name="ce1" office:value-type="string" calcext:value-type="string">
            <text:p>2016-12-20T05:54:3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Gog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sample-client" xlink:type="simple">https://github.com/unfoldingWord-dev/tx-sample-client</text:a></text:p>
          </table:table-cell>
          <table:table-cell table:style-name="ce4" office:value-type="string" calcext:value-type="string">
            <text:p>2016-12-19T15:14:47Z</text:p>
          </table:table-cell>
          <table:table-cell table:style-name="ce4"/>
          <table:table-cell table:style-name="ce1" office:value-type="string" calcext:value-type="string">
            <text:p>unfoldingWord-dev/tx-sample-clien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shared-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1-18T14:19:33Z</text:p>
          </table:table-cell>
          <table:table-cell table:style-name="ce1" office:value-type="string" calcext:value-type="string">
            <text:p>2017-01-18T14:19:2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richmahn', 'ethantkoenig', 'Phil Hopper', 'Gogs', 'bspidel',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shared-tools" xlink:type="simple">https://github.com/unfoldingWord-dev/tx-shared-tools</text:a></text:p>
          </table:table-cell>
          <table:table-cell table:style-name="ce4" office:value-type="string" calcext:value-type="string">
            <text:p>2016-09-06T13:14:39Z</text:p>
          </table:table-cell>
          <table:table-cell table:style-name="ce4"/>
          <table:table-cell table:style-name="ce1" office:value-type="string" calcext:value-type="string">
            <text:p>unfoldingWord-dev/tx-shared-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usfm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9-23T01:36:55Z</text:p>
          </table:table-cell>
          <table:table-cell table:style-name="ce1" office:value-type="string" calcext:value-type="string">
            <text:p>2016-09-23T01:36:5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ethantkoenig',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usfm2html" xlink:type="simple">https://github.com/unfoldingWord-dev/tx-usfm2html</text:a></text:p>
          </table:table-cell>
          <table:table-cell table:style-name="ce4" office:value-type="string" calcext:value-type="string">
            <text:p>2019-02-19T12:45:43Z</text:p>
          </table:table-cell>
          <table:table-cell table:style-name="ce4"/>
          <table:table-cell table:style-name="ce1" office:value-type="string" calcext:value-type="string">
            <text:p>unfoldingWord-dev/tx-usfm2htm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webhook</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9-06T19:14:09Z</text:p>
          </table:table-cell>
          <table:table-cell table:style-name="ce1" office:value-type="string" calcext:value-type="string">
            <text:p>2016-09-06T19:13: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Test', 'richmahn', 'Richard Mahn', 'bspidel',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webhook" xlink:type="simple">https://github.com/unfoldingWord-dev/tx-webhook</text:a></text:p>
          </table:table-cell>
          <table:table-cell table:style-name="ce4" office:value-type="string" calcext:value-type="string">
            <text:p>2016-08-08T20:49:12Z</text:p>
          </table:table-cell>
          <table:table-cell table:style-name="ce4"/>
          <table:table-cell table:style-name="ce1" office:value-type="string" calcext:value-type="string">
            <text:p>unfoldingWord-dev/tx-webhook</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webhook-client</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1-18T18:00:19Z</text:p>
          </table:table-cell>
          <table:table-cell table:style-name="ce1" office:value-type="string" calcext:value-type="string">
            <text:p>2017-01-18T18:00:1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ard Mahn', 'richmahn', 'Gogs', 'Phil Hopper',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webhook-client" xlink:type="simple">https://github.com/unfoldingWord-dev/tx-webhook-client</text:a></text:p>
          </table:table-cell>
          <table:table-cell table:style-name="ce4" office:value-type="string" calcext:value-type="string">
            <text:p>2016-09-22T16:25:43Z</text:p>
          </table:table-cell>
          <table:table-cell table:style-name="ce4"/>
          <table:table-cell table:style-name="ce1" office:value-type="string" calcext:value-type="string">
            <text:p>unfoldingWord-dev/tx-webhook-clien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gnt-app</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12-12T16:32:12Z</text:p>
          </table:table-cell>
          <table:table-cell table:style-name="ce1" office:value-type="string" calcext:value-type="string">
            <text:p>2016-12-12T16:30:59Z</text:p>
          </table:table-cell>
          <table:table-cell table:style-name="ce4"/>
          <table:table-cell table:style-name="ce4" office:value-type="float" office:value="5" calcext:value-type="float">
            <text:p>5</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gnt-app" xlink:type="simple">https://github.com/unfoldingWord-dev/ugnt-app</text:a></text:p>
          </table:table-cell>
          <table:table-cell table:style-name="ce4" office:value-type="string" calcext:value-type="string">
            <text:p>2016-12-12T16:32:16Z</text:p>
          </table:table-cell>
          <table:table-cell table:style-name="ce4"/>
          <table:table-cell table:style-name="ce1" office:value-type="string" calcext:value-type="string">
            <text:p>unfoldingWord-dev/ugnt-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number-columns-repeated="2"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9-10-16T20:09:03Z</text:p>
          </table:table-cell>
          <table:table-cell table:style-name="ce1" office:value-type="string" calcext:value-type="string">
            <text:p>2019-10-16T20:09: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nfoldingWord" xlink:type="simple">https://github.com/unfoldingWord/unfoldingWord</text:a></text:p>
          </table:table-cell>
          <table:table-cell table:style-name="ce4" office:value-type="string" calcext:value-type="string">
            <text:p>2025-10-02T14:13:18Z</text:p>
          </table:table-cell>
          <table:table-cell table:style-name="ce4"/>
          <table:table-cell table:style-name="ce1" office:value-type="string" calcext:value-type="string">
            <text:p>unfoldingWord/unfoldingWord</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nlocked-Bible-Commentary-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03: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hrisJarka', 'yakob-aleksandrovich',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nlocked-Bible-Commentary-Info" xlink:type="simple">https://github.com/unfoldingWord-dev/Unlocked-Bible-Commentary-Info</text:a></text:p>
          </table:table-cell>
          <table:table-cell table:style-name="ce4" office:value-type="string" calcext:value-type="string">
            <text:p>2025-12-09T15:21:29Z</text:p>
          </table:table-cell>
          <table:table-cell table:style-name="ce4"/>
          <table:table-cell table:style-name="ce1" office:value-type="string" calcext:value-type="string">
            <text:p>unfoldingWord-dev/Unlocked-Bible-Commentary-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nlocked-Bible-Notes-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07:5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hrisJarka', 'jag3773', 'yakob-aleksandrovich', 'russp41']</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nlocked-Bible-Notes-Info" xlink:type="simple">https://github.com/unfoldingWord-dev/Unlocked-Bible-Notes-Info</text:a></text:p>
          </table:table-cell>
          <table:table-cell table:style-name="ce4" office:value-type="string" calcext:value-type="string">
            <text:p>2025-12-09T15:21:13Z</text:p>
          </table:table-cell>
          <table:table-cell table:style-name="ce4"/>
          <table:table-cell table:style-name="ce1" office:value-type="string" calcext:value-type="string">
            <text:p>unfoldingWord-dev/Unlocked-Bible-Notes-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nlocked-Grammar-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10:3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presson', 'pjoakes', 'jag3773',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nlocked-Grammar-Info" xlink:type="simple">https://github.com/unfoldingWord-dev/Unlocked-Grammar-Info</text:a></text:p>
          </table:table-cell>
          <table:table-cell table:style-name="ce4" office:value-type="string" calcext:value-type="string">
            <text:p>2025-10-09T11:10:42Z</text:p>
          </table:table-cell>
          <table:table-cell table:style-name="ce4"/>
          <table:table-cell table:style-name="ce1" office:value-type="string" calcext:value-type="string">
            <text:p>unfoldingWord-dev/Unlocked-Grammar-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nlocked-Greek-Lexicon-Info</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0-09T11:26:5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estatez', 'cpresson', 'yakob-aleksandrovich', 'toddlprice',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nlocked-Greek-Lexicon-Info" xlink:type="simple">https://github.com/unfoldingWord-dev/Unlocked-Greek-Lexicon-Info</text:a></text:p>
          </table:table-cell>
          <table:table-cell table:style-name="ce4" office:value-type="string" calcext:value-type="string">
            <text:p>2025-10-09T11:26:58Z</text:p>
          </table:table-cell>
          <table:table-cell table:style-name="ce4"/>
          <table:table-cell table:style-name="ce1" office:value-type="string" calcext:value-type="string">
            <text:p>unfoldingWord-dev/Unlocked-Greek-Lexicon-Info</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SFM-Uti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1-14T22:01:10Z</text:p>
          </table:table-cell>
          <table:table-cell table:style-name="ce1" office:value-type="string" calcext:value-type="string">
            <text:p>2016-10-04T01:35:53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ethantkoenig',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SFM-Utils" xlink:type="simple">https://github.com/unfoldingWord-dev/USFM-Utils</text:a></text:p>
          </table:table-cell>
          <table:table-cell table:style-name="ce4" office:value-type="string" calcext:value-type="string">
            <text:p>2026-02-23T14:45:47Z</text:p>
          </table:table-cell>
          <table:table-cell table:style-name="ce4"/>
          <table:table-cell table:style-name="ce1" office:value-type="string" calcext:value-type="string">
            <text:p>unfoldingWord-dev/USFM-Uti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androi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8T15:14:35Z</text:p>
          </table:table-cell>
          <table:table-cell table:style-name="ce1" office:value-type="string" calcext:value-type="string">
            <text:p>2018-06-08T15:12:32Z</text:p>
          </table:table-cell>
          <table:table-cell table:style-name="ce4" office:value-type="string" calcext:value-type="string">
            <text:p>2018-06-08T15:14:36Z</text:p>
          </table:table-cell>
          <table:table-cell table:style-name="ce4" office:value-type="float" office:value="18" calcext:value-type="float">
            <text:p>18</text:p>
          </table:table-cell>
          <table:table-cell table:style-name="ce4" office:value-type="float" office:value="1" calcext:value-type="float">
            <text:p>1</text:p>
          </table:table-cell>
          <table:table-cell table:style-name="ce1" table:number-columns-repeated="8"/>
          <table:table-cell table:style-name="ce1" office:value-type="string" calcext:value-type="string">
            <text:p>['GottaGetSwifty', 'bknatterud', 'jag3773']</text:p>
          </table:table-cell>
          <table:table-cell table:style-name="ce1" office:value-type="float" office:value="44" calcext:value-type="float">
            <text:p>44</text:p>
          </table:table-cell>
          <table:table-cell table:style-name="ce1" office:value-type="float" office:value="2302" calcext:value-type="float">
            <text:p>2302</text:p>
          </table:table-cell>
          <table:table-cell table:style-name="ce5" office:value-type="string" calcext:value-type="string">
            <text:p><text:a xlink:href="https://github.com/unfoldingWord-dev/uw-android" xlink:type="simple">https://github.com/unfoldingWord-dev/uw-android</text:a></text:p>
          </table:table-cell>
          <table:table-cell table:style-name="ce4" office:value-type="string" calcext:value-type="string">
            <text:p>2025-10-02T14:11:55Z</text:p>
          </table:table-cell>
          <table:table-cell table:style-name="ce4"/>
          <table:table-cell table:style-name="ce1" office:value-type="string" calcext:value-type="string">
            <text:p>unfoldingWord-dev/uw-android</text:p>
          </table:table-cell>
          <table:table-cell table:style-name="ce4" office:value-type="string" calcext:value-type="string">
            <text:p>1-Manual review</text:p>
          </table:table-cell>
          <table:table-cell table:style-name="ce1" office:value-type="string" calcext:value-type="string">
            <text:p>Repository has significant release history or GitHub downloads (44 releases, 2302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api</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7-24T12:47:59Z</text:p>
          </table:table-cell>
          <table:table-cell table:style-name="ce1" office:value-type="string" calcext:value-type="string">
            <text:p>2017-07-24T12:47:2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api" xlink:type="simple">https://github.com/unfoldingWord-dev/uw-api</text:a></text:p>
          </table:table-cell>
          <table:table-cell table:style-name="ce4" office:value-type="string" calcext:value-type="string">
            <text:p>2016-11-02T15:00:23Z</text:p>
          </table:table-cell>
          <table:table-cell table:style-name="ce4"/>
          <table:table-cell table:style-name="ce1" office:value-type="string" calcext:value-type="string">
            <text:p>unfoldingWord-dev/uw-api</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data-tools</text:p>
          </table:table-cell>
          <table:table-cell table:style-name="ce1" office:value-type="string" calcext:value-type="string">
            <text:p>unfoldingWord-box3</text:p>
          </table:table-cell>
          <table:table-cell table:style-name="ce1" office:value-type="string" calcext:value-type="string">
            <text:p>Jupyter Notebook</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1-30T10:14:35Z</text:p>
          </table:table-cell>
          <table:table-cell table:style-name="ce1" office:value-type="string" calcext:value-type="string">
            <text:p>2021-11-30T10:14:1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dejood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uw-data-tools" xlink:type="simple">https://github.com/unfoldingWord-box3/uw-data-tools</text:a></text:p>
          </table:table-cell>
          <table:table-cell table:style-name="ce4" office:value-type="string" calcext:value-type="string">
            <text:p>2021-11-30T10:14:38Z</text:p>
          </table:table-cell>
          <table:table-cell table:style-name="ce4"/>
          <table:table-cell table:style-name="ce1" office:value-type="string" calcext:value-type="string">
            <text:p>unfoldingWord-box3/uw-data-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ios</text:p>
          </table:table-cell>
          <table:table-cell table:style-name="ce1" office:value-type="string" calcext:value-type="string">
            <text:p>unfoldingWord-dev</text:p>
          </table:table-cell>
          <table:table-cell table:style-name="ce1" office:value-type="string" calcext:value-type="string">
            <text:p>C</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7-08T15:45:27Z</text:p>
          </table:table-cell>
          <table:table-cell table:style-name="ce1" office:value-type="string" calcext:value-type="string">
            <text:p>2022-07-08T15:45:17Z</text:p>
          </table:table-cell>
          <table:table-cell table:style-name="ce4" office:value-type="string" calcext:value-type="string">
            <text:p>2014-12-30T20:42:03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vid Solberg', 'bknatterud', 'dwsolberg', 'jag3773']</text:p>
          </table:table-cell>
          <table:table-cell table:style-name="ce1" office:value-type="float" office:value="3" calcext:value-type="float">
            <text:p>3</text:p>
          </table:table-cell>
          <table:table-cell table:style-name="ce1" office:value-type="float" office:value="20" calcext:value-type="float">
            <text:p>20</text:p>
          </table:table-cell>
          <table:table-cell table:style-name="ce5" office:value-type="string" calcext:value-type="string">
            <text:p><text:a xlink:href="https://github.com/unfoldingWord-dev/uw-ios" xlink:type="simple">https://github.com/unfoldingWord-dev/uw-ios</text:a></text:p>
          </table:table-cell>
          <table:table-cell table:style-name="ce4" office:value-type="string" calcext:value-type="string">
            <text:p>2025-10-02T14:12:49Z</text:p>
          </table:table-cell>
          <table:table-cell table:style-name="ce4"/>
          <table:table-cell table:style-name="ce1" office:value-type="string" calcext:value-type="string">
            <text:p>unfoldingWord-dev/uw-io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mobile-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15-03-09T22:15:5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never2ice', 'jag3773', 'timjor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mobile-app" xlink:type="simple">https://github.com/unfoldingWord-dev/uW-mobile-app</text:a></text:p>
          </table:table-cell>
          <table:table-cell table:style-name="ce4" office:value-type="string" calcext:value-type="string">
            <text:p>2016-09-26T09:51:13Z</text:p>
          </table:table-cell>
          <table:table-cell table:style-name="ce4"/>
          <table:table-cell table:style-name="ce1" office:value-type="string" calcext:value-type="string">
            <text:p>unfoldingWord-dev/uW-mobile-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pdf-conversion-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3-05T13:06:26Z</text:p>
          </table:table-cell>
          <table:table-cell table:style-name="ce1" office:value-type="string" calcext:value-type="string">
            <text:p>2021-06-03T20:21:45Z</text:p>
          </table:table-cell>
          <table:table-cell table:style-name="ce4"/>
          <table:table-cell table:number-columns-repeated="2" table:style-name="ce4" office:value-type="float" office:value="4" calcext:value-type="float">
            <text:p>4</text:p>
          </table:table-cell>
          <table:table-cell table:style-name="ce1" table:number-columns-repeated="8"/>
          <table:table-cell table:style-name="ce1" office:value-type="string" calcext:value-type="string">
            <text:p>['richmahn', 'Richard 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pdf-conversion-tools" xlink:type="simple">https://github.com/unfoldingWord-dev/uw-pdf-conversion-tools</text:a></text:p>
          </table:table-cell>
          <table:table-cell table:style-name="ce4" office:value-type="string" calcext:value-type="string">
            <text:p>2021-06-03T20:21:52Z</text:p>
          </table:table-cell>
          <table:table-cell table:style-name="ce4"/>
          <table:table-cell table:style-name="ce1" office:value-type="string" calcext:value-type="string">
            <text:p>unfoldingWord-dev/uw-pdf-conversion-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publish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8-29T05:28:04Z</text:p>
          </table:table-cell>
          <table:table-cell table:style-name="ce1" office:value-type="string" calcext:value-type="string">
            <text:p>2015-08-29T05:28: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1nerd', 'codemi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publisher" xlink:type="simple">https://github.com/unfoldingWord-dev/uw-publisher</text:a></text:p>
          </table:table-cell>
          <table:table-cell table:style-name="ce4" office:value-type="string" calcext:value-type="string">
            <text:p>2016-08-30T09:37:59Z</text:p>
          </table:table-cell>
          <table:table-cell table:style-name="ce4"/>
          <table:table-cell table:style-name="ce1" office:value-type="string" calcext:value-type="string">
            <text:p>unfoldingWord-dev/uw-publisher</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Tools-Collab</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09-12T15:52:4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abelpz', 'bircham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Tools-Collab" xlink:type="simple">https://github.com/unfoldingWord/uW-Tools-Collab</text:a></text:p>
          </table:table-cell>
          <table:table-cell table:style-name="ce4" office:value-type="string" calcext:value-type="string">
            <text:p>2025-09-12T15:52:50Z</text:p>
          </table:table-cell>
          <table:table-cell table:style-name="ce4"/>
          <table:table-cell table:style-name="ce1" office:value-type="string" calcext:value-type="string">
            <text:p>unfoldingWord/uW-Tools-Collab</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website-resource-version-update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4T22:06:05Z</text:p>
          </table:table-cell>
          <table:table-cell table:style-name="ce1" office:value-type="string" calcext:value-type="string">
            <text:p>2025-06-04T22:06: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website-resource-version-updater" xlink:type="simple">https://github.com/unfoldingWord/uw-website-resource-version-updater</text:a></text:p>
          </table:table-cell>
          <table:table-cell table:style-name="ce4" office:value-type="string" calcext:value-type="string">
            <text:p>2025-06-04T22:06:08Z</text:p>
          </table:table-cell>
          <table:table-cell table:style-name="ce4"/>
          <table:table-cell table:style-name="ce1" office:value-type="string" calcext:value-type="string">
            <text:p>unfoldingWord/uw-website-resource-version-updater</text:p>
          </table:table-cell>
          <table:table-cell table:style-name="ce4" office:value-type="string" calcext:value-type="string">
            <text:p>1-Manual review</text:p>
          </table:table-cell>
          <table:table-cell table:style-name="ce1" office:value-type="string" calcext:value-type="string">
            <text:p>Repository name contains a core project term.</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_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6-04T01:18:15Z</text:p>
          </table:table-cell>
          <table:table-cell table:style-name="ce1" office:value-type="string" calcext:value-type="string">
            <text:p>2017-01-06T18:38: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 'Richard Mahn',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_tools" xlink:type="simple">https://github.com/unfoldingWord-dev/uw_tools</text:a></text:p>
          </table:table-cell>
          <table:table-cell table:style-name="ce4" office:value-type="string" calcext:value-type="string">
            <text:p>2016-11-02T15:14:26Z</text:p>
          </table:table-cell>
          <table:table-cell table:style-name="ce4"/>
          <table:table-cell table:style-name="ce1" office:value-type="string" calcext:value-type="string">
            <text:p>unfoldingWord-dev/uw_tools</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viewer-app-cordova</text:p>
          </table:table-cell>
          <table:table-cell table:style-name="ce1" office:value-type="string" calcext:value-type="string">
            <text:p>unfoldingWord-box3</text:p>
          </table:table-cell>
          <table:table-cell table:style-name="ce1" office:value-type="string" calcext:value-type="string">
            <text:p>Objective-C</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2-11-09T09:01:3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klappy', 'yakob-aleksandrovich']</text:p>
          </table:table-cell>
          <table:table-cell table:style-name="ce1" office:value-type="float" office:value="1" calcext:value-type="float">
            <text:p>1</text:p>
          </table:table-cell>
          <table:table-cell table:style-name="ce1" office:value-type="float" office:value="21" calcext:value-type="float">
            <text:p>21</text:p>
          </table:table-cell>
          <table:table-cell table:style-name="ce5" office:value-type="string" calcext:value-type="string">
            <text:p><text:a xlink:href="https://github.com/unfoldingWord-box3/viewer-app-cordova" xlink:type="simple">https://github.com/unfoldingWord-box3/viewer-app-cordova</text:a></text:p>
          </table:table-cell>
          <table:table-cell table:style-name="ce4" office:value-type="string" calcext:value-type="string">
            <text:p>2022-11-09T09:01:40Z</text:p>
          </table:table-cell>
          <table:table-cell table:style-name="ce4"/>
          <table:table-cell table:style-name="ce1" office:value-type="string" calcext:value-type="string">
            <text:p>unfoldingWord-box3/viewer-app-cordova</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wordAlignme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12T12:09:25Z</text:p>
          </table:table-cell>
          <table:table-cell table:style-name="ce4" office:value-type="string" calcext:value-type="string">
            <text:p>2019-02-06T21:37:06Z</text:p>
          </table:table-cell>
          <table:table-cell table:style-name="ce4" office:value-type="float" office:value="15" calcext:value-type="float">
            <text:p>15</text:p>
          </table:table-cell>
          <table:table-cell table:style-name="ce4" office:value-type="float" office:value="13" calcext:value-type="float">
            <text:p>13</text:p>
          </table:table-cell>
          <table:table-cell table:style-name="ce1"/>
          <table:table-cell table:style-name="ce1" office:value-type="string" calcext:value-type="string">
            <text:p>wordAlignment</text:p>
          </table:table-cell>
          <table:table-cell table:style-name="ce1" table:number-columns-repeated="4"/>
          <table:table-cell table:style-name="ce1" office:value-type="string" calcext:value-type="string">
            <text:p>['gogs-client', 'selections', 'tc-tool', 'tc-ui-toolkit', 'usfm-js', 'word-aligner', 'wordmap', 'wordmap-lexer']</text:p>
          </table:table-cell>
          <table:table-cell table:style-name="ce1"/>
          <table:table-cell table:style-name="ce1" office:value-type="string" calcext:value-type="string">
            <text:p>['da1nerd', 'mannycolon', 'PhotoNomad0', 'RoyalSix', 'richmahn', 'klappy', 'dependabot-support', 'Sterling (Jay) Scott', 'Richard Mahn', 'bspidel', 'ImgBotApp']</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wordAlignment" xlink:type="simple">https://github.com/unfoldingWord/wordAlignment</text:a></text:p>
          </table:table-cell>
          <table:table-cell table:style-name="ce4" office:value-type="string" calcext:value-type="string">
            <text:p>2026-06-12T12:09:39Z</text:p>
          </table:table-cell>
          <table:table-cell table:style-name="ce4" office:value-type="string" calcext:value-type="string">
            <text:p>unfoldingWord/wordAlignment</text:p>
          </table:table-cell>
          <table:table-cell table:style-name="ce1" office:value-type="string" calcext:value-type="string">
            <text:p>unfoldingWord/wordAlignment</text:p>
          </table:table-cell>
          <table:table-cell table:style-name="ce4" office:value-type="string" calcext:value-type="string">
            <text:p>1-Manual review</text:p>
          </table:table-cell>
          <table:table-cell table:style-name="ce1" office:value-type="string" calcext:value-type="string">
            <text:p>Repository is used as a git submodule by another repository.</text:p>
          </table:table-cell>
          <table:table-cell table:style-name="ce4" office:value-type="string" calcext:value-type="string">
            <text:p>Deprecate npm package candidate</text:p>
          </table:table-cell>
          <table:table-cell table:style-name="ce1" office:value-type="string" calcext:value-type="string">
            <text:p>Published package has no detected local consumers, no GitHub dependents, and no npm download activity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ordmap-react-toolki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7T10:58:07Z</text:p>
          </table:table-cell>
          <table:table-cell table:style-name="ce1" office:value-type="string" calcext:value-type="string">
            <text:p>2019-11-07T08:12:31Z</text:p>
          </table:table-cell>
          <table:table-cell table:style-name="ce4"/>
          <table:table-cell table:number-columns-repeated="2" table:style-name="ce4" office:value-type="float" office:value="25" calcext:value-type="float">
            <text:p>25</text:p>
          </table:table-cell>
          <table:table-cell table:style-name="ce1"/>
          <table:table-cell table:style-name="ce1" office:value-type="string" calcext:value-type="string">
            <text:p>wordmap-react-toolkit</text:p>
          </table:table-cell>
          <table:table-cell table:style-name="ce1" table:formula="of:=FALSE()" office:value-type="float" office:value="0" calcext:value-type="float">
            <text:p>0</text:p>
          </table:table-cell>
          <table:table-cell table:style-name="ce1" office:value-type="float" office:value="225" calcext:value-type="float">
            <text:p>225</text:p>
          </table:table-cell>
          <table:table-cell table:style-name="ce1" office:value-type="string" calcext:value-type="string">
            <text:p>2019-11-07T08:13:01.981Z</text:p>
          </table:table-cell>
          <table:table-cell table:style-name="ce1"/>
          <table:table-cell table:style-name="ce1" office:value-type="string" calcext:value-type="string">
            <text:p>['wordmap', 'wordmap-lexer']</text:p>
          </table:table-cell>
          <table:table-cell table:style-name="ce1"/>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wordmap-react-toolkit" xlink:type="simple">https://github.com/unfoldingWord-box3/wordmap-react-toolkit</text:a></text:p>
          </table:table-cell>
          <table:table-cell table:style-name="ce4" office:value-type="string" calcext:value-type="string">
            <text:p>2022-06-17T15:47:04Z</text:p>
          </table:table-cell>
          <table:table-cell table:style-name="ce4"/>
          <table:table-cell table:style-name="ce1" office:value-type="string" calcext:value-type="string">
            <text:p>unfoldingWord-box3/wordmap-react-toolkit</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225 downloads in the last year) and no detected local consumer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ordmap-seed-app</text:p>
          </table:table-cell>
          <table:table-cell table:style-name="ce1" office:value-type="string" calcext:value-type="string">
            <text:p>unfoldingWord-box3</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2-23T22:52:06Z</text:p>
          </table:table-cell>
          <table:table-cell table:style-name="ce1" office:value-type="string" calcext:value-type="string">
            <text:p>2023-02-23T22:52: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dejoode', 'klappy', 'themikejr',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wordmap-seed-app" xlink:type="simple">https://github.com/unfoldingWord-box3/wordmap-seed-app</text:a></text:p>
          </table:table-cell>
          <table:table-cell table:style-name="ce4" office:value-type="string" calcext:value-type="string">
            <text:p>2023-02-23T22:52:12Z</text:p>
          </table:table-cell>
          <table:table-cell table:style-name="ce4"/>
          <table:table-cell table:style-name="ce1" office:value-type="string" calcext:value-type="string">
            <text:p>unfoldingWord-box3/wordmap-seed-app</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world-language-map-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0-13T01:07:52Z</text:p>
          </table:table-cell>
          <table:table-cell table:style-name="ce1" office:value-type="string" calcext:value-type="string">
            <text:p>2024-10-13T01:07:5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ld-language-map-rcl</text:p>
          </table:table-cell>
          <table:table-cell table:style-name="ce1" table:formula="of:=FALSE()" office:value-type="float" office:value="0" calcext:value-type="float">
            <text:p>0</text:p>
          </table:table-cell>
          <table:table-cell table:style-name="ce1" office:value-type="float" office:value="116" calcext:value-type="float">
            <text:p>116</text:p>
          </table:table-cell>
          <table:table-cell table:style-name="ce1" office:value-type="string" calcext:value-type="string">
            <text:p>2024-10-13T01:08:01.943Z</text:p>
          </table:table-cell>
          <table:table-cell table:style-name="ce1" table:number-columns-repeated="3"/>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ld-language-map-rcl" xlink:type="simple">https://github.com/unfoldingWord/world-language-map-rcl</text:a></text:p>
          </table:table-cell>
          <table:table-cell table:style-name="ce4" office:value-type="string" calcext:value-type="string">
            <text:p>2024-10-13T01:07:56Z</text:p>
          </table:table-cell>
          <table:table-cell table:style-name="ce4"/>
          <table:table-cell table:style-name="ce1" office:value-type="string" calcext:value-type="string">
            <text:p>unfoldingWord/world-language-map-rcl</text:p>
          </table:table-cell>
          <table:table-cell table:style-name="ce4" office:value-type="string" calcext:value-type="string">
            <text:p>1-Manual review</text:p>
          </table:table-cell>
          <table:table-cell table:style-name="ce1" office:value-type="string" calcext:value-type="string">
            <text:p>Repository did not match any automatic classification rule.</text:p>
          </table:table-cell>
          <table:table-cell table:style-name="ce4" office:value-type="string" calcext:value-type="string">
            <text:p>Manual review - npm package</text:p>
          </table:table-cell>
          <table:table-cell table:style-name="ce1" office:value-type="string" calcext:value-type="string">
            <text:p>Package has low but nonzero npm usage (116 downloads in the last year) and no detected local consumers.</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dmin-app-old</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3-10T14:23:06Z</text:p>
          </table:table-cell>
          <table:table-cell table:style-name="ce1" office:value-type="string" calcext:value-type="string">
            <text:p>2021-03-09T18:47:3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create-app</text:p>
          </table:table-cell>
          <table:table-cell table:style-name="ce1" table:number-columns-repeated="4"/>
          <table:table-cell table:style-name="ce1" office:value-type="string" calcext:value-type="string">
            <text:p>['bible-reference-rcl', 'gitea-react-toolkit', 'markdown-translatable', 'resource-workspace-rcl', 'scripture-resources-rcl', 'single-scripture-rcl', 'translation-helps-rcl']</text:p>
          </table:table-cell>
          <table:table-cell table:style-name="ce1" office:value-type="string" calcext:value-type="string">
            <text:p>unfoldingWord/gateway-edit</text:p>
          </table:table-cell>
          <table:table-cell table:style-name="ce1" office:value-type="string" calcext:value-type="string">
            <text:p>['mannycolon', 'PhotoNomad0',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dmin-app-old" xlink:type="simple">https://github.com/unfoldingWord-box3/admin-app-old</text:a></text:p>
          </table:table-cell>
          <table:table-cell table:style-name="ce4" office:value-type="string" calcext:value-type="string">
            <text:p>2021-03-10T14:25:09Z</text:p>
          </table:table-cell>
          <table:table-cell table:style-name="ce4"/>
          <table:table-cell table:style-name="ce1" office:value-type="string" calcext:value-type="string">
            <text:p>unfoldingWord-box3/admin-app-old</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lignment-ml</text:p>
          </table:table-cell>
          <table:table-cell table:style-name="ce1" office:value-type="string" calcext:value-type="string">
            <text:p>unfoldingWord-box3</text:p>
          </table:table-cell>
          <table:table-cell table:style-name="ce1" office:value-type="string" calcext:value-type="string">
            <text:p>Jupyter Notebook</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1-08T22:57:49Z</text:p>
          </table:table-cell>
          <table:table-cell table:style-name="ce1" office:value-type="string" calcext:value-type="string">
            <text:p>2021-01-08T22:57:38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hotoNomad0/alignment-ml</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lignment-ml" xlink:type="simple">https://github.com/unfoldingWord-box3/alignment-ml</text:a></text:p>
          </table:table-cell>
          <table:table-cell table:style-name="ce4" office:value-type="string" calcext:value-type="string">
            <text:p>2021-01-08T22:57:52Z</text:p>
          </table:table-cell>
          <table:table-cell table:style-name="ce4"/>
          <table:table-cell table:style-name="ce1" office:value-type="string" calcext:value-type="string">
            <text:p>unfoldingWord-box3/alignment-ml</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alignment-playground</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2-10T18:39:36Z</text:p>
          </table:table-cell>
          <table:table-cell table:style-name="ce1" office:value-type="string" calcext:value-type="string">
            <text:p>2023-01-30T14:47:2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alignment-playground</text:p>
          </table:table-cell>
          <table:table-cell table:style-name="ce1" table:number-columns-repeated="4"/>
          <table:table-cell table:style-name="ce1" office:value-type="string" calcext:value-type="string">
            <text:p>['bible-reference-range', 'tc-ui-toolkit', 'usfm-js', 'word-aligner', 'wordmap-lexer']</text:p>
          </table:table-cell>
          <table:table-cell table:style-name="ce1" office:value-type="string" calcext:value-type="string">
            <text:p>PhotoNomad0/alignment-playground</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lignment-playground" xlink:type="simple">https://github.com/unfoldingWord-box3/alignment-playground</text:a></text:p>
          </table:table-cell>
          <table:table-cell table:style-name="ce4" office:value-type="string" calcext:value-type="string">
            <text:p>2023-01-30T13:00:02Z</text:p>
          </table:table-cell>
          <table:table-cell table:style-name="ce4"/>
          <table:table-cell table:style-name="ce1" office:value-type="string" calcext:value-type="string">
            <text:p>unfoldingWord-box3/alignment-playground</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alignment-transferer</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06-17T13:49:01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alignment-transferer" xlink:type="simple">https://github.com/unfoldingWord-dev/alignment-transferer</text:a></text:p>
          </table:table-cell>
          <table:table-cell table:style-name="ce4" office:value-type="string" calcext:value-type="string">
            <text:p>2025-06-17T18:57:53Z</text:p>
          </table:table-cell>
          <table:table-cell table:style-name="ce4"/>
          <table:table-cell table:style-name="ce1" office:value-type="string" calcext:value-type="string">
            <text:p>unfoldingWord-dev/alignment-transfer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bible-ref-pk-demo</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2-11-10T17:40:23Z</text:p>
          </table:table-cell>
          <table:table-cell table:style-name="ce1" office:value-type="string" calcext:value-type="string">
            <text:p>2022-11-10T17:40:19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mandolyte/bible-ref-pk-demo</text:p>
          </table:table-cell>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bible-ref-pk-demo" xlink:type="simple">https://github.com/unfoldingWord-box3/bible-ref-pk-demo</text:a></text:p>
          </table:table-cell>
          <table:table-cell table:style-name="ce4" office:value-type="string" calcext:value-type="string">
            <text:p>2022-04-09T14:05:23Z</text:p>
          </table:table-cell>
          <table:table-cell table:style-name="ce4"/>
          <table:table-cell table:style-name="ce1" office:value-type="string" calcext:value-type="string">
            <text:p>unfoldingWord-box3/bible-ref-pk-demo</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table-cell table:style-name="ce4" office:value-type="string" calcext:value-type="string">
            <text:p>x</text:p>
          </table:table-cell>
          <table:table-cell table:style-name="ce1" office:value-type="string" calcext:value-type="string">
            <text:p>bt-servant-telegram-gateway</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03T18:25:41Z</text:p>
          </table:table-cell>
          <table:table-cell table:style-name="ce1" office:value-type="string" calcext:value-type="string">
            <text:p>2026-06-03T18:25:34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bt-servant-telegram-gateway</text:p>
          </table:table-cell>
          <table:table-cell table:style-name="ce1" table:number-columns-repeated="5"/>
          <table:table-cell table:style-name="ce1" office:value-type="string" calcext:value-type="string">
            <text:p>DenisArger/bt-servant-telegram-gateway</text:p>
          </table:table-cell>
          <table:table-cell table:style-name="ce1" office:value-type="string" calcext:value-type="string">
            <text:p>['DenisArger', 'IanLindsley', 'claude', 'ILindsle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t-servant-telegram-gateway" xlink:type="simple">https://github.com/unfoldingWord/bt-servant-telegram-gateway</text:a></text:p>
          </table:table-cell>
          <table:table-cell table:style-name="ce4" office:value-type="string" calcext:value-type="string">
            <text:p>2026-06-03T18:25:59Z</text:p>
          </table:table-cell>
          <table:table-cell table:style-name="ce4"/>
          <table:table-cell table:style-name="ce1" office:value-type="string" calcext:value-type="string">
            <text:p>unfoldingWord/bt-servant-telegram-gatewa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checking-extension</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10-16T15:12:47Z</text:p>
          </table:table-cell>
          <table:table-cell table:style-name="ce4"/>
          <table:table-cell table:number-columns-repeated="2" table:style-name="ce4" office:value-type="float" office:value="2" calcext:value-type="float">
            <text:p>2</text:p>
          </table:table-cell>
          <table:table-cell table:style-name="ce1"/>
          <table:table-cell table:style-name="ce1" office:value-type="string" calcext:value-type="string">
            <text:p>checking-extension</text:p>
          </table:table-cell>
          <table:table-cell table:style-name="ce1" table:number-columns-repeated="4"/>
          <table:table-cell table:style-name="ce1" office:value-type="string" calcext:value-type="string">
            <text:p>['bible-reference-range', 'string-punctuation-tokenizer', 'tc-source-content-updater', 'tsv-groupdata-parser', 'usfm-js', 'uw-tsv-parser']</text:p>
          </table:table-cell>
          <table:table-cell table:style-name="ce1" office:value-type="string" calcext:value-type="string">
            <text:p>kintsoogi/translation-notes-extension</text:p>
          </table:table-cell>
          <table:table-cell table:style-name="ce1" office:value-type="string" calcext:value-type="string">
            <text:p>['PhotoNomad0', 'kintsoogi']</text:p>
          </table:table-cell>
          <table:table-cell table:style-name="ce1" office:value-type="float" office:value="4" calcext:value-type="float">
            <text:p>4</text:p>
          </table:table-cell>
          <table:table-cell table:style-name="ce1" office:value-type="float" office:value="66" calcext:value-type="float">
            <text:p>66</text:p>
          </table:table-cell>
          <table:table-cell table:style-name="ce5" office:value-type="string" calcext:value-type="string">
            <text:p><text:a xlink:href="https://github.com/unfoldingWord-box3/checking-extension" xlink:type="simple">https://github.com/unfoldingWord-box3/checking-extension</text:a></text:p>
          </table:table-cell>
          <table:table-cell table:style-name="ce4" office:value-type="string" calcext:value-type="string">
            <text:p>2025-10-16T15:12:53Z</text:p>
          </table:table-cell>
          <table:table-cell table:style-name="ce4"/>
          <table:table-cell table:style-name="ce1" office:value-type="string" calcext:value-type="string">
            <text:p>unfoldingWord-box3/checking-extensi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checking-tool-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10-30T11:33:32Z</text:p>
          </table:table-cell>
          <table:table-cell table:style-name="ce1" office:value-type="string" calcext:value-type="string">
            <text:p>2025-10-20T15:57:27Z</text:p>
          </table:table-cell>
          <table:table-cell table:style-name="ce4"/>
          <table:table-cell table:style-name="ce4" office:value-type="float" office:value="15" calcext:value-type="float">
            <text:p>15</text:p>
          </table:table-cell>
          <table:table-cell table:style-name="ce4" office:value-type="float" office:value="4" calcext:value-type="float">
            <text:p>4</text:p>
          </table:table-cell>
          <table:table-cell table:style-name="ce1"/>
          <table:table-cell table:style-name="ce1" office:value-type="string" calcext:value-type="string">
            <text:p>checking-tool-rcl</text:p>
          </table:table-cell>
          <table:table-cell table:style-name="ce1" table:formula="of:=FALSE()" office:value-type="float" office:value="0" calcext:value-type="float">
            <text:p>0</text:p>
          </table:table-cell>
          <table:table-cell table:style-name="ce1" office:value-type="float" office:value="5895" calcext:value-type="float">
            <text:p>5895</text:p>
          </table:table-cell>
          <table:table-cell table:style-name="ce1" office:value-type="string" calcext:value-type="string">
            <text:p>2025-10-20T15:58:23.259Z</text:p>
          </table:table-cell>
          <table:table-cell table:style-name="ce1"/>
          <table:table-cell table:style-name="ce1" office:value-type="string" calcext:value-type="string">
            <text:p>['bible-reference-range', 'string-punctuation-tokenizer', 'tc-strings', 'usfm-js', 'uw-tsv-parser', 'word-aligner', 'word-aligner-lib', 'wordmap-lexer', 'tc-source-content-updater', 'tsv-groupdata-parser']</text:p>
          </table:table-cell>
          <table:table-cell table:style-name="ce1" office:value-type="string" calcext:value-type="string">
            <text:p>unfoldingWord/word-aligner-rcl</text:p>
          </table:table-cell>
          <table:table-cell table:style-name="ce1" office:value-type="string" calcext:value-type="string">
            <text:p>['PhotoNomad0',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hecking-tool-rcl" xlink:type="simple">https://github.com/unfoldingWord/checking-tool-rcl</text:a></text:p>
          </table:table-cell>
          <table:table-cell table:style-name="ce4" office:value-type="string" calcext:value-type="string">
            <text:p>2025-10-20T15:57:32Z</text:p>
          </table:table-cell>
          <table:table-cell table:style-name="ce4"/>
          <table:table-cell table:style-name="ce1" office:value-type="string" calcext:value-type="string">
            <text:p>unfoldingWord/checking-tool-rcl</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5895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5895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concourse-pipeline</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8-12T13:51:37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da1nerd/concourse-tasks</text:p>
          </table:table-cell>
          <table:table-cell table:style-name="ce1" office:value-type="string" calcext:value-type="string">
            <text:p>['da1nerd', 'PhotoNomad0', 'mannycolon',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concourse-pipeline" xlink:type="simple">https://github.com/unfoldingWord-dev/concourse-pipeline</text:a></text:p>
          </table:table-cell>
          <table:table-cell table:style-name="ce4" office:value-type="string" calcext:value-type="string">
            <text:p>2023-08-12T13:51:42Z</text:p>
          </table:table-cell>
          <table:table-cell table:style-name="ce4"/>
          <table:table-cell table:style-name="ce1" office:value-type="string" calcext:value-type="string">
            <text:p>unfoldingWord-dev/concourse-pipelin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cs-migrate-org-repo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5-02T18:04:55Z</text:p>
          </table:table-cell>
          <table:table-cell table:style-name="ce1" office:value-type="string" calcext:value-type="string">
            <text:p>2021-01-11T22:27:35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jaedle/mirror-to-gitea</text:p>
          </table:table-cell>
          <table:table-cell table:style-name="ce1" office:value-type="string" calcext:value-type="string">
            <text:p>['jaedle', 'Dennis Jekubczyk', 'derhuerst', 'nilp0inter', 'dependabot[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cs-migrate-org-repos" xlink:type="simple">https://github.com/unfoldingWord-dev/dcs-migrate-org-repos</text:a></text:p>
          </table:table-cell>
          <table:table-cell table:style-name="ce4" office:value-type="string" calcext:value-type="string">
            <text:p>2021-05-10T13:39:48Z</text:p>
          </table:table-cell>
          <table:table-cell table:style-name="ce4"/>
          <table:table-cell table:style-name="ce1" office:value-type="string" calcext:value-type="string">
            <text:p>unfoldingWord-dev/dcs-migrate-org-repo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cs-react-hook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6-24T00:19:28Z</text:p>
          </table:table-cell>
          <table:table-cell table:style-name="ce1" office:value-type="string" calcext:value-type="string">
            <text:p>2022-06-23T20:16:40Z</text:p>
          </table:table-cell>
          <table:table-cell table:style-name="ce4"/>
          <table:table-cell table:style-name="ce4" office:value-type="float" office:value="5" calcext:value-type="float">
            <text:p>5</text:p>
          </table:table-cell>
          <table:table-cell table:style-name="ce4" office:value-type="float" office:value="1" calcext:value-type="float">
            <text:p>1</text:p>
          </table:table-cell>
          <table:table-cell table:style-name="ce1"/>
          <table:table-cell table:style-name="ce1" office:value-type="string" calcext:value-type="string">
            <text:p>dcs-react-hooks</text:p>
          </table:table-cell>
          <table:table-cell table:style-name="ce1" table:formula="of:=FALSE()" office:value-type="float" office:value="0" calcext:value-type="float">
            <text:p>0</text:p>
          </table:table-cell>
          <table:table-cell table:style-name="ce1" office:value-type="float" office:value="178" calcext:value-type="float">
            <text:p>178</text:p>
          </table:table-cell>
          <table:table-cell table:style-name="ce1" office:value-type="string" calcext:value-type="string">
            <text:p>2022-08-19T12:33:49.976Z</text:p>
          </table:table-cell>
          <table:table-cell table:style-name="ce1"/>
          <table:table-cell table:style-name="ce1" office:value-type="string" calcext:value-type="string">
            <text:p>['dcs-js', 'uw-languages-rcl', '@unfoldingword/eslint-config']</text:p>
          </table:table-cell>
          <table:table-cell table:style-name="ce1" office:value-type="string" calcext:value-type="string">
            <text:p>['nishantshah-me/docusaurus', 'unfoldingWord/gateway-translate']</text:p>
          </table:table-cell>
          <table:table-cell table:style-name="ce1" office:value-type="string" calcext:value-type="string">
            <text:p>['abelpz',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react-hooks" xlink:type="simple">https://github.com/unfoldingWord/dcs-react-hooks</text:a></text:p>
          </table:table-cell>
          <table:table-cell table:style-name="ce4" office:value-type="string" calcext:value-type="string">
            <text:p>2022-06-17T15:48:50Z</text:p>
          </table:table-cell>
          <table:table-cell table:style-name="ce4"/>
          <table:table-cell table:style-name="ce1" office:value-type="string" calcext:value-type="string">
            <text:p>unfoldingWord/dcs-react-hook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78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78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desktop-app-template</text:p>
          </table:table-cell>
          <table:table-cell table:style-name="ce1" office:value-type="string" calcext:value-type="string">
            <text:p>unfoldingWord-box3</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10-29T20:07:04Z</text:p>
          </table:table-cell>
          <table:table-cell table:style-name="ce1" office:value-type="string" calcext:value-type="string">
            <text:p>2025-07-20T10:57:1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ankosmia/desktop-app-template</text:p>
          </table:table-cell>
          <table:table-cell table:style-name="ce1" office:value-type="string" calcext:value-type="string">
            <text:p>['RUN-Projects', 'PhotoNomad0', 'mcleanb', 'mvahow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desktop-app-template" xlink:type="simple">https://github.com/unfoldingWord-box3/desktop-app-template</text:a></text:p>
          </table:table-cell>
          <table:table-cell table:style-name="ce4" office:value-type="string" calcext:value-type="string">
            <text:p>2025-07-20T10:57:23Z</text:p>
          </table:table-cell>
          <table:table-cell table:style-name="ce4"/>
          <table:table-cell table:style-name="ce1" office:value-type="string" calcext:value-type="string">
            <text:p>unfoldingWord-box3/desktop-app-templat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dokuwiki-plugin-translation</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5-06-16T20:44:56Z</text:p>
          </table:table-cell>
          <table:table-cell table:style-name="ce1" office:value-type="string" calcext:value-type="string">
            <text:p>2015-06-16T20:44:5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splitbrain/dokuwiki-plugin-translation</text:p>
          </table:table-cell>
          <table:table-cell table:style-name="ce1" office:value-type="string" calcext:value-type="string">
            <text:p>['splitbrain', 'phillip-hopper', 'Phil Hopper', 'dom-mel', 'Dominik Eckelmann', 'araname', 'Oleksiy Zagorskyi', 'Klap-in', 'scx', 'gturri', 'Matthias Schulte', 'nfriedli', 'Paulino Michelazzo', 'brilanto', 'bobzbobz', 'Torpedo', 'Gringit', 'vbalyasnyy', 'psychopatt', 'ZDYX', 'hfl', 'ninetailz', 'oott123', 'StinkyWinky', 'Matej Urbančič', 'Markus Petersen', 'DelPoint', 'Jaroslav Lichtblau', 'sawachan', 'Gilles-Philippe Morin', 'filipesaraiva', 'dturkalj', 'Cristina Amor Alonso', 'camilosampedro', 'aneves', 'alexgearbox', 'allef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plugin-translation" xlink:type="simple">https://github.com/unfoldingWord-dev/dokuwiki-plugin-translation</text:a></text:p>
          </table:table-cell>
          <table:table-cell table:style-name="ce4" office:value-type="string" calcext:value-type="string">
            <text:p>2015-06-23T19:08:59Z</text:p>
          </table:table-cell>
          <table:table-cell table:style-name="ce4"/>
          <table:table-cell table:style-name="ce1" office:value-type="string" calcext:value-type="string">
            <text:p>unfoldingWord-dev/dokuwiki-plugin-translati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oor43-enqueue-job</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2-29T18:40:06Z</text:p>
          </table:table-cell>
          <table:table-cell table:style-name="ce1" office:value-type="string" calcext:value-type="string">
            <text:p>2024-02-29T18:39:45Z</text:p>
          </table:table-cell>
          <table:table-cell table:style-name="ce4" office:value-type="string" calcext:value-type="string">
            <text:p>2024-01-25T16:50:06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lscsoft/webhook-queue</text:p>
          </table:table-cell>
          <table:table-cell table:style-name="ce1" office:value-type="string" calcext:value-type="string">
            <text:p>['richmahn', 'RobH123', 'Robert Hunt', 'jag3773', 'tpdownes']</text:p>
          </table:table-cell>
          <table:table-cell table:style-name="ce1" office:value-type="float" office:value="24" calcext:value-type="float">
            <text:p>24</text:p>
          </table:table-cell>
          <table:table-cell table:style-name="ce1" office:value-type="float" office:value="0" calcext:value-type="float">
            <text:p>0</text:p>
          </table:table-cell>
          <table:table-cell table:style-name="ce5" office:value-type="string" calcext:value-type="string">
            <text:p><text:a xlink:href="https://github.com/unfoldingWord/door43-enqueue-job" xlink:type="simple">https://github.com/unfoldingWord/door43-enqueue-job</text:a></text:p>
          </table:table-cell>
          <table:table-cell table:style-name="ce4" office:value-type="string" calcext:value-type="string">
            <text:p>2022-10-04T15:44:46Z</text:p>
          </table:table-cell>
          <table:table-cell table:style-name="ce4"/>
          <table:table-cell table:style-name="ce1" office:value-type="string" calcext:value-type="string">
            <text:p>unfoldingWord/door43-enqueue-job</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oor43-enqueue-job-tes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4-19T13:50:56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unfoldingWord/door43-enqueue-job</text:p>
          </table:table-cell>
          <table:table-cell table:style-name="ce1" office:value-type="string" calcext:value-type="string">
            <text:p>['RobH123', 'richmahn', 'Robert Hunt', 'jag3773', 'tpdownes',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enqueue-job-test" xlink:type="simple">https://github.com/unfoldingWord/door43-enqueue-job-test</text:a></text:p>
          </table:table-cell>
          <table:table-cell table:style-name="ce4" office:value-type="string" calcext:value-type="string">
            <text:p>2023-04-19T13:51:02Z</text:p>
          </table:table-cell>
          <table:table-cell table:style-name="ce4"/>
          <table:table-cell table:style-name="ce1" office:value-type="string" calcext:value-type="string">
            <text:p>unfoldingWord/door43-enqueue-job-tes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oor43-library</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1-09T22:40:47Z</text:p>
          </table:table-cell>
          <table:table-cell table:style-name="ce1" office:value-type="string" calcext:value-type="string">
            <text:p>2023-01-09T22:40:39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unfoldingWord/obs-web</text:p>
          </table:table-cell>
          <table:table-cell table:style-name="ce1" office:value-type="string" calcext:value-type="string">
            <text:p>['richmahn', 'Phil Hopper', 'phillip-hopper', 'yakob-aleksandrovich', 'dependabot[bot]',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oor43-library" xlink:type="simple">https://github.com/unfoldingWord/door43-library</text:a></text:p>
          </table:table-cell>
          <table:table-cell table:style-name="ce4" office:value-type="string" calcext:value-type="string">
            <text:p>2023-08-08T13:52:06Z</text:p>
          </table:table-cell>
          <table:table-cell table:style-name="ce4"/>
          <table:table-cell table:style-name="ce1" office:value-type="string" calcext:value-type="string">
            <text:p>unfoldingWord/door43-librar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electronite</text:p>
          </table:table-cell>
          <table:table-cell table:style-name="ce1" office:value-type="string" calcext:value-type="string">
            <text:p>unfoldingWord</text:p>
          </table:table-cell>
          <table:table-cell table:style-name="ce1" office:value-type="string" calcext:value-type="string">
            <text:p>C++</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1-22T20:49:18Z</text:p>
          </table:table-cell>
          <table:table-cell table:style-name="ce1" office:value-type="string" calcext:value-type="string">
            <text:p>2022-12-08T15:12:19Z</text:p>
          </table:table-cell>
          <table:table-cell table:style-name="ce4" office:value-type="string" calcext:value-type="string">
            <text:p>2026-01-08T18:30:11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electron/electron</text:p>
          </table:table-cell>
          <table:table-cell table:style-name="ce6" office:value-type="string" calcext:value-type="string">
            <text:p>['zcbenz', 'kevinsawicki', 'MarshallOfSound', 'codebytere', 'nornagon', 'electron-bot', 'deepak1556', 'zeke', 'miniak', 'trop[bot]', 'sudowoodo-release-bot[bot]', 'alexeykuzmin', 'John Kleinschmidt', 'preco21', 'ckerr', 'felixrieseberg', 'aroben', 'hokein', 'anaisbetts', 'brenca', 'jlord', 'max-mapper', 'dsanders11', 'jkleinsc', 'gerhardberger', 'poiru', 'tinydew4', 'erickzhao', 'CharlieHess', 'PhotoNomad0', 'VerteDinde', 'tarruda', 'alespergl', 'seanchas116', 'vanessayuenn', 'electron-roller[bot]', 'nitsakh', 'ali.ibrahim', 'Cheng Zhao', 'juturu', 'joshaber', 'Eran Tiktin', 'Jessica Lord', 'mafintosh', 'samuelmaddock', 'sethlu', 'bbondy', 'oukan', 'runinspring', 'Micha Hanselmann', 'leethomas', 'malept', 'danhp', 'bengotow', 'roller-bot', 'sofianguy', 'dependabot[bot]', 'mlaurencin', 'alexstrat', 'Tomas Rycl', 'YurySolovyov', 'loc', '=^._.^=', 'piki', 'etiktin', 'heyunjiang', 'igorklopov', 'shiftkey', 'pfrazee', 'stevekinney', 'tonyganch', 'gabriel', 'groundwater', 'probablycorey', 'RaisinTen', 'qazbnm456', 'thomastuts', 'evgenyzinoviev', 'liusi', 'mnquintana', 'leo', 'enlight', 'shubham2892', 'bandantonio', 'lauracpierre', 'CezaryKulakowski', 'Patrick Reynolds', 'excfergodst', 'nishanths', 'testinterntest', 'Stone-Jay', 'ahmedmohamedali', 'frankhale', 'btsuda1', 'yamgent', 'Toinane', 'liusy182', 'demopark', 'ajmacd', 'fbukevin', 'rzhao271', 'Andy Dill', 'jeffreymorganio', 'jhen0409', 'jonatasfreitasv', 'Mr0grog', 'yamatoya', 'ppontes', 'John-Lin', 'fplucas', 'Michael Vasseur', 'Michelle Tilley', 'yuya-oc', 'andens', 'clavin', 'jviotti', 'thompsonemerson', 'georgexu99', 'kwonoj', 'ThePooE', 'oktapodia', 'omrilitov', 'patrickdet', 'kcrt', 'cornedor', 'mbarthelemy', 'deermichel', 'lee-dohm', 'GoooIce', 'TiagoDanin', 'rreimann', 'minggo', 'bughit', 'yashints', 'samccone', 'Paul Betts', 'mariozaizar', 'darkdh', '3v1n0', 'lukeapage', 'Kilian', 'CapOM', 'dongjoon-hyun', 'sairoutine', 'renaesop', 'mst128256', 'zeeker999', 'xyao201', 'mikeykhalil', 'davej', 'AdrienFery', 'jnugh', 'da1nerd', 'gregnolle', 'sentialx', 'mgc', 'adill', 'thypon', 'Mustafa C. Izol', 'rafaelnobrepd', 'amtj', 'ramya-rao-a', 'richard-townsend-arm', 'RnbWd', 'rogerlista', 'vially', 'ferreus', 'bundyo', 'cifratila', 'kokdemo', 'rhysd', 'mrxf', 'xaviergonz', 'CyberKatze', 'BlackHole1', 'thedaniel', 'indutny', 'hanzhao', 'Matt Karl', 'Rafael Guimarães', 'Ted Kim', 'tommoor', 'toonborgers', 'vsemozhetbyt', 'vhashimotoo', 'christoth', 'rsezille', 'xland', 'simurai', 'szTheory', '林伟强', 'robinwassen', 'Menci', 'levrik', 'joaomoreno', 'ivmirx', 'kstar0714', 'ragingwind', 'leftstick', 'Michael Köppl', 'jwheare', 'nekuz0r', 'renatoalencar', 'him2him2', 'gioggio', 'Daniel Pereira', 'Chandan Rai', 'dittos', 'the-ress', 'dale347', 'bridiver', 'bitdisaster', 'xfq', 'Wliu', 'develar', 'thomasjo', 'SeriousM', 'BobCochran', 'bcomnes', 'stewartlord', 'samueleaton', '大和屋 貴仁', 'wujingke', 'tejaspathak', 'psh0628-eng', 'scycbx', 'kirkouimet', 'haadcode', 'webpushers', 'itsananderson', 'bnb', 'Dane Springmeyer', 'danburzo', 'bsclifton', 'andersk', 'javan', 'babanesma', 'Spacetech', 'molant', 'adam-lynch', 'Lucas Pugliesi', 'magicae', 'MaxGraey', 'stevenjoezhang', 'Nirmal4G', 'rajatsingla28', 'seppestas', 'ShiningRay', 'simonecattaneo91', 'sindresorhus', 'sotayamashita', 'orderedlist', 'sbspk', 'ChALkeR', 'Simon Madine', 'Gaserd', 'Vehemos', 'rprichard', 'Rus Maxham', 'RikTheunis', 'RacioN', 'princejwesley', 'PierBover', 'petrfelzmann', 'sneakypete81', 'PalmerAL', 'IonicaBizau', 't57ser', 'popod', 'marekharanczyk', 'joeydlee95', 'fscherwi', 'fengmk2', 'deed02392', 'batjko', 'adammeyer', 'zachflower', 'orzFly', 'Vj3k0', 'Kthulu120', 'TonyWuu', 'timruffles', 'theojulienne', 'suyash', 'nekolab', 'Hugo Mano', 'hankbao', 'GregMefford', 'ggamel', 'fritx', 'fab1an', 'ericbrumer', 'Emmanuel Kimmerlin', 'didrocks', 'watilde', 'Benjamin Pasero', 'Arif Çakıroğlu', 'ArekSredzki', 'antoinepairet', 'avdg', 'Ahmed Abdalla', 'zombieleet', 'Maeda-Naoki', 'omern1', 'Mingling94', 'matttbe', 'matt-way', 'mattdesl', 'matiasinsaurralde', 'LuisHsu', 'Lucidogen Media', 'LasseJacobs', 'kevinmartin', 'kevinhartman', 'jpiepkow', 'j5a', 'duswlsgur', 'jameshfisher', 'codefoster', 'jaimecbernardo', 'suryast', 'niedzielski', 'sitdh', 'Sergey Bekrin', 'saghul', 'SamvelRaja', 'SAKATA Sinji', 'roramirez', 'rahatarmanahmed', 'inukshuk', 'takashi', 'teiles', 'thorbenegberts', 'timfish', 'twolfson', 'tonyferrell', 'tristan957', 'frankenbot', 'bkeepers', 'mateussilva92', 'MauricioFauth', 'ymmuse', 'maxbrunsfeld', 'kaylanm', 'mifi', 'mitchchn', 'moshfeu', 'salomvary', 'tensor5', 'OctoHuman', 'teleclimber', 'paulatbipsync', 'pavelfeldman', 'philfreo', 'p-jackson', 'prayagverma', 'rafaelstz', 'htk3', 'huangruichang', 'jaanus', 'jf_jiang', 'jinhai.wang', 'kaylie', 'liuderchi', 'longbotao', 'marcin-prochownik', 'mzajaczkowski', 'nixxquality', 'patr0nus', 'paulinaika', 'renmu123', 'robbix1206', 'stephen9357', 'wit543', 'Tse Kit Yam', 'TyanNN', 'VReality64', 'Victor', 'Vivek Patel', 'Vladimir', 'Wayne Loopy', 'Weiqiang Lin', 'Yudu Ban', 'Zac Walker', 'Zachary Flower', 'Zhuo Zhang', 'agustin.wang', 'arifcakiroglu', 'as3boyan', 'cesine', 'deenjun', 'foo bar code', 'Brent Ertz', 'brunoqueiros', 'Charles Kerr', 'soh1988', 'ColinEberhardt', 'craigshoemaker', 'clebeaupin', 'quicksnap', 'Daniel Ma', 'Mossop', 'destan', 'Rokt33r', 'sdj01044', 'dorian', 'dougnukem', 'cjld', 'Jan Wiemers', '22222', 'zephyrzoom', 'aaronang', 'Godoy', 'alanionita', 'fierroformo', 'alexwarren', 'Prinzhorn', 'alexandrubau', '97amarnathk', 'ldehai', 'Anrock', 'xxczaki', 'primalmotion', 'darwin', 'astoilkov', 'austinmoore-', 'bpasero', 'Brad Metcalf', 'jpoon', 'wearhere', 'Jerry Wu', 'jesusD', 'ArtskydJ', 'jsoref', 'magne4000', 'keerthi16', 'kramerc', 'kristofkalocsai', 'LaurentLeVan', 'theLMGN', 'torn4dom4n', 'schneiderl', 'lgalabru', 'isnotgood', 'lukeadams', 'Marc-Aurèle DARCHE', 'Sarruby', 'MrSurly', 'Ethan-Arrowood', 'everblut', 'feross', 'Florian', 'Florian Hämmerle', 'Giacomo Furlan', 'GitHubPang', 'JamesKyburz', 'apoco', 'jacobq', 'jack-teng1', 'husayn', 'Hum4n01d', 'twitharshil', 'HariJ', 'Harendra Singh', 'HR', 'Sergey Zolotarev', 'Sergey Sova', 'Sergey Rubanov', 'Sergey R', 'Serg F', 'Seppe Stas', 'Selwyn', 'Seemann', 'Seba Kerckhof', 'Sean Lee', 'Sean Francis N. Ballais', 'Sean Bannigan', 'Sean', 'Sergio Padrino', 'Sesh Sadasivam', 'Shahzad Lone', 'Shaine Ismail', 'Shawn K', 'Shazron Abdullah', 'Shiranka Miskin', 'Shogun Sea', 'Shohei YOSHIDA', 'Shubham Kumar', 'Shunki Tan', 'Siddharth Dalal', 'TJ Krusinski', 'Robert Lyall', 'Robert Nagy', 'Robert Stanfield', 'Robert Säll', 'Robin Dupret', 'Rodrigo Nascimento', 'Romain Pokrzywka', 'Roman Klauke', 'Ronald Eddy', 'Rose Robertson', 'Ross Rosen', 'Ruben R', 'Ruslan', 'Ryan Baxley', 'Ryan Gonzalez', 'Ryan Johnson', 'Ryan Molden', 'Ryan Patterson', 'Sam Thomson', 'Samuel Meuli', 'Samy Pessé', 'Sangjoon Moon', 'Saswat Bhattacharya', 'Saúl Ibarra Corretgé', 'Scott Robertson', 'Scott Trinh', 'TJC', 'Tabea4', 'Tabish Mahfuz', 'Taichiro Yoshida', 'Takahito Yamatoya', 'Takao Baba', 'Takashi Kokubun', 'Takashi Toyoshima', 'TanninOne', 'Tasuku Uno', 'Tatsuya Hiroishi', 'TechnicalSoup', 'Ted Nyman', 'Teo Koon Peng', 'Teran McKinney', 'Thanasis Polychronakis', 'The Gem Dev', 'The Moses', 'TheDancingCode', 'Thomas Beverley', 'Thomas Hofmann', 'Thomas J Fox', 'Thomas Kainrad', 'Thomas Kaltz III', 'Thomas Levy', 'Sidney', 'Simas Toleikis', 'Simon Knight', 'Sitdhibong Laokok', 'Sitong Peng', 'Slapbox', 'Smite Chow', 'Sonny Piers', 'Sorah Fukumori', 'Stan', 'Stathis Siatras', 'Steel Brain', 'Stefan Buck', 'Stephan Lee', 'Steve Smith', 'Steven Barbaro', 'Steven Yeh', 'Stian Jørgensrud', 'StoneStoneStone', 'Stuart Schechter', 'Sudar Abisheck', 'SushiJackal', 'Susu Dong (LCL)', 'Sven Hüster', 'Syed Umair', 'TAN', 'Misumi Rize', 'Mitchell Hentges', 'Mitchell McCaffrey', 'Mod John', 'Moetaz', 'Moises lopes ferreira', 'Moisés Neto', 'Moriarty!~~', 'Mustafa', 'My-khael Pierce', 'Nate Goldman', 'Nate Wienert', 'Nathan Sobo', 'Natsu', 'Navgeet Agrawal', 'Neil Craig', 'Nic Mitchell', 'Nicholas Arcuri', 'Nick Harper', 'Nick Taylor', 'Nico', 'Nicolas Ramz', 'Nikita Kot', 'Peter Schmidt', 'Christopher Dieringer', 'Matthew Harris', 'Matthew Leffler', 'Matthew Rayermann', 'Matthew Shen', 'Matthias Niess', 'Matthijs Groen', 'Max Beatty', 'Max Claus Nunes', 'Max Schmitt', 'Maxime Serrano', 'Maxine Whitely', 'Maya Nedeljković Batić', 'Maya Wolf', 'Mehedi Hassan', 'Meyito', 'Michael', 'Michael Hamilton', 'Michael J. Zoidl', 'Michael Kozakov', 'Miguel Piedrafita', 'Mike Engel', 'Mike Lee', 'Mike Pelley', 'MikeBusuttil', 'Phil Christensen', 'Phil Haack', 'Phil Wyett', 'Philipp A.', 'Pierre-Yves Jamon', 'Pine', 'PoppinL', 'Pranjal', 'Prasanth Vaaheeswaran', 'Rafael Dantas', 'Rafael Firmino', 'Rafael G Firmino', 'Rafael Masson', 'Raghav Bhutra', 'Rajdeep Chatterjee', 'Raphael', 'Raul6469', 'Ray Booysen', 'René Herrmann', 'Rich Hong', 'Rita Zhang', 'Rituka Patwal', 'RobberPhex', 'Robert Borg', 'Robert D', 'Robert Hencke', 'Nishanth Shanmugham', 'Niven Su', 'Noelle Leigh', 'NotWearingPants', 'Numaan Ashraf', 'Nuri Uzunoğlu', 'O.G.olasowski', 'Oded Breiner', 'Oden', 'Olawanle Joel', 'Omar Kilani', 'Ondreas', 'Ondřej Záruba', 'Oran C', 'OuYancey', 'Owais Lone', 'Pascal Borreli', 'Pat DeSantis', 'Patrick Flor', 'Paul Hollinsky', 'Paul Young', 'Paulius', 'Pedro Belo', 'Per Lundberg', 'Pete Torres', 'Peter Butcher', 'Peter Dave Hello', 'kyokutyo', 'laiso', 'lazarus', 'leonllrmc', 'liang feng', 'lvs', 'malern', 'mawie81', 'max_devjs', 'mdpetuum', 'mgarciaisaia', 'mhkeller', 'michal1106', 'michtsu', 'mihaipocorschi', 'mikoto2000', 'mkiki01', 'morgan-sam', 'mscdex', 'msizanoen1', 'msullivan', 'mtgto', 'muryoimpl', 'nibbleswap', 'nicknish', 'nous-', 'dmitryk', 'dmnlk', 'doraeric', 'duncup', 'ecmadao', 'evelyn masso', 'ffdd', 'foxy', 'fraserxu', 'ganthern', 'gnahzak', 'hansrwindhoff', 'hemanth.hm', 'henrit', 'hkhere', 'hrubilov', 'iamkun', 'ipoint-pgerhard', 'isailaandrei', 'jiang kun', 'jieniu$', 'jin5354', 'joe-re', 'jpittner', 'kdau', 'kyo_ago', 'tiagotol', 'timmyhadwen', 'tom', 'universalstrapping', 'universeroc', 'vulture', 'wan-qy', 'wgrafael', 'windwalkr', 'wolf', 'wxf', 'yan', 'yibuyisheng', 'zacwalk', 'zenganshao', 'zhao-lin-li', 'zicai', 'Átila Camurça Alves', 'Ömer Faruk ÖZDEMİR', '孙茂胤', '孟强', '小奔奔', '小菜', '祈緒ちゃん - Kiochan', '程启翔', 'overkill', 'owwo', 'pathim', 'pedro silva', 'pi1024e', 'pol', 'pravdomil', 'qwabra', 'rehez', 'rhedshi', 'riccardopiola', 'rmcdonald', 'robertgrzonka', 'robin', 'roderik', 'ryanomor', 'schwalbe10', 'secult', 'serant', 'shur', 'sourenaraya', 'sqrthree', 'sssooonnnggg', 'taemu', 'Victor Bennich', 'Victor Zhu', 'Vijay Pushkin', 'Vik Ramanujam', 'Vincent Quagliaro', 'Vishal', 'Vishesh Handa', 'Vitalie Lazu', 'Volodymyr Bezuglyy', 'Vítor Galvão', 'W L Bentley', 'WangYunjian', 'Wei Wang', 'WeiZhiHuang', 'Wen Luo', 'WenryXu', 'Will Eccles', 'Will Tange', 'Wilson Page', 'Wojciech Krol', 'Wolfgang', 'Wujg', 'Xaver Hellauer', 'XiYang', 'Xin Tan', 'Xinayu', 'andreasdj', 'Tim Fish', 'Timothy', 'Timothy Cyrus', 'TingPing', 'Tobias Nießen', 'Tom Floyer', 'Tom Hughes', 'Tom Watson', 'Tommy MacWilliam', 'Tomáš Hanáček', 'Tomáš Hübelbauer', 'Tony Ferrell', 'Tony Stark', 'Travis Tilley', 'Troy', 'Tyler Dennis', 'Tyler Gibson', 'Tyler Saballus', 'Utkarsh Dixit', 'Vadim', 'Valentin Hăloiu', 'Vanessa Yuen', 'Varun Agrawal', 'Varun Sharma', 'Vasu Mahesh', 'andy matthews', 'ankitaggarwal011', 'appetizermonster', 'aydon', 'az-chris', 'azure-pipelines[bot]', 'bigben0123', 'billyct', 'biuuu', 'bowbowbow', 'br0nstein', 'bureken', 'campersau', 'cclauss', 'cdaringe', 'chadluo', 'cheongjin.kim', 'choko', 'chris-ls', 'chriswmercer', 'd1g1t4ld1n4', 'daveilers', 'dengyaolong', 'devjin0617', 'diego', 'diegozhu', 'Yarkhan', 'Yassine Laassel', 'Yasunari Fujieda', 'Yegun Kim', 'Yifei Teng', 'Yonggang Luo', 'Yongmin Hong', 'Yoshietru Nagata', 'Yoshua Wuyts', 'Yoyo Zhou', 'Yui', 'Yury', 'ZReC', 'ZYSzys', 'Zach Bloomquist', 'Zachary', 'Zachinquarantine', 'Zhang Zhi', 'ZhangYueqiu', 'Zheng Guoli', 'Zhi Cun', 'abouthiroppy', 'acheronfail', 'akameco', 'allenliu', 'amor', 'andi', 'Chuion',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Elena Topaka', 'Brian Zelip', 'Bruce Auyeung', 'Bruce Mitchener', 'Bruno Lemos', 'Bryan Bess', 'Caesar Schinas', 'Calvin Jeng', 'Cameron Nokes', 'CanadaHonk',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ugene', 'Evan Hahn', 'Evgeny', 'Evlogiy Sutormin', 'FWeinb', 'Fabio Spampinato', 'FantasqueX', 'Federico Bond', 'Fedor Indutny', 'Felipe Serafim', 'Felix Rieseberg', 'Finn Behrens', 'Florent Delayen', 'Florian Brinker', 'Florian Keller', 'Flynn Joffray', 'Frank Laub', 'Franz de Copenhague', 'Daniel Turcich', 'Daniel Zwelling', 'Danny Brown', 'Darrell Ulm', 'Daryl Haresign', 'Davenury', 'David Baker', 'David Chawei Hsu', 'David Ferguson', 'DeeDeeG', 'Denise Yu', 'Dennis', 'Dennis Keil', 'Destan Sarpkaya', 'Devin Foley', 'Diego Ponce', 'Domenic Horner', 'Dominic', 'Donald D. Nevermore', 'Drew Chandler', 'Duncan Hewett', 'Dustin', 'Dwayne Jones', 'Eddie Zaneski', 'Egor Stronhin', 'Alex Sokolsky', 'Alex Whitman', 'Alexander Gujral', 'Alexander Neu', 'Alexander Petrov', 'Alexander Rusakov', 'Alexander Salas', 'Alexander Turinske', 'Alexandre', 'Alexandre Demode', 'Alexandru Rosianu', 'Alexey Prokhorov', 'Alfred Xing', 'Ali BARIN', 'Ali Ibrahim', 'Alvin Philips', 'Amin Ullah Khan', 'Amit Merchant', 'Amor', 'Amos Wenger', 'Anatzum', 'Andrea Brancaleoni', 'Andrea Parodi', 'Andreas Waigand', 'Andrei K', 'BJR Matos', '1akshat1', 'AHFriedman', 'AN', 'Aayush Chhabra', 'Abdi Haikal', 'Abhay Gupta',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itinq', 'Balakrishna Avulapati', 'Baoshuo Re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Andrew Dassonville', 'Andrew Murray', 'Andrew Plotkin', 'Andrew Scheller', 'Andrew Zheng', 'Andrey', 'Andrey Kurdyumov', 'Andriy Tsok', 'Andrzej Szombierski', 'András Polgár', 'Andy Kogut', 'Angel_Kitty', 'Anna Henningsen', 'Anthony Ryan', 'Antonio Scandurra', 'ArcticZeroo', 'Arek Sredzki', 'Arinde Eniola', 'Arjit Chauhan', 'Armagan Amcalar', 'Aryan Shridhar', 'Asher Jacob', 'Attila Sukosd', 'Austin Burdine', 'Avi Vahl', 'BIKI DAS', 'Kevin', 'Kevin Lynagh', 'Kevin Mårtensson', 'Kevin Ramsunder', 'Kevin Simper', 'Kevin Ushey', 'Kevin Wang', 'Kevin Wojniak', 'Kewde', 'Kiavash Page', 'Klaus Sinani', 'Koen [XII]', 'Konstantin Pschera', 'Konstantinos Ntoutsos-Oikonomou', 'Kostiantyn Kahanskyi', 'Kristof Mattei', 'Kriti Singh', 'Krzysztof', 'Kurtis Rainbolt-Greene', 'Kushagra Sharma', 'Kuts Alexey', 'Kyle Corry', 'Kyle Hornberg', 'Kyle Robinson Young', 'LShun', 'Maksym Dogadailo', 'Josh Goldberg', 'Josh Marinacci', 'Joshua Anderson', 'Joshua Bemenderfer', 'Joshua Benuck', 'Joshua Westerheide', 'Jota', 'João Moreno', 'Juan Antonio Gómez', 'Juan Cruz Viotti', 'Juan Paulo Gutierrez', 'Juan Roa', 'Julia Nam', 'Julian Engel', 'Julie Koubová', 'Julio', 'Junyoung Jung', 'Justin Guze', 'KSneijders', 'Kagami', 'Kane Montreuil', 'Kapil Patel', 'Karel Braeckman', 'Keeley Hammond', 'Kerollos Magdy', 'Keshal Desai', 'Kev', 'Mal Graty', 'Manoel', 'Marat Abdullin', 'Marcin Maliszkiewicz', 'Marek Rusinowski', 'Marek Šuppa', 'Mario Aichinger', 'Mark Judd', 'Mark Potnick', 'Mark Samman', 'Mark Wylde', 'Markus Olsson', 'Martin', 'Martin Mädler', 'Martin Samson', 'Masato Kinugawa', 'Matheus Rocha Vieira', 'Mathieu Débit', 'Matias Insaurralde', 'Matt Colyer', 'Matt Kane', 'Matt Lyons', 'Matt Mastracci', 'Matt Slay', 'Matthew Amato', 'LYK', 'Laekh', 'Lalit', 'Larry Kluger', 'LarryZhu', 'Lars-Magnus Skog', 'LeMoussel', 'Lee Dohm', 'Lee McKinnon', 'Liam Griffin', 'Lishid', 'Loren Segal', 'Louis Rose', 'Luca Carettoni', 'Lucas', 'Lucas Lopes', 'Lukas Geiger', 'Luke Ingalls', 'Luke Westby', 'Lutz Roeder', 'Lxx', 'Lyall Hamilton', 'Maciej Krawczyk', 'MadfishDT', 'Maik Ellerbrock', 'Makonede', 'Maksim', 'Hanlin', 'Hans Kristian Flaatten', 'Hansen Zhang', 'Harry', 'Harry Hopkinson', 'Hashed Hyphen', 'HayateLaTech', 'Heejin Lee', 'Hein Haraldson Berg', 'Hiroshige Umino', 'Hiroshige Umino yaotti', 'Ho Wing Yip', 'Hugh Kennedy', 'Hye Sung Jung', 'Ian German Mesner', 'Ian Goodacre', 'Ian Langworth ☠', 'Ian Olsen', 'Ian Ornelas', 'Ian Sanders', 'Ikko Ashimine', 'Importcjj', 'Inclusive Coding Bot', 'Indrek Ardel', 'Ingo Richter', 'Jeremy Spiegel', 'Gabriel Augendre', 'Gabriel Basilio Brito',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eroen Visser', 'Jesse Grosjean', 'Jiaji Zhou', 'Jimi (Dimitris) Charalampidis', 'Joan Xie', 'Joe Duncko', 'Johan Giraldo', 'JohanG2012', 'Johann Fuechsl', 'Johannes Schmitz', 'John Eismeier', 'John Haley', 'John Schmidt', 'Johns Gresham', 'Jonathan', 'Jonathan Creekmore', 'Jonathan Sampson', 'Jonathon Simister', 'Jordon Bedwell', 'Jorge Feldmann (Jota)', 'Jorn', 'Joseph', 'Joseph Frazier', 'Joseph Higgins', 'Josh Bernitt', 'Josh Canaway', 'Isaac Taylor', 'Islam ElHakmi', 'Islam Sharabash', 'Ivan Kulikov', 'Ivan Žužak', 'Ivo Georgiev', 'Ivo von Putzer Reibegg', 'Iván Montes', 'J. Ryan Stinnett', 'J.M', 'JP Richardson', 'Jacek Oleksy', 'Jack Nemitz', 'Jake', 'Jakub Biesiada', 'Jakub Žitný', 'Jakukyo Friel', 'James Ide', 'Jamie Magee', 'Jan Němeček', 'Jaroslav Maslo', 'Jason Zhekov', 'Jean-Philippe Morin', 'Jeff Rehbein', 'Jeffrey Morgan', 'Jenux', 'Jeremy Judeaux']</text:p>
          </table:table-cell>
          <table:table-cell table:style-name="ce1" office:value-type="float" office:value="40" calcext:value-type="float">
            <text:p>40</text:p>
          </table:table-cell>
          <table:table-cell table:style-name="ce1" office:value-type="float" office:value="20976" calcext:value-type="float">
            <text:p>20976</text:p>
          </table:table-cell>
          <table:table-cell table:style-name="ce5" office:value-type="string" calcext:value-type="string">
            <text:p><text:a xlink:href="https://github.com/unfoldingWord/electronite" xlink:type="simple">https://github.com/unfoldingWord/electronite</text:a></text:p>
          </table:table-cell>
          <table:table-cell table:style-name="ce4" office:value-type="string" calcext:value-type="string">
            <text:p>2026-02-15T19:31:44Z</text:p>
          </table:table-cell>
          <table:table-cell table:style-name="ce4"/>
          <table:table-cell table:style-name="ce1" office:value-type="string" calcext:value-type="string">
            <text:p>unfoldingWord/electronit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electronite-builder</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9-17T23:39:30Z</text:p>
          </table:table-cell>
          <table:table-cell table:style-name="ce1" office:value-type="string" calcext:value-type="string">
            <text:p>2023-09-13T22:24:42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electron-userland/electron-builder</text:p>
          </table:table-cell>
          <table:table-cell table:style-name="ce6" office:value-type="string" calcext:value-type="string">
            <text:p>['develar', 'mmaietta', 'stefanjudis', 'renovate[bot]', 'github-actions[bot]', 'Stefan Judis', 'demetris-manikas', 'MariaDima', 'indutny-signal', 'lutzroeder', 'codeudan', 'Justin Chase', 'Mike Maietta', 'xseignard', 'mkaz', 'wojtkowiak', 'devinbinnie', 'ezekg', 'adam-lynch', 'Noah Andrews', 'quanglam2807', 'panther7', 'ffflorian', 'greenkeeperio-bot', 'gaodeng', 'Vincent Quagliaro', 'cawa-93', 'Alex Van Camp', 'filfreire', 'jviotti', 't3chguy', 'Nokel81', 'radibit', 'zhaoterryy', 'indutny', 'nicholaslee119', 'baparham', 'pronebird', 'popod', 'mastergberry', 'csett86', 'yuya-oc', 'bedney', 'badams', 'Daniel Pereira', 'davej', 'c0b41', 'maxcnunes', 'neilrees', 'black-snow', 'VictorLeach96', 'vxsx', 'Uladzimir Havenchyk', 'tom-james-watson', 'havenchyk', 'taozhou-glean', 'maczikasz', 'sr258', 'freewil', 'samuelmaddock', 'robertpatrick', 'rajivshah3', 'radex', 'pauliusuza', 'flexiondotorg', 'sapkra', 'nikku', 'kutu', 'naveensrinivasan', 'mifi', 'MortalKastor', 'vially', 'Toflar', 'developeryashraj', 'beyondkmp', 'dab0bby', 'daikiuk', 'ganthern', 'k2s', 'ouliuquan', 'KaminoRyo', '0181532686cf4a31163be0bf3e6bb6732bf', 'jbool24', 'AlienHoboken', 'BellezaEmporium', 'Frondor', 'ezzatron', 'elliottkember', 'dchest', 'DanielRuf', 'unindented', 'dpgraham', 'ponyfleisch', 'burnhamup', 'changkun', 'githubbob42', 'atali', 'Aaron-Frost', 'arekkas', 'p120ph37', 'AdrianoFerrari', 'mmckegg', 'Markus Müller', 'mook-as', 'Marco Roßdeutscher', 'beliaev-maksim', 'mrodem', 'lgeiger', 'laurent22', 'catdad', 'Kilian', 'kevinlinv', 'julianhille', 'joaocc', 'rainbean', 'gengjiawen', 'jeffreypriebe', 'roryabraham', 'schetle', 'rmccue', 'RyanPretorius', 'Erim32', 'saadshahd', 'sahinyyurt', 'saifelse', 'sandeep1995', 'approvedpr', 'nonesand', 'romansp', 'stanfieldr', 'sohobloo', 'romadryud', 'rkistner', 'jonkofee', 'piotrdubiel', 'g-plane', 'philfreo', 'peterdanis', 'pedro-pedrosa', 's00d', 'shibayan', 'Tarrowren', 'HwangTaehyun', 'Szava', 'Suraj Reddy', 'UppaJung', 'Strangerxxx', 'Steven Chambers', 'acid1103', 'kossolax', 'steverandy', 'spikefu', 'greenimpala', 'zanzara', 'SinusPi', 'Simon-Laux', 'sidneys', 'sibiraj-s', 'Shay', 'shaluyadav13', 'sethjray', 'Sergio Schvezov', 'Metaur', 'Sergey-Churilin', 'pzeinlinger', 'gryzzly', 'mkryuchkov', 'MikeJerred', 'Eshva', 'purefan', 'michaelwbarry', 'mseneshen', 'merwaaan', 'MrMYHuang', 'MehediH', 'ErythroME', 'vermilion', 'ymmuse', 'matejkriz', 'iffy', 'mattjgalloway', 'Mstrodl', 'Markus Hatvan', 'markizano', 'malept', 'markgardner', 'IcyPalm', 'p2004a', 'marcuskirsch', 'Paul Rosania', 'pfrazee', 'crazyserver', 'patsimm', 'Patrick Simmelbauer', 'IlCallo', 'PRGWITHSTYLE', 'Hinton', 'olipo186', 'Nunzio Tocci', 'inickvel', 'nikohoffren', 'mischnic', 'negorikhin', 'nikcheerla', 'elsbree', 'mbrainiac', 'nsrCodes', 'naderhen', 'salomvary', 'onikienko', 'mytran', 'moulinierf', 'jqueryisamonad', 'NBAMj', 'moonrailgun', 'michel-klijn', 'm4rch3n1ng', 'Matrixbirds', 'martinzak-zaber', 'mariusraht1', 'lowmh', 'link89', 'lenville', 'kevinbuhmann', 'kanekoy', 'kagawarei', 'jimm1419', 'jhbsa', 'zhanjinfeng', 'jackple', 'idoodler', 'hinaria', 'guohaolay', 'hexianzhi', 'frankwang1101', 'etherElric', 'vladotesanovic', '高奕GaoYi', '李小明', 'xplox', 'xmireczech', 'wsmlby', 'vaibhav', 'toto6038', 'tivo', 'titus-anromedonn', 'timothylui', 't-dragon', 'sidneys.github.io', 'seyfert', 'sa-MatteoHausner', 'rud-holmgren', 'rotifera', 'relativisticelectron', 'rain', 'ptol', 'pravdomil', 'pdcarroll', 'pan93412', 'onurpolattimur', 'oceanlvr', 'nuryagdym', 'vladimiry', 'Vkzem', 'l3m0nqu1z', 'genezys', 'vincentbriglia', 'vitto-moz', 'VeselyT', 'thekondr', 'UzEE', 'tsvetilian-ty', 'tsunghuanghsieh', 'feens', 'torywheelwright', 'txk2048', 'tborychowski', 'tomcandia', 'TobiX', 'timotheeguerin', 'Tim van den Eijnden', 'timfish', 'Tim Cooper', 'tkleinke', 'tengyifei', 'tlrobrn', 'dfabulich', 'dangeredwolf', 'daB0bby', 'da-mkay', 'shenglianlee', 'chokladmal', 'chenhbc', 'buffcode', 'ameer-clara', 'akaJes', 'abhishekmatcha', 'Zrylhh', 'zoltan-mihalyi', 'zeke', 'computerquip-streamlabs', 'ldsink', 'laprasdrum', 'hvuntokrul', 'kuidaoring', 'PerfectPan', 'orzFly', 'yannickm95', 'YanDevDe', 'XuluWarrior', 'wardellbagby', 'Mgonand', 'seeekr', 'dlon', 'adelphes', 'danielweck', 'danielnieto', 'DanielMcAssey', 'dkarski', 'ghost1face', 'Daniel', 'danseagrave', 'feugy', 'Frugality', 'regentcid434', 'ciffelia', 'cwillisf', 'clee-ai', 'kitsune7', 'Christoph Settgast', 'christophpre', 'c960657', 'ckotzbauer', 'christianbundy', 'Chris Ramirez', 'cjp256', 'FredrikNoren', 'fredrik-lindeborg', 'fonsleenaars', 'firede', 'felipecrs', 'fangpenlin', 'Evgeny Barabanov', 'mahnunchik', 'taratatach', 'etiktin', 'EosFoundry', 'migliorinie', 'McPo', 'emily-malec-brown', 'embbnux', 'elvisvoer', 'hyldmo', 'Egorikhin', 'fyockm', 'agalwood', 'douglasduteil', 'Doccrazy', 'BusinessDuck', 'AllSeeingEye', 'Cheng Zhao', 'ntnbrtnkv', 'Anmo', 'vespasianvs', 'o2genum', 'abd3', 'zag', 'megahertz', 'Alexandre Le Foll', 'clusterberries', 'Alexandr Ricov', 'true0r', 'azeier', 'Alex Chaplinsky', 'alexbrazier', 'abettadapur', 'sashashura', 'akshitkrnagpal', 'akashnimare', 'Ajeey', 'aduwez', 'Adrian (Grim) Roach', 'aulvi', 'geekgonecrazy', '1nfility', 'caseywebdev', 'pikax', 'karliatto', 'Carlos Fernández', 'b-zurg', 'nono', 'briantist', 'bradrees', 'blakebyrnes', 'BlackHole1', 'meowtec', 'berkon', 'bennol', 'benjamincburns', 'aguynamedben', 'bartoszhernas', 'AxelTerizaki', 'Avery Magnotti', 'akorchev', 'bytemain', 'Jasyer', 'artspb', 'championswimmer', 'aripollak', 'qevni', 'KenCorma', 'jeremco', 'jupp0r', 'Julusian', 'Julian Hille', 'oNaiPs', 'JoshRiser', 'grovesNL', 'worldjoe', 'Joon Kyoung', 'jonzlin95', 'JohnyCilohokla', 'jwr1', 'jgresham', 'johnnyopao', 'jooohhn', 'JohnTendik', 'JSzaszvari', 'John Muhl', 'joel-bentley', 'Joakim Reinert', 'jbreckmckye', 'obra', '3v1n0', 'lidel', 'marceloavf', 'ml1nk', 'makinori', 'richtlu', 'erikrz', 'RoikkuTo', 'fronterior', 'Losses', 'loremattei', 'logidelic', 'faern', 'rhysd', 'lbestftr', 'Leo Arias', 'Kyle L. Huff', 'kraenhansen', 'kris7t', 'Korbs', 'Koppel-Zhou', 'KishanBagaria', 'kiruh', 'kidonng', 'jessep', 'onucsecu2', 'Ian Miller', 'IKukhta', 'judge2020', 'hueyyeng', 'lwintermelon', 'hychen', 'HppZ', 'BurningEnlightenment', 'heldr', 'nekator', 'hleitzell', 'hrueger', 'ha-D', 'Megajin', 'pergy', 'gniezen', 'karaggeorge', 'geovie', 'GaryCaldwell', 'G-Rath', 'GabrielNSD', 'gbodeen', 'GCKPaulYang', 'jeremyspiegel', 'cjeonguk', 'jely2002', 'Evoks', 'jeanfbrito', 'avoidwork', 'jasonhinkle', 'jkroepke', 'janbrasna', 'JamieRuderman', 'jwheare', 'jlongster', 'JamesCullum', 'jfix', 'v4', 'Jai-JAP', 'jtbandes', 'jacobq', 'jack-arms', 'jryans', 'I-Otsuki', 'ki0ki0', 'Igor-Techsee', 'araujoigo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lectronite-builder" xlink:type="simple">https://github.com/unfoldingWord-dev/electronite-builder</text:a></text:p>
          </table:table-cell>
          <table:table-cell table:style-name="ce4" office:value-type="string" calcext:value-type="string">
            <text:p>2023-09-18T17:12:15Z</text:p>
          </table:table-cell>
          <table:table-cell table:style-name="ce4"/>
          <table:table-cell table:style-name="ce1" office:value-type="string" calcext:value-type="string">
            <text:p>unfoldingWord-dev/electronite-build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electronite-forg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10-09T14:20:00Z</text:p>
          </table:table-cell>
          <table:table-cell table:style-name="ce1" office:value-type="string" calcext:value-type="string">
            <text:p>2023-02-21T19:17:58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electron/forge</text:p>
          </table:table-cell>
          <table:table-cell table:style-name="ce1" office:value-type="string" calcext:value-type="string">
            <text:p>['malept', 'MarshallOfSound', 'dependabot-preview[bot]', 'dependabot[bot]', 'dependabot-support', 'erickzhao', 'VerteDinde', 'anulman', 'georgexu99', 'Ben Demboski', 'erikian', 'clavin', 'vhashimotoo', 'Samuel Attard', 'anaisbetts', 'jacobq', 'dsanders11', 'bengotow', 'Benjamin Coe', 'Johnny Robeson', 'R-NK', 'shimaore', 'timfish', 'codebytere', 'lukebatchelor', 'vintprox', 'MOZGIII', 'monsterkrampe', 'issacgerges', 'felixrieseberg', 'sirgallifrey', 'kyruzic', 'nasum', 'Miaow', 'michaelfig', 'pthompson-asana', 'pierrickouw', 'pd4d10', 'choxi', 'gitbook-bot', 'stanlemon', 'Thomas Quillan', 'Tyler Brandt', 'itsananderson', 'unasuke', 'YvanGuidoin', 'zac-jacobson', 'liudonghua123', 'tgds', 'zakdoek', 'caoxiemeihao', 'deadcoder0904', 'albertxing', 'vazra', 'ArekSredzki', 'Benjamin Sova', 'bboure', 'blake-simpson', 'waiteb3', 'shiftkey', 'b-zurg', 'Crevax', 'chetbox', 'dariusclay', 'thateverdmitriy', 'mahnunchik', 'fredrikj31', 'macdja38', 'Jake Scott', 'leofidus', 'kamonta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lectronite-forge" xlink:type="simple">https://github.com/unfoldingWord/electronite-forge</text:a></text:p>
          </table:table-cell>
          <table:table-cell table:style-name="ce4" office:value-type="string" calcext:value-type="string">
            <text:p>2023-02-21T17:18:35Z</text:p>
          </table:table-cell>
          <table:table-cell table:style-name="ce4"/>
          <table:table-cell table:style-name="ce1" office:value-type="string" calcext:value-type="string">
            <text:p>unfoldingWord/electronite-forg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electronite-packag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10-09T13:47:10Z</text:p>
          </table:table-cell>
          <table:table-cell table:style-name="ce1" office:value-type="string" calcext:value-type="string">
            <text:p>2020-03-23T11:56:2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lectron-packager</text:p>
          </table:table-cell>
          <table:table-cell table:style-name="ce1" table:number-columns-repeated="5"/>
          <table:table-cell table:style-name="ce1" office:value-type="string" calcext:value-type="string">
            <text:p>['rockybars/atom-shell-packager', 'unfoldingWord/gateway-edit', 'Proskomma/proskomma-legacy-projects', 'gbin-org/alignment-editor-rcl-poc', 'unfoldingWord/translationCore', 'mannycolon/electronite-poc-app']</text:p>
          </table:table-cell>
          <table:table-cell table:style-name="ce1" office:value-type="string" calcext:value-type="string">
            <text:p>['malept', 'max-mapper', 'kevinsawicki', 'MarshallOfSound', 'dependabot-preview[bot]', 'mafintosh', 'junosuarez', 'develar', 'kfranqueiro', 'Jens Lind', 'sethlu', 'feross', 'hitman401', 'zeke', 'inukshuk', 'sindresorhus', 'da1nerd', 'Andrew Plotkin', 'hokein', 'anaisbetts', 'rahatarmanahmed', 'dependabot[bot]', 'Rameshv', 'jhen0409', 'kwolfy', 'Stefan Buck', 'zaggino', 'shama', 'joshaber', 'jlord', 'mcfedr', 'ckerr', 'AbbetWang', 'psxjpc', 'juliangruber', 'imlucas', 'lukeapage', 'Markus Mühlberger', 'MathijsvVelde', 'Nicolas Spiric', 'Paul Le Cam', 'plrthink', 'valette', 'trapp', 'Yifei Teng', 'remixz', 'dependabot-support', 'jasonhinkle', 'mironal', 'pyro2927', 'rehez', 'robfuscate', 'barinali', 'fasterthanlime', 'arnolem', 'vrunoa', 'chentsulin', 'dmascord', 'quicksnap', 'Dan Schuman', 'eugirdor', 'dmurtari', 'Dr', 'fcastilloec', 'floriangosse', 'hrkt', 'Ivshti', 'j-f1', 'nornagon', 'jsg2021', 'positlab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lectronite-packager" xlink:type="simple">https://github.com/unfoldingWord-dev/electronite-packager</text:a></text:p>
          </table:table-cell>
          <table:table-cell table:style-name="ce4" office:value-type="string" calcext:value-type="string">
            <text:p>2023-09-18T17:18:06Z</text:p>
          </table:table-cell>
          <table:table-cell table:style-name="ce4"/>
          <table:table-cell table:style-name="ce1" office:value-type="string" calcext:value-type="string">
            <text:p>unfoldingWord-dev/electronite-packag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find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findr/@findr/mui</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mui</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findr/mui</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findr/@findr/perf</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perf</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findr/perf</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findr/@findr/reac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react</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findr/reac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findr/@findr/text</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2T08:02:59Z</text:p>
          </table:table-cell>
          <table:table-cell table:style-name="ce1" office:value-type="string" calcext:value-type="string">
            <text:p>2023-09-07T21:35:15Z</text:p>
          </table:table-cell>
          <table:table-cell table:style-name="ce4"/>
          <table:table-cell table:style-name="ce4" office:value-type="float" office:value="18" calcext:value-type="float">
            <text:p>18</text:p>
          </table:table-cell>
          <table:table-cell table:style-name="ce4" office:value-type="float" office:value="3" calcext:value-type="float">
            <text:p>3</text:p>
          </table:table-cell>
          <table:table-cell table:style-name="ce1"/>
          <table:table-cell table:style-name="ce1" office:value-type="string" calcext:value-type="string">
            <text:p>@findr/text</text:p>
          </table:table-cell>
          <table:table-cell table:style-name="ce1" table:number-columns-repeated="5"/>
          <table:table-cell table:style-name="ce1" office:value-type="string" calcext:value-type="string">
            <text:p>['BSB-publishing/csv2usfm', 'RUN-Collaborations/translatable', 'DenisArger/my-usfm-editor', 'larsgson/vscode-ext-usfm-editor-webview', 'larsgson/d43-preview', 'unfoldingWord/oce-oak-edit', 'unfoldingWord/oce-oak-render', 'unfoldingWord/gateway-translate', 'unfoldingWord/oce-editor-tools']</text:p>
          </table:table-cell>
          <table:table-cell table:style-name="ce1" office:value-type="string" calcext:value-type="string">
            <text:p>['abelpz', 'theNerd247',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findr" xlink:type="simple">https://github.com/unfoldingWord/findr</text:a></text:p>
          </table:table-cell>
          <table:table-cell table:style-name="ce4" office:value-type="string" calcext:value-type="string">
            <text:p>2023-08-07T13:28:31Z</text:p>
          </table:table-cell>
          <table:table-cell table:style-name="ce4"/>
          <table:table-cell table:style-name="ce1" office:value-type="string" calcext:value-type="string">
            <text:p>unfoldingWord/findr/@findr/tex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flask-github-webhook</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4-01T16:14:45Z</text:p>
          </table:table-cell>
          <table:table-cell table:style-name="ce1" office:value-type="string" calcext:value-type="string">
            <text:p>2016-04-01T16:14:4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7"/>
          <table:table-cell table:style-name="ce1" office:value-type="string" calcext:value-type="string">
            <text:p>razius/github-webhook-handler</text:p>
          </table:table-cell>
          <table:table-cell table:style-name="ce1" office:value-type="string" calcext:value-type="string">
            <text:p>['razius', 'kcirtapw', 'root', 'Jesse A. Griffin', 'blha303',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flask-github-webhook" xlink:type="simple">https://github.com/unfoldingWord-dev/flask-github-webhook</text:a></text:p>
          </table:table-cell>
          <table:table-cell table:style-name="ce4" office:value-type="string" calcext:value-type="string">
            <text:p>2016-04-01T16:14:45Z</text:p>
          </table:table-cell>
          <table:table-cell table:style-name="ce4"/>
          <table:table-cell table:style-name="ce1" office:value-type="string" calcext:value-type="string">
            <text:p>unfoldingWord-dev/flask-github-webhook</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go-gogs-client</text:p>
          </table:table-cell>
          <table:table-cell table:style-name="ce1" office:value-type="string" calcext:value-type="string">
            <text:p>unfoldingWord-dev</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6-09-22T23:17:57Z</text:p>
          </table:table-cell>
          <table:table-cell table:style-name="ce1" office:value-type="string" calcext:value-type="string">
            <text:p>2016-08-30T18:12:39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gogs/go-gogs-client</text:p>
          </table:table-cell>
          <table:table-cell table:style-name="ce1" office:value-type="string" calcext:value-type="string">
            <text:p>['unknwon', 'Richard Mahn', 'lstahlman', 'sapk', 'roblabla', 'iwanbk', 'kmadel', 'richmahn', 'rubenv', 'xmonader', 'compressed', 'Josh Frye', 'bkcsof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go-gogs-client" xlink:type="simple">https://github.com/unfoldingWord-dev/go-gogs-client</text:a></text:p>
          </table:table-cell>
          <table:table-cell table:style-name="ce4" office:value-type="string" calcext:value-type="string">
            <text:p>2016-04-11T22:10:33Z</text:p>
          </table:table-cell>
          <table:table-cell table:style-name="ce4"/>
          <table:table-cell table:style-name="ce1" office:value-type="string" calcext:value-type="string">
            <text:p>unfoldingWord-dev/go-gogs-clien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go-rc2sb</text:p>
          </table:table-cell>
          <table:table-cell table:style-name="ce1" office:value-type="string" calcext:value-type="string">
            <text:p>unfoldingWord</text:p>
          </table:table-cell>
          <table:table-cell table:style-name="ce1" office:value-type="string" calcext:value-type="string">
            <text:p>Go</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28T20:23:11Z</text:p>
          </table:table-cell>
          <table:table-cell table:style-name="ce1" office:value-type="string" calcext:value-type="string">
            <text:p>2026-04-28T20:21:50Z</text:p>
          </table:table-cell>
          <table:table-cell table:style-name="ce4" office:value-type="string" calcext:value-type="string">
            <text:p>2026-04-28T20:23:11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unfoldingWord/dcs</text:p>
          </table:table-cell>
          <table:table-cell table:style-name="ce1" office:value-type="string" calcext:value-type="string">
            <text:p>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go-rc2sb" xlink:type="simple">https://github.com/unfoldingWord/go-rc2sb</text:a></text:p>
          </table:table-cell>
          <table:table-cell table:style-name="ce4" office:value-type="string" calcext:value-type="string">
            <text:p>2026-04-28T20:21:57Z</text:p>
          </table:table-cell>
          <table:table-cell table:style-name="ce4"/>
          <table:table-cell table:style-name="ce1" office:value-type="string" calcext:value-type="string">
            <text:p>unfoldingWord/go-rc2sb</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hackathon-zpp</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18-02-10T01:07:00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tgrecojs/nextjs-blogger</text:p>
          </table:table-cell>
          <table:table-cell table:style-name="ce1" office:value-type="string" calcext:value-type="string">
            <text:p>['Thomas Greco', 'tgrecojs', 'zacjones9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hackathon-zpp" xlink:type="simple">https://github.com/unfoldingWord-dev/hackathon-zpp</text:a></text:p>
          </table:table-cell>
          <table:table-cell table:style-name="ce4" office:value-type="string" calcext:value-type="string">
            <text:p>2025-12-03T19:19:04Z</text:p>
          </table:table-cell>
          <table:table-cell table:style-name="ce4"/>
          <table:table-cell table:style-name="ce1" office:value-type="string" calcext:value-type="string">
            <text:p>unfoldingWord-dev/hackathon-zpp</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HebrewLexicon</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0-01-03T16:24:58Z</text:p>
          </table:table-cell>
          <table:table-cell table:style-name="ce1" office:value-type="string" calcext:value-type="string">
            <text:p>2020-01-03T16:24:5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trongs-parse</text:p>
          </table:table-cell>
          <table:table-cell table:style-name="ce1" table:number-columns-repeated="5"/>
          <table:table-cell table:style-name="ce1" office:value-type="string" calcext:value-type="string">
            <text:p>PhotoNomad0/HebrewLexicon</text:p>
          </table:table-cell>
          <table:table-cell table:style-name="ce1" office:value-type="string" calcext:value-type="string">
            <text:p>['joeldruark', 'DavidTroidl', 'dowens76', 'PhotoNomad0', 'scruffian', 'destatez', 'sinr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HebrewLexicon" xlink:type="simple">https://github.com/unfoldingWord-dev/HebrewLexicon</text:a></text:p>
          </table:table-cell>
          <table:table-cell table:style-name="ce4" office:value-type="string" calcext:value-type="string">
            <text:p>2020-01-03T16:25:13Z</text:p>
          </table:table-cell>
          <table:table-cell table:style-name="ce4"/>
          <table:table-cell table:style-name="ce1" office:value-type="string" calcext:value-type="string">
            <text:p>unfoldingWord-dev/HebrewLexic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node-door43-client</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12-08T17:04:23Z</text:p>
          </table:table-cell>
          <table:table-cell table:style-name="ce1" office:value-type="string" calcext:value-type="string">
            <text:p>2019-11-06T17:32:07Z</text:p>
          </table:table-cell>
          <table:table-cell table:style-name="ce4" office:value-type="string" calcext:value-type="string">
            <text:p>2019-11-06T17:30:48Z</text:p>
          </table:table-cell>
          <table:table-cell table:number-columns-repeated="2" table:style-name="ce4" office:value-type="float" office:value="13" calcext:value-type="float">
            <text:p>13</text:p>
          </table:table-cell>
          <table:table-cell table:style-name="ce1"/>
          <table:table-cell table:style-name="ce1" office:value-type="string" calcext:value-type="string">
            <text:p>door43-client</text:p>
          </table:table-cell>
          <table:table-cell table:style-name="ce1" table:formula="of:=FALSE()" office:value-type="float" office:value="0" calcext:value-type="float">
            <text:p>0</text:p>
          </table:table-cell>
          <table:table-cell table:style-name="ce1" office:value-type="float" office:value="1556" calcext:value-type="float">
            <text:p>1556</text:p>
          </table:table-cell>
          <table:table-cell table:style-name="ce1" office:value-type="string" calcext:value-type="string">
            <text:p>2019-11-06T17:33:42.928Z</text:p>
          </table:table-cell>
          <table:table-cell table:style-name="ce1"/>
          <table:table-cell table:style-name="ce1" office:value-type="string" calcext:value-type="string">
            <text:p>resource-container</text:p>
          </table:table-cell>
          <table:table-cell table:style-name="ce1" office:value-type="string" calcext:value-type="string">
            <text:p>['Bible-Translation-Tools/BTT-Writer-Desktop', 'WycliffeAssociates/BTT_Writer_Resource_Updater', 'unfoldingWord-dev/ts-desktop']</text:p>
          </table:table-cell>
          <table:table-cell table:style-name="ce1" office:value-type="string" calcext:value-type="string">
            <text:p>da1nerd</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ev/node-door43-client" xlink:type="simple">https://github.com/unfoldingWord-dev/node-door43-client</text:a></text:p>
          </table:table-cell>
          <table:table-cell table:style-name="ce4" office:value-type="string" calcext:value-type="string">
            <text:p>2019-11-06T17:32:34Z</text:p>
          </table:table-cell>
          <table:table-cell table:style-name="ce4"/>
          <table:table-cell table:style-name="ce1" office:value-type="string" calcext:value-type="string">
            <text:p>unfoldingWord-dev/node-door43-clien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556 downloads).</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node-door43-rc</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6-08-30T17:28:52Z</text:p>
          </table:table-cell>
          <table:table-cell table:style-name="ce1" office:value-type="string" calcext:value-type="string">
            <text:p>2016-08-30T17:28:4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door43-rc</text:p>
          </table:table-cell>
          <table:table-cell table:style-name="ce1" table:formula="of:=TRUE()" office:value-type="float" office:value="1" calcext:value-type="float">
            <text:p>1</text:p>
          </table:table-cell>
          <table:table-cell table:style-name="ce1" office:value-type="float" office:value="1502" calcext:value-type="float">
            <text:p>1502</text:p>
          </table:table-cell>
          <table:table-cell table:style-name="ce1" office:value-type="string" calcext:value-type="string">
            <text:p>2016-09-01T18:35:44.393Z</text:p>
          </table:table-cell>
          <table:table-cell table:style-name="ce1" table:number-columns-repeated="3"/>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ode-door43-rc" xlink:type="simple">https://github.com/unfoldingWord-dev/node-door43-rc</text:a></text:p>
          </table:table-cell>
          <table:table-cell table:style-name="ce4" office:value-type="string" calcext:value-type="string">
            <text:p>2016-08-25T18:39:16Z</text:p>
          </table:table-cell>
          <table:table-cell table:style-name="ce4"/>
          <table:table-cell table:style-name="ce1" office:value-type="string" calcext:value-type="string">
            <text:p>unfoldingWord-dev/node-door43-rc</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502 downloads).</text:p>
          </table:table-cell>
          <table:table-cell table:style-name="ce4" office:value-type="string" calcext:value-type="string">
            <text:p>Deprecated npm package</text:p>
          </table:table-cell>
          <table:table-cell table:style-name="ce1" office:value-type="string" calcext:value-type="string">
            <text:p>Npm package is already explicitly marked as deprecated.</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noto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7-04-15T13:09:18Z</text:p>
          </table:table-cell>
          <table:table-cell table:style-name="ce1" office:value-type="string" calcext:value-type="string">
            <text:p>2017-04-06T20:18:3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notofonts/nototools</text:p>
          </table:table-cell>
          <table:table-cell table:style-name="ce1" office:value-type="string" calcext:value-type="string">
            <text:p>['dougfelt', 'roozbehp', 'James Godfrey-Kittle', 'jamesgk', 'behdad', 'thaths', 'zjusbo', 'jungshik', 'Kanjilearner817', 'davelab6', 'adrientetar', 'moyogo', 'marekjez86', 'iverg', 'khaledhosny', 'm4rc1e', 'Marek Jeziorek', 'n7s', 'No Autho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ototools" xlink:type="simple">https://github.com/unfoldingWord-dev/nototools</text:a></text:p>
          </table:table-cell>
          <table:table-cell table:style-name="ce4" office:value-type="string" calcext:value-type="string">
            <text:p>2019-04-16T02:34:59Z</text:p>
          </table:table-cell>
          <table:table-cell table:style-name="ce4"/>
          <table:table-cell table:style-name="ce1" office:value-type="string" calcext:value-type="string">
            <text:p>unfoldingWord-dev/nototool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study</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6-25T11:20:36Z</text:p>
          </table:table-cell>
          <table:table-cell table:style-name="ce1" office:value-type="string" calcext:value-type="string">
            <text:p>2024-06-20T09:34:16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idiomaspuentes/obs-study</text:p>
          </table:table-cell>
          <table:table-cell table:style-name="ce1" office:value-type="string" calcext:value-type="string">
            <text:p>['abelpz', 'eliaspinero', 'ilich valbuena', 'Jordani77', '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obs-study" xlink:type="simple">https://github.com/unfoldingWord-box3/obs-study</text:a></text:p>
          </table:table-cell>
          <table:table-cell table:style-name="ce4" office:value-type="string" calcext:value-type="string">
            <text:p>2024-06-20T09:34:41Z</text:p>
          </table:table-cell>
          <table:table-cell table:style-name="ce4"/>
          <table:table-cell table:style-name="ce1" office:value-type="string" calcext:value-type="string">
            <text:p>unfoldingWord-box3/obs-stud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3-18T18:36:38Z</text:p>
          </table:table-cell>
          <table:table-cell table:style-name="ce1" office:value-type="string" calcext:value-type="string">
            <text:p>2026-03-18T14:39:13Z</text:p>
          </table:table-cell>
          <table:table-cell table:style-name="ce4" office:value-type="string" calcext:value-type="string">
            <text:p>2026-03-18T14:44:36Z</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1"/>
          <table:table-cell table:style-name="ce1" office:value-type="string" calcext:value-type="string">
            <text:p>bsa</text:p>
          </table:table-cell>
          <table:table-cell table:style-name="ce1" table:number-columns-repeated="4"/>
          <table:table-cell table:style-name="ce1" office:value-type="string" calcext:value-type="string">
            <text:p>['bible-reference-rcl', 'resource-workspace-rcl', 'scripture-resources-rcl', 'tc-ui-toolkit', 'translation-helps-rcl', 'word-aligner']</text:p>
          </table:table-cell>
          <table:table-cell table:style-name="ce1" office:value-type="string" calcext:value-type="string">
            <text:p>hiscoder-com/obt</text:p>
          </table:table-cell>
          <table:table-cell table:style-name="ce1" office:value-type="string" calcext:value-type="string">
            <text:p>['foxprogs', 'Valyukhov', 'Vorobushec', 'Pavel064', 'Birch Champeon', 'dimanya', 'abelpz', 'ancientTexts-net', 'birchamp', 'DenisArger', 'gecraft']</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obt" xlink:type="simple">https://github.com/unfoldingWord/obt</text:a></text:p>
          </table:table-cell>
          <table:table-cell table:style-name="ce4" office:value-type="string" calcext:value-type="string">
            <text:p>2026-03-18T14:39:46Z</text:p>
          </table:table-cell>
          <table:table-cell table:style-name="ce4"/>
          <table:table-cell table:style-name="ce1" office:value-type="string" calcext:value-type="string">
            <text:p>unfoldingWord/ob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bas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base</text:p>
          </table:table-cell>
          <table:table-cell table:style-name="ce1"/>
          <table:table-cell table:style-name="ce1" office:value-type="float" office:value="1852" calcext:value-type="float">
            <text:p>1852</text:p>
          </table:table-cell>
          <table:table-cell table:style-name="ce1" office:value-type="string" calcext:value-type="string">
            <text:p>2024-01-10T09:41:28.021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bas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852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852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base-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base-core</text:p>
          </table:table-cell>
          <table:table-cell table:style-name="ce1" table:number-columns-repeated="4"/>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base-cor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joy-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joy-core</text:p>
          </table:table-cell>
          <table:table-cell table:style-name="ce1"/>
          <table:table-cell table:style-name="ce1" office:value-type="float" office:value="407" calcext:value-type="float">
            <text:p>407</text:p>
          </table:table-cell>
          <table:table-cell table:style-name="ce1" office:value-type="string" calcext:value-type="string">
            <text:p>2024-01-10T09:45:57.004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joy-cor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407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407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joy-pk</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joy-pk</text:p>
          </table:table-cell>
          <table:table-cell table:style-name="ce1"/>
          <table:table-cell table:style-name="ce1" office:value-type="float" office:value="131" calcext:value-type="float">
            <text:p>131</text:p>
          </table:table-cell>
          <table:table-cell table:style-name="ce1" office:value-type="string" calcext:value-type="string">
            <text:p>2024-01-10T09:47:45.958Z</text:p>
          </table:table-cell>
          <table:table-cell table:style-name="ce1"/>
          <table:table-cell table:style-name="ce1" office:value-type="string" calcext:value-type="string">
            <text:p>['bible-reference-rcl', '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joy-pk</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31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31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joy-verse-navig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joy-verse-navigato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joy-verse-navigato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mui-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mui-core</text:p>
          </table:table-cell>
          <table:table-cell table:style-name="ce1"/>
          <table:table-cell table:style-name="ce1" office:value-type="float" office:value="645" calcext:value-type="float">
            <text:p>645</text:p>
          </table:table-cell>
          <table:table-cell table:style-name="ce1" office:value-type="string" calcext:value-type="string">
            <text:p>2024-01-10T09:42:28.550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mui-cor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645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645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mui-pk</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mui-pk</text:p>
          </table:table-cell>
          <table:table-cell table:style-name="ce1"/>
          <table:table-cell table:style-name="ce1" office:value-type="float" office:value="337" calcext:value-type="float">
            <text:p>337</text:p>
          </table:table-cell>
          <table:table-cell table:style-name="ce1" office:value-type="string" calcext:value-type="string">
            <text:p>2024-01-10T09:45:17.176Z</text:p>
          </table:table-cell>
          <table:table-cell table:style-name="ce1"/>
          <table:table-cell table:style-name="ce1" office:value-type="string" calcext:value-type="string">
            <text:p>['bible-reference-rcl', '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mui-pk</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337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37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mui-simp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mui-simple</text:p>
          </table:table-cell>
          <table:table-cell table:style-name="ce1"/>
          <table:table-cell table:style-name="ce1" office:value-type="float" office:value="373" calcext:value-type="float">
            <text:p>373</text:p>
          </table:table-cell>
          <table:table-cell table:style-name="ce1" office:value-type="string" calcext:value-type="string">
            <text:p>2024-01-10T09:45:39.010Z</text:p>
          </table:table-cell>
          <table:table-cell table:style-name="ce1"/>
          <table:table-cell table:style-name="ce1" office:value-type="string" calcext:value-type="string">
            <text:p>epitelete-htm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mui-simple</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373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73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mui-verse-navig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mui-verse-navigator</text:p>
          </table:table-cell>
          <table:table-cell table:style-name="ce1" table:number-columns-repeated="5"/>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mui-verse-navigato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pk-align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pk-aligner</text:p>
          </table:table-cell>
          <table:table-cell table:style-name="ce1" table:number-columns-repeated="4"/>
          <table:table-cell table:style-name="ce1" office:value-type="string" calcext:value-type="string">
            <text:p>['epitelete-html', 'string-punctuation-tokenizer', 'word-aligner-rcl']</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pk-align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ce-editor-tools/@oce-editor-tools/verse-m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9T11:01:41Z</text:p>
          </table:table-cell>
          <table:table-cell table:style-name="ce1" office:value-type="string" calcext:value-type="string">
            <text:p>2024-07-15T12:12:40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oce-editor-tools/verse-mapper</text:p>
          </table:table-cell>
          <table:table-cell table:style-name="ce1"/>
          <table:table-cell table:style-name="ce1" office:value-type="float" office:value="98" calcext:value-type="float">
            <text:p>98</text:p>
          </table:table-cell>
          <table:table-cell table:style-name="ce1" office:value-type="string" calcext:value-type="string">
            <text:p>2024-01-10T09:46:28.087Z</text:p>
          </table:table-cell>
          <table:table-cell table:style-name="ce1" table:number-columns-repeated="2"/>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DenisArger/my-usfm-editor', 'larsgson/vscode-ext-usfm-editor-webview', 'unfoldingWord/oce-oak-render', 'unfoldingWord/gateway-translate', 'unfoldingWord/oce-oak-edit', 'unfoldingWord/door43-preview-app']</text:p>
          </table:table-cell>
          <table:table-cell table:style-name="ce1" office:value-type="string" calcext:value-type="string">
            <text:p>['larsgson', 'abelpz', 'RUN-Projects', 'PhotoNomad0',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ce-editor-tools" xlink:type="simple">https://github.com/unfoldingWord/oce-editor-tools</text:a></text:p>
          </table:table-cell>
          <table:table-cell table:style-name="ce4" office:value-type="string" calcext:value-type="string">
            <text:p>2024-07-15T12:12:44Z</text:p>
          </table:table-cell>
          <table:table-cell table:style-name="ce4"/>
          <table:table-cell table:style-name="ce1" office:value-type="string" calcext:value-type="string">
            <text:p>unfoldingWord/oce-editor-tools/@oce-editor-tools/verse-mapp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98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98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pagequery</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5-06-22T18:41:28Z</text:p>
          </table:table-cell>
          <table:table-cell table:style-name="ce1" office:value-type="string" calcext:value-type="string">
            <text:p>2015-06-22T18:41:23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superdav42/pagequery</text:p>
          </table:table-cell>
          <table:table-cell table:style-name="ce1" office:value-type="string" calcext:value-type="string">
            <text:p>['MrBertie', 'superdav42', 'gamma', 'mprins', 'glensc', 'topical', 'sawacha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agequery" xlink:type="simple">https://github.com/unfoldingWord-dev/pagequery</text:a></text:p>
          </table:table-cell>
          <table:table-cell table:style-name="ce4" office:value-type="string" calcext:value-type="string">
            <text:p>2015-12-11T18:59:22Z</text:p>
          </table:table-cell>
          <table:table-cell table:style-name="ce4"/>
          <table:table-cell table:style-name="ce1" office:value-type="string" calcext:value-type="string">
            <text:p>unfoldingWord-dev/pagequer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pankosmia-web</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05-07T12:53:06Z</text:p>
          </table:table-cell>
          <table:table-cell table:style-name="ce1" office:value-type="string" calcext:value-type="string">
            <text:p>2025-05-04T16:46:45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ankosmia/pankosmia-web</text:p>
          </table:table-cell>
          <table:table-cell table:style-name="ce1" office:value-type="string" calcext:value-type="string">
            <text:p>['mvahowe', 'RUN-Projects', 'lmelin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pankosmia-web" xlink:type="simple">https://github.com/unfoldingWord-box3/pankosmia-web</text:a></text:p>
          </table:table-cell>
          <table:table-cell table:style-name="ce4" office:value-type="string" calcext:value-type="string">
            <text:p>2025-05-05T03:19:17Z</text:p>
          </table:table-cell>
          <table:table-cell table:style-name="ce4"/>
          <table:table-cell table:style-name="ce1" office:value-type="string" calcext:value-type="string">
            <text:p>unfoldingWord-box3/pankosmia-web</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proskomma-react-hook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24T20:05:30Z</text:p>
          </table:table-cell>
          <table:table-cell table:style-name="ce1" office:value-type="string" calcext:value-type="string">
            <text:p>2022-07-15T18:05:20Z</text:p>
          </table:table-cell>
          <table:table-cell table:style-name="ce4"/>
          <table:table-cell table:style-name="ce4" office:value-type="float" office:value="10" calcext:value-type="float">
            <text:p>10</text:p>
          </table:table-cell>
          <table:table-cell table:style-name="ce4" office:value-type="float" office:value="1" calcext:value-type="float">
            <text:p>1</text:p>
          </table:table-cell>
          <table:table-cell table:style-name="ce1" table:number-columns-repeated="7"/>
          <table:table-cell table:style-name="ce1" office:value-type="string" calcext:value-type="string">
            <text:p>['eten-tech-foundation/scribe-extensions', 'bible-technology/scribe-scripture-editor', 'vipinpaul/autographa', 'unfoldingWord/oce-editor-tools', 'unfoldingWord/translationCore', 'friendsofagape/autographa', 'Proskomma/proskomma-legacy-projects', 'unfoldingWord/uw-editor', 'unfoldingWord/gateway-translate', 'Proskomma/perfidy']</text:p>
          </table:table-cell>
          <table:table-cell table:style-name="ce1" office:value-type="string" calcext:value-type="string">
            <text:p>['klappy', 'mvahowe', 'PhotoNomad0', 'jincypjose',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proskomma-react-hooks" xlink:type="simple">https://github.com/unfoldingWord/proskomma-react-hooks</text:a></text:p>
          </table:table-cell>
          <table:table-cell table:style-name="ce4" office:value-type="string" calcext:value-type="string">
            <text:p>2022-06-17T15:50:39Z</text:p>
          </table:table-cell>
          <table:table-cell table:style-name="ce4"/>
          <table:table-cell table:style-name="ce1" office:value-type="string" calcext:value-type="string">
            <text:p>unfoldingWord/proskomma-react-hook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proskomma-render-preview</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2-03-23T16:51:37Z</text:p>
          </table:table-cell>
          <table:table-cell table:style-name="ce1" office:value-type="string" calcext:value-type="string">
            <text:p>2021-10-19T09:03:07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roskomma/proskomma-render-pdf</text:p>
          </table:table-cell>
          <table:table-cell table:style-name="ce1" office:value-type="string" calcext:value-type="string">
            <text:p>mvahow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roskomma-render-preview" xlink:type="simple">https://github.com/unfoldingWord-dev/proskomma-render-preview</text:a></text:p>
          </table:table-cell>
          <table:table-cell table:style-name="ce4" office:value-type="string" calcext:value-type="string">
            <text:p>2022-03-22T12:58:28Z</text:p>
          </table:table-cell>
          <table:table-cell table:style-name="ce4"/>
          <table:table-cell table:style-name="ce1" office:value-type="string" calcext:value-type="string">
            <text:p>unfoldingWord-dev/proskomma-render-preview</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python-dcs-api-clien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23T20:41:15Z</text:p>
          </table:table-cell>
          <table:table-cell table:style-name="ce1" office:value-type="string" calcext:value-type="string">
            <text:p>2023-08-23T20:40:19Z</text:p>
          </table:table-cell>
          <table:table-cell table:style-name="ce4" office:value-type="string" calcext:value-type="string">
            <text:p>2023-08-23T20:41:15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alphavector/all', 'Lyn4ever29/pipy_server', 'unfoldingWord/door43-job-handler', 'unfoldingWord/tx-job-handler']</text:p>
          </table:table-cell>
          <table:table-cell table:style-name="ce1" office:value-type="string" calcext:value-type="string">
            <text:p>['richmahn', 'RajeshHegde', 'jakobandersen']</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5" office:value-type="string" calcext:value-type="string">
            <text:p><text:a xlink:href="https://github.com/unfoldingWord/python-dcs-api-client" xlink:type="simple">https://github.com/unfoldingWord/python-dcs-api-client</text:a></text:p>
          </table:table-cell>
          <table:table-cell table:style-name="ce4" office:value-type="string" calcext:value-type="string">
            <text:p>2022-10-04T15:56:11Z</text:p>
          </table:table-cell>
          <table:table-cell table:style-name="ce4"/>
          <table:table-cell table:style-name="ce1" office:value-type="string" calcext:value-type="string">
            <text:p>unfoldingWord/python-dcs-api-clien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python-dcs-catalog-clien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5-25T20:09:27Z</text:p>
          </table:table-cell>
          <table:table-cell table:style-name="ce1" office:value-type="string" calcext:value-type="string">
            <text:p>2022-05-25T20:09:23Z</text:p>
          </table:table-cell>
          <table:table-cell table:style-name="ce4" office:value-type="string" calcext:value-type="string">
            <text:p>2022-05-17T17:37:53Z</text:p>
          </table:table-cell>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alphavector/all', 'Lyn4ever29/pipy_server', 'unfoldingWord/tx-job-handler']</text:p>
          </table:table-cell>
          <table:table-cell table:style-name="ce1" office:value-type="string" calcext:value-type="string">
            <text:p>['RajeshHegde', 'richmahn', 'jakobandersen']</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5" office:value-type="string" calcext:value-type="string">
            <text:p><text:a xlink:href="https://github.com/unfoldingWord/python-dcs-catalog-client" xlink:type="simple">https://github.com/unfoldingWord/python-dcs-catalog-client</text:a></text:p>
          </table:table-cell>
          <table:table-cell table:style-name="ce4" office:value-type="string" calcext:value-type="string">
            <text:p>2022-10-04T15:55:38Z</text:p>
          </table:table-cell>
          <table:table-cell table:style-name="ce4"/>
          <table:table-cell table:style-name="ce1" office:value-type="string" calcext:value-type="string">
            <text:p>unfoldingWord/python-dcs-catalog-clien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react-library-starter</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3-02-16T23:27:4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my-lib</text:p>
          </table:table-cell>
          <table:table-cell table:style-name="ce1" table:number-columns-repeated="5"/>
          <table:table-cell table:style-name="ce1" office:value-type="string" calcext:value-type="string">
            <text:p>abelpz/react-library</text:p>
          </table:table-cell>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act-library-starter" xlink:type="simple">https://github.com/unfoldingWord-box3/react-library-starter</text:a></text:p>
          </table:table-cell>
          <table:table-cell table:style-name="ce4" office:value-type="string" calcext:value-type="string">
            <text:p>2023-02-16T14:47:55Z</text:p>
          </table:table-cell>
          <table:table-cell table:style-name="ce4"/>
          <table:table-cell table:style-name="ce1" office:value-type="string" calcext:value-type="string">
            <text:p>unfoldingWord-box3/react-library-start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react-to-electron-action</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8-18T19:24:40Z</text:p>
          </table:table-cell>
          <table:table-cell table:style-name="ce1" office:value-type="string" calcext:value-type="string">
            <text:p>2020-05-06T12:37:26Z</text:p>
          </table:table-cell>
          <table:table-cell table:style-name="ce4"/>
          <table:table-cell table:number-columns-repeated="2" table:style-name="ce4" office:value-type="float" office:value="2" calcext:value-type="float">
            <text:p>2</text:p>
          </table:table-cell>
          <table:table-cell table:style-name="ce1"/>
          <table:table-cell table:style-name="ce1" office:value-type="string" calcext:value-type="string">
            <text:p>react-to-electron-action</text:p>
          </table:table-cell>
          <table:table-cell table:style-name="ce1" table:number-columns-repeated="5"/>
          <table:table-cell table:style-name="ce1" office:value-type="string" calcext:value-type="string">
            <text:p>['unfoldingWord/book-package-app', 'mandolyte/rrouter']</text:p>
          </table:table-cell>
          <table:table-cell table:style-name="ce1" office:value-type="string" calcext:value-type="string">
            <text:p>['mandolyte', 'dependabot[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act-to-electron-action" xlink:type="simple">https://github.com/unfoldingWord-box3/react-to-electron-action</text:a></text:p>
          </table:table-cell>
          <table:table-cell table:style-name="ce4" office:value-type="string" calcext:value-type="string">
            <text:p>2020-05-06T12:37:30Z</text:p>
          </table:table-cell>
          <table:table-cell table:style-name="ce4"/>
          <table:table-cell table:style-name="ce1" office:value-type="string" calcext:value-type="string">
            <text:p>unfoldingWord-box3/react-to-electron-acti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RepoList</text:p>
          </table:table-cell>
          <table:table-cell table:style-name="ce1" office:value-type="string" calcext:value-type="string">
            <text:p>unfoldingWord-box3</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16T19:51:50Z</text:p>
          </table:table-cell>
          <table:table-cell table:style-name="ce1" office:value-type="string" calcext:value-type="string">
            <text:p>2026-06-16T19:51:46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PhotoNomad0/RepoList</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RepoList" xlink:type="simple">https://github.com/unfoldingWord-box3/RepoList</text:a></text:p>
          </table:table-cell>
          <table:table-cell table:style-name="ce4" office:value-type="string" calcext:value-type="string">
            <text:p>2026-06-16T19:51:55Z</text:p>
          </table:table-cell>
          <table:table-cell table:style-name="ce4"/>
          <table:table-cell table:style-name="ce1" office:value-type="string" calcext:value-type="string">
            <text:p>unfoldingWord-box3/RepoLis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tableTTS_Editing</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5-03-07T13:20:53Z</text:p>
          </table:table-cell>
          <table:table-cell table:style-name="ce1" office:value-type="string" calcext:value-type="string">
            <text:p>2025-03-06T13:50:35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JEdward7777/StableTTS_Editing</text:p>
          </table:table-cell>
          <table:table-cell table:style-name="ce1" office:value-type="string" calcext:value-type="string">
            <text:p>['Joshua Lansford', 'Kdai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tableTTS_Editing" xlink:type="simple">https://github.com/unfoldingWord-box3/StableTTS_Editing</text:a></text:p>
          </table:table-cell>
          <table:table-cell table:style-name="ce4" office:value-type="string" calcext:value-type="string">
            <text:p>2025-03-06T14:31:54Z</text:p>
          </table:table-cell>
          <table:table-cell table:style-name="ce4"/>
          <table:table-cell table:style-name="ce1" office:value-type="string" calcext:value-type="string">
            <text:p>unfoldingWord-box3/StableTTS_Editing</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uggesting-word-aligner</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5-06-17T13:49:01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JEdward7777/alignment-transferer</text:p>
          </table:table-cell>
          <table:table-cell table:style-name="ce1" office:value-type="string" calcext:value-type="string">
            <text:p>['Joshua Lansford', 'JEdward7777']</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uggesting-word-aligner" xlink:type="simple">https://github.com/unfoldingWord-box3/suggesting-word-aligner</text:a></text:p>
          </table:table-cell>
          <table:table-cell table:style-name="ce4" office:value-type="string" calcext:value-type="string">
            <text:p>2025-06-19T19:45:56Z</text:p>
          </table:table-cell>
          <table:table-cell table:style-name="ce4"/>
          <table:table-cell table:style-name="ce1" office:value-type="string" calcext:value-type="string">
            <text:p>unfoldingWord-box3/suggesting-word-align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core-submodule-upda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9-10-22T20:22:22Z</text:p>
          </table:table-cell>
          <table:table-cell table:style-name="ce1" office:value-type="string" calcext:value-type="string">
            <text:p>2019-10-22T20:22:2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c-submodule-manager</text:p>
          </table:table-cell>
          <table:table-cell table:style-name="ce1" table:number-columns-repeated="5"/>
          <table:table-cell table:style-name="ce1" office:value-type="string" calcext:value-type="string">
            <text:p>ihoegen/translationCore-submodule-updater</text:p>
          </table:table-cell>
          <table:table-cell table:style-name="ce1" office:value-type="string" calcext:value-type="string">
            <text:p>['ihoegen',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ore-submodule-updater" xlink:type="simple">https://github.com/unfoldingWord/t-core-submodule-updater</text:a></text:p>
          </table:table-cell>
          <table:table-cell table:style-name="ce4" office:value-type="string" calcext:value-type="string">
            <text:p>2019-10-22T20:22:23Z</text:p>
          </table:table-cell>
          <table:table-cell table:style-name="ce4"/>
          <table:table-cell table:style-name="ce1" office:value-type="string" calcext:value-type="string">
            <text:p>unfoldingWord/t-core-submodule-update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act</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5-11-03T19:01:07Z</text:p>
          </table:table-cell>
          <table:table-cell table:style-name="ce4"/>
          <table:table-cell table:style-name="ce4" office:value-type="float" office:value="24" calcext:value-type="float">
            <text:p>24</text:p>
          </table:table-cell>
          <table:table-cell table:style-name="ce4" office:value-type="float" office:value="1" calcext:value-type="float">
            <text:p>1</text:p>
          </table:table-cell>
          <table:table-cell table:style-name="ce1"/>
          <table:table-cell table:style-name="ce1" office:value-type="string" calcext:value-type="string">
            <text:p>tact</text:p>
          </table:table-cell>
          <table:table-cell table:style-name="ce1" table:number-columns-repeated="5"/>
          <table:table-cell table:style-name="ce1" office:value-type="string" calcext:value-type="string">
            <text:p>['graymoonlight/CRBank', 'magistrigusti/Dominum_DOM', 'singhyash05/BitTonica', 'jubbslineu/contract-test']</text:p>
          </table:table-cell>
          <table:table-cell table:style-name="ce1" office:value-type="string" calcext:value-type="string">
            <text:p>['klappy', '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act" xlink:type="simple">https://github.com/unfoldingWord-box3/tact</text:a></text:p>
          </table:table-cell>
          <table:table-cell table:style-name="ce4" office:value-type="string" calcext:value-type="string">
            <text:p>2025-11-03T19:01:10Z</text:p>
          </table:table-cell>
          <table:table-cell table:style-name="ce4"/>
          <table:table-cell table:style-name="ce1" office:value-type="string" calcext:value-type="string">
            <text:p>unfoldingWord-box3/tac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create-poc</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7-05T17:42:04Z</text:p>
          </table:table-cell>
          <table:table-cell table:style-name="ce1" office:value-type="string" calcext:value-type="string">
            <text:p>2021-07-05T17:41:5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c-create-app</text:p>
          </table:table-cell>
          <table:table-cell table:style-name="ce1" table:formula="of:=FALSE()" office:value-type="float" office:value="0" calcext:value-type="float">
            <text:p>0</text:p>
          </table:table-cell>
          <table:table-cell table:style-name="ce1" office:value-type="float" office:value="73" calcext:value-type="float">
            <text:p>73</text:p>
          </table:table-cell>
          <table:table-cell table:style-name="ce1" office:value-type="string" calcext:value-type="string">
            <text:p>2022-02-22T21:12:10.659Z</text:p>
          </table:table-cell>
          <table:table-cell table:style-name="ce1"/>
          <table:table-cell table:style-name="ce1" office:value-type="string" calcext:value-type="string">
            <text:p>['datatable-translatable', 'gitea-react-toolkit', 'markdown-translatable', 'scripture-resources-rcl', 'usfm-js', 'uw-content-validation', '@unfoldingword/eslint-config']</text:p>
          </table:table-cell>
          <table:table-cell table:style-name="ce1" office:value-type="string" calcext:value-type="string">
            <text:p>unfoldingWord/tc-create-app</text:p>
          </table:table-cell>
          <table:table-cell table:style-name="ce1" office:value-type="string" calcext:value-type="string">
            <text:p>['ancientTexts-net', 'RoyalSix', 'klappy', 'dependabot[bot]', 'mandolyte', 'Sterling (Jay) Scott', 'actions-user', 'dependabot-preview[bot]', 'jag3773', 'PhotoNomad0', 'bircham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c-create-poc" xlink:type="simple">https://github.com/unfoldingWord-box3/tc-create-poc</text:a></text:p>
          </table:table-cell>
          <table:table-cell table:style-name="ce4" office:value-type="string" calcext:value-type="string">
            <text:p>2021-12-03T15:55:03Z</text:p>
          </table:table-cell>
          <table:table-cell table:style-name="ce4"/>
          <table:table-cell table:style-name="ce1" office:value-type="string" calcext:value-type="string">
            <text:p>unfoldingWord-box3/tc-create-poc</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73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73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electron-env</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3-15T16:52:56Z</text:p>
          </table:table-cell>
          <table:table-cell table:style-name="ce1" office:value-type="string" calcext:value-type="string">
            <text:p>2020-03-23T19:09:5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FoustAndrew/wordAlignment', 'mannycolon/electronite-poc-app', 'unfoldingWord/translationCore', 'unfoldingWord/wordAlignment', 'unfoldingWord/checking-tool-wrapper']</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electron-env" xlink:type="simple">https://github.com/unfoldingWord/tc-electron-env</text:a></text:p>
          </table:table-cell>
          <table:table-cell table:style-name="ce4" office:value-type="string" calcext:value-type="string">
            <text:p>2020-03-23T19:09:57Z</text:p>
          </table:table-cell>
          <table:table-cell table:style-name="ce4"/>
          <table:table-cell table:style-name="ce1" office:value-type="string" calcext:value-type="string">
            <text:p>unfoldingWord/tc-electron-env</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helps-mc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6-06T05:40:18Z</text:p>
          </table:table-cell>
          <table:table-cell table:style-name="ce1" office:value-type="string" calcext:value-type="string">
            <text:p>2026-05-05T16:33:43Z</text:p>
          </table:table-cell>
          <table:table-cell table:style-name="ce4"/>
          <table:table-cell table:style-name="ce4" office:value-type="float" office:value="9" calcext:value-type="float">
            <text:p>9</text:p>
          </table:table-cell>
          <table:table-cell table:style-name="ce4" office:value-type="float" office:value="1" calcext:value-type="float">
            <text:p>1</text:p>
          </table:table-cell>
          <table:table-cell table:style-name="ce1"/>
          <table:table-cell table:style-name="ce1" office:value-type="string" calcext:value-type="string">
            <text:p>translation-helps-mcp</text:p>
          </table:table-cell>
          <table:table-cell table:style-name="ce1" table:number-columns-repeated="5"/>
          <table:table-cell table:style-name="ce1" office:value-type="string" calcext:value-type="string">
            <text:p>klappy/translation-helps-mcp</text:p>
          </table:table-cell>
          <table:table-cell table:style-name="ce1" office:value-type="string" calcext:value-type="string">
            <text:p>['klappy', 'azrasgdc', 'abelpz', 'cursoragen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ranslation-helps-mcp" xlink:type="simple">https://github.com/unfoldingWord/translation-helps-mcp</text:a></text:p>
          </table:table-cell>
          <table:table-cell table:style-name="ce4" office:value-type="string" calcext:value-type="string">
            <text:p>2026-05-05T16:33:48Z</text:p>
          </table:table-cell>
          <table:table-cell table:style-name="ce4"/>
          <table:table-cell table:style-name="ce1" office:value-type="string" calcext:value-type="string">
            <text:p>unfoldingWord/translation-helps-mcp</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notes-extension</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7T18:28:19Z</text:p>
          </table:table-cell>
          <table:table-cell table:style-name="ce1" office:value-type="string" calcext:value-type="string">
            <text:p>2024-03-27T18:28:00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kintsoogi/translation-notes-extension</text:p>
          </table:table-cell>
          <table:table-cell table:style-name="ce1" office:value-type="string" calcext:value-type="string">
            <text:p>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notes-extension" xlink:type="simple">https://github.com/unfoldingWord-box3/translation-notes-extension</text:a></text:p>
          </table:table-cell>
          <table:table-cell table:style-name="ce4" office:value-type="string" calcext:value-type="string">
            <text:p>2024-06-10T15:18:59Z</text:p>
          </table:table-cell>
          <table:table-cell table:style-name="ce4"/>
          <table:table-cell table:style-name="ce1" office:value-type="string" calcext:value-type="string">
            <text:p>unfoldingWord-box3/translation-notes-extensio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project</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0T17:43:25Z</text:p>
          </table:table-cell>
          <table:table-cell table:style-name="ce1" office:value-type="string" calcext:value-type="string">
            <text:p>2024-03-20T17:43:20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ryderwishart/translation-project</text:p>
          </table:table-cell>
          <table:table-cell table:style-name="ce1" office:value-type="string" calcext:value-type="string">
            <text:p>ryderwisha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ranslation-project" xlink:type="simple">https://github.com/unfoldingWord-box3/translation-project</text:a></text:p>
          </table:table-cell>
          <table:table-cell table:style-name="ce4" office:value-type="string" calcext:value-type="string">
            <text:p>2024-06-10T15:22:27Z</text:p>
          </table:table-cell>
          <table:table-cell table:style-name="ce4"/>
          <table:table-cell table:style-name="ce1" office:value-type="string" calcext:value-type="string">
            <text:p>unfoldingWord-box3/translation-projec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SFM-Tool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9-11-19T01:34:28Z</text:p>
          </table:table-cell>
          <table:table-cell table:style-name="ce1" office:value-type="string" calcext:value-type="string">
            <text:p>2019-11-19T01:34:27Z</text:p>
          </table:table-cell>
          <table:table-cell table:style-name="ce4" office:value-type="string" calcext:value-type="string">
            <text:p>2017-08-24T19:20:35Z</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1" table:number-columns-repeated="7"/>
          <table:table-cell table:style-name="ce1" office:value-type="string" calcext:value-type="string">
            <text:p>openenglishbible/USFM-Tools</text:p>
          </table:table-cell>
          <table:table-cell table:style-name="ce1" office:value-type="string" calcext:value-type="string">
            <text:p>['Richard Mahn', 'kbuildsyourdotcom', 'Jesse A. Griffin', 'openenglishbible', 'da1nerd', 'richmahn', 'phillip-hopper', 'Phil Hopper', 'jag3773', 'rbnswartz', 'PhotoNomad0']</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dev/USFM-Tools" xlink:type="simple">https://github.com/unfoldingWord-dev/USFM-Tools</text:a></text:p>
          </table:table-cell>
          <table:table-cell table:style-name="ce4" office:value-type="string" calcext:value-type="string">
            <text:p>2025-12-05T16:07:19Z</text:p>
          </table:table-cell>
          <table:table-cell table:style-name="ce4"/>
          <table:table-cell table:style-name="ce1" office:value-type="string" calcext:value-type="string">
            <text:p>unfoldingWord-dev/USFM-Tools</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codex-editor</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26T20:54:08Z</text:p>
          </table:table-cell>
          <table:table-cell table:style-name="ce1" office:value-type="string" calcext:value-type="string">
            <text:p>2024-03-26T20:53:58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genesis-ai-dev/codex-editor</text:p>
          </table:table-cell>
          <table:table-cell table:style-name="ce1" office:value-type="string" calcext:value-type="string">
            <text:p>['ryderwishart', 'BenjaminScholtens', 'Daniel Losey', 'dadukhankevin', 'brianineza01', 'kintsoogi', 'CalJosKos', 'Kalisa11', 'PhotoNomad0', 'samuelj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uw-codex-editor" xlink:type="simple">https://github.com/unfoldingWord-box3/uw-codex-editor</text:a></text:p>
          </table:table-cell>
          <table:table-cell table:style-name="ce4" office:value-type="string" calcext:value-type="string">
            <text:p>2024-03-28T07:20:52Z</text:p>
          </table:table-cell>
          <table:table-cell table:style-name="ce4"/>
          <table:table-cell table:style-name="ce1" office:value-type="string" calcext:value-type="string">
            <text:p>unfoldingWord-box3/uw-codex-edito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edi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9-12T15:49:20Z</text:p>
          </table:table-cell>
          <table:table-cell table:style-name="ce1" office:value-type="string" calcext:value-type="string">
            <text:p>2023-09-12T15:49:12Z</text:p>
          </table:table-cell>
          <table:table-cell table:style-name="ce4"/>
          <table:table-cell table:style-name="ce4" office:value-type="float" office:value="5" calcext:value-type="float">
            <text:p>5</text:p>
          </table:table-cell>
          <table:table-cell table:style-name="ce4" office:value-type="float" office:value="3" calcext:value-type="float">
            <text:p>3</text:p>
          </table:table-cell>
          <table:table-cell table:style-name="ce1"/>
          <table:table-cell table:style-name="ce1" office:value-type="string" calcext:value-type="string">
            <text:p>uw-editor</text:p>
          </table:table-cell>
          <table:table-cell table:style-name="ce1" table:formula="of:=TRUE()" office:value-type="float" office:value="1" calcext:value-type="float">
            <text:p>1</text:p>
          </table:table-cell>
          <table:table-cell table:style-name="ce1" office:value-type="float" office:value="1183" calcext:value-type="float">
            <text:p>1183</text:p>
          </table:table-cell>
          <table:table-cell table:style-name="ce1" office:value-type="string" calcext:value-type="string">
            <text:p>2023-03-21T14:43:38.471Z</text:p>
          </table:table-cell>
          <table:table-cell table:style-name="ce1"/>
          <table:table-cell table:style-name="ce1" office:value-type="string" calcext:value-type="string">
            <text:p>['epitelete-html', 'translation-helps-rcl']</text:p>
          </table:table-cell>
          <table:table-cell table:style-name="ce1" office:value-type="string" calcext:value-type="string">
            <text:p>unfoldingWord/gateway-translate</text:p>
          </table:table-cell>
          <table:table-cell table:style-name="ce1" office:value-type="string" calcext:value-type="string">
            <text:p>['larsgson', 'mandolyte', 'superdav42', 'abelpz', 'irahopkin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editor" xlink:type="simple">https://github.com/unfoldingWord/uw-editor</text:a></text:p>
          </table:table-cell>
          <table:table-cell table:style-name="ce4" office:value-type="string" calcext:value-type="string">
            <text:p>2022-10-19T03:29:50Z</text:p>
          </table:table-cell>
          <table:table-cell table:style-name="ce4"/>
          <table:table-cell table:style-name="ce1" office:value-type="string" calcext:value-type="string">
            <text:p>unfoldingWord/uw-editor</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1183 downloads).</text:p>
          </table:table-cell>
          <table:table-cell table:style-name="ce4" office:value-type="string" calcext:value-type="string">
            <text:p>Deprecated npm package</text:p>
          </table:table-cell>
          <table:table-cell table:style-name="ce1" office:value-type="string" calcext:value-type="string">
            <text:p>Npm package is already explicitly marked as deprecated.</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w-web</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7-03-25T14:53:13Z</text:p>
          </table:table-cell>
          <table:table-cell table:style-name="ce1" office:value-type="string" calcext:value-type="string">
            <text:p>2017-03-25T14:53:08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BrowserBible</text:p>
          </table:table-cell>
          <table:table-cell table:style-name="ce1" table:number-columns-repeated="5"/>
          <table:table-cell table:style-name="ce1" office:value-type="string" calcext:value-type="string">
            <text:p>digitalbiblesociety/browserbible-3</text:p>
          </table:table-cell>
          <table:table-cell table:style-name="ce1" office:value-type="string" calcext:value-type="string">
            <text:p>['johndyer', 'codemis', 'phillip-hopper', 'alerque', 'Jesse A. Griffin', 'jag3773', 'explorigin', 'maf-jclark', 'nikaro', 'Zohma', 'rbnswartz', 'Phil Hopper', 'da1nerd', 'Jay', 'Gogs', 'anthonycrumley', 'chriskrycho', 'runlevelsix', 'Jonathan Bitgood', 'Timothy Farrell', 'joshykurian', 'pdatt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web" xlink:type="simple">https://github.com/unfoldingWord-dev/uw-web</text:a></text:p>
          </table:table-cell>
          <table:table-cell table:style-name="ce4" office:value-type="string" calcext:value-type="string">
            <text:p>2020-09-11T14:39:54Z</text:p>
          </table:table-cell>
          <table:table-cell table:style-name="ce4"/>
          <table:table-cell table:style-name="ce1" office:value-type="string" calcext:value-type="string">
            <text:p>unfoldingWord-dev/uw-web</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VscOceUsfmEdit</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4-02-02T13:44:5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ce-usfm-editor</text:p>
          </table:table-cell>
          <table:table-cell table:style-name="ce1" table:number-columns-repeated="5"/>
          <table:table-cell table:style-name="ce1" office:value-type="string" calcext:value-type="string">
            <text:p>unfoldingWord-box3/VscUsfmEditAlign</text:p>
          </table:table-cell>
          <table:table-cell table:style-name="ce1" office:value-type="string" calcext:value-type="string">
            <text:p>['Joshua Lansford', 'larsgson', 'PhotoNomad0', 'bl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VscOceUsfmEdit" xlink:type="simple">https://github.com/unfoldingWord-box3/VscOceUsfmEdit</text:a></text:p>
          </table:table-cell>
          <table:table-cell table:style-name="ce4" office:value-type="string" calcext:value-type="string">
            <text:p>2024-02-02T13:45:00Z</text:p>
          </table:table-cell>
          <table:table-cell table:style-name="ce4"/>
          <table:table-cell table:style-name="ce1" office:value-type="string" calcext:value-type="string">
            <text:p>unfoldingWord-box3/VscOceUsfmEdi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vscode-speech-to-text</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3-07T15:31:48Z</text:p>
          </table:table-cell>
          <table:table-cell table:style-name="ce1" office:value-type="string" calcext:value-type="string">
            <text:p>2022-04-04T07:52:29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olefjaerestad/vscode-speech-to-text</text:p>
          </table:table-cell>
          <table:table-cell table:style-name="ce1" office:value-type="string" calcext:value-type="string">
            <text:p>['olefjaerestad', 'dependabot[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vscode-speech-to-text" xlink:type="simple">https://github.com/unfoldingWord-box3/vscode-speech-to-text</text:a></text:p>
          </table:table-cell>
          <table:table-cell table:style-name="ce4" office:value-type="string" calcext:value-type="string">
            <text:p>2024-03-07T15:14:34Z</text:p>
          </table:table-cell>
          <table:table-cell table:style-name="ce4"/>
          <table:table-cell table:style-name="ce1" office:value-type="string" calcext:value-type="string">
            <text:p>unfoldingWord-box3/vscode-speech-to-text</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VscUsfmEditAlign</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4-02-15T14:05:55Z</text:p>
          </table:table-cell>
          <table:table-cell table:style-name="ce1" office:value-type="string" calcext:value-type="string">
            <text:p>2024-02-13T19:43:4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sfmeditor</text:p>
          </table:table-cell>
          <table:table-cell table:style-name="ce1" table:number-columns-repeated="5"/>
          <table:table-cell table:style-name="ce1" office:value-type="string" calcext:value-type="string">
            <text:p>JEdward7777/VsCodeUsfmAligner</text:p>
          </table:table-cell>
          <table:table-cell table:style-name="ce1" office:value-type="string" calcext:value-type="string">
            <text:p>['Joshua Lansford', 'PhotoNomad0', 'bl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VscUsfmEditAlign" xlink:type="simple">https://github.com/unfoldingWord-box3/VscUsfmEditAlign</text:a></text:p>
          </table:table-cell>
          <table:table-cell table:style-name="ce4" office:value-type="string" calcext:value-type="string">
            <text:p>2024-02-15T14:03:06Z</text:p>
          </table:table-cell>
          <table:table-cell table:style-name="ce4"/>
          <table:table-cell table:style-name="ce1" office:value-type="string" calcext:value-type="string">
            <text:p>unfoldingWord-box3/VscUsfmEditAlign</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ebhook-relay</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18-01-22T23:48:40Z</text:p>
          </table:table-cell>
          <table:table-cell table:style-name="ce1" office:value-type="string" calcext:value-type="string">
            <text:p>2018-01-22T23:48:02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lscsoft/webhook-relay</text:p>
          </table:table-cell>
          <table:table-cell table:style-name="ce1" office:value-type="string" calcext:value-type="string">
            <text:p>tpdowne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webhook-relay" xlink:type="simple">https://github.com/unfoldingWord-dev/webhook-relay</text:a></text:p>
          </table:table-cell>
          <table:table-cell table:style-name="ce4" office:value-type="string" calcext:value-type="string">
            <text:p>2018-06-06T20:21:12Z</text:p>
          </table:table-cell>
          <table:table-cell table:style-name="ce4"/>
          <table:table-cell table:style-name="ce1" office:value-type="string" calcext:value-type="string">
            <text:p>unfoldingWord-dev/webhook-relay</text:p>
          </table:table-cell>
          <table:table-cell table:style-name="ce4" office:value-type="string" calcext:value-type="string">
            <text:p>2-Keep - externally used</text:p>
          </table:table-cell>
          <table:table-cell table:style-name="ce1" office:value-type="string" calcext:value-type="string">
            <text:p>Repository has GitHub dependents or at least 1,000 npm downloads in the last year (0 download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alignment-editor-rcl</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1-06-24T05:19:56Z</text:p>
          </table:table-cell>
          <table:table-cell table:style-name="ce1" office:value-type="string" calcext:value-type="string">
            <text:p>2021-06-21T20:30:5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alignment-editor-rcl</text:p>
          </table:table-cell>
          <table:table-cell table:style-name="ce1" table:number-columns-repeated="3"/>
          <table:table-cell table:style-name="ce1" office:value-type="string" calcext:value-type="string">
            <text:p>anchor-alignment-poc</text:p>
          </table:table-cell>
          <table:table-cell table:style-name="ce1"/>
          <table:table-cell table:style-name="ce1" office:value-type="string" calcext:value-type="string">
            <text:p>gbin-org/alignment-editor-rcl</text:p>
          </table:table-cell>
          <table:table-cell table:style-name="ce1" office:value-type="string" calcext:value-type="string">
            <text:p>['themikejr', 'ancientTexts-ne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alignment-editor-rcl" xlink:type="simple">https://github.com/unfoldingWord-box3/alignment-editor-rcl</text:a></text:p>
          </table:table-cell>
          <table:table-cell table:style-name="ce4" office:value-type="string" calcext:value-type="string">
            <text:p>2022-06-14T15:15:26Z</text:p>
          </table:table-cell>
          <table:table-cell table:style-name="ce4"/>
          <table:table-cell table:style-name="ce1" office:value-type="string" calcext:value-type="string">
            <text:p>unfoldingWord-box3/alignment-editor-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bible-reference-rang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07T19:15:38Z</text:p>
          </table:table-cell>
          <table:table-cell table:style-name="ce1" office:value-type="string" calcext:value-type="string">
            <text:p>2023-12-07T18:20:1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bible-reference-range</text:p>
          </table:table-cell>
          <table:table-cell table:style-name="ce1" table:formula="of:=FALSE()" office:value-type="float" office:value="0" calcext:value-type="float">
            <text:p>0</text:p>
          </table:table-cell>
          <table:table-cell table:style-name="ce1" office:value-type="float" office:value="16712" calcext:value-type="float">
            <text:p>16712</text:p>
          </table:table-cell>
          <table:table-cell table:style-name="ce1" office:value-type="string" calcext:value-type="string">
            <text:p>2023-12-07T19:15:35.590Z</text:p>
          </table:table-cell>
          <table:table-cell table:style-name="ce1" office:value-type="string" calcext:value-type="string">
            <text:p>['checking-extension', 'alignment-playground', 'translationCore', 'enhanced-word-aligner-rcl', 'tc-create-app', 'word-aligner-rcl', 'word-aligner-lib', 'single-scripture-rcl', 'translation-helps-rcl', 'scripture-resources-rcl', 'uw-quote-helpers', 'tsv-groupdata-parser', 'checking-tool-rcl', 'bible-reference-rcl', 'scripture-tsv', 'uw-bible-parser']</text:p>
          </table:table-cell>
          <table:table-cell table:style-name="ce1" table:number-columns-repeated="2"/>
          <table:table-cell table:style-name="ce1" office:value-type="string" calcext:value-type="string">
            <text:p>['Joel-C-Johnson', 'PhotoNomad0', 'kintsoogi',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ible-reference-range" xlink:type="simple">https://github.com/unfoldingWord/bible-reference-range</text:a></text:p>
          </table:table-cell>
          <table:table-cell table:style-name="ce4" office:value-type="string" calcext:value-type="string">
            <text:p>2023-07-19T04:20:40Z</text:p>
          </table:table-cell>
          <table:table-cell table:style-name="ce4"/>
          <table:table-cell table:style-name="ce1" office:value-type="string" calcext:value-type="string">
            <text:p>unfoldingWord/bible-reference-range</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6712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bible-referenc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04T12:41:01Z</text:p>
          </table:table-cell>
          <table:table-cell table:style-name="ce1" office:value-type="string" calcext:value-type="string">
            <text:p>2024-06-04T12:38:41Z</text:p>
          </table:table-cell>
          <table:table-cell table:style-name="ce4" office:value-type="string" calcext:value-type="string">
            <text:p>2024-06-06T22:07:09Z</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1"/>
          <table:table-cell table:style-name="ce1" office:value-type="string" calcext:value-type="string">
            <text:p>bible-reference-rcl</text:p>
          </table:table-cell>
          <table:table-cell table:style-name="ce1" table:formula="of:=FALSE()" office:value-type="float" office:value="0" calcext:value-type="float">
            <text:p>0</text:p>
          </table:table-cell>
          <table:table-cell table:style-name="ce1" office:value-type="float" office:value="5135" calcext:value-type="float">
            <text:p>5135</text:p>
          </table:table-cell>
          <table:table-cell table:style-name="ce1" office:value-type="string" calcext:value-type="string">
            <text:p>2024-06-04T12:40:10.075Z</text:p>
          </table:table-cell>
          <table:table-cell table:style-name="ce1" office:value-type="string" calcext:value-type="string">
            <text:p>['bible-preview-app', 'gateway-edit', 'anchor-alignment-poc', 'create-app', 'greek-apparatus-app', 'door43-preview-app', 'bsa', 'scripture-tsv', 'gateway-translate', '@oce-editor-tools/joy-pk', '@oce-editor-tools/mui-pk']</text:p>
          </table:table-cell>
          <table:table-cell table:style-name="ce1" office:value-type="string" calcext:value-type="string">
            <text:p>bible-reference-range</text:p>
          </table:table-cell>
          <table:table-cell table:style-name="ce1" office:value-type="string" calcext:value-type="string">
            <text:p>['unfoldingWord/obt', 'unfoldingWord/gateway-edit', 'unfoldingWord-box3/obs-audio-navigation', 'larsgson/obs-picture-navigation', 'larsgson/bible-picture-navigation', 'larsgson/bibleviewer-demo', 'kintsoogi/translation-notes-extension', 'unfoldingWord/scripture-tsv', 'unfoldingWord-box3/word-aligner-extension', 'unfoldingWord/door43-preview-app', 'unfoldingWord/oce-oak-edit', 'unfoldingWord/oce-editor-tools', 'bible-technology/scribe-scripture-editor', 'vipinpaul/autographa', 'unfoldingWord/gateway-translate', 'unfoldingWord-box3/bible-preview-app', 'texttree/filter-translation-words-rcl', 'hiscoder-com/obt', 'Ashersam/Autographa2.0-AutoUpdate', 'friendsofagape/autographa', 'unfoldingWord-box3/greek-apparatus-app']</text:p>
          </table:table-cell>
          <table:table-cell table:style-name="ce1" office:value-type="string" calcext:value-type="string">
            <text:p>['PhotoNomad0', 'mannycolon', 'foxprogs', 'Joel-C-Johnson', 'kintsoogi', 'richmah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bible-reference-rcl" xlink:type="simple">https://github.com/unfoldingWord/bible-reference-rcl</text:a></text:p>
          </table:table-cell>
          <table:table-cell table:style-name="ce4" office:value-type="string" calcext:value-type="string">
            <text:p>2024-06-04T12:38:45Z</text:p>
          </table:table-cell>
          <table:table-cell table:style-name="ce4"/>
          <table:table-cell table:style-name="ce1" office:value-type="string" calcext:value-type="string">
            <text:p>unfoldingWord/bible-reference-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5135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book-packag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2T13:43:17Z</text:p>
          </table:table-cell>
          <table:table-cell table:style-name="ce1" office:value-type="string" calcext:value-type="string">
            <text:p>2023-01-02T13:22:57Z</text:p>
          </table:table-cell>
          <table:table-cell table:style-name="ce4"/>
          <table:table-cell table:style-name="ce4" office:value-type="float" office:value="10" calcext:value-type="float">
            <text:p>10</text:p>
          </table:table-cell>
          <table:table-cell table:style-name="ce4" office:value-type="float" office:value="8" calcext:value-type="float">
            <text:p>8</text:p>
          </table:table-cell>
          <table:table-cell table:style-name="ce1"/>
          <table:table-cell table:style-name="ce1" office:value-type="string" calcext:value-type="string">
            <text:p>book-package-rcl</text:p>
          </table:table-cell>
          <table:table-cell table:style-name="ce1" table:formula="of:=FALSE()" office:value-type="float" office:value="0" calcext:value-type="float">
            <text:p>0</text:p>
          </table:table-cell>
          <table:table-cell table:style-name="ce1" office:value-type="float" office:value="2255" calcext:value-type="float">
            <text:p>2255</text:p>
          </table:table-cell>
          <table:table-cell table:style-name="ce1" office:value-type="string" calcext:value-type="string">
            <text:p>2023-01-02T13:16:20.145Z</text:p>
          </table:table-cell>
          <table:table-cell table:style-name="ce1" office:value-type="string" calcext:value-type="string">
            <text:p>book-package-app</text:p>
          </table:table-cell>
          <table:table-cell table:style-name="ce1" office:value-type="string" calcext:value-type="string">
            <text:p>['usfm-js', 'uw-word-count']</text:p>
          </table:table-cell>
          <table:table-cell table:style-name="ce1" office:value-type="string" calcext:value-type="string">
            <text:p>unfoldingWord/book-package-app</text:p>
          </table:table-cell>
          <table:table-cell table:style-name="ce1" office:value-type="string" calcext:value-type="string">
            <text:p>['mandolyte', 'abelpz', 'dependabot[b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ok-package-rcl" xlink:type="simple">https://github.com/unfoldingWord/book-package-rcl</text:a></text:p>
          </table:table-cell>
          <table:table-cell table:style-name="ce4" office:value-type="string" calcext:value-type="string">
            <text:p>2022-06-14T14:25:45Z</text:p>
          </table:table-cell>
          <table:table-cell table:style-name="ce4"/>
          <table:table-cell table:style-name="ce1" office:value-type="string" calcext:value-type="string">
            <text:p>unfoldingWord/book-package-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255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checking-tool-wrapp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1T23:48:38Z</text:p>
          </table:table-cell>
          <table:table-cell table:style-name="ce1" office:value-type="string" calcext:value-type="string">
            <text:p>2024-12-06T22:02:10Z</text:p>
          </table:table-cell>
          <table:table-cell table:style-name="ce4" office:value-type="string" calcext:value-type="string">
            <text:p>2021-06-29T21:55:08Z</text:p>
          </table:table-cell>
          <table:table-cell table:number-columns-repeated="2" table:style-name="ce4" office:value-type="float" office:value="18" calcext:value-type="float">
            <text:p>18</text:p>
          </table:table-cell>
          <table:table-cell table:style-name="ce1"/>
          <table:table-cell table:style-name="ce1" office:value-type="string" calcext:value-type="string">
            <text:p>checking-tool-wrapper</text:p>
          </table:table-cell>
          <table:table-cell table:style-name="ce1" table:number-columns-repeated="3"/>
          <table:table-cell table:style-name="ce1" office:value-type="string" calcext:value-type="string">
            <text:p>['translationCore', 'translationNotes', 'translationWords']</text:p>
          </table:table-cell>
          <table:table-cell table:style-name="ce1" office:value-type="string" calcext:value-type="string">
            <text:p>['gogs-client', 'selections', 'string-punctuation-tokenizer', 'tc-tool', 'tc-ui-toolkit', 'usfm-js', 'word-aligner']</text:p>
          </table:table-cell>
          <table:table-cell table:style-name="ce1"/>
          <table:table-cell table:style-name="ce1" office:value-type="string" calcext:value-type="string">
            <text:p>['mannycolon', 'PhotoNomad0', 'RoyalSix', 'da1nerd', 'richmahn', 'Sterling (Jay) Scott', 'dependabot[bot]']</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checking-tool-wrapper" xlink:type="simple">https://github.com/unfoldingWord/checking-tool-wrapper</text:a></text:p>
          </table:table-cell>
          <table:table-cell table:style-name="ce4" office:value-type="string" calcext:value-type="string">
            <text:p>2024-12-06T22:02:15Z</text:p>
          </table:table-cell>
          <table:table-cell table:style-name="ce4"/>
          <table:table-cell table:style-name="ce1" office:value-type="string" calcext:value-type="string">
            <text:p>unfoldingWord/checking-tool-wrapp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datatable-translatab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05T15:19:12Z</text:p>
          </table:table-cell>
          <table:table-cell table:style-name="ce1" office:value-type="string" calcext:value-type="string">
            <text:p>2026-03-04T13:44:54Z</text:p>
          </table:table-cell>
          <table:table-cell table:style-name="ce4"/>
          <table:table-cell table:style-name="ce4" office:value-type="float" office:value="10" calcext:value-type="float">
            <text:p>10</text:p>
          </table:table-cell>
          <table:table-cell table:style-name="ce4" office:value-type="float" office:value="9" calcext:value-type="float">
            <text:p>9</text:p>
          </table:table-cell>
          <table:table-cell table:style-name="ce1"/>
          <table:table-cell table:style-name="ce1" office:value-type="string" calcext:value-type="string">
            <text:p>datatable-translatable</text:p>
          </table:table-cell>
          <table:table-cell table:style-name="ce1" table:formula="of:=FALSE()" office:value-type="float" office:value="0" calcext:value-type="float">
            <text:p>0</text:p>
          </table:table-cell>
          <table:table-cell table:style-name="ce1" office:value-type="float" office:value="3397" calcext:value-type="float">
            <text:p>3397</text:p>
          </table:table-cell>
          <table:table-cell table:style-name="ce1" office:value-type="string" calcext:value-type="string">
            <text:p>2026-02-02T16:12:05.648Z</text:p>
          </table:table-cell>
          <table:table-cell table:style-name="ce1" office:value-type="string" calcext:value-type="string">
            <text:p>['tc-create-app', 'greek-apparatus-app']</text:p>
          </table:table-cell>
          <table:table-cell table:style-name="ce1" office:value-type="string" calcext:value-type="string">
            <text:p>['markdown-translatable', '@unfoldingword/eslint-config']</text:p>
          </table:table-cell>
          <table:table-cell table:style-name="ce1" office:value-type="string" calcext:value-type="string">
            <text:p>['Bridgeconn/tc-create-offline', 'RevantCI/uw-lab', 'unfoldingWord-box3/greek-apparatus-app', 'unfoldingWord/tc-create-app']</text:p>
          </table:table-cell>
          <table:table-cell table:style-name="ce1" office:value-type="string" calcext:value-type="string">
            <text:p>['ancientTexts-net', 'mandolyte', 'Joel-C-Johnson', 'klappy', 'RoyalSix', 'superdav42', 'jincypjose', 'abelpz', 'Sterling (Jay) Scott', 'dependabot[bot]', 'Dave', 'eliaspinero']</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atatable-translatable" xlink:type="simple">https://github.com/unfoldingWord/datatable-translatable</text:a></text:p>
          </table:table-cell>
          <table:table-cell table:style-name="ce4" office:value-type="string" calcext:value-type="string">
            <text:p>2026-03-04T13:45:00Z</text:p>
          </table:table-cell>
          <table:table-cell table:style-name="ce4"/>
          <table:table-cell table:style-name="ce1" office:value-type="string" calcext:value-type="string">
            <text:p>unfoldingWord/datatable-translatable</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397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dcs-branch-merg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8T01:12:51Z</text:p>
          </table:table-cell>
          <table:table-cell table:style-name="ce1" office:value-type="string" calcext:value-type="string">
            <text:p>2026-03-27T21:56:40Z</text:p>
          </table:table-cell>
          <table:table-cell table:style-name="ce4"/>
          <table:table-cell table:style-name="ce4" office:value-type="float" office:value="6" calcext:value-type="float">
            <text:p>6</text:p>
          </table:table-cell>
          <table:table-cell table:style-name="ce4" office:value-type="float" office:value="0" calcext:value-type="float">
            <text:p>0</text:p>
          </table:table-cell>
          <table:table-cell table:style-name="ce1"/>
          <table:table-cell table:style-name="ce1" office:value-type="string" calcext:value-type="string">
            <text:p>dcs-branch-merger</text:p>
          </table:table-cell>
          <table:table-cell table:style-name="ce1" table:formula="of:=FALSE()" office:value-type="float" office:value="0" calcext:value-type="float">
            <text:p>0</text:p>
          </table:table-cell>
          <table:table-cell table:style-name="ce1" office:value-type="float" office:value="3615" calcext:value-type="float">
            <text:p>3615</text:p>
          </table:table-cell>
          <table:table-cell table:style-name="ce1" office:value-type="string" calcext:value-type="string">
            <text:p>2026-03-27T21:57:39.012Z</text:p>
          </table:table-cell>
          <table:table-cell table:style-name="ce1" office:value-type="string" calcext:value-type="string">
            <text:p>['gateway-admin', 'tc-create-app', 'translation-helps-rcl']</text:p>
          </table:table-cell>
          <table:table-cell table:style-name="ce1" office:value-type="string" calcext:value-type="string">
            <text:p>dcs-js</text:p>
          </table:table-cell>
          <table:table-cell table:style-name="ce1" office:value-type="string" calcext:value-type="string">
            <text:p>['unfoldingWord/single-scripture-rcl', 'unfoldingWord/translation-helps-rcl', 'unfoldingWord/gateway-edit', 'bible-technology/scribe-scripture-editor', 'unfoldingWord/tc-create-app', 'unfoldingWord/gateway-translate', 'friendsofagape/autographa', 'vipinpaul/autographa', 'unfoldingWord/gateway-admin']</text:p>
          </table:table-cell>
          <table:table-cell table:style-name="ce1" office:value-type="string" calcext:value-type="string">
            <text:p>['mandolyte', 'richmahn', 'theNerd247',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cs-branch-merger" xlink:type="simple">https://github.com/unfoldingWord/dcs-branch-merger</text:a></text:p>
          </table:table-cell>
          <table:table-cell table:style-name="ce4" office:value-type="string" calcext:value-type="string">
            <text:p>2026-03-27T21:56:46Z</text:p>
          </table:table-cell>
          <table:table-cell table:style-name="ce4"/>
          <table:table-cell table:style-name="ce1" office:value-type="string" calcext:value-type="string">
            <text:p>unfoldingWord/dcs-branch-merg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615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dcs-js</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1T04:09:41Z</text:p>
          </table:table-cell>
          <table:table-cell table:style-name="ce1" office:value-type="string" calcext:value-type="string">
            <text:p>2022-11-02T13:14:23Z</text:p>
          </table:table-cell>
          <table:table-cell table:style-name="ce4" office:value-type="string" calcext:value-type="string">
            <text:p>2022-10-29T20:10:49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dcs-js</text:p>
          </table:table-cell>
          <table:table-cell table:style-name="ce1" table:formula="of:=FALSE()" office:value-type="float" office:value="0" calcext:value-type="float">
            <text:p>0</text:p>
          </table:table-cell>
          <table:table-cell table:style-name="ce1" office:value-type="float" office:value="607" calcext:value-type="float">
            <text:p>607</text:p>
          </table:table-cell>
          <table:table-cell table:style-name="ce1" office:value-type="string" calcext:value-type="string">
            <text:p>2022-11-02T13:18:25.384Z</text:p>
          </table:table-cell>
          <table:table-cell table:style-name="ce1" office:value-type="string" calcext:value-type="string">
            <text:p>['bible-preview-app', 'dcs-login', 'dcs-branch-merger', 'gateway-translate', 'dcs-react-hooks', 'dcs-js-example']</text:p>
          </table:table-cell>
          <table:table-cell table:style-name="ce1"/>
          <table:table-cell table:style-name="ce1" office:value-type="string" calcext:value-type="string">
            <text:p>['nishantshah-me/docusaurus', 'unfoldingWord/dcs-branch-merger', 'unfoldingWord-box3/bible-preview-app', 'unfoldingWord/gateway-translate']</text:p>
          </table:table-cell>
          <table:table-cell table:style-name="ce1" office:value-type="string" calcext:value-type="string">
            <text:p>['abelpz', '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dcs-js" xlink:type="simple">https://github.com/unfoldingWord/dcs-js</text:a></text:p>
          </table:table-cell>
          <table:table-cell table:style-name="ce4" office:value-type="string" calcext:value-type="string">
            <text:p>2022-10-29T01:30:37Z</text:p>
          </table:table-cell>
          <table:table-cell table:style-name="ce4"/>
          <table:table-cell table:style-name="ce1" office:value-type="string" calcext:value-type="string">
            <text:p>unfoldingWord/dcs-j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607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electronite-cli</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2T20:59:24Z</text:p>
          </table:table-cell>
          <table:table-cell table:style-name="ce1" office:value-type="string" calcext:value-type="string">
            <text:p>2022-05-15T19:25:29Z</text:p>
          </table:table-cell>
          <table:table-cell table:style-name="ce4" office:value-type="string" calcext:value-type="string">
            <text:p>2026-01-08T18:38:22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electronite</text:p>
          </table:table-cell>
          <table:table-cell table:style-name="ce1" table:formula="of:=FALSE()" office:value-type="float" office:value="0" calcext:value-type="float">
            <text:p>0</text:p>
          </table:table-cell>
          <table:table-cell table:style-name="ce1" office:value-type="float" office:value="2609" calcext:value-type="float">
            <text:p>2609</text:p>
          </table:table-cell>
          <table:table-cell table:style-name="ce1" office:value-type="string" calcext:value-type="string">
            <text:p>2026-01-22T21:05:02.866Z</text:p>
          </table:table-cell>
          <table:table-cell table:style-name="ce1" office:value-type="string" calcext:value-type="string">
            <text:p>translationCore</text:p>
          </table:table-cell>
          <table:table-cell table:style-name="ce1"/>
          <table:table-cell table:style-name="ce1" office:value-type="string" calcext:value-type="string">
            <text:p>['unfoldingWord/gateway-edit', 'Bridgeconn/tc-create-offline', 'Proskomma/proskomma-legacy-projects', 'friendsofagape/autographa', 'gbin-org/alignment-editor-rcl-poc', 'unfoldingWord/translationCore', 'mannycolon/electronite-poc-app']</text:p>
          </table:table-cell>
          <table:table-cell table:style-name="ce1" office:value-type="string" calcext:value-type="string">
            <text:p>['da1nerd', 'PhotoNomad0']</text:p>
          </table:table-cell>
          <table:table-cell table:style-name="ce1" office:value-type="float" office:value="32" calcext:value-type="float">
            <text:p>32</text:p>
          </table:table-cell>
          <table:table-cell table:style-name="ce1" office:value-type="float" office:value="0" calcext:value-type="float">
            <text:p>0</text:p>
          </table:table-cell>
          <table:table-cell table:style-name="ce5" office:value-type="string" calcext:value-type="string">
            <text:p><text:a xlink:href="https://github.com/unfoldingWord-dev/electronite-cli" xlink:type="simple">https://github.com/unfoldingWord-dev/electronite-cli</text:a></text:p>
          </table:table-cell>
          <table:table-cell table:style-name="ce4" office:value-type="string" calcext:value-type="string">
            <text:p>2023-09-04T12:03:41Z</text:p>
          </table:table-cell>
          <table:table-cell table:style-name="ce4"/>
          <table:table-cell table:style-name="ce1" office:value-type="string" calcext:value-type="string">
            <text:p>unfoldingWord-dev/electronite-cli</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enhanced-word-aligner-rc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6-02T13:31:12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enhanced-word-aligner-rcl</text:p>
          </table:table-cell>
          <table:table-cell table:style-name="ce1" table:formula="of:=FALSE()" office:value-type="float" office:value="0" calcext:value-type="float">
            <text:p>0</text:p>
          </table:table-cell>
          <table:table-cell table:style-name="ce1" office:value-type="float" office:value="24656" calcext:value-type="float">
            <text:p>24656</text:p>
          </table:table-cell>
          <table:table-cell table:style-name="ce1" office:value-type="string" calcext:value-type="string">
            <text:p>2026-06-02T13:32:18.685Z</text:p>
          </table:table-cell>
          <table:table-cell table:style-name="ce1" office:value-type="string" calcext:value-type="string">
            <text:p>gateway-edit</text:p>
          </table:table-cell>
          <table:table-cell table:style-name="ce1" office:value-type="string" calcext:value-type="string">
            <text:p>['bible-reference-range', 'uw-wordmapbooster', '@unfoldingword/eslint-config', 'usfm-js', 'word-aligner-rcl']</text:p>
          </table:table-cell>
          <table:table-cell table:style-name="ce1" office:value-type="string" calcext:value-type="string">
            <text:p>unfoldingWord/gateway-edit</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nhanced-word-aligner-rcl" xlink:type="simple">https://github.com/unfoldingWord/enhanced-word-aligner-rcl</text:a></text:p>
          </table:table-cell>
          <table:table-cell table:style-name="ce4" office:value-type="string" calcext:value-type="string">
            <text:p>2026-06-02T13:31:41Z</text:p>
          </table:table-cell>
          <table:table-cell table:style-name="ce4"/>
          <table:table-cell table:style-name="ce1" office:value-type="string" calcext:value-type="string">
            <text:p>unfoldingWord/enhanced-word-aligner-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4656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epitelete-htm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4-18T13:52:37Z</text:p>
          </table:table-cell>
          <table:table-cell table:style-name="ce1" office:value-type="string" calcext:value-type="string">
            <text:p>2023-02-03T17:24:52Z</text:p>
          </table:table-cell>
          <table:table-cell table:style-name="ce4"/>
          <table:table-cell table:style-name="ce4" office:value-type="float" office:value="4" calcext:value-type="float">
            <text:p>4</text:p>
          </table:table-cell>
          <table:table-cell table:style-name="ce4" office:value-type="float" office:value="3" calcext:value-type="float">
            <text:p>3</text:p>
          </table:table-cell>
          <table:table-cell table:style-name="ce1"/>
          <table:table-cell table:style-name="ce1" office:value-type="string" calcext:value-type="string">
            <text:p>epitelete-html</text:p>
          </table:table-cell>
          <table:table-cell table:style-name="ce1" table:formula="of:=FALSE()" office:value-type="float" office:value="0" calcext:value-type="float">
            <text:p>0</text:p>
          </table:table-cell>
          <table:table-cell table:style-name="ce1" office:value-type="float" office:value="10010" calcext:value-type="float">
            <text:p>10010</text:p>
          </table:table-cell>
          <table:table-cell table:style-name="ce1" office:value-type="string" calcext:value-type="string">
            <text:p>2023-07-16T00:28:17.570Z</text:p>
          </table:table-cell>
          <table:table-cell table:style-name="ce1" office:value-type="string" calcext:value-type="string">
            <text:p>['beta-bibel-wiki', 'OCE Oak Edit', 'oce-oak-render', 'uw-editor', '@oce-editor-tools/base-core', '@oce-editor-tools/joy-core', '@oce-editor-tools/joy-pk', '@oce-editor-tools/mui-core', '@oce-editor-tools/mui-pk', '@oce-editor-tools/mui-simple', '@oce-editor-tools/pk-aligner']</text:p>
          </table:table-cell>
          <table:table-cell table:style-name="ce1" office:value-type="string" calcext:value-type="string">
            <text:p>uw-proskomma</text:p>
          </table:table-cell>
          <table:table-cell table:style-name="ce1" office:value-type="string" calcext:value-type="string">
            <text:p>['larsgson/jnet-bibel-wiki', 'larsgson/bibel-wiki', 'larsgson/td-bibel-wiki', 'larsgson/pe-bibel-wiki', 'larsgson/in-bibel-wiki', 'BSB-publishing/csv2usfm', 'larsgson/plussord-bibel-wiki', 'larsgson/en-bibel-wiki', 'unfoldingWord-box3/beta-bibel-demo', 'RUN-Collaborations/translatable', 'eten-tech-foundation/scribe-extensions', 'abelpz/perfedtor', 'eten-tech-foundation/scripture-editors', 'DenisArger/my-usfm-editor', 'larsgson/vscode-ext-usfm-editor-webview', 'abelpz/bible-lexical-editor', 'abelpz/bible-editor-lexical-proskomma', 'larsgson/d43-preview', 'unfoldingWord/oce-oak-edit', 'unfoldingWord/oce-oak-render', 'bible-technology/scribe-scripture-editor', 'vipinpaul/autographa', 'unfoldingWord/oce-editor-tools', 'friendsofagape/autographa', 'unfoldingWord/gateway-translate', 'unfoldingWord/uw-editor']</text:p>
          </table:table-cell>
          <table:table-cell table:style-name="ce1" office:value-type="string" calcext:value-type="string">
            <text:p>['abelpz', 'mvahowe', 'mandolyte', 'samueljd', '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pitelete-html" xlink:type="simple">https://github.com/unfoldingWord/epitelete-html</text:a></text:p>
          </table:table-cell>
          <table:table-cell table:style-name="ce4" office:value-type="string" calcext:value-type="string">
            <text:p>2023-02-02T13:14:15Z</text:p>
          </table:table-cell>
          <table:table-cell table:style-name="ce4"/>
          <table:table-cell table:style-name="ce1" office:value-type="string" calcext:value-type="string">
            <text:p>unfoldingWord/epitelete-htm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001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eslint-config</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7T20:47:13Z</text:p>
          </table:table-cell>
          <table:table-cell table:style-name="ce1" office:value-type="string" calcext:value-type="string">
            <text:p>2020-12-15T23:29:03Z</text:p>
          </table:table-cell>
          <table:table-cell table:style-name="ce4"/>
          <table:table-cell table:style-name="ce4" office:value-type="float" office:value="7" calcext:value-type="float">
            <text:p>7</text:p>
          </table:table-cell>
          <table:table-cell table:style-name="ce4" office:value-type="float" office:value="6" calcext:value-type="float">
            <text:p>6</text:p>
          </table:table-cell>
          <table:table-cell table:style-name="ce1"/>
          <table:table-cell table:style-name="ce1" office:value-type="string" calcext:value-type="string">
            <text:p>@unfoldingword/eslint-config</text:p>
          </table:table-cell>
          <table:table-cell table:style-name="ce1" table:number-columns-repeated="3"/>
          <table:table-cell table:style-name="ce1" office:value-type="string" calcext:value-type="string">
            <text:p>['simple-text-editor-rcl', 'tc-create-app', 'gitea-offline-poc', 'enhanced-word-aligner-rcl', 'gitea-react-toolkit', 'single-scripture-rcl', 'scripture-resources-rcl', 'datatable-translatable', 'markdown-translatable', 'dcs-react-hooks', 'resource-workspace-rcl']</text:p>
          </table:table-cell>
          <table:table-cell table:style-name="ce1" table:number-columns-repeated="2"/>
          <table:table-cell table:style-name="ce1" office:value-type="string" calcext:value-type="string">
            <text:p>['RoyalSix',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slint-config" xlink:type="simple">https://github.com/unfoldingWord/eslint-config</text:a></text:p>
          </table:table-cell>
          <table:table-cell table:style-name="ce4" office:value-type="string" calcext:value-type="string">
            <text:p>2020-12-15T23:29:10Z</text:p>
          </table:table-cell>
          <table:table-cell table:style-name="ce4"/>
          <table:table-cell table:style-name="ce1" office:value-type="string" calcext:value-type="string">
            <text:p>unfoldingWord/eslint-config</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gitea-react-toolk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5-12T13:12:04Z</text:p>
          </table:table-cell>
          <table:table-cell table:style-name="ce4" office:value-type="string" calcext:value-type="string">
            <text:p>2020-04-23T14:49:23Z</text:p>
          </table:table-cell>
          <table:table-cell table:style-name="ce4" office:value-type="float" office:value="27" calcext:value-type="float">
            <text:p>27</text:p>
          </table:table-cell>
          <table:table-cell table:style-name="ce4" office:value-type="float" office:value="21" calcext:value-type="float">
            <text:p>21</text:p>
          </table:table-cell>
          <table:table-cell table:style-name="ce1"/>
          <table:table-cell table:style-name="ce1" office:value-type="string" calcext:value-type="string">
            <text:p>gitea-react-toolkit</text:p>
          </table:table-cell>
          <table:table-cell table:style-name="ce1" table:formula="of:=FALSE()" office:value-type="float" office:value="0" calcext:value-type="float">
            <text:p>0</text:p>
          </table:table-cell>
          <table:table-cell table:style-name="ce1" office:value-type="float" office:value="17473" calcext:value-type="float">
            <text:p>17473</text:p>
          </table:table-cell>
          <table:table-cell table:style-name="ce1" office:value-type="string" calcext:value-type="string">
            <text:p>2026-05-12T13:15:42.563Z</text:p>
          </table:table-cell>
          <table:table-cell table:style-name="ce1" office:value-type="string" calcext:value-type="string">
            <text:p>['next-js-template', 'resource-container-rcl', 'pdf-generator-rcl', 'hello-dcs-react-component-library', 'md-tsv-converter-app', 'tc-create-app', 'gateway-edit', 'anchor-alignment-poc', 'admin-app', 'create-app', 'greek-apparatus-app', 'book-package-viewer-poc', 'gitea-offline-poc', 'scripture-burrito-react-jsonschema-form', 'gateway-admin', 'single-scripture-rcl', 'translation-helps-rcl', 'scripture-resources-rcl', 'resource-workspace-rcl', 'resource-checker']</text:p>
          </table:table-cell>
          <table:table-cell table:style-name="ce1" office:value-type="string" calcext:value-type="string">
            <text:p>['markdown-translatable', '@unfoldingword/eslint-config']</text:p>
          </table:table-cell>
          <table:table-cell table:style-name="ce1" office:value-type="string" calcext:value-type="string">
            <text:p>['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friendsofagape/autographa', 'unfoldingWord-box3/gitea-offline-poc', 'unfoldingWord-box3/resource-container-rcl', 'unfoldingWord/uw-content-validation', 'bible-technology/scripture-burrito-rcl', 'unfoldingWord-box3/uw-metadata-react-component-library', 'unfoldingWord-box3/hello-dcs-react-component-library', 'unfoldingWord/scripture-resources-rcl', 'unfoldingWord/tc-create-app']</text:p>
          </table:table-cell>
          <table:table-cell table:style-name="ce1" office:value-type="string" calcext:value-type="string">
            <text:p>['klappy', 'RoyalSix', 'ancientTexts-net', 'mannycolon', 'actions-user', 'PhotoNomad0', 'mandolyte', 'Sterling (Jay) Scott', 'superdav42', 'Joel-C-Johnson', 'jincypjose', 'kintsoogi', 'richmahn', 'rady-be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gitea-react-toolkit" xlink:type="simple">https://github.com/unfoldingWord/gitea-react-toolkit</text:a></text:p>
          </table:table-cell>
          <table:table-cell table:style-name="ce4" office:value-type="string" calcext:value-type="string">
            <text:p>2026-05-12T13:17:57Z</text:p>
          </table:table-cell>
          <table:table-cell table:style-name="ce4"/>
          <table:table-cell table:style-name="ce1" office:value-type="string" calcext:value-type="string">
            <text:p>unfoldingWord/gitea-react-toolkit</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7473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markdown-translatabl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4-04T20:57:49Z</text:p>
          </table:table-cell>
          <table:table-cell table:style-name="ce1" office:value-type="string" calcext:value-type="string">
            <text:p>2023-03-08T14:57:07Z</text:p>
          </table:table-cell>
          <table:table-cell table:style-name="ce4"/>
          <table:table-cell table:number-columns-repeated="2" table:style-name="ce4" office:value-type="float" office:value="20" calcext:value-type="float">
            <text:p>20</text:p>
          </table:table-cell>
          <table:table-cell table:style-name="ce1"/>
          <table:table-cell table:style-name="ce1" office:value-type="string" calcext:value-type="string">
            <text:p>markdown-translatable</text:p>
          </table:table-cell>
          <table:table-cell table:style-name="ce1" table:formula="of:=FALSE()" office:value-type="float" office:value="0" calcext:value-type="float">
            <text:p>0</text:p>
          </table:table-cell>
          <table:table-cell table:style-name="ce1" office:value-type="float" office:value="18050" calcext:value-type="float">
            <text:p>18050</text:p>
          </table:table-cell>
          <table:table-cell table:style-name="ce1" office:value-type="string" calcext:value-type="string">
            <text:p>2023-03-07T15:00:29.476Z</text:p>
          </table:table-cell>
          <table:table-cell table:style-name="ce1" office:value-type="string" calcext:value-type="string">
            <text:p>['next-js-template', 'resource-container-rcl', 'pdf-generator-rcl', 'hello-dcs-react-component-library', 'obs-pdf-poc', 'md-tsv-converter-app', 'tc-create-app', 'gateway-edit', 'create-app', 'book-package-viewer-poc', 'gitea-offline-poc', 'scripture-burrito-react-jsonschema-form', 'tsv-editor', 'gateway-admin', 'gitea-react-toolkit', 'translation-helps-rcl', 'scripture-resources-rcl', 'datatable-translatable', 'resource-workspace-rcl', 'resource-checker']</text:p>
          </table:table-cell>
          <table:table-cell table:style-name="ce1" office:value-type="string" calcext:value-type="string">
            <text:p>@unfoldingword/eslint-config</text:p>
          </table:table-cell>
          <table:table-cell table:style-name="ce1" office:value-type="string" calcext:value-type="string">
            <text:p>['unfoldingWord/single-scripture-rcl', 'unfoldingWord/translation-helps-rcl', 'unfoldingWord/gateway-edit', 'Bridgeconn/tc-create-offline', 'RevantCI/uw-lab',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unfoldingWord/gateway-admin', 'Ashersam/Autographa2.0-AutoUpdate', 'unfoldingWord-box3/greek-apparatus-app', 'unfoldingWord/scripture-resources-rcl', 'friendsofagape/autographa', 'unfoldingWord-box3/gitea-offline-poc', 'unfoldingWord-box3/resource-container-rcl', 'unfoldingWord/uw-content-validation', 'bible-technology/scripture-burrito-rcl', 'unfoldingWord-box3/uw-metadata-react-component-library', 'unfoldingWord-box3/hello-dcs-react-component-library', 'unfoldingWord/datatable-translatable', 'unfoldingWord/tc-create-app', 'unfoldingWord/gitea-react-toolkit']</text:p>
          </table:table-cell>
          <table:table-cell table:style-name="ce1" office:value-type="string" calcext:value-type="string">
            <text:p>['klappy', 'ancientTexts-net', 'RoyalSix', 'mannycolon', 'mandolyte', 'superdav42', 'Joel-C-Johnson', 'Sterling (Jay) Scott', 'jincypjose', 'dependabot[bot]', 'PhotoNomad0', 'larsg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markdown-translatable" xlink:type="simple">https://github.com/unfoldingWord/markdown-translatable</text:a></text:p>
          </table:table-cell>
          <table:table-cell table:style-name="ce4" office:value-type="string" calcext:value-type="string">
            <text:p>2025-04-03T14:40:01Z</text:p>
          </table:table-cell>
          <table:table-cell table:style-name="ce4"/>
          <table:table-cell table:style-name="ce1" office:value-type="string" calcext:value-type="string">
            <text:p>unfoldingWord/markdown-translatable</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805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node-gogs-client</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04-19T16:22:58Z</text:p>
          </table:table-cell>
          <table:table-cell table:style-name="ce1" office:value-type="string" calcext:value-type="string">
            <text:p>2018-09-12T17:40:36Z</text:p>
          </table:table-cell>
          <table:table-cell table:style-name="ce4" office:value-type="string" calcext:value-type="string">
            <text:p>2018-06-05T18:06:48Z</text:p>
          </table:table-cell>
          <table:table-cell table:number-columns-repeated="2" table:style-name="ce4" office:value-type="float" office:value="1" calcext:value-type="float">
            <text:p>1</text:p>
          </table:table-cell>
          <table:table-cell table:style-name="ce1"/>
          <table:table-cell table:style-name="ce1" office:value-type="string" calcext:value-type="string">
            <text:p>gogs-client</text:p>
          </table:table-cell>
          <table:table-cell table:style-name="ce1" table:formula="of:=FALSE()" office:value-type="float" office:value="0" calcext:value-type="float">
            <text:p>0</text:p>
          </table:table-cell>
          <table:table-cell table:style-name="ce1" office:value-type="float" office:value="6728" calcext:value-type="float">
            <text:p>6728</text:p>
          </table:table-cell>
          <table:table-cell table:style-name="ce1" office:value-type="string" calcext:value-type="string">
            <text:p>2016-07-13T00:07:45.833Z</text:p>
          </table:table-cell>
          <table:table-cell table:style-name="ce1" office:value-type="string" calcext:value-type="string">
            <text:p>['translationCore', 'wordAlignment', 'checking-tool-wrapper']</text:p>
          </table:table-cell>
          <table:table-cell table:style-name="ce1"/>
          <table:table-cell table:style-name="ce1" office:value-type="string" calcext:value-type="string">
            <text:p>['FoustAndrew/wordAlignment', 'aunger/wacs-client', 'Bible-Translation-Tools/BTT-Writer-Desktop', 'unfoldingWord/wordAlignment', 'unfoldingWord/checking-tool-wrapper', 'unfoldingWord-dev/ts-desktop', 'dottgonzo/vue-starter', 'unfoldingWord/translationCore']</text:p>
          </table:table-cell>
          <table:table-cell table:style-name="ce1" office:value-type="string" calcext:value-type="string">
            <text:p>['da1nerd', 'Thomas Klemz', 'jonasof']</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ev/node-gogs-client" xlink:type="simple">https://github.com/unfoldingWord-dev/node-gogs-client</text:a></text:p>
          </table:table-cell>
          <table:table-cell table:style-name="ce4" office:value-type="string" calcext:value-type="string">
            <text:p>2024-06-21T17:58:57Z</text:p>
          </table:table-cell>
          <table:table-cell table:style-name="ce4"/>
          <table:table-cell table:style-name="ce1" office:value-type="string" calcext:value-type="string">
            <text:p>unfoldingWord-dev/node-gogs-client</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node-resource-contain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7-05-08T20:11:54Z</text:p>
          </table:table-cell>
          <table:table-cell table:style-name="ce1" office:value-type="string" calcext:value-type="string">
            <text:p>2017-01-04T01:13:31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resource-container</text:p>
          </table:table-cell>
          <table:table-cell table:style-name="ce1" table:formula="of:=FALSE()" office:value-type="float" office:value="0" calcext:value-type="float">
            <text:p>0</text:p>
          </table:table-cell>
          <table:table-cell table:style-name="ce1" office:value-type="float" office:value="3150" calcext:value-type="float">
            <text:p>3150</text:p>
          </table:table-cell>
          <table:table-cell table:style-name="ce1" office:value-type="string" calcext:value-type="string">
            <text:p>2017-02-28T01:01:07.451Z</text:p>
          </table:table-cell>
          <table:table-cell table:style-name="ce1" office:value-type="string" calcext:value-type="string">
            <text:p>door43-client</text:p>
          </table:table-cell>
          <table:table-cell table:style-name="ce1" table:number-columns-repeated="2"/>
          <table:table-cell table:style-name="ce1" office:value-type="string" calcext:value-type="string">
            <text:p>da1nerd</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ode-resource-container" xlink:type="simple">https://github.com/unfoldingWord-dev/node-resource-container</text:a></text:p>
          </table:table-cell>
          <table:table-cell table:style-name="ce4" office:value-type="string" calcext:value-type="string">
            <text:p>2017-03-07T23:45:06Z</text:p>
          </table:table-cell>
          <table:table-cell table:style-name="ce4"/>
          <table:table-cell table:style-name="ce1" office:value-type="string" calcext:value-type="string">
            <text:p>unfoldingWord-dev/node-resource-contain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15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node-twl-generato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6T21:44:49Z</text:p>
          </table:table-cell>
          <table:table-cell table:style-name="ce1" office:value-type="string" calcext:value-type="string">
            <text:p>2026-06-16T21:44:3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wl-generator</text:p>
          </table:table-cell>
          <table:table-cell table:style-name="ce1" table:formula="of:=FALSE()" office:value-type="float" office:value="0" calcext:value-type="float">
            <text:p>0</text:p>
          </table:table-cell>
          <table:table-cell table:style-name="ce1" office:value-type="float" office:value="5594" calcext:value-type="float">
            <text:p>5594</text:p>
          </table:table-cell>
          <table:table-cell table:style-name="ce1" office:value-type="string" calcext:value-type="string">
            <text:p>2026-06-16T10:00:58.589Z</text:p>
          </table:table-cell>
          <table:table-cell table:style-name="ce1" office:value-type="string" calcext:value-type="string">
            <text:p>tsv-twl-creation-app</text:p>
          </table:table-cell>
          <table:table-cell table:style-name="ce1" office:value-type="string" calcext:value-type="string">
            <text:p>['tsv-quote-converters', 'usfm-alignment-remover']</text:p>
          </table:table-cell>
          <table:table-cell table:style-name="ce1"/>
          <table:table-cell table:style-name="ce1" office:value-type="string" calcext:value-type="string">
            <text:p>['richmahn', 'rich.mahn@unfoldingword.org']</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node-twl-generator" xlink:type="simple">https://github.com/unfoldingWord/node-twl-generator</text:a></text:p>
          </table:table-cell>
          <table:table-cell table:style-name="ce4" office:value-type="string" calcext:value-type="string">
            <text:p>2026-06-16T21:45:05Z</text:p>
          </table:table-cell>
          <table:table-cell table:style-name="ce4"/>
          <table:table-cell table:style-name="ce1" office:value-type="string" calcext:value-type="string">
            <text:p>unfoldingWord/node-twl-generato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5594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resource-workspace-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13T13:45:24Z</text:p>
          </table:table-cell>
          <table:table-cell table:style-name="ce1" office:value-type="string" calcext:value-type="string">
            <text:p>2023-06-13T13:45:21Z</text:p>
          </table:table-cell>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table-cell table:style-name="ce1" office:value-type="string" calcext:value-type="string">
            <text:p>resource-workspace-rcl</text:p>
          </table:table-cell>
          <table:table-cell table:style-name="ce1" table:formula="of:=FALSE()" office:value-type="float" office:value="0" calcext:value-type="float">
            <text:p>0</text:p>
          </table:table-cell>
          <table:table-cell table:style-name="ce1" office:value-type="float" office:value="2803" calcext:value-type="float">
            <text:p>2803</text:p>
          </table:table-cell>
          <table:table-cell table:style-name="ce1" office:value-type="string" calcext:value-type="string">
            <text:p>2023-06-13T13:51:03.803Z</text:p>
          </table:table-cell>
          <table:table-cell table:style-name="ce1" office:value-type="string" calcext:value-type="string">
            <text:p>['next-js-template', 'gateway-edit', 'admin-app', 'create-app', 'gateway-admin', 'bsa', 'gateway-translate']</text:p>
          </table:table-cell>
          <table:table-cell table:style-name="ce1" office:value-type="string" calcext:value-type="string">
            <text:p>['@unfoldingword/eslint-config', 'gitea-react-toolkit', 'markdown-translatable', 'scripture-resources-rcl', 'translation-helps-rcl']</text:p>
          </table:table-cell>
          <table:table-cell table:style-name="ce1" office:value-type="string" calcext:value-type="string">
            <text:p>['unfoldingWord/obt', 'unfoldingWord/gateway-edit', 'unfoldingWord/gateway-translate', 'unfoldingWord/gateway-admin', 'hiscoder-com/obt']</text:p>
          </table:table-cell>
          <table:table-cell table:style-name="ce1" office:value-type="string" calcext:value-type="string">
            <text:p>['mannycolon', 'RoyalSix', 'PhotoNomad0', 'Sterling (Jay) Scott', 'foxprogs', 'mandolyte', 'Joel-C-John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resource-workspace-rcl" xlink:type="simple">https://github.com/unfoldingWord/resource-workspace-rcl</text:a></text:p>
          </table:table-cell>
          <table:table-cell table:style-name="ce4" office:value-type="string" calcext:value-type="string">
            <text:p>2022-06-01T15:53:36Z</text:p>
          </table:table-cell>
          <table:table-cell table:style-name="ce4"/>
          <table:table-cell table:style-name="ce1" office:value-type="string" calcext:value-type="string">
            <text:p>unfoldingWord/resource-workspace-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803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scripture-resource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9T13:23:22Z</text:p>
          </table:table-cell>
          <table:table-cell table:style-name="ce4"/>
          <table:table-cell table:style-name="ce4" office:value-type="float" office:value="14" calcext:value-type="float">
            <text:p>14</text:p>
          </table:table-cell>
          <table:table-cell table:style-name="ce4" office:value-type="float" office:value="6" calcext:value-type="float">
            <text:p>6</text:p>
          </table:table-cell>
          <table:table-cell table:style-name="ce1"/>
          <table:table-cell table:style-name="ce1" office:value-type="string" calcext:value-type="string">
            <text:p>scripture-resources-rcl</text:p>
          </table:table-cell>
          <table:table-cell table:style-name="ce1" table:formula="of:=FALSE()" office:value-type="float" office:value="0" calcext:value-type="float">
            <text:p>0</text:p>
          </table:table-cell>
          <table:table-cell table:style-name="ce1" office:value-type="float" office:value="15048" calcext:value-type="float">
            <text:p>15048</text:p>
          </table:table-cell>
          <table:table-cell table:style-name="ce1" office:value-type="string" calcext:value-type="string">
            <text:p>2026-03-19T13:24:25.124Z</text:p>
          </table:table-cell>
          <table:table-cell table:style-name="ce1" office:value-type="string" calcext:value-type="string">
            <text:p>['next-js-template', 'pdf-generator-rcl', 'tc-create-app', 'gateway-edit', 'create-app', 'greek-apparatus-app', 'book-package-viewer-poc', 'pdf-generator', 'gateway-admin', 'single-scripture-rcl', 'translation-helps-rcl', 'bsa', 'gateway-translate', 'resource-workspace-rcl', 'resource-checker']</text:p>
          </table:table-cell>
          <table:table-cell table:style-name="ce1" office:value-type="string" calcext:value-type="string">
            <text:p>['bible-reference-range', 'gitea-react-toolkit', 'markdown-translatable', 'string-punctuation-tokenizer', 'tc-ui-toolkit', 'usfm-js', 'uw-quote-helpers', 'word-aligner', '@unfoldingword/eslint-config']</text:p>
          </table:table-cell>
          <table:table-cell table:style-name="ce1" office:value-type="string" calcext:value-type="string">
            <text:p>['unfoldingWord/obt', 'unfoldingWord/single-scripture-rcl', 'unfoldingWord/translation-helps-rcl', 'unfoldingWord/gateway-edit', 'larsgson/d43-preview', 'unfoldingWord/oce-oak-edit', 'unfoldingWord/oce-oak-render', 'bible-technology/scribe-scripture-editor', 'vipinpaul/autographa', 'unfoldingWord/word-aligner-rcl', 'unfoldingWord/gateway-translate', 'unfoldingWord-box3/translation-helps-print-preview', 'texttree/filter-translation-words-rcl', 'hiscoder-com/timeline-poc', 'friendsofagape/autographa', 'unfoldingWord/gateway-admin', 'hiscoder-com/obt', 'unfoldingWord-box3/greek-apparatus-app', 'unfoldingWord/uw-content-validation', 'unfoldingWord/tc-create-app']</text:p>
          </table:table-cell>
          <table:table-cell table:style-name="ce1" office:value-type="string" calcext:value-type="string">
            <text:p>['klappy', 'ancientTexts-net', 'PhotoNomad0', 'RoyalSix', 'mandolyte', 'mannycolon', 'larsgson', 'Joel-C-Johnson', 'abelpz', 'jincypjose', 'Sterling (Jay) Scott', 'superdav42', 'actions-user', 'dependabot[bot]', 'Christopher Klapp', 'richmahn', 'kintsoogi']</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cripture-resources-rcl" xlink:type="simple">https://github.com/unfoldingWord/scripture-resources-rcl</text:a></text:p>
          </table:table-cell>
          <table:table-cell table:style-name="ce4" office:value-type="string" calcext:value-type="string">
            <text:p>2026-03-19T13:23:28Z</text:p>
          </table:table-cell>
          <table:table-cell table:style-name="ce4"/>
          <table:table-cell table:style-name="ce1" office:value-type="string" calcext:value-type="string">
            <text:p>unfoldingWord/scripture-resources-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5048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scripture-tsv</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5-08T19:09:17Z</text:p>
          </table:table-cell>
          <table:table-cell table:style-name="ce1" office:value-type="string" calcext:value-type="string">
            <text:p>2024-05-07T12:40:32Z</text:p>
          </table:table-cell>
          <table:table-cell table:style-name="ce4" office:value-type="string" calcext:value-type="string">
            <text:p>2024-05-08T19:09:17Z</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1"/>
          <table:table-cell table:style-name="ce1" office:value-type="string" calcext:value-type="string">
            <text:p>scripture-tsv</text:p>
          </table:table-cell>
          <table:table-cell table:style-name="ce1" table:formula="of:=FALSE()" office:value-type="float" office:value="0" calcext:value-type="float">
            <text:p>0</text:p>
          </table:table-cell>
          <table:table-cell table:style-name="ce1" office:value-type="float" office:value="2669" calcext:value-type="float">
            <text:p>2669</text:p>
          </table:table-cell>
          <table:table-cell table:style-name="ce1" office:value-type="string" calcext:value-type="string">
            <text:p>2024-05-02T21:03:03.412Z</text:p>
          </table:table-cell>
          <table:table-cell table:style-name="ce1" office:value-type="string" calcext:value-type="string">
            <text:p>gateway-edit</text:p>
          </table:table-cell>
          <table:table-cell table:style-name="ce1" office:value-type="string" calcext:value-type="string">
            <text:p>['bible-reference-range', 'bible-reference-rcl']</text:p>
          </table:table-cell>
          <table:table-cell table:style-name="ce1" office:value-type="string" calcext:value-type="string">
            <text:p>['unfoldingWord/gateway-edit', 'kintsoogi/translation-notes-extension']</text:p>
          </table:table-cell>
          <table:table-cell table:style-name="ce1" office:value-type="string" calcext:value-type="string">
            <text:p>['kintsoogi', 'PhotoNomad0']</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scripture-tsv" xlink:type="simple">https://github.com/unfoldingWord/scripture-tsv</text:a></text:p>
          </table:table-cell>
          <table:table-cell table:style-name="ce4" office:value-type="string" calcext:value-type="string">
            <text:p>2024-05-07T12:40:37Z</text:p>
          </table:table-cell>
          <table:table-cell table:style-name="ce4"/>
          <table:table-cell table:style-name="ce1" office:value-type="string" calcext:value-type="string">
            <text:p>unfoldingWord/scripture-tsv</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669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selection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03T21:23:33Z</text:p>
          </table:table-cell>
          <table:table-cell table:style-name="ce1" office:value-type="string" calcext:value-type="string">
            <text:p>2018-05-03T21:23:2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selections</text:p>
          </table:table-cell>
          <table:table-cell table:style-name="ce1" table:number-columns-repeated="3"/>
          <table:table-cell table:style-name="ce1" office:value-type="string" calcext:value-type="string">
            <text:p>['translationCore', 'wordAlignment', 'checking-tool-wrapper', 'VerseCheck']</text:p>
          </table:table-cell>
          <table:table-cell table:style-name="ce1" office:value-type="string" calcext:value-type="string">
            <text:p>tc-strings</text:p>
          </table:table-cell>
          <table:table-cell table:style-name="ce1" office:value-type="string" calcext:value-type="string">
            <text:p>['FoustAndrew/wordAlignment', 'unfoldingWord/wordAlignment', 'unfoldingWord/checking-tool-wrapper', 'unfoldingWord/translationNotes', 'unfoldingWord/translationWords', 'unfoldingWord/translationCore']</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elections" xlink:type="simple">https://github.com/unfoldingWord/selections</text:a></text:p>
          </table:table-cell>
          <table:table-cell table:style-name="ce4" office:value-type="string" calcext:value-type="string">
            <text:p>2019-10-22T19:45:39Z</text:p>
          </table:table-cell>
          <table:table-cell table:style-name="ce4"/>
          <table:table-cell table:style-name="ce1" office:value-type="string" calcext:value-type="string">
            <text:p>unfoldingWord/selection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simple-text-editor-rcl</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06-06T21:09:12Z</text:p>
          </table:table-cell>
          <table:table-cell table:style-name="ce1" office:value-type="string" calcext:value-type="string">
            <text:p>2025-06-06T21:09:10Z</text:p>
          </table:table-cell>
          <table:table-cell table:style-name="ce4"/>
          <table:table-cell table:style-name="ce4" office:value-type="float" office:value="5" calcext:value-type="float">
            <text:p>5</text:p>
          </table:table-cell>
          <table:table-cell table:style-name="ce4" office:value-type="float" office:value="1" calcext:value-type="float">
            <text:p>1</text:p>
          </table:table-cell>
          <table:table-cell table:style-name="ce1"/>
          <table:table-cell table:style-name="ce1" office:value-type="string" calcext:value-type="string">
            <text:p>simple-text-editor-rcl</text:p>
          </table:table-cell>
          <table:table-cell table:style-name="ce1" table:formula="of:=FALSE()" office:value-type="float" office:value="0" calcext:value-type="float">
            <text:p>0</text:p>
          </table:table-cell>
          <table:table-cell table:style-name="ce1" office:value-type="float" office:value="3912" calcext:value-type="float">
            <text:p>3912</text:p>
          </table:table-cell>
          <table:table-cell table:style-name="ce1" office:value-type="string" calcext:value-type="string">
            <text:p>2022-06-09T23:15:38.322Z</text:p>
          </table:table-cell>
          <table:table-cell table:style-name="ce1" office:value-type="string" calcext:value-type="string">
            <text:p>simple-text-editor-app</text:p>
          </table:table-cell>
          <table:table-cell table:style-name="ce1" office:value-type="string" calcext:value-type="string">
            <text:p>@unfoldingword/eslint-config</text:p>
          </table:table-cell>
          <table:table-cell table:style-name="ce1" office:value-type="string" calcext:value-type="string">
            <text:p>['md-jishan-ansari/Editors', 'RUN-Collaborations/translatable', 'klappy/scripture-puzzle-game-poc']</text:p>
          </table:table-cell>
          <table:table-cell table:style-name="ce1" office:value-type="string" calcext:value-type="string">
            <text:p>['klappy', 'RUN-Projects']</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simple-text-editor-rcl" xlink:type="simple">https://github.com/unfoldingWord-box3/simple-text-editor-rcl</text:a></text:p>
          </table:table-cell>
          <table:table-cell table:style-name="ce4" office:value-type="string" calcext:value-type="string">
            <text:p>2025-06-06T21:09:14Z</text:p>
          </table:table-cell>
          <table:table-cell table:style-name="ce4"/>
          <table:table-cell table:style-name="ce1" office:value-type="string" calcext:value-type="string">
            <text:p>unfoldingWord-box3/simple-text-editor-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912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single-scripture-rcl</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4-16T17:24:40Z</text:p>
          </table:table-cell>
          <table:table-cell table:style-name="ce4"/>
          <table:table-cell table:number-columns-repeated="2" table:style-name="ce4" office:value-type="float" office:value="3" calcext:value-type="float">
            <text:p>3</text:p>
          </table:table-cell>
          <table:table-cell table:style-name="ce1"/>
          <table:table-cell table:style-name="ce1" office:value-type="string" calcext:value-type="string">
            <text:p>single-scripture-rcl</text:p>
          </table:table-cell>
          <table:table-cell table:style-name="ce1" table:formula="of:=FALSE()" office:value-type="float" office:value="0" calcext:value-type="float">
            <text:p>0</text:p>
          </table:table-cell>
          <table:table-cell table:style-name="ce1" office:value-type="float" office:value="9774" calcext:value-type="float">
            <text:p>9774</text:p>
          </table:table-cell>
          <table:table-cell table:style-name="ce1" office:value-type="string" calcext:value-type="string">
            <text:p>2026-04-16T17:29:58.529Z</text:p>
          </table:table-cell>
          <table:table-cell table:style-name="ce1" office:value-type="string" calcext:value-type="string">
            <text:p>['next-js-template', 'gateway-edit', 'create-app', 'gateway-admin']</text:p>
          </table:table-cell>
          <table:table-cell table:style-name="ce1" office:value-type="string" calcext:value-type="string">
            <text:p>['@unfoldingword/eslint-config', 'bible-reference-range', 'gitea-react-toolkit', 'scripture-resources-rcl', 'tc-ui-toolkit', 'translation-helps-rcl', 'usfm-js', 'uw-quote-helpers', 'word-aligner', 'word-aligner-rcl']</text:p>
          </table:table-cell>
          <table:table-cell table:style-name="ce1" office:value-type="string" calcext:value-type="string">
            <text:p>['unfoldingWord/gateway-edit', 'unfoldingWord/gateway-translate', 'unfoldingWord/gateway-admin']</text:p>
          </table:table-cell>
          <table:table-cell table:style-name="ce1" office:value-type="string" calcext:value-type="string">
            <text:p>['PhotoNomad0', 'kintsoogi', 'mannycolon', 'Joel-C-Johnson', 'jincypjose', 'abelpz', 'RoyalSix', 'theNerd247', 'Sterling (Jay) Scott',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ingle-scripture-rcl" xlink:type="simple">https://github.com/unfoldingWord/single-scripture-rcl</text:a></text:p>
          </table:table-cell>
          <table:table-cell table:style-name="ce4" office:value-type="string" calcext:value-type="string">
            <text:p>2026-04-16T17:24:46Z</text:p>
          </table:table-cell>
          <table:table-cell table:style-name="ce4"/>
          <table:table-cell table:style-name="ce1" office:value-type="string" calcext:value-type="string">
            <text:p>unfoldingWord/single-scripture-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9774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string-punctuation-tokeniz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8-09T14:35:40Z</text:p>
          </table:table-cell>
          <table:table-cell table:style-name="ce1" office:value-type="string" calcext:value-type="string">
            <text:p>2021-08-25T21:53:55Z</text:p>
          </table:table-cell>
          <table:table-cell table:style-name="ce4" office:value-type="string" calcext:value-type="string">
            <text:p>2021-08-25T21:56:43Z</text:p>
          </table:table-cell>
          <table:table-cell table:style-name="ce4" office:value-type="float" office:value="21" calcext:value-type="float">
            <text:p>21</text:p>
          </table:table-cell>
          <table:table-cell table:style-name="ce4" office:value-type="float" office:value="18" calcext:value-type="float">
            <text:p>18</text:p>
          </table:table-cell>
          <table:table-cell table:style-name="ce1"/>
          <table:table-cell table:style-name="ce1" office:value-type="string" calcext:value-type="string">
            <text:p>string-punctuation-tokenizer</text:p>
          </table:table-cell>
          <table:table-cell table:style-name="ce1" table:formula="of:=FALSE()" office:value-type="float" office:value="0" calcext:value-type="float">
            <text:p>0</text:p>
          </table:table-cell>
          <table:table-cell table:style-name="ce1" office:value-type="float" office:value="98082" calcext:value-type="float">
            <text:p>98082</text:p>
          </table:table-cell>
          <table:table-cell table:style-name="ce1" office:value-type="string" calcext:value-type="string">
            <text:p>2021-08-25T21:55:46.406Z</text:p>
          </table:table-cell>
          <table:table-cell table:style-name="ce1" office:value-type="string" calcext:value-type="string">
            <text:p>['checking-extension', 'anchor-alignment-poc', 'greek-apparatus-app', 'pdf-generator', 'tsv-quote-converters', 'translationCore', 'string-punctuation-tokenizer', 'word-aligner-rcl', 'word-aligner-lib', 'word-aligner', 'scripture-resources-rcl', 'uw-quote-helpers', 'tsv-groupdata-parser', 'tc-source-content-updater', 'checking-tool-rcl', 'tc-ui-toolkit', 'checking-tool-wrapper', 'wordmap-lexer', 'ScripturePane', '@oce-editor-tools/pk-aligner']</text:p>
          </table:table-cell>
          <table:table-cell table:style-name="ce1" office:value-type="string" calcext:value-type="string">
            <text:p>['string-punctuation-tokenizer', 'wordmap-lexer']</text:p>
          </table:table-cell>
          <table:table-cell table:style-name="ce1" office:value-type="string" calcext:value-type="string">
            <text:p>['FoustAndrew/wordAlignment', 'FoustAndrew/tc-source-content-updater', 'FoustAndrew/tc-ui-toolkit', 'unfoldingWord/single-scripture-rcl', 'unfoldingWord/translation-helps-rcl', 'unfoldingWord/gateway-edit', 'unfoldingWord/node-cli-add-gl-quotes-to-tsv-files', 'unfoldingWord/tsv7-tn-cleanup-app', 'unfoldingWord/tsv-quote-converters', 'unfoldingWord/word-aligner-lib', 'JEdward7777/codex-wordmap', 'hiscoder-com/level-desktop', 'DE7AULT/PRL-Restored', 'JEdward7777/VsCodeUsfmAligner', 'unfoldingWord-box3/word-aligner-extension', 'JEdward7777/alignment-transferer', 'JEdward7777/boostwordmapwithfs', 'JEdward7777/wordmapbooster', 'unfoldingWord/door43-preview-app', 'larsgson/d43-preview', 'unfoldingWord/oce-oak-edit', 'unfoldingWord/oce-oak-render', 'qSharpy/digital-health-assistant', 'Valyukhov/gl_quote-to-orig_quote', 'bible-technology/scribe-scripture-editor', 'Valyukhov/tsv_GLQuote_to_OrigQuote', 'hiscoder-com/level', 'hiscoder-com/tn-quote', 'unfoldingWord/oce-editor-tools', 'vipinpaul/autographa']</text:p>
          </table:table-cell>
          <table:table-cell table:style-name="ce1" office:value-type="string" calcext:value-type="string">
            <text:p>['mannycolon', 'klappy', 'ancientTexts-net', 'dependabot-support', 'PhotoNomad0', 'RoyalSix', 'da1nerd', 'richmahn', 'mandolyte', 'bspidel', 'Sterling (Jay) Scott', 'birchamp']</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string-punctuation-tokenizer" xlink:type="simple">https://github.com/unfoldingWord/string-punctuation-tokenizer</text:a></text:p>
          </table:table-cell>
          <table:table-cell table:style-name="ce4" office:value-type="string" calcext:value-type="string">
            <text:p>2026-05-27T23:23:55Z</text:p>
          </table:table-cell>
          <table:table-cell table:style-name="ce4"/>
          <table:table-cell table:style-name="ce1" office:value-type="string" calcext:value-type="string">
            <text:p>unfoldingWord/string-punctuation-tokeniz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Manual review - npm package</text:p>
          </table:table-cell>
          <table:table-cell table:style-name="ce1" office:value-type="string" calcext:value-type="string">
            <text:p>Package or repository name suggests a security-sensitive, CLI, deployment, configuration, or build-tool package.</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ource-content-updat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0-28T18:40:43Z</text:p>
          </table:table-cell>
          <table:table-cell table:style-name="ce1" office:value-type="string" calcext:value-type="string">
            <text:p>2025-10-28T18:14:38Z</text:p>
          </table:table-cell>
          <table:table-cell table:style-name="ce4" office:value-type="string" calcext:value-type="string">
            <text:p>2021-08-27T21:43:21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tc-source-content-updater</text:p>
          </table:table-cell>
          <table:table-cell table:style-name="ce1" table:formula="of:=FALSE()" office:value-type="float" office:value="0" calcext:value-type="float">
            <text:p>0</text:p>
          </table:table-cell>
          <table:table-cell table:style-name="ce1" office:value-type="float" office:value="7777" calcext:value-type="float">
            <text:p>7777</text:p>
          </table:table-cell>
          <table:table-cell table:style-name="ce1" office:value-type="string" calcext:value-type="string">
            <text:p>2025-10-28T18:16:22.466Z</text:p>
          </table:table-cell>
          <table:table-cell table:style-name="ce1" office:value-type="string" calcext:value-type="string">
            <text:p>['checking-extension', 'pdf-generator', 'translationCore', 'checking-tool-rcl']</text:p>
          </table:table-cell>
          <table:table-cell table:style-name="ce1" office:value-type="string" calcext:value-type="string">
            <text:p>['string-punctuation-tokenizer', 'tsv-groupdata-parser', 'usfm-js']</text:p>
          </table:table-cell>
          <table:table-cell table:style-name="ce1" office:value-type="string" calcext:value-type="string">
            <text:p>['FoustAndrew/wordAlignment', 'unfoldingWord/tx-job-handler', 'unfoldingWord/wordAlignment', 'unfoldingWord/checking-tool-wrapper', 'unfoldingWord-dev/uw-pdf-conversion-tools', 'unfoldingWord-dev/tools', 'unfoldingWord/translationCore']</text:p>
          </table:table-cell>
          <table:table-cell table:style-name="ce1" office:value-type="string" calcext:value-type="string">
            <text:p>['PhotoNomad0', 'mannycolon', 'richmahn', 'RoyalSix', 'dependabot-support', 'Sterling (Jay) Scott', 'da1nerd', 'bspidel']</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tc-source-content-updater" xlink:type="simple">https://github.com/unfoldingWord/tc-source-content-updater</text:a></text:p>
          </table:table-cell>
          <table:table-cell table:style-name="ce4" office:value-type="string" calcext:value-type="string">
            <text:p>2025-10-28T18:14:43Z</text:p>
          </table:table-cell>
          <table:table-cell table:style-name="ce4"/>
          <table:table-cell table:style-name="ce1" office:value-type="string" calcext:value-type="string">
            <text:p>unfoldingWord/tc-source-content-updat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7777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string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8-05-03T21:25:11Z</text:p>
          </table:table-cell>
          <table:table-cell table:style-name="ce1" office:value-type="string" calcext:value-type="string">
            <text:p>2018-05-03T21:25:02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c-strings</text:p>
          </table:table-cell>
          <table:table-cell table:style-name="ce1" table:number-columns-repeated="3"/>
          <table:table-cell table:style-name="ce1" office:value-type="string" calcext:value-type="string">
            <text:p>['translationCore', 'word-aligner-lib', 'checking-tool-rcl', 'selections', 'VerseCheck']</text:p>
          </table:table-cell>
          <table:table-cell table:style-name="ce1" table:number-columns-repeated="2"/>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strings" xlink:type="simple">https://github.com/unfoldingWord/tc-strings</text:a></text:p>
          </table:table-cell>
          <table:table-cell table:style-name="ce4" office:value-type="string" calcext:value-type="string">
            <text:p>2019-10-22T19:46:14Z</text:p>
          </table:table-cell>
          <table:table-cell table:style-name="ce4"/>
          <table:table-cell table:style-name="ce1" office:value-type="string" calcext:value-type="string">
            <text:p>unfoldingWord/tc-string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too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8-11T15:36:38Z</text:p>
          </table:table-cell>
          <table:table-cell table:style-name="ce1" office:value-type="string" calcext:value-type="string">
            <text:p>2020-04-16T01:20:11Z</text:p>
          </table:table-cell>
          <table:table-cell table:style-name="ce4" office:value-type="string" calcext:value-type="string">
            <text:p>2019-01-10T06:26:02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tc-tool</text:p>
          </table:table-cell>
          <table:table-cell table:style-name="ce1" table:number-columns-repeated="3"/>
          <table:table-cell table:style-name="ce1" office:value-type="string" calcext:value-type="string">
            <text:p>['translationCore', 'translationNotes', 'translationWords', 'wordAlignment', 'checking-tool-wrapper', 'VerseCheck', 'toolTemplate', 'ScripturePane']</text:p>
          </table:table-cell>
          <table:table-cell table:style-name="ce1"/>
          <table:table-cell table:style-name="ce1" office:value-type="string" calcext:value-type="string">
            <text:p>['FoustAndrew/wordAlignment', 'unfoldingWord/checking-tool-wrapper', 'unfoldingWord/translationNotes', 'unfoldingWord/translationWords', 'unfoldingWord/wordAlignment', 'unfoldingWord/translationCore']</text:p>
          </table:table-cell>
          <table:table-cell table:style-name="ce1" office:value-type="string" calcext:value-type="string">
            <text:p>['da1nerd', 'mannycolon', 'dependabot-support', 'PhotoNomad0', 'RoyalSix', 'bspidel']</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tc-tool" xlink:type="simple">https://github.com/unfoldingWord/tc-tool</text:a></text:p>
          </table:table-cell>
          <table:table-cell table:style-name="ce4" office:value-type="string" calcext:value-type="string">
            <text:p>2020-04-16T01:20:15Z</text:p>
          </table:table-cell>
          <table:table-cell table:style-name="ce4"/>
          <table:table-cell table:style-name="ce1" office:value-type="string" calcext:value-type="string">
            <text:p>unfoldingWord/tc-too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c-ui-toolki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2-31T18:53:36Z</text:p>
          </table:table-cell>
          <table:table-cell table:style-name="ce1" office:value-type="string" calcext:value-type="string">
            <text:p>2024-12-31T18:52:39Z</text:p>
          </table:table-cell>
          <table:table-cell table:style-name="ce4" office:value-type="string" calcext:value-type="string">
            <text:p>2019-02-06T21:38:09Z</text:p>
          </table:table-cell>
          <table:table-cell table:style-name="ce4" office:value-type="float" office:value="34" calcext:value-type="float">
            <text:p>34</text:p>
          </table:table-cell>
          <table:table-cell table:style-name="ce4" office:value-type="float" office:value="33" calcext:value-type="float">
            <text:p>33</text:p>
          </table:table-cell>
          <table:table-cell table:style-name="ce1"/>
          <table:table-cell table:style-name="ce1" office:value-type="string" calcext:value-type="string">
            <text:p>tc-ui-toolkit</text:p>
          </table:table-cell>
          <table:table-cell table:style-name="ce1" table:formula="of:=FALSE()" office:value-type="float" office:value="0" calcext:value-type="float">
            <text:p>0</text:p>
          </table:table-cell>
          <table:table-cell table:style-name="ce1" office:value-type="float" office:value="29502" calcext:value-type="float">
            <text:p>29502</text:p>
          </table:table-cell>
          <table:table-cell table:style-name="ce1" office:value-type="string" calcext:value-type="string">
            <text:p>2024-12-31T18:53:34.752Z</text:p>
          </table:table-cell>
          <table:table-cell table:style-name="ce1" office:value-type="string" calcext:value-type="string">
            <text:p>['alignment-playground', 'next-js-template', 'gateway-edit', 'translationCore', 'wordAlignment', 'gateway-admin', 'tc-create-app', 'single-scripture-rcl', 'translation-helps-rcl', 'scripture-resources-rcl', 'bsa', 'checking-tool-wrapper']</text:p>
          </table:table-cell>
          <table:table-cell table:style-name="ce1" office:value-type="string" calcext:value-type="string">
            <text:p>['string-punctuation-tokenizer', 'word-aligner', 'usfm-js']</text:p>
          </table:table-cell>
          <table:table-cell table:style-name="ce1" office:value-type="string" calcext:value-type="string">
            <text:p>['FoustAndrew/tc-ui-toolkit', 'FoustAndrew/wordAlignment', 'unfoldingWord/obt', 'unfoldingWord/single-scripture-rcl', 'unfoldingWord/translation-helps-rcl', 'unfoldingWord/gateway-edit',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 'unfoldingWord/wordAlignment', 'unfoldingWord/translationWords', 'unfoldingWord/translationCore']</text:p>
          </table:table-cell>
          <table:table-cell table:style-name="ce1" office:value-type="string" calcext:value-type="string">
            <text:p>['mannycolon', 'PhotoNomad0', 'RoyalSix', 'da1nerd', 'richmahn', 'Sterling (Jay) Scott', 'bspidel', 'dependabot-support']</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5" office:value-type="string" calcext:value-type="string">
            <text:p><text:a xlink:href="https://github.com/unfoldingWord/tc-ui-toolkit" xlink:type="simple">https://github.com/unfoldingWord/tc-ui-toolkit</text:a></text:p>
          </table:table-cell>
          <table:table-cell table:style-name="ce4" office:value-type="string" calcext:value-type="string">
            <text:p>2024-12-31T18:52:44Z</text:p>
          </table:table-cell>
          <table:table-cell table:style-name="ce4"/>
          <table:table-cell table:style-name="ce1" office:value-type="string" calcext:value-type="string">
            <text:p>unfoldingWord/tc-ui-toolkit</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9502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help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3-27T22:01:48Z</text:p>
          </table:table-cell>
          <table:table-cell table:style-name="ce1" office:value-type="string" calcext:value-type="string">
            <text:p>2026-03-27T22:00:54Z</text:p>
          </table:table-cell>
          <table:table-cell table:style-name="ce4"/>
          <table:table-cell table:style-name="ce4" office:value-type="float" office:value="8" calcext:value-type="float">
            <text:p>8</text:p>
          </table:table-cell>
          <table:table-cell table:style-name="ce4" office:value-type="float" office:value="2" calcext:value-type="float">
            <text:p>2</text:p>
          </table:table-cell>
          <table:table-cell table:style-name="ce1"/>
          <table:table-cell table:style-name="ce1" office:value-type="string" calcext:value-type="string">
            <text:p>translation-helps-rcl</text:p>
          </table:table-cell>
          <table:table-cell table:style-name="ce1" table:formula="of:=FALSE()" office:value-type="float" office:value="0" calcext:value-type="float">
            <text:p>0</text:p>
          </table:table-cell>
          <table:table-cell table:style-name="ce1" office:value-type="float" office:value="15003" calcext:value-type="float">
            <text:p>15003</text:p>
          </table:table-cell>
          <table:table-cell table:style-name="ce1" office:value-type="string" calcext:value-type="string">
            <text:p>2026-03-27T22:01:47.002Z</text:p>
          </table:table-cell>
          <table:table-cell table:style-name="ce1" office:value-type="string" calcext:value-type="string">
            <text:p>['next-js-template', 'gateway-edit', 'admin-app', 'create-app', 'gateway-admin', 'single-scripture-rcl', 'bsa', 'gateway-translate', 'uw-editor', 'resource-workspace-rcl']</text:p>
          </table:table-cell>
          <table:table-cell table:style-name="ce1" office:value-type="string" calcext:value-type="string">
            <text:p>['bible-reference-range', 'dcs-branch-merger', 'gitea-react-toolkit', 'markdown-translatable', 'scripture-resources-rcl', 'tc-ui-toolkit', 'word-aligner']</text:p>
          </table:table-cell>
          <table:table-cell table:style-name="ce1" office:value-type="string" calcext:value-type="string">
            <text:p>['unfoldingWord/obt', 'unfoldingWord/single-scripture-rcl', 'unfoldingWord/gateway-edit', 'larsgson/d43-preview', 'unfoldingWord/oce-oak-edit', 'unfoldingWord/oce-oak-render', 'bible-technology/scribe-scripture-editor', 'vipinpaul/autographa', 'unfoldingWord/oce-editor-tools', 'unfoldingWord/uw-editor', 'unfoldingWord/gateway-translate', 'unfoldingWord-box3/translation-helps-print-preview', 'texttree/filter-translation-words-rcl', 'hiscoder-com/timeline-poc', 'unfoldingWord/gateway-admin', 'Ashersam/Autographa2.0-AutoUpdate', 'gbin-org/alignment-editor-rcl-poc', 'friendsofagape/autographa', 'hiscoder-com/obt']</text:p>
          </table:table-cell>
          <table:table-cell table:style-name="ce1" office:value-type="string" calcext:value-type="string">
            <text:p>['mannycolon', 'PhotoNomad0', 'kintsoogi', 'superdav42', 'larsgson', 'abelpz', 'jincypjose', 'theNerd247', 'Joel-C-Johnson', 'richmahn', 'klappy', 'RoyalSix', '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ranslation-helps-rcl" xlink:type="simple">https://github.com/unfoldingWord/translation-helps-rcl</text:a></text:p>
          </table:table-cell>
          <table:table-cell table:style-name="ce4" office:value-type="string" calcext:value-type="string">
            <text:p>2026-03-27T22:00:59Z</text:p>
          </table:table-cell>
          <table:table-cell table:style-name="ce4"/>
          <table:table-cell table:style-name="ce1" office:value-type="string" calcext:value-type="string">
            <text:p>unfoldingWord/translation-helps-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5003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sv-groupdata-pars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5-12-01T15:56:28Z</text:p>
          </table:table-cell>
          <table:table-cell table:style-name="ce1" office:value-type="string" calcext:value-type="string">
            <text:p>2025-12-01T15:18:56Z</text:p>
          </table:table-cell>
          <table:table-cell table:style-name="ce4" office:value-type="string" calcext:value-type="string">
            <text:p>2021-08-27T21:03:12Z</text:p>
          </table:table-cell>
          <table:table-cell table:number-columns-repeated="2" table:style-name="ce4" office:value-type="float" office:value="7" calcext:value-type="float">
            <text:p>7</text:p>
          </table:table-cell>
          <table:table-cell table:style-name="ce1"/>
          <table:table-cell table:style-name="ce1" office:value-type="string" calcext:value-type="string">
            <text:p>tsv-groupdata-parser</text:p>
          </table:table-cell>
          <table:table-cell table:style-name="ce1" table:formula="of:=FALSE()" office:value-type="float" office:value="0" calcext:value-type="float">
            <text:p>0</text:p>
          </table:table-cell>
          <table:table-cell table:style-name="ce1" office:value-type="float" office:value="6418" calcext:value-type="float">
            <text:p>6418</text:p>
          </table:table-cell>
          <table:table-cell table:style-name="ce1" office:value-type="string" calcext:value-type="string">
            <text:p>2024-10-16T17:43:33.516Z</text:p>
          </table:table-cell>
          <table:table-cell table:style-name="ce1" office:value-type="string" calcext:value-type="string">
            <text:p>['checking-extension', 'pdf-generator', 'translationCore', 'uw-quote-helpers', 'tc-source-content-updater', 'checking-tool-rcl']</text:p>
          </table:table-cell>
          <table:table-cell table:style-name="ce1" office:value-type="string" calcext:value-type="string">
            <text:p>['bible-reference-range', 'uw-tsv-parser', 'string-punctuation-tokenizer']</text:p>
          </table:table-cell>
          <table:table-cell table:style-name="ce1" office:value-type="string" calcext:value-type="string">
            <text:p>['FoustAndrew/tc-source-content-updater', '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uw-quote-helpers', 'unfoldingWord/tx-job-handler', 'unfoldingWord/checking-tool-wrapper', 'unfoldingWord-dev/uw-pdf-conversion-tools', 'unfoldingWord/translationCore', 'unfoldingWord/tc-source-content-updater']</text:p>
          </table:table-cell>
          <table:table-cell table:style-name="ce1" office:value-type="string" calcext:value-type="string">
            <text:p>['mannycolon', 'PhotoNomad0', 'da1nerd', 'richmahn', 'RoyalSix', 'mandolyte', 'Sterling (Jay) Scott', 'yakob-aleksandrovich']</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tsv-groupdata-parser" xlink:type="simple">https://github.com/unfoldingWord/tsv-groupdata-parser</text:a></text:p>
          </table:table-cell>
          <table:table-cell table:style-name="ce4" office:value-type="string" calcext:value-type="string">
            <text:p>2025-12-01T15:19:13Z</text:p>
          </table:table-cell>
          <table:table-cell table:style-name="ce4"/>
          <table:table-cell table:style-name="ce1" office:value-type="string" calcext:value-type="string">
            <text:p>unfoldingWord/tsv-groupdata-pars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6418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sv-quote-convert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06:45:29Z</text:p>
          </table:table-cell>
          <table:table-cell table:style-name="ce1" office:value-type="string" calcext:value-type="string">
            <text:p>2026-06-17T06:45:2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sv-quote-converters</text:p>
          </table:table-cell>
          <table:table-cell table:style-name="ce1" table:number-columns-repeated="3"/>
          <table:table-cell table:style-name="ce1" office:value-type="string" calcext:value-type="string">
            <text:p>['twl-generator', 'tsv-twl-creation-app', 'tsv7-tn-cleanup-app', 'add-gl-quotes-to-tsv-files']</text:p>
          </table:table-cell>
          <table:table-cell table:style-name="ce1" office:value-type="string" calcext:value-type="string">
            <text:p>string-punctuation-tokenizer</text:p>
          </table:table-cell>
          <table:table-cell table:style-name="ce1" office:value-type="string" calcext:value-type="string">
            <text:p>['unfoldingWord/node-cli-add-gl-quotes-to-tsv-files', 'unfoldingWord/tsv7-tn-cleanup-app']</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sv-quote-converters" xlink:type="simple">https://github.com/unfoldingWord/tsv-quote-converters</text:a></text:p>
          </table:table-cell>
          <table:table-cell table:style-name="ce4" office:value-type="string" calcext:value-type="string">
            <text:p>2026-06-17T06:45:34Z</text:p>
          </table:table-cell>
          <table:table-cell table:style-name="ce4"/>
          <table:table-cell table:style-name="ce1" office:value-type="string" calcext:value-type="string">
            <text:p>unfoldingWord/tsv-quote-converter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sfm-alignment-remover-app</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1-21T23:17:08Z</text:p>
          </table:table-cell>
          <table:table-cell table:style-name="ce1" office:value-type="string" calcext:value-type="string">
            <text:p>2026-01-21T23:17:0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sfm-alignment-remover</text:p>
          </table:table-cell>
          <table:table-cell table:style-name="ce1" table:number-columns-repeated="3"/>
          <table:table-cell table:style-name="ce1" office:value-type="string" calcext:value-type="string">
            <text:p>['twl-generator', 'door43-preview-app', 'door43-preview-renderers']</text:p>
          </table:table-cell>
          <table:table-cell table:style-name="ce1" office:value-type="string" calcext:value-type="string">
            <text:p>usfm-js</text:p>
          </table:table-cell>
          <table:table-cell table:style-name="ce1" office:value-type="string" calcext:value-type="string">
            <text:p>unfoldingWord/door43-preview-app</text:p>
          </table:table-cell>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sfm-alignment-remover-app" xlink:type="simple">https://github.com/unfoldingWord/usfm-alignment-remover-app</text:a></text:p>
          </table:table-cell>
          <table:table-cell table:style-name="ce4" office:value-type="string" calcext:value-type="string">
            <text:p>2026-01-21T23:17:11Z</text:p>
          </table:table-cell>
          <table:table-cell table:style-name="ce4"/>
          <table:table-cell table:style-name="ce1" office:value-type="string" calcext:value-type="string">
            <text:p>unfoldingWord/usfm-alignment-remover-app</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sfm-j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6-05-23T23:11:20Z</text:p>
          </table:table-cell>
          <table:table-cell table:style-name="ce1" office:value-type="string" calcext:value-type="string">
            <text:p>2026-05-23T23:09:13Z</text:p>
          </table:table-cell>
          <table:table-cell table:style-name="ce4" office:value-type="string" calcext:value-type="string">
            <text:p>2018-11-05T12:47:58Z</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1"/>
          <table:table-cell table:style-name="ce1" office:value-type="string" calcext:value-type="string">
            <text:p>usfm-js</text:p>
          </table:table-cell>
          <table:table-cell table:style-name="ce1" table:number-columns-repeated="3"/>
          <table:table-cell table:style-name="ce1" office:value-type="string" calcext:value-type="string">
            <text:p>['checking-extension', 'translation-helps', 'qa-app', 'alignment-playground', 'tc-create-app', 'greek-apparatus-app', 'pdf-generator', 'scripture-as-graph', 'cskillbp-prompt-over-code', 'zulip-bot', 'tsv-twl-creation-app', 'translationCore', 'wordAlignment', 'uw-content-validation', 'door43-preview-app', 'enhanced-word-aligner-rcl', 'word-aligner-rcl', 'word-aligner-lib', 'word-aligner', 'single-scripture-rcl', 'scripture-resources-rcl', 'uw-quote-helpers', 'uw-wordmapbooster', 'door43-preview-renderers', 'usfm-alignment-remover', 'tc-source-content-updater', 'checking-tool-rcl', 'tc-ui-toolkit', 'checking-tool-wrapper', 'uw-bible-parser', 'wordmap-usfm', 'book-package-rcl', 'uw-word-count', 'usfm-js-wrapper', 'tc_resources', 'VerseCheck', 'resource-checker', 'ScripturePane', '@bt-synergy/mobile', 'tc-study', '@bt-synergy/resource-parsers', '@bt-synergy/usfm-processor']</text:p>
          </table:table-cell>
          <table:table-cell table:style-name="ce1"/>
          <table:table-cell table:style-name="ce1" office:value-type="string" calcext:value-type="string">
            <text:p>['ihoegen/usfm-parser', 'unfoldingWord/tsv-quote-converters', 'Asjas/berean-standard-bible', 'eten-tech-foundation/scripture-editors', 'FoustAndrew/tc-source-content-updater', 'FoustAndrew/wordAlignment', 'FoustAndrew/tc-ui-toolkit', 'faithcomesbyhearing/sofria-cli', 'mvh-solutions/juxta-utils', 'unfoldingWord/single-scripture-rcl', 'unfoldingWord/translation-helps-rcl', 'unfoldingWord/gateway-edit', 'Proskomma/proskomma-core', 'pankosmia/core-client-content', 'Bible-Translation-Tools/WordAnalysisTool', 'psyirius/reverseview', 'CoderJo-Pro/bible-viewer', 'pankosmia/core-client-workspace', 'mvh-solutions/pithekos', 'unfoldingWord-box3/codex-sb-handler', 'unfoldingWord/word-aligner-lib', 'mXaln/word-fixer', 'vitor-matias/bible-api', 'Proskomma/perf-render-html-demo', 'Bishoymly/next-bible', 'JEdward7777/codex-wordmap', 'unfoldingWord/usfm-alignment-remover-app', 'Proskomma/sunalizo', 'Proskomma/perf-checks', 'hiscoder-com/level-desktop', 'hiscoder-com/community-check-app']</text:p>
          </table:table-cell>
          <table:table-cell table:style-name="ce1" office:value-type="string" calcext:value-type="string">
            <text:p>['PhotoNomad0', 'RoyalSix', 'mannycolon', 'klappy', 'Sterling (Jay) Scott', 'ihoegen', 'da1nerd', 'dependabot-support', 'richmahn', 'bspidel']</text:p>
          </table:table-cell>
          <table:table-cell table:style-name="ce1" office:value-type="float" office:value="4" calcext:value-type="float">
            <text:p>4</text:p>
          </table:table-cell>
          <table:table-cell table:style-name="ce1" office:value-type="float" office:value="0" calcext:value-type="float">
            <text:p>0</text:p>
          </table:table-cell>
          <table:table-cell table:style-name="ce5" office:value-type="string" calcext:value-type="string">
            <text:p><text:a xlink:href="https://github.com/unfoldingWord/usfm-js" xlink:type="simple">https://github.com/unfoldingWord/usfm-js</text:a></text:p>
          </table:table-cell>
          <table:table-cell table:style-name="ce4" office:value-type="string" calcext:value-type="string">
            <text:p>2026-05-23T23:09:18Z</text:p>
          </table:table-cell>
          <table:table-cell table:style-name="ce4"/>
          <table:table-cell table:style-name="ce1" office:value-type="string" calcext:value-type="string">
            <text:p>unfoldingWord/usfm-j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w-content-validation</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7T09:33:50Z</text:p>
          </table:table-cell>
          <table:table-cell table:style-name="ce1" office:value-type="string" calcext:value-type="string">
            <text:p>2026-06-07T09:31:31Z</text:p>
          </table:table-cell>
          <table:table-cell table:style-name="ce4"/>
          <table:table-cell table:style-name="ce4" office:value-type="float" office:value="80" calcext:value-type="float">
            <text:p>80</text:p>
          </table:table-cell>
          <table:table-cell table:style-name="ce4" office:value-type="float" office:value="2" calcext:value-type="float">
            <text:p>2</text:p>
          </table:table-cell>
          <table:table-cell table:style-name="ce1"/>
          <table:table-cell table:style-name="ce1" office:value-type="string" calcext:value-type="string">
            <text:p>uw-content-validation</text:p>
          </table:table-cell>
          <table:table-cell table:style-name="ce1" table:formula="of:=FALSE()" office:value-type="float" office:value="0" calcext:value-type="float">
            <text:p>0</text:p>
          </table:table-cell>
          <table:table-cell table:style-name="ce1" office:value-type="float" office:value="2070" calcext:value-type="float">
            <text:p>2070</text:p>
          </table:table-cell>
          <table:table-cell table:style-name="ce1" office:value-type="string" calcext:value-type="string">
            <text:p>2026-06-07T09:30:48.456Z</text:p>
          </table:table-cell>
          <table:table-cell table:style-name="ce1" office:value-type="string" calcext:value-type="string">
            <text:p>['tc-create-app', 'content-validation-app', 'gateway-admin', 'catalog-next-toolkit']</text:p>
          </table:table-cell>
          <table:table-cell table:style-name="ce1" office:value-type="string" calcext:value-type="string">
            <text:p>usfm-js</text:p>
          </table:table-cell>
          <table:table-cell table:style-name="ce1" office:value-type="string" calcext:value-type="string">
            <text:p>['unfoldingWord/gateway-admin', 'unfoldingWord/tc-create-app']</text:p>
          </table:table-cell>
          <table:table-cell table:style-name="ce1" office:value-type="string" calcext:value-type="string">
            <text:p>['RobH123', 'mandolyte', 'PhotoNomad0', 'richmahn', 'dependabot[bot]', 'jag3773', 'ancientTexts-ne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content-validation" xlink:type="simple">https://github.com/unfoldingWord/uw-content-validation</text:a></text:p>
          </table:table-cell>
          <table:table-cell table:style-name="ce4" office:value-type="string" calcext:value-type="string">
            <text:p>2026-06-07T09:31:36Z</text:p>
          </table:table-cell>
          <table:table-cell table:style-name="ce4"/>
          <table:table-cell table:style-name="ce1" office:value-type="string" calcext:value-type="string">
            <text:p>unfoldingWord/uw-content-validation</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07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w-languages-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8T16:01:39Z</text:p>
          </table:table-cell>
          <table:table-cell table:style-name="ce1" office:value-type="string" calcext:value-type="string">
            <text:p>2026-05-28T16:00:29Z</text:p>
          </table:table-cell>
          <table:table-cell table:style-name="ce4"/>
          <table:table-cell table:style-name="ce4" office:value-type="float" office:value="15" calcext:value-type="float">
            <text:p>15</text:p>
          </table:table-cell>
          <table:table-cell table:style-name="ce4" office:value-type="float" office:value="12" calcext:value-type="float">
            <text:p>12</text:p>
          </table:table-cell>
          <table:table-cell table:style-name="ce1"/>
          <table:table-cell table:style-name="ce1" office:value-type="string" calcext:value-type="string">
            <text:p>uw-languages-rcl</text:p>
          </table:table-cell>
          <table:table-cell table:style-name="ce1" table:formula="of:=FALSE()" office:value-type="float" office:value="0" calcext:value-type="float">
            <text:p>0</text:p>
          </table:table-cell>
          <table:table-cell table:style-name="ce1" office:value-type="float" office:value="1220" calcext:value-type="float">
            <text:p>1220</text:p>
          </table:table-cell>
          <table:table-cell table:style-name="ce1" office:value-type="string" calcext:value-type="string">
            <text:p>2026-05-28T16:01:32.183Z</text:p>
          </table:table-cell>
          <table:table-cell table:style-name="ce1" office:value-type="string" calcext:value-type="string">
            <text:p>['tc-create-app', 'dcs-react-hooks']</text:p>
          </table:table-cell>
          <table:table-cell table:style-name="ce1"/>
          <table:table-cell table:style-name="ce1" office:value-type="string" calcext:value-type="string">
            <text:p>['nishantshah-me/docusaurus', 'unfoldingWord/gateway-translate', 'unfoldingWord/tc-create-app']</text:p>
          </table:table-cell>
          <table:table-cell table:style-name="ce1" office:value-type="string" calcext:value-type="string">
            <text:p>['mandolyte', 'dependabot[bot]', 'abelpz',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languages-rcl" xlink:type="simple">https://github.com/unfoldingWord/uw-languages-rcl</text:a></text:p>
          </table:table-cell>
          <table:table-cell table:style-name="ce4" office:value-type="string" calcext:value-type="string">
            <text:p>2026-05-28T16:01:18Z</text:p>
          </table:table-cell>
          <table:table-cell table:style-name="ce4"/>
          <table:table-cell table:style-name="ce1" office:value-type="string" calcext:value-type="string">
            <text:p>unfoldingWord/uw-languages-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22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w-proskomma</text:p>
          </table:table-cell>
          <table:table-cell table:style-name="ce1" office:value-type="string" calcext:value-type="string">
            <text:p>unfoldingWord-box3</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0-10T15:27:48Z</text:p>
          </table:table-cell>
          <table:table-cell table:style-name="ce1" office:value-type="string" calcext:value-type="string">
            <text:p>2024-10-10T15:27:44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uw-proskomma</text:p>
          </table:table-cell>
          <table:table-cell table:style-name="ce1" table:formula="of:=FALSE()" office:value-type="float" office:value="0" calcext:value-type="float">
            <text:p>0</text:p>
          </table:table-cell>
          <table:table-cell table:style-name="ce1" office:value-type="float" office:value="2361" calcext:value-type="float">
            <text:p>2361</text:p>
          </table:table-cell>
          <table:table-cell table:style-name="ce1" office:value-type="string" calcext:value-type="string">
            <text:p>2022-07-13T12:06:56.761Z</text:p>
          </table:table-cell>
          <table:table-cell table:style-name="ce1" office:value-type="string" calcext:value-type="string">
            <text:p>['proskomma-scripture-resources-rcl', 'epitelete-html']</text:p>
          </table:table-cell>
          <table:table-cell table:style-name="ce1"/>
          <table:table-cell table:style-name="ce1" office:value-type="string" calcext:value-type="string">
            <text:p>['Proskomma/proskomma-legacy-projects', 'unfoldingWord/gateway-translate', 'DanielC-N/ptxaligner', 'Proskomma/proskomma-json-tools', 'unfoldingWord/epitelete-html', 'Proskomma/epitelete', 'Proskomma/diegesis-apollo-sandbox', 'Proskomma/proskomma-render-pdf', 'Proskomma/diegesis-server']</text:p>
          </table:table-cell>
          <table:table-cell table:style-name="ce1" office:value-type="string" calcext:value-type="string">
            <text:p>['mvahowe', 'mandolyte', 'jag3773', '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uw-proskomma" xlink:type="simple">https://github.com/unfoldingWord-box3/uw-proskomma</text:a></text:p>
          </table:table-cell>
          <table:table-cell table:style-name="ce4" office:value-type="string" calcext:value-type="string">
            <text:p>2024-10-10T15:27:53Z</text:p>
          </table:table-cell>
          <table:table-cell table:style-name="ce4"/>
          <table:table-cell table:style-name="ce1" office:value-type="string" calcext:value-type="string">
            <text:p>unfoldingWord-box3/uw-proskomma</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2361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w-quote-helpers</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number-columns-repeated="2" table:style-name="ce1" office:value-type="string" calcext:value-type="string">
            <text:p>2026-03-10T00:05:4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w-quote-helpers</text:p>
          </table:table-cell>
          <table:table-cell table:style-name="ce1" table:formula="of:=FALSE()" office:value-type="float" office:value="0" calcext:value-type="float">
            <text:p>0</text:p>
          </table:table-cell>
          <table:table-cell table:style-name="ce1" office:value-type="float" office:value="3142" calcext:value-type="float">
            <text:p>3142</text:p>
          </table:table-cell>
          <table:table-cell table:style-name="ce1" office:value-type="string" calcext:value-type="string">
            <text:p>2025-01-17T14:55:12.819Z</text:p>
          </table:table-cell>
          <table:table-cell table:style-name="ce1" office:value-type="string" calcext:value-type="string">
            <text:p>['door43-preview-app', 'single-scripture-rcl', 'scripture-resources-rcl']</text:p>
          </table:table-cell>
          <table:table-cell table:style-name="ce1" office:value-type="string" calcext:value-type="string">
            <text:p>['bible-reference-range', 'string-punctuation-tokenizer', 'tsv-groupdata-parser', 'usfm-js', 'uw-bible-parser']</text:p>
          </table:table-cell>
          <table:table-cell table:style-name="ce1" office:value-type="string" calcext:value-type="string">
            <text:p>['unfoldingWord/single-scripture-rcl', 'unfoldingWord/translation-helps-rcl', 'unfoldingWord/gateway-edit', 'unfoldingWord/door43-preview-app', 'larsgson/d43-preview', 'unfoldingWord/oce-oak-edit', 'unfoldingWord/oce-oak-render', 'unfoldingWord/gateway-translate', 'Valyukhov/gl_quote-to-orig_quote', 'Valyukhov/tsv_GLQuote_to_OrigQuote', 'unfoldingWord/tc-create-app', 'unfoldingWord/scripture-resources-rcl', 'unfoldingWord/tx-job-handler']</text:p>
          </table:table-cell>
          <table:table-cell table:style-name="ce1" office:value-type="string" calcext:value-type="string">
            <text:p>['abelpz', 'PhotoNomad0', 'richmahn', 'Mookth789']</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quote-helpers" xlink:type="simple">https://github.com/unfoldingWord/uw-quote-helpers</text:a></text:p>
          </table:table-cell>
          <table:table-cell table:style-name="ce4" office:value-type="string" calcext:value-type="string">
            <text:p>2026-03-10T00:05:55Z</text:p>
          </table:table-cell>
          <table:table-cell table:style-name="ce4"/>
          <table:table-cell table:style-name="ce1" office:value-type="string" calcext:value-type="string">
            <text:p>unfoldingWord/uw-quote-helpers</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142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w-scripture-pars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style-name="ce1" office:value-type="string" calcext:value-type="string">
            <text:p>2023-03-16T00:50:58Z</text:p>
          </table:table-cell>
          <table:table-cell table:style-name="ce1" office:value-type="string" calcext:value-type="string">
            <text:p>2023-03-16T00:49:4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w-bible-parser</text:p>
          </table:table-cell>
          <table:table-cell table:style-name="ce1" table:number-columns-repeated="3"/>
          <table:table-cell table:style-name="ce1" office:value-type="string" calcext:value-type="string">
            <text:p>uw-quote-helpers</text:p>
          </table:table-cell>
          <table:table-cell table:style-name="ce1" office:value-type="string" calcext:value-type="string">
            <text:p>['bible-reference-range', 'usfm-js']</text:p>
          </table:table-cell>
          <table:table-cell table:style-name="ce1" office:value-type="string" calcext:value-type="string">
            <text:p>abelpz/oce-library-starter</text:p>
          </table:table-cell>
          <table:table-cell table:style-name="ce1" office:value-type="string" calcext:value-type="string">
            <text:p>abelpz</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scripture-parser" xlink:type="simple">https://github.com/unfoldingWord/uw-scripture-parser</text:a></text:p>
          </table:table-cell>
          <table:table-cell table:style-name="ce4" office:value-type="string" calcext:value-type="string">
            <text:p>2023-03-15T02:11:57Z</text:p>
          </table:table-cell>
          <table:table-cell table:style-name="ce4"/>
          <table:table-cell table:style-name="ce1" office:value-type="string" calcext:value-type="string">
            <text:p>unfoldingWord/uw-scripture-pars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w-tsv-pars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6-05T15:16:07Z</text:p>
          </table:table-cell>
          <table:table-cell table:style-name="ce1" office:value-type="string" calcext:value-type="string">
            <text:p>2023-05-31T22:28:26Z</text:p>
          </table:table-cell>
          <table:table-cell table:style-name="ce4"/>
          <table:table-cell table:number-columns-repeated="2" table:style-name="ce4" office:value-type="float" office:value="1" calcext:value-type="float">
            <text:p>1</text:p>
          </table:table-cell>
          <table:table-cell table:style-name="ce1"/>
          <table:table-cell table:style-name="ce1" office:value-type="string" calcext:value-type="string">
            <text:p>uw-tsv-parser</text:p>
          </table:table-cell>
          <table:table-cell table:style-name="ce1" table:formula="of:=FALSE()" office:value-type="float" office:value="0" calcext:value-type="float">
            <text:p>0</text:p>
          </table:table-cell>
          <table:table-cell table:style-name="ce1" office:value-type="float" office:value="4619" calcext:value-type="float">
            <text:p>4619</text:p>
          </table:table-cell>
          <table:table-cell table:style-name="ce1" office:value-type="string" calcext:value-type="string">
            <text:p>2022-02-02T14:06:17.344Z</text:p>
          </table:table-cell>
          <table:table-cell table:style-name="ce1" office:value-type="string" calcext:value-type="string">
            <text:p>['checking-extension', 'gateway-admin', 'tc-create-app', 'word-aligner-rcl', 'tsv-groupdata-parser', 'checking-tool-rcl']</text:p>
          </table:table-cell>
          <table:table-cell table:style-name="ce1" table:number-columns-repeated="2"/>
          <table:table-cell table:style-name="ce1" office:value-type="string" calcext:value-type="string">
            <text:p>['mandolyte', 'PhotoNomad0', 'ancientTexts-net', 'mannycol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tsv-parser" xlink:type="simple">https://github.com/unfoldingWord/uw-tsv-parser</text:a></text:p>
          </table:table-cell>
          <table:table-cell table:style-name="ce4" office:value-type="string" calcext:value-type="string">
            <text:p>2023-05-31T22:28:33Z</text:p>
          </table:table-cell>
          <table:table-cell table:style-name="ce4"/>
          <table:table-cell table:style-name="ce1" office:value-type="string" calcext:value-type="string">
            <text:p>unfoldingWord/uw-tsv-pars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4619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uw-word-count</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1-05T03:16:29Z</text:p>
          </table:table-cell>
          <table:table-cell table:style-name="ce1" office:value-type="string" calcext:value-type="string">
            <text:p>2020-08-11T13:41:51Z</text:p>
          </table:table-cell>
          <table:table-cell table:style-name="ce4"/>
          <table:table-cell table:style-name="ce4" office:value-type="float" office:value="29" calcext:value-type="float">
            <text:p>29</text:p>
          </table:table-cell>
          <table:table-cell table:style-name="ce4" office:value-type="float" office:value="25" calcext:value-type="float">
            <text:p>25</text:p>
          </table:table-cell>
          <table:table-cell table:style-name="ce1"/>
          <table:table-cell table:style-name="ce1" office:value-type="string" calcext:value-type="string">
            <text:p>uw-word-count</text:p>
          </table:table-cell>
          <table:table-cell table:style-name="ce1" table:formula="of:=FALSE()" office:value-type="float" office:value="0" calcext:value-type="float">
            <text:p>0</text:p>
          </table:table-cell>
          <table:table-cell table:style-name="ce1" office:value-type="float" office:value="365" calcext:value-type="float">
            <text:p>365</text:p>
          </table:table-cell>
          <table:table-cell table:style-name="ce1" office:value-type="string" calcext:value-type="string">
            <text:p>2020-07-15T14:01:25.409Z</text:p>
          </table:table-cell>
          <table:table-cell table:style-name="ce1" office:value-type="string" calcext:value-type="string">
            <text:p>book-package-rcl</text:p>
          </table:table-cell>
          <table:table-cell table:style-name="ce1" office:value-type="string" calcext:value-type="string">
            <text:p>usfm-js</text:p>
          </table:table-cell>
          <table:table-cell table:style-name="ce1" office:value-type="string" calcext:value-type="string">
            <text:p>['unfoldingWord/book-package-app', 'unfoldingWord/book-package-rcl']</text:p>
          </table:table-cell>
          <table:table-cell table:style-name="ce1" office:value-type="string" calcext:value-type="string">
            <text:p>['mandolyte', 'dependabot[bot]',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word-count" xlink:type="simple">https://github.com/unfoldingWord/uw-word-count</text:a></text:p>
          </table:table-cell>
          <table:table-cell table:style-name="ce4" office:value-type="string" calcext:value-type="string">
            <text:p>2020-08-11T13:41:55Z</text:p>
          </table:table-cell>
          <table:table-cell table:style-name="ce4"/>
          <table:table-cell table:style-name="ce1" office:value-type="string" calcext:value-type="string">
            <text:p>unfoldingWord/uw-word-count</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365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ord-align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1:22:15Z</text:p>
          </table:table-cell>
          <table:table-cell table:style-name="ce1" office:value-type="string" calcext:value-type="string">
            <text:p>2026-05-24T21:16:40Z</text:p>
          </table:table-cell>
          <table:table-cell table:style-name="ce4" office:value-type="string" calcext:value-type="string">
            <text:p>2019-02-06T21:43:28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word-aligner</text:p>
          </table:table-cell>
          <table:table-cell table:style-name="ce1" table:formula="of:=FALSE()" office:value-type="float" office:value="0" calcext:value-type="float">
            <text:p>0</text:p>
          </table:table-cell>
          <table:table-cell table:style-name="ce1" office:value-type="float" office:value="44675" calcext:value-type="float">
            <text:p>44675</text:p>
          </table:table-cell>
          <table:table-cell table:style-name="ce1" office:value-type="string" calcext:value-type="string">
            <text:p>2026-05-24T21:22:13.663Z</text:p>
          </table:table-cell>
          <table:table-cell table:style-name="ce1" office:value-type="string" calcext:value-type="string">
            <text:p>['alignment-playground', 'next-js-template', 'gateway-edit', 'translationCore', 'wordAlignment', 'gateway-admin', 'tc-create-app', 'word-aligner-rcl', 'word-aligner-lib', 'single-scripture-rcl', 'translation-helps-rcl', 'scripture-resources-rcl', 'bsa', 'checking-tool-rcl', 'tc-ui-toolkit', 'checking-tool-wrapper']</text:p>
          </table:table-cell>
          <table:table-cell table:style-name="ce1" office:value-type="string" calcext:value-type="string">
            <text:p>['string-punctuation-tokenizer', 'usfm-js']</text:p>
          </table:table-cell>
          <table:table-cell table:style-name="ce1" office:value-type="string" calcext:value-type="string">
            <text:p>['FoustAndrew/wordAlignment', 'FoustAndrew/tc-ui-toolkit', 'unfoldingWord/obt', 'unfoldingWord/single-scripture-rcl', 'unfoldingWord/translation-helps-rcl', 'unfoldingWord/gateway-edit', 'unfoldingWord/word-aligner-lib', 'JEdward7777/codex-wordmap', 'JEdward7777/VsCodeUsfmAligner', 'unfoldingWord-box3/word-aligner-extension', 'JEdward7777/alignment-transferer', 'unfoldingWord/door43-preview-app', 'larsgson/d43-preview', 'unfoldingWord/oce-oak-edit', 'unfoldingWord/oce-oak-render', 'bible-technology/scribe-scripture-editor', 'unfoldingWord/oce-editor-tools', 'vipinpaul/autographa', 'unfoldingWord/word-aligner-rcl', 'unfoldingWord/gateway-translate', 'unfoldingWord/tc-create-app', 'friendsofagape/autographa', 'unfoldingWord-box3/translation-helps-print-preview', 'texttree/filter-translation-words-rcl', 'unfoldingWord/gateway-admin', 'hiscoder-com/obt', 'unfoldingWord/scripture-resources-rcl', 'unfoldingWord/checking-tool-wrapper', 'unfoldingWord/translationNotes']</text:p>
          </table:table-cell>
          <table:table-cell table:style-name="ce1" office:value-type="string" calcext:value-type="string">
            <text:p>['PhotoNomad0', 'mannycolon', 'RoyalSix', 'richmahn', 'dependabot-support', 'Sterling (Jay) Scott', 'da1nerd', 'bspidel']</text:p>
          </table:table-cell>
          <table:table-cell table:style-name="ce1" office:value-type="float" office:value="6" calcext:value-type="float">
            <text:p>6</text:p>
          </table:table-cell>
          <table:table-cell table:style-name="ce1" office:value-type="float" office:value="0" calcext:value-type="float">
            <text:p>0</text:p>
          </table:table-cell>
          <table:table-cell table:style-name="ce5" office:value-type="string" calcext:value-type="string">
            <text:p><text:a xlink:href="https://github.com/unfoldingWord/word-aligner" xlink:type="simple">https://github.com/unfoldingWord/word-aligner</text:a></text:p>
          </table:table-cell>
          <table:table-cell table:style-name="ce4" office:value-type="string" calcext:value-type="string">
            <text:p>2026-05-24T21:16:44Z</text:p>
          </table:table-cell>
          <table:table-cell table:style-name="ce4"/>
          <table:table-cell table:style-name="ce1" office:value-type="string" calcext:value-type="string">
            <text:p>unfoldingWord/word-align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44675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ord-aligner-lib</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2:38:03Z</text:p>
          </table:table-cell>
          <table:table-cell table:style-name="ce1" office:value-type="string" calcext:value-type="string">
            <text:p>2026-05-24T22:36:14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aligner-lib</text:p>
          </table:table-cell>
          <table:table-cell table:style-name="ce1" table:formula="of:=FALSE()" office:value-type="float" office:value="0" calcext:value-type="float">
            <text:p>0</text:p>
          </table:table-cell>
          <table:table-cell table:style-name="ce1" office:value-type="float" office:value="4741" calcext:value-type="float">
            <text:p>4741</text:p>
          </table:table-cell>
          <table:table-cell table:style-name="ce1" office:value-type="string" calcext:value-type="string">
            <text:p>2026-05-24T22:38:01.649Z</text:p>
          </table:table-cell>
          <table:table-cell table:style-name="ce1" office:value-type="string" calcext:value-type="string">
            <text:p>['word-aligner-rcl', 'checking-tool-rcl']</text:p>
          </table:table-cell>
          <table:table-cell table:style-name="ce1" office:value-type="string" calcext:value-type="string">
            <text:p>['string-punctuation-tokenizer', 'tc-strings', 'usfm-js', 'word-aligner', 'wordmap-lexer', 'bible-reference-range']</text:p>
          </table:table-cell>
          <table:table-cell table:style-name="ce1" office:value-type="string" calcext:value-type="string">
            <text:p>['unfoldingWord/word-aligner', 'unfoldingWord/door43-preview-app', 'unfoldingWord/gateway-edit', 'unfoldingWord/single-scripture-rcl', 'unfoldingWord/word-aligner-rcl']</text:p>
          </table:table-cell>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aligner-lib" xlink:type="simple">https://github.com/unfoldingWord/word-aligner-lib</text:a></text:p>
          </table:table-cell>
          <table:table-cell table:style-name="ce4" office:value-type="string" calcext:value-type="string">
            <text:p>2026-05-24T22:36:18Z</text:p>
          </table:table-cell>
          <table:table-cell table:style-name="ce4"/>
          <table:table-cell table:style-name="ce1" office:value-type="string" calcext:value-type="string">
            <text:p>unfoldingWord/word-aligner-lib</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4741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ord-aligner-rcl</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4T23:03:21Z</text:p>
          </table:table-cell>
          <table:table-cell table:style-name="ce1" office:value-type="string" calcext:value-type="string">
            <text:p>2026-05-24T23:02:05Z</text:p>
          </table:table-cell>
          <table:table-cell table:style-name="ce4"/>
          <table:table-cell table:style-name="ce4" office:value-type="float" office:value="5" calcext:value-type="float">
            <text:p>5</text:p>
          </table:table-cell>
          <table:table-cell table:style-name="ce4" office:value-type="float" office:value="2" calcext:value-type="float">
            <text:p>2</text:p>
          </table:table-cell>
          <table:table-cell table:style-name="ce1"/>
          <table:table-cell table:style-name="ce1" office:value-type="string" calcext:value-type="string">
            <text:p>word-aligner-rcl</text:p>
          </table:table-cell>
          <table:table-cell table:style-name="ce1" table:formula="of:=FALSE()" office:value-type="float" office:value="0" calcext:value-type="float">
            <text:p>0</text:p>
          </table:table-cell>
          <table:table-cell table:style-name="ce1" office:value-type="float" office:value="16522" calcext:value-type="float">
            <text:p>16522</text:p>
          </table:table-cell>
          <table:table-cell table:style-name="ce1" office:value-type="string" calcext:value-type="string">
            <text:p>2026-05-24T23:03:19.258Z</text:p>
          </table:table-cell>
          <table:table-cell table:style-name="ce1" office:value-type="string" calcext:value-type="string">
            <text:p>['door43-preview-app', 'gateway-edit', 'enhanced-word-aligner-rcl', 'single-scripture-rcl', '@oce-editor-tools/pk-aligner']</text:p>
          </table:table-cell>
          <table:table-cell table:style-name="ce1" office:value-type="string" calcext:value-type="string">
            <text:p>['bible-reference-range', 'string-punctuation-tokenizer', 'usfm-js', 'word-aligner', 'word-aligner-lib', 'wordmap', 'wordmap-lexer', 'uw-tsv-parser']</text:p>
          </table:table-cell>
          <table:table-cell table:style-name="ce1" office:value-type="string" calcext:value-type="string">
            <text:p>['unfoldingWord/word-aligner', 'unfoldingWord/single-scripture-rcl', 'unfoldingWord/gateway-edit', 'unfoldingWord/door43-preview-app', 'unfoldingWord-box3/word-aligner-extension', 'unfoldingWord/oce-editor-tools']</text:p>
          </table:table-cell>
          <table:table-cell table:style-name="ce1" office:value-type="string" calcext:value-type="string">
            <text:p>['PhotoNomad0', 'Joshua Lansford', 'jincypjos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aligner-rcl" xlink:type="simple">https://github.com/unfoldingWord/word-aligner-rcl</text:a></text:p>
          </table:table-cell>
          <table:table-cell table:style-name="ce4" office:value-type="string" calcext:value-type="string">
            <text:p>2026-05-24T23:02:10Z</text:p>
          </table:table-cell>
          <table:table-cell table:style-name="ce4"/>
          <table:table-cell table:style-name="ce1" office:value-type="string" calcext:value-type="string">
            <text:p>unfoldingWord/word-aligner-rcl</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16522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ordMAP</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18T15:24:32Z</text:p>
          </table:table-cell>
          <table:table-cell table:style-name="ce1" office:value-type="string" calcext:value-type="string">
            <text:p>2020-07-20T13:09:49Z</text:p>
          </table:table-cell>
          <table:table-cell table:style-name="ce4" office:value-type="string" calcext:value-type="string">
            <text:p>2020-01-21T15:05:54Z</text:p>
          </table:table-cell>
          <table:table-cell table:style-name="ce4" office:value-type="float" office:value="20" calcext:value-type="float">
            <text:p>20</text:p>
          </table:table-cell>
          <table:table-cell table:style-name="ce4" office:value-type="float" office:value="14" calcext:value-type="float">
            <text:p>14</text:p>
          </table:table-cell>
          <table:table-cell table:style-name="ce1"/>
          <table:table-cell table:style-name="ce1" office:value-type="string" calcext:value-type="string">
            <text:p>wordmap</text:p>
          </table:table-cell>
          <table:table-cell table:style-name="ce1" table:number-columns-repeated="3"/>
          <table:table-cell table:style-name="ce1" office:value-type="string" calcext:value-type="string">
            <text:p>['wordmap-mt', 'wordmap-react-toolkit', 'translationCore', 'wordAlignment', 'word-aligner-rcl', 'uw-wordmapbooster']</text:p>
          </table:table-cell>
          <table:table-cell table:style-name="ce1" office:value-type="string" calcext:value-type="string">
            <text:p>wordmap-lexer</text:p>
          </table:table-cell>
          <table:table-cell table:style-name="ce1" office:value-type="string" calcext:value-type="string">
            <text:p>['unfoldingWord/word-aligner', 'unfoldingWord/single-scripture-rcl', 'FoustAndrew/wordAlignment', 'unfoldingWord/door43-preview-app', 'unfoldingWord/gateway-edit', 'unfoldingWord/word-aligner-rcl', 'JEdward7777/codex-wordmap', 'JEdward7777/VsCodeUsfmAligner', 'JEdward7777/alignment-transferer', 'JEdward7777/boostwordmapwithfs', 'JEdward7777/wordmapbooster', 'membean/wordmap', 'unfoldingWord-box3/wordmap-react-toolkit', 'unfoldingWord/wordAlignment', 'unfoldingWord/translationCore']</text:p>
          </table:table-cell>
          <table:table-cell table:style-name="ce1" office:value-type="string" calcext:value-type="string">
            <text:p>['da1nerd', 'mannycolon', 'RoyalSix', 'dependabot-support', 'PhotoNomad0', 'klappy', 'dependabot[bot]', 'bspidel', 'jag3773', 'Sterling (Jay) Scott']</text:p>
          </table:table-cell>
          <table:table-cell table:style-name="ce1" office:value-type="float" office:value="10" calcext:value-type="float">
            <text:p>10</text:p>
          </table:table-cell>
          <table:table-cell table:style-name="ce1" office:value-type="float" office:value="0" calcext:value-type="float">
            <text:p>0</text:p>
          </table:table-cell>
          <table:table-cell table:style-name="ce5" office:value-type="string" calcext:value-type="string">
            <text:p><text:a xlink:href="https://github.com/unfoldingWord/wordMAP" xlink:type="simple">https://github.com/unfoldingWord/wordMAP</text:a></text:p>
          </table:table-cell>
          <table:table-cell table:style-name="ce4" office:value-type="string" calcext:value-type="string">
            <text:p>2025-08-25T16:40:45Z</text:p>
          </table:table-cell>
          <table:table-cell table:style-name="ce4"/>
          <table:table-cell table:style-name="ce1" office:value-type="string" calcext:value-type="string">
            <text:p>unfoldingWord/wordMAP</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ordMAP-lex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8-11T15:37:37Z</text:p>
          </table:table-cell>
          <table:table-cell table:style-name="ce1" office:value-type="string" calcext:value-type="string">
            <text:p>2020-04-22T13:11:5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wordmap-lexer</text:p>
          </table:table-cell>
          <table:table-cell table:style-name="ce1" table:number-columns-repeated="3"/>
          <table:table-cell table:style-name="ce1" office:value-type="string" calcext:value-type="string">
            <text:p>['wordmap-mt', 'alignment-playground', 'wordmap-react-toolkit', 'translationCore', 'wordAlignment', 'string-punctuation-tokenizer', 'word-aligner-rcl', 'word-aligner-lib', 'uw-wordmapbooster', 'checking-tool-rcl', 'wordmap', 'wordmap-usfm']</text:p>
          </table:table-cell>
          <table:table-cell table:style-name="ce1" office:value-type="string" calcext:value-type="string">
            <text:p>string-punctuation-tokenizer</text:p>
          </table:table-cell>
          <table:table-cell table:style-name="ce1" office:value-type="string" calcext:value-type="string">
            <text:p>['unfoldingWord/word-aligner', 'FoustAndrew/wordAlignment', 'unfoldingWord/single-scripture-rcl', 'unfoldingWord/gateway-edit', 'unfoldingWord/door43-preview-app', 'unfoldingWord/word-aligner-lib', 'JEdward7777/codex-wordmap', 'JEdward7777/VsCodeUsfmAligner', 'unfoldingWord-box3/word-aligner-extension', 'JEdward7777/alignment-transferer', 'JEdward7777/boostwordmapwithfs', 'JEdward7777/wordmapbooster', 'unfoldingWord/oce-editor-tools', 'unfoldingWord/word-aligner-rcl', 'unfoldingWord/string-punctuation-tokenizer', 'unfoldingWord-box3/wordmap-react-toolkit', 'unfoldingWord/wordAlignment', 'unfoldingWord/translationCore', 'unfoldingWord/wordMAP', 'unfoldingWord/wordMAP-usfm']</text:p>
          </table:table-cell>
          <table:table-cell table:style-name="ce1" office:value-type="string" calcext:value-type="string">
            <text:p>['da1nerd', 'mannycolon', 'dependabot-support', 'RoyalSix', 'PhotoNomad0', 'Sterling (Jay) Scott',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MAP-lexer" xlink:type="simple">https://github.com/unfoldingWord/wordMAP-lexer</text:a></text:p>
          </table:table-cell>
          <table:table-cell table:style-name="ce4" office:value-type="string" calcext:value-type="string">
            <text:p>2020-04-22T13:12:03Z</text:p>
          </table:table-cell>
          <table:table-cell table:style-name="ce4"/>
          <table:table-cell table:style-name="ce1" office:value-type="string" calcext:value-type="string">
            <text:p>unfoldingWord/wordMAP-lex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ordmapbooster</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FALSE()" office:value-type="float" office:value="0" calcext:value-type="float">
            <text:p>0</text:p>
          </table:table-cell>
          <table:table-cell table:style-name="ce1" table:formula="of:=TRUE()" office:value-type="float" office:value="1" calcext:value-type="float">
            <text:p>1</text:p>
          </table:table-cell>
          <table:table-cell table:number-columns-repeated="2" table:style-name="ce1" office:value-type="string" calcext:value-type="string">
            <text:p>2026-03-09T13:39:1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uw-wordmapbooster</text:p>
          </table:table-cell>
          <table:table-cell table:style-name="ce1" table:number-columns-repeated="3"/>
          <table:table-cell table:style-name="ce1" office:value-type="string" calcext:value-type="string">
            <text:p>enhanced-word-aligner-rcl</text:p>
          </table:table-cell>
          <table:table-cell table:style-name="ce1" office:value-type="string" calcext:value-type="string">
            <text:p>['usfm-js', 'wordmap', 'wordmap-lexer']</text:p>
          </table:table-cell>
          <table:table-cell table:style-name="ce1" office:value-type="string" calcext:value-type="string">
            <text:p>JEdward7777/wordmapbooster</text:p>
          </table:table-cell>
          <table:table-cell table:style-name="ce1" office:value-type="string" calcext:value-type="string">
            <text:p>['Joshua Lansford',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ordmapbooster" xlink:type="simple">https://github.com/unfoldingWord/wordmapbooster</text:a></text:p>
          </table:table-cell>
          <table:table-cell table:style-name="ce4" office:value-type="string" calcext:value-type="string">
            <text:p>2026-03-09T13:39:14Z</text:p>
          </table:table-cell>
          <table:table-cell table:style-name="ce4"/>
          <table:table-cell table:style-name="ce1" office:value-type="string" calcext:value-type="string">
            <text:p>unfoldingWord/wordmapbooster</text:p>
          </table:table-cell>
          <table:table-cell table:style-name="ce4" office:value-type="string" calcext:value-type="string">
            <text:p>3-Keep - locally used</text:p>
          </table:table-cell>
          <table:table-cell table:style-name="ce1" office:value-type="string" calcext:value-type="string">
            <text:p>Repository is listed as used by an npm package.</text:p>
          </table:table-cell>
          <table:table-cell table:style-name="ce4" office:value-type="string" calcext:value-type="string">
            <text:p>Keep - npm package in use</text:p>
          </table:table-cell>
          <table:table-cell table:style-name="ce1" office:value-type="string" calcext:value-type="string">
            <text:p>Package has detected local usage, GitHub dependents, or significant npm downloads (0 downloads in the last year).</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avd-ar</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2-23T03:29:23Z</text:p>
          </table:table-cell>
          <table:table-cell table:style-name="ce1" office:value-type="string" calcext:value-type="string">
            <text:p>2016-02-23T03:29:2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esse A. Griffin',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avd-ar" xlink:type="simple">https://github.com/unfoldingWord/avd-ar</text:a></text:p>
          </table:table-cell>
          <table:table-cell table:style-name="ce4" office:value-type="string" calcext:value-type="string">
            <text:p>2023-01-28T16:52:17Z</text:p>
          </table:table-cell>
          <table:table-cell table:style-name="ce4"/>
          <table:table-cell table:style-name="ce1" office:value-type="string" calcext:value-type="string">
            <text:p>unfoldingWord/avd-a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office:value-type="string" calcext:value-type="string">
            <text:p>x</text:p>
          </table:table-cell>
          <table:table-cell table:style-name="ce4"/>
          <table:table-cell table:style-name="ce1" office:value-type="string" calcext:value-type="string">
            <text:p>Bootstrap43</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2-02-22T18:31:57Z</text:p>
          </table:table-cell>
          <table:table-cell table:style-name="ce1" office:value-type="string" calcext:value-type="string">
            <text:p>2012-02-22T18:31:53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aaronpk/Bootstrap-Skin</text:p>
          </table:table-cell>
          <table:table-cell table:style-name="ce1" office:value-type="string" calcext:value-type="string">
            <text:p>['aaronpk', 'reidab']</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Bootstrap43" xlink:type="simple">https://github.com/unfoldingWord-dev/Bootstrap43</text:a></text:p>
          </table:table-cell>
          <table:table-cell table:style-name="ce4" office:value-type="string" calcext:value-type="string">
            <text:p>2023-01-28T16:19:06Z</text:p>
          </table:table-cell>
          <table:table-cell table:style-name="ce4"/>
          <table:table-cell table:style-name="ce1" office:value-type="string" calcext:value-type="string">
            <text:p>unfoldingWord-dev/Bootstrap43</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esign</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0-03T16:24:06Z</text:p>
          </table:table-cell>
          <table:table-cell table:style-name="ce1"/>
          <table:table-cell table:style-name="ce4"/>
          <table:table-cell table:style-name="ce4" office:value-type="float" office:value="63" calcext:value-type="float">
            <text:p>63</text:p>
          </table:table-cell>
          <table:table-cell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dev/design" xlink:type="simple">https://github.com/unfoldingWord-dev/design</text:a></text:p>
          </table:table-cell>
          <table:table-cell table:style-name="ce4" office:value-type="string" calcext:value-type="string">
            <text:p>2023-01-28T16:19:08Z</text:p>
          </table:table-cell>
          <table:table-cell table:style-name="ce4"/>
          <table:table-cell table:style-name="ce1" office:value-type="string" calcext:value-type="string">
            <text:p>unfoldingWord-dev/desig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iscourse-mermaid</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3-07-26T14:38:59Z</text:p>
          </table:table-cell>
          <table:table-cell table:style-name="ce4"/>
          <table:table-cell table:style-name="ce4" office:value-type="float" office:value="4" calcext:value-type="float">
            <text:p>4</text:p>
          </table:table-cell>
          <table:table-cell table:style-name="ce4" office:value-type="float" office:value="2" calcext:value-type="float">
            <text:p>2</text:p>
          </table:table-cell>
          <table:table-cell table:style-name="ce1" table:number-columns-repeated="8"/>
          <table:table-cell table:style-name="ce1" office:value-type="string" calcext:value-type="string">
            <text:p>['jag3773', 'rishabhlakhotia', 'jjaffeu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iscourse-mermaid" xlink:type="simple">https://github.com/unfoldingWord/discourse-mermaid</text:a></text:p>
          </table:table-cell>
          <table:table-cell table:style-name="ce4" office:value-type="string" calcext:value-type="string">
            <text:p>2025-05-13T01:56:41Z</text:p>
          </table:table-cell>
          <table:table-cell table:style-name="ce4"/>
          <table:table-cell table:style-name="ce1" office:value-type="string" calcext:value-type="string">
            <text:p>unfoldingWord/discourse-mermai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okuwiki-slack-invite</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11-02T14:11:36Z</text:p>
          </table:table-cell>
          <table:table-cell table:style-name="ce1" office:value-type="string" calcext:value-type="string">
            <text:p>2018-11-02T14:11:3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MatejMecka', 'jag3773', 'Matej Plavevski', 'Richard Mahn', 'Saksham-Katiyar', 'yvonnel098']</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kuwiki-slack-invite" xlink:type="simple">https://github.com/unfoldingWord-dev/dokuwiki-slack-invite</text:a></text:p>
          </table:table-cell>
          <table:table-cell table:style-name="ce4" office:value-type="string" calcext:value-type="string">
            <text:p>2023-01-27T20:30:22Z</text:p>
          </table:table-cell>
          <table:table-cell table:style-name="ce4"/>
          <table:table-cell table:style-name="ce1" office:value-type="string" calcext:value-type="string">
            <text:p>unfoldingWord-dev/dokuwiki-slack-invit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oor43</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25T18:49:08Z</text:p>
          </table:table-cell>
          <table:table-cell table:style-name="ce1" office:value-type="string" calcext:value-type="string">
            <text:p>2016-11-15T14:20:40Z</text:p>
          </table:table-cell>
          <table:table-cell table:style-name="ce4"/>
          <table:table-cell table:style-name="ce4" office:value-type="float" office:value="17" calcext:value-type="float">
            <text:p>17</text:p>
          </table:table-cell>
          <table:table-cell table:style-name="ce4" office:value-type="float" office:value="0" calcext:value-type="float">
            <text:p>0</text:p>
          </table:table-cell>
          <table:table-cell table:style-name="ce1" office:value-type="string" calcext:value-type="string">
            <text:p>['https://github.com/unfoldingWord-dev/dokuwiki-enhancedindexer', 'https://github.com/superdav42/pagequery', 'https://github.com/unfoldingWord-dev/dw-gitcommit', 'https://github.com/unfoldingWord-dev/nsmsg', 'https://github.com/unfoldingWord-dev/Dokuwiki-USFMTag', 'https://github.com/yvonnel098/setedit', 'https://github.com/In-the-World/dokuwiki-plugin-namespace-export', 'https://github.com/In-the-World/door43nsexport', 'https://github.com/glensc/dokuwiki-plugin-pageredirect', 'https://github.com/dokufreaks/plugin-blockquote', 'https://github.com/cosmocode/changes', 'https://github.com/turnermm/ckgedit', 'https://github.com/samwilson/dokuwiki-plugin-definitionlist', 'https://github.com/dokufreaks/plugin-discussion', 'https://github.com/splitbrain/dokuwiki-plugin-ditaa/', 'https://github.com/splitbrain/dokuwiki-plugin-dw2pdf', 'https://github.com/Azurewren/dokuwiki-plugin-googlefonts', 'https://github.com/superdav42/dokuwiki-plugin-graphviz', 'https://github.com/Fweeb/dokuwiki_plugin_html5video', 'https://github.com/dokufreaks/plugin-include/', 'https://github.com/naokij/dokuwiki-plugin-markdownextra', 'https://github.com/michitux/dokuwiki-plugin-move', 'https://github.com/gturri/nspages', 'https://github.com/LarsGit223/dokuwiki-plugin-odt', 'https://github.com/dokufreaks/plugin-pagelist', 'https://github.com/Bravehartk2/dokuwiki-piwik2', 'https://github.com/splitbrain/dokuwiki-plugin-searchindex', 'https://github.com/splitbrain/dokuwiki-plugin-swiftmail', 'https://github.com/superdav42/plugin-tag', 'https://github.com/splitbrain/dokuwiki-plugin-captcha', 'https://github.com/splitbrain/dokuwiki-plugin-upgrade/', 'https://github.com/selfthinker/dokuwiki_plugin_wrap', 'https://github.com/splitbrain/dokuwiki-plugin-vshare', 'https://github.com/splitbrain/dokuwiki-plugin-gallery', 'https://github.com/splitbrain/dokuwiki-plugin-translation', 'https://github.com/Klap-in/dokuwiki-plugin-bookcreator/']</text:p>
          </table:table-cell>
          <table:table-cell table:style-name="ce1" table:number-columns-repeated="7"/>
          <table:table-cell table:style-name="ce1" office:value-type="string" calcext:value-type="string">
            <text:p>['Richard Mahn', 'richmahn', 'phillip-hopper', 'Phil Hopper', 'da1nerd', 'PurpleGuitar', 'superdav42', 'Apache', 'Apache Production', 'licoabi', 'root', 'kbuildsyourdotcom', 'dboerschlein', 'codemis', 'Apache Door43', 'Jesse A. Griffin', 'jag3773', 'Ricahrd Mahn', 'System Administrator', 'richmahn@gmail.co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or43" xlink:type="simple">https://github.com/unfoldingWord-dev/Door43</text:a></text:p>
          </table:table-cell>
          <table:table-cell table:style-name="ce4" office:value-type="string" calcext:value-type="string">
            <text:p>2026-03-15T03:14:44Z</text:p>
          </table:table-cell>
          <table:table-cell table:style-name="ce4"/>
          <table:table-cell table:style-name="ce1" office:value-type="string" calcext:value-type="string">
            <text:p>unfoldingWord-dev/Door43</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oor43-acceptance-tests</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16T21:59:37Z</text:p>
          </table:table-cell>
          <table:table-cell table:style-name="ce1" office:value-type="string" calcext:value-type="string">
            <text:p>2017-03-16T21:59:3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jag3773',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or43-acceptance-tests" xlink:type="simple">https://github.com/unfoldingWord-dev/door43-acceptance-tests</text:a></text:p>
          </table:table-cell>
          <table:table-cell table:style-name="ce4" office:value-type="string" calcext:value-type="string">
            <text:p>2023-01-28T16:19:09Z</text:p>
          </table:table-cell>
          <table:table-cell table:style-name="ce4"/>
          <table:table-cell table:style-name="ce1" office:value-type="string" calcext:value-type="string">
            <text:p>unfoldingWord-dev/door43-acceptance-test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oor43-preview-server</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4-05-23T13:53:24Z</text:p>
          </table:table-cell>
          <table:table-cell table:style-name="ce1" office:value-type="string" calcext:value-type="string">
            <text:p>2024-05-23T13:53:22Z</text:p>
          </table:table-cell>
          <table:table-cell table:style-name="ce4" office:value-type="string" calcext:value-type="string">
            <text:p>2024-05-22T20:17:13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door43-preview-server</text:p>
          </table:table-cell>
          <table:table-cell table:style-name="ce1" table:number-columns-repeated="5"/>
          <table:table-cell table:style-name="ce1" office:value-type="string" calcext:value-type="string">
            <text:p>ccjmne/puppeteer-html2pdf</text:p>
          </table:table-cell>
          <table:table-cell table:style-name="ce1" office:value-type="string" calcext:value-type="string">
            <text:p>['ccjmne', 'richmahn', 'bmestanov', 'redbaron-gt']</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xt:a xlink:href="https://github.com/unfoldingWord/door43-preview-server" xlink:type="simple">https://github.com/unfoldingWord/door43-preview-server</text:a></text:p>
          </table:table-cell>
          <table:table-cell table:style-name="ce4" office:value-type="string" calcext:value-type="string">
            <text:p>2025-09-09T09:17:22Z</text:p>
          </table:table-cell>
          <table:table-cell table:style-name="ce4"/>
          <table:table-cell table:style-name="ce1" office:value-type="string" calcext:value-type="string">
            <text:p>unfoldingWord/door43-preview-serv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door43-project-pages</text:p>
          </table:table-cell>
          <table:table-cell table:style-name="ce1" office:value-type="string" calcext:value-type="string">
            <text:p>unfoldingWord-dev</text:p>
          </table:table-cell>
          <table:table-cell table:style-name="ce1" office:value-type="string" calcext:value-type="string">
            <text:p>CSS</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6-09-26T16:42:57Z</text:p>
          </table:table-cell>
          <table:table-cell table:style-name="ce1" office:value-type="string" calcext:value-type="string">
            <text:p>2016-09-26T16:42:54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bspidel/door43-project-pages</text:p>
          </table:table-cell>
          <table:table-cell table:style-name="ce1" office:value-type="string" calcext:value-type="string">
            <text:p>['Richard Mahn', 'bspide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door43-project-pages" xlink:type="simple">https://github.com/unfoldingWord-dev/door43-project-pages</text:a></text:p>
          </table:table-cell>
          <table:table-cell table:style-name="ce4" office:value-type="string" calcext:value-type="string">
            <text:p>2023-01-28T16:19:08Z</text:p>
          </table:table-cell>
          <table:table-cell table:style-name="ce4"/>
          <table:table-cell table:style-name="ce1" office:value-type="string" calcext:value-type="string">
            <text:p>unfoldingWord-dev/door43-project-page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electron</text:p>
          </table:table-cell>
          <table:table-cell table:style-name="ce1" office:value-type="string" calcext:value-type="string">
            <text:p>unfoldingWord-box3</text:p>
          </table:table-cell>
          <table:table-cell table:style-name="ce1"/>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2-04-17T01:34:51Z</text:p>
          </table:table-cell>
          <table:table-cell table:style-name="ce1" office:value-type="string" calcext:value-type="string">
            <text:p>2022-04-12T13:43:01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electron/electron</text:p>
          </table:table-cell>
          <table:table-cell table:style-name="ce6" office:value-type="string" calcext:value-type="string">
            <text:p>['zcbenz', 'kevinsawicki', 'MarshallOfSound', 'codebytere', 'nornagon', 'electron-bot', 'deepak1556', 'zeke', 'miniak', 'alexeykuzmin', 'John Kleinschmidt', 'preco21', 'ckerr', 'felixrieseberg', 'aroben', 'hokein', 'anaisbetts', 'brenca', 'jlord', 'max-mapper', 'trop[bot]', 'sudowoodo-release-bot[bot]', 'dsanders11', 'gerhardberger', 'jkleinsc', 'tinydew4', 'poiru', 'CharlieHess', 'erickzhao', 'tarruda', 'alespergl', 'seanchas116', 'vanessayuenn', 'ali.ibrahim', 'nitsakh', 'Cheng Zhao', 'Eran Tiktin', 'joshaber', 'juturu', 'Jessica Lord', 'mafintosh', 'sethlu', 'oukan', 'samuelmaddock', 'bbondy', 'runinspring', 'Micha Hanselmann', 'electron-roller[bot]', 'leethomas', 'malept', 'VerteDinde', 'bengotow', 'danhp', 'PhotoNomad0', 'roller-bot', 'alexstrat', 'YurySolovyov', 'Tomas Rycl', 'sofianguy', '=^._.^=', 'piki', 'etiktin', 'heyunjiang', 'mlaurencin', 'loc', 'igorklopov', 'shiftkey', 'pfrazee', 'stevekinney', 'tonyganch', 'gabriel', 'groundwater', 'probablycorey', 'mnquintana', 'liusi', 'evgenyzinoviev', 'thomastuts', 'qazbnm456', 'bandantonio', 'shubham2892', 'enlight', 'leo', 'lauracpierre', 'Patrick Reynolds', 'CezaryKulakowski', 'excfergodst', 'nishanths', 'testinterntest', 'Stone-Jay', 'dependabot[bot]', 'ahmedmohamedali', 'frankhale', 'liusy182', 'Toinane', 'yamgent', 'btsuda1', 'Andy Dill', 'jeffreymorganio', 'jhen0409', 'jonatasfreitasv', 'Mr0grog', 'yamatoya', 'ajmacd', 'demopark', 'fbukevin', 'John-Lin', 'fplucas', 'Michael Vasseur', 'Michelle Tilley', 'yuya-oc', 'omrilitov', 'patrickdet', 'oktapodia', 'ThePooE', 'kwonoj', 'RaisinTen', 'georgexu99', 'andens', 'thompsonemerson', 'yashints', 'mbarthelemy', 'kcrt', 'lee-dohm', 'cornedor', 'TiagoDanin', 'GoooIce', 'samccone', 'Paul Betts', 'mariozaizar', '3v1n0', 'bughit', 'lukeapage', 'CapOM', 'dongjoon-hyun', 'minggo', 'darkdh', 'rreimann', 'AdrienFery', 'jviotti', 'davej', 'mikeykhalil', 'xyao201', 'sairoutine', 'renaesop', 'sentialx', 'gregnolle', 'jnugh', 'adill', 'Kilian', 'thypon', 'amtj', 'mgc', 'Mustafa C. Izol', 'rafaelnobrepd', 'ramya-rao-a', 'richard-townsend-arm', 'RnbWd', 'rogerlista', 'ferreus', 'mst128256', 'mrxf', 'kokdemo', 'bundyo', 'cifratila', 'rhysd', 'Ted Kim', 'Rafael Guimarães', 'tommoor', 'CyberKatze', 'Matt Karl', 'hanzhao', 'toonborgers', 'vhashimotoo', 'xaviergonz', 'christoth', 'vsemozhetbyt', 'thedaniel', 'zeeker999', 'SeriousM', 'xland', 'simurai', 'szTheory', '林伟强', 'ppontes', 'Menci', 'levrik', 'kstar0714', 'ragingwind', 'robinwassen', 'joaomoreno', 'ivmirx', 'leftstick', 'zachflower', 'BobCochran', 'bcomnes', 'Chandan Rai', 'Daniel Pereira', 'gioggio', 'nekuz0r', 'jwheare', 'Michael Köppl', 'rsezille', 'renatoalencar', 'him2him2', 'dittos', 'the-ress', 'dale347', 'thomasjo', 'vially', 'develar', 'Wliu', 'bridiver', 'bitdisaster', 'xfq', 'andersk', 'bnb', 'webpushers', 'haadcode', 'scycbx', 'psh0628-eng', 'tejaspathak', 'wujingke', '大和屋 貴仁', 'stewartlord', 'samueleaton', 'kirkouimet', 'javan', 'molant', 'Dane Springmeyer', 'Spacetech', 'bsclifton', 'danburzo', 'indutny', 'babanesma', 'adam-lynch', 'Lucas Pugliesi', 'magicae', 'MaxGraey', 'stevenjoezhang', 'Nirmal4G', 'rajatsingla28', 'rzhao271', 'seppestas', 'ShiningRay', 'simonecattaneo91', 'sindresorhus', 'sotayamashita', 'orderedlist', 'sbspk', 'Rus Maxham', 'rprichard', 'Vehemos', 'Gaserd', 'Simon Madine', 'RikTheunis', 'RacioN', 'princejwesley', 'PierBover', 'petrfelzmann', 'sneakypete81', 'PalmerAL', 'Raul6469', 'ZacWalk', 'ChALkeR', 'popod', 'joeydlee95', 'fscherwi', 'deed02392', 'batjko', 'adammeyer', 'orzFly', 'itsananderson', 'Vj3k0', 'Kthulu120', 'TonyWuu', 'timruffles', 'theojulienne', 'suyash', 'nekolab', 'hankbao', 'GregMefford', 'ggamel', 'fritx', 'fab1an', 'ericbrumer', 'Emmanuel Kimmerlin', 'didrocks', 'watilde', 'clavin', 'BlackHole1', 'Benjamin Pasero', 'Arif Çakıroğlu', 'ArekSredzki', 'antoinepairet', 'Ahmed Abdalla', 'avdg', 'zombieleet', 'omern1', 'Mingling94', 'matttbe', 'matt-way', 'mattdesl', 'matiasinsaurralde', 'LuisHsu', 'Lucidogen Media', 'LasseJacobs', 'Hugo Mano', 'IonicaBizau', 'codefoster', 'jameshfisher', 'duswlsgur', 'j5a', 'jpiepkow', 'kevinhartman', 'kevinmartin', 'rahatarmanahmed', 'roramirez', 'SAKATA Sinji', 'SamvelRaja', 'saghul', 'Sergey Bekrin', 'sitdh', 'niedzielski', 'suryast', 'inukshuk', 'takashi', 'teiles', 'thorbenegberts', 'timfish', 'twolfson', 'htk3', 'Marc-Aurèle DARCHE', 'mateussilva92', 'MauricioFauth', 'ymmuse', 'maxbrunsfeld', 'deermichel', 'kaylanm', 'moshfeu', 'salomvary', 'Maeda-Naoki', 'tensor5', 'OctoHuman', 'teleclimber', 'paulatbipsync', 'pavelfeldman', 'philfreo', 'p-jackson', 'prayagverma', 'rafaelstz', 'huangruichang', 'jaanus', 'jf_jiang', 'jinhai.wang', 'kaylie', 'liuderchi', 'longbotao', 'marcin-prochownik', 'marekharanczyk', 'mzajaczkowski', 'nixxquality', 'patr0nus', 'paulinaika', 'renmu123', 'robbix1206', 't57ser', 'wit543', 'tonyferrell', 'tsekityam', 'TyanNN', 'vreality64', 'vivensio', 'summeroff', 'Wayne-Kim', 'banyudu', 'Zac Walker', 'Zhuo Zhang', 'agustin.wang', 'arifcakiroglu', 'as3boyan', 'cesine', 'deenjun', 'fengmk2', 'foo bar code', 'frankenbot', '22222', 'bkeepers', 'Brent Ertz', 'brunoqueiros', 'Charles Kerr', 'soh1988', 'ColinEberhardt', 'craigshoemaker', 'clebeaupin', 'quicksnap', 'Daniel Ma', 'Mossop', 'destan', 'Rokt33r', 'sdj01044', 'dorian', 'dougnukem', 'cjld', 'zephyrzoom', 'aaronang', 'Godoy', 'alanionita', 'fierroformo', 'alexwarren', 'Prinzhorn', 'alexandrubau', '97amarnathk', 'ldehai', 'Anrock', 'xxczaki', 'primalmotion', 'darwin', 'astoilkov', 'austinmoore-', 'bpasero', 'Brad Metcalf', 'JamesKyburz', 'Jan Wiemers', 'jpoon', 'wearhere', 'Jerry Wu', 'jesusD', 'ArtskydJ', 'magne4000', 'keerthi16', 'kramerc', 'kristofkalocsai', 'LaurentLeVan', 'theLMGN', 'torn4dom4n', 'schneiderl', 'lgalabru', 'isnotgood', 'lukeadams', 'Sarruby', 'MrSurly', 'Ethan-Arrowood', 'everblut', 'feross', 'Florian', 'Florian Hämmerle', 'Giacomo Furlan', 'jaimecbernardo', 'apoco', 'jacobq', 'jack-teng1', 'husayn', 'Hum4n01d', 'HariJ', 'Harendra Singh', 'HR', 'GitHubPang', 'Shiranka Miskin', 'Shazron Abdullah', 'Shawn K', 'Shaine Ismail', 'Shahzad Lone', 'Sesh Sadasivam', 'Sergio Padrino', 'Sergey Zolotarev', 'Sergey Sova', 'Sergey Rubanov', 'Sergey R', 'Serg F', 'Seppe Stas', 'Shogun Sea', 'Shohei YOSHIDA', 'Shunki Tan', 'Siddharth Dalal', 'Sidney', 'Simas Toleikis', 'Simon Knight', 'Sitdhibong Laokok', 'Sitong Peng', 'Slapbox', 'Smite Chow', 'Sonny Piers', 'Mustafa', 'Rodrigo Nascimento', 'Roman Klauke', 'Ronald Eddy', 'Rose Robertson', 'Ross Rosen', 'Ryan Baxley', 'Ryan Johnson', 'Ryan Molden', 'Ryan Patterson', 'Sam Thomson', 'Samuel Meuli', 'Samy Pessé', 'Sangjoon Moon', 'Saswat Bhattacharya', 'Saúl Ibarra Corretgé', 'Scott Robertson', 'Scott Trinh', 'Sean', 'Sean Bannigan', 'Sean Francis N. Ballais', 'Sean Lee', 'Seba Kerckhof', 'Seemann', 'Selwyn', 'TanninOne', 'Tasuku Uno', 'Tatsuya Hiroishi', 'TechnicalSoup', 'Ted Nyman', 'Teo Koon Peng', 'Teran McKinney', 'Thanasis Polychronakis', 'The Gem Dev', 'The Moses', 'TheDancingCode', 'Thomas Beverley', 'Thomas Hofmann', 'Thomas J Fox', 'Thomas Kainrad', 'Thomas Kaltz III', 'Thomas Levy', 'Tim Fish', 'Timothy Cyrus', 'TingPing', 'Tobias Nießen', 'Tom Floyer', 'Tom Hughes', 'leonllrmc', 'Sorah Fukumori', 'Stan', 'Stathis Siatras', 'Steel Brain', 'Stefan Buck', 'Stephan Lee', 'Steve Smith', 'Steven Barbaro', 'Steven Yeh', 'Stian Jørgensrud', 'StoneStoneStone', 'Sudar Abisheck', 'SushiJackal', 'Susu Dong (LCL)', 'Sven Hüster', 'Syed Umair', 'TJ Krusinski', 'TJC', 'Tabea4', 'Tabish Mahfuz', 'Taichiro Yoshida', 'Takahito Yamatoya', 'Takashi Kokubun', 'Takashi Toyoshima', 'My-khael Pierce', 'Nate Goldman', 'Nate Wienert', 'Nathan Sobo', 'Natsu', 'Navgeet Agrawal', 'Neil Craig', 'Nic Mitchell', 'Nicholas Arcuri', 'Nick Harper', 'Nick Taylor', 'Nico', 'Nicolas Ramz', 'Nikita Kot', 'Nishanth Shanmugham', 'Niven Su', 'Noelle Leigh', 'NotWearingPants', 'Numaan Ashraf', 'Nuri Uzunoğlu', 'O.G.olasowski', 'Christopher Dieringer', 'Maxime Serrano', 'Maxine Whitely', 'Maya Wolf', 'Mehedi Hassan', 'Meyito', 'Michael', 'Michael Hamilton', 'Michael J. Zoidl', 'Michael Kozakov', 'Miguel Piedrafita', 'Mikael Finstad', 'Mike Engel', 'Mike Pelley', 'Misumi Rize', 'Mitchell Hentges', 'Mitchell McCaffrey', 'Mod John', 'Moetaz', 'Moises lopes ferreira', 'Moisés Neto', 'Moriarty!~~', 'Pine', 'PoppinL', 'Pranjal', 'Prasanth Vaaheeswaran', 'Rafael Dantas', 'Rafael Firmino', 'Rafael G Firmino', 'Rafael Masson', 'Raghav Bhutra', 'Rajdeep Chatterjee', 'Raphael', 'Ray Booysen', 'René Herrmann', 'Rich Hong', 'Rita Zhang', 'Rituka Patwal', 'RobberPhex', 'Robert Borg', 'Robert D', 'Robert Hencke', 'Robert Lyall', 'Robert Nagy', 'Robert Stanfield', 'Robert Säll', 'Robin Dupret', 'Oded Breiner', 'Oden', 'Olawanle Joel', 'Omar Kilani', 'Ondreas', 'Ondřej Záruba', 'OuYancey', 'Owais Lone', 'Pascal Borreli', 'Pat DeSantis', 'Patrick Flor', 'Paul Young', 'Paulius', 'Pedro Belo', 'Pedro Pontes', 'Per Lundberg', 'Pete Torres', 'Peter Butcher', 'Peter Dave Hello', 'Peter Schmidt', 'Phil Christensen', 'Phil Haack', 'Phil Wyett', 'Philipp A.', 'Pierre-Yves Jamon', 'liang feng', 'lvs', 'malern', 'mawie81', 'max_devjs', 'mdpetuum', 'mgarciaisaia', 'mhkeller', 'michal1106', 'michtsu', 'mihaipocorschi', 'mikoto2000', 'morgan-sam', 'mscdex', 'msullivan', 'mtgto', 'muryoimpl', 'nibbleswap', 'nicknish', 'nous-', 'overkill', 'owwo', 'pathim', 'pedro silva', 'Vitalie Lazu', 'ecmadao', 'evelyn masso', 'ffdd', 'foxy', 'fraserxu', 'gnahzak', 'hansrwindhoff', 'hemanth.hm', 'henrit', 'hkhere', 'hrubilov', 'iamkun', 'ipoint-pgerhard', 'jiang kun', 'jieniu$', 'jin5354', 'joe-re', 'jpittner', 'kdau', 'kyo_ago', 'kyokutyo', 'laiso', 'lazarus', 'tiagotol', 'timmyhadwen', 'tom', 'universalstrapping', 'universeroc', 'wan-qy', 'wgrafael', 'windwalkr', 'wolf', 'wxf', 'yan', 'yibuyisheng', 'zenganshao', 'zhao-lin-li', 'zicai', 'Átila Camurça Alves', 'Ömer Faruk ÖZDEMİR', '孙茂胤', '孟强', '小奔奔', '小菜', '祈緒ちゃん - Kiochan', '程启翔', 'pi1024e', 'pol', 'pravdomil', 'qwabra', 'rehez', 'rhedshi', 'riccardopiola', 'rmcdonald', 'robertgrzonka', 'robin', 'roderik', 'ryanomor', 'schwalbe10', 'secult', 'serant', 'shur', 'sourenaraya', 'sqrthree', 'sssooonnnggg', 'stephen9357', 'taemu', 'Volodymyr Bezuglyy', 'Vítor Galvão', 'W L Bentley', 'WangYunjian', 'Wei Wang', 'Wen Luo', 'WenryXu', 'Will Eccles', 'Will Tange', 'Wilson Page', 'Wojciech Krol', 'Wolfgang', 'Wujg', 'Xaver Hellauer', 'XiYang', 'Xin Tan', 'Xinayu', 'Yarkhan', 'Yassine Laassel', 'Yasunari Fujieda', 'Yegun Kim', 'Yifei Teng', 'Yonggang Luo', 'Yongmin Hong', 'Tom Watson', 'Tomáš Hanáček', 'Tomáš Hübelbauer', 'Tony Ferrell', 'Tony Stark', 'Travis Tilley', 'Tristan Partin', 'Troy', 'Tyler Dennis', 'Tyler Gibson', 'Tyler Saballus', 'Utkarsh Dixit', 'Vadim', 'Valentin Hăloiu', 'Vanessa Yuen', 'Varun Agrawal', 'Vasu Mahesh', 'Victor Bennich', 'Victor Zhu', 'Vijay Pushkin', 'Vik Ramanujam', 'Vincent Quagliaro', 'Vishal', 'Vishesh Handa', 'azure-pipelines[bot]', 'bigben0123', 'billyct', 'biuuu', 'bowbowbow', 'br0nstein', 'bureken', 'campersau', 'cclauss', 'cdaringe', 'chadluo', 'cheongjin.kim', 'choko', 'chris-ls', 'chriswmercer', 'd1g1t4ld1n4', 'daveilers', 'dengyaolong', 'devjin0617', 'diego', 'diegozhu', 'dmitryk', 'dmnlk', 'doraeric', 'duncup', 'Yoshietru Nagata', 'Yoshua Wuyts', 'Yoyo Zhou', 'Yui', 'Yury', 'ZReC', 'ZYSzys', 'Zach Bloomquist', 'Zachary', 'Zachinquarantine', 'Zhang Zhi', 'ZhangYueqiu', 'Zheng Guoli', 'Zhi Cun', 'abouthiroppy', 'acheronfail', 'akameco', 'allenliu', 'amor', 'andi', 'andy matthews', 'ankitaggarwal011', 'appetizermonster', 'aydon', 'az-chris', 'Clark Feusier', 'Clément Beffa', 'Cléverton Heming', 'Co1MugX', 'CoderPoet', 'Cody', 'ComplexSpaces', 'Constantin Dumitrescu', 'CoolOppo', 'Corey Farwell', 'Corey Johnson', 'Cory Reed', 'Cyril POIDEVIN', 'Cyrus Roshan', 'Czipperz', 'DC', 'Damien Patou', 'Dan Sandler', 'DanTheMan827', 'Dana Woodman', 'Daniel Imms', 'Daniel LaBarge', 'Daniel Playfair Cal', 'Daniel Ramp', 'Alex Sokolsky', 'Bruce Mitchener', 'Bruno Lemos', 'Bryan Bess', 'Caesar Schinas', 'Calvin Jeng', 'Cameron Nokes', 'Carlos', 'Carson McDonald', 'Casimodo', 'Catalin Fratila', 'Cem Schemel', 'Cesar Andreu', 'ChangJoo Park(박창주)', 'Chase Colman', 'Chris Davis', 'Chris Hartgerink', 'Chris Hawkes', 'Chris Patterson', 'Christian Bromann', 'Christian Dywan', 'Christian Engel', 'Christian Engvall', 'Christian Schmidt', 'Eli Skeggs', 'Elias', 'Emil Pettersson', 'Emmanouil Konstantinidis', 'Eric', 'Evgeny', 'Evlogiy Sutormin', 'FWeinb', 'Fabio Spampinato', 'Federico Bond', 'Fedor Indutny', 'Felipe Serafim', 'Felix Rieseberg', 'Finn Behrens', 'Florent Delayen', 'Florian Brinker', 'Florian Keller', 'Flynn Joffray', 'Frank Laub', 'Franz de Copenhague', 'Gabriel Augendre', 'Gabriel Basilio Brito', 'Kevin Wojniak', 'Daniel Turcich', 'Daniel Zwelling', 'Danny Brown', 'Darrell Ulm', 'Daryl Haresign', 'Davenury', 'David Baker', 'David Chawei Hsu', 'David Ferguson', 'DeeDeeG', 'Denise Yu', 'Dennis Keil', 'Destan Sarpkaya', 'Devin Foley', 'Diego Ponce', 'Domenic Horner', 'Dominic', 'Donald D. Nevermore', 'Drew Chandler', 'Dustin', 'Dwayne Jones', 'Eddie Zaneski', 'Egor Stronhin', 'Elena Topaka', 'Alex Whitman', 'Alexander Gujral', 'Alexander Neu', 'Alexander Rusakov', 'Alexander Salas', 'Alexander Turinske', 'Alexandre', 'Alexandre Demode', 'Alexandru Rosianu', 'Alexey Prokhorov', 'Alfred Xing', 'Ali BARIN', 'Ali Ibrahim', 'Amin Ullah Khan', 'Amit Merchant', 'Amor', 'Amos Wenger', 'Anatzum', 'Andrea Brancaleoni', 'Andrea Parodi', 'Andreas Waigand', 'Andrei K', 'Andrew Dassonville', '1akshat1', 'AHFriedman', 'Aayush Chhabra', 'Abdi Haikal', 'AbhilashJN', 'Abhishek Shingane', 'Adam Buckland', 'Adam Drago', 'Adam Harley', 'Adam Kidder', 'Adam Laycock', 'Adam Leskis', 'Adam Meyer', 'Adrian Li', 'Ahmed Elshafey', 'Aidan Nulman', 'Ajey Charantimath', 'Alecyrus', 'Alejandro Gonzalez Sole', 'Alex Garbutt', 'Alex Gleason', 'Alex Greenland', 'Alex Kondratyuk', 'Alex Ryan', 'Alex Sherwin', 'Bastien', 'Belleve Invis', 'Ben Drucker', 'Ben Jaffe', 'Ben Randall', 'Ben Russert', 'Ben Vinson', 'Beni von Cheni', 'Benjamin Sova', 'Benjamin Winkler', 'Benny Neugebauer', 'Bhargav Patel', 'Binyamin Aron Green', 'Blaine Schmeisser', 'Bobby Galli', 'Brandon Cash', 'Brandon Nozaki Miller', 'Brendon Gonzalez', 'Brennan Novak', 'Brian Boucheron', 'Brian Fajardo', 'Brian R. Bondy', 'Brian Suh', 'Brian Zelip', 'Bruce Auyeung', 'Andrew Murray', 'Andrew Plotkin', 'Andrew Scheller', 'Andrew Zheng', 'Andrey', 'Andrey Kurdyumov', 'Andriy Tsok', 'Andrzej Szombierski', 'András Polgár', 'Andy Kogut', 'Angel_Kitty', 'Anna Henningsen', 'Anthony Ryan', 'Antonio Scandurra', 'ArcticZeroo', 'Arek Sredzki', 'Arinde Eniola', 'Arjit Chauhan', 'Armagan Amcalar', 'Asher Jacob', 'Attila Sukosd', 'Austin Burdine', 'Avi Vahl', 'BJR Matos', 'Kewde', 'Kiavash Page', 'Klaus Sinani', 'Koen [XII]', 'Konstantin Pschera', 'Konstantinos Ntoutsos-Oikonomou', 'Kostiantyn Kahanskyi', 'Kristof Mattei', 'Kriti Singh', 'Krzysztof', 'Kurtis Rainbolt-Greene', 'Kushagra Sharma', 'Kuts Alexey', 'Kyle Corry', 'Kyle Hornberg', 'Kyle Robinson Young', 'LShun', 'LYK', 'Laekh', 'Larry Kluger', 'LarryZhu', 'Lars-Magnus Skog', 'LeMoussel', 'Lee Dohm', 'Hans Kristian Flaatten', 'Joshua Westerheide', 'Jota', 'João Moreno', 'Juan Antonio Gómez', 'Juan Cruz Viotti', 'Juan Paulo Gutierrez', 'Juan Roa', 'Julian Engel', 'Julie Koubová', 'Julio', 'Junyoung Jung', 'Justin Guze', 'KSneijders', 'Kagami', 'Kane Montreuil', 'Kapil Patel', 'Karel Braeckman', 'Kerollos Magdy', 'Keshal Desai', 'Kevin Lynagh', 'Kevin Mårtensson', 'Kevin Ramsunder', 'Kevin Simper', 'Kevin Wang', 'Mark Samman', 'Mark Wylde', 'Markus Olsson', 'Martin', 'Martin Mädler', 'Martin Samson', 'Masato Kinugawa', 'Matheus Rocha Vieira', 'Mathieu Débit', 'Matias Insaurralde', 'Matt Colyer', 'Matt Kane', 'Matt Lyons', 'Matt Mastracci', 'Matt Slay', 'Matthew Amato', 'Matthew Harris', 'Matthew Leffler', 'Matthew Shen', 'Matthias Niess', 'Matthijs Groen', 'Max Beatty', 'Max Claus Nunes', 'Max Schmitt', 'Lee McKinnon', 'Liam Griffin', 'Lishid', 'Loren Segal', 'Louis Rose', 'Luca Carettoni', 'Lucas', 'Lucas Lopes', 'Lukas Geiger', 'Luke Ingalls', 'Luke Westby', 'Lutz Roeder', 'Lxx', 'Lyall Hamilton', 'MadfishDT', 'Maik Ellerbrock', 'Maksim', 'Maksym Dogadailo', 'Mal Graty', 'Manoel', 'Marat Abdullin', 'Marcin Maliszkiewicz', 'Mario Aichinger', 'Mark Judd', 'Mark Potnick', 'Hansen Zhang', 'Harry', 'Hashed Hyphen', 'HayateLaTech', 'Heejin Lee', 'Hein Haraldson Berg', 'Hiroshige Umino', 'Hiroshige Umino yaotti', 'Ho Wing Yip', 'Hugh Kennedy', 'Hye Sung Jung', 'Ian Goodacre', 'Ian Langworth ☠', 'Ian Olsen', 'Ian Ornelas', 'Ian Sanders', 'Ikko Ashimine', 'Importcjj', 'Indrek Ardel', 'Ingo Richter', 'Isaac Taylor', 'Islam ElHakmi', 'Islam Sharabash', 'Garen Torikian', 'Gavin M. Roy', 'Gavin Wang', 'Gearóid', 'Geoff Lywood', 'Geoff Nixon', 'George', 'George Hafiz', 'Germain', 'Gerrit Niezen', 'GhostlyDark', 'Gilbert Emerson', 'Glen Maddern', 'Gordon MacPherson', 'Greggman', 'Grigory', 'Guangyuan Yang', 'Guerin', 'Guido Zuidhof', 'HAMIDx9', 'Hailin Tseng', 'Hajime Morrita', 'Hamish Macpherson', 'Hanae Kae', 'Jimi (Dimitris) Charalampidis', 'Joe Duncko', 'Johan Giraldo', 'JohanG2012', 'Johann Fuechsl', 'Johannes Schmitz', 'John Eismeier', 'John Haley', 'John Schmidt', 'Jonathan', 'Jonathan Creekmore', 'Jonathan Sampson', 'Jonathon Simister', 'Jordon Bedwell', 'Jorge Feldmann (Jota)', 'Jorn', 'Joseph Frazier', 'Joseph Higgins', 'Josh Bernitt', 'Josh Canaway', 'Josh Goldberg', 'Josh Marinacci', 'Joshua Anderson', 'Joshua Bemenderfer', 'Joshua Benuck', 'Ivan Kulikov', 'Ivan Žužak', 'Ivo Georgiev', 'Ivo von Putzer Reibegg', 'Iván Montes', 'J. Ryan Stinnett', 'J.M', 'JP Richardson', 'Jake', 'Jakub Biesiada', 'Jakub Žitný', 'Jakukyo Friel', 'James Ide', 'Jan Němeček', 'Jaroslav Maslo', 'Jason Zhekov', 'Jean-Philippe Morin', 'Jeff Rehbein', 'Jeffrey Morgan', 'Jenux', 'Jeremy Judeaux', 'Jeremy Spiegel', 'Jeroen Visser', 'Jesse Grosjean', 'Jiaji Zhou']</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electron" xlink:type="simple">https://github.com/unfoldingWord-box3/electron</text:a></text:p>
          </table:table-cell>
          <table:table-cell table:style-name="ce4" office:value-type="string" calcext:value-type="string">
            <text:p>2023-01-28T00:48:49Z</text:p>
          </table:table-cell>
          <table:table-cell table:style-name="ce4"/>
          <table:table-cell table:style-name="ce1" office:value-type="string" calcext:value-type="string">
            <text:p>unfoldingWord-box3/electro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etherpad-lit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1-09-23T18:20:05Z</text:p>
          </table:table-cell>
          <table:table-cell table:style-name="ce1" office:value-type="string" calcext:value-type="string">
            <text:p>2011-09-02T22:45:3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therpad-lite</text:p>
          </table:table-cell>
          <table:table-cell table:style-name="ce1" table:number-columns-repeated="5"/>
          <table:table-cell table:style-name="ce1" office:value-type="string" calcext:value-type="string">
            <text:p>ether/etherpad</text:p>
          </table:table-cell>
          <table:table-cell table:style-name="ce1" office:value-type="string" calcext:value-type="string">
            <text:p>['Pita', 'JohnMcLear', 'Robin Buse', 'Robin', 'hanspinckaers', 'Lukas Martini', 'adrianheine', 'garrett', 'Patrick Pfeiffer', 'Randy', 'erlendfh', 'chapel', 'Pita Poison', 'root', 'snarkyMcSnark']</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therpad-lite" xlink:type="simple">https://github.com/unfoldingWord-dev/etherpad-lite</text:a></text:p>
          </table:table-cell>
          <table:table-cell table:style-name="ce4" office:value-type="string" calcext:value-type="string">
            <text:p>2023-01-28T16:19:06Z</text:p>
          </table:table-cell>
          <table:table-cell table:style-name="ce4"/>
          <table:table-cell table:style-name="ce1" office:value-type="string" calcext:value-type="string">
            <text:p>unfoldingWord-dev/etherpad-lit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example_tool</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2-09T21:07:14Z</text:p>
          </table:table-cell>
          <table:table-cell table:style-name="ce1" office:value-type="string" calcext:value-type="string">
            <text:p>2016-10-20T07:35:23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ExampleTool</text:p>
          </table:table-cell>
          <table:table-cell table:style-name="ce1" table:number-columns-repeated="6"/>
          <table:table-cell table:style-name="ce1" office:value-type="string" calcext:value-type="string">
            <text:p>['ihoegen',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example_tool" xlink:type="simple">https://github.com/unfoldingWord-dev/example_tool</text:a></text:p>
          </table:table-cell>
          <table:table-cell table:style-name="ce4" office:value-type="string" calcext:value-type="string">
            <text:p>2023-01-28T16:52:06Z</text:p>
          </table:table-cell>
          <table:table-cell table:style-name="ce4"/>
          <table:table-cell table:style-name="ce1" office:value-type="string" calcext:value-type="string">
            <text:p>unfoldingWord-dev/example_tool</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md-export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4-06-16T18:55:44Z</text:p>
          </table:table-cell>
          <table:table-cell table:style-name="ce1" office:value-type="string" calcext:value-type="string">
            <text:p>2014-06-16T18:55:3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md-exports" xlink:type="simple">https://github.com/unfoldingWord-dev/md-exports</text:a></text:p>
          </table:table-cell>
          <table:table-cell table:style-name="ce4" office:value-type="string" calcext:value-type="string">
            <text:p>2023-01-28T16:19:07Z</text:p>
          </table:table-cell>
          <table:table-cell table:style-name="ce4"/>
          <table:table-cell table:style-name="ce1" office:value-type="string" calcext:value-type="string">
            <text:p>unfoldingWord-dev/md-export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MediaWiki-USFMTag</text:p>
          </table:table-cell>
          <table:table-cell table:style-name="ce1" office:value-type="string" calcext:value-type="string">
            <text:p>unfoldingWord</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3-07-10T19:23:35Z</text:p>
          </table:table-cell>
          <table:table-cell table:style-name="ce1" office:value-type="string" calcext:value-type="string">
            <text:p>2013-07-10T19:23:26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istant Shores Media', 'Door4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MediaWiki-USFMTag" xlink:type="simple">https://github.com/unfoldingWord/MediaWiki-USFMTag</text:a></text:p>
          </table:table-cell>
          <table:table-cell table:style-name="ce4" office:value-type="string" calcext:value-type="string">
            <text:p>2026-02-23T14:45:18Z</text:p>
          </table:table-cell>
          <table:table-cell table:style-name="ce4"/>
          <table:table-cell table:style-name="ce1" office:value-type="string" calcext:value-type="string">
            <text:p>unfoldingWord/MediaWiki-USFMTag</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Mobile-JWiki</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number-columns-repeated="2" table:style-name="ce1" office:value-type="string" calcext:value-type="string">
            <text:p>2011-09-19T17:33:58Z</text:p>
          </table:table-cell>
          <table:table-cell table:style-name="ce4"/>
          <table:table-cell table:number-columns-repeated="2" table:style-name="ce4" office:value-type="float" office:value="0" calcext:value-type="float">
            <text:p>0</text:p>
          </table:table-cell>
          <table:table-cell table:style-name="ce1" table:number-columns-repeated="7"/>
          <table:table-cell table:style-name="ce1" office:value-type="string" calcext:value-type="string">
            <text:p>rwadholm/Mobile-JWiki</text:p>
          </table:table-cell>
          <table:table-cell table:style-name="ce1" office:value-type="string" calcext:value-type="string">
            <text:p>Bob Wadholm</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Mobile-JWiki" xlink:type="simple">https://github.com/unfoldingWord-dev/Mobile-JWiki</text:a></text:p>
          </table:table-cell>
          <table:table-cell table:style-name="ce4" office:value-type="string" calcext:value-type="string">
            <text:p>2023-01-28T16:19:06Z</text:p>
          </table:table-cell>
          <table:table-cell table:style-name="ce4"/>
          <table:table-cell table:style-name="ce1" office:value-type="string" calcext:value-type="string">
            <text:p>unfoldingWord-dev/Mobile-JWiki</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MultiplatformFrameworks</text:p>
          </table:table-cell>
          <table:table-cell table:style-name="ce1" office:value-type="string" calcext:value-type="string">
            <text:p>unfoldingWord-box3</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11-10T17:20:33Z</text:p>
          </table:table-cell>
          <table:table-cell table:style-name="ce1" office:value-type="string" calcext:value-type="string">
            <text:p>2020-03-16T14:26:24Z</text:p>
          </table:table-cell>
          <table:table-cell table:style-name="ce4"/>
          <table:table-cell table:number-columns-repeated="2" table:style-name="ce4" office:value-type="float" office:value="5" calcext:value-type="float">
            <text:p>5</text:p>
          </table:table-cell>
          <table:table-cell table:style-name="ce1" table:number-columns-repeated="8"/>
          <table:table-cell table:style-name="ce1" office:value-type="string" calcext:value-type="string">
            <text:p>mandolyt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MultiplatformFrameworks" xlink:type="simple">https://github.com/unfoldingWord-box3/MultiplatformFrameworks</text:a></text:p>
          </table:table-cell>
          <table:table-cell table:style-name="ce4" office:value-type="string" calcext:value-type="string">
            <text:p>2025-12-03T19:52:51Z</text:p>
          </table:table-cell>
          <table:table-cell table:style-name="ce4"/>
          <table:table-cell table:style-name="ce1" office:value-type="string" calcext:value-type="string">
            <text:p>unfoldingWord-box3/MultiplatformFramework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nagios_plugins</text:p>
          </table:table-cell>
          <table:table-cell table:style-name="ce1" office:value-type="string" calcext:value-type="string">
            <text:p>unfoldingWord-dev</text:p>
          </table:table-cell>
          <table:table-cell table:style-name="ce1" office:value-type="string" calcext:value-type="string">
            <text:p>Shel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9-05-09T13:39:46Z</text:p>
          </table:table-cell>
          <table:table-cell table:style-name="ce1" office:value-type="string" calcext:value-type="string">
            <text:p>2019-05-09T13:39:3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 'Jesse A. Griffin', 'jpetitt1',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nagios_plugins" xlink:type="simple">https://github.com/unfoldingWord-dev/nagios_plugins</text:a></text:p>
          </table:table-cell>
          <table:table-cell table:style-name="ce4" office:value-type="string" calcext:value-type="string">
            <text:p>2023-01-28T16:19:07Z</text:p>
          </table:table-cell>
          <table:table-cell table:style-name="ce4"/>
          <table:table-cell table:style-name="ce1" office:value-type="string" calcext:value-type="string">
            <text:p>unfoldingWord-dev/nagios_plugin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node-dcs-api-client</text:p>
          </table:table-cell>
          <table:table-cell table:style-name="ce1" office:value-type="string" calcext:value-type="string">
            <text:p>unfoldingWord-dev</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04-22T11:32:53Z</text:p>
          </table:table-cell>
          <table:table-cell table:style-name="ce1" office:value-type="string" calcext:value-type="string">
            <text:p>2022-04-22T11:31:46Z</text:p>
          </table:table-cell>
          <table:table-cell table:style-name="ce4" office:value-type="string" calcext:value-type="string">
            <text:p>2022-04-22T11:32:54Z</text:p>
          </table:table-cell>
          <table:table-cell table:number-columns-repeated="2" table:style-name="ce4" office:value-type="float" office:value="0" calcext:value-type="float">
            <text:p>0</text:p>
          </table:table-cell>
          <table:table-cell table:style-name="ce1"/>
          <table:table-cell table:style-name="ce1" office:value-type="string" calcext:value-type="string">
            <text:p>dcs_api_client</text:p>
          </table:table-cell>
          <table:table-cell table:style-name="ce1" table:number-columns-repeated="6"/>
          <table:table-cell table:style-name="ce1" office:value-type="string" calcext:value-type="string">
            <text:p>richmahn</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dev/node-dcs-api-client" xlink:type="simple">https://github.com/unfoldingWord-dev/node-dcs-api-client</text:a></text:p>
          </table:table-cell>
          <table:table-cell table:style-name="ce4" office:value-type="string" calcext:value-type="string">
            <text:p>2023-01-27T20:32:30Z</text:p>
          </table:table-cell>
          <table:table-cell table:style-name="ce4"/>
          <table:table-cell table:style-name="ce1" office:value-type="string" calcext:value-type="string">
            <text:p>unfoldingWord-dev/node-dcs-api-client</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bs-am</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50Z</text:p>
          </table:table-cell>
          <table:table-cell table:style-name="ce1" office:value-type="string" calcext:value-type="string">
            <text:p>2016-01-14T23:50:4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am" xlink:type="simple">https://github.com/unfoldingWord/obs-am</text:a></text:p>
          </table:table-cell>
          <table:table-cell table:style-name="ce4" office:value-type="string" calcext:value-type="string">
            <text:p>2023-01-28T16:58:17Z</text:p>
          </table:table-cell>
          <table:table-cell table:style-name="ce4"/>
          <table:table-cell table:style-name="ce1" office:value-type="string" calcext:value-type="string">
            <text:p>unfoldingWord/obs-am</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Android</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3-07-11T18:03:2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istant Shores Media</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Android" xlink:type="simple">https://github.com/unfoldingWord-dev/OBS-Android</text:a></text:p>
          </table:table-cell>
          <table:table-cell table:style-name="ce4" office:value-type="string" calcext:value-type="string">
            <text:p>2023-01-28T16:19:06Z</text:p>
          </table:table-cell>
          <table:table-cell table:style-name="ce4"/>
          <table:table-cell table:style-name="ce1" office:value-type="string" calcext:value-type="string">
            <text:p>unfoldingWord-dev/OBS-Androi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bn</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5Z</text:p>
          </table:table-cell>
          <table:table-cell table:style-name="ce1" office:value-type="string" calcext:value-type="string">
            <text:p>2016-01-14T23:51:0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bn" xlink:type="simple">https://github.com/unfoldingWord/obs-bn</text:a></text:p>
          </table:table-cell>
          <table:table-cell table:style-name="ce4" office:value-type="string" calcext:value-type="string">
            <text:p>2023-01-28T16:58:17Z</text:p>
          </table:table-cell>
          <table:table-cell table:style-name="ce4"/>
          <table:table-cell table:style-name="ce1" office:value-type="string" calcext:value-type="string">
            <text:p>unfoldingWord/obs-b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ceb</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40:53Z</text:p>
          </table:table-cell>
          <table:table-cell table:style-name="ce1" office:value-type="string" calcext:value-type="string">
            <text:p>2016-05-10T14:40:4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ceb" xlink:type="simple">https://github.com/unfoldingWord/obs-ceb</text:a></text:p>
          </table:table-cell>
          <table:table-cell table:style-name="ce4" office:value-type="string" calcext:value-type="string">
            <text:p>2023-01-28T16:58:18Z</text:p>
          </table:table-cell>
          <table:table-cell table:style-name="ce4"/>
          <table:table-cell table:style-name="ce1" office:value-type="string" calcext:value-type="string">
            <text:p>unfoldingWord/obs-ceb</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door43</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9-16T00:02:35Z</text:p>
          </table:table-cell>
          <table:table-cell table:style-name="ce1" office:value-type="string" calcext:value-type="string">
            <text:p>2016-09-14T12:07:3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door43" xlink:type="simple">https://github.com/unfoldingWord-dev/obs-door43</text:a></text:p>
          </table:table-cell>
          <table:table-cell table:style-name="ce4" office:value-type="string" calcext:value-type="string">
            <text:p>2023-01-28T16:19:08Z</text:p>
          </table:table-cell>
          <table:table-cell table:style-name="ce4"/>
          <table:table-cell table:style-name="ce1" office:value-type="string" calcext:value-type="string">
            <text:p>unfoldingWord-dev/obs-door43</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en</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7Z</text:p>
          </table:table-cell>
          <table:table-cell table:style-name="ce1" office:value-type="string" calcext:value-type="string">
            <text:p>2016-01-14T23:50:4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Jesse A. Griffi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en" xlink:type="simple">https://github.com/unfoldingWord/obs-en</text:a></text:p>
          </table:table-cell>
          <table:table-cell table:style-name="ce4" office:value-type="string" calcext:value-type="string">
            <text:p>2023-01-28T16:58:28Z</text:p>
          </table:table-cell>
          <table:table-cell table:style-name="ce4"/>
          <table:table-cell table:style-name="ce1" office:value-type="string" calcext:value-type="string">
            <text:p>unfoldingWord/obs-e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e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5Z</text:p>
          </table:table-cell>
          <table:table-cell table:style-name="ce1" office:value-type="string" calcext:value-type="string">
            <text:p>2016-01-14T23:50:4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esse A. Griffin',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es" xlink:type="simple">https://github.com/unfoldingWord/obs-es</text:a></text:p>
          </table:table-cell>
          <table:table-cell table:style-name="ce4" office:value-type="string" calcext:value-type="string">
            <text:p>2023-01-28T16:58:16Z</text:p>
          </table:table-cell>
          <table:table-cell table:style-name="ce4"/>
          <table:table-cell table:style-name="ce1" office:value-type="string" calcext:value-type="string">
            <text:p>unfoldingWord/obs-e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es-419</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5T15:51:01Z</text:p>
          </table:table-cell>
          <table:table-cell table:style-name="ce1" office:value-type="string" calcext:value-type="string">
            <text:p>2016-07-25T15:50: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es-419" xlink:type="simple">https://github.com/unfoldingWord/obs-es-419</text:a></text:p>
          </table:table-cell>
          <table:table-cell table:style-name="ce4" office:value-type="string" calcext:value-type="string">
            <text:p>2023-01-28T16:58:18Z</text:p>
          </table:table-cell>
          <table:table-cell table:style-name="ce4"/>
          <table:table-cell table:style-name="ce1" office:value-type="string" calcext:value-type="string">
            <text:p>unfoldingWord/obs-es-419</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f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6-15T12:49:15Z</text:p>
          </table:table-cell>
          <table:table-cell table:style-name="ce1" office:value-type="string" calcext:value-type="string">
            <text:p>2016-06-15T12:49:0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fa" xlink:type="simple">https://github.com/unfoldingWord/obs-fa</text:a></text:p>
          </table:table-cell>
          <table:table-cell table:style-name="ce4" office:value-type="string" calcext:value-type="string">
            <text:p>2023-01-28T16:58:16Z</text:p>
          </table:table-cell>
          <table:table-cell table:style-name="ce4"/>
          <table:table-cell table:style-name="ce1" office:value-type="string" calcext:value-type="string">
            <text:p>unfoldingWord/obs-fa</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f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38:11Z</text:p>
          </table:table-cell>
          <table:table-cell table:style-name="ce1" office:value-type="string" calcext:value-type="string">
            <text:p>2016-05-10T14:37:5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fr" xlink:type="simple">https://github.com/unfoldingWord/obs-fr</text:a></text:p>
          </table:table-cell>
          <table:table-cell table:style-name="ce4" office:value-type="string" calcext:value-type="string">
            <text:p>2023-01-28T16:58:17Z</text:p>
          </table:table-cell>
          <table:table-cell table:style-name="ce4"/>
          <table:table-cell table:style-name="ce1" office:value-type="string" calcext:value-type="string">
            <text:p>unfoldingWord/obs-f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gaj-x-ymnk</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2:10:27Z</text:p>
          </table:table-cell>
          <table:table-cell table:style-name="ce1" office:value-type="string" calcext:value-type="string">
            <text:p>2016-07-27T12:10:1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gaj-x-ymnk" xlink:type="simple">https://github.com/unfoldingWord/obs-gaj-x-ymnk</text:a></text:p>
          </table:table-cell>
          <table:table-cell table:style-name="ce4" office:value-type="string" calcext:value-type="string">
            <text:p>2023-01-28T16:58:19Z</text:p>
          </table:table-cell>
          <table:table-cell table:style-name="ce4"/>
          <table:table-cell table:style-name="ce1" office:value-type="string" calcext:value-type="string">
            <text:p>unfoldingWord/obs-gaj-x-ymnk</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gof</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0T14:48:23Z</text:p>
          </table:table-cell>
          <table:table-cell table:style-name="ce1" office:value-type="string" calcext:value-type="string">
            <text:p>2016-05-10T14:30:1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gof" xlink:type="simple">https://github.com/unfoldingWord/obs-gof</text:a></text:p>
          </table:table-cell>
          <table:table-cell table:style-name="ce4" office:value-type="string" calcext:value-type="string">
            <text:p>2023-01-28T16:58:18Z</text:p>
          </table:table-cell>
          <table:table-cell table:style-name="ce4"/>
          <table:table-cell table:style-name="ce1" office:value-type="string" calcext:value-type="string">
            <text:p>unfoldingWord/obs-gof</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gu</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14Z</text:p>
          </table:table-cell>
          <table:table-cell table:style-name="ce1" office:value-type="string" calcext:value-type="string">
            <text:p>2016-01-14T23:51:1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gu" xlink:type="simple">https://github.com/unfoldingWord/obs-gu</text:a></text:p>
          </table:table-cell>
          <table:table-cell table:style-name="ce4" office:value-type="string" calcext:value-type="string">
            <text:p>2023-01-28T16:58:22Z</text:p>
          </table:table-cell>
          <table:table-cell table:style-name="ce4"/>
          <table:table-cell table:style-name="ce1" office:value-type="string" calcext:value-type="string">
            <text:p>unfoldingWord/obs-gu</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h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21Z</text:p>
          </table:table-cell>
          <table:table-cell table:style-name="ce1" office:value-type="string" calcext:value-type="string">
            <text:p>2016-01-14T23:51:1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ha" xlink:type="simple">https://github.com/unfoldingWord/obs-ha</text:a></text:p>
          </table:table-cell>
          <table:table-cell table:style-name="ce4" office:value-type="string" calcext:value-type="string">
            <text:p>2023-01-28T16:58:28Z</text:p>
          </table:table-cell>
          <table:table-cell table:style-name="ce4"/>
          <table:table-cell table:style-name="ce1" office:value-type="string" calcext:value-type="string">
            <text:p>unfoldingWord/obs-ha</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h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12Z</text:p>
          </table:table-cell>
          <table:table-cell table:style-name="ce1" office:value-type="string" calcext:value-type="string">
            <text:p>2016-01-14T23:51:09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hi" xlink:type="simple">https://github.com/unfoldingWord/obs-hi</text:a></text:p>
          </table:table-cell>
          <table:table-cell table:style-name="ce4" office:value-type="string" calcext:value-type="string">
            <text:p>2023-01-28T16:58:18Z</text:p>
          </table:table-cell>
          <table:table-cell table:style-name="ce4"/>
          <table:table-cell table:style-name="ce1" office:value-type="string" calcext:value-type="string">
            <text:p>unfoldingWord/obs-hi</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hmr</text:p>
          </table:table-cell>
          <table:table-cell table:style-name="ce1" office:value-type="string" calcext:value-type="string">
            <text:p>unfoldingWord</text:p>
          </table:table-cell>
          <table:table-cell table:style-name="ce1" office:value-type="string" calcext:value-type="string">
            <text:p>Standard 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2:09:22Z</text:p>
          </table:table-cell>
          <table:table-cell table:style-name="ce1" office:value-type="string" calcext:value-type="string">
            <text:p>2016-07-27T12:08:3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hmr" xlink:type="simple">https://github.com/unfoldingWord/obs-hmr</text:a></text:p>
          </table:table-cell>
          <table:table-cell table:style-name="ce4" office:value-type="string" calcext:value-type="string">
            <text:p>2023-01-28T16:58:18Z</text:p>
          </table:table-cell>
          <table:table-cell table:style-name="ce4"/>
          <table:table-cell table:style-name="ce1" office:value-type="string" calcext:value-type="string">
            <text:p>unfoldingWord/obs-hm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hu</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8T19:53:08Z</text:p>
          </table:table-cell>
          <table:table-cell table:style-name="ce1" office:value-type="string" calcext:value-type="string">
            <text:p>2016-07-28T19:52:1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hu" xlink:type="simple">https://github.com/unfoldingWord/obs-hu</text:a></text:p>
          </table:table-cell>
          <table:table-cell table:style-name="ce4" office:value-type="string" calcext:value-type="string">
            <text:p>2023-01-28T16:58:19Z</text:p>
          </table:table-cell>
          <table:table-cell table:style-name="ce4"/>
          <table:table-cell table:style-name="ce1" office:value-type="string" calcext:value-type="string">
            <text:p>unfoldingWord/obs-hu</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iOS</text:p>
          </table:table-cell>
          <table:table-cell table:style-name="ce1" office:value-type="string" calcext:value-type="string">
            <text:p>unfoldingWord-dev</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3-07-11T18:05:5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istant Shores Media</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iOS" xlink:type="simple">https://github.com/unfoldingWord-dev/OBS-iOS</text:a></text:p>
          </table:table-cell>
          <table:table-cell table:style-name="ce4" office:value-type="string" calcext:value-type="string">
            <text:p>2023-01-28T16:19:06Z</text:p>
          </table:table-cell>
          <table:table-cell table:style-name="ce4"/>
          <table:table-cell table:style-name="ce1" office:value-type="string" calcext:value-type="string">
            <text:p>unfoldingWord-dev/OBS-iO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lpx</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28T19:45:10Z</text:p>
          </table:table-cell>
          <table:table-cell table:style-name="ce1" office:value-type="string" calcext:value-type="string">
            <text:p>2016-05-28T19:44:4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 Hopper',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lpx" xlink:type="simple">https://github.com/unfoldingWord/obs-lpx</text:a></text:p>
          </table:table-cell>
          <table:table-cell table:style-name="ce4" office:value-type="string" calcext:value-type="string">
            <text:p>2023-01-28T16:58:22Z</text:p>
          </table:table-cell>
          <table:table-cell table:style-name="ce4"/>
          <table:table-cell table:style-name="ce1" office:value-type="string" calcext:value-type="string">
            <text:p>unfoldingWord/obs-lpx</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Mobil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12-07-29T21:22:13Z</text:p>
          </table:table-cell>
          <table:table-cell table:style-name="ce1" office:value-type="string" calcext:value-type="string">
            <text:p>2012-07-29T21:21:55Z</text:p>
          </table:table-cell>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number-columns-repeated="7"/>
          <table:table-cell table:style-name="ce1" office:value-type="string" calcext:value-type="string">
            <text:p>phonegap/phonegap-start</text:p>
          </table:table-cell>
          <table:table-cell table:style-name="ce1" office:value-type="string" calcext:value-type="string">
            <text:p>['Bob Wadholm', 'alunny', 'ryanbetts', 'Andrew Lunny', 'Dan Silivestru', 'Dave Johnso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Mobile" xlink:type="simple">https://github.com/unfoldingWord-dev/OBS-Mobile</text:a></text:p>
          </table:table-cell>
          <table:table-cell table:style-name="ce4" office:value-type="string" calcext:value-type="string">
            <text:p>2023-01-28T16:19:06Z</text:p>
          </table:table-cell>
          <table:table-cell table:style-name="ce4"/>
          <table:table-cell table:style-name="ce1" office:value-type="string" calcext:value-type="string">
            <text:p>unfoldingWord-dev/OBS-Mobil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m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6Z</text:p>
          </table:table-cell>
          <table:table-cell table:style-name="ce1" office:value-type="string" calcext:value-type="string">
            <text:p>2016-01-14T23:51:0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mr" xlink:type="simple">https://github.com/unfoldingWord/obs-mr</text:a></text:p>
          </table:table-cell>
          <table:table-cell table:style-name="ce4" office:value-type="string" calcext:value-type="string">
            <text:p>2023-01-28T16:58:18Z</text:p>
          </table:table-cell>
          <table:table-cell table:style-name="ce4"/>
          <table:table-cell table:style-name="ce1" office:value-type="string" calcext:value-type="string">
            <text:p>unfoldingWord/obs-m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ne</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22T20:24:33Z</text:p>
          </table:table-cell>
          <table:table-cell table:style-name="ce1" office:value-type="string" calcext:value-type="string">
            <text:p>2016-01-22T20:24:3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ne" xlink:type="simple">https://github.com/unfoldingWord/obs-ne</text:a></text:p>
          </table:table-cell>
          <table:table-cell table:style-name="ce4" office:value-type="string" calcext:value-type="string">
            <text:p>2023-01-28T16:58:18Z</text:p>
          </table:table-cell>
          <table:table-cell table:style-name="ce4"/>
          <table:table-cell table:style-name="ce1" office:value-type="string" calcext:value-type="string">
            <text:p>unfoldingWord/obs-n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o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2Z</text:p>
          </table:table-cell>
          <table:table-cell table:style-name="ce1" office:value-type="string" calcext:value-type="string">
            <text:p>2016-01-14T23:51:0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or" xlink:type="simple">https://github.com/unfoldingWord/obs-or</text:a></text:p>
          </table:table-cell>
          <table:table-cell table:style-name="ce4" office:value-type="string" calcext:value-type="string">
            <text:p>2023-01-28T16:58:21Z</text:p>
          </table:table-cell>
          <table:table-cell table:style-name="ce4"/>
          <table:table-cell table:style-name="ce1" office:value-type="string" calcext:value-type="string">
            <text:p>unfoldingWord/obs-o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pa</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8Z</text:p>
          </table:table-cell>
          <table:table-cell table:style-name="ce1" office:value-type="string" calcext:value-type="string">
            <text:p>2016-01-14T23:51: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pa" xlink:type="simple">https://github.com/unfoldingWord/obs-pa</text:a></text:p>
          </table:table-cell>
          <table:table-cell table:style-name="ce4" office:value-type="string" calcext:value-type="string">
            <text:p>2023-01-28T16:58:17Z</text:p>
          </table:table-cell>
          <table:table-cell table:style-name="ce4"/>
          <table:table-cell table:style-name="ce1" office:value-type="string" calcext:value-type="string">
            <text:p>unfoldingWord/obs-pa</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pdf</text:p>
          </table:table-cell>
          <table:table-cell table:style-name="ce1" office:value-type="string" calcext:value-type="string">
            <text:p>unfoldingWord</text:p>
          </table:table-cell>
          <table:table-cell table:style-name="ce1" office:value-type="string" calcext:value-type="string">
            <text:p>TeX</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6-05T21:37:29Z</text:p>
          </table:table-cell>
          <table:table-cell table:style-name="ce1" office:value-type="string" calcext:value-type="string">
            <text:p>2020-07-01T09:33:35Z</text:p>
          </table:table-cell>
          <table:table-cell table:style-name="ce4"/>
          <table:table-cell table:style-name="ce4" office:value-type="float" office:value="5" calcext:value-type="float">
            <text:p>5</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RobH123', '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pdf" xlink:type="simple">https://github.com/unfoldingWord/obs-pdf</text:a></text:p>
          </table:table-cell>
          <table:table-cell table:style-name="ce4" office:value-type="string" calcext:value-type="string">
            <text:p>2025-09-09T09:10:04Z</text:p>
          </table:table-cell>
          <table:table-cell table:style-name="ce4"/>
          <table:table-cell table:style-name="ce1" office:value-type="string" calcext:value-type="string">
            <text:p>unfoldingWord/obs-pdf</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pt-b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43Z</text:p>
          </table:table-cell>
          <table:table-cell table:style-name="ce1" office:value-type="string" calcext:value-type="string">
            <text:p>2016-01-14T23:50: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pt-br" xlink:type="simple">https://github.com/unfoldingWord/obs-pt-br</text:a></text:p>
          </table:table-cell>
          <table:table-cell table:style-name="ce4" office:value-type="string" calcext:value-type="string">
            <text:p>2023-01-28T16:58:17Z</text:p>
          </table:table-cell>
          <table:table-cell table:style-name="ce4"/>
          <table:table-cell table:style-name="ce1" office:value-type="string" calcext:value-type="string">
            <text:p>unfoldingWord/obs-pt-b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ru</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12T17:49:13Z</text:p>
          </table:table-cell>
          <table:table-cell table:style-name="ce1" office:value-type="string" calcext:value-type="string">
            <text:p>2016-05-12T17:49:0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Jesse A. Griffin',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ru" xlink:type="simple">https://github.com/unfoldingWord/obs-ru</text:a></text:p>
          </table:table-cell>
          <table:table-cell table:style-name="ce4" office:value-type="string" calcext:value-type="string">
            <text:p>2023-01-28T16:58:28Z</text:p>
          </table:table-cell>
          <table:table-cell table:style-name="ce4"/>
          <table:table-cell table:style-name="ce1" office:value-type="string" calcext:value-type="string">
            <text:p>unfoldingWord/obs-ru</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sgj</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0:58Z</text:p>
          </table:table-cell>
          <table:table-cell table:style-name="ce1" office:value-type="string" calcext:value-type="string">
            <text:p>2016-01-14T23:50: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sgj" xlink:type="simple">https://github.com/unfoldingWord/obs-sgj</text:a></text:p>
          </table:table-cell>
          <table:table-cell table:style-name="ce4" office:value-type="string" calcext:value-type="string">
            <text:p>2023-01-28T17:00:18Z</text:p>
          </table:table-cell>
          <table:table-cell table:style-name="ce4"/>
          <table:table-cell table:style-name="ce1" office:value-type="string" calcext:value-type="string">
            <text:p>unfoldingWord/obs-sgj</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tdj</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14T21:55:14Z</text:p>
          </table:table-cell>
          <table:table-cell table:style-name="ce1" office:value-type="string" calcext:value-type="string">
            <text:p>2017-03-14T21:55: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tdj" xlink:type="simple">https://github.com/unfoldingWord/obs-tdj</text:a></text:p>
          </table:table-cell>
          <table:table-cell table:style-name="ce4" office:value-type="string" calcext:value-type="string">
            <text:p>2023-01-28T16:58:19Z</text:p>
          </table:table-cell>
          <table:table-cell table:style-name="ce4"/>
          <table:table-cell table:style-name="ce1" office:value-type="string" calcext:value-type="string">
            <text:p>unfoldingWord/obs-tdj</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tl</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7-27T15:40:1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obs-tl" xlink:type="simple">https://github.com/unfoldingWord/obs-tl</text:a></text:p>
          </table:table-cell>
          <table:table-cell table:style-name="ce4" office:value-type="string" calcext:value-type="string">
            <text:p>2023-01-28T16:58:19Z</text:p>
          </table:table-cell>
          <table:table-cell table:style-name="ce4"/>
          <table:table-cell table:style-name="ce1" office:value-type="string" calcext:value-type="string">
            <text:p>unfoldingWord/obs-tl</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tp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00Z</text:p>
          </table:table-cell>
          <table:table-cell table:style-name="ce1" office:value-type="string" calcext:value-type="string">
            <text:p>2016-01-14T23:50:5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tpi" xlink:type="simple">https://github.com/unfoldingWord/obs-tpi</text:a></text:p>
          </table:table-cell>
          <table:table-cell table:style-name="ce4" office:value-type="string" calcext:value-type="string">
            <text:p>2023-01-28T16:58:17Z</text:p>
          </table:table-cell>
          <table:table-cell table:style-name="ce4"/>
          <table:table-cell table:style-name="ce1" office:value-type="string" calcext:value-type="string">
            <text:p>unfoldingWord/obs-tpi</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t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5-24T15:53:38Z</text:p>
          </table:table-cell>
          <table:table-cell table:style-name="ce1" office:value-type="string" calcext:value-type="string">
            <text:p>2016-05-24T15:53: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phillip-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tr" xlink:type="simple">https://github.com/unfoldingWord/obs-tr</text:a></text:p>
          </table:table-cell>
          <table:table-cell table:style-name="ce4" office:value-type="string" calcext:value-type="string">
            <text:p>2023-01-28T16:58:17Z</text:p>
          </table:table-cell>
          <table:table-cell table:style-name="ce4"/>
          <table:table-cell table:style-name="ce1" office:value-type="string" calcext:value-type="string">
            <text:p>unfoldingWord/obs-t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Translation-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8-31T14:37:46Z</text:p>
          </table:table-cell>
          <table:table-cell table:style-name="ce1" office:value-type="string" calcext:value-type="string">
            <text:p>2014-06-02T15:19:2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MBoronNeotreks', 'jag3773', 'Tim', 'Distant Shores Media', 'yvonnel098']</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BS-Translation-App" xlink:type="simple">https://github.com/unfoldingWord-dev/OBS-Translation-App</text:a></text:p>
          </table:table-cell>
          <table:table-cell table:style-name="ce4" office:value-type="string" calcext:value-type="string">
            <text:p>2023-01-28T16:19:07Z</text:p>
          </table:table-cell>
          <table:table-cell table:style-name="ce4"/>
          <table:table-cell table:style-name="ce1" office:value-type="string" calcext:value-type="string">
            <text:p>unfoldingWord-dev/OBS-Translation-App</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ur</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22T20:24:26Z</text:p>
          </table:table-cell>
          <table:table-cell table:style-name="ce1" office:value-type="string" calcext:value-type="string">
            <text:p>2016-01-22T20:24: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ur" xlink:type="simple">https://github.com/unfoldingWord/obs-ur</text:a></text:p>
          </table:table-cell>
          <table:table-cell table:style-name="ce4" office:value-type="string" calcext:value-type="string">
            <text:p>2023-01-28T16:58:22Z</text:p>
          </table:table-cell>
          <table:table-cell table:style-name="ce4"/>
          <table:table-cell table:style-name="ce1" office:value-type="string" calcext:value-type="string">
            <text:p>unfoldingWord/obs-u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bs-vi</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1-14T23:51:23Z</text:p>
          </table:table-cell>
          <table:table-cell table:style-name="ce1" office:value-type="string" calcext:value-type="string">
            <text:p>2016-01-14T23:51:2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bs-vi" xlink:type="simple">https://github.com/unfoldingWord/obs-vi</text:a></text:p>
          </table:table-cell>
          <table:table-cell table:style-name="ce4" office:value-type="string" calcext:value-type="string">
            <text:p>2023-01-28T16:58:18Z</text:p>
          </table:table-cell>
          <table:table-cell table:style-name="ce4"/>
          <table:table-cell table:style-name="ce1" office:value-type="string" calcext:value-type="string">
            <text:p>unfoldingWord/obs-vi</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ld-tx-manag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6-10-20T01:23:03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Richard Mahn', 'ethantkoenig',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old-tx-manager" xlink:type="simple">https://github.com/unfoldingWord-dev/old-tx-manager</text:a></text:p>
          </table:table-cell>
          <table:table-cell table:style-name="ce4" office:value-type="string" calcext:value-type="string">
            <text:p>2023-01-28T16:19:08Z</text:p>
          </table:table-cell>
          <table:table-cell table:style-name="ce4"/>
          <table:table-cell table:style-name="ce1" office:value-type="string" calcext:value-type="string">
            <text:p>unfoldingWord-dev/old-tx-manag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pen-components-hackathon-website</text:p>
          </table:table-cell>
          <table:table-cell table:style-name="ce1" office:value-type="string" calcext:value-type="string">
            <text:p>unfoldingWord</text:p>
          </table:table-cell>
          <table:table-cell table:style-name="ce1" office:value-type="string" calcext:value-type="string">
            <text:p>Type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number-columns-repeated="2" table:style-name="ce1" office:value-type="string" calcext:value-type="string">
            <text:p>2022-01-05T02:52:31Z</text:p>
          </table:table-cell>
          <table:table-cell table:style-name="ce4"/>
          <table:table-cell table:style-name="ce4" office:value-type="float" office:value="4" calcext:value-type="float">
            <text:p>4</text:p>
          </table:table-cell>
          <table:table-cell table:style-name="ce4" office:value-type="float" office:value="0" calcext:value-type="float">
            <text:p>0</text:p>
          </table:table-cell>
          <table:table-cell table:style-name="ce1"/>
          <table:table-cell table:style-name="ce1" office:value-type="string" calcext:value-type="string">
            <text:p>virtual-event-starter-kit</text:p>
          </table:table-cell>
          <table:table-cell table:style-name="ce1" table:number-columns-repeated="5"/>
          <table:table-cell table:style-name="ce1" office:value-type="string" calcext:value-type="string">
            <text:p>vercel/virtual-event-starter-kit</text:p>
          </table:table-cell>
          <table:table-cell table:style-name="ce1" office:value-type="string" calcext:value-type="string">
            <text:p>['mannycolon', 'chibicode', 'leerob', 'goncy', 'levimykel', 'fofiu', 'Deep-Codes', 'enesakar', 'erikras', 'irahopkinson', 'marionott', 'matheuss', 'richmahn', 'hugefunwoo', 'lisilinhar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pen-components-hackathon-website" xlink:type="simple">https://github.com/unfoldingWord/open-components-hackathon-website</text:a></text:p>
          </table:table-cell>
          <table:table-cell table:style-name="ce4" office:value-type="string" calcext:value-type="string">
            <text:p>2024-05-22T10:11:28Z</text:p>
          </table:table-cell>
          <table:table-cell table:style-name="ce4"/>
          <table:table-cell table:style-name="ce1" office:value-type="string" calcext:value-type="string">
            <text:p>unfoldingWord/open-components-hackathon-websit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rthography-app-B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8-06T11:57:29Z</text:p>
          </table:table-cell>
          <table:table-cell table:style-name="ce1" office:value-type="string" calcext:value-type="string">
            <text:p>2024-08-06T11:57:27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orthoapp_poc</text:p>
          </table:table-cell>
          <table:table-cell table:style-name="ce1" table:number-columns-repeated="6"/>
          <table:table-cell table:style-name="ce1" office:value-type="string" calcext:value-type="string">
            <text:p>['yakob-aleksandrovich', 'Stephen0272']</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rthography-app-BE" xlink:type="simple">https://github.com/unfoldingWord/orthography-app-BE</text:a></text:p>
          </table:table-cell>
          <table:table-cell table:style-name="ce4" office:value-type="string" calcext:value-type="string">
            <text:p>2026-04-16T08:07:38Z</text:p>
          </table:table-cell>
          <table:table-cell table:style-name="ce4"/>
          <table:table-cell table:style-name="ce1" office:value-type="string" calcext:value-type="string">
            <text:p>unfoldingWord/orthography-app-B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orthography-app-FE</text:p>
          </table:table-cell>
          <table:table-cell table:style-name="ce1" office:value-type="string" calcext:value-type="string">
            <text:p>unfoldingWord</text:p>
          </table:table-cell>
          <table:table-cell table:style-name="ce1" office:value-type="string" calcext:value-type="string">
            <text:p>Dar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4-06-05T10:56:02Z</text:p>
          </table:table-cell>
          <table:table-cell table:style-name="ce1" office:value-type="string" calcext:value-type="string">
            <text:p>2024-06-05T10:55:54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Stephen0272</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orthography-app-FE" xlink:type="simple">https://github.com/unfoldingWord/orthography-app-FE</text:a></text:p>
          </table:table-cell>
          <table:table-cell table:style-name="ce4" office:value-type="string" calcext:value-type="string">
            <text:p>2026-04-16T08:08:11Z</text:p>
          </table:table-cell>
          <table:table-cell table:style-name="ce4"/>
          <table:table-cell table:style-name="ce1" office:value-type="string" calcext:value-type="string">
            <text:p>unfoldingWord/orthography-app-F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proposed_changes_module</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13T00:19:13Z</text:p>
          </table:table-cell>
          <table:table-cell table:style-name="ce1" office:value-type="string" calcext:value-type="string">
            <text:p>2017-03-13T15:22:06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ProposedChanges</text:p>
          </table:table-cell>
          <table:table-cell table:style-name="ce1" table:number-columns-repeated="6"/>
          <table:table-cell table:style-name="ce1" office:value-type="string" calcext:value-type="string">
            <text:p>['mannycolon', 'ihoegen',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roposed_changes_module" xlink:type="simple">https://github.com/unfoldingWord-dev/proposed_changes_module</text:a></text:p>
          </table:table-cell>
          <table:table-cell table:style-name="ce4" office:value-type="string" calcext:value-type="string">
            <text:p>2023-01-28T16:19:09Z</text:p>
          </table:table-cell>
          <table:table-cell table:style-name="ce4"/>
          <table:table-cell table:style-name="ce1" office:value-type="string" calcext:value-type="string">
            <text:p>unfoldingWord-dev/proposed_changes_modul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5" office:value-type="string" calcext:value-type="string">
            <text:p><text:a xlink:href="http://pub.distantshores.org/" xlink:type="simple">pub.distantshores.org</text:a></text:p>
          </table:table-cell>
          <table:table-cell table:style-name="ce1" office:value-type="string" calcext:value-type="string">
            <text:p>unfoldingWord-dev</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10-01T22:50:31Z</text:p>
          </table:table-cell>
          <table:table-cell table:style-name="ce1" office:value-type="string" calcext:value-type="string">
            <text:p>2017-10-01T22:48:41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pub.distantshores.org" xlink:type="simple">https://github.com/unfoldingWord-dev/pub.distantshores.org</text:a></text:p>
          </table:table-cell>
          <table:table-cell table:style-name="ce4" office:value-type="string" calcext:value-type="string">
            <text:p>2023-01-28T16:19:09Z</text:p>
          </table:table-cell>
          <table:table-cell table:style-name="ce4"/>
          <table:table-cell table:style-name="ce1" office:value-type="string" calcext:value-type="string">
            <text:p>unfoldingWord-dev/pub.distantshores.org</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ResourceChecker</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TRUE()" office:value-type="float" office:value="1" calcext:value-type="float">
            <text:p>1</text:p>
          </table:table-cell>
          <table:table-cell table:style-name="ce1" office:value-type="string" calcext:value-type="string">
            <text:p>2020-05-19T19:57:08Z</text:p>
          </table:table-cell>
          <table:table-cell table:style-name="ce1" office:value-type="string" calcext:value-type="string">
            <text:p>2020-05-19T19:56:49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resource-checker</text:p>
          </table:table-cell>
          <table:table-cell table:style-name="ce1" table:number-columns-repeated="4"/>
          <table:table-cell table:style-name="ce1" office:value-type="string" calcext:value-type="string">
            <text:p>['usfm-js', 'gitea-react-toolkit', 'scripture-resources-rcl', 'markdown-translatable']</text:p>
          </table:table-cell>
          <table:table-cell table:style-name="ce1" office:value-type="string" calcext:value-type="string">
            <text:p>unfoldingWord/uw-word-count</text:p>
          </table:table-cell>
          <table:table-cell table:style-name="ce1" office:value-type="string" calcext:value-type="string">
            <text:p>['mandolyte', 'RobH123',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ResourceChecker" xlink:type="simple">https://github.com/unfoldingWord-dev/ResourceChecker</text:a></text:p>
          </table:table-cell>
          <table:table-cell table:style-name="ce4" office:value-type="string" calcext:value-type="string">
            <text:p>2023-01-28T14:29:30Z</text:p>
          </table:table-cell>
          <table:table-cell table:style-name="ce4"/>
          <table:table-cell table:style-name="ce1" office:value-type="string" calcext:value-type="string">
            <text:p>unfoldingWord-dev/ResourceCheck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submachine</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5-02-17T18:57:00Z</text:p>
          </table:table-cell>
          <table:table-cell table:style-name="ce1" office:value-type="string" calcext:value-type="string">
            <text:p>2025-02-17T18:56: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submachine" xlink:type="simple">https://github.com/unfoldingWord-dev/submachine</text:a></text:p>
          </table:table-cell>
          <table:table-cell table:style-name="ce4" office:value-type="string" calcext:value-type="string">
            <text:p>2025-10-28T15:18:59Z</text:p>
          </table:table-cell>
          <table:table-cell table:style-name="ce4"/>
          <table:table-cell table:style-name="ce1" office:value-type="string" calcext:value-type="string">
            <text:p>unfoldingWord-dev/submachin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C_Resources</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9-09T10:57:36Z</text:p>
          </table:table-cell>
          <table:table-cell table:style-name="ce1" office:value-type="string" calcext:value-type="string">
            <text:p>2018-08-06T15:39:55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c_resources</text:p>
          </table:table-cell>
          <table:table-cell table:style-name="ce1" table:number-columns-repeated="4"/>
          <table:table-cell table:style-name="ce1" office:value-type="string" calcext:value-type="string">
            <text:p>usfm-js</text:p>
          </table:table-cell>
          <table:table-cell table:style-name="ce1"/>
          <table:table-cell table:style-name="ce1" office:value-type="string" calcext:value-type="string">
            <text:p>['PhotoNomad0', 'richmahn', 'mannycolon', 'Richard Mahn', 'klappy', 'RoyalSix', 'da1nerd', 'Sterling (Jay) Scot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C_Resources" xlink:type="simple">https://github.com/unfoldingWord-dev/tC_Resources</text:a></text:p>
          </table:table-cell>
          <table:table-cell table:style-name="ce4" office:value-type="string" calcext:value-type="string">
            <text:p>2023-01-28T16:35:42Z</text:p>
          </table:table-cell>
          <table:table-cell table:style-name="ce4"/>
          <table:table-cell table:style-name="ce1" office:value-type="string" calcext:value-type="string">
            <text:p>unfoldingWord-dev/tC_Resource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d</text:p>
          </table:table-cell>
          <table:table-cell table:style-name="ce1" office:value-type="string" calcext:value-type="string">
            <text:p>unfoldingWord-box3</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9-09-17T14:39:19Z</text:p>
          </table:table-cell>
          <table:table-cell table:style-name="ce1" office:value-type="string" calcext:value-type="string">
            <text:p>2019-09-17T14:39:18Z</text:p>
          </table:table-cell>
          <table:table-cell table:style-name="ce4"/>
          <table:table-cell table:style-name="ce4" office:value-type="float" office:value="20" calcext:value-type="float">
            <text:p>20</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mandolyte', 'jag3773', 'Tim J']</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ox3/td" xlink:type="simple">https://github.com/unfoldingWord-box3/td</text:a></text:p>
          </table:table-cell>
          <table:table-cell table:style-name="ce4" office:value-type="string" calcext:value-type="string">
            <text:p>2023-12-05T16:03:25Z</text:p>
          </table:table-cell>
          <table:table-cell table:style-name="ce4"/>
          <table:table-cell table:style-name="ce1" office:value-type="string" calcext:value-type="string">
            <text:p>unfoldingWord-box3/t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heCompassionateFatherApp</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1-04-27T22:43:14Z</text:p>
          </table:table-cell>
          <table:table-cell table:style-name="ce1" office:value-type="string" calcext:value-type="string">
            <text:p>2011-04-27T22:42:54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SM', 'DSM Mobile', 'Tim Jor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heCompassionateFatherApp" xlink:type="simple">https://github.com/unfoldingWord-dev/TheCompassionateFatherApp</text:a></text:p>
          </table:table-cell>
          <table:table-cell table:style-name="ce4" office:value-type="string" calcext:value-type="string">
            <text:p>2023-01-28T16:19:06Z</text:p>
          </table:table-cell>
          <table:table-cell table:style-name="ce4"/>
          <table:table-cell table:style-name="ce1" office:value-type="string" calcext:value-type="string">
            <text:p>unfoldingWord-dev/TheCompassionateFatherApp</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_academy</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4-13T00:19:24Z</text:p>
          </table:table-cell>
          <table:table-cell table:style-name="ce1"/>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ionAcademy</text:p>
          </table:table-cell>
          <table:table-cell table:style-name="ce1" table:number-columns-repeated="6"/>
          <table:table-cell table:style-name="ce1" office:value-type="string" calcext:value-type="string">
            <text:p>['ihoegen', 'Sterling (Jay) Scott', '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_academy" xlink:type="simple">https://github.com/unfoldingWord-dev/translation_academy</text:a></text:p>
          </table:table-cell>
          <table:table-cell table:style-name="ce4" office:value-type="string" calcext:value-type="string">
            <text:p>2023-01-28T16:19:09Z</text:p>
          </table:table-cell>
          <table:table-cell table:style-name="ce4"/>
          <table:table-cell table:style-name="ce1" office:value-type="string" calcext:value-type="string">
            <text:p>unfoldingWord-dev/translation_academy</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Core-PoC</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7-06T20:17:32Z</text:p>
          </table:table-cell>
          <table:table-cell table:style-name="ce1" office:value-type="string" calcext:value-type="string">
            <text:p>2018-07-06T20:17:31Z</text:p>
          </table:table-cell>
          <table:table-cell table:style-name="ce4"/>
          <table:table-cell table:style-name="ce4" office:value-type="float" office:value="40" calcext:value-type="float">
            <text:p>40</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klappy</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Core-PoC" xlink:type="simple">https://github.com/unfoldingWord-dev/translationCore-PoC</text:a></text:p>
          </table:table-cell>
          <table:table-cell table:style-name="ce4" office:value-type="string" calcext:value-type="string">
            <text:p>2023-01-28T16:19:08Z</text:p>
          </table:table-cell>
          <table:table-cell table:style-name="ce4"/>
          <table:table-cell table:style-name="ce1" office:value-type="string" calcext:value-type="string">
            <text:p>unfoldingWord-dev/translationCore-PoC</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DatabaseWeb</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23-06-06T12:28:28Z</text:p>
          </table:table-cell>
          <table:table-cell table:style-name="ce4"/>
          <table:table-cell table:style-name="ce4" office:value-type="float" office:value="150" calcext:value-type="float">
            <text:p>150</text:p>
          </table:table-cell>
          <table:table-cell table:style-name="ce4" office:value-type="float" office:value="20" calcext:value-type="float">
            <text:p>20</text:p>
          </table:table-cell>
          <table:table-cell table:style-name="ce1" table:number-columns-repeated="8"/>
          <table:table-cell table:style-name="ce1" office:value-type="string" calcext:value-type="string">
            <text:p>['vleong2332', 'paltman', 'swilcox', 'Vicky Leong', 'cdaield', 'jacobwegner', 'phillip-hopper', 'smcoll', 'rbnswartz', 'Phil Hopper', 'RobH123', 'yakob-aleksandrovich',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DatabaseWeb" xlink:type="simple">https://github.com/unfoldingWord-dev/translationDatabaseWeb</text:a></text:p>
          </table:table-cell>
          <table:table-cell table:style-name="ce4" office:value-type="string" calcext:value-type="string">
            <text:p>2023-12-05T16:16:56Z</text:p>
          </table:table-cell>
          <table:table-cell table:style-name="ce4"/>
          <table:table-cell table:style-name="ce1" office:value-type="string" calcext:value-type="string">
            <text:p>unfoldingWord-dev/translationDatabaseWeb</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db-tools</text:p>
          </table:table-cell>
          <table:table-cell table:style-name="ce1" office:value-type="string" calcext:value-type="string">
            <text:p>unfoldingWord-dev</text:p>
          </table:table-cell>
          <table:table-cell table:style-name="ce1" office:value-type="string" calcext:value-type="string">
            <text:p>PHP</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5-06-23T21:33:38Z</text:p>
          </table:table-cell>
          <table:table-cell table:style-name="ce1" office:value-type="string" calcext:value-type="string">
            <text:p>2015-06-23T21:33:37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Dave Pearce',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db-tools" xlink:type="simple">https://github.com/unfoldingWord-dev/translationdb-tools</text:a></text:p>
          </table:table-cell>
          <table:table-cell table:style-name="ce4" office:value-type="string" calcext:value-type="string">
            <text:p>2023-01-28T16:19:07Z</text:p>
          </table:table-cell>
          <table:table-cell table:style-name="ce4"/>
          <table:table-cell table:style-name="ce1" office:value-type="string" calcext:value-type="string">
            <text:p>unfoldingWord-dev/translationdb-tool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Helps</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3-12T17:46:51Z</text:p>
          </table:table-cell>
          <table:table-cell table:style-name="ce1" office:value-type="string" calcext:value-type="string">
            <text:p>2018-03-12T17:46:50Z</text:p>
          </table:table-cell>
          <table:table-cell table:style-name="ce4"/>
          <table:table-cell table:number-columns-repeated="2" table:style-name="ce4" office:value-type="float" office:value="0" calcext:value-type="float">
            <text:p>0</text:p>
          </table:table-cell>
          <table:table-cell table:style-name="ce1"/>
          <table:table-cell table:style-name="ce1" office:value-type="string" calcext:value-type="string">
            <text:p>TranslationHelps</text:p>
          </table:table-cell>
          <table:table-cell table:style-name="ce1" table:number-columns-repeated="6"/>
          <table:table-cell table:style-name="ce1" office:value-type="string" calcext:value-type="string">
            <text:p>['mannycolon', 'EllDoubleYew', 'Richard Mahn', 'klappy', 'ihoegen', 'cdwhitfield73', 'RoyalSix', 'da1nerd', 'Sterling (Jay) Scott', 'Audrey Mahn',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Helps" xlink:type="simple">https://github.com/unfoldingWord-dev/translationHelps</text:a></text:p>
          </table:table-cell>
          <table:table-cell table:style-name="ce4" office:value-type="string" calcext:value-type="string">
            <text:p>2023-01-28T16:52:06Z</text:p>
          </table:table-cell>
          <table:table-cell table:style-name="ce4"/>
          <table:table-cell table:style-name="ce1" office:value-type="string" calcext:value-type="string">
            <text:p>unfoldingWord-dev/translationHelps</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Keyboard</text:p>
          </table:table-cell>
          <table:table-cell table:style-name="ce1" office:value-type="string" calcext:value-type="string">
            <text:p>unfoldingWord-dev</text:p>
          </table:table-cell>
          <table:table-cell table:style-name="ce1" office:value-type="string" calcext:value-type="string">
            <text:p>Java</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6-08T15:50:17Z</text:p>
          </table:table-cell>
          <table:table-cell table:style-name="ce1" office:value-type="string" calcext:value-type="string">
            <text:p>2018-06-08T15:49:12Z</text:p>
          </table:table-cell>
          <table:table-cell table:style-name="ce4" office:value-type="string" calcext:value-type="string">
            <text:p>2018-06-08T15:50:17Z</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GottaGetSwifty', 'bknatterud', 'jag3773', 'Jesse A. Griffin']</text:p>
          </table:table-cell>
          <table:table-cell table:style-name="ce1" office:value-type="float" office:value="24" calcext:value-type="float">
            <text:p>24</text:p>
          </table:table-cell>
          <table:table-cell table:style-name="ce1" office:value-type="float" office:value="729" calcext:value-type="float">
            <text:p>729</text:p>
          </table:table-cell>
          <table:table-cell table:style-name="ce5" office:value-type="string" calcext:value-type="string">
            <text:p><text:a xlink:href="https://github.com/unfoldingWord-dev/translationKeyboard" xlink:type="simple">https://github.com/unfoldingWord-dev/translationKeyboard</text:a></text:p>
          </table:table-cell>
          <table:table-cell table:style-name="ce4" office:value-type="string" calcext:value-type="string">
            <text:p>2024-03-11T22:35:12Z</text:p>
          </table:table-cell>
          <table:table-cell table:style-name="ce4"/>
          <table:table-cell table:style-name="ce1" office:value-type="string" calcext:value-type="string">
            <text:p>unfoldingWord-dev/translationKeyboar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ranslationKeyboardWeb</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5-07-11T20:15:34Z</text:p>
          </table:table-cell>
          <table:table-cell table:style-name="ce1" office:value-type="string" calcext:value-type="string">
            <text:p>2015-07-11T20:15:35Z</text:p>
          </table:table-cell>
          <table:table-cell table:style-name="ce4"/>
          <table:table-cell table:style-name="ce4" office:value-type="float" office:value="7" calcext:value-type="float">
            <text:p>7</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GottaGetSwifty', 'bknatterud', 'jag3773', 'Jesse A. Griffi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ranslationKeyboardWeb" xlink:type="simple">https://github.com/unfoldingWord-dev/translationKeyboardWeb</text:a></text:p>
          </table:table-cell>
          <table:table-cell table:style-name="ce4" office:value-type="string" calcext:value-type="string">
            <text:p>2023-01-28T16:19:07Z</text:p>
          </table:table-cell>
          <table:table-cell table:style-name="ce4"/>
          <table:table-cell table:style-name="ce1" office:value-type="string" calcext:value-type="string">
            <text:p>unfoldingWord-dev/translationKeyboardWeb</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s-serv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4-09-23T19:33:20Z</text:p>
          </table:table-cell>
          <table:table-cell table:style-name="ce1" office:value-type="string" calcext:value-type="string">
            <text:p>2014-09-23T19:33:17Z</text:p>
          </table:table-cell>
          <table:table-cell table:style-name="ce4"/>
          <table:table-cell table:style-name="ce4" office:value-type="float" office:value="9" calcext:value-type="float">
            <text:p>9</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da1nerd', '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s-server" xlink:type="simple">https://github.com/unfoldingWord-dev/ts-server</text:a></text:p>
          </table:table-cell>
          <table:table-cell table:style-name="ce4" office:value-type="string" calcext:value-type="string">
            <text:p>2023-01-28T16:19:07Z</text:p>
          </table:table-cell>
          <table:table-cell table:style-name="ce4"/>
          <table:table-cell table:style-name="ce1" office:value-type="string" calcext:value-type="string">
            <text:p>unfoldingWord-dev/ts-serv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s-v2-catalog-backport</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2-12-31T07:59:27Z</text:p>
          </table:table-cell>
          <table:table-cell table:style-name="ce1" office:value-type="string" calcext:value-type="string">
            <text:p>2022-06-02T18:06:07Z</text:p>
          </table:table-cell>
          <table:table-cell table:style-name="ce4" office:value-type="string" calcext:value-type="string">
            <text:p>2022-06-01T22:42:37Z</text:p>
          </table:table-cell>
          <table:table-cell table:number-columns-repeated="2" table:style-name="ce4" office:value-type="float" office:value="1" calcext:value-type="float">
            <text:p>1</text:p>
          </table:table-cell>
          <table:table-cell table:style-name="ce1" table:number-columns-repeated="8"/>
          <table:table-cell table:style-name="ce1" office:value-type="string" calcext:value-type="string">
            <text:p>richmahn</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xt:a xlink:href="https://github.com/unfoldingWord/ts-v2-catalog-backport" xlink:type="simple">https://github.com/unfoldingWord/ts-v2-catalog-backport</text:a></text:p>
          </table:table-cell>
          <table:table-cell table:style-name="ce4" office:value-type="string" calcext:value-type="string">
            <text:p>2025-09-09T08:54:13Z</text:p>
          </table:table-cell>
          <table:table-cell table:style-name="ce4"/>
          <table:table-cell table:style-name="ce1" office:value-type="string" calcext:value-type="string">
            <text:p>unfoldingWord/ts-v2-catalog-backport</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manager</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1-06-04T15:53:18Z</text:p>
          </table:table-cell>
          <table:table-cell table:style-name="ce1" office:value-type="string" calcext:value-type="string">
            <text:p>2020-03-19T16:48:27Z</text:p>
          </table:table-cell>
          <table:table-cell table:style-name="ce4" office:value-type="string" calcext:value-type="string">
            <text:p>2017-06-21T14:06:12Z</text:p>
          </table:table-cell>
          <table:table-cell table:number-columns-repeated="2" table:style-name="ce4" office:value-type="float" office:value="6" calcext:value-type="float">
            <text:p>6</text:p>
          </table:table-cell>
          <table:table-cell table:style-name="ce1" table:number-columns-repeated="8"/>
          <table:table-cell table:style-name="ce1" office:value-type="string" calcext:value-type="string">
            <text:p>['Richard Mahn', 'richmahn', 'PhotoNomad0', 'Phil Hopper', 'bspidel', 'jag3773', 'phillip-hopper', 'lversaw', 'ethantkoenig']</text:p>
          </table:table-cell>
          <table:table-cell table:style-name="ce1" office:value-type="float" office:value="5" calcext:value-type="float">
            <text:p>5</text:p>
          </table:table-cell>
          <table:table-cell table:style-name="ce1" office:value-type="float" office:value="0" calcext:value-type="float">
            <text:p>0</text:p>
          </table:table-cell>
          <table:table-cell table:style-name="ce5" office:value-type="string" calcext:value-type="string">
            <text:p><text:a xlink:href="https://github.com/unfoldingWord-dev/tx-manager" xlink:type="simple">https://github.com/unfoldingWord-dev/tx-manager</text:a></text:p>
          </table:table-cell>
          <table:table-cell table:style-name="ce4" office:value-type="string" calcext:value-type="string">
            <text:p>2024-05-22T13:48:54Z</text:p>
          </table:table-cell>
          <table:table-cell table:style-name="ce4"/>
          <table:table-cell table:style-name="ce1" office:value-type="string" calcext:value-type="string">
            <text:p>unfoldingWord-dev/tx-manage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manager-lambda</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07T15:44:54Z</text:p>
          </table:table-cell>
          <table:table-cell table:style-name="ce1" office:value-type="string" calcext:value-type="string">
            <text:p>2017-06-07T15:44:53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 'Richard Mahn', 'Phil Hopper', 'PhotoNomad0', 'bspidel', 'phillip-hopper',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manager-lambda" xlink:type="simple">https://github.com/unfoldingWord-dev/tx-manager-lambda</text:a></text:p>
          </table:table-cell>
          <table:table-cell table:style-name="ce4" office:value-type="string" calcext:value-type="string">
            <text:p>2025-10-09T10:59:32Z</text:p>
          </table:table-cell>
          <table:table-cell table:style-name="ce4"/>
          <table:table-cell table:style-name="ce1" office:value-type="string" calcext:value-type="string">
            <text:p>unfoldingWord-dev/tx-manager-lambda</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x-simple-usfm2html</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12-20T06:23:46Z</text:p>
          </table:table-cell>
          <table:table-cell table:style-name="ce1" office:value-type="string" calcext:value-type="string">
            <text:p>2016-12-20T06:23:4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Gogs', 'Richard 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tx-simple-usfm2html" xlink:type="simple">https://github.com/unfoldingWord-dev/tx-simple-usfm2html</text:a></text:p>
          </table:table-cell>
          <table:table-cell table:style-name="ce4" office:value-type="string" calcext:value-type="string">
            <text:p>2023-01-28T16:19:08Z</text:p>
          </table:table-cell>
          <table:table-cell table:style-name="ce4"/>
          <table:table-cell table:style-name="ce1" office:value-type="string" calcext:value-type="string">
            <text:p>unfoldingWord-dev/tx-simple-usfm2html</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db-e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23T20:18:41Z</text:p>
          </table:table-cell>
          <table:table-cell table:style-name="ce1" office:value-type="string" calcext:value-type="string">
            <text:p>2017-06-23T20:17:50Z</text:p>
          </table:table-cell>
          <table:table-cell table:style-name="ce4" office:value-type="string" calcext:value-type="string">
            <text:p>2016-10-04T01:16:56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jag3773']</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udb-en" xlink:type="simple">https://github.com/unfoldingWord/udb-en</text:a></text:p>
          </table:table-cell>
          <table:table-cell table:style-name="ce4" office:value-type="string" calcext:value-type="string">
            <text:p>2023-01-28T16:52:17Z</text:p>
          </table:table-cell>
          <table:table-cell table:style-name="ce4"/>
          <table:table-cell table:style-name="ce1" office:value-type="string" calcext:value-type="string">
            <text:p>unfoldingWord/udb-e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lb-e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6-23T20:21:08Z</text:p>
          </table:table-cell>
          <table:table-cell table:style-name="ce1" office:value-type="string" calcext:value-type="string">
            <text:p>2017-06-23T20:20:49Z</text:p>
          </table:table-cell>
          <table:table-cell table:style-name="ce4" office:value-type="string" calcext:value-type="string">
            <text:p>2016-10-04T01:18:57Z</text:p>
          </table:table-cell>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 'jag3773']</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 office:value-type="string" calcext:value-type="string">
            <text:p><text:a xlink:href="https://github.com/unfoldingWord/ulb-en" xlink:type="simple">https://github.com/unfoldingWord/ulb-en</text:a></text:p>
          </table:table-cell>
          <table:table-cell table:style-name="ce4" office:value-type="string" calcext:value-type="string">
            <text:p>2025-12-05T15:37:06Z</text:p>
          </table:table-cell>
          <table:table-cell table:style-name="ce4"/>
          <table:table-cell table:style-name="ce1" office:value-type="string" calcext:value-type="string">
            <text:p>unfoldingWord/ulb-e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lb-pt-br</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6-03-11T00:22:21Z</text:p>
          </table:table-cell>
          <table:table-cell table:style-name="ce1" office:value-type="string" calcext:value-type="string">
            <text:p>2016-03-11T00:22:18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oot</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lb-pt-br" xlink:type="simple">https://github.com/unfoldingWord/ulb-pt-br</text:a></text:p>
          </table:table-cell>
          <table:table-cell table:style-name="ce4" office:value-type="string" calcext:value-type="string">
            <text:p>2023-01-28T16:52:17Z</text:p>
          </table:table-cell>
          <table:table-cell table:style-name="ce4"/>
          <table:table-cell table:style-name="ce1" office:value-type="string" calcext:value-type="string">
            <text:p>unfoldingWord/ulb-pt-br</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nfoldingWord.github.io-old</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11-28T20:38:37Z</text:p>
          </table:table-cell>
          <table:table-cell table:style-name="ce1" office:value-type="string" calcext:value-type="string">
            <text:p>2018-11-28T20:31:56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 'phillip-hopper', 'Tim', 'codemis', 'Jesse A. Griffin', 'Tim J', 'benjore', 'Phil Hopper', 'root', 'jesse@unfoldingword.org', 'timjore', 'Apache', 'Richard Mahn', 'toddlprice', 'Gogs', 'russp41']</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nfoldingWord.github.io-old" xlink:type="simple">https://github.com/unfoldingWord/unfoldingWord.github.io-old</text:a></text:p>
          </table:table-cell>
          <table:table-cell table:style-name="ce4" office:value-type="string" calcext:value-type="string">
            <text:p>2025-10-02T14:12:10Z</text:p>
          </table:table-cell>
          <table:table-cell table:style-name="ce4"/>
          <table:table-cell table:style-name="ce1" office:value-type="string" calcext:value-type="string">
            <text:p>unfoldingWord/unfoldingWord.github.io-old</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nlocked-Greek-Lexicon</text:p>
          </table:table-cell>
          <table:table-cell table:style-name="ce1" office:value-type="string" calcext:value-type="string">
            <text:p>unfoldingWord</text:p>
          </table:table-cell>
          <table:table-cell table:style-name="ce1"/>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7-03-23T14:19:11Z</text:p>
          </table:table-cell>
          <table:table-cell table:style-name="ce1" office:value-type="string" calcext:value-type="string">
            <text:p>2017-03-23T14:19:1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Tim', 'toddlprice', 'timjor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nlocked-Greek-Lexicon" xlink:type="simple">https://github.com/unfoldingWord/Unlocked-Greek-Lexicon</text:a></text:p>
          </table:table-cell>
          <table:table-cell table:style-name="ce4" office:value-type="string" calcext:value-type="string">
            <text:p>2023-01-28T16:52:17Z</text:p>
          </table:table-cell>
          <table:table-cell table:style-name="ce4"/>
          <table:table-cell table:style-name="ce1" office:value-type="string" calcext:value-type="string">
            <text:p>unfoldingWord/Unlocked-Greek-Lexico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nlocked-Greek-New-Testament</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9-13T14:41:31Z</text:p>
          </table:table-cell>
          <table:table-cell table:style-name="ce1" office:value-type="string" calcext:value-type="string">
            <text:p>2018-09-13T14:41:30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toddlprice', 'klappy', 'Tim', 'jag3773', 'timjore']</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nlocked-Greek-New-Testament" xlink:type="simple">https://github.com/unfoldingWord/Unlocked-Greek-New-Testament</text:a></text:p>
          </table:table-cell>
          <table:table-cell table:style-name="ce4" office:value-type="string" calcext:value-type="string">
            <text:p>2025-12-28T01:08:22Z</text:p>
          </table:table-cell>
          <table:table-cell table:style-name="ce4"/>
          <table:table-cell table:style-name="ce1" office:value-type="string" calcext:value-type="string">
            <text:p>unfoldingWord/Unlocked-Greek-New-Testament</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publish</text:p>
          </table:table-cell>
          <table:table-cell table:style-name="ce1" office:value-type="string" calcext:value-type="string">
            <text:p>unfoldingWord-dev</text:p>
          </table:table-cell>
          <table:table-cell table:style-name="ce1" office:value-type="string" calcext:value-type="string">
            <text:p>Python</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05T12:58:13Z</text:p>
          </table:table-cell>
          <table:table-cell table:style-name="ce1" office:value-type="string" calcext:value-type="string">
            <text:p>2017-04-13T18:46:02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illip-hopper', 'Phil Hopper', 'richmahn', 'Richard 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publish" xlink:type="simple">https://github.com/unfoldingWord-dev/uw-publish</text:a></text:p>
          </table:table-cell>
          <table:table-cell table:style-name="ce4" office:value-type="string" calcext:value-type="string">
            <text:p>2023-01-28T16:19:08Z</text:p>
          </table:table-cell>
          <table:table-cell table:style-name="ce4"/>
          <table:table-cell table:style-name="ce1" office:value-type="string" calcext:value-type="string">
            <text:p>unfoldingWord-dev/uw-publish</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admin</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number-columns-repeated="2" table:style-name="ce1" office:value-type="string" calcext:value-type="string">
            <text:p>2015-07-30T18:10:25Z</text:p>
          </table:table-cell>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altman', 'swilcox', 'root',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uwadmin" xlink:type="simple">https://github.com/unfoldingWord-dev/uwadmin</text:a></text:p>
          </table:table-cell>
          <table:table-cell table:style-name="ce4" office:value-type="string" calcext:value-type="string">
            <text:p>2023-01-28T16:19:07Z</text:p>
          </table:table-cell>
          <table:table-cell table:style-name="ce4"/>
          <table:table-cell table:style-name="ce1" office:value-type="string" calcext:value-type="string">
            <text:p>unfoldingWord-dev/uwadmin</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VerseCheck</text:p>
          </table:table-cell>
          <table:table-cell table:style-name="ce1" office:value-type="string" calcext:value-type="string">
            <text:p>unfoldingWord-dev</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18-05-18T14:29:02Z</text:p>
          </table:table-cell>
          <table:table-cell table:style-name="ce1" office:value-type="string" calcext:value-type="string">
            <text:p>2018-05-17T20:00:13Z</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1"/>
          <table:table-cell table:style-name="ce1" office:value-type="string" calcext:value-type="string">
            <text:p>VerseCheck</text:p>
          </table:table-cell>
          <table:table-cell table:style-name="ce1" table:number-columns-repeated="4"/>
          <table:table-cell table:style-name="ce1" office:value-type="string" calcext:value-type="string">
            <text:p>['selections', 'tc-strings', 'tc-tool', 'usfm-js']</text:p>
          </table:table-cell>
          <table:table-cell table:style-name="ce1"/>
          <table:table-cell table:style-name="ce1" office:value-type="string" calcext:value-type="string">
            <text:p>['mannycolon', 'klappy', 'RoyalSix', 'cdwhitfield73', 'Richard Mahn', 'ihoegen', 'EllDoubleYew', 'da1nerd', 'Sterling (Jay) Scott', 'richmahn', 'bspidel', '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dev/VerseCheck" xlink:type="simple">https://github.com/unfoldingWord-dev/VerseCheck</text:a></text:p>
          </table:table-cell>
          <table:table-cell table:style-name="ce4" office:value-type="string" calcext:value-type="string">
            <text:p>2023-01-28T16:35:42Z</text:p>
          </table:table-cell>
          <table:table-cell table:style-name="ce4"/>
          <table:table-cell table:style-name="ce1" office:value-type="string" calcext:value-type="string">
            <text:p>unfoldingWord-dev/VerseCheck</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office:value-type="string" calcext:value-type="string">
            <text:p>Deprecate npm package candidate</text:p>
          </table:table-cell>
          <table:table-cell table:style-name="ce1" office:value-type="string" calcext:value-type="string">
            <text:p>Package is backed by an archived repository and is not marked deprecated on npmjs.</text:p>
          </table:table-cell>
          <table:table-cell table:number-columns-repeated="992"/>
        </table:table-row>
        <table:table-row table:style-name="ro1">
          <table:table-cell table:style-name="ce1"/>
          <table:table-cell table:style-name="ce4" table:number-columns-repeated="2"/>
          <table:table-cell table:style-name="ce1" office:value-type="string" calcext:value-type="string">
            <text:p>websit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TRUE()" office:value-type="float" office:value="1" calcext:value-type="float">
            <text:p>1</text:p>
          </table:table-cell>
          <table:table-cell table:style-name="ce1" table:formula="of:=FALSE()" office:value-type="float" office:value="0" calcext:value-type="float">
            <text:p>0</text:p>
          </table:table-cell>
          <table:table-cell table:style-name="ce1" office:value-type="string" calcext:value-type="string">
            <text:p>2025-05-31T15:07:23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oryi', 'jeremymoore', 'kellyvivancox', 'aagraston', 'richmahn', 'yakob-aleksandrovich', 'sethstoll3', 'jag3773', 'generosityx']</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website" xlink:type="simple">https://github.com/unfoldingWord/website</text:a></text:p>
          </table:table-cell>
          <table:table-cell table:style-name="ce4" office:value-type="string" calcext:value-type="string">
            <text:p>2025-12-03T19:14:44Z</text:p>
          </table:table-cell>
          <table:table-cell table:style-name="ce4"/>
          <table:table-cell table:style-name="ce1" office:value-type="string" calcext:value-type="string">
            <text:p>unfoldingWord/website</text:p>
          </table:table-cell>
          <table:table-cell table:style-name="ce4" office:value-type="string" calcext:value-type="string">
            <text:p>4-Dead - archived</text:p>
          </table:table-cell>
          <table:table-cell table:style-name="ce1" office:value-type="string" calcext:value-type="string">
            <text:p>Repository is archived.</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budget-report</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2T19:21:13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budget-report" xlink:type="simple">https://github.com/unfoldingWord/budget-report</text:a></text:p>
          </table:table-cell>
          <table:table-cell table:style-name="ce4" office:value-type="string" calcext:value-type="string">
            <text:p>2026-06-02T19:21:17Z</text:p>
          </table:table-cell>
          <table:table-cell table:style-name="ce4"/>
          <table:table-cell table:style-name="ce1" office:value-type="string" calcext:value-type="string">
            <text:p>unfoldingWord/budget-report</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claude-skills</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17T14:34:2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claude-skills" xlink:type="simple">https://github.com/unfoldingWord/claude-skills</text:a></text:p>
          </table:table-cell>
          <table:table-cell table:style-name="ce4" office:value-type="string" calcext:value-type="string">
            <text:p>2026-06-17T14:39:48Z</text:p>
          </table:table-cell>
          <table:table-cell table:style-name="ce4"/>
          <table:table-cell table:style-name="ce1" office:value-type="string" calcext:value-type="string">
            <text:p>unfoldingWord/claude-skill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dw-zipodt</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05-28T21:07:47Z</text:p>
          </table:table-cell>
          <table:table-cell table:style-name="ce1"/>
          <table:table-cell table:style-name="ce4"/>
          <table:table-cell table:style-name="ce4" office:value-type="float" office:value="2" calcext:value-type="float">
            <text:p>2</text:p>
          </table:table-cell>
          <table:table-cell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dev/dw-zipodt" xlink:type="simple">https://github.com/unfoldingWord-dev/dw-zipodt</text:a></text:p>
          </table:table-cell>
          <table:table-cell table:style-name="ce4" office:value-type="string" calcext:value-type="string">
            <text:p>2015-05-28T21:07:46Z</text:p>
          </table:table-cell>
          <table:table-cell table:style-name="ce4"/>
          <table:table-cell table:style-name="ce1" office:value-type="string" calcext:value-type="string">
            <text:p>unfoldingWord-dev/dw-zipodt</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engineering-practice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06T21:10:0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sethstoll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engineering-practices" xlink:type="simple">https://github.com/unfoldingWord/engineering-practices</text:a></text:p>
          </table:table-cell>
          <table:table-cell table:style-name="ce4" office:value-type="string" calcext:value-type="string">
            <text:p>2026-05-06T21:10:18Z</text:p>
          </table:table-cell>
          <table:table-cell table:style-name="ce4"/>
          <table:table-cell table:style-name="ce1" office:value-type="string" calcext:value-type="string">
            <text:p>unfoldingWord/engineering-practice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gl_database_priva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1-12-15T21:34:14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cobwegner</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gl_database_private" xlink:type="simple">https://github.com/unfoldingWord/gl_database_private</text:a></text:p>
          </table:table-cell>
          <table:table-cell table:style-name="ce4" office:value-type="string" calcext:value-type="string">
            <text:p>2021-12-15T21:34:33Z</text:p>
          </table:table-cell>
          <table:table-cell table:style-name="ce4"/>
          <table:table-cell table:style-name="ce1" office:value-type="string" calcext:value-type="string">
            <text:p>unfoldingWord/gl_database_private</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node-usfm2html-cli</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4T23:44:52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richmahn</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node-usfm2html-cli" xlink:type="simple">https://github.com/unfoldingWord/node-usfm2html-cli</text:a></text:p>
          </table:table-cell>
          <table:table-cell table:style-name="ce4" office:value-type="string" calcext:value-type="string">
            <text:p>2026-05-14T23:44:56Z</text:p>
          </table:table-cell>
          <table:table-cell table:style-name="ce4"/>
          <table:table-cell table:style-name="ce1" office:value-type="string" calcext:value-type="string">
            <text:p>unfoldingWord/node-usfm2html-cli</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oce-print-preview-tool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12-13T23:46:1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oce-print-preview-tools" xlink:type="simple">https://github.com/unfoldingWord/oce-print-preview-tools</text:a></text:p>
          </table:table-cell>
          <table:table-cell table:style-name="ce4" office:value-type="string" calcext:value-type="string">
            <text:p>2023-12-14T00:56:44Z</text:p>
          </table:table-cell>
          <table:table-cell table:style-name="ce4"/>
          <table:table-cell table:style-name="ce1" office:value-type="string" calcext:value-type="string">
            <text:p>unfoldingWord/oce-print-preview-tool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populate-gl-quote-rcl</text:p>
          </table:table-cell>
          <table:table-cell table:style-name="ce1" office:value-type="string" calcext:value-type="string">
            <text:p>unfoldingWord-box3</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2-09-23T16:15:56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box3/populate-gl-quote-rcl" xlink:type="simple">https://github.com/unfoldingWord-box3/populate-gl-quote-rcl</text:a></text:p>
          </table:table-cell>
          <table:table-cell table:style-name="ce4" office:value-type="string" calcext:value-type="string">
            <text:p>2022-09-23T16:15:55Z</text:p>
          </table:table-cell>
          <table:table-cell table:style-name="ce4"/>
          <table:table-cell table:style-name="ce1" office:value-type="string" calcext:value-type="string">
            <text:p>unfoldingWord-box3/populate-gl-quote-rcl</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alesforce-aplos-integration</text:p>
          </table:table-cell>
          <table:table-cell table:style-name="ce1" office:value-type="string" calcext:value-type="string">
            <text:p>unfoldingWord</text:p>
          </table:table-cell>
          <table:table-cell table:style-name="ce1" office:value-type="string" calcext:value-type="string">
            <text:p>Apex</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6-25T16:11:01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MrRosewood', 'g-reichert', 'kmace16',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alesforce-aplos-integration" xlink:type="simple">https://github.com/unfoldingWord/salesforce-aplos-integration</text:a></text:p>
          </table:table-cell>
          <table:table-cell table:style-name="ce4" office:value-type="string" calcext:value-type="string">
            <text:p>2023-08-29T19:51:55Z</text:p>
          </table:table-cell>
          <table:table-cell table:style-name="ce4"/>
          <table:table-cell table:style-name="ce1" office:value-type="string" calcext:value-type="string">
            <text:p>unfoldingWord/salesforce-aplos-integration</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alesforce-core</text:p>
          </table:table-cell>
          <table:table-cell table:style-name="ce1" office:value-type="string" calcext:value-type="string">
            <text:p>unfoldingWord</text:p>
          </table:table-cell>
          <table:table-cell table:style-name="ce1" office:value-type="string" calcext:value-type="string">
            <text:p>JavaScript</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8-28T14:52:21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MrRosewood', 'dhallsim', 'g-reichert', 'kmace16', 'UW-MountainPoint', 'MPkadarby1', 'atrancandoris', 'hallienicholas', 'Derek Hall', 'Jeff Clark', '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alesforce-core" xlink:type="simple">https://github.com/unfoldingWord/salesforce-core</text:a></text:p>
          </table:table-cell>
          <table:table-cell table:style-name="ce4" office:value-type="string" calcext:value-type="string">
            <text:p>2024-08-28T14:52:21Z</text:p>
          </table:table-cell>
          <table:table-cell table:style-name="ce4"/>
          <table:table-cell table:style-name="ce1" office:value-type="string" calcext:value-type="string">
            <text:p>unfoldingWord/salesforce-core</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alesforce-donation-page-package-core</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1T18:43:25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alesforce-donation-page-package-core" xlink:type="simple">https://github.com/unfoldingWord/salesforce-donation-page-package-core</text:a></text:p>
          </table:table-cell>
          <table:table-cell table:style-name="ce4" office:value-type="string" calcext:value-type="string">
            <text:p>2020-05-11T18:43:28Z</text:p>
          </table:table-cell>
          <table:table-cell table:style-name="ce4"/>
          <table:table-cell table:style-name="ce1" office:value-type="string" calcext:value-type="string">
            <text:p>unfoldingWord/salesforce-donation-page-package-core</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alesforce-donation-page-package-customization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05-11T18:43:55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jag377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salesforce-donation-page-package-customizations" xlink:type="simple">https://github.com/unfoldingWord/salesforce-donation-page-package-customizations</text:a></text:p>
          </table:table-cell>
          <table:table-cell table:style-name="ce4" office:value-type="string" calcext:value-type="string">
            <text:p>2020-05-11T18:43:58Z</text:p>
          </table:table-cell>
          <table:table-cell table:style-name="ce4"/>
          <table:table-cell table:style-name="ce1" office:value-type="string" calcext:value-type="string">
            <text:p>unfoldingWord/salesforce-donation-page-package-customization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shiny-app-outputs-report</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01-29T15:53:53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shiny-app-outputs-report" xlink:type="simple">https://github.com/unfoldingWord/shiny-app-outputs-report</text:a></text:p>
          </table:table-cell>
          <table:table-cell table:style-name="ce4" office:value-type="string" calcext:value-type="string">
            <text:p>2024-01-29T17:00:31Z</text:p>
          </table:table-cell>
          <table:table-cell table:style-name="ce4"/>
          <table:table-cell table:style-name="ce1" office:value-type="string" calcext:value-type="string">
            <text:p>unfoldingWord/shiny-app-outputs-report</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c-create-2-poc</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0-12-22T20:44:24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PhotoNomad0</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create-2-poc" xlink:type="simple">https://github.com/unfoldingWord/tc-create-2-poc</text:a></text:p>
          </table:table-cell>
          <table:table-cell table:style-name="ce4" office:value-type="string" calcext:value-type="string">
            <text:p>2020-12-17T16:24:38Z</text:p>
          </table:table-cell>
          <table:table-cell table:style-name="ce4"/>
          <table:table-cell table:style-name="ce1" office:value-type="string" calcext:value-type="string">
            <text:p>unfoldingWord/tc-create-2-poc</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c-website</text:p>
          </table:table-cell>
          <table:table-cell table:style-name="ce1" office:value-type="string" calcext:value-type="string">
            <text:p>unfoldingWord</text:p>
          </table:table-cell>
          <table:table-cell table:style-name="ce1" office:value-type="string" calcext:value-type="string">
            <text:p>CSS</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4-17T14:26:58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Birch Champeon', 'google-labs-jules[bot]', 'birchamp']</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c-website" xlink:type="simple">https://github.com/unfoldingWord/tc-website</text:a></text:p>
          </table:table-cell>
          <table:table-cell table:style-name="ce4" office:value-type="string" calcext:value-type="string">
            <text:p>2026-04-17T14:27:01Z</text:p>
          </table:table-cell>
          <table:table-cell table:style-name="ce4"/>
          <table:table-cell table:style-name="ce1" office:value-type="string" calcext:value-type="string">
            <text:p>unfoldingWord/tc-website</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erraform</text:p>
          </table:table-cell>
          <table:table-cell table:style-name="ce1" office:value-type="string" calcext:value-type="string">
            <text:p>unfoldingWord</text:p>
          </table:table-cell>
          <table:table-cell table:style-name="ce1" office:value-type="string" calcext:value-type="string">
            <text:p>HC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3-07-11T09:20:37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yakob-aleksandrovich</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terraform" xlink:type="simple">https://github.com/unfoldingWord/terraform</text:a></text:p>
          </table:table-cell>
          <table:table-cell table:style-name="ce4" office:value-type="string" calcext:value-type="string">
            <text:p>2023-07-04T15:33:16Z</text:p>
          </table:table-cell>
          <table:table-cell table:style-name="ce4"/>
          <table:table-cell table:style-name="ce1" office:value-type="string" calcext:value-type="string">
            <text:p>unfoldingWord/terraform</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tn-tsv7-to-tsv8</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4-11-14T10:49:22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tn-tsv7-to-tsv8" xlink:type="simple">https://github.com/unfoldingWord/tn-tsv7-to-tsv8</text:a></text:p>
          </table:table-cell>
          <table:table-cell table:style-name="ce4" office:value-type="string" calcext:value-type="string">
            <text:p>2024-11-14T10:49:22Z</text:p>
          </table:table-cell>
          <table:table-cell table:style-name="ce4"/>
          <table:table-cell table:style-name="ce1" office:value-type="string" calcext:value-type="string">
            <text:p>unfoldingWord/tn-tsv7-to-tsv8</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fw_redirects</text:p>
          </table:table-cell>
          <table:table-cell table:style-name="ce1" office:value-type="string" calcext:value-type="string">
            <text:p>unfoldingWord</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6-02T19:41:29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sethstoll3', 'yakob-aleksandrovich', 'jag3773', 'kellyvivancox', 'richmahn', 'drcox63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fw_redirects" xlink:type="simple">https://github.com/unfoldingWord/ufw_redirects</text:a></text:p>
          </table:table-cell>
          <table:table-cell table:style-name="ce4" office:value-type="string" calcext:value-type="string">
            <text:p>2026-06-02T19:41:33Z</text:p>
          </table:table-cell>
          <table:table-cell table:style-name="ce4"/>
          <table:table-cell table:style-name="ce1" office:value-type="string" calcext:value-type="string">
            <text:p>unfoldingWord/ufw_redirect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Bible-Maps</text:p>
          </table:table-cell>
          <table:table-cell table:style-name="ce1" office:value-type="string" calcext:value-type="string">
            <text:p>unfoldingWord-dev</text:p>
          </table:table-cell>
          <table:table-cell table:style-name="ce1"/>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15-11-18T15:24:04Z</text:p>
          </table:table-cell>
          <table:table-cell table:style-name="ce1"/>
          <table:table-cell table:style-name="ce4"/>
          <table:table-cell table:style-name="ce4" office:value-type="float" office:value="5" calcext:value-type="float">
            <text:p>5</text:p>
          </table:table-cell>
          <table:table-cell table:style-name="ce4" office:value-type="float" office:value="0" calcext:value-type="float">
            <text:p>0</text:p>
          </table:table-cell>
          <table:table-cell table:style-name="ce1" table:number-columns-repeated="9"/>
          <table:table-cell table:number-columns-repeated="2" table:style-name="ce1" office:value-type="float" office:value="0" calcext:value-type="float">
            <text:p>0</text:p>
          </table:table-cell>
          <table:table-cell table:style-name="ce5" office:value-type="string" calcext:value-type="string">
            <text:p><text:a xlink:href="https://github.com/unfoldingWord-dev/uW-Bible-Maps" xlink:type="simple">https://github.com/unfoldingWord-dev/uW-Bible-Maps</text:a></text:p>
          </table:table-cell>
          <table:table-cell table:style-name="ce4" office:value-type="string" calcext:value-type="string">
            <text:p>2015-11-18T15:24:04Z</text:p>
          </table:table-cell>
          <table:table-cell table:style-name="ce4"/>
          <table:table-cell table:style-name="ce1" office:value-type="string" calcext:value-type="string">
            <text:p>unfoldingWord-dev/uW-Bible-Map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dev-skills</text:p>
          </table:table-cell>
          <table:table-cell table:style-name="ce1" office:value-type="string" calcext:value-type="string">
            <text:p>unfoldingWord</text:p>
          </table:table-cell>
          <table:table-cell table:style-name="ce1" office:value-type="string" calcext:value-type="string">
            <text:p>Shel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11T16:50:23Z</text:p>
          </table:table-cell>
          <table:table-cell table:style-name="ce1"/>
          <table:table-cell table:style-name="ce4"/>
          <table:table-cell table:number-columns-repeated="2" table:style-name="ce4" office:value-type="float" office:value="0" calcext:value-type="float">
            <text:p>0</text:p>
          </table:table-cell>
          <table:table-cell table:style-name="ce1" table:number-columns-repeated="8"/>
          <table:table-cell table:style-name="ce1" office:value-type="string" calcext:value-type="string">
            <text:p>['claude', 'sethstoll3']</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dev-skills" xlink:type="simple">https://github.com/unfoldingWord/uw-dev-skills</text:a></text:p>
          </table:table-cell>
          <table:table-cell table:style-name="ce4" office:value-type="string" calcext:value-type="string">
            <text:p>2026-05-11T16:50:29Z</text:p>
          </table:table-cell>
          <table:table-cell table:style-name="ce4"/>
          <table:table-cell table:style-name="ce1" office:value-type="string" calcext:value-type="string">
            <text:p>unfoldingWord/uw-dev-skill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uw-zulip-mcp</text:p>
          </table:table-cell>
          <table:table-cell table:style-name="ce1" office:value-type="string" calcext:value-type="string">
            <text:p>unfoldingWord</text:p>
          </table:table-cell>
          <table:table-cell table:style-name="ce1" office:value-type="string" calcext:value-type="string">
            <text:p>Python</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5-29T15:05:23Z</text:p>
          </table:table-cell>
          <table:table-cell table:style-name="ce1"/>
          <table:table-cell table:style-name="ce4"/>
          <table:table-cell table:style-name="ce4" office:value-type="float" office:value="7" calcext:value-type="float">
            <text:p>7</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akougkas', 'nlightcc', 'sethstoll3', 'sethstoll', 'yakob-aleksandrovich', 'klutchell']</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uw-zulip-mcp" xlink:type="simple">https://github.com/unfoldingWord/uw-zulip-mcp</text:a></text:p>
          </table:table-cell>
          <table:table-cell table:style-name="ce4" office:value-type="string" calcext:value-type="string">
            <text:p>2026-05-29T15:06:34Z</text:p>
          </table:table-cell>
          <table:table-cell table:style-name="ce4"/>
          <table:table-cell table:style-name="ce1" office:value-type="string" calcext:value-type="string">
            <text:p>unfoldingWord/uw-zulip-mcp</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table-cell table:style-name="ce1"/>
          <table:table-cell table:style-name="ce4" table:number-columns-repeated="2"/>
          <table:table-cell table:style-name="ce1" office:value-type="string" calcext:value-type="string">
            <text:p>zulip-files</text:p>
          </table:table-cell>
          <table:table-cell table:style-name="ce1" office:value-type="string" calcext:value-type="string">
            <text:p>unfoldingWord</text:p>
          </table:table-cell>
          <table:table-cell table:style-name="ce1" office:value-type="string" calcext:value-type="string">
            <text:p>HTML</text:p>
          </table:table-cell>
          <table:table-cell table:style-name="ce1" table:formula="of:=FALSE()" office:value-type="float" office:value="0" calcext:value-type="float">
            <text:p>0</text:p>
          </table:table-cell>
          <table:table-cell table:style-name="ce1" table:formula="of:=FALSE()" office:value-type="float" office:value="0" calcext:value-type="float">
            <text:p>0</text:p>
          </table:table-cell>
          <table:table-cell table:style-name="ce1" office:value-type="string" calcext:value-type="string">
            <text:p>2026-02-21T13:15:07Z</text:p>
          </table:table-cell>
          <table:table-cell table:style-name="ce1"/>
          <table:table-cell table:style-name="ce4"/>
          <table:table-cell table:style-name="ce4" office:value-type="float" office:value="3" calcext:value-type="float">
            <text:p>3</text:p>
          </table:table-cell>
          <table:table-cell table:style-name="ce4" office:value-type="float" office:value="0" calcext:value-type="float">
            <text:p>0</text:p>
          </table:table-cell>
          <table:table-cell table:style-name="ce1" table:number-columns-repeated="8"/>
          <table:table-cell table:style-name="ce1" office:value-type="string" calcext:value-type="string">
            <text:p>nlightcc</text:p>
          </table:table-cell>
          <table:table-cell table:number-columns-repeated="2" table:style-name="ce1" office:value-type="float" office:value="0" calcext:value-type="float">
            <text:p>0</text:p>
          </table:table-cell>
          <table:table-cell table:style-name="ce5" office:value-type="string" calcext:value-type="string">
            <text:p><text:a xlink:href="https://github.com/unfoldingWord/zulip-files" xlink:type="simple">https://github.com/unfoldingWord/zulip-files</text:a></text:p>
          </table:table-cell>
          <table:table-cell table:style-name="ce4" office:value-type="string" calcext:value-type="string">
            <text:p>2026-02-21T13:15:10Z</text:p>
          </table:table-cell>
          <table:table-cell table:style-name="ce4"/>
          <table:table-cell table:style-name="ce1" office:value-type="string" calcext:value-type="string">
            <text:p>unfoldingWord/zulip-files</text:p>
          </table:table-cell>
          <table:table-cell table:style-name="ce4" office:value-type="string" calcext:value-type="string">
            <text:p>5-Protected private</text:p>
          </table:table-cell>
          <table:table-cell table:style-name="ce1" office:value-type="string" calcext:value-type="string">
            <text:p>Repository has no last commit date — likely a private or protected repository with restricted access.</text:p>
          </table:table-cell>
          <table:table-cell table:style-name="ce4"/>
          <table:table-cell table:style-name="ce1"/>
          <table:table-cell table:number-columns-repeated="992"/>
        </table:table-row>
        <table:table-row table:style-name="ro1" table:number-rows-repeated="452">
          <table:table-cell table:style-name="ce4" table:number-columns-repeated="3"/>
          <table:table-cell table:number-columns-repeated="23"/>
          <table:table-cell table:style-name="ce7"/>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Keep" table:style-name="ta2">
        <table:table-column table:style-name="co2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Trash" table:style-name="ta3">
        <table:table-column table:style-name="co2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ce style:name="Arial Unicode MS1"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22">00/00/0000</text:date>, <text:time style:data-style-name="N2" text:time-value="15:11:51.62563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positories" style:display-name="PageStyle_Reposito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Keep" style:display-name="PageStyle_Keep" style:page-layout-name="Mpm4">
      <style:header style:display="false"/>
      <style:header-left style:display="false"/>
      <style:header-first style:display="false"/>
      <style:footer style:display="false"/>
      <style:footer-left style:display="false"/>
      <style:footer-first style:display="false"/>
    </style:master-page>
    <style:master-page style:name="PageStyle_5f_Trash" style:display-name="PageStyle_Trash"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MacOSX_AARCH64 LibreOffice_project/5cbfd1ab6520636bb5f7b99185aa69bd7456825d</meta:generator>
    <meta:document-statistic meta:table-count="3" meta:cell-count="10721" meta:object-count="0"/>
  </office:meta>
</office:document-meta>
</file>