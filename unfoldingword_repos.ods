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manifest>
</file>

<file path=content.xml><?xml version="1.0" encoding="utf-8"?>
<office:document-content xmlns:office="urn:oasis:names:tc:opendocument:xmlns:office:1.0" xmlns:table="urn:oasis:names:tc:opendocument:xmlns:table:1.0" xmlns:text="urn:oasis:names:tc:opendocument:xmlns:text:1.0" office:version="1.2">
  <office:body>
    <office:spreadsheet>
      <table:table table:name="Repositories">
        <table:table-row>
          <table:table-cell office:value-type="string">
            <text:p>repo name</text:p>
          </table:table-cell>
          <table:table-cell office:value-type="string">
            <text:p>organization name</text:p>
          </table:table-cell>
          <table:table-cell office:value-type="string">
            <text:p>language</text:p>
          </table:table-cell>
          <table:table-cell office:value-type="string">
            <text:p>archived</text:p>
          </table:table-cell>
          <table:table-cell office:value-type="string">
            <text:p>is fork</text:p>
          </table:table-cell>
          <table:table-cell office:value-type="string">
            <text:p>pushed at</text:p>
          </table:table-cell>
          <table:table-cell office:value-type="string">
            <text:p>last commit date</text:p>
          </table:table-cell>
          <table:table-cell office:value-type="string">
            <text:p>last release date</text:p>
          </table:table-cell>
          <table:table-cell office:value-type="string">
            <text:p>open issues count</text:p>
          </table:table-cell>
          <table:table-cell office:value-type="string">
            <text:p>open prs count</text:p>
          </table:table-cell>
          <table:table-cell office:value-type="string">
            <text:p>commit count</text:p>
          </table:table-cell>
          <table:table-cell office:value-type="string">
            <text:p>git submodules</text:p>
          </table:table-cell>
          <table:table-cell office:value-type="string">
            <text:p>npmjs package name</text:p>
          </table:table-cell>
          <table:table-cell office:value-type="string">
            <text:p>npm is deprecated</text:p>
          </table:table-cell>
          <table:table-cell office:value-type="string">
            <text:p>npmjs downloads last year</text:p>
          </table:table-cell>
          <table:table-cell office:value-type="string">
            <text:p>npmjs last published</text:p>
          </table:table-cell>
          <table:table-cell office:value-type="string">
            <text:p>npmjs used by</text:p>
          </table:table-cell>
          <table:table-cell office:value-type="string">
            <text:p>npmjs uses</text:p>
          </table:table-cell>
          <table:table-cell office:value-type="string">
            <text:p>github dependents</text:p>
          </table:table-cell>
          <table:table-cell office:value-type="string">
            <text:p>github contributors</text:p>
          </table:table-cell>
          <table:table-cell office:value-type="string">
            <text:p>github release count</text:p>
          </table:table-cell>
          <table:table-cell office:value-type="string">
            <text:p>github downloads</text:p>
          </table:table-cell>
          <table:table-cell office:value-type="string">
            <text:p>repo url</text:p>
          </table:table-cell>
          <table:table-cell office:value-type="string">
            <text:p>last edit date</text:p>
          </table:table-cell>
        </table:table-row>
        <table:table-row>
          <table:table-cell office:value-type="string">
            <text:p>wordMAP-usfm</text:p>
          </table:table-cell>
          <table:table-cell office:value-type="string">
            <text:p>unfoldingWord</text:p>
          </table:table-cell>
          <table:table-cell office:value-type="string">
            <text:p>TypeScript</text:p>
          </table:table-cell>
          <table:table-cell office:value-type="string">
            <text:p>True</text:p>
          </table:table-cell>
          <table:table-cell office:value-type="string">
            <text:p>False</text:p>
          </table:table-cell>
          <table:table-cell office:value-type="string">
            <text:p>2019-03-05T21:01:50Z</text:p>
          </table:table-cell>
          <table:table-cell office:value-type="string">
            <text:p>2019-03-05T21:01:16Z</text:p>
          </table:table-cell>
          <table:table-cell office:value-type="string">
            <text:p/>
          </table:table-cell>
          <table:table-cell office:value-type="string">
            <text:p>0</text:p>
          </table:table-cell>
          <table:table-cell office:value-type="string">
            <text:p>0</text:p>
          </table:table-cell>
          <table:table-cell office:value-type="string">
            <text:p>85</text:p>
          </table:table-cell>
          <table:table-cell office:value-type="string">
            <text:p/>
          </table:table-cell>
          <table:table-cell office:value-type="string">
            <text:p>wordmap-usf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wordmap-lexer</text:p>
          </table:table-cell>
          <table:table-cell office:value-type="string">
            <text:p/>
          </table:table-cell>
          <table:table-cell office:value-type="string">
            <text:p>da1nerd, klappy, mannycolon, dependabot-support, bspidel</text:p>
          </table:table-cell>
          <table:table-cell office:value-type="string">
            <text:p>0</text:p>
          </table:table-cell>
          <table:table-cell office:value-type="string">
            <text:p>0</text:p>
          </table:table-cell>
          <table:table-cell office:value-type="string">
            <text:p>https://github.com/unfoldingWord/wordMAP-usfm</text:p>
          </table:table-cell>
          <table:table-cell office:value-type="string">
            <text:p>2026-06-23T11:19:16Z</text:p>
          </table:table-cell>
        </table:table-row>
        <table:table-row>
          <table:table-cell office:value-type="string">
            <text:p>bt-servant-signal-gateway</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23T00:29:54Z</text:p>
          </table:table-cell>
          <table:table-cell office:value-type="string">
            <text:p>2026-06-22T23:06:25Z</text:p>
          </table:table-cell>
          <table:table-cell office:value-type="string">
            <text:p/>
          </table:table-cell>
          <table:table-cell office:value-type="string">
            <text:p>11</text:p>
          </table:table-cell>
          <table:table-cell office:value-type="string">
            <text:p>4</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text:p>
          </table:table-cell>
          <table:table-cell office:value-type="string">
            <text:p>0</text:p>
          </table:table-cell>
          <table:table-cell office:value-type="string">
            <text:p>0</text:p>
          </table:table-cell>
          <table:table-cell office:value-type="string">
            <text:p>https://github.com/unfoldingWord/bt-servant-signal-gateway</text:p>
          </table:table-cell>
          <table:table-cell office:value-type="string">
            <text:p>2026-06-22T23:06:30Z</text:p>
          </table:table-cell>
        </table:table-row>
        <table:table-row>
          <table:table-cell office:value-type="string">
            <text:p>bp-assistant-skil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20:24:02Z</text:p>
          </table:table-cell>
          <table:table-cell office:value-type="string">
            <text:p>2026-06-22T20:24:00Z</text:p>
          </table:table-cell>
          <table:table-cell office:value-type="string">
            <text:p/>
          </table:table-cell>
          <table:table-cell office:value-type="string">
            <text:p>1</text:p>
          </table:table-cell>
          <table:table-cell office:value-type="string">
            <text:p>0</text:p>
          </table:table-cell>
          <table:table-cell office:value-type="string">
            <text:p>428</text:p>
          </table:table-cell>
          <table:table-cell office:value-type="string">
            <text:p/>
          </table:table-cell>
          <table:table-cell office:value-type="string">
            <text:p>cskillbp-prompt-over-cod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W Bot, deferredreward, benjamin-test, stephenwunrow, Nightly Issue Bot</text:p>
          </table:table-cell>
          <table:table-cell office:value-type="string">
            <text:p>0</text:p>
          </table:table-cell>
          <table:table-cell office:value-type="string">
            <text:p>0</text:p>
          </table:table-cell>
          <table:table-cell office:value-type="string">
            <text:p>https://github.com/unfoldingWord/bp-assistant-skills</text:p>
          </table:table-cell>
          <table:table-cell office:value-type="string">
            <text:p>2026-06-22T20:24:25Z</text:p>
          </table:table-cell>
        </table:table-row>
        <table:table-row>
          <table:table-cell office:value-type="string">
            <text:p>budget-report</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6-06-22T20:14:05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budget-report</text:p>
          </table:table-cell>
          <table:table-cell office:value-type="string">
            <text:p>2026-06-22T20:14:09Z</text:p>
          </table:table-cell>
        </table:table-row>
        <table:table-row>
          <table:table-cell office:value-type="string">
            <text:p>meeting-issues</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6-06-22T17:53:29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 LITSON LAMBERT</text:p>
          </table:table-cell>
          <table:table-cell office:value-type="string">
            <text:p>0</text:p>
          </table:table-cell>
          <table:table-cell office:value-type="string">
            <text:p>0</text:p>
          </table:table-cell>
          <table:table-cell office:value-type="string">
            <text:p>https://github.com/unfoldingWord/meeting-issues</text:p>
          </table:table-cell>
          <table:table-cell office:value-type="string">
            <text:p>2026-06-22T17:53:33Z</text:p>
          </table:table-cell>
        </table:table-row>
        <table:table-row>
          <table:table-cell office:value-type="string">
            <text:p>translation-helps-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23T00:29:35Z</text:p>
          </table:table-cell>
          <table:table-cell office:value-type="string">
            <text:p>2026-06-22T15:03:05Z</text:p>
          </table:table-cell>
          <table:table-cell office:value-type="string">
            <text:p/>
          </table:table-cell>
          <table:table-cell office:value-type="string">
            <text:p>12</text:p>
          </table:table-cell>
          <table:table-cell office:value-type="string">
            <text:p>2</text:p>
          </table:table-cell>
          <table:table-cell office:value-type="string">
            <text:p>839</text:p>
          </table:table-cell>
          <table:table-cell office:value-type="string">
            <text:p/>
          </table:table-cell>
          <table:table-cell office:value-type="string">
            <text:p>translation-helps-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ranslation-helps-mcp</text:p>
          </table:table-cell>
          <table:table-cell office:value-type="string">
            <text:p>klappy, azrasgdc, abelpz, cursoragent, ILindsley, IanLindsley</text:p>
          </table:table-cell>
          <table:table-cell office:value-type="string">
            <text:p>0</text:p>
          </table:table-cell>
          <table:table-cell office:value-type="string">
            <text:p>0</text:p>
          </table:table-cell>
          <table:table-cell office:value-type="string">
            <text:p>https://github.com/unfoldingWord/translation-helps-mcp</text:p>
          </table:table-cell>
          <table:table-cell office:value-type="string">
            <text:p>2026-06-22T15:05:22Z</text:p>
          </table:table-cell>
        </table:table-row>
        <table:table-row>
          <table:table-cell office:value-type="string">
            <text:p>bt-servant-site</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6-06-22T13:50:36Z</text:p>
          </table:table-cell>
          <table:table-cell office:value-type="string">
            <text:p>2026-06-22T13:50:35Z</text:p>
          </table:table-cell>
          <table:table-cell office:value-type="string">
            <text:p/>
          </table:table-cell>
          <table:table-cell office:value-type="string">
            <text:p>1</text:p>
          </table:table-cell>
          <table:table-cell office:value-type="string">
            <text:p>0</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cyJ, sethstoll3</text:p>
          </table:table-cell>
          <table:table-cell office:value-type="string">
            <text:p>1</text:p>
          </table:table-cell>
          <table:table-cell office:value-type="string">
            <text:p>0</text:p>
          </table:table-cell>
          <table:table-cell office:value-type="string">
            <text:p>https://github.com/unfoldingWord/bt-servant-site</text:p>
          </table:table-cell>
          <table:table-cell office:value-type="string">
            <text:p>2026-06-22T13:51:05Z</text:p>
          </table:table-cell>
        </table:table-row>
        <table:table-row>
          <table:table-cell office:value-type="string">
            <text:p>loki-export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5-08T16:01:29Z</text:p>
          </table:table-cell>
          <table:table-cell office:value-type="string">
            <text:p>2026-05-08T16:01:24Z</text:p>
          </table:table-cell>
          <table:table-cell office:value-type="string">
            <text:p/>
          </table:table-cell>
          <table:table-cell office:value-type="string">
            <text:p>0</text:p>
          </table:table-cell>
          <table:table-cell office:value-type="string">
            <text:p>0</text:p>
          </table:table-cell>
          <table:table-cell office:value-type="string">
            <text:p>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elgohr</text:p>
          </table:table-cell>
          <table:table-cell office:value-type="string">
            <text:p>0</text:p>
          </table:table-cell>
          <table:table-cell office:value-type="string">
            <text:p>0</text:p>
          </table:table-cell>
          <table:table-cell office:value-type="string">
            <text:p>https://github.com/unfoldingWord/loki-exporter</text:p>
          </table:table-cell>
          <table:table-cell office:value-type="string">
            <text:p>2026-06-22T06:33:59Z</text:p>
          </table:table-cell>
        </table:table-row>
        <table:table-row>
          <table:table-cell office:value-type="string">
            <text:p>gateway-admi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04:03:54Z</text:p>
          </table:table-cell>
          <table:table-cell office:value-type="string">
            <text:p>2026-06-22T04:03:48Z</text:p>
          </table:table-cell>
          <table:table-cell office:value-type="string">
            <text:p>2024-10-21T20:57:32Z</text:p>
          </table:table-cell>
          <table:table-cell office:value-type="string">
            <text:p>43</text:p>
          </table:table-cell>
          <table:table-cell office:value-type="string">
            <text:p>0</text:p>
          </table:table-cell>
          <table:table-cell office:value-type="string">
            <text:p>347</text:p>
          </table:table-cell>
          <table:table-cell office:value-type="string">
            <text:p/>
          </table:table-cell>
          <table:table-cell office:value-type="string">
            <text:p>gateway-adm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branch-merger, gitea-react-toolkit, markdown-translatable, resource-workspace-rcl, scripture-resources-rcl, single-scripture-rcl, tc-ui-toolkit, translation-helps-rcl, uw-content-validation, uw-tsv-parser, word-aligner</text:p>
          </table:table-cell>
          <table:table-cell office:value-type="string">
            <text:p/>
          </table:table-cell>
          <table:table-cell office:value-type="string">
            <text:p>mandolyte, richmahn, superdav42, theNerd247, mannycolon, birchamp, abelpz, Joel-C-Johnson, PhotoNomad0</text:p>
          </table:table-cell>
          <table:table-cell office:value-type="string">
            <text:p>7</text:p>
          </table:table-cell>
          <table:table-cell office:value-type="string">
            <text:p>0</text:p>
          </table:table-cell>
          <table:table-cell office:value-type="string">
            <text:p>https://github.com/unfoldingWord/gateway-admin</text:p>
          </table:table-cell>
          <table:table-cell office:value-type="string">
            <text:p>2026-06-22T04:03:58Z</text:p>
          </table:table-cell>
        </table:table-row>
        <table:table-row>
          <table:table-cell office:value-type="string">
            <text:p>uw-content-validati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04:01:57Z</text:p>
          </table:table-cell>
          <table:table-cell office:value-type="string">
            <text:p>2026-06-22T03:57:41Z</text:p>
          </table:table-cell>
          <table:table-cell office:value-type="string">
            <text:p/>
          </table:table-cell>
          <table:table-cell office:value-type="string">
            <text:p>81</text:p>
          </table:table-cell>
          <table:table-cell office:value-type="string">
            <text:p>3</text:p>
          </table:table-cell>
          <table:table-cell office:value-type="string">
            <text:p>699</text:p>
          </table:table-cell>
          <table:table-cell office:value-type="string">
            <text:p/>
          </table:table-cell>
          <table:table-cell office:value-type="string">
            <text:p>uw-content-validation</text:p>
          </table:table-cell>
          <table:table-cell office:value-type="string">
            <text:p>False</text:p>
          </table:table-cell>
          <table:table-cell office:value-type="string">
            <text:p>2264</text:p>
          </table:table-cell>
          <table:table-cell office:value-type="string">
            <text:p>2026-06-22T04:01:52.034Z</text:p>
          </table:table-cell>
          <table:table-cell office:value-type="string">
            <text:p>gateway-admin, tc-create-app, catalog-next-toolkit, content-validation-app</text:p>
          </table:table-cell>
          <table:table-cell office:value-type="string">
            <text:p>usfm-js</text:p>
          </table:table-cell>
          <table:table-cell office:value-type="string">
            <text:p>unfoldingWord/gateway-admin, unfoldingWord/tc-create-app</text:p>
          </table:table-cell>
          <table:table-cell office:value-type="string">
            <text:p>RobH123, mandolyte, PhotoNomad0, richmahn, dependabot[bot], jag3773, ancientTexts-net</text:p>
          </table:table-cell>
          <table:table-cell office:value-type="string">
            <text:p>0</text:p>
          </table:table-cell>
          <table:table-cell office:value-type="string">
            <text:p>0</text:p>
          </table:table-cell>
          <table:table-cell office:value-type="string">
            <text:p>https://github.com/unfoldingWord/uw-content-validation</text:p>
          </table:table-cell>
          <table:table-cell office:value-type="string">
            <text:p>2026-06-22T03:58:05Z</text:p>
          </table:table-cell>
        </table:table-row>
        <table:table-row>
          <table:table-cell office:value-type="string">
            <text:p>bp-assista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0T16:42:10Z</text:p>
          </table:table-cell>
          <table:table-cell office:value-type="string">
            <text:p>2026-06-20T16:42:10Z</text:p>
          </table:table-cell>
          <table:table-cell office:value-type="string">
            <text:p/>
          </table:table-cell>
          <table:table-cell office:value-type="string">
            <text:p>0</text:p>
          </table:table-cell>
          <table:table-cell office:value-type="string">
            <text:p>0</text:p>
          </table:table-cell>
          <table:table-cell office:value-type="string">
            <text:p>507</text:p>
          </table:table-cell>
          <table:table-cell office:value-type="string">
            <text:p/>
          </table:table-cell>
          <table:table-cell office:value-type="string">
            <text:p>zulip-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enjamin-test, deferredreward, stephenwunrow, dependabot[bot], claude, bp-assistant bot</text:p>
          </table:table-cell>
          <table:table-cell office:value-type="string">
            <text:p>0</text:p>
          </table:table-cell>
          <table:table-cell office:value-type="string">
            <text:p>0</text:p>
          </table:table-cell>
          <table:table-cell office:value-type="string">
            <text:p>https://github.com/unfoldingWord/bp-assistant</text:p>
          </table:table-cell>
          <table:table-cell office:value-type="string">
            <text:p>2026-06-20T16:42:15Z</text:p>
          </table:table-cell>
        </table:table-row>
        <table:table-row>
          <table:table-cell office:value-type="string">
            <text:p>bt-servan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8T15:02:07Z</text:p>
          </table:table-cell>
          <table:table-cell office:value-type="string">
            <text:p>2026-06-18T15:01:38Z</text:p>
          </table:table-cell>
          <table:table-cell office:value-type="string">
            <text:p/>
          </table:table-cell>
          <table:table-cell office:value-type="string">
            <text:p>105</text:p>
          </table:table-cell>
          <table:table-cell office:value-type="string">
            <text:p>9</text:p>
          </table:table-cell>
          <table:table-cell office:value-type="string">
            <text:p>238</text:p>
          </table:table-cell>
          <table:table-cell office:value-type="string">
            <text:p/>
          </table:table-cell>
          <table:table-cell office:value-type="string">
            <text:p>bt-servan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 deferredreward, sethstoll3</text:p>
          </table:table-cell>
          <table:table-cell office:value-type="string">
            <text:p>0</text:p>
          </table:table-cell>
          <table:table-cell office:value-type="string">
            <text:p>0</text:p>
          </table:table-cell>
          <table:table-cell office:value-type="string">
            <text:p>https://github.com/unfoldingWord/bt-servant-worker</text:p>
          </table:table-cell>
          <table:table-cell office:value-type="string">
            <text:p>2026-06-18T15:03:36Z</text:p>
          </table:table-cell>
        </table:table-row>
        <table:table-row>
          <table:table-cell office:value-type="string">
            <text:p>bt-servant-web-clien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8T14:44:49Z</text:p>
          </table:table-cell>
          <table:table-cell office:value-type="string">
            <text:p>2026-06-18T14:44:06Z</text:p>
          </table:table-cell>
          <table:table-cell office:value-type="string">
            <text:p/>
          </table:table-cell>
          <table:table-cell office:value-type="string">
            <text:p>7</text:p>
          </table:table-cell>
          <table:table-cell office:value-type="string">
            <text:p>1</text:p>
          </table:table-cell>
          <table:table-cell office:value-type="string">
            <text:p>153</text:p>
          </table:table-cell>
          <table:table-cell office:value-type="string">
            <text:p/>
          </table:table-cell>
          <table:table-cell office:value-type="string">
            <text:p>bt-servant-web-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 sethstoll3</text:p>
          </table:table-cell>
          <table:table-cell office:value-type="string">
            <text:p>0</text:p>
          </table:table-cell>
          <table:table-cell office:value-type="string">
            <text:p>0</text:p>
          </table:table-cell>
          <table:table-cell office:value-type="string">
            <text:p>https://github.com/unfoldingWord/bt-servant-web-client</text:p>
          </table:table-cell>
          <table:table-cell office:value-type="string">
            <text:p>2026-06-18T14:44:48Z</text:p>
          </table:table-cell>
        </table:table-row>
        <table:table-row>
          <table:table-cell office:value-type="string">
            <text:p>cyber-security-repor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18T09:01:31Z</text:p>
          </table:table-cell>
          <table:table-cell office:value-type="string">
            <text:p>2026-06-18T09:01:18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cyber-security-report</text:p>
          </table:table-cell>
          <table:table-cell office:value-type="string">
            <text:p>2026-06-18T09:01:44Z</text:p>
          </table:table-cell>
        </table:table-row>
        <table:table-row>
          <table:table-cell office:value-type="string">
            <text:p>bt-servant-telegram-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17T21:02:59Z</text:p>
          </table:table-cell>
          <table:table-cell office:value-type="string">
            <text:p>2026-06-17T21:01:39Z</text:p>
          </table:table-cell>
          <table:table-cell office:value-type="string">
            <text:p/>
          </table:table-cell>
          <table:table-cell office:value-type="string">
            <text:p>2</text:p>
          </table:table-cell>
          <table:table-cell office:value-type="string">
            <text:p>0</text:p>
          </table:table-cell>
          <table:table-cell office:value-type="string">
            <text:p>47</text:p>
          </table:table-cell>
          <table:table-cell office:value-type="string">
            <text:p/>
          </table:table-cell>
          <table:table-cell office:value-type="string">
            <text:p>bt-servant-telegram-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nisArger/bt-servant-telegram-gateway</text:p>
          </table:table-cell>
          <table:table-cell office:value-type="string">
            <text:p>DenisArger, IanLindsley, claude, ILindsley</text:p>
          </table:table-cell>
          <table:table-cell office:value-type="string">
            <text:p>0</text:p>
          </table:table-cell>
          <table:table-cell office:value-type="string">
            <text:p>0</text:p>
          </table:table-cell>
          <table:table-cell office:value-type="string">
            <text:p>https://github.com/unfoldingWord/bt-servant-telegram-gateway</text:p>
          </table:table-cell>
          <table:table-cell office:value-type="string">
            <text:p>2026-06-17T21:01:45Z</text:p>
          </table:table-cell>
        </table:table-row>
        <table:table-row>
          <table:table-cell office:value-type="string">
            <text:p>tc-tsv-convert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6-06-17T19:19:57Z</text:p>
          </table:table-cell>
          <table:table-cell office:value-type="string">
            <text:p>2026-06-17T19:19:57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tsv-conver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tsv-converter</text:p>
          </table:table-cell>
          <table:table-cell office:value-type="string">
            <text:p>2026-06-17T19:20:15Z</text:p>
          </table:table-cell>
        </table:table-row>
        <table:table-row>
          <table:table-cell office:value-type="string">
            <text:p>bt-servant-whatsapp-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7T17:56:52Z</text:p>
          </table:table-cell>
          <table:table-cell office:value-type="string">
            <text:p>2026-06-17T17:56:48Z</text:p>
          </table:table-cell>
          <table:table-cell office:value-type="string">
            <text:p/>
          </table:table-cell>
          <table:table-cell office:value-type="string">
            <text:p>9</text:p>
          </table:table-cell>
          <table:table-cell office:value-type="string">
            <text:p>0</text:p>
          </table:table-cell>
          <table:table-cell office:value-type="string">
            <text:p>40</text:p>
          </table:table-cell>
          <table:table-cell office:value-type="string">
            <text:p/>
          </table:table-cell>
          <table:table-cell office:value-type="string">
            <text:p>bt-servant-whatsapp-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0</text:p>
          </table:table-cell>
          <table:table-cell office:value-type="string">
            <text:p>0</text:p>
          </table:table-cell>
          <table:table-cell office:value-type="string">
            <text:p>https://github.com/unfoldingWord/bt-servant-whatsapp-gateway</text:p>
          </table:table-cell>
          <table:table-cell office:value-type="string">
            <text:p>2026-06-17T18:00:01Z</text:p>
          </table:table-cell>
        </table:table-row>
        <table:table-row>
          <table:table-cell office:value-type="string">
            <text:p>claude-skill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17T14:34:2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claude-skills</text:p>
          </table:table-cell>
          <table:table-cell office:value-type="string">
            <text:p>2026-06-17T14:39:48Z</text:p>
          </table:table-cell>
        </table:table-row>
        <table:table-row>
          <table:table-cell office:value-type="string">
            <text:p>tsv-quote-convert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7T06:45:29Z</text:p>
          </table:table-cell>
          <table:table-cell office:value-type="string">
            <text:p>2026-06-17T06:45:25Z</text:p>
          </table:table-cell>
          <table:table-cell office:value-type="string">
            <text:p/>
          </table:table-cell>
          <table:table-cell office:value-type="string">
            <text:p>0</text:p>
          </table:table-cell>
          <table:table-cell office:value-type="string">
            <text:p>0</text:p>
          </table:table-cell>
          <table:table-cell office:value-type="string">
            <text:p>61</text:p>
          </table:table-cell>
          <table:table-cell office:value-type="string">
            <text:p/>
          </table:table-cell>
          <table:table-cell office:value-type="string">
            <text:p>tsv-quote-converters</text:p>
          </table:table-cell>
          <table:table-cell office:value-type="string">
            <text:p/>
          </table:table-cell>
          <table:table-cell office:value-type="string">
            <text:p/>
          </table:table-cell>
          <table:table-cell office:value-type="string">
            <text:p/>
          </table:table-cell>
          <table:table-cell office:value-type="string">
            <text:p>twl-generator, tsv-twl-creation-app, tsv7-tn-cleanup-app, add-gl-quotes-to-tsv-files</text:p>
          </table:table-cell>
          <table:table-cell office:value-type="string">
            <text:p>string-punctuation-tokenizer</text:p>
          </table:table-cell>
          <table:table-cell office:value-type="string">
            <text:p>unfoldingWord/node-cli-add-gl-quotes-to-tsv-files, unfoldingWord/tsv7-tn-cleanup-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quote-converters</text:p>
          </table:table-cell>
          <table:table-cell office:value-type="string">
            <text:p>2026-06-17T06:45:34Z</text:p>
          </table:table-cell>
        </table:table-row>
        <table:table-row>
          <table:table-cell office:value-type="string">
            <text:p>node-twl-gener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21:44:49Z</text:p>
          </table:table-cell>
          <table:table-cell office:value-type="string">
            <text:p>2026-06-16T21:44:35Z</text:p>
          </table:table-cell>
          <table:table-cell office:value-type="string">
            <text:p/>
          </table:table-cell>
          <table:table-cell office:value-type="string">
            <text:p>0</text:p>
          </table:table-cell>
          <table:table-cell office:value-type="string">
            <text:p>0</text:p>
          </table:table-cell>
          <table:table-cell office:value-type="string">
            <text:p>47</text:p>
          </table:table-cell>
          <table:table-cell office:value-type="string">
            <text:p/>
          </table:table-cell>
          <table:table-cell office:value-type="string">
            <text:p>twl-generator</text:p>
          </table:table-cell>
          <table:table-cell office:value-type="string">
            <text:p>False</text:p>
          </table:table-cell>
          <table:table-cell office:value-type="string">
            <text:p>5667</text:p>
          </table:table-cell>
          <table:table-cell office:value-type="string">
            <text:p>2026-06-16T10:00:58.589Z</text:p>
          </table:table-cell>
          <table:table-cell office:value-type="string">
            <text:p>tsv-twl-creation-app</text:p>
          </table:table-cell>
          <table:table-cell office:value-type="string">
            <text:p>tsv-quote-converters, usfm-alignment-remover</text:p>
          </table:table-cell>
          <table:table-cell office:value-type="string">
            <text:p/>
          </table:table-cell>
          <table:table-cell office:value-type="string">
            <text:p>richmahn, rich.mahn@unfoldingword.org</text:p>
          </table:table-cell>
          <table:table-cell office:value-type="string">
            <text:p>0</text:p>
          </table:table-cell>
          <table:table-cell office:value-type="string">
            <text:p>0</text:p>
          </table:table-cell>
          <table:table-cell office:value-type="string">
            <text:p>https://github.com/unfoldingWord/node-twl-generator</text:p>
          </table:table-cell>
          <table:table-cell office:value-type="string">
            <text:p>2026-06-16T21:45:05Z</text:p>
          </table:table-cell>
        </table:table-row>
        <table:table-row>
          <table:table-cell office:value-type="string">
            <text:p>tsv-twl-creation-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10:51:14Z</text:p>
          </table:table-cell>
          <table:table-cell office:value-type="string">
            <text:p>2026-06-16T10:50:55Z</text:p>
          </table:table-cell>
          <table:table-cell office:value-type="string">
            <text:p/>
          </table:table-cell>
          <table:table-cell office:value-type="string">
            <text:p>1</text:p>
          </table:table-cell>
          <table:table-cell office:value-type="string">
            <text:p>0</text:p>
          </table:table-cell>
          <table:table-cell office:value-type="string">
            <text:p>163</text:p>
          </table:table-cell>
          <table:table-cell office:value-type="string">
            <text:p/>
          </table:table-cell>
          <table:table-cell office:value-type="string">
            <text:p>tsv-twl-creati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 twl-generato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twl-creation-app</text:p>
          </table:table-cell>
          <table:table-cell office:value-type="string">
            <text:p>2026-06-16T10:51:18Z</text:p>
          </table:table-cell>
        </table:table-row>
        <table:table-row>
          <table:table-cell office:value-type="string">
            <text:p>bt-servant-admin-porta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3T22:11:43Z</text:p>
          </table:table-cell>
          <table:table-cell office:value-type="string">
            <text:p>2026-06-13T22:11:43Z</text:p>
          </table:table-cell>
          <table:table-cell office:value-type="string">
            <text:p/>
          </table:table-cell>
          <table:table-cell office:value-type="string">
            <text:p>56</text:p>
          </table:table-cell>
          <table:table-cell office:value-type="string">
            <text:p>0</text:p>
          </table:table-cell>
          <table:table-cell office:value-type="string">
            <text:p>144</text:p>
          </table:table-cell>
          <table:table-cell office:value-type="string">
            <text:p/>
          </table:table-cell>
          <table:table-cell office:value-type="string">
            <text:p>bt-servant-admin-porta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sethstoll3, IanLindsley, ILindsley, deferredreward</text:p>
          </table:table-cell>
          <table:table-cell office:value-type="string">
            <text:p>0</text:p>
          </table:table-cell>
          <table:table-cell office:value-type="string">
            <text:p>0</text:p>
          </table:table-cell>
          <table:table-cell office:value-type="string">
            <text:p>https://github.com/unfoldingWord/bt-servant-admin-portal</text:p>
          </table:table-cell>
          <table:table-cell office:value-type="string">
            <text:p>2026-06-13T22:11:48Z</text:p>
          </table:table-cell>
        </table:table-row>
        <table:table-row>
          <table:table-cell office:value-type="string">
            <text:p>translation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3T19:05:56Z</text:p>
          </table:table-cell>
          <table:table-cell office:value-type="string">
            <text:p>2026-06-13T19:05:56Z</text:p>
          </table:table-cell>
          <table:table-cell office:value-type="string">
            <text:p>2026-01-12T14:46:30Z</text:p>
          </table:table-cell>
          <table:table-cell office:value-type="string">
            <text:p>642</text:p>
          </table:table-cell>
          <table:table-cell office:value-type="string">
            <text:p>13</text:p>
          </table:table-cell>
          <table:table-cell office:value-type="string">
            <text:p>13287</text:p>
          </table:table-cell>
          <table:table-cell office:value-type="string">
            <text:p>https://github.com/unfoldingWord/translationWords.git, https://github.com/unfoldingWord/wordAlignment.git, https://github.com/unfoldingWord/translationNotes.git</text:p>
          </table:table-cell>
          <table:table-cell office:value-type="string">
            <text:p>translation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text:p/>
          </table:table-cell>
          <table:table-cell office: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text:p>89</text:p>
          </table:table-cell>
          <table:table-cell office:value-type="string">
            <text:p>13588</text:p>
          </table:table-cell>
          <table:table-cell office:value-type="string">
            <text:p>https://github.com/unfoldingWord/translationCore</text:p>
          </table:table-cell>
          <table:table-cell office:value-type="string">
            <text:p>2026-06-13T19:06:00Z</text:p>
          </table:table-cell>
        </table:table-row>
        <table:table-row>
          <table:table-cell office:value-type="string">
            <text:p>translationNot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2:38Z</text:p>
          </table:table-cell>
          <table:table-cell office:value-type="string">
            <text:p>2026-06-12T12:12:38Z</text:p>
          </table:table-cell>
          <table:table-cell office:value-type="string">
            <text:p/>
          </table:table-cell>
          <table:table-cell office:value-type="string">
            <text:p>16</text:p>
          </table:table-cell>
          <table:table-cell office:value-type="string">
            <text:p>15</text:p>
          </table:table-cell>
          <table:table-cell office:value-type="string">
            <text:p>523</text:p>
          </table:table-cell>
          <table:table-cell office:value-type="string">
            <text:p/>
          </table:table-cell>
          <table:table-cell office:value-type="string">
            <text:p>translationNot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ihoegen, RoyalSix, PhotoNomad0, klappy, cdwhitfield73, Sterling (Jay) Scott, EllDoubleYew, dependabot[bot], ImgBotApp, jag3773, richmahn</text:p>
          </table:table-cell>
          <table:table-cell office:value-type="string">
            <text:p>0</text:p>
          </table:table-cell>
          <table:table-cell office:value-type="string">
            <text:p>0</text:p>
          </table:table-cell>
          <table:table-cell office:value-type="string">
            <text:p>https://github.com/unfoldingWord/translationNotes</text:p>
          </table:table-cell>
          <table:table-cell office:value-type="string">
            <text:p>2026-06-12T12:12:56Z</text:p>
          </table:table-cell>
        </table:table-row>
        <table:table-row>
          <table:table-cell office:value-type="string">
            <text:p>translationWord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1:06Z</text:p>
          </table:table-cell>
          <table:table-cell office:value-type="string">
            <text:p>2026-06-12T12:11:06Z</text:p>
          </table:table-cell>
          <table:table-cell office:value-type="string">
            <text:p>2019-02-06T21:36:33Z</text:p>
          </table:table-cell>
          <table:table-cell office:value-type="string">
            <text:p>17</text:p>
          </table:table-cell>
          <table:table-cell office:value-type="string">
            <text:p>16</text:p>
          </table:table-cell>
          <table:table-cell office:value-type="string">
            <text:p>1113</text:p>
          </table:table-cell>
          <table:table-cell office:value-type="string">
            <text:p/>
          </table:table-cell>
          <table:table-cell office:value-type="string">
            <text:p>translationWo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RoyalSix, PhotoNomad0, ihoegen, klappy, Sterling (Jay) Scott, cdwhitfield73, richmahn, Richard Mahn, dependabot-support, EllDoubleYew, dependabot[bot], bspidel, ImgBotApp, jag3773</text:p>
          </table:table-cell>
          <table:table-cell office:value-type="string">
            <text:p>5</text:p>
          </table:table-cell>
          <table:table-cell office:value-type="string">
            <text:p>0</text:p>
          </table:table-cell>
          <table:table-cell office:value-type="string">
            <text:p>https://github.com/unfoldingWord/translationWords</text:p>
          </table:table-cell>
          <table:table-cell office:value-type="string">
            <text:p>2026-06-12T12:11:14Z</text:p>
          </table:table-cell>
        </table:table-row>
        <table:table-row>
          <table:table-cell office:value-type="string">
            <text:p>wordAlignme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09:25Z</text:p>
          </table:table-cell>
          <table:table-cell office:value-type="string">
            <text:p>2026-06-12T12:09:25Z</text:p>
          </table:table-cell>
          <table:table-cell office:value-type="string">
            <text:p>2019-02-06T21:37:06Z</text:p>
          </table:table-cell>
          <table:table-cell office:value-type="string">
            <text:p>15</text:p>
          </table:table-cell>
          <table:table-cell office:value-type="string">
            <text:p>13</text:p>
          </table:table-cell>
          <table:table-cell office:value-type="string">
            <text:p>1497</text:p>
          </table:table-cell>
          <table:table-cell office:value-type="string">
            <text:p/>
          </table:table-cell>
          <table:table-cell office:value-type="string">
            <text:p>wordAlignm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client, selections, tc-tool, tc-ui-toolkit, usfm-js, word-aligner, wordmap, wordmap-lexer</text:p>
          </table:table-cell>
          <table:table-cell office:value-type="string">
            <text:p/>
          </table:table-cell>
          <table:table-cell office:value-type="string">
            <text:p>da1nerd, mannycolon, PhotoNomad0, RoyalSix, richmahn, klappy, dependabot-support, Sterling (Jay) Scott, Richard Mahn, bspidel, ImgBotApp</text:p>
          </table:table-cell>
          <table:table-cell office:value-type="string">
            <text:p>2</text:p>
          </table:table-cell>
          <table:table-cell office:value-type="string">
            <text:p>0</text:p>
          </table:table-cell>
          <table:table-cell office:value-type="string">
            <text:p>https://github.com/unfoldingWord/wordAlignment</text:p>
          </table:table-cell>
          <table:table-cell office:value-type="string">
            <text:p>2026-06-12T12:09:39Z</text:p>
          </table:table-cell>
        </table:table-row>
        <table:table-row>
          <table:table-cell office:value-type="string">
            <text:p>bt-servant-telemet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0T14:16:52Z</text:p>
          </table:table-cell>
          <table:table-cell office:value-type="string">
            <text:p>2026-06-10T14:14:55Z</text:p>
          </table:table-cell>
          <table:table-cell office:value-type="string">
            <text:p/>
          </table:table-cell>
          <table:table-cell office:value-type="string">
            <text:p>8</text:p>
          </table:table-cell>
          <table:table-cell office:value-type="string">
            <text:p>0</text:p>
          </table:table-cell>
          <table:table-cell office:value-type="string">
            <text:p>28</text:p>
          </table:table-cell>
          <table:table-cell office:value-type="string">
            <text:p/>
          </table:table-cell>
          <table:table-cell office:value-type="string">
            <text:p>bt-servant-telemet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 ILindsley</text:p>
          </table:table-cell>
          <table:table-cell office:value-type="string">
            <text:p>0</text:p>
          </table:table-cell>
          <table:table-cell office:value-type="string">
            <text:p>0</text:p>
          </table:table-cell>
          <table:table-cell office:value-type="string">
            <text:p>https://github.com/unfoldingWord/bt-servant-telemetry</text:p>
          </table:table-cell>
          <table:table-cell office:value-type="string">
            <text:p>2026-06-10T14:19:53Z</text:p>
          </table:table-cell>
        </table:table-row>
        <table:table-row>
          <table:table-cell office:value-type="string">
            <text:p>door43-preview-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6T13:21:54Z</text:p>
          </table:table-cell>
          <table:table-cell office:value-type="string">
            <text:p>2026-06-06T13:21:08Z</text:p>
          </table:table-cell>
          <table:table-cell office:value-type="string">
            <text:p>2026-06-06T13:21:54Z</text:p>
          </table:table-cell>
          <table:table-cell office:value-type="string">
            <text:p>5</text:p>
          </table:table-cell>
          <table:table-cell office:value-type="string">
            <text:p>0</text:p>
          </table:table-cell>
          <table:table-cell office:value-type="string">
            <text:p>530</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usfm-alignment-remover, usfm-js, uw-quote-helpers, word-aligner-rcl</text:p>
          </table:table-cell>
          <table:table-cell office:value-type="string">
            <text:p/>
          </table:table-cell>
          <table:table-cell office:value-type="string">
            <text:p>richmahn, larsgson, PhotoNomad0</text:p>
          </table:table-cell>
          <table:table-cell office:value-type="string">
            <text:p>26</text:p>
          </table:table-cell>
          <table:table-cell office:value-type="string">
            <text:p>0</text:p>
          </table:table-cell>
          <table:table-cell office:value-type="string">
            <text:p>https://github.com/unfoldingWord/door43-preview-app</text:p>
          </table:table-cell>
          <table:table-cell office:value-type="string">
            <text:p>2026-06-06T13:21:13Z</text:p>
          </table:table-cell>
        </table:table-row>
        <table:table-row>
          <table:table-cell office:value-type="string">
            <text:p>keybase_git_backup</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4T15:07:37Z</text:p>
          </table:table-cell>
          <table:table-cell office:value-type="string">
            <text:p>2026-06-04T15:07:34Z</text:p>
          </table:table-cell>
          <table:table-cell office:value-type="string">
            <text:p/>
          </table:table-cell>
          <table:table-cell office:value-type="string">
            <text:p>0</text:p>
          </table:table-cell>
          <table:table-cell office:value-type="string">
            <text:p>0</text:p>
          </table:table-cell>
          <table:table-cell office:value-type="string">
            <text:p>3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elgohr</text:p>
          </table:table-cell>
          <table:table-cell office:value-type="string">
            <text:p>0</text:p>
          </table:table-cell>
          <table:table-cell office:value-type="string">
            <text:p>0</text:p>
          </table:table-cell>
          <table:table-cell office:value-type="string">
            <text:p>https://github.com/unfoldingWord/keybase_git_backup</text:p>
          </table:table-cell>
          <table:table-cell office:value-type="string">
            <text:p>2026-06-04T15:11:14Z</text:p>
          </table:table-cell>
        </table:table-row>
        <table:table-row>
          <table:table-cell office:value-type="string">
            <text:p>gateway-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0T16:31:52Z</text:p>
          </table:table-cell>
          <table:table-cell office:value-type="string">
            <text:p>2026-06-04T14:54:50Z</text:p>
          </table:table-cell>
          <table:table-cell office:value-type="string">
            <text:p>2026-06-10T15:30:42Z</text:p>
          </table:table-cell>
          <table:table-cell office:value-type="string">
            <text:p>152</text:p>
          </table:table-cell>
          <table:table-cell office:value-type="string">
            <text:p>11</text:p>
          </table:table-cell>
          <table:table-cell office:value-type="string">
            <text:p>1532</text:p>
          </table:table-cell>
          <table:table-cell office:value-type="string">
            <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text:p/>
          </table:table-cell>
          <table:table-cell office:value-type="string">
            <text:p>PhotoNomad0, mannycolon, kintsoogi, abelpz, Joel-C-Johnson, richmahn, theNerd247, benjamin-test, jincypjose, larsgson, mandolyte, claude, elsylambert</text:p>
          </table:table-cell>
          <table:table-cell office:value-type="string">
            <text:p>20</text:p>
          </table:table-cell>
          <table:table-cell office:value-type="string">
            <text:p>2</text:p>
          </table:table-cell>
          <table:table-cell office:value-type="string">
            <text:p>https://github.com/unfoldingWord/gateway-edit</text:p>
          </table:table-cell>
          <table:table-cell office:value-type="string">
            <text:p>2026-06-04T14:55:14Z</text:p>
          </table:table-cell>
        </table:table-row>
        <table:table-row>
          <table:table-cell office:value-type="string">
            <text:p>dcs-catalog-accordion-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4T14:08:03Z</text:p>
          </table:table-cell>
          <table:table-cell office:value-type="string">
            <text:p>2026-06-04T14:02:01Z</text:p>
          </table:table-cell>
          <table:table-cell office:value-type="string">
            <text:p/>
          </table:table-cell>
          <table:table-cell office:value-type="string">
            <text:p>0</text:p>
          </table:table-cell>
          <table:table-cell office:value-type="string">
            <text:p>0</text:p>
          </table:table-cell>
          <table:table-cell office:value-type="string">
            <text:p>25</text:p>
          </table:table-cell>
          <table:table-cell office:value-type="string">
            <text:p/>
          </table:table-cell>
          <table:table-cell office:value-type="string">
            <text:p>dcs-catalog-accordion-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catalog-accordion-rcl</text:p>
          </table:table-cell>
          <table:table-cell office:value-type="string">
            <text:p>2026-06-04T14:09:25Z</text:p>
          </table:table-cell>
        </table:table-row>
        <table:table-row>
          <table:table-cell office:value-type="string">
            <text:p>dcs-homepage</text:p>
          </table:table-cell>
          <table:table-cell office:value-type="string">
            <text:p>unfoldingWord</text:p>
          </table:table-cell>
          <table:table-cell office:value-type="string">
            <text:p>Go Template</text:p>
          </table:table-cell>
          <table:table-cell office:value-type="string">
            <text:p>False</text:p>
          </table:table-cell>
          <table:table-cell office:value-type="string">
            <text:p>False</text:p>
          </table:table-cell>
          <table:table-cell office:value-type="string">
            <text:p>2026-06-03T16:01:29Z</text:p>
          </table:table-cell>
          <table:table-cell office:value-type="string">
            <text:p>2026-06-03T16:01:29Z</text:p>
          </table:table-cell>
          <table:table-cell office:value-type="string">
            <text:p/>
          </table:table-cell>
          <table:table-cell office:value-type="string">
            <text:p>0</text:p>
          </table:table-cell>
          <table:table-cell office:value-type="string">
            <text:p>0</text:p>
          </table:table-cell>
          <table:table-cell office:value-type="string">
            <text:p>8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homepage</text:p>
          </table:table-cell>
          <table:table-cell office:value-type="string">
            <text:p>2026-06-03T16:04:29Z</text:p>
          </table:table-cell>
        </table:table-row>
        <table:table-row>
          <table:table-cell office:value-type="string">
            <text:p>minitrack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3T15:58:11Z</text:p>
          </table:table-cell>
          <table:table-cell office:value-type="string">
            <text:p>2026-06-03T15:58:10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richmahn</text:p>
          </table:table-cell>
          <table:table-cell office:value-type="string">
            <text:p>0</text:p>
          </table:table-cell>
          <table:table-cell office:value-type="string">
            <text:p>0</text:p>
          </table:table-cell>
          <table:table-cell office:value-type="string">
            <text:p>https://github.com/unfoldingWord/minitracker</text:p>
          </table:table-cell>
          <table:table-cell office:value-type="string">
            <text:p>2026-06-03T16:02:34Z</text:p>
          </table:table-cell>
        </table:table-row>
        <table:table-row>
          <table:table-cell office:value-type="string">
            <text:p>cloudfront_logprocesso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3T15:53:05Z</text:p>
          </table:table-cell>
          <table:table-cell office:value-type="string">
            <text:p>2026-06-03T15:53:04Z</text:p>
          </table:table-cell>
          <table:table-cell office:value-type="string">
            <text:p/>
          </table:table-cell>
          <table:table-cell office:value-type="string">
            <text:p>0</text:p>
          </table:table-cell>
          <table:table-cell office:value-type="string">
            <text:p>0</text:p>
          </table:table-cell>
          <table:table-cell office:value-type="string">
            <text:p>3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ap-Jan Swijnenburg, yakob-aleksandrovich, elgohr, richmahn</text:p>
          </table:table-cell>
          <table:table-cell office:value-type="string">
            <text:p>0</text:p>
          </table:table-cell>
          <table:table-cell office:value-type="string">
            <text:p>0</text:p>
          </table:table-cell>
          <table:table-cell office:value-type="string">
            <text:p>https://github.com/unfoldingWord/cloudfront_logprocessor</text:p>
          </table:table-cell>
          <table:table-cell office:value-type="string">
            <text:p>2026-06-03T15:57:01Z</text:p>
          </table:table-cell>
        </table:table-row>
        <table:table-row>
          <table:table-cell office:value-type="string">
            <text:p>ufw_redirec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6-02T19:41:29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thstoll3, yakob-aleksandrovich, jag3773, kellyvivancox, richmahn, drcox633</text:p>
          </table:table-cell>
          <table:table-cell office:value-type="string">
            <text:p>0</text:p>
          </table:table-cell>
          <table:table-cell office:value-type="string">
            <text:p>0</text:p>
          </table:table-cell>
          <table:table-cell office:value-type="string">
            <text:p>https://github.com/unfoldingWord/ufw_redirects</text:p>
          </table:table-cell>
          <table:table-cell office:value-type="string">
            <text:p>2026-06-02T19:41:33Z</text:p>
          </table:table-cell>
        </table:table-row>
        <table:table-row>
          <table:table-cell office:value-type="string">
            <text:p>enhanced-word-aligner-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02T13:31:12Z</text:p>
          </table:table-cell>
          <table:table-cell office:value-type="string">
            <text:p>2026-06-02T13:31:12Z</text:p>
          </table:table-cell>
          <table:table-cell office:value-type="string">
            <text:p/>
          </table:table-cell>
          <table:table-cell office:value-type="string">
            <text:p>1</text:p>
          </table:table-cell>
          <table:table-cell office:value-type="string">
            <text:p>1</text:p>
          </table:table-cell>
          <table:table-cell office:value-type="string">
            <text:p>336</text:p>
          </table:table-cell>
          <table:table-cell office:value-type="string">
            <text:p/>
          </table:table-cell>
          <table:table-cell office:value-type="string">
            <text:p>enhanced-word-aligner-rcl</text:p>
          </table:table-cell>
          <table:table-cell office:value-type="string">
            <text:p>False</text:p>
          </table:table-cell>
          <table:table-cell office:value-type="string">
            <text:p>24893</text:p>
          </table:table-cell>
          <table:table-cell office:value-type="string">
            <text:p>2026-06-02T13:32:18.685Z</text:p>
          </table:table-cell>
          <table:table-cell office:value-type="string">
            <text:p>gateway-edit</text:p>
          </table:table-cell>
          <table:table-cell office:value-type="string">
            <text:p>bible-reference-range, uw-wordmapbooster, @unfoldingword/eslint-config, usfm-js, word-aligner-rcl</text:p>
          </table:table-cell>
          <table:table-cell office:value-type="string">
            <text:p>unfoldingWord/gateway-edit</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enhanced-word-aligner-rcl</text:p>
          </table:table-cell>
          <table:table-cell office:value-type="string">
            <text:p>2026-06-02T13:31:41Z</text:p>
          </table:table-cell>
        </table:table-row>
        <table:table-row>
          <table:table-cell office:value-type="string">
            <text:p>uw-zulip-mcp</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5-29T15:05:23Z</text:p>
          </table:table-cell>
          <table:table-cell office:value-type="string">
            <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kougkas, nlightcc, sethstoll3, sethstoll, yakob-aleksandrovich, klutchell</text:p>
          </table:table-cell>
          <table:table-cell office:value-type="string">
            <text:p>0</text:p>
          </table:table-cell>
          <table:table-cell office:value-type="string">
            <text:p>0</text:p>
          </table:table-cell>
          <table:table-cell office:value-type="string">
            <text:p>https://github.com/unfoldingWord/uw-zulip-mcp</text:p>
          </table:table-cell>
          <table:table-cell office:value-type="string">
            <text:p>2026-05-29T15:06:34Z</text:p>
          </table:table-cell>
        </table:table-row>
        <table:table-row>
          <table:table-cell office:value-type="string">
            <text:p>tc-create-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04:04:35Z</text:p>
          </table:table-cell>
          <table:table-cell office:value-type="string">
            <text:p>2026-05-28T16:04:14Z</text:p>
          </table:table-cell>
          <table:table-cell office:value-type="string">
            <text:p>2026-06-10T15:01:15Z</text:p>
          </table:table-cell>
          <table:table-cell office:value-type="string">
            <text:p>291</text:p>
          </table:table-cell>
          <table:table-cell office:value-type="string">
            <text:p>20</text:p>
          </table:table-cell>
          <table:table-cell office:value-type="string">
            <text:p>1637</text:p>
          </table:table-cell>
          <table:table-cell office:value-type="string">
            <text:p/>
          </table:table-cell>
          <table:table-cell office:value-type="string">
            <text:p>tc-create-app</text:p>
          </table:table-cell>
          <table:table-cell office:value-type="string">
            <text:p>False</text:p>
          </table:table-cell>
          <table:table-cell office:value-type="string">
            <text:p>71</text:p>
          </table:table-cell>
          <table:table-cell office:value-type="string">
            <text:p>2022-02-22T21:12:10.659Z</text:p>
          </table:table-cell>
          <table:table-cell office:value-type="string">
            <text:p/>
          </table:table-cell>
          <table:table-cell office: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text:p/>
          </table:table-cell>
          <table:table-cell office: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text:p>36</text:p>
          </table:table-cell>
          <table:table-cell office:value-type="string">
            <text:p>0</text:p>
          </table:table-cell>
          <table:table-cell office:value-type="string">
            <text:p>https://github.com/unfoldingWord/tc-create-app</text:p>
          </table:table-cell>
          <table:table-cell office:value-type="string">
            <text:p>2026-05-28T16:04:51Z</text:p>
          </table:table-cell>
        </table:table-row>
        <table:table-row>
          <table:table-cell office:value-type="string">
            <text:p>uw-languag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8T16:01:39Z</text:p>
          </table:table-cell>
          <table:table-cell office:value-type="string">
            <text:p>2026-05-28T16:00:29Z</text:p>
          </table:table-cell>
          <table:table-cell office:value-type="string">
            <text:p/>
          </table:table-cell>
          <table:table-cell office:value-type="string">
            <text:p>15</text:p>
          </table:table-cell>
          <table:table-cell office:value-type="string">
            <text:p>12</text:p>
          </table:table-cell>
          <table:table-cell office:value-type="string">
            <text:p>77</text:p>
          </table:table-cell>
          <table:table-cell office:value-type="string">
            <text:p/>
          </table:table-cell>
          <table:table-cell office:value-type="string">
            <text:p>uw-languages-rcl</text:p>
          </table:table-cell>
          <table:table-cell office:value-type="string">
            <text:p>False</text:p>
          </table:table-cell>
          <table:table-cell office:value-type="string">
            <text:p>1219</text:p>
          </table:table-cell>
          <table:table-cell office:value-type="string">
            <text:p>2026-05-28T16:01:32.183Z</text:p>
          </table:table-cell>
          <table:table-cell office:value-type="string">
            <text:p>tc-create-app, dcs-react-hooks</text:p>
          </table:table-cell>
          <table:table-cell office:value-type="string">
            <text:p/>
          </table:table-cell>
          <table:table-cell office:value-type="string">
            <text:p>nishantshah-me/docusaurus, unfoldingWord/gateway-translate, unfoldingWord/tc-create-app</text:p>
          </table:table-cell>
          <table:table-cell office:value-type="string">
            <text:p>mandolyte, dependabot[bot], abelpz, PhotoNomad0</text:p>
          </table:table-cell>
          <table:table-cell office:value-type="string">
            <text:p>0</text:p>
          </table:table-cell>
          <table:table-cell office:value-type="string">
            <text:p>0</text:p>
          </table:table-cell>
          <table:table-cell office:value-type="string">
            <text:p>https://github.com/unfoldingWord/uw-languages-rcl</text:p>
          </table:table-cell>
          <table:table-cell office:value-type="string">
            <text:p>2026-05-28T16:01:18Z</text:p>
          </table:table-cell>
        </table:table-row>
        <table:table-row>
          <table:table-cell office:value-type="string">
            <text:p>string-punctuation-tokeniz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8-09T14:35:40Z</text:p>
          </table:table-cell>
          <table:table-cell office:value-type="string">
            <text:p>2021-08-25T21:53:55Z</text:p>
          </table:table-cell>
          <table:table-cell office:value-type="string">
            <text:p>2021-08-25T21:56:43Z</text:p>
          </table:table-cell>
          <table:table-cell office:value-type="string">
            <text:p>21</text:p>
          </table:table-cell>
          <table:table-cell office:value-type="string">
            <text:p>18</text:p>
          </table:table-cell>
          <table:table-cell office:value-type="string">
            <text:p>146</text:p>
          </table:table-cell>
          <table:table-cell office:value-type="string">
            <text:p/>
          </table:table-cell>
          <table:table-cell office:value-type="string">
            <text:p>string-punctuation-tokenizer</text:p>
          </table:table-cell>
          <table:table-cell office:value-type="string">
            <text:p>False</text:p>
          </table:table-cell>
          <table:table-cell office:value-type="string">
            <text:p>101614</text:p>
          </table:table-cell>
          <table:table-cell office:value-type="string">
            <text:p>2021-08-25T21:55:46.406Z</text:p>
          </table:table-cell>
          <table:table-cell office:value-type="string">
            <text:p>tsv-quote-converters, translationCore, string-punctuation-tokenizer, word-aligner-rcl, word-aligner-lib, word-aligner, scripture-resources-rcl, uw-quote-helpers, tsv-groupdata-parser, tc-source-content-updater, checking-tool-rcl, tc-ui-toolkit, checking-tool-wrapper, wordmap-lexer, ScripturePane, checking-extension, anchor-alignment-poc, greek-apparatus-app, pdf-generator, @oce-editor-tools/pk-aligner</text:p>
          </table:table-cell>
          <table:table-cell office:value-type="string">
            <text:p>string-punctuation-tokenizer, wordmap-lexer</text:p>
          </table:table-cell>
          <table:table-cell office: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office:value-type="string">
            <text:p>mannycolon, klappy, ancientTexts-net, dependabot-support, PhotoNomad0, RoyalSix, da1nerd, richmahn, mandolyte, bspidel, Sterling (Jay) Scott, birchamp</text:p>
          </table:table-cell>
          <table:table-cell office:value-type="string">
            <text:p>3</text:p>
          </table:table-cell>
          <table:table-cell office:value-type="string">
            <text:p>0</text:p>
          </table:table-cell>
          <table:table-cell office:value-type="string">
            <text:p>https://github.com/unfoldingWord/string-punctuation-tokenizer</text:p>
          </table:table-cell>
          <table:table-cell office:value-type="string">
            <text:p>2026-05-27T23:23:55Z</text:p>
          </table:table-cell>
        </table:table-row>
        <table:table-row>
          <table:table-cell office:value-type="string">
            <text:p>word-aligner-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3:03:21Z</text:p>
          </table:table-cell>
          <table:table-cell office:value-type="string">
            <text:p>2026-05-24T23:02:05Z</text:p>
          </table:table-cell>
          <table:table-cell office:value-type="string">
            <text:p/>
          </table:table-cell>
          <table:table-cell office:value-type="string">
            <text:p>5</text:p>
          </table:table-cell>
          <table:table-cell office:value-type="string">
            <text:p>2</text:p>
          </table:table-cell>
          <table:table-cell office:value-type="string">
            <text:p>188</text:p>
          </table:table-cell>
          <table:table-cell office:value-type="string">
            <text:p/>
          </table:table-cell>
          <table:table-cell office:value-type="string">
            <text:p>word-aligner-rcl</text:p>
          </table:table-cell>
          <table:table-cell office:value-type="string">
            <text:p>False</text:p>
          </table:table-cell>
          <table:table-cell office:value-type="string">
            <text:p>16604</text:p>
          </table:table-cell>
          <table:table-cell office:value-type="string">
            <text:p>2026-05-24T23:03:19.258Z</text:p>
          </table:table-cell>
          <table:table-cell office:value-type="string">
            <text:p>door43-preview-app, gateway-edit, enhanced-word-aligner-rcl, single-scripture-rcl, @oce-editor-tools/pk-aligner</text:p>
          </table:table-cell>
          <table:table-cell office:value-type="string">
            <text:p>bible-reference-range, string-punctuation-tokenizer, usfm-js, word-aligner, word-aligner-lib, wordmap, wordmap-lexer, uw-tsv-parser</text:p>
          </table:table-cell>
          <table:table-cell office:value-type="string">
            <text:p>unfoldingWord/word-aligner, unfoldingWord/single-scripture-rcl, unfoldingWord/gateway-edit, unfoldingWord/door43-preview-app, unfoldingWord/oce-editor-tools</text:p>
          </table:table-cell>
          <table:table-cell office:value-type="string">
            <text:p>PhotoNomad0, Joshua Lansford, jincypjose</text:p>
          </table:table-cell>
          <table:table-cell office:value-type="string">
            <text:p>0</text:p>
          </table:table-cell>
          <table:table-cell office:value-type="string">
            <text:p>0</text:p>
          </table:table-cell>
          <table:table-cell office:value-type="string">
            <text:p>https://github.com/unfoldingWord/word-aligner-rcl</text:p>
          </table:table-cell>
          <table:table-cell office:value-type="string">
            <text:p>2026-05-24T23:02:10Z</text:p>
          </table:table-cell>
        </table:table-row>
        <table:table-row>
          <table:table-cell office:value-type="string">
            <text:p>word-aligner-li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2:38:03Z</text:p>
          </table:table-cell>
          <table:table-cell office:value-type="string">
            <text:p>2026-05-24T22:36:14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word-aligner-lib</text:p>
          </table:table-cell>
          <table:table-cell office:value-type="string">
            <text:p>False</text:p>
          </table:table-cell>
          <table:table-cell office:value-type="string">
            <text:p>5512</text:p>
          </table:table-cell>
          <table:table-cell office:value-type="string">
            <text:p>2026-05-24T22:38:01.649Z</text:p>
          </table:table-cell>
          <table:table-cell office:value-type="string">
            <text:p>word-aligner-rcl, checking-tool-rcl</text:p>
          </table:table-cell>
          <table:table-cell office:value-type="string">
            <text:p>string-punctuation-tokenizer, tc-strings, usfm-js, word-aligner, wordmap-lexer, bible-reference-range</text:p>
          </table:table-cell>
          <table:table-cell office:value-type="string">
            <text:p>unfoldingWord/word-aligner, unfoldingWord/door43-preview-app, unfoldingWord/gateway-edit, unfoldingWord/single-scripture-rcl, unfoldingWord/word-aligner-rcl</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word-aligner-lib</text:p>
          </table:table-cell>
          <table:table-cell office:value-type="string">
            <text:p>2026-05-24T22:36:18Z</text:p>
          </table:table-cell>
        </table:table-row>
        <table:table-row>
          <table:table-cell office:value-type="string">
            <text:p>word-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1:22:15Z</text:p>
          </table:table-cell>
          <table:table-cell office:value-type="string">
            <text:p>2026-05-24T21:16:40Z</text:p>
          </table:table-cell>
          <table:table-cell office:value-type="string">
            <text:p>2019-02-06T21:43:28Z</text:p>
          </table:table-cell>
          <table:table-cell office:value-type="string">
            <text:p>0</text:p>
          </table:table-cell>
          <table:table-cell office:value-type="string">
            <text:p>0</text:p>
          </table:table-cell>
          <table:table-cell office:value-type="string">
            <text:p>206</text:p>
          </table:table-cell>
          <table:table-cell office:value-type="string">
            <text:p/>
          </table:table-cell>
          <table:table-cell office:value-type="string">
            <text:p>word-aligner</text:p>
          </table:table-cell>
          <table:table-cell office:value-type="string">
            <text:p>False</text:p>
          </table:table-cell>
          <table:table-cell office:value-type="string">
            <text:p>45454</text:p>
          </table:table-cell>
          <table:table-cell office:value-type="string">
            <text:p>2026-05-24T21:22:13.663Z</text:p>
          </table:table-cell>
          <table:table-cell office:value-type="string">
            <text:p>gateway-admin, translationCore, wordAlignment, gateway-edit, tc-create-app, word-aligner-rcl, word-aligner-lib, single-scripture-rcl, translation-helps-rcl, scripture-resources-rcl, bsa, checking-tool-rcl, tc-ui-toolkit, checking-tool-wrapper, alignment-playground, next-js-template</text:p>
          </table:table-cell>
          <table:table-cell office:value-type="string">
            <text:p>string-punctuation-tokenizer, usfm-js</text:p>
          </table:table-cell>
          <table:table-cell office:value-type="string">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text:p>PhotoNomad0, mannycolon, RoyalSix, richmahn, dependabot-support, Sterling (Jay) Scott, da1nerd, bspidel</text:p>
          </table:table-cell>
          <table:table-cell office:value-type="string">
            <text:p>6</text:p>
          </table:table-cell>
          <table:table-cell office:value-type="string">
            <text:p>0</text:p>
          </table:table-cell>
          <table:table-cell office:value-type="string">
            <text:p>https://github.com/unfoldingWord/word-aligner</text:p>
          </table:table-cell>
          <table:table-cell office:value-type="string">
            <text:p>2026-05-24T21:16:44Z</text:p>
          </table:table-cell>
        </table:table-row>
        <table:table-row>
          <table:table-cell office:value-type="string">
            <text:p>usfm-j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5-23T23:11:20Z</text:p>
          </table:table-cell>
          <table:table-cell office:value-type="string">
            <text:p>2026-05-23T23:09:13Z</text:p>
          </table:table-cell>
          <table:table-cell office:value-type="string">
            <text:p>2018-11-05T12:47:58Z</text:p>
          </table:table-cell>
          <table:table-cell office:value-type="string">
            <text:p>3</text:p>
          </table:table-cell>
          <table:table-cell office:value-type="string">
            <text:p>0</text:p>
          </table:table-cell>
          <table:table-cell office:value-type="string">
            <text:p>420</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
          </table:table-cell>
          <table:table-cell office:value-type="string">
            <text:p>wordmap-usfm, cskillbp-prompt-over-code, uw-content-validation, zulip-bot, tsv-twl-creation-app, translationCore, wordAlignment, door43-preview-app, enhanced-word-aligner-rcl, tc-create-app, word-aligner-rcl, word-aligner-lib, word-aligner, single-scripture-rcl, scripture-resources-rcl, uw-quote-helpers, uw-wordmapbooster, door43-preview-renderers, usfm-alignment-remover, tc-source-content-updater, checking-tool-rcl, tc-ui-toolkit, checking-tool-wrapper, uw-bible-parser, book-package-rcl, uw-word-count, usfm-js-wrapper, ScripturePane, tc_resources, VerseCheck, resource-checker, checking-extension, translation-helps, qa-app, alignment-playground, greek-apparatus-app, pdf-generator, scripture-as-graph, @bt-synergy/mobile, tc-study, @bt-synergy/resource-parsers, @bt-synergy/usfm-processor</text:p>
          </table:table-cell>
          <table:table-cell office:value-type="string">
            <text:p/>
          </table:table-cell>
          <table:table-cell office: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text:p>PhotoNomad0, RoyalSix, mannycolon, klappy, Sterling (Jay) Scott, ihoegen, da1nerd, dependabot-support, richmahn, bspidel</text:p>
          </table:table-cell>
          <table:table-cell office:value-type="string">
            <text:p>4</text:p>
          </table:table-cell>
          <table:table-cell office:value-type="string">
            <text:p>0</text:p>
          </table:table-cell>
          <table:table-cell office:value-type="string">
            <text:p>https://github.com/unfoldingWord/usfm-js</text:p>
          </table:table-cell>
          <table:table-cell office:value-type="string">
            <text:p>2026-05-23T23:09:18Z</text:p>
          </table:table-cell>
        </table:table-row>
        <table:table-row>
          <table:table-cell office:value-type="string">
            <text:p>claude_security_sentinel</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02T19:57:42Z</text:p>
          </table:table-cell>
          <table:table-cell office:value-type="string">
            <text:p>2026-03-02T19:57:32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claude_security_sentinel</text:p>
          </table:table-cell>
          <table:table-cell office:value-type="string">
            <text:p>2026-05-22T15:02:16Z</text:p>
          </table:table-cell>
        </table:table-row>
        <table:table-row>
          <table:table-cell office:value-type="string">
            <text:p>Brown-Driver-Briggs-Enhanced</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5-02T13:05:04Z</text:p>
          </table:table-cell>
          <table:table-cell office:value-type="string">
            <text:p>2023-05-02T13:03:35Z</text:p>
          </table:table-cell>
          <table:table-cell office:value-type="string">
            <text:p/>
          </table:table-cell>
          <table:table-cell office:value-type="string">
            <text:p>3</text:p>
          </table:table-cell>
          <table:table-cell office:value-type="string">
            <text:p>1</text:p>
          </table:table-cell>
          <table:table-cell office:value-type="string">
            <text:p>1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 IanLindsley</text:p>
          </table:table-cell>
          <table:table-cell office:value-type="string">
            <text:p>0</text:p>
          </table:table-cell>
          <table:table-cell office:value-type="string">
            <text:p>0</text:p>
          </table:table-cell>
          <table:table-cell office:value-type="string">
            <text:p>https://github.com/unfoldingWord/Brown-Driver-Briggs-Enhanced</text:p>
          </table:table-cell>
          <table:table-cell office:value-type="string">
            <text:p>2026-05-17T13:44:58Z</text:p>
          </table:table-cell>
        </table:table-row>
        <table:table-row>
          <table:table-cell office:value-type="string">
            <text:p>node-usfm2html-cli</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4T23:44:52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node-usfm2html-cli</text:p>
          </table:table-cell>
          <table:table-cell office:value-type="string">
            <text:p>2026-05-14T23:44:56Z</text:p>
          </table:table-cell>
        </table:table-row>
        <table:table-row>
          <table:table-cell office:value-type="string">
            <text:p>gitea-react-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2T13:12:04Z</text:p>
          </table:table-cell>
          <table:table-cell office:value-type="string">
            <text:p>2026-05-12T13:12:04Z</text:p>
          </table:table-cell>
          <table:table-cell office:value-type="string">
            <text:p>2020-04-23T14:49:23Z</text:p>
          </table:table-cell>
          <table:table-cell office:value-type="string">
            <text:p>27</text:p>
          </table:table-cell>
          <table:table-cell office:value-type="string">
            <text:p>21</text:p>
          </table:table-cell>
          <table:table-cell office:value-type="string">
            <text:p>922</text:p>
          </table:table-cell>
          <table:table-cell office:value-type="string">
            <text:p/>
          </table:table-cell>
          <table:table-cell office:value-type="string">
            <text:p>gitea-react-toolkit</text:p>
          </table:table-cell>
          <table:table-cell office:value-type="string">
            <text:p>False</text:p>
          </table:table-cell>
          <table:table-cell office:value-type="string">
            <text:p>17632</text:p>
          </table:table-cell>
          <table:table-cell office:value-type="string">
            <text:p>2026-05-12T13:15:42.563Z</text:p>
          </table:table-cell>
          <table:table-cell office:value-type="string">
            <text:p>gateway-admin, gateway-edit, tc-create-app, single-scripture-rcl, translation-helps-rcl, scripture-resources-rcl, resource-workspace-rcl, resource-checker, create-app, next-js-template, resource-container-rcl, pdf-generator-rcl, hello-dcs-react-component-library, md-tsv-converter-app, anchor-alignment-poc, admin-app, greek-apparatus-app, book-package-viewer-poc, gitea-offline-poc, scripture-burrito-react-jsonschema-form</text:p>
          </table:table-cell>
          <table:table-cell office:value-type="string">
            <text:p>markdown-translatable, @unfoldingword/eslint-config</text:p>
          </table:table-cell>
          <table:table-cell office: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text:p>klappy, RoyalSix, ancientTexts-net, mannycolon, actions-user, PhotoNomad0, mandolyte, Sterling (Jay) Scott, superdav42, Joel-C-Johnson, jincypjose, kintsoogi, richmahn, rady-ben</text:p>
          </table:table-cell>
          <table:table-cell office:value-type="string">
            <text:p>2</text:p>
          </table:table-cell>
          <table:table-cell office:value-type="string">
            <text:p>0</text:p>
          </table:table-cell>
          <table:table-cell office:value-type="string">
            <text:p>https://github.com/unfoldingWord/gitea-react-toolkit</text:p>
          </table:table-cell>
          <table:table-cell office:value-type="string">
            <text:p>2026-05-12T13:17:57Z</text:p>
          </table:table-cell>
        </table:table-row>
        <table:table-row>
          <table:table-cell office:value-type="string">
            <text:p>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uw-dev-skills</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6-05-11T16:50:2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sethstoll3</text:p>
          </table:table-cell>
          <table:table-cell office:value-type="string">
            <text:p>0</text:p>
          </table:table-cell>
          <table:table-cell office:value-type="string">
            <text:p>0</text:p>
          </table:table-cell>
          <table:table-cell office:value-type="string">
            <text:p>https://github.com/unfoldingWord/uw-dev-skills</text:p>
          </table:table-cell>
          <table:table-cell office:value-type="string">
            <text:p>2026-05-11T16:50:29Z</text:p>
          </table:table-cell>
        </table:table-row>
        <table:table-row>
          <table:table-cell office:value-type="string">
            <text:p>fred-zulip-bo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9T16:01:39Z</text:p>
          </table:table-cell>
          <table:table-cell office:value-type="string">
            <text:p>2026-05-09T16:01:39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fred-zulip-bo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text:p>
          </table:table-cell>
          <table:table-cell office:value-type="string">
            <text:p>0</text:p>
          </table:table-cell>
          <table:table-cell office:value-type="string">
            <text:p>0</text:p>
          </table:table-cell>
          <table:table-cell office:value-type="string">
            <text:p>https://github.com/unfoldingWord/fred-zulip-bot-worker</text:p>
          </table:table-cell>
          <table:table-cell office:value-type="string">
            <text:p>2026-05-09T16:01:43Z</text:p>
          </table:table-cell>
        </table:table-row>
        <table:table-row>
          <table:table-cell office:value-type="string">
            <text:p>fred-mcp</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5-07T01:50:37Z</text:p>
          </table:table-cell>
          <table:table-cell office:value-type="string">
            <text:p>2026-05-07T01:50:35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text:p>
          </table:table-cell>
          <table:table-cell office:value-type="string">
            <text:p>0</text:p>
          </table:table-cell>
          <table:table-cell office:value-type="string">
            <text:p>0</text:p>
          </table:table-cell>
          <table:table-cell office:value-type="string">
            <text:p>https://github.com/unfoldingWord/fred-mcp</text:p>
          </table:table-cell>
          <table:table-cell office:value-type="string">
            <text:p>2026-05-07T01:50:40Z</text:p>
          </table:table-cell>
        </table:table-row>
        <table:table-row>
          <table:table-cell office:value-type="string">
            <text:p>engineering-practice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5-06T21:10:0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thstoll3</text:p>
          </table:table-cell>
          <table:table-cell office:value-type="string">
            <text:p>0</text:p>
          </table:table-cell>
          <table:table-cell office:value-type="string">
            <text:p>0</text:p>
          </table:table-cell>
          <table:table-cell office:value-type="string">
            <text:p>https://github.com/unfoldingWord/engineering-practices</text:p>
          </table:table-cell>
          <table:table-cell office:value-type="string">
            <text:p>2026-05-06T21:10:18Z</text:p>
          </table:table-cell>
        </table:table-row>
        <table:table-row>
          <table:table-cell office:value-type="string">
            <text:p>obs-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5T15:14:30Z</text:p>
          </table:table-cell>
          <table:table-cell office:value-type="string">
            <text:p>2026-05-05T15:14:21Z</text:p>
          </table:table-cell>
          <table:table-cell office:value-type="string">
            <text:p>2025-06-03T04:28:11Z</text:p>
          </table:table-cell>
          <table:table-cell office:value-type="string">
            <text:p>7</text:p>
          </table:table-cell>
          <table:table-cell office:value-type="string">
            <text:p>0</text:p>
          </table:table-cell>
          <table:table-cell office:value-type="string">
            <text:p>101</text:p>
          </table:table-cell>
          <table:table-cell office:value-type="string">
            <text:p/>
          </table:table-cell>
          <table:table-cell office:value-type="string">
            <text:p>obs-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eliaspinero</text:p>
          </table:table-cell>
          <table:table-cell office:value-type="string">
            <text:p>1</text:p>
          </table:table-cell>
          <table:table-cell office:value-type="string">
            <text:p>2</text:p>
          </table:table-cell>
          <table:table-cell office:value-type="string">
            <text:p>https://github.com/unfoldingWord/obs-app</text:p>
          </table:table-cell>
          <table:table-cell office:value-type="string">
            <text:p>2026-05-05T15:16:31Z</text:p>
          </table:table-cell>
        </table:table-row>
        <table:table-row>
          <table:table-cell office:value-type="string">
            <text:p>go-rc2sb</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4-28T20:23:11Z</text:p>
          </table:table-cell>
          <table:table-cell office:value-type="string">
            <text:p>2026-04-28T20:21:50Z</text:p>
          </table:table-cell>
          <table:table-cell office:value-type="string">
            <text:p>2026-04-28T20:23:11Z</text:p>
          </table:table-cell>
          <table:table-cell office:value-type="string">
            <text:p>0</text:p>
          </table:table-cell>
          <table:table-cell office:value-type="string">
            <text:p>0</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dcs</text:p>
          </table:table-cell>
          <table:table-cell office:value-type="string">
            <text:p>richmahn</text:p>
          </table:table-cell>
          <table:table-cell office:value-type="string">
            <text:p>3</text:p>
          </table:table-cell>
          <table:table-cell office:value-type="string">
            <text:p>0</text:p>
          </table:table-cell>
          <table:table-cell office:value-type="string">
            <text:p>https://github.com/unfoldingWord/go-rc2sb</text:p>
          </table:table-cell>
          <table:table-cell office:value-type="string">
            <text:p>2026-04-28T20:21:57Z</text:p>
          </table:table-cell>
        </table:table-row>
        <table:table-row>
          <table:table-cell office:value-type="string">
            <text:p>obs-web</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1-27T11:32:33Z</text:p>
          </table:table-cell>
          <table:table-cell office:value-type="string">
            <text:p>2023-01-03T21:29:18Z</text:p>
          </table:table-cell>
          <table:table-cell office:value-type="string">
            <text:p/>
          </table:table-cell>
          <table:table-cell office:value-type="string">
            <text:p>3</text:p>
          </table:table-cell>
          <table:table-cell office:value-type="string">
            <text:p>2</text:p>
          </table:table-cell>
          <table:table-cell office:value-type="string">
            <text:p>16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Phil Hopper, phillip-hopper, yakob-aleksandrovich, dependabot[bot], jag3773</text:p>
          </table:table-cell>
          <table:table-cell office:value-type="string">
            <text:p>0</text:p>
          </table:table-cell>
          <table:table-cell office:value-type="string">
            <text:p>0</text:p>
          </table:table-cell>
          <table:table-cell office:value-type="string">
            <text:p>https://github.com/unfoldingWord/obs-web</text:p>
          </table:table-cell>
          <table:table-cell office:value-type="string">
            <text:p>2026-04-27T00:53:46Z</text:p>
          </table:table-cell>
        </table:table-row>
        <table:table-row>
          <table:table-cell office:value-type="string">
            <text:p>baruch</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20T22:23:08Z</text:p>
          </table:table-cell>
          <table:table-cell office:value-type="string">
            <text:p>2026-04-20T22:22:00Z</text:p>
          </table:table-cell>
          <table:table-cell office:value-type="string">
            <text:p/>
          </table:table-cell>
          <table:table-cell office:value-type="string">
            <text:p>6</text:p>
          </table:table-cell>
          <table:table-cell office:value-type="string">
            <text:p>1</text:p>
          </table:table-cell>
          <table:table-cell office:value-type="string">
            <text:p>23</text:p>
          </table:table-cell>
          <table:table-cell office:value-type="string">
            <text:p/>
          </table:table-cell>
          <table:table-cell office:value-type="string">
            <text:p>baruc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 claude</text:p>
          </table:table-cell>
          <table:table-cell office:value-type="string">
            <text:p>0</text:p>
          </table:table-cell>
          <table:table-cell office:value-type="string">
            <text:p>0</text:p>
          </table:table-cell>
          <table:table-cell office:value-type="string">
            <text:p>https://github.com/unfoldingWord/baruch</text:p>
          </table:table-cell>
          <table:table-cell office:value-type="string">
            <text:p>2026-04-20T22:22:05Z</text:p>
          </table:table-cell>
        </table:table-row>
        <table:table-row>
          <table:table-cell office:value-type="string">
            <text:p>dcs</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6-21T01:08:31Z</text:p>
          </table:table-cell>
          <table:table-cell office:value-type="string">
            <text:p>2026-04-19T02:36:29Z</text:p>
          </table:table-cell>
          <table:table-cell office:value-type="string">
            <text:p>2026-06-03T23:53:30Z</text:p>
          </table:table-cell>
          <table:table-cell office:value-type="string">
            <text:p>48</text:p>
          </table:table-cell>
          <table:table-cell office:value-type="string">
            <text:p>7</text:p>
          </table:table-cell>
          <table:table-cell office:value-type="string">
            <text:p>2077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text:p>104</text:p>
          </table:table-cell>
          <table:table-cell office:value-type="string">
            <text:p>1040</text:p>
          </table:table-cell>
          <table:table-cell office:value-type="string">
            <text:p>https://github.com/unfoldingWord/dcs</text:p>
          </table:table-cell>
          <table:table-cell office:value-type="string">
            <text:p>2026-04-19T02:36:49Z</text:p>
          </table:table-cell>
        </table:table-row>
        <table:table-row>
          <table:table-cell office:value-type="string">
            <text:p>tc-website</text:p>
          </table:table-cell>
          <table:table-cell office:value-type="string">
            <text:p>unfoldingWord</text:p>
          </table:table-cell>
          <table:table-cell office:value-type="string">
            <text:p>CSS</text:p>
          </table:table-cell>
          <table:table-cell office:value-type="string">
            <text:p>False</text:p>
          </table:table-cell>
          <table:table-cell office:value-type="string">
            <text:p>False</text:p>
          </table:table-cell>
          <table:table-cell office:value-type="string">
            <text:p>2026-04-17T14:26:5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 Champeon, google-labs-jules[bot], birchamp</text:p>
          </table:table-cell>
          <table:table-cell office:value-type="string">
            <text:p>0</text:p>
          </table:table-cell>
          <table:table-cell office:value-type="string">
            <text:p>0</text:p>
          </table:table-cell>
          <table:table-cell office:value-type="string">
            <text:p>https://github.com/unfoldingWord/tc-website</text:p>
          </table:table-cell>
          <table:table-cell office:value-type="string">
            <text:p>2026-04-17T14:27:01Z</text:p>
          </table:table-cell>
        </table:table-row>
        <table:table-row>
          <table:table-cell office:value-type="string">
            <text:p>single-scripture-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16T17:24:40Z</text:p>
          </table:table-cell>
          <table:table-cell office:value-type="string">
            <text:p>2026-04-16T17:24:40Z</text:p>
          </table:table-cell>
          <table:table-cell office:value-type="string">
            <text:p/>
          </table:table-cell>
          <table:table-cell office:value-type="string">
            <text:p>3</text:p>
          </table:table-cell>
          <table:table-cell office:value-type="string">
            <text:p>3</text:p>
          </table:table-cell>
          <table:table-cell office:value-type="string">
            <text:p>639</text:p>
          </table:table-cell>
          <table:table-cell office:value-type="string">
            <text:p/>
          </table:table-cell>
          <table:table-cell office:value-type="string">
            <text:p>single-scripture-rcl</text:p>
          </table:table-cell>
          <table:table-cell office:value-type="string">
            <text:p>False</text:p>
          </table:table-cell>
          <table:table-cell office:value-type="string">
            <text:p>10071</text:p>
          </table:table-cell>
          <table:table-cell office:value-type="string">
            <text:p>2026-04-16T17:29:58.529Z</text:p>
          </table:table-cell>
          <table:table-cell office:value-type="string">
            <text:p>gateway-admin, gateway-edit, create-app, next-js-template</text:p>
          </table:table-cell>
          <table:table-cell office:value-type="string">
            <text:p>@unfoldingword/eslint-config, bible-reference-range, gitea-react-toolkit, scripture-resources-rcl, tc-ui-toolkit, translation-helps-rcl, usfm-js, uw-quote-helpers, word-aligner, word-aligner-rcl</text:p>
          </table:table-cell>
          <table:table-cell office:value-type="string">
            <text:p>unfoldingWord/gateway-edit, unfoldingWord/gateway-translate, unfoldingWord/gateway-admin</text:p>
          </table:table-cell>
          <table:table-cell office:value-type="string">
            <text:p>PhotoNomad0, kintsoogi, mannycolon, Joel-C-Johnson, jincypjose, abelpz, RoyalSix, theNerd247, Sterling (Jay) Scott, richmahn</text:p>
          </table:table-cell>
          <table:table-cell office:value-type="string">
            <text:p>0</text:p>
          </table:table-cell>
          <table:table-cell office:value-type="string">
            <text:p>0</text:p>
          </table:table-cell>
          <table:table-cell office:value-type="string">
            <text:p>https://github.com/unfoldingWord/single-scripture-rcl</text:p>
          </table:table-cell>
          <table:table-cell office:value-type="string">
            <text:p>2026-04-16T17:24:46Z</text:p>
          </table:table-cell>
        </table:table-row>
        <table:table-row>
          <table:table-cell office:value-type="string">
            <text:p>orthography-app-FE</text:p>
          </table:table-cell>
          <table:table-cell office:value-type="string">
            <text:p>unfoldingWord</text:p>
          </table:table-cell>
          <table:table-cell office:value-type="string">
            <text:p>Dart</text:p>
          </table:table-cell>
          <table:table-cell office:value-type="string">
            <text:p>True</text:p>
          </table:table-cell>
          <table:table-cell office:value-type="string">
            <text:p>False</text:p>
          </table:table-cell>
          <table:table-cell office:value-type="string">
            <text:p>2024-06-05T10:56:02Z</text:p>
          </table:table-cell>
          <table:table-cell office:value-type="string">
            <text:p>2024-06-05T10:55:54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ephen0272</text:p>
          </table:table-cell>
          <table:table-cell office:value-type="string">
            <text:p>0</text:p>
          </table:table-cell>
          <table:table-cell office:value-type="string">
            <text:p>0</text:p>
          </table:table-cell>
          <table:table-cell office:value-type="string">
            <text:p>https://github.com/unfoldingWord/orthography-app-FE</text:p>
          </table:table-cell>
          <table:table-cell office:value-type="string">
            <text:p>2026-04-16T08:08:11Z</text:p>
          </table:table-cell>
        </table:table-row>
        <table:table-row>
          <table:table-cell office:value-type="string">
            <text:p>orthography-app-B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4-08-06T11:57:29Z</text:p>
          </table:table-cell>
          <table:table-cell office:value-type="string">
            <text:p>2024-08-06T11:57:27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orthoapp_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Stephen0272</text:p>
          </table:table-cell>
          <table:table-cell office:value-type="string">
            <text:p>0</text:p>
          </table:table-cell>
          <table:table-cell office:value-type="string">
            <text:p>0</text:p>
          </table:table-cell>
          <table:table-cell office:value-type="string">
            <text:p>https://github.com/unfoldingWord/orthography-app-BE</text:p>
          </table:table-cell>
          <table:table-cell office:value-type="string">
            <text:p>2026-04-16T08:07:38Z</text:p>
          </table:table-cell>
        </table:table-row>
        <table:table-row>
          <table:table-cell office:value-type="string">
            <text:p>tc-helps-skill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4-07T21:29:21Z</text:p>
          </table:table-cell>
          <table:table-cell office:value-type="string">
            <text:p>2026-04-07T21:29:01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amp, Birch Champeon</text:p>
          </table:table-cell>
          <table:table-cell office:value-type="string">
            <text:p>0</text:p>
          </table:table-cell>
          <table:table-cell office:value-type="string">
            <text:p>0</text:p>
          </table:table-cell>
          <table:table-cell office:value-type="string">
            <text:p>https://github.com/unfoldingWord/tc-helps-skills</text:p>
          </table:table-cell>
          <table:table-cell office:value-type="string">
            <text:p>2026-04-07T21:29:27Z</text:p>
          </table:table-cell>
        </table:table-row>
        <table:table-row>
          <table:table-cell office:value-type="string">
            <text:p>inventorys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4-02T09:43:44Z</text:p>
          </table:table-cell>
          <table:table-cell office:value-type="string">
            <text:p>2026-04-02T09:43:40Z</text:p>
          </table:table-cell>
          <table:table-cell office:value-type="string">
            <text:p/>
          </table:table-cell>
          <table:table-cell office:value-type="string">
            <text:p>0</text:p>
          </table:table-cell>
          <table:table-cell office:value-type="string">
            <text:p>0</text:p>
          </table:table-cell>
          <table:table-cell office:value-type="string">
            <text:p>12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inventoryst</text:p>
          </table:table-cell>
          <table:table-cell office:value-type="string">
            <text:p>2026-04-02T09:43:48Z</text:p>
          </table:table-cell>
        </table:table-row>
        <table:table-row>
          <table:table-cell office:value-type="string">
            <text:p>translation-help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7T22:01:48Z</text:p>
          </table:table-cell>
          <table:table-cell office:value-type="string">
            <text:p>2026-03-27T22:00:54Z</text:p>
          </table:table-cell>
          <table:table-cell office:value-type="string">
            <text:p/>
          </table:table-cell>
          <table:table-cell office:value-type="string">
            <text:p>8</text:p>
          </table:table-cell>
          <table:table-cell office:value-type="string">
            <text:p>2</text:p>
          </table:table-cell>
          <table:table-cell office:value-type="string">
            <text:p>829</text:p>
          </table:table-cell>
          <table:table-cell office:value-type="string">
            <text:p/>
          </table:table-cell>
          <table:table-cell office:value-type="string">
            <text:p>translation-helps-rcl</text:p>
          </table:table-cell>
          <table:table-cell office:value-type="string">
            <text:p>False</text:p>
          </table:table-cell>
          <table:table-cell office:value-type="string">
            <text:p>16090</text:p>
          </table:table-cell>
          <table:table-cell office:value-type="string">
            <text:p>2026-03-27T22:01:47.002Z</text:p>
          </table:table-cell>
          <table:table-cell office:value-type="string">
            <text:p>gateway-admin, gateway-edit, single-scripture-rcl, bsa, gateway-translate, uw-editor, resource-workspace-rcl, create-app, next-js-template, admin-app</text:p>
          </table:table-cell>
          <table:table-cell office:value-type="string">
            <text:p>bible-reference-range, dcs-branch-merger, gitea-react-toolkit, markdown-translatable, scripture-resources-rcl, tc-ui-toolkit, word-aligner</text:p>
          </table:table-cell>
          <table:table-cell office: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text:p>mannycolon, PhotoNomad0, kintsoogi, superdav42, larsgson, abelpz, jincypjose, theNerd247, Joel-C-Johnson, richmahn, klappy, RoyalSix, mandolyte</text:p>
          </table:table-cell>
          <table:table-cell office:value-type="string">
            <text:p>0</text:p>
          </table:table-cell>
          <table:table-cell office:value-type="string">
            <text:p>0</text:p>
          </table:table-cell>
          <table:table-cell office:value-type="string">
            <text:p>https://github.com/unfoldingWord/translation-helps-rcl</text:p>
          </table:table-cell>
          <table:table-cell office:value-type="string">
            <text:p>2026-03-27T22:00:59Z</text:p>
          </table:table-cell>
        </table:table-row>
        <table:table-row>
          <table:table-cell office:value-type="string">
            <text:p>dcs-branch-merg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8T01:12:51Z</text:p>
          </table:table-cell>
          <table:table-cell office:value-type="string">
            <text:p>2026-03-27T21:56:40Z</text:p>
          </table:table-cell>
          <table:table-cell office:value-type="string">
            <text:p/>
          </table:table-cell>
          <table:table-cell office:value-type="string">
            <text:p>6</text:p>
          </table:table-cell>
          <table:table-cell office:value-type="string">
            <text:p>0</text:p>
          </table:table-cell>
          <table:table-cell office:value-type="string">
            <text:p>53</text:p>
          </table:table-cell>
          <table:table-cell office:value-type="string">
            <text:p/>
          </table:table-cell>
          <table:table-cell office:value-type="string">
            <text:p>dcs-branch-merger</text:p>
          </table:table-cell>
          <table:table-cell office:value-type="string">
            <text:p>False</text:p>
          </table:table-cell>
          <table:table-cell office:value-type="string">
            <text:p>3577</text:p>
          </table:table-cell>
          <table:table-cell office:value-type="string">
            <text:p>2026-03-27T21:57:39.012Z</text:p>
          </table:table-cell>
          <table:table-cell office:value-type="string">
            <text:p>gateway-admin, tc-create-app, translation-helps-rcl</text:p>
          </table:table-cell>
          <table:table-cell office:value-type="string">
            <text:p>dcs-js</text:p>
          </table:table-cell>
          <table:table-cell office: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text:p>mandolyte, richmahn, theNerd247, PhotoNomad0</text:p>
          </table:table-cell>
          <table:table-cell office:value-type="string">
            <text:p>0</text:p>
          </table:table-cell>
          <table:table-cell office:value-type="string">
            <text:p>0</text:p>
          </table:table-cell>
          <table:table-cell office:value-type="string">
            <text:p>https://github.com/unfoldingWord/dcs-branch-merger</text:p>
          </table:table-cell>
          <table:table-cell office:value-type="string">
            <text:p>2026-03-27T21:56:46Z</text:p>
          </table:table-cell>
        </table:table-row>
        <table:table-row>
          <table:table-cell office:value-type="string">
            <text:p>scripture-resourc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9T13:23:22Z</text:p>
          </table:table-cell>
          <table:table-cell office:value-type="string">
            <text:p>2026-03-19T13:23:22Z</text:p>
          </table:table-cell>
          <table:table-cell office:value-type="string">
            <text:p/>
          </table:table-cell>
          <table:table-cell office:value-type="string">
            <text:p>14</text:p>
          </table:table-cell>
          <table:table-cell office:value-type="string">
            <text:p>6</text:p>
          </table:table-cell>
          <table:table-cell office:value-type="string">
            <text:p>817</text:p>
          </table:table-cell>
          <table:table-cell office:value-type="string">
            <text:p/>
          </table:table-cell>
          <table:table-cell office:value-type="string">
            <text:p>scripture-resources-rcl</text:p>
          </table:table-cell>
          <table:table-cell office:value-type="string">
            <text:p>False</text:p>
          </table:table-cell>
          <table:table-cell office:value-type="string">
            <text:p>16923</text:p>
          </table:table-cell>
          <table:table-cell office:value-type="string">
            <text:p>2026-03-19T13:24:25.124Z</text:p>
          </table:table-cell>
          <table:table-cell office:value-type="string">
            <text:p>gateway-admin, gateway-edit, tc-create-app, single-scripture-rcl, translation-helps-rcl, bsa, gateway-translate, resource-workspace-rcl, resource-checker, create-app, next-js-template, pdf-generator-rcl, greek-apparatus-app, book-package-viewer-poc, pdf-generator</text:p>
          </table:table-cell>
          <table:table-cell office:value-type="string">
            <text:p>bible-reference-range, gitea-react-toolkit, markdown-translatable, string-punctuation-tokenizer, tc-ui-toolkit, usfm-js, uw-quote-helpers, word-aligner, @unfoldingword/eslint-config</text:p>
          </table:table-cell>
          <table:table-cell office: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text:p>klappy, ancientTexts-net, PhotoNomad0, RoyalSix, mandolyte, mannycolon, larsgson, Joel-C-Johnson, abelpz, jincypjose, Sterling (Jay) Scott, superdav42, actions-user, dependabot[bot], Christopher Klapp, richmahn, kintsoogi</text:p>
          </table:table-cell>
          <table:table-cell office:value-type="string">
            <text:p>0</text:p>
          </table:table-cell>
          <table:table-cell office:value-type="string">
            <text:p>0</text:p>
          </table:table-cell>
          <table:table-cell office:value-type="string">
            <text:p>https://github.com/unfoldingWord/scripture-resources-rcl</text:p>
          </table:table-cell>
          <table:table-cell office:value-type="string">
            <text:p>2026-03-19T13:23:28Z</text:p>
          </table:table-cell>
        </table:table-row>
        <table:table-row>
          <table:table-cell office:value-type="string">
            <text:p>ob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3-18T18:36:38Z</text:p>
          </table:table-cell>
          <table:table-cell office:value-type="string">
            <text:p>2026-03-18T14:39:13Z</text:p>
          </table:table-cell>
          <table:table-cell office:value-type="string">
            <text:p>2026-03-18T14:44:36Z</text:p>
          </table:table-cell>
          <table:table-cell office:value-type="string">
            <text:p>10</text:p>
          </table:table-cell>
          <table:table-cell office:value-type="string">
            <text:p>0</text:p>
          </table:table-cell>
          <table:table-cell office:value-type="string">
            <text:p>1534</text:p>
          </table:table-cell>
          <table:table-cell office:value-type="string">
            <text:p/>
          </table:table-cell>
          <table:table-cell office:value-type="string">
            <text:p>bs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resource-workspace-rcl, scripture-resources-rcl, tc-ui-toolkit, translation-helps-rcl, word-aligner</text:p>
          </table:table-cell>
          <table:table-cell office:value-type="string">
            <text:p>hiscoder-com/obt</text:p>
          </table:table-cell>
          <table:table-cell office:value-type="string">
            <text:p>foxprogs, Valyukhov, Vorobushec, Pavel064, Birch Champeon, dimanya, abelpz, ancientTexts-net, birchamp, DenisArger, gecraft</text:p>
          </table:table-cell>
          <table:table-cell office:value-type="string">
            <text:p>1</text:p>
          </table:table-cell>
          <table:table-cell office:value-type="string">
            <text:p>0</text:p>
          </table:table-cell>
          <table:table-cell office:value-type="string">
            <text:p>https://github.com/unfoldingWord/obt</text:p>
          </table:table-cell>
          <table:table-cell office:value-type="string">
            <text:p>2026-03-18T14:39:46Z</text:p>
          </table:table-cell>
        </table:table-row>
        <table:table-row>
          <table:table-cell office:value-type="string">
            <text:p>door43.or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4T16:02:14Z</text:p>
          </table:table-cell>
          <table:table-cell office:value-type="string">
            <text:p>2024-04-11T03:45:41Z</text:p>
          </table:table-cell>
          <table:table-cell office:value-type="string">
            <text:p/>
          </table:table-cell>
          <table:table-cell office:value-type="string">
            <text:p>103</text:p>
          </table:table-cell>
          <table:table-cell office:value-type="string">
            <text:p>18</text:p>
          </table:table-cell>
          <table:table-cell office:value-type="string">
            <text:p>644</text:p>
          </table:table-cell>
          <table:table-cell office:value-type="string">
            <text:p/>
          </table:table-cell>
          <table:table-cell office:value-type="string">
            <text:p>door43.or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jag3773, RobH123, PhotoNomad0, Phil Hopper, codemis, Richard Mahn, phillip-hopper, dependabot[bot], yakob-aleksandrovich, bspidel, ethantkoenig, dependabot-preview[bot]</text:p>
          </table:table-cell>
          <table:table-cell office:value-type="string">
            <text:p>0</text:p>
          </table:table-cell>
          <table:table-cell office:value-type="string">
            <text:p>0</text:p>
          </table:table-cell>
          <table:table-cell office:value-type="string">
            <text:p>https://github.com/unfoldingWord/door43.org</text:p>
          </table:table-cell>
          <table:table-cell office:value-type="string">
            <text:p>2026-03-15T03:14:46Z</text:p>
          </table:table-cell>
        </table:table-row>
        <table:table-row>
          <table:table-cell office:value-type="string">
            <text:p>bt-servant-kb-worker</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3-14T00:09:58Z</text:p>
          </table:table-cell>
          <table:table-cell office:value-type="string">
            <text:p>2026-03-14T00:09:58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text:p>
          </table:table-cell>
          <table:table-cell office:value-type="string">
            <text:p>0</text:p>
          </table:table-cell>
          <table:table-cell office:value-type="string">
            <text:p>0</text:p>
          </table:table-cell>
          <table:table-cell office:value-type="string">
            <text:p>https://github.com/unfoldingWord/bt-servant-kb-worker</text:p>
          </table:table-cell>
          <table:table-cell office:value-type="string">
            <text:p>2026-03-14T00:10:02Z</text:p>
          </table:table-cell>
        </table:table-row>
        <table:table-row>
          <table:table-cell office:value-type="string">
            <text:p>fia-kb</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13T19:46:18Z</text:p>
          </table:table-cell>
          <table:table-cell office:value-type="string">
            <text:p>2026-03-13T19:45:51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text:p>
          </table:table-cell>
          <table:table-cell office:value-type="string">
            <text:p>0</text:p>
          </table:table-cell>
          <table:table-cell office:value-type="string">
            <text:p>0</text:p>
          </table:table-cell>
          <table:table-cell office:value-type="string">
            <text:p>https://github.com/unfoldingWord/fia-kb</text:p>
          </table:table-cell>
          <table:table-cell office:value-type="string">
            <text:p>2026-03-13T19:46:02Z</text:p>
          </table:table-cell>
        </table:table-row>
        <table:table-row>
          <table:table-cell office:value-type="string">
            <text:p>fia-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3-11T19:28:14Z</text:p>
          </table:table-cell>
          <table:table-cell office:value-type="string">
            <text:p>2026-03-11T19:28:02Z</text:p>
          </table:table-cell>
          <table:table-cell office:value-type="string">
            <text:p/>
          </table:table-cell>
          <table:table-cell office:value-type="string">
            <text:p>1</text:p>
          </table:table-cell>
          <table:table-cell office:value-type="string">
            <text:p>0</text:p>
          </table:table-cell>
          <table:table-cell office:value-type="string">
            <text:p>5</text:p>
          </table:table-cell>
          <table:table-cell office:value-type="string">
            <text:p/>
          </table:table-cell>
          <table:table-cell office:value-type="string">
            <text:p>fia-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text:p>
          </table:table-cell>
          <table:table-cell office:value-type="string">
            <text:p>0</text:p>
          </table:table-cell>
          <table:table-cell office:value-type="string">
            <text:p>0</text:p>
          </table:table-cell>
          <table:table-cell office:value-type="string">
            <text:p>https://github.com/unfoldingWord/fia-mcp</text:p>
          </table:table-cell>
          <table:table-cell office:value-type="string">
            <text:p>2026-03-11T19:28:18Z</text:p>
          </table:table-cell>
        </table:table-row>
        <table:table-row>
          <table:table-cell office:value-type="string">
            <text:p>uw-quote-help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0T00:05:49Z</text:p>
          </table:table-cell>
          <table:table-cell office:value-type="string">
            <text:p>2026-03-10T00:05:49Z</text:p>
          </table:table-cell>
          <table:table-cell office:value-type="string">
            <text:p/>
          </table:table-cell>
          <table:table-cell office:value-type="string">
            <text:p>0</text:p>
          </table:table-cell>
          <table:table-cell office:value-type="string">
            <text:p>0</text:p>
          </table:table-cell>
          <table:table-cell office:value-type="string">
            <text:p>62</text:p>
          </table:table-cell>
          <table:table-cell office:value-type="string">
            <text:p/>
          </table:table-cell>
          <table:table-cell office:value-type="string">
            <text:p>uw-quote-helpers</text:p>
          </table:table-cell>
          <table:table-cell office:value-type="string">
            <text:p>False</text:p>
          </table:table-cell>
          <table:table-cell office:value-type="string">
            <text:p>3121</text:p>
          </table:table-cell>
          <table:table-cell office:value-type="string">
            <text:p>2025-01-17T14:55:12.819Z</text:p>
          </table:table-cell>
          <table:table-cell office:value-type="string">
            <text:p>door43-preview-app, single-scripture-rcl, scripture-resources-rcl</text:p>
          </table:table-cell>
          <table:table-cell office:value-type="string">
            <text:p>bible-reference-range, string-punctuation-tokenizer, tsv-groupdata-parser, usfm-js, uw-bible-parser</text:p>
          </table:table-cell>
          <table:table-cell office: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text:p>abelpz, PhotoNomad0, richmahn, Mookth789</text:p>
          </table:table-cell>
          <table:table-cell office:value-type="string">
            <text:p>0</text:p>
          </table:table-cell>
          <table:table-cell office:value-type="string">
            <text:p>0</text:p>
          </table:table-cell>
          <table:table-cell office:value-type="string">
            <text:p>https://github.com/unfoldingWord/uw-quote-helpers</text:p>
          </table:table-cell>
          <table:table-cell office:value-type="string">
            <text:p>2026-03-10T00:05:55Z</text:p>
          </table:table-cell>
        </table:table-row>
        <table:table-row>
          <table:table-cell office:value-type="string">
            <text:p>wordmapboost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3-09T13:39:10Z</text:p>
          </table:table-cell>
          <table:table-cell office:value-type="string">
            <text:p>2026-03-09T13:39:10Z</text:p>
          </table:table-cell>
          <table:table-cell office:value-type="string">
            <text:p/>
          </table:table-cell>
          <table:table-cell office:value-type="string">
            <text:p>0</text:p>
          </table:table-cell>
          <table:table-cell office:value-type="string">
            <text:p>0</text:p>
          </table:table-cell>
          <table:table-cell office:value-type="string">
            <text:p>45</text:p>
          </table:table-cell>
          <table:table-cell office:value-type="string">
            <text:p/>
          </table:table-cell>
          <table:table-cell office:value-type="string">
            <text:p>uw-wordmapbooster</text:p>
          </table:table-cell>
          <table:table-cell office:value-type="string">
            <text:p/>
          </table:table-cell>
          <table:table-cell office:value-type="string">
            <text:p/>
          </table:table-cell>
          <table:table-cell office:value-type="string">
            <text:p/>
          </table:table-cell>
          <table:table-cell office:value-type="string">
            <text:p>enhanced-word-aligner-rcl</text:p>
          </table:table-cell>
          <table:table-cell office:value-type="string">
            <text:p>usfm-js, wordmap, wordmap-lexer</text:p>
          </table:table-cell>
          <table:table-cell office:value-type="string">
            <text:p>JEdward7777/wordmapbooster</text:p>
          </table:table-cell>
          <table:table-cell office:value-type="string">
            <text:p>Joshua Lansford, PhotoNomad0</text:p>
          </table:table-cell>
          <table:table-cell office:value-type="string">
            <text:p>0</text:p>
          </table:table-cell>
          <table:table-cell office:value-type="string">
            <text:p>0</text:p>
          </table:table-cell>
          <table:table-cell office:value-type="string">
            <text:p>https://github.com/unfoldingWord/wordmapbooster</text:p>
          </table:table-cell>
          <table:table-cell office:value-type="string">
            <text:p>2026-03-09T13:39:14Z</text:p>
          </table:table-cell>
        </table:table-row>
        <table:table-row>
          <table:table-cell office:value-type="string">
            <text:p>datatable-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05T15:19:12Z</text:p>
          </table:table-cell>
          <table:table-cell office:value-type="string">
            <text:p>2026-03-04T13:44:54Z</text:p>
          </table:table-cell>
          <table:table-cell office:value-type="string">
            <text:p/>
          </table:table-cell>
          <table:table-cell office:value-type="string">
            <text:p>10</text:p>
          </table:table-cell>
          <table:table-cell office:value-type="string">
            <text:p>9</text:p>
          </table:table-cell>
          <table:table-cell office:value-type="string">
            <text:p>447</text:p>
          </table:table-cell>
          <table:table-cell office:value-type="string">
            <text:p/>
          </table:table-cell>
          <table:table-cell office:value-type="string">
            <text:p>datatable-translatable</text:p>
          </table:table-cell>
          <table:table-cell office:value-type="string">
            <text:p>False</text:p>
          </table:table-cell>
          <table:table-cell office:value-type="string">
            <text:p>3510</text:p>
          </table:table-cell>
          <table:table-cell office:value-type="string">
            <text:p>2026-02-02T16:12:05.648Z</text:p>
          </table:table-cell>
          <table:table-cell office:value-type="string">
            <text:p>tc-create-app, greek-apparatus-app</text:p>
          </table:table-cell>
          <table:table-cell office:value-type="string">
            <text:p>markdown-translatable, @unfoldingword/eslint-config</text:p>
          </table:table-cell>
          <table:table-cell office:value-type="string">
            <text:p>Bridgeconn/tc-create-offline, RevantCI/uw-lab, unfoldingWord-box3/greek-apparatus-app, unfoldingWord/tc-create-app</text:p>
          </table:table-cell>
          <table:table-cell office:value-type="string">
            <text:p>ancientTexts-net, mandolyte, Joel-C-Johnson, klappy, RoyalSix, superdav42, jincypjose, abelpz, Sterling (Jay) Scott, dependabot[bot], Dave, eliaspinero</text:p>
          </table:table-cell>
          <table:table-cell office:value-type="string">
            <text:p>0</text:p>
          </table:table-cell>
          <table:table-cell office:value-type="string">
            <text:p>0</text:p>
          </table:table-cell>
          <table:table-cell office:value-type="string">
            <text:p>https://github.com/unfoldingWord/datatable-translatable</text:p>
          </table:table-cell>
          <table:table-cell office:value-type="string">
            <text:p>2026-03-04T13:45:00Z</text:p>
          </table:table-cell>
        </table:table-row>
        <table:table-row>
          <table:table-cell office:value-type="string">
            <text:p>MediaWiki-USFMTag</text:p>
          </table:table-cell>
          <table:table-cell office:value-type="string">
            <text:p>unfoldingWord</text:p>
          </table:table-cell>
          <table:table-cell office:value-type="string">
            <text:p>PHP</text:p>
          </table:table-cell>
          <table:table-cell office:value-type="string">
            <text:p>True</text:p>
          </table:table-cell>
          <table:table-cell office:value-type="string">
            <text:p>False</text:p>
          </table:table-cell>
          <table:table-cell office:value-type="string">
            <text:p>2013-07-10T19:23:35Z</text:p>
          </table:table-cell>
          <table:table-cell office:value-type="string">
            <text:p>2013-07-10T19:23:26Z</text:p>
          </table:table-cell>
          <table:table-cell office:value-type="string">
            <text:p/>
          </table:table-cell>
          <table:table-cell office:value-type="string">
            <text:p>1</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 Door43</text:p>
          </table:table-cell>
          <table:table-cell office:value-type="string">
            <text:p>0</text:p>
          </table:table-cell>
          <table:table-cell office:value-type="string">
            <text:p>0</text:p>
          </table:table-cell>
          <table:table-cell office:value-type="string">
            <text:p>https://github.com/unfoldingWord/MediaWiki-USFMTag</text:p>
          </table:table-cell>
          <table:table-cell office:value-type="string">
            <text:p>2026-02-23T14:45:18Z</text:p>
          </table:table-cell>
        </table:table-row>
        <table:table-row>
          <table:table-cell office:value-type="string">
            <text:p>zulip-files</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6-02-21T13:15:07Z</text:p>
          </table:table-cell>
          <table:table-cell office:value-type="string">
            <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lightcc</text:p>
          </table:table-cell>
          <table:table-cell office:value-type="string">
            <text:p>0</text:p>
          </table:table-cell>
          <table:table-cell office:value-type="string">
            <text:p>0</text:p>
          </table:table-cell>
          <table:table-cell office:value-type="string">
            <text:p>https://github.com/unfoldingWord/zulip-files</text:p>
          </table:table-cell>
          <table:table-cell office:value-type="string">
            <text:p>2026-02-21T13:15:10Z</text:p>
          </table:table-cell>
        </table:table-row>
        <table:table-row>
          <table:table-cell office:value-type="string">
            <text:p>bt-servant-message-brok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20T00:14:28Z</text:p>
          </table:table-cell>
          <table:table-cell office:value-type="string">
            <text:p>2026-02-20T00:13:37Z</text:p>
          </table:table-cell>
          <table:table-cell office:value-type="string">
            <text:p/>
          </table:table-cell>
          <table:table-cell office:value-type="string">
            <text:p>1</text:p>
          </table:table-cell>
          <table:table-cell office:value-type="string">
            <text:p>0</text:p>
          </table:table-cell>
          <table:table-cell office:value-type="string">
            <text:p>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text:p>
          </table:table-cell>
          <table:table-cell office:value-type="string">
            <text:p>0</text:p>
          </table:table-cell>
          <table:table-cell office:value-type="string">
            <text:p>0</text:p>
          </table:table-cell>
          <table:table-cell office:value-type="string">
            <text:p>https://github.com/unfoldingWord/bt-servant-message-broker</text:p>
          </table:table-cell>
          <table:table-cell office:value-type="string">
            <text:p>2026-02-20T00:14:18Z</text:p>
          </table:table-cell>
        </table:table-row>
        <table:table-row>
          <table:table-cell office:value-type="string">
            <text:p>metric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18T15:31:33Z</text:p>
          </table:table-cell>
          <table:table-cell office:value-type="string">
            <text:p>2026-02-18T15:31:28Z</text:p>
          </table:table-cell>
          <table:table-cell office:value-type="string">
            <text:p/>
          </table:table-cell>
          <table:table-cell office:value-type="string">
            <text:p>2</text:p>
          </table:table-cell>
          <table:table-cell office:value-type="string">
            <text:p>2</text:p>
          </table:table-cell>
          <table:table-cell office:value-type="string">
            <text:p>12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yakob-aleksandrovich, richmahn, bspidel, jesse@unfoldingword.org, Jaap-Jan Swijnenburg, dependabot[bot], elgohr</text:p>
          </table:table-cell>
          <table:table-cell office:value-type="string">
            <text:p>0</text:p>
          </table:table-cell>
          <table:table-cell office:value-type="string">
            <text:p>0</text:p>
          </table:table-cell>
          <table:table-cell office:value-type="string">
            <text:p>https://github.com/unfoldingWord/metrics</text:p>
          </table:table-cell>
          <table:table-cell office:value-type="string">
            <text:p>2026-02-18T15:31:37Z</text:p>
          </table:table-cell>
        </table:table-row>
        <table:table-row>
          <table:table-cell office:value-type="string">
            <text:p>electronite</text:p>
          </table:table-cell>
          <table:table-cell office:value-type="string">
            <text:p>unfoldingWord</text:p>
          </table:table-cell>
          <table:table-cell office:value-type="string">
            <text:p>C++</text:p>
          </table:table-cell>
          <table:table-cell office:value-type="string">
            <text:p>False</text:p>
          </table:table-cell>
          <table:table-cell office:value-type="string">
            <text:p>True</text:p>
          </table:table-cell>
          <table:table-cell office:value-type="string">
            <text:p>2026-01-22T20:49:18Z</text:p>
          </table:table-cell>
          <table:table-cell office:value-type="string">
            <text:p>2022-12-08T15:12:19Z</text:p>
          </table:table-cell>
          <table:table-cell office:value-type="string">
            <text:p>2026-01-08T18:30:11Z</text:p>
          </table:table-cell>
          <table:table-cell office:value-type="string">
            <text:p>0</text:p>
          </table:table-cell>
          <table:table-cell office:value-type="string">
            <text:p>0</text:p>
          </table:table-cell>
          <table:table-cell office:value-type="string">
            <text:p>2755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electron</text:p>
          </table:table-cell>
          <table:table-cell office: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text:p>40</text:p>
          </table:table-cell>
          <table:table-cell office:value-type="string">
            <text:p>21029</text:p>
          </table:table-cell>
          <table:table-cell office:value-type="string">
            <text:p>https://github.com/unfoldingWord/electronite</text:p>
          </table:table-cell>
          <table:table-cell office:value-type="string">
            <text:p>2026-02-15T19:31:44Z</text:p>
          </table:table-cell>
        </table:table-row>
        <table:table-row>
          <table:table-cell office:value-type="string">
            <text:p>door43-preview-render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2-11T16:15:26Z</text:p>
          </table:table-cell>
          <table:table-cell office:value-type="string">
            <text:p>2026-02-11T16:15:23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door43-preview-render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alignment-remove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or43-preview-renderers</text:p>
          </table:table-cell>
          <table:table-cell office:value-type="string">
            <text:p>2026-02-11T16:15:30Z</text:p>
          </table:table-cell>
        </table:table-row>
        <table:table-row>
          <table:table-cell office:value-type="string">
            <text:p>data_tracking_impor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03T19:14:01Z</text:p>
          </table:table-cell>
          <table:table-cell office:value-type="string">
            <text:p>2026-02-03T19:13:59Z</text:p>
          </table:table-cell>
          <table:table-cell office:value-type="string">
            <text:p/>
          </table:table-cell>
          <table:table-cell office:value-type="string">
            <text:p>1</text:p>
          </table:table-cell>
          <table:table-cell office:value-type="string">
            <text:p>0</text:p>
          </table:table-cell>
          <table:table-cell office:value-type="string">
            <text:p>3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IanLindsley, drcox633</text:p>
          </table:table-cell>
          <table:table-cell office:value-type="string">
            <text:p>0</text:p>
          </table:table-cell>
          <table:table-cell office:value-type="string">
            <text:p>0</text:p>
          </table:table-cell>
          <table:table-cell office:value-type="string">
            <text:p>https://github.com/unfoldingWord/data_tracking_import</text:p>
          </table:table-cell>
          <table:table-cell office:value-type="string">
            <text:p>2026-02-03T19:14:08Z</text:p>
          </table:table-cell>
        </table:table-row>
        <table:table-row>
          <table:table-cell office:value-type="string">
            <text:p>odd-claude-plugin</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1-22T20:16:10Z</text:p>
          </table:table-cell>
          <table:table-cell office:value-type="string">
            <text:p>2026-01-22T20:16:07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text:p>
          </table:table-cell>
          <table:table-cell office:value-type="string">
            <text:p>0</text:p>
          </table:table-cell>
          <table:table-cell office:value-type="string">
            <text:p>0</text:p>
          </table:table-cell>
          <table:table-cell office:value-type="string">
            <text:p>https://github.com/unfoldingWord/odd-claude-plugin</text:p>
          </table:table-cell>
          <table:table-cell office:value-type="string">
            <text:p>2026-01-22T20:16:13Z</text:p>
          </table:table-cell>
        </table:table-row>
        <table:table-row>
          <table:table-cell office:value-type="string">
            <text:p>usfm-alignment-remover-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17:08Z</text:p>
          </table:table-cell>
          <table:table-cell office:value-type="string">
            <text:p>2026-01-21T23:17:06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usfm-alignment-remover</text:p>
          </table:table-cell>
          <table:table-cell office:value-type="string">
            <text:p/>
          </table:table-cell>
          <table:table-cell office:value-type="string">
            <text:p/>
          </table:table-cell>
          <table:table-cell office:value-type="string">
            <text:p/>
          </table:table-cell>
          <table:table-cell office:value-type="string">
            <text:p>twl-generator, door43-preview-app, door43-preview-renderers</text:p>
          </table:table-cell>
          <table:table-cell office:value-type="string">
            <text:p>usfm-js</text:p>
          </table:table-cell>
          <table:table-cell office:value-type="string">
            <text:p>unfoldingWord/door43-preview-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usfm-alignment-remover-app</text:p>
          </table:table-cell>
          <table:table-cell office:value-type="string">
            <text:p>2026-01-21T23:17:11Z</text:p>
          </table:table-cell>
        </table:table-row>
        <table:table-row>
          <table:table-cell office:value-type="string">
            <text:p>bt-servant-log-viewer</text:p>
          </table:table-cell>
          <table:table-cell office:value-type="string">
            <text:p>unfoldingWord</text:p>
          </table:table-cell>
          <table:table-cell office:value-type="string">
            <text:p>Svelte</text:p>
          </table:table-cell>
          <table:table-cell office:value-type="string">
            <text:p>False</text:p>
          </table:table-cell>
          <table:table-cell office:value-type="string">
            <text:p>False</text:p>
          </table:table-cell>
          <table:table-cell office:value-type="string">
            <text:p>2026-01-16T23:13:39Z</text:p>
          </table:table-cell>
          <table:table-cell office:value-type="string">
            <text:p>2026-01-16T23:13:06Z</text:p>
          </table:table-cell>
          <table:table-cell office:value-type="string">
            <text:p/>
          </table:table-cell>
          <table:table-cell office:value-type="string">
            <text:p>2</text:p>
          </table:table-cell>
          <table:table-cell office:value-type="string">
            <text:p>0</text:p>
          </table:table-cell>
          <table:table-cell office:value-type="string">
            <text:p>14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Lindsley, IanLindsley, codex, Codex Assistant</text:p>
          </table:table-cell>
          <table:table-cell office:value-type="string">
            <text:p>0</text:p>
          </table:table-cell>
          <table:table-cell office:value-type="string">
            <text:p>0</text:p>
          </table:table-cell>
          <table:table-cell office:value-type="string">
            <text:p>https://github.com/unfoldingWord/bt-servant-log-viewer</text:p>
          </table:table-cell>
          <table:table-cell office:value-type="string">
            <text:p>2026-01-16T23:13:43Z</text:p>
          </table:table-cell>
        </table:table-row>
        <table:table-row>
          <table:table-cell office:value-type="string">
            <text:p>bt-servant-engine</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23T20:10:31Z</text:p>
          </table:table-cell>
          <table:table-cell office:value-type="string">
            <text:p>2026-01-16T14:04:11Z</text:p>
          </table:table-cell>
          <table:table-cell office:value-type="string">
            <text:p>2026-04-24T14:42:44Z</text:p>
          </table:table-cell>
          <table:table-cell office:value-type="string">
            <text:p>35</text:p>
          </table:table-cell>
          <table:table-cell office:value-type="string">
            <text:p>0</text:p>
          </table:table-cell>
          <table:table-cell office:value-type="string">
            <text:p>39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abiatarprado, Claude Assistant, claude, Gemini, yakob-aleksandrovich, Ian Lindsley, Fly.io</text:p>
          </table:table-cell>
          <table:table-cell office:value-type="string">
            <text:p>6</text:p>
          </table:table-cell>
          <table:table-cell office:value-type="string">
            <text:p>0</text:p>
          </table:table-cell>
          <table:table-cell office:value-type="string">
            <text:p>https://github.com/unfoldingWord/bt-servant-engine</text:p>
          </table:table-cell>
          <table:table-cell office:value-type="string">
            <text:p>2026-01-16T14:04:21Z</text:p>
          </table:table-cell>
        </table:table-row>
        <table:table-row>
          <table:table-cell office:value-type="string">
            <text:p>bt-servant-engine-data-loader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1-15T00:36:38Z</text:p>
          </table:table-cell>
          <table:table-cell office:value-type="string">
            <text:p>2026-01-15T00:36:33Z</text:p>
          </table:table-cell>
          <table:table-cell office:value-type="string">
            <text:p/>
          </table:table-cell>
          <table:table-cell office:value-type="string">
            <text:p>0</text:p>
          </table:table-cell>
          <table:table-cell office:value-type="string">
            <text:p>0</text:p>
          </table:table-cell>
          <table:table-cell office:value-type="string">
            <text:p>6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text:p>
          </table:table-cell>
          <table:table-cell office:value-type="string">
            <text:p>0</text:p>
          </table:table-cell>
          <table:table-cell office:value-type="string">
            <text:p>0</text:p>
          </table:table-cell>
          <table:table-cell office:value-type="string">
            <text:p>https://github.com/unfoldingWord/bt-servant-engine-data-loaders</text:p>
          </table:table-cell>
          <table:table-cell office:value-type="string">
            <text:p>2026-01-15T00:36:42Z</text:p>
          </table:table-cell>
        </table:table-row>
        <table:table-row>
          <table:table-cell office:value-type="string">
            <text:p>Unlocked-Greek-New-Testament</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8-09-13T14:41:31Z</text:p>
          </table:table-cell>
          <table:table-cell office:value-type="string">
            <text:p>2018-09-13T14:41:30Z</text:p>
          </table:table-cell>
          <table:table-cell office:value-type="string">
            <text:p/>
          </table:table-cell>
          <table:table-cell office:value-type="string">
            <text:p>0</text:p>
          </table:table-cell>
          <table:table-cell office:value-type="string">
            <text:p>0</text:p>
          </table:table-cell>
          <table:table-cell office:value-type="string">
            <text:p>2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oddlprice, klappy, Tim, jag3773, timjore</text:p>
          </table:table-cell>
          <table:table-cell office:value-type="string">
            <text:p>0</text:p>
          </table:table-cell>
          <table:table-cell office:value-type="string">
            <text:p>0</text:p>
          </table:table-cell>
          <table:table-cell office:value-type="string">
            <text:p>https://github.com/unfoldingWord/Unlocked-Greek-New-Testament</text:p>
          </table:table-cell>
          <table:table-cell office:value-type="string">
            <text:p>2025-12-28T01:08:22Z</text:p>
          </table:table-cell>
        </table:table-row>
        <table:table-row>
          <table:table-cell office:value-type="string">
            <text:p>language-search</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8T16:25:04Z</text:p>
          </table:table-cell>
          <table:table-cell office:value-type="string">
            <text:p>2025-12-18T16:25:00Z</text:p>
          </table:table-cell>
          <table:table-cell office:value-type="string">
            <text:p/>
          </table:table-cell>
          <table:table-cell office:value-type="string">
            <text:p>0</text:p>
          </table:table-cell>
          <table:table-cell office:value-type="string">
            <text:p>0</text:p>
          </table:table-cell>
          <table:table-cell office:value-type="string">
            <text:p>1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root, paltman</text:p>
          </table:table-cell>
          <table:table-cell office:value-type="string">
            <text:p>0</text:p>
          </table:table-cell>
          <table:table-cell office:value-type="string">
            <text:p>0</text:p>
          </table:table-cell>
          <table:table-cell office:value-type="string">
            <text:p>https://github.com/unfoldingWord/language-search</text:p>
          </table:table-cell>
          <table:table-cell office:value-type="string">
            <text:p>2025-12-18T16:25:08Z</text:p>
          </table:table-cell>
        </table:table-row>
        <table:table-row>
          <table:table-cell office:value-type="string">
            <text:p>bt-servant-report-send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7T16:47:37Z</text:p>
          </table:table-cell>
          <table:table-cell office:value-type="string">
            <text:p>2025-12-17T16:47:32Z</text:p>
          </table:table-cell>
          <table:table-cell office:value-type="string">
            <text:p/>
          </table:table-cell>
          <table:table-cell office:value-type="string">
            <text:p>0</text:p>
          </table:table-cell>
          <table:table-cell office:value-type="string">
            <text:p>0</text:p>
          </table:table-cell>
          <table:table-cell office:value-type="string">
            <text:p>2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text:p>
          </table:table-cell>
          <table:table-cell office:value-type="string">
            <text:p>0</text:p>
          </table:table-cell>
          <table:table-cell office:value-type="string">
            <text:p>0</text:p>
          </table:table-cell>
          <table:table-cell office:value-type="string">
            <text:p>https://github.com/unfoldingWord/bt-servant-report-sender</text:p>
          </table:table-cell>
          <table:table-cell office:value-type="string">
            <text:p>2025-12-17T16:47:41Z</text:p>
          </table:table-cell>
        </table:table-row>
        <table:table-row>
          <table:table-cell office:value-type="string">
            <text:p>kr1-data-script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2T04:31:56Z</text:p>
          </table:table-cell>
          <table:table-cell office:value-type="string">
            <text:p>2025-12-12T04:31:51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drcox633</text:p>
          </table:table-cell>
          <table:table-cell office:value-type="string">
            <text:p>0</text:p>
          </table:table-cell>
          <table:table-cell office:value-type="string">
            <text:p>0</text:p>
          </table:table-cell>
          <table:table-cell office:value-type="string">
            <text:p>https://github.com/unfoldingWord/kr1-data-scripts</text:p>
          </table:table-cell>
          <table:table-cell office:value-type="string">
            <text:p>2025-12-12T04:31:59Z</text:p>
          </table:table-cell>
        </table:table-row>
        <table:table-row>
          <table:table-cell office:value-type="string">
            <text:p>tsv7-tn-cleanup-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11T23:11:16Z</text:p>
          </table:table-cell>
          <table:table-cell office:value-type="string">
            <text:p>2025-12-11T23:11:14Z</text:p>
          </table:table-cell>
          <table:table-cell office:value-type="string">
            <text:p/>
          </table:table-cell>
          <table:table-cell office:value-type="string">
            <text:p>1</text:p>
          </table:table-cell>
          <table:table-cell office:value-type="string">
            <text:p>0</text:p>
          </table:table-cell>
          <table:table-cell office:value-type="string">
            <text:p>95</text:p>
          </table:table-cell>
          <table:table-cell office:value-type="string">
            <text:p/>
          </table:table-cell>
          <table:table-cell office:value-type="string">
            <text:p>tsv7-tn-cleanup-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7-tn-cleanup-app</text:p>
          </table:table-cell>
          <table:table-cell office:value-type="string">
            <text:p>2025-12-11T23:11:20Z</text:p>
          </table:table-cell>
        </table:table-row>
        <table:table-row>
          <table:table-cell office:value-type="string">
            <text:p>ulb-e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6-23T20:21:08Z</text:p>
          </table:table-cell>
          <table:table-cell office:value-type="string">
            <text:p>2017-06-23T20:20:49Z</text:p>
          </table:table-cell>
          <table:table-cell office:value-type="string">
            <text:p>2016-10-04T01:18:57Z</text:p>
          </table:table-cell>
          <table:table-cell office:value-type="string">
            <text:p>0</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ag3773</text:p>
          </table:table-cell>
          <table:table-cell office:value-type="string">
            <text:p>3</text:p>
          </table:table-cell>
          <table:table-cell office:value-type="string">
            <text:p>0</text:p>
          </table:table-cell>
          <table:table-cell office:value-type="string">
            <text:p>https://github.com/unfoldingWord/ulb-en</text:p>
          </table:table-cell>
          <table:table-cell office:value-type="string">
            <text:p>2025-12-05T15:37:06Z</text:p>
          </table:table-cell>
        </table:table-row>
        <table:table-row>
          <table:table-cell office:value-type="string">
            <text:p>websit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5-05-31T15:07:2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oryi, jeremymoore, kellyvivancox, aagraston, richmahn, yakob-aleksandrovich, sethstoll3, jag3773, generosityx</text:p>
          </table:table-cell>
          <table:table-cell office:value-type="string">
            <text:p>0</text:p>
          </table:table-cell>
          <table:table-cell office:value-type="string">
            <text:p>0</text:p>
          </table:table-cell>
          <table:table-cell office:value-type="string">
            <text:p>https://github.com/unfoldingWord/website</text:p>
          </table:table-cell>
          <table:table-cell office:value-type="string">
            <text:p>2025-12-03T19:14:44Z</text:p>
          </table:table-cell>
        </table:table-row>
        <table:table-row>
          <table:table-cell office:value-type="string">
            <text:p>data_tracking_wrangler</text:p>
          </table:table-cell>
          <table:table-cell office:value-type="string">
            <text:p>unfoldingWord</text:p>
          </table:table-cell>
          <table:table-cell office:value-type="string">
            <text:p>R</text:p>
          </table:table-cell>
          <table:table-cell office:value-type="string">
            <text:p>False</text:p>
          </table:table-cell>
          <table:table-cell office:value-type="string">
            <text:p>False</text:p>
          </table:table-cell>
          <table:table-cell office:value-type="string">
            <text:p>2025-12-02T16:38:51Z</text:p>
          </table:table-cell>
          <table:table-cell office:value-type="string">
            <text:p>2025-12-02T16:38:41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drcox633, Derek Cox</text:p>
          </table:table-cell>
          <table:table-cell office:value-type="string">
            <text:p>0</text:p>
          </table:table-cell>
          <table:table-cell office:value-type="string">
            <text:p>0</text:p>
          </table:table-cell>
          <table:table-cell office:value-type="string">
            <text:p>https://github.com/unfoldingWord/data_tracking_wrangler</text:p>
          </table:table-cell>
          <table:table-cell office:value-type="string">
            <text:p>2025-12-02T16:38:55Z</text:p>
          </table:table-cell>
        </table:table-row>
        <table:table-row>
          <table:table-cell office:value-type="string">
            <text:p>tsv-groupdata-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01T15:56:28Z</text:p>
          </table:table-cell>
          <table:table-cell office:value-type="string">
            <text:p>2025-12-01T15:18:56Z</text:p>
          </table:table-cell>
          <table:table-cell office:value-type="string">
            <text:p>2021-08-27T21:03:12Z</text:p>
          </table:table-cell>
          <table:table-cell office:value-type="string">
            <text:p>7</text:p>
          </table:table-cell>
          <table:table-cell office:value-type="string">
            <text:p>7</text:p>
          </table:table-cell>
          <table:table-cell office:value-type="string">
            <text:p>284</text:p>
          </table:table-cell>
          <table:table-cell office:value-type="string">
            <text:p/>
          </table:table-cell>
          <table:table-cell office:value-type="string">
            <text:p>tsv-groupdata-parser</text:p>
          </table:table-cell>
          <table:table-cell office:value-type="string">
            <text:p>False</text:p>
          </table:table-cell>
          <table:table-cell office:value-type="string">
            <text:p>6516</text:p>
          </table:table-cell>
          <table:table-cell office:value-type="string">
            <text:p>2024-10-16T17:43:33.516Z</text:p>
          </table:table-cell>
          <table:table-cell office:value-type="string">
            <text:p>translationCore, uw-quote-helpers, tc-source-content-updater, checking-tool-rcl, checking-extension, pdf-generator</text:p>
          </table:table-cell>
          <table:table-cell office:value-type="string">
            <text:p>bible-reference-range, uw-tsv-parser, string-punctuation-tokenizer</text:p>
          </table:table-cell>
          <table:table-cell office: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text:p>mannycolon, PhotoNomad0, da1nerd, richmahn, RoyalSix, mandolyte, Sterling (Jay) Scott, yakob-aleksandrovich</text:p>
          </table:table-cell>
          <table:table-cell office:value-type="string">
            <text:p>1</text:p>
          </table:table-cell>
          <table:table-cell office:value-type="string">
            <text:p>0</text:p>
          </table:table-cell>
          <table:table-cell office:value-type="string">
            <text:p>https://github.com/unfoldingWord/tsv-groupdata-parser</text:p>
          </table:table-cell>
          <table:table-cell office:value-type="string">
            <text:p>2025-12-01T15:19:13Z</text:p>
          </table:table-cell>
        </table:table-row>
        <table:table-row>
          <table:table-cell office:value-type="string">
            <text:p>dbbackupr2</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1-27T12:19:22Z</text:p>
          </table:table-cell>
          <table:table-cell office:value-type="string">
            <text:p>2025-11-27T12:19:17Z</text:p>
          </table:table-cell>
          <table:table-cell office:value-type="string">
            <text:p>2024-07-09T13:34:50Z</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2</text:p>
          </table:table-cell>
          <table:table-cell office:value-type="string">
            <text:p>9</text:p>
          </table:table-cell>
          <table:table-cell office:value-type="string">
            <text:p>https://github.com/unfoldingWord/dbbackupr2</text:p>
          </table:table-cell>
          <table:table-cell office:value-type="string">
            <text:p>2025-11-27T12:19:25Z</text:p>
          </table:table-cell>
        </table:table-row>
        <table:table-row>
          <table:table-cell office:value-type="string">
            <text:p>door43-preview-action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1-23T22:32:56Z</text:p>
          </table:table-cell>
          <table:table-cell office:value-type="string">
            <text:p>2025-11-23T22:32:54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or43-preview-actions</text:p>
          </table:table-cell>
          <table:table-cell office:value-type="string">
            <text:p>2025-11-23T22:33:00Z</text:p>
          </table:table-cell>
        </table:table-row>
        <table:table-row>
          <table:table-cell office:value-type="string">
            <text:p>node-cli-add-gl-quotes-to-tsv-fil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22:53:14Z</text:p>
          </table:table-cell>
          <table:table-cell office:value-type="string">
            <text:p>2025-11-03T22:53:12Z</text:p>
          </table:table-cell>
          <table:table-cell office:value-type="string">
            <text:p>2025-04-23T20:48:30Z</text:p>
          </table:table-cell>
          <table:table-cell office:value-type="string">
            <text:p>0</text:p>
          </table:table-cell>
          <table:table-cell office:value-type="string">
            <text:p>0</text:p>
          </table:table-cell>
          <table:table-cell office:value-type="string">
            <text:p>29</text:p>
          </table:table-cell>
          <table:table-cell office:value-type="string">
            <text:p/>
          </table:table-cell>
          <table:table-cell office:value-type="string">
            <text:p>add-gl-quotes-to-tsv-fil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1</text:p>
          </table:table-cell>
          <table:table-cell office:value-type="string">
            <text:p>0</text:p>
          </table:table-cell>
          <table:table-cell office:value-type="string">
            <text:p>https://github.com/unfoldingWord/node-cli-add-gl-quotes-to-tsv-files</text:p>
          </table:table-cell>
          <table:table-cell office:value-type="string">
            <text:p>2025-11-03T22:53:18Z</text:p>
          </table:table-cell>
        </table:table-row>
        <table:table-row>
          <table:table-cell office:value-type="string">
            <text:p>tc-source-content-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0-28T18:40:43Z</text:p>
          </table:table-cell>
          <table:table-cell office:value-type="string">
            <text:p>2025-10-28T18:14:38Z</text:p>
          </table:table-cell>
          <table:table-cell office:value-type="string">
            <text:p>2021-08-27T21:43:21Z</text:p>
          </table:table-cell>
          <table:table-cell office:value-type="string">
            <text:p>0</text:p>
          </table:table-cell>
          <table:table-cell office:value-type="string">
            <text:p>0</text:p>
          </table:table-cell>
          <table:table-cell office:value-type="string">
            <text:p>721</text:p>
          </table:table-cell>
          <table:table-cell office:value-type="string">
            <text:p/>
          </table:table-cell>
          <table:table-cell office:value-type="string">
            <text:p>tc-source-content-updater</text:p>
          </table:table-cell>
          <table:table-cell office:value-type="string">
            <text:p>False</text:p>
          </table:table-cell>
          <table:table-cell office:value-type="string">
            <text:p>7859</text:p>
          </table:table-cell>
          <table:table-cell office:value-type="string">
            <text:p>2025-10-28T18:16:22.466Z</text:p>
          </table:table-cell>
          <table:table-cell office:value-type="string">
            <text:p>translationCore, checking-tool-rcl, checking-extension, pdf-generator</text:p>
          </table:table-cell>
          <table:table-cell office:value-type="string">
            <text:p>string-punctuation-tokenizer, tsv-groupdata-parser, usfm-js</text:p>
          </table:table-cell>
          <table:table-cell office:value-type="string">
            <text:p>FoustAndrew/wordAlignment, unfoldingWord/tx-job-handler, unfoldingWord/wordAlignment, unfoldingWord/checking-tool-wrapper, unfoldingWord-dev/uw-pdf-conversion-tools, unfoldingWord-dev/tools, unfoldingWord/translationCore</text:p>
          </table:table-cell>
          <table:table-cell office:value-type="string">
            <text:p>PhotoNomad0, mannycolon, richmahn, RoyalSix, dependabot-support, Sterling (Jay) Scott, da1nerd, bspidel</text:p>
          </table:table-cell>
          <table:table-cell office:value-type="string">
            <text:p>2</text:p>
          </table:table-cell>
          <table:table-cell office:value-type="string">
            <text:p>0</text:p>
          </table:table-cell>
          <table:table-cell office:value-type="string">
            <text:p>https://github.com/unfoldingWord/tc-source-content-updater</text:p>
          </table:table-cell>
          <table:table-cell office:value-type="string">
            <text:p>2025-10-28T18:14:43Z</text:p>
          </table:table-cell>
        </table:table-row>
        <table:table-row>
          <table:table-cell office:value-type="string">
            <text:p>checking-tool-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5-10-30T11:33:32Z</text:p>
          </table:table-cell>
          <table:table-cell office:value-type="string">
            <text:p>2025-10-20T15:57:27Z</text:p>
          </table:table-cell>
          <table:table-cell office:value-type="string">
            <text:p/>
          </table:table-cell>
          <table:table-cell office:value-type="string">
            <text:p>15</text:p>
          </table:table-cell>
          <table:table-cell office:value-type="string">
            <text:p>4</text:p>
          </table:table-cell>
          <table:table-cell office:value-type="string">
            <text:p>108</text:p>
          </table:table-cell>
          <table:table-cell office:value-type="string">
            <text:p/>
          </table:table-cell>
          <table:table-cell office:value-type="string">
            <text:p>checking-tool-rcl</text:p>
          </table:table-cell>
          <table:table-cell office:value-type="string">
            <text:p>False</text:p>
          </table:table-cell>
          <table:table-cell office:value-type="string">
            <text:p>6065</text:p>
          </table:table-cell>
          <table:table-cell office:value-type="string">
            <text:p>2025-10-20T15:58:23.259Z</text:p>
          </table:table-cell>
          <table:table-cell office:value-type="string">
            <text:p/>
          </table:table-cell>
          <table:table-cell office:value-type="string">
            <text:p>bible-reference-range, string-punctuation-tokenizer, tc-strings, usfm-js, uw-tsv-parser, word-aligner, word-aligner-lib, wordmap-lexer, tc-source-content-updater, tsv-groupdata-parser</text:p>
          </table:table-cell>
          <table:table-cell office:value-type="string">
            <text:p>unfoldingWord/word-aligner-rcl</text:p>
          </table:table-cell>
          <table:table-cell office:value-type="string">
            <text:p>PhotoNomad0, jincypjose</text:p>
          </table:table-cell>
          <table:table-cell office:value-type="string">
            <text:p>0</text:p>
          </table:table-cell>
          <table:table-cell office:value-type="string">
            <text:p>0</text:p>
          </table:table-cell>
          <table:table-cell office:value-type="string">
            <text:p>https://github.com/unfoldingWord/checking-tool-rcl</text:p>
          </table:table-cell>
          <table:table-cell office:value-type="string">
            <text:p>2025-10-20T15:57:32Z</text:p>
          </table:table-cell>
        </table:table-row>
        <table:table-row>
          <table:table-cell office:value-type="string">
            <text:p>fred-zulip-bo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0-07T20:31:27Z</text:p>
          </table:table-cell>
          <table:table-cell office:value-type="string">
            <text:p>2025-10-07T20:31:22Z</text:p>
          </table:table-cell>
          <table:table-cell office:value-type="string">
            <text:p/>
          </table:table-cell>
          <table:table-cell office:value-type="string">
            <text:p>0</text:p>
          </table:table-cell>
          <table:table-cell office:value-type="string">
            <text:p>0</text:p>
          </table:table-cell>
          <table:table-cell office:value-type="string">
            <text:p>7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jl011, Codex Assistant, ILindsley, abiatarprado, IanLindsley, drcox633</text:p>
          </table:table-cell>
          <table:table-cell office:value-type="string">
            <text:p>0</text:p>
          </table:table-cell>
          <table:table-cell office:value-type="string">
            <text:p>0</text:p>
          </table:table-cell>
          <table:table-cell office:value-type="string">
            <text:p>https://github.com/unfoldingWord/fred-zulip-bot</text:p>
          </table:table-cell>
          <table:table-cell office:value-type="string">
            <text:p>2025-10-07T20:31:31Z</text:p>
          </table:table-cell>
        </table:table-row>
        <table:table-row>
          <table:table-cell office:value-type="string">
            <text:p>unfoldingWord</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19-10-16T20:09:03Z</text:p>
          </table:table-cell>
          <table:table-cell office:value-type="string">
            <text:p>2019-10-16T20:09:0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unfoldingWord</text:p>
          </table:table-cell>
          <table:table-cell office:value-type="string">
            <text:p>2025-10-02T14:13:18Z</text:p>
          </table:table-cell>
        </table:table-row>
        <table:table-row>
          <table:table-cell office:value-type="string">
            <text:p>unfoldingWord.github.io-ol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18-11-28T20:38:37Z</text:p>
          </table:table-cell>
          <table:table-cell office:value-type="string">
            <text:p>2018-11-28T20:31:56Z</text:p>
          </table:table-cell>
          <table:table-cell office:value-type="string">
            <text:p/>
          </table:table-cell>
          <table:table-cell office:value-type="string">
            <text:p>0</text:p>
          </table:table-cell>
          <table:table-cell office:value-type="string">
            <text:p>0</text:p>
          </table:table-cell>
          <table:table-cell office:value-type="string">
            <text:p>105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phillip-hopper, Tim, codemis, Jesse A. Griffin, Tim J, benjore, Phil Hopper, root, jesse@unfoldingword.org, timjore, Apache, Richard Mahn, toddlprice, Gogs, russp41</text:p>
          </table:table-cell>
          <table:table-cell office:value-type="string">
            <text:p>0</text:p>
          </table:table-cell>
          <table:table-cell office:value-type="string">
            <text:p>0</text:p>
          </table:table-cell>
          <table:table-cell office:value-type="string">
            <text:p>https://github.com/unfoldingWord/unfoldingWord.github.io-old</text:p>
          </table:table-cell>
          <table:table-cell office:value-type="string">
            <text:p>2025-10-02T14:12:10Z</text:p>
          </table:table-cell>
        </table:table-row>
        <table:table-row>
          <table:table-cell office:value-type="string">
            <text:p>uW-Tools-Collab</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5-09-12T15:52:46Z</text:p>
          </table:table-cell>
          <table:table-cell office:value-type="string">
            <text:p>2025-09-12T15:52:46Z</text:p>
          </table:table-cell>
          <table:table-cell office:value-type="string">
            <text:p/>
          </table:table-cell>
          <table:table-cell office:value-type="string">
            <text:p>0</text:p>
          </table:table-cell>
          <table:table-cell office:value-type="string">
            <text:p>0</text:p>
          </table:table-cell>
          <table:table-cell office:value-type="string">
            <text:p>3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birchamp</text:p>
          </table:table-cell>
          <table:table-cell office:value-type="string">
            <text:p>0</text:p>
          </table:table-cell>
          <table:table-cell office:value-type="string">
            <text:p>0</text:p>
          </table:table-cell>
          <table:table-cell office:value-type="string">
            <text:p>https://github.com/unfoldingWord/uW-Tools-Collab</text:p>
          </table:table-cell>
          <table:table-cell office:value-type="string">
            <text:p>2025-09-12T15:52:50Z</text:p>
          </table:table-cell>
        </table:table-row>
        <table:table-row>
          <table:table-cell office:value-type="string">
            <text:p>lambda-tw-strongs-list-generator</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5-09-10T12:36:08Z</text:p>
          </table:table-cell>
          <table:table-cell office:value-type="string">
            <text:p>2025-09-10T12:36:07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lambda-tw-strongs-list-generator</text:p>
          </table:table-cell>
          <table:table-cell office:value-type="string">
            <text:p>2025-09-10T12:36:11Z</text:p>
          </table:table-cell>
        </table:table-row>
        <table:table-row>
          <table:table-cell office:value-type="string">
            <text:p>door43-preview-serv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True</text:p>
          </table:table-cell>
          <table:table-cell office:value-type="string">
            <text:p>2024-05-23T13:53:24Z</text:p>
          </table:table-cell>
          <table:table-cell office:value-type="string">
            <text:p>2024-05-23T13:53:22Z</text:p>
          </table:table-cell>
          <table:table-cell office:value-type="string">
            <text:p>2024-05-22T20:17:13Z</text:p>
          </table:table-cell>
          <table:table-cell office:value-type="string">
            <text:p>0</text:p>
          </table:table-cell>
          <table:table-cell office:value-type="string">
            <text:p>0</text:p>
          </table:table-cell>
          <table:table-cell office:value-type="string">
            <text:p>85</text:p>
          </table:table-cell>
          <table:table-cell office:value-type="string">
            <text:p/>
          </table:table-cell>
          <table:table-cell office:value-type="string">
            <text:p>door43-preview-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jmne/puppeteer-html2pdf</text:p>
          </table:table-cell>
          <table:table-cell office:value-type="string">
            <text:p>ccjmne, richmahn, bmestanov, redbaron-gt</text:p>
          </table:table-cell>
          <table:table-cell office:value-type="string">
            <text:p>1</text:p>
          </table:table-cell>
          <table:table-cell office:value-type="string">
            <text:p>0</text:p>
          </table:table-cell>
          <table:table-cell office:value-type="string">
            <text:p>https://github.com/unfoldingWord/door43-preview-server</text:p>
          </table:table-cell>
          <table:table-cell office:value-type="string">
            <text:p>2025-09-09T09:17:22Z</text:p>
          </table:table-cell>
        </table:table-row>
        <table:table-row>
          <table:table-cell office:value-type="string">
            <text:p>obs-pdf</text:p>
          </table:table-cell>
          <table:table-cell office:value-type="string">
            <text:p>unfoldingWord</text:p>
          </table:table-cell>
          <table:table-cell office:value-type="string">
            <text:p>TeX</text:p>
          </table:table-cell>
          <table:table-cell office:value-type="string">
            <text:p>True</text:p>
          </table:table-cell>
          <table:table-cell office:value-type="string">
            <text:p>False</text:p>
          </table:table-cell>
          <table:table-cell office:value-type="string">
            <text:p>2024-06-05T21:37:29Z</text:p>
          </table:table-cell>
          <table:table-cell office:value-type="string">
            <text:p>2020-07-01T09:33:35Z</text:p>
          </table:table-cell>
          <table:table-cell office:value-type="string">
            <text:p/>
          </table:table-cell>
          <table:table-cell office:value-type="string">
            <text:p>5</text:p>
          </table:table-cell>
          <table:table-cell office:value-type="string">
            <text:p>0</text:p>
          </table:table-cell>
          <table:table-cell office:value-type="string">
            <text:p>12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phillip-hopper, Phil Hopper</text:p>
          </table:table-cell>
          <table:table-cell office:value-type="string">
            <text:p>0</text:p>
          </table:table-cell>
          <table:table-cell office:value-type="string">
            <text:p>0</text:p>
          </table:table-cell>
          <table:table-cell office:value-type="string">
            <text:p>https://github.com/unfoldingWord/obs-pdf</text:p>
          </table:table-cell>
          <table:table-cell office:value-type="string">
            <text:p>2025-09-09T09:10:04Z</text:p>
          </table:table-cell>
        </table:table-row>
        <table:table-row>
          <table:table-cell office:value-type="string">
            <text:p>ts-v2-catalog-backport</text:p>
          </table:table-cell>
          <table:table-cell office:value-type="string">
            <text:p>unfoldingWord</text:p>
          </table:table-cell>
          <table:table-cell office:value-type="string">
            <text:p>Python</text:p>
          </table:table-cell>
          <table:table-cell office:value-type="string">
            <text:p>True</text:p>
          </table:table-cell>
          <table:table-cell office:value-type="string">
            <text:p>False</text:p>
          </table:table-cell>
          <table:table-cell office:value-type="string">
            <text:p>2022-12-31T07:59:27Z</text:p>
          </table:table-cell>
          <table:table-cell office:value-type="string">
            <text:p>2022-06-02T18:06:07Z</text:p>
          </table:table-cell>
          <table:table-cell office:value-type="string">
            <text:p>2022-06-01T22:42:37Z</text:p>
          </table:table-cell>
          <table:table-cell office:value-type="string">
            <text:p>1</text:p>
          </table:table-cell>
          <table:table-cell office:value-type="string">
            <text:p>1</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2</text:p>
          </table:table-cell>
          <table:table-cell office:value-type="string">
            <text:p>0</text:p>
          </table:table-cell>
          <table:table-cell office:value-type="string">
            <text:p>https://github.com/unfoldingWord/ts-v2-catalog-backport</text:p>
          </table:table-cell>
          <table:table-cell office:value-type="string">
            <text:p>2025-09-09T08:54:13Z</text:p>
          </table:table-cell>
        </table:table-row>
        <table:table-row>
          <table:table-cell office:value-type="string">
            <text:p>wordMA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2-18T15:24:32Z</text:p>
          </table:table-cell>
          <table:table-cell office:value-type="string">
            <text:p>2020-07-20T13:09:49Z</text:p>
          </table:table-cell>
          <table:table-cell office:value-type="string">
            <text:p>2020-01-21T15:05:54Z</text:p>
          </table:table-cell>
          <table:table-cell office:value-type="string">
            <text:p>20</text:p>
          </table:table-cell>
          <table:table-cell office:value-type="string">
            <text:p>14</text:p>
          </table:table-cell>
          <table:table-cell office:value-type="string">
            <text:p>329</text:p>
          </table:table-cell>
          <table:table-cell office:value-type="string">
            <text:p/>
          </table:table-cell>
          <table:table-cell office:value-type="string">
            <text:p>wordmap</text:p>
          </table:table-cell>
          <table:table-cell office:value-type="string">
            <text:p/>
          </table:table-cell>
          <table:table-cell office:value-type="string">
            <text:p/>
          </table:table-cell>
          <table:table-cell office:value-type="string">
            <text:p/>
          </table:table-cell>
          <table:table-cell office:value-type="string">
            <text:p>translationCore, wordAlignment, word-aligner-rcl, uw-wordmapbooster, wordmap-mt, wordmap-react-toolkit</text:p>
          </table:table-cell>
          <table:table-cell office:value-type="string">
            <text:p>wordmap-lexer</text:p>
          </table:table-cell>
          <table:table-cell office: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text:p>da1nerd, mannycolon, RoyalSix, dependabot-support, PhotoNomad0, klappy, dependabot[bot], bspidel, jag3773, Sterling (Jay) Scott</text:p>
          </table:table-cell>
          <table:table-cell office:value-type="string">
            <text:p>10</text:p>
          </table:table-cell>
          <table:table-cell office:value-type="string">
            <text:p>0</text:p>
          </table:table-cell>
          <table:table-cell office:value-type="string">
            <text:p>https://github.com/unfoldingWord/wordMAP</text:p>
          </table:table-cell>
          <table:table-cell office:value-type="string">
            <text:p>2025-08-25T16:40:45Z</text:p>
          </table:table-cell>
        </table:table-row>
        <table:table-row>
          <table:table-cell office:value-type="string">
            <text:p>download-link-tracker</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5-06-06T21:39:43Z</text:p>
          </table:table-cell>
          <table:table-cell office:value-type="string">
            <text:p>2025-06-06T21:39:41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wnload-link-tracker</text:p>
          </table:table-cell>
          <table:table-cell office:value-type="string">
            <text:p>2025-06-06T21:39:46Z</text:p>
          </table:table-cell>
        </table:table-row>
        <table:table-row>
          <table:table-cell office:value-type="string">
            <text:p>uw-website-resource-version-updater</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5-06-04T22:06:05Z</text:p>
          </table:table-cell>
          <table:table-cell office:value-type="string">
            <text:p>2025-06-04T22:06:02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uw-website-resource-version-updater</text:p>
          </table:table-cell>
          <table:table-cell office:value-type="string">
            <text:p>2025-06-04T22:06:08Z</text:p>
          </table:table-cell>
        </table:table-row>
        <table:table-row>
          <table:table-cell office:value-type="string">
            <text:p>discourse-mermai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3-07-26T14:38:59Z</text:p>
          </table:table-cell>
          <table:table-cell office:value-type="string">
            <text:p>2023-07-26T14:38:59Z</text:p>
          </table:table-cell>
          <table:table-cell office:value-type="string">
            <text:p/>
          </table:table-cell>
          <table:table-cell office:value-type="string">
            <text:p>4</text:p>
          </table:table-cell>
          <table:table-cell office:value-type="string">
            <text:p>2</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ishabhlakhotia, jjaffeux</text:p>
          </table:table-cell>
          <table:table-cell office:value-type="string">
            <text:p>0</text:p>
          </table:table-cell>
          <table:table-cell office:value-type="string">
            <text:p>0</text:p>
          </table:table-cell>
          <table:table-cell office:value-type="string">
            <text:p>https://github.com/unfoldingWord/discourse-mermaid</text:p>
          </table:table-cell>
          <table:table-cell office:value-type="string">
            <text:p>2025-05-13T01:56:41Z</text:p>
          </table:table-cell>
        </table:table-row>
        <table:table-row>
          <table:table-cell office:value-type="string">
            <text:p>markdown-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4-04T20:57:49Z</text:p>
          </table:table-cell>
          <table:table-cell office:value-type="string">
            <text:p>2023-03-08T14:57:07Z</text:p>
          </table:table-cell>
          <table:table-cell office:value-type="string">
            <text:p/>
          </table:table-cell>
          <table:table-cell office:value-type="string">
            <text:p>20</text:p>
          </table:table-cell>
          <table:table-cell office:value-type="string">
            <text:p>20</text:p>
          </table:table-cell>
          <table:table-cell office:value-type="string">
            <text:p>333</text:p>
          </table:table-cell>
          <table:table-cell office:value-type="string">
            <text:p/>
          </table:table-cell>
          <table:table-cell office:value-type="string">
            <text:p>markdown-translatable</text:p>
          </table:table-cell>
          <table:table-cell office:value-type="string">
            <text:p>False</text:p>
          </table:table-cell>
          <table:table-cell office:value-type="string">
            <text:p>19649</text:p>
          </table:table-cell>
          <table:table-cell office:value-type="string">
            <text:p>2023-03-07T15:00:29.476Z</text:p>
          </table:table-cell>
          <table:table-cell office:value-type="string">
            <text:p>gateway-admin, gateway-edit, tc-create-app, gitea-react-toolkit, translation-helps-rcl, scripture-resources-rcl, datatable-translatable, resource-workspace-rcl, resource-checker, create-app, next-js-template, resource-container-rcl, pdf-generator-rcl, hello-dcs-react-component-library, obs-pdf-poc, md-tsv-converter-app, book-package-viewer-poc, gitea-offline-poc, scripture-burrito-react-jsonschema-form, tsv-editor</text:p>
          </table:table-cell>
          <table:table-cell office:value-type="string">
            <text:p>@unfoldingword/eslint-config</text:p>
          </table:table-cell>
          <table:table-cell office: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text:p>klappy, ancientTexts-net, RoyalSix, mannycolon, mandolyte, superdav42, Joel-C-Johnson, Sterling (Jay) Scott, jincypjose, dependabot[bot], PhotoNomad0, larsgson</text:p>
          </table:table-cell>
          <table:table-cell office:value-type="string">
            <text:p>0</text:p>
          </table:table-cell>
          <table:table-cell office:value-type="string">
            <text:p>0</text:p>
          </table:table-cell>
          <table:table-cell office:value-type="string">
            <text:p>https://github.com/unfoldingWord/markdown-translatable</text:p>
          </table:table-cell>
          <table:table-cell office:value-type="string">
            <text:p>2025-04-03T14:40:01Z</text:p>
          </table:table-cell>
        </table:table-row>
        <table:table-row>
          <table:table-cell office:value-type="string">
            <text:p>open-langu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5-02-06T18:22:40Z</text:p>
          </table:table-cell>
          <table:table-cell office:value-type="string">
            <text:p>2025-02-06T18:22:33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openlangu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amueljd</text:p>
          </table:table-cell>
          <table:table-cell office:value-type="string">
            <text:p>0</text:p>
          </table:table-cell>
          <table:table-cell office:value-type="string">
            <text:p>0</text:p>
          </table:table-cell>
          <table:table-cell office:value-type="string">
            <text:p>https://github.com/unfoldingWord/open-languages</text:p>
          </table:table-cell>
          <table:table-cell office:value-type="string">
            <text:p>2025-02-06T18:22:44Z</text:p>
          </table:table-cell>
        </table:table-row>
        <table:table-row>
          <table:table-cell office:value-type="string">
            <text:p>tc-ui-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2-31T18:53:36Z</text:p>
          </table:table-cell>
          <table:table-cell office:value-type="string">
            <text:p>2024-12-31T18:52:39Z</text:p>
          </table:table-cell>
          <table:table-cell office:value-type="string">
            <text:p>2019-02-06T21:38:09Z</text:p>
          </table:table-cell>
          <table:table-cell office:value-type="string">
            <text:p>34</text:p>
          </table:table-cell>
          <table:table-cell office:value-type="string">
            <text:p>33</text:p>
          </table:table-cell>
          <table:table-cell office:value-type="string">
            <text:p>1973</text:p>
          </table:table-cell>
          <table:table-cell office:value-type="string">
            <text:p/>
          </table:table-cell>
          <table:table-cell office:value-type="string">
            <text:p>tc-ui-toolkit</text:p>
          </table:table-cell>
          <table:table-cell office:value-type="string">
            <text:p>False</text:p>
          </table:table-cell>
          <table:table-cell office:value-type="string">
            <text:p>29580</text:p>
          </table:table-cell>
          <table:table-cell office:value-type="string">
            <text:p>2024-12-31T18:53:34.752Z</text:p>
          </table:table-cell>
          <table:table-cell office:value-type="string">
            <text:p>gateway-admin, translationCore, wordAlignment, gateway-edit, tc-create-app, single-scripture-rcl, translation-helps-rcl, scripture-resources-rcl, bsa, checking-tool-wrapper, alignment-playground, next-js-template</text:p>
          </table:table-cell>
          <table:table-cell office:value-type="string">
            <text:p>string-punctuation-tokenizer, word-aligner, usfm-js</text:p>
          </table:table-cell>
          <table:table-cell office: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text:p>mannycolon, PhotoNomad0, RoyalSix, da1nerd, richmahn, Sterling (Jay) Scott, bspidel, dependabot-support</text:p>
          </table:table-cell>
          <table:table-cell office:value-type="string">
            <text:p>9</text:p>
          </table:table-cell>
          <table:table-cell office:value-type="string">
            <text:p>0</text:p>
          </table:table-cell>
          <table:table-cell office:value-type="string">
            <text:p>https://github.com/unfoldingWord/tc-ui-toolkit</text:p>
          </table:table-cell>
          <table:table-cell office:value-type="string">
            <text:p>2024-12-31T18:52:44Z</text:p>
          </table:table-cell>
        </table:table-row>
        <table:table-row>
          <table:table-cell office:value-type="string">
            <text:p>checking-tool-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48:38Z</text:p>
          </table:table-cell>
          <table:table-cell office:value-type="string">
            <text:p>2024-12-06T22:02:10Z</text:p>
          </table:table-cell>
          <table:table-cell office:value-type="string">
            <text:p>2021-06-29T21:55:08Z</text:p>
          </table:table-cell>
          <table:table-cell office:value-type="string">
            <text:p>18</text:p>
          </table:table-cell>
          <table:table-cell office:value-type="string">
            <text:p>18</text:p>
          </table:table-cell>
          <table:table-cell office:value-type="string">
            <text:p>1251</text:p>
          </table:table-cell>
          <table:table-cell office:value-type="string">
            <text:p/>
          </table:table-cell>
          <table:table-cell office:value-type="string">
            <text:p>checking-tool-wrapper</text:p>
          </table:table-cell>
          <table:table-cell office:value-type="string">
            <text:p/>
          </table:table-cell>
          <table:table-cell office:value-type="string">
            <text:p/>
          </table:table-cell>
          <table:table-cell office:value-type="string">
            <text:p/>
          </table:table-cell>
          <table:table-cell office:value-type="string">
            <text:p>translationCore, translationNotes, translationWords</text:p>
          </table:table-cell>
          <table:table-cell office:value-type="string">
            <text:p>gogs-client, selections, string-punctuation-tokenizer, tc-tool, tc-ui-toolkit, usfm-js, word-aligner</text:p>
          </table:table-cell>
          <table:table-cell office:value-type="string">
            <text:p/>
          </table:table-cell>
          <table:table-cell office:value-type="string">
            <text:p>mannycolon, PhotoNomad0, RoyalSix, da1nerd, richmahn, Sterling (Jay) Scott, dependabot[bot]</text:p>
          </table:table-cell>
          <table:table-cell office:value-type="string">
            <text:p>2</text:p>
          </table:table-cell>
          <table:table-cell office:value-type="string">
            <text:p>0</text:p>
          </table:table-cell>
          <table:table-cell office:value-type="string">
            <text:p>https://github.com/unfoldingWord/checking-tool-wrapper</text:p>
          </table:table-cell>
          <table:table-cell office:value-type="string">
            <text:p>2024-12-06T22:02:15Z</text:p>
          </table:table-cell>
        </table:table-row>
        <table:table-row>
          <table:table-cell office:value-type="string">
            <text:p>tn-tsv7-to-tsv8</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11-14T10:49:22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tn-tsv7-to-tsv8</text:p>
          </table:table-cell>
          <table:table-cell office:value-type="string">
            <text:p>2024-11-14T10:49:22Z</text:p>
          </table:table-cell>
        </table:table-row>
        <table:table-row>
          <table:table-cell office:value-type="string">
            <text:p>world-language-map-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0-13T01:07:52Z</text:p>
          </table:table-cell>
          <table:table-cell office:value-type="string">
            <text:p>2024-10-13T01:07:50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world-language-map-rcl</text:p>
          </table:table-cell>
          <table:table-cell office:value-type="string">
            <text:p>False</text:p>
          </table:table-cell>
          <table:table-cell office:value-type="string">
            <text:p>117</text:p>
          </table:table-cell>
          <table:table-cell office:value-type="string">
            <text:p>2024-10-13T01:08:01.943Z</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world-language-map-rcl</text:p>
          </table:table-cell>
          <table:table-cell office:value-type="string">
            <text:p>2024-10-13T01:07:56Z</text:p>
          </table:table-cell>
        </table:table-row>
        <table:table-row>
          <table:table-cell office:value-type="string">
            <text:p>salesforc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8T14:52:21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rRosewood, dhallsim, g-reichert, kmace16, UW-MountainPoint, MPkadarby1, atrancandoris, hallienicholas, Derek Hall, Jeff Clark, jag3773</text:p>
          </table:table-cell>
          <table:table-cell office:value-type="string">
            <text:p>0</text:p>
          </table:table-cell>
          <table:table-cell office:value-type="string">
            <text:p>0</text:p>
          </table:table-cell>
          <table:table-cell office:value-type="string">
            <text:p>https://github.com/unfoldingWord/salesforce-core</text:p>
          </table:table-cell>
          <table:table-cell office:value-type="string">
            <text:p>2024-08-28T14:52:21Z</text:p>
          </table:table-cell>
        </table:table-row>
        <table:table-row>
          <table:table-cell office:value-type="string">
            <text:p>GWE-Tes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07-29T13:32:24Z</text:p>
          </table:table-cell>
          <table:table-cell office:value-type="string">
            <text:p>2024-07-29T13:32:24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0</text:p>
          </table:table-cell>
          <table:table-cell office:value-type="string">
            <text:p>0</text:p>
          </table:table-cell>
          <table:table-cell office:value-type="string">
            <text:p>https://github.com/unfoldingWord/GWE-Tests</text:p>
          </table:table-cell>
          <table:table-cell office:value-type="string">
            <text:p>2024-07-29T13:32:27Z</text:p>
          </table:table-cell>
        </table:table-row>
        <table:table-row>
          <table:table-cell office:value-type="string">
            <text:p>oce-editor-too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tx-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6-21T20:22:59Z</text:p>
          </table:table-cell>
          <table:table-cell office:value-type="string">
            <text:p>2024-06-21T20:22:59Z</text:p>
          </table:table-cell>
          <table:table-cell office:value-type="string">
            <text:p>2024-01-23T20:41:06Z</text:p>
          </table:table-cell>
          <table:table-cell office:value-type="string">
            <text:p>4</text:p>
          </table:table-cell>
          <table:table-cell office:value-type="string">
            <text:p>4</text:p>
          </table:table-cell>
          <table:table-cell office:value-type="string">
            <text:p>54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dependabot[bot], jag3773</text:p>
          </table:table-cell>
          <table:table-cell office:value-type="string">
            <text:p>40</text:p>
          </table:table-cell>
          <table:table-cell office:value-type="string">
            <text:p>0</text:p>
          </table:table-cell>
          <table:table-cell office:value-type="string">
            <text:p>https://github.com/unfoldingWord/tx-job-handler</text:p>
          </table:table-cell>
          <table:table-cell office:value-type="string">
            <text:p>2024-06-21T20:23:02Z</text:p>
          </table:table-cell>
        </table:table-row>
        <table:table-row>
          <table:table-cell office:value-type="string">
            <text:p>bible-referen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6-04T12:41:01Z</text:p>
          </table:table-cell>
          <table:table-cell office:value-type="string">
            <text:p>2024-06-04T12:38:41Z</text:p>
          </table:table-cell>
          <table:table-cell office:value-type="string">
            <text:p>2024-06-06T22:07:09Z</text:p>
          </table:table-cell>
          <table:table-cell office:value-type="string">
            <text:p>6</text:p>
          </table:table-cell>
          <table:table-cell office:value-type="string">
            <text:p>0</text:p>
          </table:table-cell>
          <table:table-cell office:value-type="string">
            <text:p>124</text:p>
          </table:table-cell>
          <table:table-cell office:value-type="string">
            <text:p/>
          </table:table-cell>
          <table:table-cell office:value-type="string">
            <text:p>bible-reference-rcl</text:p>
          </table:table-cell>
          <table:table-cell office:value-type="string">
            <text:p>False</text:p>
          </table:table-cell>
          <table:table-cell office:value-type="string">
            <text:p>5169</text:p>
          </table:table-cell>
          <table:table-cell office:value-type="string">
            <text:p>2024-06-04T12:40:10.075Z</text:p>
          </table:table-cell>
          <table:table-cell office:value-type="string">
            <text:p>door43-preview-app, gateway-edit, bsa, scripture-tsv, gateway-translate, create-app, bible-preview-app, anchor-alignment-poc, greek-apparatus-app, @oce-editor-tools/joy-pk, @oce-editor-tools/mui-pk</text:p>
          </table:table-cell>
          <table:table-cell office:value-type="string">
            <text:p>bible-reference-range</text:p>
          </table:table-cell>
          <table:table-cell office:value-type="string">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text:p>PhotoNomad0, mannycolon, foxprogs, Joel-C-Johnson, kintsoogi, richmahn</text:p>
          </table:table-cell>
          <table:table-cell office:value-type="string">
            <text:p>2</text:p>
          </table:table-cell>
          <table:table-cell office:value-type="string">
            <text:p>0</text:p>
          </table:table-cell>
          <table:table-cell office:value-type="string">
            <text:p>https://github.com/unfoldingWord/bible-reference-rcl</text:p>
          </table:table-cell>
          <table:table-cell office:value-type="string">
            <text:p>2024-06-04T12:38:45Z</text:p>
          </table:table-cell>
        </table:table-row>
        <table:table-row>
          <table:table-cell office:value-type="string">
            <text:p>open-components-hackathon-website</text:p>
          </table:table-cell>
          <table:table-cell office:value-type="string">
            <text:p>unfoldingWord</text:p>
          </table:table-cell>
          <table:table-cell office:value-type="string">
            <text:p>TypeScript</text:p>
          </table:table-cell>
          <table:table-cell office:value-type="string">
            <text:p>True</text:p>
          </table:table-cell>
          <table:table-cell office:value-type="string">
            <text:p>True</text:p>
          </table:table-cell>
          <table:table-cell office:value-type="string">
            <text:p>2022-01-05T02:52:31Z</text:p>
          </table:table-cell>
          <table:table-cell office:value-type="string">
            <text:p>2022-01-05T02:52:31Z</text:p>
          </table:table-cell>
          <table:table-cell office:value-type="string">
            <text:p/>
          </table:table-cell>
          <table:table-cell office:value-type="string">
            <text:p>4</text:p>
          </table:table-cell>
          <table:table-cell office:value-type="string">
            <text:p>0</text:p>
          </table:table-cell>
          <table:table-cell office:value-type="string">
            <text:p>130</text:p>
          </table:table-cell>
          <table:table-cell office:value-type="string">
            <text:p/>
          </table:table-cell>
          <table:table-cell office:value-type="string">
            <text:p>virtual-event-starter-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ercel/virtual-event-starter-kit</text:p>
          </table:table-cell>
          <table:table-cell office:value-type="string">
            <text:p>mannycolon, chibicode, leerob, goncy, levimykel, fofiu, Deep-Codes, enesakar, erikras, irahopkinson, marionott, matheuss, richmahn, hugefunwoo, lisilinhart</text:p>
          </table:table-cell>
          <table:table-cell office:value-type="string">
            <text:p>0</text:p>
          </table:table-cell>
          <table:table-cell office:value-type="string">
            <text:p>0</text:p>
          </table:table-cell>
          <table:table-cell office:value-type="string">
            <text:p>https://github.com/unfoldingWord/open-components-hackathon-website</text:p>
          </table:table-cell>
          <table:table-cell office:value-type="string">
            <text:p>2024-05-22T10:11:28Z</text:p>
          </table:table-cell>
        </table:table-row>
        <table:table-row>
          <table:table-cell office:value-type="string">
            <text:p>scripture-tsv</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8T19:09:17Z</text:p>
          </table:table-cell>
          <table:table-cell office:value-type="string">
            <text:p>2024-05-07T12:40:32Z</text:p>
          </table:table-cell>
          <table:table-cell office:value-type="string">
            <text:p>2024-05-08T19:09:17Z</text:p>
          </table:table-cell>
          <table:table-cell office:value-type="string">
            <text:p>2</text:p>
          </table:table-cell>
          <table:table-cell office:value-type="string">
            <text:p>0</text:p>
          </table:table-cell>
          <table:table-cell office:value-type="string">
            <text:p>51</text:p>
          </table:table-cell>
          <table:table-cell office:value-type="string">
            <text:p/>
          </table:table-cell>
          <table:table-cell office:value-type="string">
            <text:p>scripture-tsv</text:p>
          </table:table-cell>
          <table:table-cell office:value-type="string">
            <text:p>False</text:p>
          </table:table-cell>
          <table:table-cell office:value-type="string">
            <text:p>2660</text:p>
          </table:table-cell>
          <table:table-cell office:value-type="string">
            <text:p>2024-05-02T21:03:03.412Z</text:p>
          </table:table-cell>
          <table:table-cell office:value-type="string">
            <text:p>gateway-edit</text:p>
          </table:table-cell>
          <table:table-cell office:value-type="string">
            <text:p>bible-reference-range, bible-reference-rcl</text:p>
          </table:table-cell>
          <table:table-cell office:value-type="string">
            <text:p>unfoldingWord/gateway-edit, kintsoogi/translation-notes-extension</text:p>
          </table:table-cell>
          <table:table-cell office:value-type="string">
            <text:p>kintsoogi, PhotoNomad0</text:p>
          </table:table-cell>
          <table:table-cell office:value-type="string">
            <text:p>2</text:p>
          </table:table-cell>
          <table:table-cell office:value-type="string">
            <text:p>0</text:p>
          </table:table-cell>
          <table:table-cell office:value-type="string">
            <text:p>https://github.com/unfoldingWord/scripture-tsv</text:p>
          </table:table-cell>
          <table:table-cell office:value-type="string">
            <text:p>2024-05-07T12:40:37Z</text:p>
          </table:table-cell>
        </table:table-row>
        <table:table-row>
          <table:table-cell office:value-type="string">
            <text:p>tx-enqueue-job</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4-17T01:28:53Z</text:p>
          </table:table-cell>
          <table:table-cell office:value-type="string">
            <text:p>2024-01-25T16:47:13Z</text:p>
          </table:table-cell>
          <table:table-cell office:value-type="string">
            <text:p>2024-01-25T16:51:03Z</text:p>
          </table:table-cell>
          <table:table-cell office:value-type="string">
            <text:p>2</text:p>
          </table:table-cell>
          <table:table-cell office:value-type="string">
            <text:p>2</text:p>
          </table:table-cell>
          <table:table-cell office:value-type="string">
            <text:p>20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jag3773, yakob-aleksandrovich</text:p>
          </table:table-cell>
          <table:table-cell office:value-type="string">
            <text:p>20</text:p>
          </table:table-cell>
          <table:table-cell office:value-type="string">
            <text:p>0</text:p>
          </table:table-cell>
          <table:table-cell office:value-type="string">
            <text:p>https://github.com/unfoldingWord/tx-enqueue-job</text:p>
          </table:table-cell>
          <table:table-cell office:value-type="string">
            <text:p>2024-02-06T15:23:21Z</text:p>
          </table:table-cell>
        </table:table-row>
        <table:table-row>
          <table:table-cell office:value-type="string">
            <text:p>door43-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1-23T20:41:34Z</text:p>
          </table:table-cell>
          <table:table-cell office:value-type="string">
            <text:p>2024-01-23T20:20:22Z</text:p>
          </table:table-cell>
          <table:table-cell office:value-type="string">
            <text:p>2024-01-23T20:41:34Z</text:p>
          </table:table-cell>
          <table:table-cell office:value-type="string">
            <text:p>2</text:p>
          </table:table-cell>
          <table:table-cell office:value-type="string">
            <text:p>2</text:p>
          </table:table-cell>
          <table:table-cell office:value-type="string">
            <text:p>71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Robert Hunt, jag3773, yakob-aleksandrovich</text:p>
          </table:table-cell>
          <table:table-cell office:value-type="string">
            <text:p>38</text:p>
          </table:table-cell>
          <table:table-cell office:value-type="string">
            <text:p>0</text:p>
          </table:table-cell>
          <table:table-cell office:value-type="string">
            <text:p>https://github.com/unfoldingWord/door43-job-handler</text:p>
          </table:table-cell>
          <table:table-cell office:value-type="string">
            <text:p>2024-02-06T15:21:33Z</text:p>
          </table:table-cell>
        </table:table-row>
        <table:table-row>
          <table:table-cell office:value-type="string">
            <text:p>shiny-app-outputs-report</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01-29T15:53:5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shiny-app-outputs-report</text:p>
          </table:table-cell>
          <table:table-cell office:value-type="string">
            <text:p>2024-01-29T17:00:31Z</text:p>
          </table:table-cell>
        </table:table-row>
        <table:table-row>
          <table:table-cell office:value-type="string">
            <text:p>oce-print-preview-tool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12-13T23:46:1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oce-print-preview-tools</text:p>
          </table:table-cell>
          <table:table-cell office:value-type="string">
            <text:p>2023-12-14T00:56:44Z</text:p>
          </table:table-cell>
        </table:table-row>
        <table:table-row>
          <table:table-cell office:value-type="string">
            <text:p>dcs-local</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3-12-01T18:06:35Z</text:p>
          </table:table-cell>
          <table:table-cell office:value-type="string">
            <text:p>2023-12-01T18:06:32Z</text:p>
          </table:table-cell>
          <table:table-cell office:value-type="string">
            <text:p/>
          </table:table-cell>
          <table:table-cell office:value-type="string">
            <text:p>0</text:p>
          </table:table-cell>
          <table:table-cell office:value-type="string">
            <text:p>0</text:p>
          </table:table-cell>
          <table:table-cell office:value-type="string">
            <text:p>3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yakob-aleksandrovich</text:p>
          </table:table-cell>
          <table:table-cell office:value-type="string">
            <text:p>0</text:p>
          </table:table-cell>
          <table:table-cell office:value-type="string">
            <text:p>0</text:p>
          </table:table-cell>
          <table:table-cell office:value-type="string">
            <text:p>https://github.com/unfoldingWord/dcs-local</text:p>
          </table:table-cell>
          <table:table-cell office:value-type="string">
            <text:p>2023-10-06T04:52:20Z</text:p>
          </table:table-cell>
        </table:table-row>
        <table:table-row>
          <table:table-cell office:value-type="string">
            <text:p>dcs-template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11-27T10:22:11Z</text:p>
          </table:table-cell>
          <table:table-cell office:value-type="string">
            <text:p>2023-11-27T10:22:08Z</text:p>
          </table:table-cell>
          <table:table-cell office:value-type="string">
            <text:p/>
          </table:table-cell>
          <table:table-cell office:value-type="string">
            <text:p>0</text:p>
          </table:table-cell>
          <table:table-cell office:value-type="string">
            <text:p>0</text:p>
          </table:table-cell>
          <table:table-cell office:value-type="string">
            <text:p>2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foxprogs</text:p>
          </table:table-cell>
          <table:table-cell office:value-type="string">
            <text:p>0</text:p>
          </table:table-cell>
          <table:table-cell office:value-type="string">
            <text:p>0</text:p>
          </table:table-cell>
          <table:table-cell office:value-type="string">
            <text:p>https://github.com/unfoldingWord/dcs-templates</text:p>
          </table:table-cell>
          <table:table-cell office:value-type="string">
            <text:p>2023-09-27T18:53:50Z</text:p>
          </table:table-cell>
        </table:table-row>
        <table:table-row>
          <table:table-cell office:value-type="string">
            <text:p>oce-oak-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07:56:18Z</text:p>
          </table:table-cell>
          <table:table-cell office:value-type="string">
            <text:p>2024-01-11T12:01:38Z</text:p>
          </table:table-cell>
          <table:table-cell office:value-type="string">
            <text:p/>
          </table:table-cell>
          <table:table-cell office:value-type="string">
            <text:p>0</text:p>
          </table:table-cell>
          <table:table-cell office:value-type="string">
            <text:p>0</text:p>
          </table:table-cell>
          <table:table-cell office:value-type="string">
            <text:p>17</text:p>
          </table:table-cell>
          <table:table-cell office:value-type="string">
            <text:p/>
          </table:table-cell>
          <table:table-cell office:value-type="string">
            <text:p>OCE Oak 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kintsoogi</text:p>
          </table:table-cell>
          <table:table-cell office:value-type="string">
            <text:p>0</text:p>
          </table:table-cell>
          <table:table-cell office:value-type="string">
            <text:p>0</text:p>
          </table:table-cell>
          <table:table-cell office:value-type="string">
            <text:p>https://github.com/unfoldingWord/oce-oak-edit</text:p>
          </table:table-cell>
          <table:table-cell office:value-type="string">
            <text:p>2023-09-18T05:39:45Z</text:p>
          </table:table-cell>
        </table:table-row>
        <table:table-row>
          <table:table-cell office:value-type="string">
            <text:p>oce-oak-rend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14:27:05Z</text:p>
          </table:table-cell>
          <table:table-cell office:value-type="string">
            <text:p>2024-01-12T14:27:05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oce-oak-ren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PhotoNomad0</text:p>
          </table:table-cell>
          <table:table-cell office:value-type="string">
            <text:p>0</text:p>
          </table:table-cell>
          <table:table-cell office:value-type="string">
            <text:p>0</text:p>
          </table:table-cell>
          <table:table-cell office:value-type="string">
            <text:p>https://github.com/unfoldingWord/oce-oak-render</text:p>
          </table:table-cell>
          <table:table-cell office:value-type="string">
            <text:p>2023-09-13T16:01:45Z</text:p>
          </table:table-cell>
        </table:table-row>
        <table:table-row>
          <table:table-cell office:value-type="string">
            <text:p>salesforce-aplos-integration</text:p>
          </table:table-cell>
          <table:table-cell office:value-type="string">
            <text:p>unfoldingWord</text:p>
          </table:table-cell>
          <table:table-cell office:value-type="string">
            <text:p>Apex</text:p>
          </table:table-cell>
          <table:table-cell office:value-type="string">
            <text:p>False</text:p>
          </table:table-cell>
          <table:table-cell office:value-type="string">
            <text:p>False</text:p>
          </table:table-cell>
          <table:table-cell office:value-type="string">
            <text:p>2024-06-25T16:11:01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rRosewood, g-reichert, kmace16, jag3773</text:p>
          </table:table-cell>
          <table:table-cell office:value-type="string">
            <text:p>0</text:p>
          </table:table-cell>
          <table:table-cell office:value-type="string">
            <text:p>0</text:p>
          </table:table-cell>
          <table:table-cell office:value-type="string">
            <text:p>https://github.com/unfoldingWord/salesforce-aplos-integration</text:p>
          </table:table-cell>
          <table:table-cell office:value-type="string">
            <text:p>2023-08-29T19:51:55Z</text:p>
          </table:table-cell>
        </table:table-row>
        <table:table-row>
          <table:table-cell office:value-type="string">
            <text:p>door43-library</text:p>
          </table:table-cell>
          <table:table-cell office:value-type="string">
            <text:p>unfoldingWord</text:p>
          </table:table-cell>
          <table:table-cell office:value-type="string">
            <text:p>HTML</text:p>
          </table:table-cell>
          <table:table-cell office:value-type="string">
            <text:p>False</text:p>
          </table:table-cell>
          <table:table-cell office:value-type="string">
            <text:p>True</text:p>
          </table:table-cell>
          <table:table-cell office:value-type="string">
            <text:p>2023-01-09T22:40:47Z</text:p>
          </table:table-cell>
          <table:table-cell office:value-type="string">
            <text:p>2023-01-09T22:40:39Z</text:p>
          </table:table-cell>
          <table:table-cell office:value-type="string">
            <text:p/>
          </table:table-cell>
          <table:table-cell office:value-type="string">
            <text:p>0</text:p>
          </table:table-cell>
          <table:table-cell office:value-type="string">
            <text:p>0</text:p>
          </table:table-cell>
          <table:table-cell office:value-type="string">
            <text:p>17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obs-web</text:p>
          </table:table-cell>
          <table:table-cell office:value-type="string">
            <text:p>richmahn, Phil Hopper, phillip-hopper, yakob-aleksandrovich, dependabot[bot], jag3773</text:p>
          </table:table-cell>
          <table:table-cell office:value-type="string">
            <text:p>0</text:p>
          </table:table-cell>
          <table:table-cell office:value-type="string">
            <text:p>0</text:p>
          </table:table-cell>
          <table:table-cell office:value-type="string">
            <text:p>https://github.com/unfoldingWord/door43-library</text:p>
          </table:table-cell>
          <table:table-cell office:value-type="string">
            <text:p>2023-08-08T13:52:06Z</text:p>
          </table:table-cell>
        </table:table-row>
        <table:table-row>
          <table:table-cell office:value-type="string">
            <text:p>find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bible-reference-ran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12-07T19:15:38Z</text:p>
          </table:table-cell>
          <table:table-cell office:value-type="string">
            <text:p>2023-12-07T18:20:14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bible-reference-range</text:p>
          </table:table-cell>
          <table:table-cell office:value-type="string">
            <text:p>False</text:p>
          </table:table-cell>
          <table:table-cell office:value-type="string">
            <text:p>16689</text:p>
          </table:table-cell>
          <table:table-cell office:value-type="string">
            <text:p>2023-12-07T19:15:35.590Z</text:p>
          </table:table-cell>
          <table:table-cell office:value-type="string">
            <text:p>translationCore, enhanced-word-aligner-rcl, tc-create-app, word-aligner-rcl, word-aligner-lib, single-scripture-rcl, translation-helps-rcl, scripture-resources-rcl, uw-quote-helpers, tsv-groupdata-parser, checking-tool-rcl, bible-reference-rcl, scripture-tsv, uw-bible-parser, checking-extension, alignment-playground</text:p>
          </table:table-cell>
          <table:table-cell office:value-type="string">
            <text:p/>
          </table:table-cell>
          <table:table-cell office:value-type="string">
            <text:p/>
          </table:table-cell>
          <table:table-cell office:value-type="string">
            <text:p>Joel-C-Johnson, PhotoNomad0, kintsoogi, jincypjose</text:p>
          </table:table-cell>
          <table:table-cell office:value-type="string">
            <text:p>0</text:p>
          </table:table-cell>
          <table:table-cell office:value-type="string">
            <text:p>0</text:p>
          </table:table-cell>
          <table:table-cell office:value-type="string">
            <text:p>https://github.com/unfoldingWord/bible-reference-range</text:p>
          </table:table-cell>
          <table:table-cell office:value-type="string">
            <text:p>2023-07-19T04:20:40Z</text:p>
          </table:table-cell>
        </table:table-row>
        <table:table-row>
          <table:table-cell office:value-type="string">
            <text:p>terraform</text:p>
          </table:table-cell>
          <table:table-cell office:value-type="string">
            <text:p>unfoldingWord</text:p>
          </table:table-cell>
          <table:table-cell office:value-type="string">
            <text:p>HCL</text:p>
          </table:table-cell>
          <table:table-cell office:value-type="string">
            <text:p>False</text:p>
          </table:table-cell>
          <table:table-cell office:value-type="string">
            <text:p>False</text:p>
          </table:table-cell>
          <table:table-cell office:value-type="string">
            <text:p>2023-07-11T09:20:37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terraform</text:p>
          </table:table-cell>
          <table:table-cell office:value-type="string">
            <text:p>2023-07-04T15:33:16Z</text:p>
          </table:table-cell>
        </table:table-row>
        <table:table-row>
          <table:table-cell office:value-type="string">
            <text:p>.github</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9-27T02:01:37Z</text:p>
          </table:table-cell>
          <table:table-cell office:value-type="string">
            <text:p>2023-09-27T02:01:37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amp, elsylambert</text:p>
          </table:table-cell>
          <table:table-cell office:value-type="string">
            <text:p>0</text:p>
          </table:table-cell>
          <table:table-cell office:value-type="string">
            <text:p>0</text:p>
          </table:table-cell>
          <table:table-cell office:value-type="string">
            <text:p>https://github.com/unfoldingWord/.github</text:p>
          </table:table-cell>
          <table:table-cell office:value-type="string">
            <text:p>2023-06-23T17:54:35Z</text:p>
          </table:table-cell>
        </table:table-row>
        <table:table-row>
          <table:table-cell office:value-type="string">
            <text:p>en_obs_tf</text:p>
          </table:table-cell>
          <table:table-cell office:value-type="string">
            <text:p>unfoldingWord</text:p>
          </table:table-cell>
          <table:table-cell office:value-type="string">
            <text:p>SCSS</text:p>
          </table:table-cell>
          <table:table-cell office:value-type="string">
            <text:p>False</text:p>
          </table:table-cell>
          <table:table-cell office:value-type="string">
            <text:p>False</text:p>
          </table:table-cell>
          <table:table-cell office:value-type="string">
            <text:p>2023-08-16T19:50:46Z</text:p>
          </table:table-cell>
          <table:table-cell office:value-type="string">
            <text:p>2023-08-16T19:37:59Z</text:p>
          </table:table-cell>
          <table:table-cell office:value-type="string">
            <text:p/>
          </table:table-cell>
          <table:table-cell office:value-type="string">
            <text:p>0</text:p>
          </table:table-cell>
          <table:table-cell office:value-type="string">
            <text:p>0</text:p>
          </table:table-cell>
          <table:table-cell office:value-type="string">
            <text:p>32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github-actions[bot], morganrdvs, ILindsley</text:p>
          </table:table-cell>
          <table:table-cell office:value-type="string">
            <text:p>0</text:p>
          </table:table-cell>
          <table:table-cell office:value-type="string">
            <text:p>0</text:p>
          </table:table-cell>
          <table:table-cell office:value-type="string">
            <text:p>https://github.com/unfoldingWord/en_obs_tf</text:p>
          </table:table-cell>
          <table:table-cell office:value-type="string">
            <text:p>2023-06-07T19:49:43Z</text:p>
          </table:table-cell>
        </table:table-row>
        <table:table-row>
          <table:table-cell office:value-type="string">
            <text:p>td-legac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11-29T16:24:41Z</text:p>
          </table:table-cell>
          <table:table-cell office:value-type="string">
            <text:p>2023-11-29T16:24:39Z</text:p>
          </table:table-cell>
          <table:table-cell office:value-type="string">
            <text:p/>
          </table:table-cell>
          <table:table-cell office:value-type="string">
            <text:p>0</text:p>
          </table:table-cell>
          <table:table-cell office:value-type="string">
            <text:p>0</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td-legacy</text:p>
          </table:table-cell>
          <table:table-cell office:value-type="string">
            <text:p>2023-06-06T09:41:14Z</text:p>
          </table:table-cell>
        </table:table-row>
        <table:table-row>
          <table:table-cell office:value-type="string">
            <text:p>uw-tsv-pars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6-05T15:16:07Z</text:p>
          </table:table-cell>
          <table:table-cell office:value-type="string">
            <text:p>2023-05-31T22:28:26Z</text:p>
          </table:table-cell>
          <table:table-cell office:value-type="string">
            <text:p/>
          </table:table-cell>
          <table:table-cell office:value-type="string">
            <text:p>1</text:p>
          </table:table-cell>
          <table:table-cell office:value-type="string">
            <text:p>1</text:p>
          </table:table-cell>
          <table:table-cell office:value-type="string">
            <text:p>35</text:p>
          </table:table-cell>
          <table:table-cell office:value-type="string">
            <text:p/>
          </table:table-cell>
          <table:table-cell office:value-type="string">
            <text:p>uw-tsv-parser</text:p>
          </table:table-cell>
          <table:table-cell office:value-type="string">
            <text:p>False</text:p>
          </table:table-cell>
          <table:table-cell office:value-type="string">
            <text:p>4616</text:p>
          </table:table-cell>
          <table:table-cell office:value-type="string">
            <text:p>2022-02-02T14:06:17.344Z</text:p>
          </table:table-cell>
          <table:table-cell office:value-type="string">
            <text:p>gateway-admin, tc-create-app, word-aligner-rcl, tsv-groupdata-parser, checking-tool-rcl, checking-extension</text:p>
          </table:table-cell>
          <table:table-cell office:value-type="string">
            <text:p/>
          </table:table-cell>
          <table:table-cell office: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text:p>mandolyte, PhotoNomad0, ancientTexts-net, mannycolon</text:p>
          </table:table-cell>
          <table:table-cell office:value-type="string">
            <text:p>0</text:p>
          </table:table-cell>
          <table:table-cell office:value-type="string">
            <text:p>0</text:p>
          </table:table-cell>
          <table:table-cell office:value-type="string">
            <text:p>https://github.com/unfoldingWord/uw-tsv-parser</text:p>
          </table:table-cell>
          <table:table-cell office:value-type="string">
            <text:p>2023-05-31T22:28:33Z</text:p>
          </table:table-cell>
        </table:table-row>
        <table:table-row>
          <table:table-cell office:value-type="string">
            <text:p>door43-enqueue-job-test</text:p>
          </table:table-cell>
          <table:table-cell office:value-type="string">
            <text:p>unfoldingWord</text:p>
          </table:table-cell>
          <table:table-cell office:value-type="string">
            <text:p>Python</text:p>
          </table:table-cell>
          <table:table-cell office:value-type="string">
            <text:p>False</text:p>
          </table:table-cell>
          <table:table-cell office:value-type="string">
            <text:p>True</text:p>
          </table:table-cell>
          <table:table-cell office:value-type="string">
            <text:p>2023-04-19T13:50:56Z</text:p>
          </table:table-cell>
          <table:table-cell office:value-type="string">
            <text:p>2023-04-19T13:50:56Z</text:p>
          </table:table-cell>
          <table:table-cell office:value-type="string">
            <text:p/>
          </table:table-cell>
          <table:table-cell office:value-type="string">
            <text:p>0</text:p>
          </table:table-cell>
          <table:table-cell office:value-type="string">
            <text:p>0</text:p>
          </table:table-cell>
          <table:table-cell office:value-type="string">
            <text:p>33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door43-enqueue-job</text:p>
          </table:table-cell>
          <table:table-cell office:value-type="string">
            <text:p>RobH123, richmahn, Robert Hunt, jag3773, tpdownes, yakob-aleksandrovich</text:p>
          </table:table-cell>
          <table:table-cell office:value-type="string">
            <text:p>0</text:p>
          </table:table-cell>
          <table:table-cell office:value-type="string">
            <text:p>0</text:p>
          </table:table-cell>
          <table:table-cell office:value-type="string">
            <text:p>https://github.com/unfoldingWord/door43-enqueue-job-test</text:p>
          </table:table-cell>
          <table:table-cell office:value-type="string">
            <text:p>2023-04-19T13:51:02Z</text:p>
          </table:table-cell>
        </table:table-row>
        <table:table-row>
          <table:table-cell office:value-type="string">
            <text:p>uw-scripture-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03-16T00:50:58Z</text:p>
          </table:table-cell>
          <table:table-cell office:value-type="string">
            <text:p>2023-03-16T00:49:47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uw-bible-parser</text:p>
          </table:table-cell>
          <table:table-cell office:value-type="string">
            <text:p/>
          </table:table-cell>
          <table:table-cell office:value-type="string">
            <text:p/>
          </table:table-cell>
          <table:table-cell office:value-type="string">
            <text:p/>
          </table:table-cell>
          <table:table-cell office:value-type="string">
            <text:p>uw-quote-helpers</text:p>
          </table:table-cell>
          <table:table-cell office:value-type="string">
            <text:p>bible-reference-range, usfm-js</text:p>
          </table:table-cell>
          <table:table-cell office:value-type="string">
            <text:p>abelpz/oce-library-starter</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uw-scripture-parser</text:p>
          </table:table-cell>
          <table:table-cell office:value-type="string">
            <text:p>2023-03-15T02:11:57Z</text:p>
          </table:table-cell>
        </table:table-row>
        <table:table-row>
          <table:table-cell office:value-type="string">
            <text:p>electronite-forge</text:p>
          </table:table-cell>
          <table:table-cell office:value-type="string">
            <text:p>unfoldingWord</text:p>
          </table:table-cell>
          <table:table-cell office:value-type="string">
            <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tCCreateQA-Daniel</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2-15T18:34:01Z</text:p>
          </table:table-cell>
          <table:table-cell office:value-type="string">
            <text:p>2023-02-15T18:34:00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0</text:p>
          </table:table-cell>
          <table:table-cell office:value-type="string">
            <text:p>0</text:p>
          </table:table-cell>
          <table:table-cell office:value-type="string">
            <text:p>https://github.com/unfoldingWord/tCCreateQA-Daniel</text:p>
          </table:table-cell>
          <table:table-cell office:value-type="string">
            <text:p>2023-02-15T18:34:00Z</text:p>
          </table:table-cell>
        </table:table-row>
        <table:table-row>
          <table:table-cell office:value-type="string">
            <text:p>epitelete-htm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4-18T13:52:37Z</text:p>
          </table:table-cell>
          <table:table-cell office:value-type="string">
            <text:p>2023-02-03T17:24:52Z</text:p>
          </table:table-cell>
          <table:table-cell office:value-type="string">
            <text:p/>
          </table:table-cell>
          <table:table-cell office:value-type="string">
            <text:p>4</text:p>
          </table:table-cell>
          <table:table-cell office:value-type="string">
            <text:p>3</text:p>
          </table:table-cell>
          <table:table-cell office:value-type="string">
            <text:p>136</text:p>
          </table:table-cell>
          <table:table-cell office:value-type="string">
            <text:p/>
          </table:table-cell>
          <table:table-cell office:value-type="string">
            <text:p>epitelete-html</text:p>
          </table:table-cell>
          <table:table-cell office:value-type="string">
            <text:p>False</text:p>
          </table:table-cell>
          <table:table-cell office:value-type="string">
            <text:p>10391</text:p>
          </table:table-cell>
          <table:table-cell office:value-type="string">
            <text:p>2023-07-16T00:28:17.570Z</text:p>
          </table:table-cell>
          <table:table-cell office:value-type="string">
            <text:p>OCE Oak Edit, oce-oak-render, uw-editor, beta-bibel-wiki, @oce-editor-tools/base-core, @oce-editor-tools/joy-core, @oce-editor-tools/joy-pk, @oce-editor-tools/mui-core, @oce-editor-tools/mui-pk, @oce-editor-tools/mui-simple, @oce-editor-tools/pk-aligner</text:p>
          </table:table-cell>
          <table:table-cell office:value-type="string">
            <text:p>uw-proskomma</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text:p>abelpz, mvahowe, mandolyte, samueljd, klappy</text:p>
          </table:table-cell>
          <table:table-cell office:value-type="string">
            <text:p>0</text:p>
          </table:table-cell>
          <table:table-cell office:value-type="string">
            <text:p>0</text:p>
          </table:table-cell>
          <table:table-cell office:value-type="string">
            <text:p>https://github.com/unfoldingWord/epitelete-html</text:p>
          </table:table-cell>
          <table:table-cell office:value-type="string">
            <text:p>2023-02-02T13:14:15Z</text:p>
          </table:table-cell>
        </table:table-row>
        <table:table-row>
          <table:table-cell office:value-type="string">
            <text:p>dcs-home-page-old</text:p>
          </table:table-cell>
          <table:table-cell office:value-type="string">
            <text:p>unfoldingWord</text:p>
          </table:table-cell>
          <table:table-cell office:value-type="string">
            <text:p>Dockerfile</text:p>
          </table:table-cell>
          <table:table-cell office:value-type="string">
            <text:p>False</text:p>
          </table:table-cell>
          <table:table-cell office:value-type="string">
            <text:p>False</text:p>
          </table:table-cell>
          <table:table-cell office:value-type="string">
            <text:p>2023-01-13T23:56:37Z</text:p>
          </table:table-cell>
          <table:table-cell office:value-type="string">
            <text:p>2023-01-13T23:55:56Z</text:p>
          </table:table-cell>
          <table:table-cell office:value-type="string">
            <text:p/>
          </table:table-cell>
          <table:table-cell office:value-type="string">
            <text:p>0</text:p>
          </table:table-cell>
          <table:table-cell office:value-type="string">
            <text:p>0</text:p>
          </table:table-cell>
          <table:table-cell office:value-type="string">
            <text:p>2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home-page-old</text:p>
          </table:table-cell>
          <table:table-cell office:value-type="string">
            <text:p>2023-01-31T23:27:02Z</text:p>
          </table:table-cell>
        </table:table-row>
        <table:table-row>
          <table:table-cell office:value-type="string">
            <text:p>obs-sgj</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58Z</text:p>
          </table:table-cell>
          <table:table-cell office:value-type="string">
            <text:p>2016-01-14T23:50:56Z</text:p>
          </table:table-cell>
          <table:table-cell office:value-type="string">
            <text:p/>
          </table:table-cell>
          <table:table-cell office:value-type="string">
            <text:p>0</text:p>
          </table:table-cell>
          <table:table-cell office:value-type="string">
            <text:p>0</text:p>
          </table:table-cell>
          <table:table-cell office:value-type="string">
            <text:p>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sgj</text:p>
          </table:table-cell>
          <table:table-cell office:value-type="string">
            <text:p>2023-01-28T17:00:18Z</text:p>
          </table:table-cell>
        </table:table-row>
        <table:table-row>
          <table:table-cell office:value-type="string">
            <text:p>obs-h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21Z</text:p>
          </table:table-cell>
          <table:table-cell office:value-type="string">
            <text:p>2016-01-14T23:51:19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a</text:p>
          </table:table-cell>
          <table:table-cell office:value-type="string">
            <text:p>2023-01-28T16:58:28Z</text:p>
          </table:table-cell>
        </table:table-row>
        <table:table-row>
          <table:table-cell office:value-type="string">
            <text:p>obs-ru</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12T17:49:13Z</text:p>
          </table:table-cell>
          <table:table-cell office:value-type="string">
            <text:p>2016-05-12T17:49:07Z</text:p>
          </table:table-cell>
          <table:table-cell office:value-type="string">
            <text:p/>
          </table:table-cell>
          <table:table-cell office:value-type="string">
            <text:p>0</text:p>
          </table:table-cell>
          <table:table-cell office:value-type="string">
            <text:p>0</text:p>
          </table:table-cell>
          <table:table-cell office:value-type="string">
            <text:p>5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esse A. Griffin, phillip-hopper</text:p>
          </table:table-cell>
          <table:table-cell office:value-type="string">
            <text:p>0</text:p>
          </table:table-cell>
          <table:table-cell office:value-type="string">
            <text:p>0</text:p>
          </table:table-cell>
          <table:table-cell office:value-type="string">
            <text:p>https://github.com/unfoldingWord/obs-ru</text:p>
          </table:table-cell>
          <table:table-cell office:value-type="string">
            <text:p>2023-01-28T16:58:28Z</text:p>
          </table:table-cell>
        </table:table-row>
        <table:table-row>
          <table:table-cell office:value-type="string">
            <text:p>obs-en</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7Z</text:p>
          </table:table-cell>
          <table:table-cell office:value-type="string">
            <text:p>2016-01-14T23:50:45Z</text:p>
          </table:table-cell>
          <table:table-cell office:value-type="string">
            <text:p/>
          </table:table-cell>
          <table:table-cell office:value-type="string">
            <text:p>0</text:p>
          </table:table-cell>
          <table:table-cell office:value-type="string">
            <text:p>0</text:p>
          </table:table-cell>
          <table:table-cell office:value-type="string">
            <text:p>6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esse A. Griffin</text:p>
          </table:table-cell>
          <table:table-cell office:value-type="string">
            <text:p>0</text:p>
          </table:table-cell>
          <table:table-cell office:value-type="string">
            <text:p>0</text:p>
          </table:table-cell>
          <table:table-cell office:value-type="string">
            <text:p>https://github.com/unfoldingWord/obs-en</text:p>
          </table:table-cell>
          <table:table-cell office:value-type="string">
            <text:p>2023-01-28T16:58:28Z</text:p>
          </table:table-cell>
        </table:table-row>
        <table:table-row>
          <table:table-cell office:value-type="string">
            <text:p>obs-lpx</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5-28T19:45:10Z</text:p>
          </table:table-cell>
          <table:table-cell office:value-type="string">
            <text:p>2016-05-28T19:44:44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root</text:p>
          </table:table-cell>
          <table:table-cell office:value-type="string">
            <text:p>0</text:p>
          </table:table-cell>
          <table:table-cell office:value-type="string">
            <text:p>0</text:p>
          </table:table-cell>
          <table:table-cell office:value-type="string">
            <text:p>https://github.com/unfoldingWord/obs-lpx</text:p>
          </table:table-cell>
          <table:table-cell office:value-type="string">
            <text:p>2023-01-28T16:58:22Z</text:p>
          </table:table-cell>
        </table:table-row>
        <table:table-row>
          <table:table-cell office:value-type="string">
            <text:p>obs-u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22T20:24:26Z</text:p>
          </table:table-cell>
          <table:table-cell office:value-type="string">
            <text:p>2016-01-22T20:24:25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ur</text:p>
          </table:table-cell>
          <table:table-cell office:value-type="string">
            <text:p>2023-01-28T16:58:22Z</text:p>
          </table:table-cell>
        </table:table-row>
        <table:table-row>
          <table:table-cell office:value-type="string">
            <text:p>obs-gu</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14Z</text:p>
          </table:table-cell>
          <table:table-cell office:value-type="string">
            <text:p>2016-01-14T23:51:12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gu</text:p>
          </table:table-cell>
          <table:table-cell office:value-type="string">
            <text:p>2023-01-28T16:58:22Z</text:p>
          </table:table-cell>
        </table:table-row>
        <table:table-row>
          <table:table-cell office:value-type="string">
            <text:p>obs-o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2Z</text:p>
          </table:table-cell>
          <table:table-cell office:value-type="string">
            <text:p>2016-01-14T23:51:00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or</text:p>
          </table:table-cell>
          <table:table-cell office:value-type="string">
            <text:p>2023-01-28T16:58:21Z</text:p>
          </table:table-cell>
        </table:table-row>
        <table:table-row>
          <table:table-cell office:value-type="string">
            <text:p>obs-tdj</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3-14T21:55:14Z</text:p>
          </table:table-cell>
          <table:table-cell office:value-type="string">
            <text:p>2017-03-14T21:55:02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tdj</text:p>
          </table:table-cell>
          <table:table-cell office:value-type="string">
            <text:p>2023-01-28T16:58:19Z</text:p>
          </table:table-cell>
        </table:table-row>
        <table:table-row>
          <table:table-cell office:value-type="string">
            <text:p>obs-hu</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7-28T19:53:08Z</text:p>
          </table:table-cell>
          <table:table-cell office:value-type="string">
            <text:p>2016-07-28T19:52:13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u</text:p>
          </table:table-cell>
          <table:table-cell office:value-type="string">
            <text:p>2023-01-28T16:58:19Z</text:p>
          </table:table-cell>
        </table:table-row>
        <table:table-row>
          <table:table-cell office:value-type="string">
            <text:p>obs-tl</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7-27T15:40:1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obs-tl</text:p>
          </table:table-cell>
          <table:table-cell office:value-type="string">
            <text:p>2023-01-28T16:58:19Z</text:p>
          </table:table-cell>
        </table:table-row>
        <table:table-row>
          <table:table-cell office:value-type="string">
            <text:p>obs-gaj-x-ymnk</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7-27T12:10:27Z</text:p>
          </table:table-cell>
          <table:table-cell office:value-type="string">
            <text:p>2016-07-27T12:10:17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gaj-x-ymnk</text:p>
          </table:table-cell>
          <table:table-cell office:value-type="string">
            <text:p>2023-01-28T16:58:19Z</text:p>
          </table:table-cell>
        </table:table-row>
        <table:table-row>
          <table:table-cell office:value-type="string">
            <text:p>obs-hmr</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7-27T12:09:22Z</text:p>
          </table:table-cell>
          <table:table-cell office:value-type="string">
            <text:p>2016-07-27T12:08:31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mr</text:p>
          </table:table-cell>
          <table:table-cell office:value-type="string">
            <text:p>2023-01-28T16:58:18Z</text:p>
          </table:table-cell>
        </table:table-row>
        <table:table-row>
          <table:table-cell office:value-type="string">
            <text:p>obs-gof</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5-10T14:48:23Z</text:p>
          </table:table-cell>
          <table:table-cell office:value-type="string">
            <text:p>2016-05-10T14:30:1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gof</text:p>
          </table:table-cell>
          <table:table-cell office:value-type="string">
            <text:p>2023-01-28T16:58:18Z</text:p>
          </table:table-cell>
        </table:table-row>
        <table:table-row>
          <table:table-cell office:value-type="string">
            <text:p>obs-ceb</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5-10T14:40:53Z</text:p>
          </table:table-cell>
          <table:table-cell office:value-type="string">
            <text:p>2016-05-10T14:40:44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ceb</text:p>
          </table:table-cell>
          <table:table-cell office:value-type="string">
            <text:p>2023-01-28T16:58:18Z</text:p>
          </table:table-cell>
        </table:table-row>
        <table:table-row>
          <table:table-cell office:value-type="string">
            <text:p>obs-ne</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22T20:24:33Z</text:p>
          </table:table-cell>
          <table:table-cell office:value-type="string">
            <text:p>2016-01-22T20:24:30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ne</text:p>
          </table:table-cell>
          <table:table-cell office:value-type="string">
            <text:p>2023-01-28T16:58:18Z</text:p>
          </table:table-cell>
        </table:table-row>
        <table:table-row>
          <table:table-cell office:value-type="string">
            <text:p>obs-v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23Z</text:p>
          </table:table-cell>
          <table:table-cell office:value-type="string">
            <text:p>2016-01-14T23:51:21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vi</text:p>
          </table:table-cell>
          <table:table-cell office:value-type="string">
            <text:p>2023-01-28T16:58:18Z</text:p>
          </table:table-cell>
        </table:table-row>
        <table:table-row>
          <table:table-cell office:value-type="string">
            <text:p>obs-es-419</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7-25T15:51:01Z</text:p>
          </table:table-cell>
          <table:table-cell office:value-type="string">
            <text:p>2016-07-25T15:50:59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es-419</text:p>
          </table:table-cell>
          <table:table-cell office:value-type="string">
            <text:p>2023-01-28T16:58:18Z</text:p>
          </table:table-cell>
        </table:table-row>
        <table:table-row>
          <table:table-cell office:value-type="string">
            <text:p>obs-h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12Z</text:p>
          </table:table-cell>
          <table:table-cell office:value-type="string">
            <text:p>2016-01-14T23:51:09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i</text:p>
          </table:table-cell>
          <table:table-cell office:value-type="string">
            <text:p>2023-01-28T16:58:18Z</text:p>
          </table:table-cell>
        </table:table-row>
        <table:table-row>
          <table:table-cell office:value-type="string">
            <text:p>obs-m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6Z</text:p>
          </table:table-cell>
          <table:table-cell office:value-type="string">
            <text:p>2016-01-14T23:51:05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mr</text:p>
          </table:table-cell>
          <table:table-cell office:value-type="string">
            <text:p>2023-01-28T16:58:18Z</text:p>
          </table:table-cell>
        </table:table-row>
        <table:table-row>
          <table:table-cell office:value-type="string">
            <text:p>obs-bn</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5Z</text:p>
          </table:table-cell>
          <table:table-cell office:value-type="string">
            <text:p>2016-01-14T23:51:03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bn</text:p>
          </table:table-cell>
          <table:table-cell office:value-type="string">
            <text:p>2023-01-28T16:58:17Z</text:p>
          </table:table-cell>
        </table:table-row>
        <table:table-row>
          <table:table-cell office:value-type="string">
            <text:p>obs-p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8Z</text:p>
          </table:table-cell>
          <table:table-cell office:value-type="string">
            <text:p>2016-01-14T23:51:07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pa</text:p>
          </table:table-cell>
          <table:table-cell office:value-type="string">
            <text:p>2023-01-28T16:58:17Z</text:p>
          </table:table-cell>
        </table:table-row>
        <table:table-row>
          <table:table-cell office:value-type="string">
            <text:p>obs-tp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0Z</text:p>
          </table:table-cell>
          <table:table-cell office:value-type="string">
            <text:p>2016-01-14T23:50:58Z</text:p>
          </table:table-cell>
          <table:table-cell office:value-type="string">
            <text:p/>
          </table:table-cell>
          <table:table-cell office:value-type="string">
            <text:p>0</text:p>
          </table:table-cell>
          <table:table-cell office:value-type="string">
            <text:p>0</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tpi</text:p>
          </table:table-cell>
          <table:table-cell office:value-type="string">
            <text:p>2023-01-28T16:58:17Z</text:p>
          </table:table-cell>
        </table:table-row>
        <table:table-row>
          <table:table-cell office:value-type="string">
            <text:p>obs-t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24T15:53:38Z</text:p>
          </table:table-cell>
          <table:table-cell office:value-type="string">
            <text:p>2016-05-24T15:53:02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phillip-hopper</text:p>
          </table:table-cell>
          <table:table-cell office:value-type="string">
            <text:p>0</text:p>
          </table:table-cell>
          <table:table-cell office:value-type="string">
            <text:p>0</text:p>
          </table:table-cell>
          <table:table-cell office:value-type="string">
            <text:p>https://github.com/unfoldingWord/obs-tr</text:p>
          </table:table-cell>
          <table:table-cell office:value-type="string">
            <text:p>2023-01-28T16:58:17Z</text:p>
          </table:table-cell>
        </table:table-row>
        <table:table-row>
          <table:table-cell office:value-type="string">
            <text:p>obs-am</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50Z</text:p>
          </table:table-cell>
          <table:table-cell office:value-type="string">
            <text:p>2016-01-14T23:50:4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am</text:p>
          </table:table-cell>
          <table:table-cell office:value-type="string">
            <text:p>2023-01-28T16:58:17Z</text:p>
          </table:table-cell>
        </table:table-row>
        <table:table-row>
          <table:table-cell office:value-type="string">
            <text:p>obs-pt-b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3Z</text:p>
          </table:table-cell>
          <table:table-cell office:value-type="string">
            <text:p>2016-01-14T23:50:41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pt-br</text:p>
          </table:table-cell>
          <table:table-cell office:value-type="string">
            <text:p>2023-01-28T16:58:17Z</text:p>
          </table:table-cell>
        </table:table-row>
        <table:table-row>
          <table:table-cell office:value-type="string">
            <text:p>obs-f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10T14:38:11Z</text:p>
          </table:table-cell>
          <table:table-cell office:value-type="string">
            <text:p>2016-05-10T14:37:59Z</text:p>
          </table:table-cell>
          <table:table-cell office:value-type="string">
            <text:p/>
          </table:table-cell>
          <table:table-cell office:value-type="string">
            <text:p>0</text:p>
          </table:table-cell>
          <table:table-cell office:value-type="string">
            <text:p>0</text:p>
          </table:table-cell>
          <table:table-cell office:value-type="string">
            <text:p>2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fr</text:p>
          </table:table-cell>
          <table:table-cell office:value-type="string">
            <text:p>2023-01-28T16:58:17Z</text:p>
          </table:table-cell>
        </table:table-row>
        <table:table-row>
          <table:table-cell office:value-type="string">
            <text:p>obs-f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6-15T12:49:15Z</text:p>
          </table:table-cell>
          <table:table-cell office:value-type="string">
            <text:p>2016-06-15T12:49:01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fa</text:p>
          </table:table-cell>
          <table:table-cell office:value-type="string">
            <text:p>2023-01-28T16:58:16Z</text:p>
          </table:table-cell>
        </table:table-row>
        <table:table-row>
          <table:table-cell office:value-type="string">
            <text:p>obs-es</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5Z</text:p>
          </table:table-cell>
          <table:table-cell office:value-type="string">
            <text:p>2016-01-14T23:50:43Z</text:p>
          </table:table-cell>
          <table:table-cell office:value-type="string">
            <text:p/>
          </table:table-cell>
          <table:table-cell office:value-type="string">
            <text:p>0</text:p>
          </table:table-cell>
          <table:table-cell office:value-type="string">
            <text:p>0</text:p>
          </table:table-cell>
          <table:table-cell office:value-type="string">
            <text:p>5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root</text:p>
          </table:table-cell>
          <table:table-cell office:value-type="string">
            <text:p>0</text:p>
          </table:table-cell>
          <table:table-cell office:value-type="string">
            <text:p>0</text:p>
          </table:table-cell>
          <table:table-cell office:value-type="string">
            <text:p>https://github.com/unfoldingWord/obs-es</text:p>
          </table:table-cell>
          <table:table-cell office:value-type="string">
            <text:p>2023-01-28T16:58:16Z</text:p>
          </table:table-cell>
        </table:table-row>
        <table:table-row>
          <table:table-cell office:value-type="string">
            <text:p>Unlocked-Greek-Lexico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3-23T14:19:11Z</text:p>
          </table:table-cell>
          <table:table-cell office:value-type="string">
            <text:p>2017-03-23T14:19:10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im, toddlprice, timjore</text:p>
          </table:table-cell>
          <table:table-cell office:value-type="string">
            <text:p>0</text:p>
          </table:table-cell>
          <table:table-cell office:value-type="string">
            <text:p>0</text:p>
          </table:table-cell>
          <table:table-cell office:value-type="string">
            <text:p>https://github.com/unfoldingWord/Unlocked-Greek-Lexicon</text:p>
          </table:table-cell>
          <table:table-cell office:value-type="string">
            <text:p>2023-01-28T16:52:17Z</text:p>
          </table:table-cell>
        </table:table-row>
        <table:table-row>
          <table:table-cell office:value-type="string">
            <text:p>ulb-pt-br</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3-11T00:22:21Z</text:p>
          </table:table-cell>
          <table:table-cell office:value-type="string">
            <text:p>2016-03-11T00:22:18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ulb-pt-br</text:p>
          </table:table-cell>
          <table:table-cell office:value-type="string">
            <text:p>2023-01-28T16:52:17Z</text:p>
          </table:table-cell>
        </table:table-row>
        <table:table-row>
          <table:table-cell office:value-type="string">
            <text:p>avd-ar</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2-23T03:29:23Z</text:p>
          </table:table-cell>
          <table:table-cell office:value-type="string">
            <text:p>2016-02-23T03:29:20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root</text:p>
          </table:table-cell>
          <table:table-cell office:value-type="string">
            <text:p>0</text:p>
          </table:table-cell>
          <table:table-cell office:value-type="string">
            <text:p>0</text:p>
          </table:table-cell>
          <table:table-cell office:value-type="string">
            <text:p>https://github.com/unfoldingWord/avd-ar</text:p>
          </table:table-cell>
          <table:table-cell office:value-type="string">
            <text:p>2023-01-28T16:52:17Z</text:p>
          </table:table-cell>
        </table:table-row>
        <table:table-row>
          <table:table-cell office:value-type="string">
            <text:p>udb-e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6-23T20:18:41Z</text:p>
          </table:table-cell>
          <table:table-cell office:value-type="string">
            <text:p>2017-06-23T20:17:50Z</text:p>
          </table:table-cell>
          <table:table-cell office:value-type="string">
            <text:p>2016-10-04T01:16:56Z</text:p>
          </table:table-cell>
          <table:table-cell office:value-type="string">
            <text:p>0</text:p>
          </table:table-cell>
          <table:table-cell office:value-type="string">
            <text:p>0</text:p>
          </table:table-cell>
          <table:table-cell office:value-type="string">
            <text:p>4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ag3773</text:p>
          </table:table-cell>
          <table:table-cell office:value-type="string">
            <text:p>3</text:p>
          </table:table-cell>
          <table:table-cell office:value-type="string">
            <text:p>0</text:p>
          </table:table-cell>
          <table:table-cell office:value-type="string">
            <text:p>https://github.com/unfoldingWord/udb-en</text:p>
          </table:table-cell>
          <table:table-cell office:value-type="string">
            <text:p>2023-01-28T16:52:17Z</text:p>
          </table:table-cell>
        </table:table-row>
        <table:table-row>
          <table:table-cell office:value-type="string">
            <text:p>gateway-translat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08:42:40Z</text:p>
          </table:table-cell>
          <table:table-cell office:value-type="string">
            <text:p>2024-01-10T13:38:37Z</text:p>
          </table:table-cell>
          <table:table-cell office:value-type="string">
            <text:p>2024-01-12T13:59:58Z</text:p>
          </table:table-cell>
          <table:table-cell office:value-type="string">
            <text:p>35</text:p>
          </table:table-cell>
          <table:table-cell office:value-type="string">
            <text:p>5</text:p>
          </table:table-cell>
          <table:table-cell office:value-type="string">
            <text:p>352</text:p>
          </table:table-cell>
          <table:table-cell office:value-type="string">
            <text:p/>
          </table:table-cell>
          <table:table-cell office:value-type="string">
            <text:p>gateway-trans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 resource-workspace-rcl, scripture-resources-rcl, translation-helps-rcl</text:p>
          </table:table-cell>
          <table:table-cell office:value-type="string">
            <text:p/>
          </table:table-cell>
          <table:table-cell office:value-type="string">
            <text:p>mandolyte, larsgson, superdav42, abelpz, theNerd247, richmahn, elsylambert, jincypjose</text:p>
          </table:table-cell>
          <table:table-cell office:value-type="string">
            <text:p>3</text:p>
          </table:table-cell>
          <table:table-cell office:value-type="string">
            <text:p>0</text:p>
          </table:table-cell>
          <table:table-cell office:value-type="string">
            <text:p>https://github.com/unfoldingWord/gateway-translate</text:p>
          </table:table-cell>
          <table:table-cell office:value-type="string">
            <text:p>2023-01-21T16:44:36Z</text:p>
          </table:table-cell>
        </table:table-row>
        <table:table-row>
          <table:table-cell office:value-type="string">
            <text:p>tx-dev</text:p>
          </table:table-cell>
          <table:table-cell office:value-type="string">
            <text:p>unfoldingWord</text:p>
          </table:table-cell>
          <table:table-cell office:value-type="string">
            <text:p>PHP</text:p>
          </table:table-cell>
          <table:table-cell office:value-type="string">
            <text:p>False</text:p>
          </table:table-cell>
          <table:table-cell office:value-type="string">
            <text:p>False</text:p>
          </table:table-cell>
          <table:table-cell office:value-type="string">
            <text:p>2023-10-18T23:02:42Z</text:p>
          </table:table-cell>
          <table:table-cell office:value-type="string">
            <text:p>2023-10-18T23:02:39Z</text:p>
          </table:table-cell>
          <table:table-cell office:value-type="string">
            <text:p/>
          </table:table-cell>
          <table:table-cell office:value-type="string">
            <text:p>0</text:p>
          </table:table-cell>
          <table:table-cell office:value-type="string">
            <text:p>0</text:p>
          </table:table-cell>
          <table:table-cell office:value-type="string">
            <text:p>163</text:p>
          </table:table-cell>
          <table:table-cell office:value-type="string">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yakob-aleksandrovich</text:p>
          </table:table-cell>
          <table:table-cell office:value-type="string">
            <text:p>0</text:p>
          </table:table-cell>
          <table:table-cell office:value-type="string">
            <text:p>0</text:p>
          </table:table-cell>
          <table:table-cell office:value-type="string">
            <text:p>https://github.com/unfoldingWord/tx-dev</text:p>
          </table:table-cell>
          <table:table-cell office:value-type="string">
            <text:p>2022-12-12T05:15:44Z</text:p>
          </table:table-cell>
        </table:table-row>
        <table:table-row>
          <table:table-cell office:value-type="string">
            <text:p>uw-pdf-preview</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2-22T16:08:39Z</text:p>
          </table:table-cell>
          <table:table-cell office:value-type="string">
            <text:p>2022-11-08T16:01:20Z</text:p>
          </table:table-cell>
          <table:table-cell office:value-type="string">
            <text:p/>
          </table:table-cell>
          <table:table-cell office:value-type="string">
            <text:p>0</text:p>
          </table:table-cell>
          <table:table-cell office:value-type="string">
            <text:p>0</text:p>
          </table:table-cell>
          <table:table-cell office:value-type="string">
            <text:p>74</text:p>
          </table:table-cell>
          <table:table-cell office:value-type="string">
            <text:p/>
          </table:table-cell>
          <table:table-cell office:value-type="string">
            <text:p>uw-pdf-previe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 mandolyte, larsgson</text:p>
          </table:table-cell>
          <table:table-cell office:value-type="string">
            <text:p>0</text:p>
          </table:table-cell>
          <table:table-cell office:value-type="string">
            <text:p>0</text:p>
          </table:table-cell>
          <table:table-cell office:value-type="string">
            <text:p>https://github.com/unfoldingWord/uw-pdf-preview</text:p>
          </table:table-cell>
          <table:table-cell office:value-type="string">
            <text:p>2022-11-08T15:51:52Z</text:p>
          </table:table-cell>
        </table:table-row>
        <table:table-row>
          <table:table-cell office:value-type="string">
            <text:p>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1T04:09:41Z</text:p>
          </table:table-cell>
          <table:table-cell office:value-type="string">
            <text:p>2022-11-02T13:14:23Z</text:p>
          </table:table-cell>
          <table:table-cell office:value-type="string">
            <text:p>2022-10-29T20:10:49Z</text:p>
          </table:table-cell>
          <table:table-cell office:value-type="string">
            <text:p>0</text:p>
          </table:table-cell>
          <table:table-cell office:value-type="string">
            <text:p>0</text:p>
          </table:table-cell>
          <table:table-cell office:value-type="string">
            <text:p>59</text:p>
          </table:table-cell>
          <table:table-cell office:value-type="string">
            <text:p/>
          </table:table-cell>
          <table:table-cell office:value-type="string">
            <text:p>dcs-js</text:p>
          </table:table-cell>
          <table:table-cell office:value-type="string">
            <text:p>False</text:p>
          </table:table-cell>
          <table:table-cell office:value-type="string">
            <text:p>784</text:p>
          </table:table-cell>
          <table:table-cell office:value-type="string">
            <text:p>2022-11-02T13:18:25.384Z</text:p>
          </table:table-cell>
          <table:table-cell office:value-type="string">
            <text:p>dcs-branch-merger, gateway-translate, dcs-react-hooks, bible-preview-app, dcs-login, dcs-js-example</text:p>
          </table:table-cell>
          <table:table-cell office:value-type="string">
            <text:p/>
          </table:table-cell>
          <table:table-cell office:value-type="string">
            <text:p>nishantshah-me/docusaurus, unfoldingWord/dcs-branch-merger, unfoldingWord-box3/bible-preview-app, unfoldingWord/gateway-translate</text:p>
          </table:table-cell>
          <table:table-cell office:value-type="string">
            <text:p>abelpz, richmahn</text:p>
          </table:table-cell>
          <table:table-cell office:value-type="string">
            <text:p>3</text:p>
          </table:table-cell>
          <table:table-cell office:value-type="string">
            <text:p>0</text:p>
          </table:table-cell>
          <table:table-cell office:value-type="string">
            <text:p>https://github.com/unfoldingWord/dcs-js</text:p>
          </table:table-cell>
          <table:table-cell office:value-type="string">
            <text:p>2022-10-29T01:30:37Z</text:p>
          </table:table-cell>
        </table:table-row>
        <table:table-row>
          <table:table-cell office:value-type="string">
            <text:p>uw-edi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9-12T15:49:20Z</text:p>
          </table:table-cell>
          <table:table-cell office:value-type="string">
            <text:p>2023-09-12T15:49:12Z</text:p>
          </table:table-cell>
          <table:table-cell office:value-type="string">
            <text:p/>
          </table:table-cell>
          <table:table-cell office:value-type="string">
            <text:p>5</text:p>
          </table:table-cell>
          <table:table-cell office:value-type="string">
            <text:p>3</text:p>
          </table:table-cell>
          <table:table-cell office:value-type="string">
            <text:p>175</text:p>
          </table:table-cell>
          <table:table-cell office:value-type="string">
            <text:p/>
          </table:table-cell>
          <table:table-cell office:value-type="string">
            <text:p>uw-editor</text:p>
          </table:table-cell>
          <table:table-cell office:value-type="string">
            <text:p>True</text:p>
          </table:table-cell>
          <table:table-cell office:value-type="string">
            <text:p>1181</text:p>
          </table:table-cell>
          <table:table-cell office:value-type="string">
            <text:p>2023-03-21T14:43:38.471Z</text:p>
          </table:table-cell>
          <table:table-cell office:value-type="string">
            <text:p/>
          </table:table-cell>
          <table:table-cell office:value-type="string">
            <text:p>epitelete-html, translation-helps-rcl</text:p>
          </table:table-cell>
          <table:table-cell office:value-type="string">
            <text:p>unfoldingWord/gateway-translate</text:p>
          </table:table-cell>
          <table:table-cell office:value-type="string">
            <text:p>larsgson, mandolyte, superdav42, abelpz, irahopkinson</text:p>
          </table:table-cell>
          <table:table-cell office:value-type="string">
            <text:p>0</text:p>
          </table:table-cell>
          <table:table-cell office:value-type="string">
            <text:p>0</text:p>
          </table:table-cell>
          <table:table-cell office:value-type="string">
            <text:p>https://github.com/unfoldingWord/uw-editor</text:p>
          </table:table-cell>
          <table:table-cell office:value-type="string">
            <text:p>2022-10-19T03:29:50Z</text:p>
          </table:table-cell>
        </table:table-row>
        <table:table-row>
          <table:table-cell office:value-type="string">
            <text:p>tx-dev-dcs</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2-02-09T21:13:08Z</text:p>
          </table:table-cell>
          <table:table-cell office:value-type="string">
            <text:p>2021-08-25T20:47:08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x-dev-dcs</text:p>
          </table:table-cell>
          <table:table-cell office:value-type="string">
            <text:p>2022-10-05T18:56:57Z</text:p>
          </table:table-cell>
        </table:table-row>
        <table:table-row>
          <table:table-cell office:value-type="string">
            <text:p>python-dcs-api-clien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3-08-23T20:41:15Z</text:p>
          </table:table-cell>
          <table:table-cell office:value-type="string">
            <text:p>2023-08-23T20:40:19Z</text:p>
          </table:table-cell>
          <table:table-cell office:value-type="string">
            <text:p>2023-08-23T20:41:15Z</text:p>
          </table:table-cell>
          <table:table-cell office:value-type="string">
            <text:p>0</text:p>
          </table:table-cell>
          <table:table-cell office:value-type="string">
            <text:p>0</text:p>
          </table:table-cell>
          <table:table-cell office:value-type="string">
            <text:p>4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phavector/all, Lyn4ever29/pipy_server, unfoldingWord/door43-job-handler, unfoldingWord/tx-job-handler</text:p>
          </table:table-cell>
          <table:table-cell office:value-type="string">
            <text:p>richmahn, RajeshHegde, jakobandersen</text:p>
          </table:table-cell>
          <table:table-cell office:value-type="string">
            <text:p>9</text:p>
          </table:table-cell>
          <table:table-cell office:value-type="string">
            <text:p>0</text:p>
          </table:table-cell>
          <table:table-cell office:value-type="string">
            <text:p>https://github.com/unfoldingWord/python-dcs-api-client</text:p>
          </table:table-cell>
          <table:table-cell office:value-type="string">
            <text:p>2022-10-04T15:56:11Z</text:p>
          </table:table-cell>
        </table:table-row>
        <table:table-row>
          <table:table-cell office:value-type="string">
            <text:p>python-dcs-catalog-clien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2-05-25T20:09:27Z</text:p>
          </table:table-cell>
          <table:table-cell office:value-type="string">
            <text:p>2022-05-25T20:09:23Z</text:p>
          </table:table-cell>
          <table:table-cell office:value-type="string">
            <text:p>2022-05-17T17:37:53Z</text:p>
          </table:table-cell>
          <table:table-cell office:value-type="string">
            <text:p>0</text:p>
          </table:table-cell>
          <table:table-cell office:value-type="string">
            <text:p>0</text:p>
          </table:table-cell>
          <table:table-cell office:value-type="string">
            <text:p>3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phavector/all, Lyn4ever29/pipy_server, unfoldingWord/tx-job-handler</text:p>
          </table:table-cell>
          <table:table-cell office:value-type="string">
            <text:p>RajeshHegde, richmahn, jakobandersen</text:p>
          </table:table-cell>
          <table:table-cell office:value-type="string">
            <text:p>6</text:p>
          </table:table-cell>
          <table:table-cell office:value-type="string">
            <text:p>0</text:p>
          </table:table-cell>
          <table:table-cell office:value-type="string">
            <text:p>https://github.com/unfoldingWord/python-dcs-catalog-client</text:p>
          </table:table-cell>
          <table:table-cell office:value-type="string">
            <text:p>2022-10-04T15:55:38Z</text:p>
          </table:table-cell>
        </table:table-row>
        <table:table-row>
          <table:table-cell office:value-type="string">
            <text:p>door43-enqueue-job</text:p>
          </table:table-cell>
          <table:table-cell office:value-type="string">
            <text:p>unfoldingWord</text:p>
          </table:table-cell>
          <table:table-cell office:value-type="string">
            <text:p>Python</text:p>
          </table:table-cell>
          <table:table-cell office:value-type="string">
            <text:p>False</text:p>
          </table:table-cell>
          <table:table-cell office:value-type="string">
            <text:p>True</text:p>
          </table:table-cell>
          <table:table-cell office:value-type="string">
            <text:p>2024-02-29T18:40:06Z</text:p>
          </table:table-cell>
          <table:table-cell office:value-type="string">
            <text:p>2024-02-29T18:39:45Z</text:p>
          </table:table-cell>
          <table:table-cell office:value-type="string">
            <text:p>2024-01-25T16:50:06Z</text:p>
          </table:table-cell>
          <table:table-cell office:value-type="string">
            <text:p>0</text:p>
          </table:table-cell>
          <table:table-cell office:value-type="string">
            <text:p>0</text:p>
          </table:table-cell>
          <table:table-cell office:value-type="string">
            <text:p>56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scsoft/webhook-queue</text:p>
          </table:table-cell>
          <table:table-cell office:value-type="string">
            <text:p>richmahn, RobH123, Robert Hunt, jag3773, tpdownes</text:p>
          </table:table-cell>
          <table:table-cell office:value-type="string">
            <text:p>24</text:p>
          </table:table-cell>
          <table:table-cell office:value-type="string">
            <text:p>0</text:p>
          </table:table-cell>
          <table:table-cell office:value-type="string">
            <text:p>https://github.com/unfoldingWord/door43-enqueue-job</text:p>
          </table:table-cell>
          <table:table-cell office:value-type="string">
            <text:p>2022-10-04T15:44:46Z</text:p>
          </table:table-cell>
        </table:table-row>
        <table:table-row>
          <table:table-cell office:value-type="string">
            <text:p>door43-catalog-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3-04-02T14:43:48Z</text:p>
          </table:table-cell>
          <table:table-cell office:value-type="string">
            <text:p>2023-04-02T14:40:57Z</text:p>
          </table:table-cell>
          <table:table-cell office:value-type="string">
            <text:p>2023-04-02T14:43:48Z</text:p>
          </table:table-cell>
          <table:table-cell office:value-type="string">
            <text:p>1</text:p>
          </table:table-cell>
          <table:table-cell office:value-type="string">
            <text:p>1</text:p>
          </table:table-cell>
          <table:table-cell office:value-type="string">
            <text:p>4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da1nerd</text:p>
          </table:table-cell>
          <table:table-cell office:value-type="string">
            <text:p>8</text:p>
          </table:table-cell>
          <table:table-cell office:value-type="string">
            <text:p>0</text:p>
          </table:table-cell>
          <table:table-cell office:value-type="string">
            <text:p>https://github.com/unfoldingWord/door43-catalog-job-handler</text:p>
          </table:table-cell>
          <table:table-cell office:value-type="string">
            <text:p>2022-10-04T15:44:21Z</text:p>
          </table:table-cell>
        </table:table-row>
        <table:table-row>
          <table:table-cell office:value-type="string">
            <text:p>dcs-pack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pack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blank-project-templat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8-23T18:30:41Z</text:p>
          </table:table-cell>
          <table:table-cell office:value-type="string">
            <text:p>2021-12-01T16:36:14Z</text:p>
          </table:table-cell>
          <table:table-cell office:value-type="string">
            <text:p/>
          </table:table-cell>
          <table:table-cell office:value-type="string">
            <text:p>2</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0</text:p>
          </table:table-cell>
          <table:table-cell office:value-type="string">
            <text:p>0</text:p>
          </table:table-cell>
          <table:table-cell office:value-type="string">
            <text:p>https://github.com/unfoldingWord/blank-project-template</text:p>
          </table:table-cell>
          <table:table-cell office:value-type="string">
            <text:p>2022-08-20T15:23:15Z</text:p>
          </table:table-cell>
        </table:table-row>
        <table:table-row>
          <table:table-cell office:value-type="string">
            <text:p>proskomma-react-hooks</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2-08-24T20:05:30Z</text:p>
          </table:table-cell>
          <table:table-cell office:value-type="string">
            <text:p>2022-07-15T18:05:20Z</text:p>
          </table:table-cell>
          <table:table-cell office:value-type="string">
            <text:p/>
          </table:table-cell>
          <table:table-cell office:value-type="string">
            <text:p>10</text:p>
          </table:table-cell>
          <table:table-cell office:value-type="string">
            <text:p>1</text:p>
          </table:table-cell>
          <table:table-cell office:value-type="string">
            <text:p>16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text:p>klappy, mvahowe, PhotoNomad0, jincypjose, mandolyte</text:p>
          </table:table-cell>
          <table:table-cell office:value-type="string">
            <text:p>0</text:p>
          </table:table-cell>
          <table:table-cell office:value-type="string">
            <text:p>0</text:p>
          </table:table-cell>
          <table:table-cell office:value-type="string">
            <text:p>https://github.com/unfoldingWord/proskomma-react-hooks</text:p>
          </table:table-cell>
          <table:table-cell office:value-type="string">
            <text:p>2022-06-17T15:50:39Z</text:p>
          </table:table-cell>
        </table:table-row>
        <table:table-row>
          <table:table-cell office:value-type="string">
            <text:p>dcs-react-hook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6-24T00:19:28Z</text:p>
          </table:table-cell>
          <table:table-cell office:value-type="string">
            <text:p>2022-06-23T20:16:40Z</text:p>
          </table:table-cell>
          <table:table-cell office:value-type="string">
            <text:p/>
          </table:table-cell>
          <table:table-cell office:value-type="string">
            <text:p>5</text:p>
          </table:table-cell>
          <table:table-cell office:value-type="string">
            <text:p>1</text:p>
          </table:table-cell>
          <table:table-cell office:value-type="string">
            <text:p>79</text:p>
          </table:table-cell>
          <table:table-cell office:value-type="string">
            <text:p/>
          </table:table-cell>
          <table:table-cell office:value-type="string">
            <text:p>dcs-react-hooks</text:p>
          </table:table-cell>
          <table:table-cell office:value-type="string">
            <text:p>False</text:p>
          </table:table-cell>
          <table:table-cell office:value-type="string">
            <text:p>177</text:p>
          </table:table-cell>
          <table:table-cell office:value-type="string">
            <text:p>2022-08-19T12:33:49.976Z</text:p>
          </table:table-cell>
          <table:table-cell office:value-type="string">
            <text:p/>
          </table:table-cell>
          <table:table-cell office:value-type="string">
            <text:p>dcs-js, uw-languages-rcl, @unfoldingword/eslint-config</text:p>
          </table:table-cell>
          <table:table-cell office:value-type="string">
            <text:p>nishantshah-me/docusaurus, unfoldingWord/gateway-translate</text:p>
          </table:table-cell>
          <table:table-cell office:value-type="string">
            <text:p>abelpz, mandolyte</text:p>
          </table:table-cell>
          <table:table-cell office:value-type="string">
            <text:p>0</text:p>
          </table:table-cell>
          <table:table-cell office:value-type="string">
            <text:p>0</text:p>
          </table:table-cell>
          <table:table-cell office:value-type="string">
            <text:p>https://github.com/unfoldingWord/dcs-react-hooks</text:p>
          </table:table-cell>
          <table:table-cell office:value-type="string">
            <text:p>2022-06-17T15:48:50Z</text:p>
          </table:table-cell>
        </table:table-row>
        <table:table-row>
          <table:table-cell office:value-type="string">
            <text:p>book-packag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2T13:43:17Z</text:p>
          </table:table-cell>
          <table:table-cell office:value-type="string">
            <text:p>2023-01-02T13:22:57Z</text:p>
          </table:table-cell>
          <table:table-cell office:value-type="string">
            <text:p/>
          </table:table-cell>
          <table:table-cell office:value-type="string">
            <text:p>10</text:p>
          </table:table-cell>
          <table:table-cell office:value-type="string">
            <text:p>8</text:p>
          </table:table-cell>
          <table:table-cell office:value-type="string">
            <text:p>184</text:p>
          </table:table-cell>
          <table:table-cell office:value-type="string">
            <text:p/>
          </table:table-cell>
          <table:table-cell office:value-type="string">
            <text:p>book-package-rcl</text:p>
          </table:table-cell>
          <table:table-cell office:value-type="string">
            <text:p>False</text:p>
          </table:table-cell>
          <table:table-cell office:value-type="string">
            <text:p>2216</text:p>
          </table:table-cell>
          <table:table-cell office:value-type="string">
            <text:p>2023-01-02T13:16:20.145Z</text:p>
          </table:table-cell>
          <table:table-cell office:value-type="string">
            <text:p>book-package-app</text:p>
          </table:table-cell>
          <table:table-cell office:value-type="string">
            <text:p>usfm-js, uw-word-count</text:p>
          </table:table-cell>
          <table:table-cell office:value-type="string">
            <text:p>unfoldingWord/book-package-app</text:p>
          </table:table-cell>
          <table:table-cell office:value-type="string">
            <text:p>mandolyte, abelpz, dependabot[bot]</text:p>
          </table:table-cell>
          <table:table-cell office:value-type="string">
            <text:p>0</text:p>
          </table:table-cell>
          <table:table-cell office:value-type="string">
            <text:p>0</text:p>
          </table:table-cell>
          <table:table-cell office:value-type="string">
            <text:p>https://github.com/unfoldingWord/book-package-rcl</text:p>
          </table:table-cell>
          <table:table-cell office:value-type="string">
            <text:p>2022-06-14T14:25:45Z</text:p>
          </table:table-cell>
        </table:table-row>
        <table:table-row>
          <table:table-cell office:value-type="string">
            <text:p>resource-workspa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6-13T13:45:24Z</text:p>
          </table:table-cell>
          <table:table-cell office:value-type="string">
            <text:p>2023-06-13T13:45:21Z</text:p>
          </table:table-cell>
          <table:table-cell office:value-type="string">
            <text:p/>
          </table:table-cell>
          <table:table-cell office:value-type="string">
            <text:p>3</text:p>
          </table:table-cell>
          <table:table-cell office:value-type="string">
            <text:p>0</text:p>
          </table:table-cell>
          <table:table-cell office:value-type="string">
            <text:p>159</text:p>
          </table:table-cell>
          <table:table-cell office:value-type="string">
            <text:p/>
          </table:table-cell>
          <table:table-cell office:value-type="string">
            <text:p>resource-workspace-rcl</text:p>
          </table:table-cell>
          <table:table-cell office:value-type="string">
            <text:p>False</text:p>
          </table:table-cell>
          <table:table-cell office:value-type="string">
            <text:p>3174</text:p>
          </table:table-cell>
          <table:table-cell office:value-type="string">
            <text:p>2023-06-13T13:51:03.803Z</text:p>
          </table:table-cell>
          <table:table-cell office:value-type="string">
            <text:p>gateway-admin, gateway-edit, bsa, gateway-translate, create-app, next-js-template, admin-app</text:p>
          </table:table-cell>
          <table:table-cell office:value-type="string">
            <text:p>@unfoldingword/eslint-config, gitea-react-toolkit, markdown-translatable, scripture-resources-rcl, translation-helps-rcl</text:p>
          </table:table-cell>
          <table:table-cell office:value-type="string">
            <text:p>unfoldingWord/obt, unfoldingWord/gateway-edit, unfoldingWord/gateway-translate, unfoldingWord/gateway-admin, hiscoder-com/obt</text:p>
          </table:table-cell>
          <table:table-cell office:value-type="string">
            <text:p>mannycolon, RoyalSix, PhotoNomad0, Sterling (Jay) Scott, foxprogs, mandolyte, Joel-C-Johnson</text:p>
          </table:table-cell>
          <table:table-cell office:value-type="string">
            <text:p>0</text:p>
          </table:table-cell>
          <table:table-cell office:value-type="string">
            <text:p>0</text:p>
          </table:table-cell>
          <table:table-cell office:value-type="string">
            <text:p>https://github.com/unfoldingWord/resource-workspace-rcl</text:p>
          </table:table-cell>
          <table:table-cell office:value-type="string">
            <text:p>2022-06-01T15:53:36Z</text:p>
          </table:table-cell>
        </table:table-row>
        <table:table-row>
          <table:table-cell office:value-type="string">
            <text:p>tcCreateQA-els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2-14T15:33:53Z</text:p>
          </table:table-cell>
          <table:table-cell office:value-type="string">
            <text:p>2023-02-14T15:33:53Z</text:p>
          </table:table-cell>
          <table:table-cell office:value-type="string">
            <text:p/>
          </table:table-cell>
          <table:table-cell office:value-type="string">
            <text:p>0</text:p>
          </table:table-cell>
          <table:table-cell office:value-type="string">
            <text:p>0</text:p>
          </table:table-cell>
          <table:table-cell office:value-type="string">
            <text:p>3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itsonlambert, elsylambert, Elsy Litson</text:p>
          </table:table-cell>
          <table:table-cell office:value-type="string">
            <text:p>0</text:p>
          </table:table-cell>
          <table:table-cell office:value-type="string">
            <text:p>0</text:p>
          </table:table-cell>
          <table:table-cell office:value-type="string">
            <text:p>https://github.com/unfoldingWord/tcCreateQA-elsy</text:p>
          </table:table-cell>
          <table:table-cell office:value-type="string">
            <text:p>2022-04-21T19:00:59Z</text:p>
          </table:table-cell>
        </table:table-row>
        <table:table-row>
          <table:table-cell office:value-type="string">
            <text:p>dcs-doc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2-25T23:31:19Z</text:p>
          </table:table-cell>
          <table:table-cell office:value-type="string">
            <text:p>2021-07-19T02:07:02Z</text:p>
          </table:table-cell>
          <table:table-cell office:value-type="string">
            <text:p/>
          </table:table-cell>
          <table:table-cell office:value-type="string">
            <text:p>0</text:p>
          </table:table-cell>
          <table:table-cell office:value-type="string">
            <text:p>0</text:p>
          </table:table-cell>
          <table:table-cell office:value-type="string">
            <text:p>65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text:p>0</text:p>
          </table:table-cell>
          <table:table-cell office:value-type="string">
            <text:p>0</text:p>
          </table:table-cell>
          <table:table-cell office:value-type="string">
            <text:p>https://github.com/unfoldingWord/dcs-docs</text:p>
          </table:table-cell>
          <table:table-cell office:value-type="string">
            <text:p>2022-02-25T23:02:31Z</text:p>
          </table:table-cell>
        </table:table-row>
        <table:table-row>
          <table:table-cell office:value-type="string">
            <text:p>book-package-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6T02:24:43Z</text:p>
          </table:table-cell>
          <table:table-cell office:value-type="string">
            <text:p>2023-01-02T13:23:19Z</text:p>
          </table:table-cell>
          <table:table-cell office:value-type="string">
            <text:p>2020-03-30T14:42:12Z</text:p>
          </table:table-cell>
          <table:table-cell office:value-type="string">
            <text:p>24</text:p>
          </table:table-cell>
          <table:table-cell office:value-type="string">
            <text:p>17</text:p>
          </table:table-cell>
          <table:table-cell office:value-type="string">
            <text:p>176</text:p>
          </table:table-cell>
          <table:table-cell office:value-type="string">
            <text:p/>
          </table:table-cell>
          <table:table-cell office:value-type="string">
            <text:p>book-package-app</text:p>
          </table:table-cell>
          <table:table-cell office:value-type="string">
            <text:p>False</text:p>
          </table:table-cell>
          <table:table-cell office:value-type="string">
            <text:p>112</text:p>
          </table:table-cell>
          <table:table-cell office:value-type="string">
            <text:p>2020-07-15T14:29:05.613Z</text:p>
          </table:table-cell>
          <table:table-cell office:value-type="string">
            <text:p/>
          </table:table-cell>
          <table:table-cell office:value-type="string">
            <text:p>book-package-rcl</text:p>
          </table:table-cell>
          <table:table-cell office:value-type="string">
            <text:p/>
          </table:table-cell>
          <table:table-cell office:value-type="string">
            <text:p>mandolyte, dependabot[bot], jag3773</text:p>
          </table:table-cell>
          <table:table-cell office:value-type="string">
            <text:p>7</text:p>
          </table:table-cell>
          <table:table-cell office:value-type="string">
            <text:p>55</text:p>
          </table:table-cell>
          <table:table-cell office:value-type="string">
            <text:p>https://github.com/unfoldingWord/book-package-app</text:p>
          </table:table-cell>
          <table:table-cell office:value-type="string">
            <text:p>2021-12-17T13:15:30Z</text:p>
          </table:table-cell>
        </table:table-row>
        <table:table-row>
          <table:table-cell office:value-type="string">
            <text:p>gl_database_private</text:p>
          </table:table-cell>
          <table:table-cell office:value-type="string">
            <text:p>unfoldingWord</text:p>
          </table:table-cell>
          <table:table-cell office:value-type="string">
            <text:p>CSS</text:p>
          </table:table-cell>
          <table:table-cell office:value-type="string">
            <text:p>False</text:p>
          </table:table-cell>
          <table:table-cell office:value-type="string">
            <text:p>False</text:p>
          </table:table-cell>
          <table:table-cell office:value-type="string">
            <text:p>2021-12-15T21:34:14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cobwegner</text:p>
          </table:table-cell>
          <table:table-cell office:value-type="string">
            <text:p>0</text:p>
          </table:table-cell>
          <table:table-cell office:value-type="string">
            <text:p>0</text:p>
          </table:table-cell>
          <table:table-cell office:value-type="string">
            <text:p>https://github.com/unfoldingWord/gl_database_private</text:p>
          </table:table-cell>
          <table:table-cell office:value-type="string">
            <text:p>2021-12-15T21:34:33Z</text:p>
          </table:table-cell>
        </table:table-row>
        <table:table-row>
          <table:table-cell office:value-type="string">
            <text:p>rc-schema</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8-10T21:21:47Z</text:p>
          </table:table-cell>
          <table:table-cell office:value-type="string">
            <text:p>2023-08-10T21:21:47Z</text:p>
          </table:table-cell>
          <table:table-cell office:value-type="string">
            <text:p/>
          </table:table-cell>
          <table:table-cell office:value-type="string">
            <text:p>0</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obH123</text:p>
          </table:table-cell>
          <table:table-cell office:value-type="string">
            <text:p>0</text:p>
          </table:table-cell>
          <table:table-cell office:value-type="string">
            <text:p>0</text:p>
          </table:table-cell>
          <table:table-cell office:value-type="string">
            <text:p>https://github.com/unfoldingWord/rc-schema</text:p>
          </table:table-cell>
          <table:table-cell office:value-type="string">
            <text:p>2021-11-30T18:22:18Z</text:p>
          </table:table-cell>
        </table:table-row>
        <table:table-row>
          <table:table-cell office:value-type="string">
            <text:p>gl_database_cod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10-14T15:01:43Z</text:p>
          </table:table-cell>
          <table:table-cell office:value-type="string">
            <text:p>2021-10-14T15:01:43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gl_database_code</text:p>
          </table:table-cell>
          <table:table-cell office:value-type="string">
            <text:p>2021-10-14T15:01:45Z</text:p>
          </table:table-cell>
        </table:table-row>
        <table:table-row>
          <table:table-cell office:value-type="string">
            <text:p>Katalon-gatewayEdit-Els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1-09-01T17:44:59Z</text:p>
          </table:table-cell>
          <table:table-cell office:value-type="string">
            <text:p>2021-09-01T17:44:55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itsonlambert, elsylambert</text:p>
          </table:table-cell>
          <table:table-cell office:value-type="string">
            <text:p>0</text:p>
          </table:table-cell>
          <table:table-cell office:value-type="string">
            <text:p>0</text:p>
          </table:table-cell>
          <table:table-cell office:value-type="string">
            <text:p>https://github.com/unfoldingWord/Katalon-gatewayEdit-Elsy</text:p>
          </table:table-cell>
          <table:table-cell office:value-type="string">
            <text:p>2021-09-01T17:45:03Z</text:p>
          </table:table-cell>
        </table:table-row>
        <table:table-row>
          <table:table-cell office:value-type="string">
            <text:p>Katalon_tC_Create</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1-07-08T17:16:23Z</text:p>
          </table:table-cell>
          <table:table-cell office:value-type="string">
            <text:p>2021-07-08T17:16:06Z</text:p>
          </table:table-cell>
          <table:table-cell office:value-type="string">
            <text:p/>
          </table:table-cell>
          <table:table-cell office:value-type="string">
            <text:p>0</text:p>
          </table:table-cell>
          <table:table-cell office:value-type="string">
            <text:p>0</text:p>
          </table:table-cell>
          <table:table-cell office:value-type="string">
            <text:p>8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kozie, cckoz</text:p>
          </table:table-cell>
          <table:table-cell office:value-type="string">
            <text:p>0</text:p>
          </table:table-cell>
          <table:table-cell office:value-type="string">
            <text:p>0</text:p>
          </table:table-cell>
          <table:table-cell office:value-type="string">
            <text:p>https://github.com/unfoldingWord/Katalon_tC_Create</text:p>
          </table:table-cell>
          <table:table-cell office:value-type="string">
            <text:p>2021-07-08T17:16:26Z</text:p>
          </table:table-cell>
        </table:table-row>
        <table:table-row>
          <table:table-cell office:value-type="string">
            <text:p>Katalon_MD-TSV_Converter_Koz</text:p>
          </table:table-cell>
          <table:table-cell office:value-type="string">
            <text:p>unfoldingWord</text:p>
          </table:table-cell>
          <table:table-cell office:value-type="string">
            <text:p>Groovy</text:p>
          </table:table-cell>
          <table:table-cell office:value-type="string">
            <text:p>False</text:p>
          </table:table-cell>
          <table:table-cell office:value-type="string">
            <text:p>False</text:p>
          </table:table-cell>
          <table:table-cell office:value-type="string">
            <text:p>2021-07-01T04:35:46Z</text:p>
          </table:table-cell>
          <table:table-cell office:value-type="string">
            <text:p>2021-07-01T04:33:40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kozie</text:p>
          </table:table-cell>
          <table:table-cell office:value-type="string">
            <text:p>0</text:p>
          </table:table-cell>
          <table:table-cell office:value-type="string">
            <text:p>0</text:p>
          </table:table-cell>
          <table:table-cell office:value-type="string">
            <text:p>https://github.com/unfoldingWord/Katalon_MD-TSV_Converter_Koz</text:p>
          </table:table-cell>
          <table:table-cell office:value-type="string">
            <text:p>2021-07-01T04:36:22Z</text:p>
          </table:table-cell>
        </table:table-row>
        <table:table-row>
          <table:table-cell office:value-type="string">
            <text:p>catalog-next-toolki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1-06-15T13:39:30Z</text:p>
          </table:table-cell>
          <table:table-cell office:value-type="string">
            <text:p>2021-06-15T13:39:27Z</text:p>
          </table:table-cell>
          <table:table-cell office:value-type="string">
            <text:p/>
          </table:table-cell>
          <table:table-cell office:value-type="string">
            <text:p>1</text:p>
          </table:table-cell>
          <table:table-cell office:value-type="string">
            <text:p>0</text:p>
          </table:table-cell>
          <table:table-cell office:value-type="string">
            <text:p>5</text:p>
          </table:table-cell>
          <table:table-cell office:value-type="string">
            <text:p/>
          </table:table-cell>
          <table:table-cell office:value-type="string">
            <text:p>catalog-next-tool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content-validation</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catalog-next-toolkit</text:p>
          </table:table-cell>
          <table:table-cell office:value-type="string">
            <text:p>2021-06-15T13:39:33Z</text:p>
          </table:table-cell>
        </table:table-row>
        <table:table-row>
          <table:table-cell office:value-type="string">
            <text:p>Katalon-gatewayEdit-Koz</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07-01T04:27:45Z</text:p>
          </table:table-cell>
          <table:table-cell office:value-type="string">
            <text:p>2021-05-22T18:43:0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0</text:p>
          </table:table-cell>
          <table:table-cell office:value-type="string">
            <text:p>0</text:p>
          </table:table-cell>
          <table:table-cell office:value-type="string">
            <text:p>https://github.com/unfoldingWord/Katalon-gatewayEdit-Koz</text:p>
          </table:table-cell>
          <table:table-cell office:value-type="string">
            <text:p>2021-05-22T18:43:04Z</text:p>
          </table:table-cell>
        </table:table-row>
        <table:table-row>
          <table:table-cell office:value-type="string">
            <text:p>gl_databas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02-10T15:16:33Z</text:p>
          </table:table-cell>
          <table:table-cell office:value-type="string">
            <text:p>2021-01-21T20:44:46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gl_database</text:p>
          </table:table-cell>
          <table:table-cell office:value-type="string">
            <text:p>2021-01-21T20:44:49Z</text:p>
          </table:table-cell>
        </table:table-row>
        <table:table-row>
          <table:table-cell office:value-type="string">
            <text:p>tc-create-2-poc</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12-22T20:44:24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create-2-poc</text:p>
          </table:table-cell>
          <table:table-cell office:value-type="string">
            <text:p>2020-12-17T16:24:38Z</text:p>
          </table:table-cell>
        </table:table-row>
        <table:table-row>
          <table:table-cell office:value-type="string">
            <text:p>eslint-confi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7T20:47:13Z</text:p>
          </table:table-cell>
          <table:table-cell office:value-type="string">
            <text:p>2020-12-15T23:29:03Z</text:p>
          </table:table-cell>
          <table:table-cell office:value-type="string">
            <text:p/>
          </table:table-cell>
          <table:table-cell office:value-type="string">
            <text:p>7</text:p>
          </table:table-cell>
          <table:table-cell office:value-type="string">
            <text:p>6</text:p>
          </table:table-cell>
          <table:table-cell office:value-type="string">
            <text:p>23</text:p>
          </table:table-cell>
          <table:table-cell office:value-type="string">
            <text:p/>
          </table:table-cell>
          <table:table-cell office:value-type="string">
            <text:p>@unfoldingword/eslint-config</text:p>
          </table:table-cell>
          <table:table-cell office:value-type="string">
            <text:p/>
          </table:table-cell>
          <table:table-cell office:value-type="string">
            <text:p/>
          </table:table-cell>
          <table:table-cell office:value-type="string">
            <text:p/>
          </table:table-cell>
          <table:table-cell office:value-type="string">
            <text:p>enhanced-word-aligner-rcl, tc-create-app, gitea-react-toolkit, single-scripture-rcl, scripture-resources-rcl, datatable-translatable, markdown-translatable, dcs-react-hooks, resource-workspace-rcl, simple-text-editor-rcl, gitea-offline-poc</text:p>
          </table:table-cell>
          <table:table-cell office:value-type="string">
            <text:p/>
          </table:table-cell>
          <table:table-cell office:value-type="string">
            <text:p/>
          </table:table-cell>
          <table:table-cell office:value-type="string">
            <text:p>RoyalSix, Sterling (Jay) Scott</text:p>
          </table:table-cell>
          <table:table-cell office:value-type="string">
            <text:p>0</text:p>
          </table:table-cell>
          <table:table-cell office:value-type="string">
            <text:p>0</text:p>
          </table:table-cell>
          <table:table-cell office:value-type="string">
            <text:p>https://github.com/unfoldingWord/eslint-config</text:p>
          </table:table-cell>
          <table:table-cell office:value-type="string">
            <text:p>2020-12-15T23:29:10Z</text:p>
          </table:table-cell>
        </table:table-row>
        <table:table-row>
          <table:table-cell office:value-type="string">
            <text:p>uw-word-cou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5T03:16:29Z</text:p>
          </table:table-cell>
          <table:table-cell office:value-type="string">
            <text:p>2020-08-11T13:41:51Z</text:p>
          </table:table-cell>
          <table:table-cell office:value-type="string">
            <text:p/>
          </table:table-cell>
          <table:table-cell office:value-type="string">
            <text:p>29</text:p>
          </table:table-cell>
          <table:table-cell office:value-type="string">
            <text:p>25</text:p>
          </table:table-cell>
          <table:table-cell office:value-type="string">
            <text:p>71</text:p>
          </table:table-cell>
          <table:table-cell office:value-type="string">
            <text:p/>
          </table:table-cell>
          <table:table-cell office:value-type="string">
            <text:p>uw-word-count</text:p>
          </table:table-cell>
          <table:table-cell office:value-type="string">
            <text:p>False</text:p>
          </table:table-cell>
          <table:table-cell office:value-type="string">
            <text:p>362</text:p>
          </table:table-cell>
          <table:table-cell office:value-type="string">
            <text:p>2020-07-15T14:01:25.409Z</text:p>
          </table:table-cell>
          <table:table-cell office:value-type="string">
            <text:p>book-package-rcl</text:p>
          </table:table-cell>
          <table:table-cell office:value-type="string">
            <text:p>usfm-js</text:p>
          </table:table-cell>
          <table:table-cell office:value-type="string">
            <text:p>unfoldingWord/book-package-app, unfoldingWord/book-package-rcl</text:p>
          </table:table-cell>
          <table:table-cell office:value-type="string">
            <text:p>mandolyte, dependabot[bot], jag3773</text:p>
          </table:table-cell>
          <table:table-cell office:value-type="string">
            <text:p>0</text:p>
          </table:table-cell>
          <table:table-cell office:value-type="string">
            <text:p>0</text:p>
          </table:table-cell>
          <table:table-cell office:value-type="string">
            <text:p>https://github.com/unfoldingWord/uw-word-count</text:p>
          </table:table-cell>
          <table:table-cell office:value-type="string">
            <text:p>2020-08-11T13:41:55Z</text:p>
          </table:table-cell>
        </table:table-row>
        <table:table-row>
          <table:table-cell office:value-type="string">
            <text:p>usfm-js-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5-26T18:46:35Z</text:p>
          </table:table-cell>
          <table:table-cell office:value-type="string">
            <text:p>2020-05-26T18:45:20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usfm-js-wrapp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RobH123</text:p>
          </table:table-cell>
          <table:table-cell office:value-type="string">
            <text:p>0</text:p>
          </table:table-cell>
          <table:table-cell office:value-type="string">
            <text:p>0</text:p>
          </table:table-cell>
          <table:table-cell office:value-type="string">
            <text:p>https://github.com/unfoldingWord/usfm-js-wrapper</text:p>
          </table:table-cell>
          <table:table-cell office:value-type="string">
            <text:p>2020-05-26T20:17:20Z</text:p>
          </table:table-cell>
        </table:table-row>
        <table:table-row>
          <table:table-cell office:value-type="string">
            <text:p>dw_redirec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05-14T14:42:42Z</text:p>
          </table:table-cell>
          <table:table-cell office:value-type="string">
            <text:p>2020-05-14T14:42:41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dw_redirects</text:p>
          </table:table-cell>
          <table:table-cell office:value-type="string">
            <text:p>2020-05-14T14:42:44Z</text:p>
          </table:table-cell>
        </table:table-row>
        <table:table-row>
          <table:table-cell office:value-type="string">
            <text:p>salesforce-donation-page-package-customization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05-11T18:43:55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salesforce-donation-page-package-customizations</text:p>
          </table:table-cell>
          <table:table-cell office:value-type="string">
            <text:p>2020-05-11T18:43:58Z</text:p>
          </table:table-cell>
        </table:table-row>
        <table:table-row>
          <table:table-cell office:value-type="string">
            <text:p>salesforce-donation-page-package-cor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05-11T18:43:25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salesforce-donation-page-package-core</text:p>
          </table:table-cell>
          <table:table-cell office:value-type="string">
            <text:p>2020-05-11T18:43:28Z</text:p>
          </table:table-cell>
        </table:table-row>
        <table:table-row>
          <table:table-cell office:value-type="string">
            <text:p>wordMAP-lex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0-08-11T15:37:37Z</text:p>
          </table:table-cell>
          <table:table-cell office:value-type="string">
            <text:p>2020-04-22T13:11:59Z</text:p>
          </table:table-cell>
          <table:table-cell office:value-type="string">
            <text:p/>
          </table:table-cell>
          <table:table-cell office:value-type="string">
            <text:p>0</text:p>
          </table:table-cell>
          <table:table-cell office:value-type="string">
            <text:p>0</text:p>
          </table:table-cell>
          <table:table-cell office:value-type="string">
            <text:p>39</text:p>
          </table:table-cell>
          <table:table-cell office:value-type="string">
            <text:p/>
          </table:table-cell>
          <table:table-cell office:value-type="string">
            <text:p>wordmap-lexer</text:p>
          </table:table-cell>
          <table:table-cell office:value-type="string">
            <text:p/>
          </table:table-cell>
          <table:table-cell office:value-type="string">
            <text:p/>
          </table:table-cell>
          <table:table-cell office:value-type="string">
            <text:p/>
          </table:table-cell>
          <table:table-cell office:value-type="string">
            <text:p>wordmap-usfm, translationCore, wordAlignment, string-punctuation-tokenizer, word-aligner-rcl, word-aligner-lib, uw-wordmapbooster, checking-tool-rcl, wordmap, wordmap-mt, alignment-playground, wordmap-react-toolkit</text:p>
          </table:table-cell>
          <table:table-cell office:value-type="string">
            <text:p>string-punctuation-tokenizer</text:p>
          </table:table-cell>
          <table:table-cell office:value-type="string">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text:p>
          </table:table-cell>
          <table:table-cell office:value-type="string">
            <text:p>da1nerd, mannycolon, dependabot-support, RoyalSix, PhotoNomad0, Sterling (Jay) Scott, bspidel</text:p>
          </table:table-cell>
          <table:table-cell office:value-type="string">
            <text:p>0</text:p>
          </table:table-cell>
          <table:table-cell office:value-type="string">
            <text:p>0</text:p>
          </table:table-cell>
          <table:table-cell office:value-type="string">
            <text:p>https://github.com/unfoldingWord/wordMAP-lexer</text:p>
          </table:table-cell>
          <table:table-cell office:value-type="string">
            <text:p>2020-04-22T13:12:03Z</text:p>
          </table:table-cell>
        </table:table-row>
        <table:table-row>
          <table:table-cell office:value-type="string">
            <text:p>tc-too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8-11T15:36:38Z</text:p>
          </table:table-cell>
          <table:table-cell office:value-type="string">
            <text:p>2020-04-16T01:20:11Z</text:p>
          </table:table-cell>
          <table:table-cell office:value-type="string">
            <text:p>2019-01-10T06:26:02Z</text:p>
          </table:table-cell>
          <table:table-cell office:value-type="string">
            <text:p>0</text:p>
          </table:table-cell>
          <table:table-cell office:value-type="string">
            <text:p>0</text:p>
          </table:table-cell>
          <table:table-cell office:value-type="string">
            <text:p>180</text:p>
          </table:table-cell>
          <table:table-cell office:value-type="string">
            <text:p/>
          </table:table-cell>
          <table:table-cell office:value-type="string">
            <text:p>tc-tool</text:p>
          </table:table-cell>
          <table:table-cell office:value-type="string">
            <text:p/>
          </table:table-cell>
          <table:table-cell office:value-type="string">
            <text:p/>
          </table:table-cell>
          <table:table-cell office:value-type="string">
            <text:p/>
          </table:table-cell>
          <table:table-cell office:value-type="string">
            <text:p>translationCore, translationNotes, translationWords, wordAlignment, checking-tool-wrapper, ScripturePane, VerseCheck, toolTemplate</text:p>
          </table:table-cell>
          <table:table-cell office:value-type="string">
            <text:p/>
          </table:table-cell>
          <table:table-cell office:value-type="string">
            <text:p>FoustAndrew/wordAlignment, unfoldingWord/checking-tool-wrapper, unfoldingWord/translationNotes, unfoldingWord/translationWords, unfoldingWord/wordAlignment, unfoldingWord/translationCore</text:p>
          </table:table-cell>
          <table:table-cell office:value-type="string">
            <text:p>da1nerd, mannycolon, dependabot-support, PhotoNomad0, RoyalSix, bspidel</text:p>
          </table:table-cell>
          <table:table-cell office:value-type="string">
            <text:p>3</text:p>
          </table:table-cell>
          <table:table-cell office:value-type="string">
            <text:p>0</text:p>
          </table:table-cell>
          <table:table-cell office:value-type="string">
            <text:p>https://github.com/unfoldingWord/tc-tool</text:p>
          </table:table-cell>
          <table:table-cell office:value-type="string">
            <text:p>2020-04-16T01:20:15Z</text:p>
          </table:table-cell>
        </table:table-row>
        <table:table-row>
          <table:table-cell office:value-type="string">
            <text:p>tc-electron-env</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3-15T16:52:56Z</text:p>
          </table:table-cell>
          <table:table-cell office:value-type="string">
            <text:p>2020-03-23T19:09:54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FoustAndrew/wordAlignment, mannycolon/electronite-poc-app, unfoldingWord/translationCore, unfoldingWord/wordAlignment, unfoldingWord/checking-tool-wrapper</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electron-env</text:p>
          </table:table-cell>
          <table:table-cell office:value-type="string">
            <text:p>2020-03-23T19:09:57Z</text:p>
          </table:table-cell>
        </table:table-row>
        <table:table-row>
          <table:table-cell office:value-type="string">
            <text:p>t-core-submodule-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19-10-22T20:22:22Z</text:p>
          </table:table-cell>
          <table:table-cell office:value-type="string">
            <text:p>2019-10-22T20:22:20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tc-submodule-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translationCore-submodule-updater</text:p>
          </table:table-cell>
          <table:table-cell office:value-type="string">
            <text:p>ihoegen, mannycolon</text:p>
          </table:table-cell>
          <table:table-cell office:value-type="string">
            <text:p>0</text:p>
          </table:table-cell>
          <table:table-cell office:value-type="string">
            <text:p>0</text:p>
          </table:table-cell>
          <table:table-cell office:value-type="string">
            <text:p>https://github.com/unfoldingWord/t-core-submodule-updater</text:p>
          </table:table-cell>
          <table:table-cell office:value-type="string">
            <text:p>2019-10-22T20:22:23Z</text:p>
          </table:table-cell>
        </table:table-row>
        <table:table-row>
          <table:table-cell office:value-type="string">
            <text:p>tc-string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5:11Z</text:p>
          </table:table-cell>
          <table:table-cell office:value-type="string">
            <text:p>2018-05-03T21:25:02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tc-strings</text:p>
          </table:table-cell>
          <table:table-cell office:value-type="string">
            <text:p/>
          </table:table-cell>
          <table:table-cell office:value-type="string">
            <text:p/>
          </table:table-cell>
          <table:table-cell office:value-type="string">
            <text:p/>
          </table:table-cell>
          <table:table-cell office:value-type="string">
            <text:p>translationCore, word-aligner-lib, checking-tool-rcl, selections, VerseCheck</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c-strings</text:p>
          </table:table-cell>
          <table:table-cell office:value-type="string">
            <text:p>2019-10-22T19:46:14Z</text:p>
          </table:table-cell>
        </table:table-row>
        <table:table-row>
          <table:table-cell office:value-type="string">
            <text:p>selection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3:33Z</text:p>
          </table:table-cell>
          <table:table-cell office:value-type="string">
            <text:p>2018-05-03T21:23:29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selections</text:p>
          </table:table-cell>
          <table:table-cell office:value-type="string">
            <text:p/>
          </table:table-cell>
          <table:table-cell office:value-type="string">
            <text:p/>
          </table:table-cell>
          <table:table-cell office:value-type="string">
            <text:p/>
          </table:table-cell>
          <table:table-cell office:value-type="string">
            <text:p>translationCore, wordAlignment, checking-tool-wrapper, VerseCheck</text:p>
          </table:table-cell>
          <table:table-cell office:value-type="string">
            <text:p>tc-strings</text:p>
          </table:table-cell>
          <table:table-cell office:value-type="string">
            <text:p>FoustAndrew/wordAlignment, unfoldingWord/wordAlignment, unfoldingWord/checking-tool-wrapper, unfoldingWord/translationNotes, unfoldingWord/translationWords, unfoldingWord/translationCore</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selections</text:p>
          </table:table-cell>
          <table:table-cell office:value-type="string">
            <text:p>2019-10-22T19:45:39Z</text:p>
          </table:table-cell>
        </table:table-row>
        <table:table-row>
          <table:table-cell office:value-type="string">
            <text:p>ts-androi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7-26T16:17:42Z</text:p>
          </table:table-cell>
          <table:table-cell office:value-type="string">
            <text:p>2019-07-26T16:15:31Z</text:p>
          </table:table-cell>
          <table:table-cell office:value-type="string">
            <text:p>2019-07-29T13:45:34Z</text:p>
          </table:table-cell>
          <table:table-cell office:value-type="string">
            <text:p>651</text:p>
          </table:table-cell>
          <table:table-cell office:value-type="string">
            <text:p>0</text:p>
          </table:table-cell>
          <table:table-cell office:value-type="string">
            <text:p>331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PhotoNomad0, jshuma, andreradroid, jag3773, HannaJaicks, benjore, mondele, sea-liesch</text:p>
          </table:table-cell>
          <table:table-cell office:value-type="string">
            <text:p>61</text:p>
          </table:table-cell>
          <table:table-cell office:value-type="string">
            <text:p>2302</text:p>
          </table:table-cell>
          <table:table-cell office:value-type="string">
            <text:p>https://github.com/unfoldingWord-dev/ts-android</text:p>
          </table:table-cell>
          <table:table-cell office:value-type="string">
            <text:p>2026-06-23T06:48:31Z</text:p>
          </table:table-cell>
        </table:table-row>
        <table:table-row>
          <table:table-cell office:value-type="string">
            <text:p>ScripturePan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7T19:59:54Z</text:p>
          </table:table-cell>
          <table:table-cell office:value-type="string">
            <text:p>2018-05-17T19:59:53Z</text:p>
          </table:table-cell>
          <table:table-cell office:value-type="string">
            <text:p/>
          </table:table-cell>
          <table:table-cell office:value-type="string">
            <text:p>0</text:p>
          </table:table-cell>
          <table:table-cell office:value-type="string">
            <text:p>0</text:p>
          </table:table-cell>
          <table:table-cell office:value-type="string">
            <text:p>450</text:p>
          </table:table-cell>
          <table:table-cell office:value-type="string">
            <text:p/>
          </table:table-cell>
          <table:table-cell office:value-type="string">
            <text:p>Scripture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ring-punctuation-tokenizer, tc-tool, usfm-js</text:p>
          </table:table-cell>
          <table:table-cell office:value-type="string">
            <text:p/>
          </table:table-cell>
          <table:table-cell office:value-type="string">
            <text:p>mannycolon, PhotoNomad0, da1nerd, klappy, RoyalSix, EllDoubleYew, cdwhitfield73, Sterling (Jay) Scott, ihoegen, richmahn, bspidel, Richard Mahn</text:p>
          </table:table-cell>
          <table:table-cell office:value-type="string">
            <text:p>0</text:p>
          </table:table-cell>
          <table:table-cell office:value-type="string">
            <text:p>0</text:p>
          </table:table-cell>
          <table:table-cell office:value-type="string">
            <text:p>https://github.com/unfoldingWord-dev/ScripturePane</text:p>
          </table:table-cell>
          <table:table-cell office:value-type="string">
            <text:p>2026-06-18T18:23:13Z</text:p>
          </table:table-cell>
        </table:table-row>
        <table:table-row>
          <table:table-cell office:value-type="string">
            <text:p>translationNote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08-15T16:29:39Z</text:p>
          </table:table-cell>
          <table:table-cell office:value-type="string">
            <text:p>2016-08-15T16:29:38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Notes</text:p>
          </table:table-cell>
          <table:table-cell office:value-type="string">
            <text:p>2026-06-18T17:34:51Z</text:p>
          </table:table-cell>
        </table:table-row>
        <table:table-row>
          <table:table-cell office:value-type="string">
            <text:p>ts-desktop</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22-06-17T00:09:31Z</text:p>
          </table:table-cell>
          <table:table-cell office:value-type="string">
            <text:p>2019-11-11T14:08:52Z</text:p>
          </table:table-cell>
          <table:table-cell office:value-type="string">
            <text:p>2019-11-11T14:16:17Z</text:p>
          </table:table-cell>
          <table:table-cell office:value-type="string">
            <text:p>182</text:p>
          </table:table-cell>
          <table:table-cell office:value-type="string">
            <text:p>11</text:p>
          </table:table-cell>
          <table:table-cell office:value-type="string">
            <text:p>299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dwhitfield73, da1nerd, Thomas Klemz, vleong2332, Travis CI, kbuildsyourdotcom, EmmittJ, Delmar Hager, jag3773, a-gundy, jeremymlane, dhager7, soccerhand, Travis-CI</text:p>
          </table:table-cell>
          <table:table-cell office:value-type="string">
            <text:p>29</text:p>
          </table:table-cell>
          <table:table-cell office:value-type="string">
            <text:p>14397</text:p>
          </table:table-cell>
          <table:table-cell office:value-type="string">
            <text:p>https://github.com/unfoldingWord-dev/ts-desktop</text:p>
          </table:table-cell>
          <table:table-cell office:value-type="string">
            <text:p>2026-04-22T14:46:49Z</text:p>
          </table:table-cell>
        </table:table-row>
        <table:table-row>
          <table:table-cell office:value-type="string">
            <text:p>tx-door43</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2-06T12:06:34Z</text:p>
          </table:table-cell>
          <table:table-cell office:value-type="string">
            <text:p>2016-12-20T05:51:28Z</text:p>
          </table:table-cell>
          <table:table-cell office:value-type="string">
            <text:p/>
          </table:table-cell>
          <table:table-cell office:value-type="string">
            <text:p>0</text:p>
          </table:table-cell>
          <table:table-cell office:value-type="string">
            <text:p>0</text:p>
          </table:table-cell>
          <table:table-cell office:value-type="string">
            <text:p>5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Gogs</text:p>
          </table:table-cell>
          <table:table-cell office:value-type="string">
            <text:p>0</text:p>
          </table:table-cell>
          <table:table-cell office:value-type="string">
            <text:p>0</text:p>
          </table:table-cell>
          <table:table-cell office:value-type="string">
            <text:p>https://github.com/unfoldingWord-dev/tx-door43</text:p>
          </table:table-cell>
          <table:table-cell office:value-type="string">
            <text:p>2026-03-15T03:15:10Z</text:p>
          </table:table-cell>
        </table:table-row>
        <table:table-row>
          <table:table-cell office:value-type="string">
            <text:p>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4-04-19T15:52:11Z</text:p>
          </table:table-cell>
          <table:table-cell office:value-type="string">
            <text:p>2024-04-19T15:51:24Z</text:p>
          </table:table-cell>
          <table:table-cell office:value-type="string">
            <text:p/>
          </table:table-cell>
          <table:table-cell office:value-type="string">
            <text:p>13</text:p>
          </table:table-cell>
          <table:table-cell office:value-type="string">
            <text:p>13</text:p>
          </table:table-cell>
          <table:table-cell office:value-type="string">
            <text:p>2396</text:p>
          </table:table-cell>
          <table:table-cell office:value-type="string">
            <text:p>git@git.door43.org:unfoldingWord-dev/tx-dev-dcs.g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text:p>0</text:p>
          </table:table-cell>
          <table:table-cell office:value-type="string">
            <text:p>0</text:p>
          </table:table-cell>
          <table:table-cell office:value-type="string">
            <text:p>https://github.com/unfoldingWord-dev/tools</text:p>
          </table:table-cell>
          <table:table-cell office:value-type="string">
            <text:p>2026-03-15T03:14:48Z</text:p>
          </table:table-cell>
        </table:table-row>
        <table:table-row>
          <table:table-cell office:value-type="string">
            <text:p>Door43</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7-04-25T18:49:08Z</text:p>
          </table:table-cell>
          <table:table-cell office:value-type="string">
            <text:p>2016-11-15T14:20:40Z</text:p>
          </table:table-cell>
          <table:table-cell office:value-type="string">
            <text:p/>
          </table:table-cell>
          <table:table-cell office:value-type="string">
            <text:p>17</text:p>
          </table:table-cell>
          <table:table-cell office:value-type="string">
            <text:p>0</text:p>
          </table:table-cell>
          <table:table-cell office:value-type="string">
            <text:p>548</text:p>
          </table:table-cell>
          <table:table-cell office:value-type="string">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text:p>0</text:p>
          </table:table-cell>
          <table:table-cell office:value-type="string">
            <text:p>0</text:p>
          </table:table-cell>
          <table:table-cell office:value-type="string">
            <text:p>https://github.com/unfoldingWord-dev/Door43</text:p>
          </table:table-cell>
          <table:table-cell office:value-type="string">
            <text:p>2026-03-15T03:14:44Z</text:p>
          </table:table-cell>
        </table:table-row>
        <table:table-row>
          <table:table-cell office:value-type="string">
            <text:p>USFM-Uti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1-14T22:01:10Z</text:p>
          </table:table-cell>
          <table:table-cell office:value-type="string">
            <text:p>2016-10-04T01:35:53Z</text:p>
          </table:table-cell>
          <table:table-cell office:value-type="string">
            <text:p/>
          </table:table-cell>
          <table:table-cell office:value-type="string">
            <text:p>1</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text:p>
          </table:table-cell>
          <table:table-cell office:value-type="string">
            <text:p>0</text:p>
          </table:table-cell>
          <table:table-cell office:value-type="string">
            <text:p>0</text:p>
          </table:table-cell>
          <table:table-cell office:value-type="string">
            <text:p>https://github.com/unfoldingWord-dev/USFM-Utils</text:p>
          </table:table-cell>
          <table:table-cell office:value-type="string">
            <text:p>2026-02-23T14:45:47Z</text:p>
          </table:table-cell>
        </table:table-row>
        <table:table-row>
          <table:table-cell office:value-type="string">
            <text:p>Unlocked-Bible-Commentary-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03:46Z</text:p>
          </table:table-cell>
          <table:table-cell office:value-type="string">
            <text:p>2025-10-09T11:03:46Z</text:p>
          </table:table-cell>
          <table:table-cell office:value-type="string">
            <text:p/>
          </table:table-cell>
          <table:table-cell office:value-type="string">
            <text:p>0</text:p>
          </table:table-cell>
          <table:table-cell office:value-type="string">
            <text:p>0</text:p>
          </table:table-cell>
          <table:table-cell office:value-type="string">
            <text:p>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yakob-aleksandrovich, jag3773</text:p>
          </table:table-cell>
          <table:table-cell office:value-type="string">
            <text:p>0</text:p>
          </table:table-cell>
          <table:table-cell office:value-type="string">
            <text:p>0</text:p>
          </table:table-cell>
          <table:table-cell office:value-type="string">
            <text:p>https://github.com/unfoldingWord-dev/Unlocked-Bible-Commentary-Info</text:p>
          </table:table-cell>
          <table:table-cell office:value-type="string">
            <text:p>2025-12-09T15:21:29Z</text:p>
          </table:table-cell>
        </table:table-row>
        <table:table-row>
          <table:table-cell office:value-type="string">
            <text:p>Unlocked-Bible-Notes-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07:50Z</text:p>
          </table:table-cell>
          <table:table-cell office:value-type="string">
            <text:p>2025-10-09T11:07:50Z</text:p>
          </table:table-cell>
          <table:table-cell office:value-type="string">
            <text:p/>
          </table:table-cell>
          <table:table-cell office:value-type="string">
            <text:p>0</text:p>
          </table:table-cell>
          <table:table-cell office:value-type="string">
            <text:p>0</text:p>
          </table:table-cell>
          <table:table-cell office:value-type="string">
            <text:p>10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jag3773, yakob-aleksandrovich, russp41</text:p>
          </table:table-cell>
          <table:table-cell office:value-type="string">
            <text:p>0</text:p>
          </table:table-cell>
          <table:table-cell office:value-type="string">
            <text:p>0</text:p>
          </table:table-cell>
          <table:table-cell office:value-type="string">
            <text:p>https://github.com/unfoldingWord-dev/Unlocked-Bible-Notes-Info</text:p>
          </table:table-cell>
          <table:table-cell office:value-type="string">
            <text:p>2025-12-09T15:21:13Z</text:p>
          </table:table-cell>
        </table:table-row>
        <table:table-row>
          <table:table-cell office:value-type="string">
            <text:p>USFM-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9-11-19T01:34:28Z</text:p>
          </table:table-cell>
          <table:table-cell office:value-type="string">
            <text:p>2019-11-19T01:34:27Z</text:p>
          </table:table-cell>
          <table:table-cell office:value-type="string">
            <text:p>2017-08-24T19:20:35Z</text:p>
          </table:table-cell>
          <table:table-cell office:value-type="string">
            <text:p>3</text:p>
          </table:table-cell>
          <table:table-cell office:value-type="string">
            <text:p>1</text:p>
          </table:table-cell>
          <table:table-cell office:value-type="string">
            <text:p>17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penenglishbible/USFM-Tools</text:p>
          </table:table-cell>
          <table:table-cell office:value-type="string">
            <text:p>Richard Mahn, kbuildsyourdotcom, Jesse A. Griffin, openenglishbible, da1nerd, richmahn, phillip-hopper, Phil Hopper, jag3773, rbnswartz, PhotoNomad0</text:p>
          </table:table-cell>
          <table:table-cell office:value-type="string">
            <text:p>2</text:p>
          </table:table-cell>
          <table:table-cell office:value-type="string">
            <text:p>0</text:p>
          </table:table-cell>
          <table:table-cell office:value-type="string">
            <text:p>https://github.com/unfoldingWord-dev/USFM-Tools</text:p>
          </table:table-cell>
          <table:table-cell office:value-type="string">
            <text:p>2025-12-05T16:07:19Z</text:p>
          </table:table-cell>
        </table:table-row>
        <table:table-row>
          <table:table-cell office:value-type="string">
            <text:p>hackathon-zpp</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18-02-10T01:07:00Z</text:p>
          </table:table-cell>
          <table:table-cell office:value-type="string">
            <text:p>2018-02-10T01:07:00Z</text:p>
          </table:table-cell>
          <table:table-cell office:value-type="string">
            <text:p/>
          </table:table-cell>
          <table:table-cell office:value-type="string">
            <text:p>0</text:p>
          </table:table-cell>
          <table:table-cell office:value-type="string">
            <text:p>0</text:p>
          </table:table-cell>
          <table:table-cell office:value-type="string">
            <text:p>2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grecojs/nextjs-blogger</text:p>
          </table:table-cell>
          <table:table-cell office:value-type="string">
            <text:p>Thomas Greco, tgrecojs, zacjones93</text:p>
          </table:table-cell>
          <table:table-cell office:value-type="string">
            <text:p>0</text:p>
          </table:table-cell>
          <table:table-cell office:value-type="string">
            <text:p>0</text:p>
          </table:table-cell>
          <table:table-cell office:value-type="string">
            <text:p>https://github.com/unfoldingWord-dev/hackathon-zpp</text:p>
          </table:table-cell>
          <table:table-cell office:value-type="string">
            <text:p>2025-12-03T19:19:04Z</text:p>
          </table:table-cell>
        </table:table-row>
        <table:table-row>
          <table:table-cell office:value-type="string">
            <text:p>submachine</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5-02-17T18:57:00Z</text:p>
          </table:table-cell>
          <table:table-cell office:value-type="string">
            <text:p>2025-02-17T18:56:56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dev/submachine</text:p>
          </table:table-cell>
          <table:table-cell office:value-type="string">
            <text:p>2025-10-28T15:18:59Z</text:p>
          </table:table-cell>
        </table:table-row>
        <table:table-row>
          <table:table-cell office:value-type="string">
            <text:p>Unlocked-Greek-Lexicon-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26:54Z</text:p>
          </table:table-cell>
          <table:table-cell office:value-type="string">
            <text:p>2025-10-09T11:26:54Z</text:p>
          </table:table-cell>
          <table:table-cell office:value-type="string">
            <text:p/>
          </table:table-cell>
          <table:table-cell office:value-type="string">
            <text:p>0</text:p>
          </table:table-cell>
          <table:table-cell office:value-type="string">
            <text:p>0</text:p>
          </table:table-cell>
          <table:table-cell office:value-type="string">
            <text:p>15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statez, cpresson, yakob-aleksandrovich, toddlprice, jag3773</text:p>
          </table:table-cell>
          <table:table-cell office:value-type="string">
            <text:p>0</text:p>
          </table:table-cell>
          <table:table-cell office:value-type="string">
            <text:p>0</text:p>
          </table:table-cell>
          <table:table-cell office:value-type="string">
            <text:p>https://github.com/unfoldingWord-dev/Unlocked-Greek-Lexicon-Info</text:p>
          </table:table-cell>
          <table:table-cell office:value-type="string">
            <text:p>2025-10-09T11:26:58Z</text:p>
          </table:table-cell>
        </table:table-row>
        <table:table-row>
          <table:table-cell office:value-type="string">
            <text:p>Unlocked-Grammar-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10:38Z</text:p>
          </table:table-cell>
          <table:table-cell office:value-type="string">
            <text:p>2025-10-09T11:10:38Z</text:p>
          </table:table-cell>
          <table:table-cell office:value-type="string">
            <text:p/>
          </table:table-cell>
          <table:table-cell office:value-type="string">
            <text:p>0</text:p>
          </table:table-cell>
          <table:table-cell office:value-type="string">
            <text:p>0</text:p>
          </table:table-cell>
          <table:table-cell office:value-type="string">
            <text:p>7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presson, pjoakes, jag3773, yakob-aleksandrovich</text:p>
          </table:table-cell>
          <table:table-cell office:value-type="string">
            <text:p>0</text:p>
          </table:table-cell>
          <table:table-cell office:value-type="string">
            <text:p>0</text:p>
          </table:table-cell>
          <table:table-cell office:value-type="string">
            <text:p>https://github.com/unfoldingWord-dev/Unlocked-Grammar-Info</text:p>
          </table:table-cell>
          <table:table-cell office:value-type="string">
            <text:p>2025-10-09T11:10:42Z</text:p>
          </table:table-cell>
        </table:table-row>
        <table:table-row>
          <table:table-cell office:value-type="string">
            <text:p>tx-manager-lambda</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7-06-07T15:44:54Z</text:p>
          </table:table-cell>
          <table:table-cell office:value-type="string">
            <text:p>2017-06-07T15:44:53Z</text:p>
          </table:table-cell>
          <table:table-cell office:value-type="string">
            <text:p/>
          </table:table-cell>
          <table:table-cell office:value-type="string">
            <text:p>0</text:p>
          </table:table-cell>
          <table:table-cell office:value-type="string">
            <text:p>0</text:p>
          </table:table-cell>
          <table:table-cell office:value-type="string">
            <text:p>6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ichard Mahn, Phil Hopper, PhotoNomad0, bspidel, phillip-hopper, jag3773</text:p>
          </table:table-cell>
          <table:table-cell office:value-type="string">
            <text:p>0</text:p>
          </table:table-cell>
          <table:table-cell office:value-type="string">
            <text:p>0</text:p>
          </table:table-cell>
          <table:table-cell office:value-type="string">
            <text:p>https://github.com/unfoldingWord-dev/tx-manager-lambda</text:p>
          </table:table-cell>
          <table:table-cell office:value-type="string">
            <text:p>2025-10-09T10:59:32Z</text:p>
          </table:table-cell>
        </table:table-row>
        <table:table-row>
          <table:table-cell office:value-type="string">
            <text:p>tx</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5-10-09T10:49:33Z</text:p>
          </table:table-cell>
          <table:table-cell office:value-type="string">
            <text:p>2025-10-09T10:49:33Z</text:p>
          </table:table-cell>
          <table:table-cell office:value-type="string">
            <text:p/>
          </table:table-cell>
          <table:table-cell office:value-type="string">
            <text:p>0</text:p>
          </table:table-cell>
          <table:table-cell office:value-type="string">
            <text:p>0</text:p>
          </table:table-cell>
          <table:table-cell office:value-type="string">
            <text:p>2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yakob-aleksandrovich, jag3773</text:p>
          </table:table-cell>
          <table:table-cell office:value-type="string">
            <text:p>0</text:p>
          </table:table-cell>
          <table:table-cell office:value-type="string">
            <text:p>0</text:p>
          </table:table-cell>
          <table:table-cell office:value-type="string">
            <text:p>https://github.com/unfoldingWord-dev/tx</text:p>
          </table:table-cell>
          <table:table-cell office:value-type="string">
            <text:p>2025-10-09T10:49:37Z</text:p>
          </table:table-cell>
        </table:table-row>
        <table:table-row>
          <table:table-cell office:value-type="string">
            <text:p>translationStudio-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0:40:03Z</text:p>
          </table:table-cell>
          <table:table-cell office:value-type="string">
            <text:p>2025-10-09T10:40:03Z</text:p>
          </table:table-cell>
          <table:table-cell office:value-type="string">
            <text:p/>
          </table:table-cell>
          <table:table-cell office:value-type="string">
            <text:p>0</text:p>
          </table:table-cell>
          <table:table-cell office:value-type="string">
            <text:p>0</text:p>
          </table:table-cell>
          <table:table-cell office:value-type="string">
            <text:p>69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gamer78, ChrisJarka, yakob-aleksandrovich, jag3773</text:p>
          </table:table-cell>
          <table:table-cell office:value-type="string">
            <text:p>0</text:p>
          </table:table-cell>
          <table:table-cell office:value-type="string">
            <text:p>0</text:p>
          </table:table-cell>
          <table:table-cell office:value-type="string">
            <text:p>https://github.com/unfoldingWord-dev/translationStudio-Info</text:p>
          </table:table-cell>
          <table:table-cell office:value-type="string">
            <text:p>2025-10-09T10:40:07Z</text:p>
          </table:table-cell>
        </table:table-row>
        <table:table-row>
          <table:table-cell office:value-type="string">
            <text:p>translationRecorder-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0:37:00Z</text:p>
          </table:table-cell>
          <table:table-cell office:value-type="string">
            <text:p>2025-10-09T10:37:00Z</text:p>
          </table:table-cell>
          <table:table-cell office:value-type="string">
            <text:p>2017-05-10T20:33:49Z</text:p>
          </table:table-cell>
          <table:table-cell office:value-type="string">
            <text:p>0</text:p>
          </table:table-cell>
          <table:table-cell office:value-type="string">
            <text:p>0</text:p>
          </table:table-cell>
          <table:table-cell office:value-type="string">
            <text:p>12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yakob-aleksandrovich, jag3773</text:p>
          </table:table-cell>
          <table:table-cell office:value-type="string">
            <text:p>1</text:p>
          </table:table-cell>
          <table:table-cell office:value-type="string">
            <text:p>0</text:p>
          </table:table-cell>
          <table:table-cell office:value-type="string">
            <text:p>https://github.com/unfoldingWord-dev/translationRecorder-Info</text:p>
          </table:table-cell>
          <table:table-cell office:value-type="string">
            <text:p>2025-10-09T10:37:04Z</text:p>
          </table:table-cell>
        </table:table-row>
        <table:table-row>
          <table:table-cell office:value-type="string">
            <text:p>Resource-Container</text:p>
          </table:table-cell>
          <table:table-cell office:value-type="string">
            <text:p>unfoldingWord-dev</text:p>
          </table:table-cell>
          <table:table-cell office:value-type="string">
            <text:p>Makefile</text:p>
          </table:table-cell>
          <table:table-cell office:value-type="string">
            <text:p>False</text:p>
          </table:table-cell>
          <table:table-cell office:value-type="string">
            <text:p>False</text:p>
          </table:table-cell>
          <table:table-cell office:value-type="string">
            <text:p>2025-10-09T10:27:34Z</text:p>
          </table:table-cell>
          <table:table-cell office:value-type="string">
            <text:p>2025-10-09T10:27:33Z</text:p>
          </table:table-cell>
          <table:table-cell office:value-type="string">
            <text:p/>
          </table:table-cell>
          <table:table-cell office:value-type="string">
            <text:p>6</text:p>
          </table:table-cell>
          <table:table-cell office:value-type="string">
            <text:p>0</text:p>
          </table:table-cell>
          <table:table-cell office:value-type="string">
            <text:p>17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ag3773, yakob-aleksandrovich, PhotoNomad0, RobH123, timjore</text:p>
          </table:table-cell>
          <table:table-cell office:value-type="string">
            <text:p>2</text:p>
          </table:table-cell>
          <table:table-cell office:value-type="string">
            <text:p>0</text:p>
          </table:table-cell>
          <table:table-cell office:value-type="string">
            <text:p>https://github.com/unfoldingWord-dev/Resource-Container</text:p>
          </table:table-cell>
          <table:table-cell office:value-type="string">
            <text:p>2025-10-09T10:27:37Z</text:p>
          </table:table-cell>
        </table:table-row>
        <table:table-row>
          <table:table-cell office:value-type="string">
            <text:p>gogs-custom</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7-05-01T04:12:23Z</text:p>
          </table:table-cell>
          <table:table-cell office:value-type="string">
            <text:p>2017-05-01T04:09:11Z</text:p>
          </table:table-cell>
          <table:table-cell office:value-type="string">
            <text:p/>
          </table:table-cell>
          <table:table-cell office:value-type="string">
            <text:p>0</text:p>
          </table:table-cell>
          <table:table-cell office:value-type="string">
            <text:p>0</text:p>
          </table:table-cell>
          <table:table-cell office:value-type="string">
            <text:p>8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 bspidel, jag3773, Root@git</text:p>
          </table:table-cell>
          <table:table-cell office:value-type="string">
            <text:p>0</text:p>
          </table:table-cell>
          <table:table-cell office:value-type="string">
            <text:p>0</text:p>
          </table:table-cell>
          <table:table-cell office:value-type="string">
            <text:p>https://github.com/unfoldingWord-dev/gogs-custom</text:p>
          </table:table-cell>
          <table:table-cell office:value-type="string">
            <text:p>2025-10-02T14:14:06Z</text:p>
          </table:table-cell>
        </table:table-row>
        <table:table-row>
          <table:table-cell office:value-type="string">
            <text:p>uw-ios</text:p>
          </table:table-cell>
          <table:table-cell office:value-type="string">
            <text:p>unfoldingWord-dev</text:p>
          </table:table-cell>
          <table:table-cell office:value-type="string">
            <text:p>C</text:p>
          </table:table-cell>
          <table:table-cell office:value-type="string">
            <text:p>False</text:p>
          </table:table-cell>
          <table:table-cell office:value-type="string">
            <text:p>False</text:p>
          </table:table-cell>
          <table:table-cell office:value-type="string">
            <text:p>2022-07-08T15:45:27Z</text:p>
          </table:table-cell>
          <table:table-cell office:value-type="string">
            <text:p>2022-07-08T15:45:17Z</text:p>
          </table:table-cell>
          <table:table-cell office:value-type="string">
            <text:p>2014-12-30T20:42:03Z</text:p>
          </table:table-cell>
          <table:table-cell office:value-type="string">
            <text:p>0</text:p>
          </table:table-cell>
          <table:table-cell office:value-type="string">
            <text:p>0</text:p>
          </table:table-cell>
          <table:table-cell office:value-type="string">
            <text:p>7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vid Solberg, bknatterud, dwsolberg, jag3773</text:p>
          </table:table-cell>
          <table:table-cell office:value-type="string">
            <text:p>3</text:p>
          </table:table-cell>
          <table:table-cell office:value-type="string">
            <text:p>20</text:p>
          </table:table-cell>
          <table:table-cell office:value-type="string">
            <text:p>https://github.com/unfoldingWord-dev/uw-ios</text:p>
          </table:table-cell>
          <table:table-cell office:value-type="string">
            <text:p>2025-10-02T14:12:49Z</text:p>
          </table:table-cell>
        </table:table-row>
        <table:table-row>
          <table:table-cell office:value-type="string">
            <text:p>uw-androi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8-06-08T15:14:35Z</text:p>
          </table:table-cell>
          <table:table-cell office:value-type="string">
            <text:p>2018-06-08T15:12:32Z</text:p>
          </table:table-cell>
          <table:table-cell office:value-type="string">
            <text:p>2018-06-08T15:14:36Z</text:p>
          </table:table-cell>
          <table:table-cell office:value-type="string">
            <text:p>18</text:p>
          </table:table-cell>
          <table:table-cell office:value-type="string">
            <text:p>1</text:p>
          </table:table-cell>
          <table:table-cell office:value-type="string">
            <text:p>25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text:p>
          </table:table-cell>
          <table:table-cell office:value-type="string">
            <text:p>44</text:p>
          </table:table-cell>
          <table:table-cell office:value-type="string">
            <text:p>2302</text:p>
          </table:table-cell>
          <table:table-cell office:value-type="string">
            <text:p>https://github.com/unfoldingWord-dev/uw-android</text:p>
          </table:table-cell>
          <table:table-cell office:value-type="string">
            <text:p>2025-10-02T14:11:55Z</text:p>
          </table:table-cell>
        </table:table-row>
        <table:table-row>
          <table:table-cell office:value-type="string">
            <text:p>tn_add_scripture_link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5-07-29T19:11:11Z</text:p>
          </table:table-cell>
          <table:table-cell office:value-type="string">
            <text:p>2025-07-29T19:11:09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tn_add_scripture_links</text:p>
          </table:table-cell>
          <table:table-cell office:value-type="string">
            <text:p>2025-07-29T19:12:09Z</text:p>
          </table:table-cell>
        </table:table-row>
        <table:table-row>
          <table:table-cell office:value-type="string">
            <text:p>alignment-transferer</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5-06-17T13:49:01Z</text:p>
          </table:table-cell>
          <table:table-cell office:value-type="string">
            <text:p>2025-06-17T13:49:01Z</text:p>
          </table:table-cell>
          <table:table-cell office:value-type="string">
            <text:p/>
          </table:table-cell>
          <table:table-cell office:value-type="string">
            <text:p>0</text:p>
          </table:table-cell>
          <table:table-cell office:value-type="string">
            <text:p>0</text:p>
          </table:table-cell>
          <table:table-cell office:value-type="string">
            <text:p>9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alignment-transferer</text:p>
          </table:table-cell>
          <table:table-cell office:value-type="string">
            <text:p>Joshua Lansford, JEdward7777</text:p>
          </table:table-cell>
          <table:table-cell office:value-type="string">
            <text:p>0</text:p>
          </table:table-cell>
          <table:table-cell office:value-type="string">
            <text:p>0</text:p>
          </table:table-cell>
          <table:table-cell office:value-type="string">
            <text:p>https://github.com/unfoldingWord-dev/alignment-transferer</text:p>
          </table:table-cell>
          <table:table-cell office:value-type="string">
            <text:p>2025-06-17T18:57:53Z</text:p>
          </table:table-cell>
        </table:table-row>
        <table:table-row>
          <table:table-cell office:value-type="string">
            <text:p>python-gitea-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0-10-05T01:46:07Z</text:p>
          </table:table-cell>
          <table:table-cell office:value-type="string">
            <text:p>2020-10-05T01:43:14Z</text:p>
          </table:table-cell>
          <table:table-cell office:value-type="string">
            <text:p>2020-10-02T16:00:43Z</text:p>
          </table:table-cell>
          <table:table-cell office:value-type="string">
            <text:p>5</text:p>
          </table:table-cell>
          <table:table-cell office:value-type="string">
            <text:p>1</text:p>
          </table:table-cell>
          <table:table-cell office:value-type="string">
            <text:p>6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 da1nerd, guyzmo, costibleotu, evrardjp, jag3773, Richard Mahn, pyhedgehog</text:p>
          </table:table-cell>
          <table:table-cell office:value-type="string">
            <text:p>2</text:p>
          </table:table-cell>
          <table:table-cell office:value-type="string">
            <text:p>0</text:p>
          </table:table-cell>
          <table:table-cell office:value-type="string">
            <text:p>https://github.com/unfoldingWord-dev/python-gitea-client</text:p>
          </table:table-cell>
          <table:table-cell office:value-type="string">
            <text:p>2025-02-23T11:58:32Z</text:p>
          </table:table-cell>
        </table:table-row>
        <table:table-row>
          <table:table-cell office:value-type="string">
            <text:p>android-gogs-client</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4-30T23:42:39Z</text:p>
          </table:table-cell>
          <table:table-cell office:value-type="string">
            <text:p>2019-04-30T23:42:38Z</text:p>
          </table:table-cell>
          <table:table-cell office:value-type="string">
            <text:p>2016-02-29T21:22:22Z</text:p>
          </table:table-cell>
          <table:table-cell office:value-type="string">
            <text:p>1</text:p>
          </table:table-cell>
          <table:table-cell office:value-type="string">
            <text:p>0</text:p>
          </table:table-cell>
          <table:table-cell office:value-type="string">
            <text:p>4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2</text:p>
          </table:table-cell>
          <table:table-cell office:value-type="string">
            <text:p>0</text:p>
          </table:table-cell>
          <table:table-cell office:value-type="string">
            <text:p>https://github.com/unfoldingWord-dev/android-gogs-client</text:p>
          </table:table-cell>
          <table:table-cell office:value-type="string">
            <text:p>2024-12-11T07:18:00Z</text:p>
          </table:table-cell>
        </table:table-row>
        <table:table-row>
          <table:table-cell office:value-type="string">
            <text:p>d43-catalog</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4-10-21T07:58:13Z</text:p>
          </table:table-cell>
          <table:table-cell office:value-type="string">
            <text:p>2024-10-21T07:58:13Z</text:p>
          </table:table-cell>
          <table:table-cell office:value-type="string">
            <text:p/>
          </table:table-cell>
          <table:table-cell office:value-type="string">
            <text:p>25</text:p>
          </table:table-cell>
          <table:table-cell office:value-type="string">
            <text:p>14</text:p>
          </table:table-cell>
          <table:table-cell office:value-type="string">
            <text:p>70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Thomas Klemz, Richard Mahn, richmahn, jag3773, phillip-hopper, Phil Hopper, PhotoNomad0, RoyalSix, rbnswartz, RobH123, Sterling (Jay) Scott, yakob-aleksandrovich</text:p>
          </table:table-cell>
          <table:table-cell office:value-type="string">
            <text:p>0</text:p>
          </table:table-cell>
          <table:table-cell office:value-type="string">
            <text:p>0</text:p>
          </table:table-cell>
          <table:table-cell office:value-type="string">
            <text:p>https://github.com/unfoldingWord-dev/d43-catalog</text:p>
          </table:table-cell>
          <table:table-cell office:value-type="string">
            <text:p>2024-10-21T07:58:18Z</text:p>
          </table:table-cell>
        </table:table-row>
        <table:table-row>
          <table:table-cell office:value-type="string">
            <text:p>node-gogs-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4-19T16:22:58Z</text:p>
          </table:table-cell>
          <table:table-cell office:value-type="string">
            <text:p>2018-09-12T17:40:36Z</text:p>
          </table:table-cell>
          <table:table-cell office:value-type="string">
            <text:p>2018-06-05T18:06:48Z</text:p>
          </table:table-cell>
          <table:table-cell office:value-type="string">
            <text:p>1</text:p>
          </table:table-cell>
          <table:table-cell office:value-type="string">
            <text:p>1</text:p>
          </table:table-cell>
          <table:table-cell office:value-type="string">
            <text:p>64</text:p>
          </table:table-cell>
          <table:table-cell office:value-type="string">
            <text:p/>
          </table:table-cell>
          <table:table-cell office:value-type="string">
            <text:p>gogs-client</text:p>
          </table:table-cell>
          <table:table-cell office:value-type="string">
            <text:p>False</text:p>
          </table:table-cell>
          <table:table-cell office:value-type="string">
            <text:p>6739</text:p>
          </table:table-cell>
          <table:table-cell office:value-type="string">
            <text:p>2016-07-13T00:07:45.833Z</text:p>
          </table:table-cell>
          <table:table-cell office:value-type="string">
            <text:p>translationCore, wordAlignment, checking-tool-wrapper</text:p>
          </table:table-cell>
          <table:table-cell office:value-type="string">
            <text:p/>
          </table:table-cell>
          <table:table-cell office: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text:p>da1nerd, Thomas Klemz, jonasof</text:p>
          </table:table-cell>
          <table:table-cell office:value-type="string">
            <text:p>1</text:p>
          </table:table-cell>
          <table:table-cell office:value-type="string">
            <text:p>0</text:p>
          </table:table-cell>
          <table:table-cell office:value-type="string">
            <text:p>https://github.com/unfoldingWord-dev/node-gogs-client</text:p>
          </table:table-cell>
          <table:table-cell office:value-type="string">
            <text:p>2024-06-21T17:58:57Z</text:p>
          </table:table-cell>
        </table:table-row>
        <table:table-row>
          <table:table-cell office:value-type="string">
            <text:p>tx-manag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1-06-04T15:53:18Z</text:p>
          </table:table-cell>
          <table:table-cell office:value-type="string">
            <text:p>2020-03-19T16:48:27Z</text:p>
          </table:table-cell>
          <table:table-cell office:value-type="string">
            <text:p>2017-06-21T14:06:12Z</text:p>
          </table:table-cell>
          <table:table-cell office:value-type="string">
            <text:p>6</text:p>
          </table:table-cell>
          <table:table-cell office:value-type="string">
            <text:p>6</text:p>
          </table:table-cell>
          <table:table-cell office:value-type="string">
            <text:p>38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otoNomad0, Phil Hopper, bspidel, jag3773, phillip-hopper, lversaw, ethantkoenig</text:p>
          </table:table-cell>
          <table:table-cell office:value-type="string">
            <text:p>5</text:p>
          </table:table-cell>
          <table:table-cell office:value-type="string">
            <text:p>0</text:p>
          </table:table-cell>
          <table:table-cell office:value-type="string">
            <text:p>https://github.com/unfoldingWord-dev/tx-manager</text:p>
          </table:table-cell>
          <table:table-cell office:value-type="string">
            <text:p>2024-05-22T13:48:54Z</text:p>
          </table:table-cell>
        </table:table-row>
        <table:table-row>
          <table:table-cell office:value-type="string">
            <text:p>translationKeyboard</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8-06-08T15:50:17Z</text:p>
          </table:table-cell>
          <table:table-cell office:value-type="string">
            <text:p>2018-06-08T15:49:12Z</text:p>
          </table:table-cell>
          <table:table-cell office:value-type="string">
            <text:p>2018-06-08T15:50:17Z</text:p>
          </table:table-cell>
          <table:table-cell office:value-type="string">
            <text:p>10</text:p>
          </table:table-cell>
          <table:table-cell office:value-type="string">
            <text:p>0</text:p>
          </table:table-cell>
          <table:table-cell office:value-type="string">
            <text:p>25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24</text:p>
          </table:table-cell>
          <table:table-cell office:value-type="string">
            <text:p>729</text:p>
          </table:table-cell>
          <table:table-cell office:value-type="string">
            <text:p>https://github.com/unfoldingWord-dev/translationKeyboard</text:p>
          </table:table-cell>
          <table:table-cell office:value-type="string">
            <text:p>2024-03-11T22:35:12Z</text:p>
          </table:table-cell>
        </table:table-row>
        <table:table-row>
          <table:table-cell office:value-type="string">
            <text:p>translationDatabaseWeb</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3-06-06T12:28:28Z</text:p>
          </table:table-cell>
          <table:table-cell office:value-type="string">
            <text:p>2023-06-06T12:28:28Z</text:p>
          </table:table-cell>
          <table:table-cell office:value-type="string">
            <text:p/>
          </table:table-cell>
          <table:table-cell office:value-type="string">
            <text:p>150</text:p>
          </table:table-cell>
          <table:table-cell office:value-type="string">
            <text:p>20</text:p>
          </table:table-cell>
          <table:table-cell office:value-type="string">
            <text:p>100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leong2332, paltman, swilcox, Vicky Leong, cdaield, jacobwegner, phillip-hopper, smcoll, rbnswartz, Phil Hopper, RobH123, yakob-aleksandrovich, jag3773</text:p>
          </table:table-cell>
          <table:table-cell office:value-type="string">
            <text:p>0</text:p>
          </table:table-cell>
          <table:table-cell office:value-type="string">
            <text:p>0</text:p>
          </table:table-cell>
          <table:table-cell office:value-type="string">
            <text:p>https://github.com/unfoldingWord-dev/translationDatabaseWeb</text:p>
          </table:table-cell>
          <table:table-cell office:value-type="string">
            <text:p>2023-12-05T16:16:56Z</text:p>
          </table:table-cell>
        </table:table-row>
        <table:table-row>
          <table:table-cell office:value-type="string">
            <text:p>api-index</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3-10-06T14:56:54Z</text:p>
          </table:table-cell>
          <table:table-cell office:value-type="string">
            <text:p>2023-10-06T14:56:52Z</text:p>
          </table:table-cell>
          <table:table-cell office:value-type="string">
            <text:p/>
          </table:table-cell>
          <table:table-cell office:value-type="string">
            <text:p>0</text:p>
          </table:table-cell>
          <table:table-cell office:value-type="string">
            <text:p>0</text:p>
          </table:table-cell>
          <table:table-cell office:value-type="string">
            <text:p>2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codemis, yakob-aleksandrovich, da1nerd, phillip-hopper, RoyalSix</text:p>
          </table:table-cell>
          <table:table-cell office:value-type="string">
            <text:p>0</text:p>
          </table:table-cell>
          <table:table-cell office:value-type="string">
            <text:p>0</text:p>
          </table:table-cell>
          <table:table-cell office:value-type="string">
            <text:p>https://github.com/unfoldingWord-dev/api-index</text:p>
          </table:table-cell>
          <table:table-cell office:value-type="string">
            <text:p>2023-10-06T14:53:06Z</text:p>
          </table:table-cell>
        </table:table-row>
        <table:table-row>
          <table:table-cell office:value-type="string">
            <text:p>electronite-packag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3:47:10Z</text:p>
          </table:table-cell>
          <table:table-cell office:value-type="string">
            <text:p>2020-03-23T11:56:26Z</text:p>
          </table:table-cell>
          <table:table-cell office:value-type="string">
            <text:p/>
          </table:table-cell>
          <table:table-cell office:value-type="string">
            <text:p>0</text:p>
          </table:table-cell>
          <table:table-cell office:value-type="string">
            <text:p>0</text:p>
          </table:table-cell>
          <table:table-cell office:value-type="string">
            <text:p>1043</text:p>
          </table:table-cell>
          <table:table-cell office:value-type="string">
            <text:p/>
          </table:table-cell>
          <table:table-cell office:value-type="string">
            <text:p>electron-pack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ckybars/atom-shell-packager, unfoldingWord/gateway-edit, Proskomma/proskomma-legacy-projects, gbin-org/alignment-editor-rcl-poc, unfoldingWord/translationCore, mannycolon/electronite-poc-app</text:p>
          </table:table-cell>
          <table:table-cell office: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text:p>0</text:p>
          </table:table-cell>
          <table:table-cell office:value-type="string">
            <text:p>0</text:p>
          </table:table-cell>
          <table:table-cell office:value-type="string">
            <text:p>https://github.com/unfoldingWord-dev/electronite-packager</text:p>
          </table:table-cell>
          <table:table-cell office:value-type="string">
            <text:p>2023-09-18T17:18:06Z</text:p>
          </table:table-cell>
        </table:table-row>
        <table:table-row>
          <table:table-cell office:value-type="string">
            <text:p>electronite-builder</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3-09-17T23:39:30Z</text:p>
          </table:table-cell>
          <table:table-cell office:value-type="string">
            <text:p>2023-09-13T22:24:42Z</text:p>
          </table:table-cell>
          <table:table-cell office:value-type="string">
            <text:p/>
          </table:table-cell>
          <table:table-cell office:value-type="string">
            <text:p>0</text:p>
          </table:table-cell>
          <table:table-cell office:value-type="string">
            <text:p>0</text:p>
          </table:table-cell>
          <table:table-cell office:value-type="string">
            <text:p>286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userland/electron-builder</text:p>
          </table:table-cell>
          <table:table-cell office: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office:value-type="string">
            <text:p>0</text:p>
          </table:table-cell>
          <table:table-cell office:value-type="string">
            <text:p>0</text:p>
          </table:table-cell>
          <table:table-cell office:value-type="string">
            <text:p>https://github.com/unfoldingWord-dev/electronite-builder</text:p>
          </table:table-cell>
          <table:table-cell office:value-type="string">
            <text:p>2023-09-18T17:12:15Z</text:p>
          </table:table-cell>
        </table:table-row>
        <table:table-row>
          <table:table-cell office:value-type="string">
            <text:p>electronite-cli</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6-01-22T20:59:24Z</text:p>
          </table:table-cell>
          <table:table-cell office:value-type="string">
            <text:p>2022-05-15T19:25:29Z</text:p>
          </table:table-cell>
          <table:table-cell office:value-type="string">
            <text:p>2026-01-08T18:38:22Z</text:p>
          </table:table-cell>
          <table:table-cell office:value-type="string">
            <text:p>0</text:p>
          </table:table-cell>
          <table:table-cell office:value-type="string">
            <text:p>0</text:p>
          </table:table-cell>
          <table:table-cell office:value-type="string">
            <text:p>27</text:p>
          </table:table-cell>
          <table:table-cell office:value-type="string">
            <text:p/>
          </table:table-cell>
          <table:table-cell office:value-type="string">
            <text:p>electronite</text:p>
          </table:table-cell>
          <table:table-cell office:value-type="string">
            <text:p>False</text:p>
          </table:table-cell>
          <table:table-cell office:value-type="string">
            <text:p>2606</text:p>
          </table:table-cell>
          <table:table-cell office:value-type="string">
            <text:p>2026-01-22T21:05:02.866Z</text:p>
          </table:table-cell>
          <table:table-cell office:value-type="string">
            <text:p>translationCore</text:p>
          </table:table-cell>
          <table:table-cell office:value-type="string">
            <text:p/>
          </table:table-cell>
          <table:table-cell office:value-type="string">
            <text:p>unfoldingWord/gateway-edit, Bridgeconn/tc-create-offline, Proskomma/proskomma-legacy-projects, friendsofagape/autographa, gbin-org/alignment-editor-rcl-poc, unfoldingWord/translationCore, mannycolon/electronite-poc-app</text:p>
          </table:table-cell>
          <table:table-cell office:value-type="string">
            <text:p>da1nerd, PhotoNomad0</text:p>
          </table:table-cell>
          <table:table-cell office:value-type="string">
            <text:p>32</text:p>
          </table:table-cell>
          <table:table-cell office:value-type="string">
            <text:p>0</text:p>
          </table:table-cell>
          <table:table-cell office:value-type="string">
            <text:p>https://github.com/unfoldingWord-dev/electronite-cli</text:p>
          </table:table-cell>
          <table:table-cell office:value-type="string">
            <text:p>2023-09-04T12:03:41Z</text:p>
          </table:table-cell>
        </table:table-row>
        <table:table-row>
          <table:table-cell office:value-type="string">
            <text:p>concourse-pipeline</text:p>
          </table:table-cell>
          <table:table-cell office:value-type="string">
            <text:p>unfoldingWord-dev</text:p>
          </table:table-cell>
          <table:table-cell office:value-type="string">
            <text:p>Shell</text:p>
          </table:table-cell>
          <table:table-cell office:value-type="string">
            <text:p>False</text:p>
          </table:table-cell>
          <table:table-cell office:value-type="string">
            <text:p>True</text:p>
          </table:table-cell>
          <table:table-cell office:value-type="string">
            <text:p>2023-08-12T13:51:37Z</text:p>
          </table:table-cell>
          <table:table-cell office:value-type="string">
            <text:p>2023-08-12T13:51:37Z</text:p>
          </table:table-cell>
          <table:table-cell office:value-type="string">
            <text:p/>
          </table:table-cell>
          <table:table-cell office:value-type="string">
            <text:p>0</text:p>
          </table:table-cell>
          <table:table-cell office:value-type="string">
            <text:p>0</text:p>
          </table:table-cell>
          <table:table-cell office:value-type="string">
            <text:p>25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concourse-tasks</text:p>
          </table:table-cell>
          <table:table-cell office:value-type="string">
            <text:p>da1nerd, PhotoNomad0, mannycolon, jag3773</text:p>
          </table:table-cell>
          <table:table-cell office:value-type="string">
            <text:p>0</text:p>
          </table:table-cell>
          <table:table-cell office:value-type="string">
            <text:p>0</text:p>
          </table:table-cell>
          <table:table-cell office:value-type="string">
            <text:p>https://github.com/unfoldingWord-dev/concourse-pipeline</text:p>
          </table:table-cell>
          <table:table-cell office:value-type="string">
            <text:p>2023-08-12T13:51:42Z</text:p>
          </table:table-cell>
        </table:table-row>
        <table:table-row>
          <table:table-cell office:value-type="string">
            <text:p>translationHelp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3-12T17:46:51Z</text:p>
          </table:table-cell>
          <table:table-cell office:value-type="string">
            <text:p>2018-03-12T17:46:50Z</text:p>
          </table:table-cell>
          <table:table-cell office:value-type="string">
            <text:p/>
          </table:table-cell>
          <table:table-cell office:value-type="string">
            <text:p>0</text:p>
          </table:table-cell>
          <table:table-cell office:value-type="string">
            <text:p>0</text:p>
          </table:table-cell>
          <table:table-cell office:value-type="string">
            <text:p>136</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EllDoubleYew, Richard Mahn, klappy, ihoegen, cdwhitfield73, RoyalSix, da1nerd, Sterling (Jay) Scott, Audrey Mahn, PhotoNomad0</text:p>
          </table:table-cell>
          <table:table-cell office:value-type="string">
            <text:p>0</text:p>
          </table:table-cell>
          <table:table-cell office:value-type="string">
            <text:p>0</text:p>
          </table:table-cell>
          <table:table-cell office:value-type="string">
            <text:p>https://github.com/unfoldingWord-dev/translationHelps</text:p>
          </table:table-cell>
          <table:table-cell office:value-type="string">
            <text:p>2023-01-28T16:52:06Z</text:p>
          </table:table-cell>
        </table:table-row>
        <table:table-row>
          <table:table-cell office:value-type="string">
            <text:p>example_tool</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6-12-09T21:07:14Z</text:p>
          </table:table-cell>
          <table:table-cell office:value-type="string">
            <text:p>2016-10-20T07:35:23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Example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text:p>
          </table:table-cell>
          <table:table-cell office:value-type="string">
            <text:p>0</text:p>
          </table:table-cell>
          <table:table-cell office:value-type="string">
            <text:p>0</text:p>
          </table:table-cell>
          <table:table-cell office:value-type="string">
            <text:p>https://github.com/unfoldingWord-dev/example_tool</text:p>
          </table:table-cell>
          <table:table-cell office:value-type="string">
            <text:p>2023-01-28T16:52:06Z</text:p>
          </table:table-cell>
        </table:table-row>
        <table:table-row>
          <table:table-cell office:value-type="string">
            <text:p>tC_Resource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9-09T10:57:36Z</text:p>
          </table:table-cell>
          <table:table-cell office:value-type="string">
            <text:p>2018-08-06T15:39:55Z</text:p>
          </table:table-cell>
          <table:table-cell office:value-type="string">
            <text:p/>
          </table:table-cell>
          <table:table-cell office:value-type="string">
            <text:p>0</text:p>
          </table:table-cell>
          <table:table-cell office:value-type="string">
            <text:p>0</text:p>
          </table:table-cell>
          <table:table-cell office:value-type="string">
            <text:p>183</text:p>
          </table:table-cell>
          <table:table-cell office:value-type="string">
            <text:p/>
          </table:table-cell>
          <table:table-cell office:value-type="string">
            <text:p>tc_resourc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PhotoNomad0, richmahn, mannycolon, Richard Mahn, klappy, RoyalSix, da1nerd, Sterling (Jay) Scott</text:p>
          </table:table-cell>
          <table:table-cell office:value-type="string">
            <text:p>0</text:p>
          </table:table-cell>
          <table:table-cell office:value-type="string">
            <text:p>0</text:p>
          </table:table-cell>
          <table:table-cell office:value-type="string">
            <text:p>https://github.com/unfoldingWord-dev/tC_Resources</text:p>
          </table:table-cell>
          <table:table-cell office:value-type="string">
            <text:p>2023-01-28T16:35:42Z</text:p>
          </table:table-cell>
        </table:table-row>
        <table:table-row>
          <table:table-cell office:value-type="string">
            <text:p>VerseCheck</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8T14:29:02Z</text:p>
          </table:table-cell>
          <table:table-cell office:value-type="string">
            <text:p>2018-05-17T20:00:13Z</text:p>
          </table:table-cell>
          <table:table-cell office:value-type="string">
            <text:p/>
          </table:table-cell>
          <table:table-cell office:value-type="string">
            <text:p>1</text:p>
          </table:table-cell>
          <table:table-cell office:value-type="string">
            <text:p>0</text:p>
          </table:table-cell>
          <table:table-cell office:value-type="string">
            <text:p>381</text:p>
          </table:table-cell>
          <table:table-cell office:value-type="string">
            <text:p/>
          </table:table-cell>
          <table:table-cell office:value-type="string">
            <text:p>VerseChe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lections, tc-strings, tc-tool, usfm-js</text:p>
          </table:table-cell>
          <table:table-cell office:value-type="string">
            <text:p/>
          </table:table-cell>
          <table:table-cell office:value-type="string">
            <text:p>mannycolon, klappy, RoyalSix, cdwhitfield73, Richard Mahn, ihoegen, EllDoubleYew, da1nerd, Sterling (Jay) Scott, richmahn, bspidel, PhotoNomad0</text:p>
          </table:table-cell>
          <table:table-cell office:value-type="string">
            <text:p>0</text:p>
          </table:table-cell>
          <table:table-cell office:value-type="string">
            <text:p>0</text:p>
          </table:table-cell>
          <table:table-cell office:value-type="string">
            <text:p>https://github.com/unfoldingWord-dev/VerseCheck</text:p>
          </table:table-cell>
          <table:table-cell office:value-type="string">
            <text:p>2023-01-28T16:35:42Z</text:p>
          </table:table-cell>
        </table:table-row>
        <table:table-row>
          <table:table-cell office:value-type="string">
            <text:p>pub.distantshores.org</text:p>
          </table:table-cell>
          <table:table-cell office:value-type="string">
            <text:p>unfoldingWord-dev</text:p>
          </table:table-cell>
          <table:table-cell office:value-type="string">
            <text:p>HTML</text:p>
          </table:table-cell>
          <table:table-cell office:value-type="string">
            <text:p>True</text:p>
          </table:table-cell>
          <table:table-cell office:value-type="string">
            <text:p>False</text:p>
          </table:table-cell>
          <table:table-cell office:value-type="string">
            <text:p>2017-10-01T22:50:31Z</text:p>
          </table:table-cell>
          <table:table-cell office:value-type="string">
            <text:p>2017-10-01T22:48:41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pub.distantshores.org</text:p>
          </table:table-cell>
          <table:table-cell office:value-type="string">
            <text:p>2023-01-28T16:19:09Z</text:p>
          </table:table-cell>
        </table:table-row>
        <table:table-row>
          <table:table-cell office:value-type="string">
            <text:p>door43-acceptance-tests</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7-03-16T21:59:37Z</text:p>
          </table:table-cell>
          <table:table-cell office:value-type="string">
            <text:p>2017-03-16T21:59:36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jag3773, Phil Hopper</text:p>
          </table:table-cell>
          <table:table-cell office:value-type="string">
            <text:p>0</text:p>
          </table:table-cell>
          <table:table-cell office:value-type="string">
            <text:p>0</text:p>
          </table:table-cell>
          <table:table-cell office:value-type="string">
            <text:p>https://github.com/unfoldingWord-dev/door43-acceptance-tests</text:p>
          </table:table-cell>
          <table:table-cell office:value-type="string">
            <text:p>2023-01-28T16:19:09Z</text:p>
          </table:table-cell>
        </table:table-row>
        <table:table-row>
          <table:table-cell office:value-type="string">
            <text:p>translation_academy</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24Z</text:p>
          </table:table-cell>
          <table:table-cell office:value-type="string">
            <text:p>2017-03-14T20:52:36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TranslationAcade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klappy</text:p>
          </table:table-cell>
          <table:table-cell office:value-type="string">
            <text:p>0</text:p>
          </table:table-cell>
          <table:table-cell office:value-type="string">
            <text:p>0</text:p>
          </table:table-cell>
          <table:table-cell office:value-type="string">
            <text:p>https://github.com/unfoldingWord-dev/translation_academy</text:p>
          </table:table-cell>
          <table:table-cell office:value-type="string">
            <text:p>2023-01-28T16:19:09Z</text:p>
          </table:table-cell>
        </table:table-row>
        <table:table-row>
          <table:table-cell office:value-type="string">
            <text:p>proposed_changes_modu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13Z</text:p>
          </table:table-cell>
          <table:table-cell office:value-type="string">
            <text:p>2017-03-13T15:22:06Z</text:p>
          </table:table-cell>
          <table:table-cell office:value-type="string">
            <text:p/>
          </table:table-cell>
          <table:table-cell office:value-type="string">
            <text:p>0</text:p>
          </table:table-cell>
          <table:table-cell office:value-type="string">
            <text:p>0</text:p>
          </table:table-cell>
          <table:table-cell office:value-type="string">
            <text:p>33</text:p>
          </table:table-cell>
          <table:table-cell office:value-type="string">
            <text:p/>
          </table:table-cell>
          <table:table-cell office:value-type="string">
            <text:p>ProposedChan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proposed_changes_module</text:p>
          </table:table-cell>
          <table:table-cell office:value-type="string">
            <text:p>2023-01-28T16:19:09Z</text:p>
          </table:table-cell>
        </table:table-row>
        <table:table-row>
          <table:table-cell office:value-type="string">
            <text:p>design</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10-03T16:24:06Z</text:p>
          </table:table-cell>
          <table:table-cell office:value-type="string">
            <text:p/>
          </table:table-cell>
          <table:table-cell office:value-type="string">
            <text:p/>
          </table:table-cell>
          <table:table-cell office:value-type="string">
            <text:p>6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dev/design</text:p>
          </table:table-cell>
          <table:table-cell office:value-type="string">
            <text:p>2023-01-28T16:19:08Z</text:p>
          </table:table-cell>
        </table:table-row>
        <table:table-row>
          <table:table-cell office:value-type="string">
            <text:p>tx-simple-usfm2html</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6-12-20T06:23:46Z</text:p>
          </table:table-cell>
          <table:table-cell office:value-type="string">
            <text:p>2016-12-20T06:23:40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 Richard Mahn</text:p>
          </table:table-cell>
          <table:table-cell office:value-type="string">
            <text:p>0</text:p>
          </table:table-cell>
          <table:table-cell office:value-type="string">
            <text:p>0</text:p>
          </table:table-cell>
          <table:table-cell office:value-type="string">
            <text:p>https://github.com/unfoldingWord-dev/tx-simple-usfm2html</text:p>
          </table:table-cell>
          <table:table-cell office:value-type="string">
            <text:p>2023-01-28T16:19:08Z</text:p>
          </table:table-cell>
        </table:table-row>
        <table:table-row>
          <table:table-cell office:value-type="string">
            <text:p>old-tx-manag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6-10-20T01:23:03Z</text:p>
          </table:table-cell>
          <table:table-cell office:value-type="string">
            <text:p>2016-10-20T01:23:03Z</text:p>
          </table:table-cell>
          <table:table-cell office:value-type="string">
            <text:p/>
          </table:table-cell>
          <table:table-cell office:value-type="string">
            <text:p>1</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ethantkoenig, Phil Hopper</text:p>
          </table:table-cell>
          <table:table-cell office:value-type="string">
            <text:p>0</text:p>
          </table:table-cell>
          <table:table-cell office:value-type="string">
            <text:p>0</text:p>
          </table:table-cell>
          <table:table-cell office:value-type="string">
            <text:p>https://github.com/unfoldingWord-dev/old-tx-manager</text:p>
          </table:table-cell>
          <table:table-cell office:value-type="string">
            <text:p>2023-01-28T16:19:08Z</text:p>
          </table:table-cell>
        </table:table-row>
        <table:table-row>
          <table:table-cell office:value-type="string">
            <text:p>obs-door43</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09-16T00:02:35Z</text:p>
          </table:table-cell>
          <table:table-cell office:value-type="string">
            <text:p>2016-09-14T12:07:3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text:p>
          </table:table-cell>
          <table:table-cell office:value-type="string">
            <text:p>0</text:p>
          </table:table-cell>
          <table:table-cell office:value-type="string">
            <text:p>0</text:p>
          </table:table-cell>
          <table:table-cell office:value-type="string">
            <text:p>https://github.com/unfoldingWord-dev/obs-door43</text:p>
          </table:table-cell>
          <table:table-cell office:value-type="string">
            <text:p>2023-01-28T16:19:08Z</text:p>
          </table:table-cell>
        </table:table-row>
        <table:table-row>
          <table:table-cell office:value-type="string">
            <text:p>door43-project-pages</text:p>
          </table:table-cell>
          <table:table-cell office:value-type="string">
            <text:p>unfoldingWord-dev</text:p>
          </table:table-cell>
          <table:table-cell office:value-type="string">
            <text:p>CSS</text:p>
          </table:table-cell>
          <table:table-cell office:value-type="string">
            <text:p>True</text:p>
          </table:table-cell>
          <table:table-cell office:value-type="string">
            <text:p>True</text:p>
          </table:table-cell>
          <table:table-cell office:value-type="string">
            <text:p>2016-09-26T16:42:57Z</text:p>
          </table:table-cell>
          <table:table-cell office:value-type="string">
            <text:p>2016-09-26T16:42:54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door43-project-pages</text:p>
          </table:table-cell>
          <table:table-cell office:value-type="string">
            <text:p>Richard Mahn, bspidel</text:p>
          </table:table-cell>
          <table:table-cell office:value-type="string">
            <text:p>0</text:p>
          </table:table-cell>
          <table:table-cell office:value-type="string">
            <text:p>0</text:p>
          </table:table-cell>
          <table:table-cell office:value-type="string">
            <text:p>https://github.com/unfoldingWord-dev/door43-project-pages</text:p>
          </table:table-cell>
          <table:table-cell office:value-type="string">
            <text:p>2023-01-28T16:19:08Z</text:p>
          </table:table-cell>
        </table:table-row>
        <table:table-row>
          <table:table-cell office:value-type="string">
            <text:p>uw-publish</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8-05-05T12:58:13Z</text:p>
          </table:table-cell>
          <table:table-cell office:value-type="string">
            <text:p>2017-04-13T18:46:02Z</text:p>
          </table:table-cell>
          <table:table-cell office:value-type="string">
            <text:p/>
          </table:table-cell>
          <table:table-cell office:value-type="string">
            <text:p>0</text:p>
          </table:table-cell>
          <table:table-cell office:value-type="string">
            <text:p>0</text:p>
          </table:table-cell>
          <table:table-cell office:value-type="string">
            <text:p>1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richmahn, Richard Mahn</text:p>
          </table:table-cell>
          <table:table-cell office:value-type="string">
            <text:p>0</text:p>
          </table:table-cell>
          <table:table-cell office:value-type="string">
            <text:p>0</text:p>
          </table:table-cell>
          <table:table-cell office:value-type="string">
            <text:p>https://github.com/unfoldingWord-dev/uw-publish</text:p>
          </table:table-cell>
          <table:table-cell office:value-type="string">
            <text:p>2023-01-28T16:19:08Z</text:p>
          </table:table-cell>
        </table:table-row>
        <table:table-row>
          <table:table-cell office:value-type="string">
            <text:p>translationCore-PoC</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7-06T20:17:32Z</text:p>
          </table:table-cell>
          <table:table-cell office:value-type="string">
            <text:p>2018-07-06T20:17:31Z</text:p>
          </table:table-cell>
          <table:table-cell office:value-type="string">
            <text:p/>
          </table:table-cell>
          <table:table-cell office:value-type="string">
            <text:p>40</text:p>
          </table:table-cell>
          <table:table-cell office:value-type="string">
            <text:p>0</text:p>
          </table:table-cell>
          <table:table-cell office:value-type="string">
            <text:p>6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Core-PoC</text:p>
          </table:table-cell>
          <table:table-cell office:value-type="string">
            <text:p>2023-01-28T16:19:08Z</text:p>
          </table:table-cell>
        </table:table-row>
        <table:table-row>
          <table:table-cell office:value-type="string">
            <text:p>nagios_plugins</text:p>
          </table:table-cell>
          <table:table-cell office:value-type="string">
            <text:p>unfoldingWord-dev</text:p>
          </table:table-cell>
          <table:table-cell office:value-type="string">
            <text:p>Shell</text:p>
          </table:table-cell>
          <table:table-cell office:value-type="string">
            <text:p>True</text:p>
          </table:table-cell>
          <table:table-cell office:value-type="string">
            <text:p>False</text:p>
          </table:table-cell>
          <table:table-cell office:value-type="string">
            <text:p>2019-05-09T13:39:46Z</text:p>
          </table:table-cell>
          <table:table-cell office:value-type="string">
            <text:p>2019-05-09T13:39:39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Jesse A. Griffin, jpetitt1, root</text:p>
          </table:table-cell>
          <table:table-cell office:value-type="string">
            <text:p>0</text:p>
          </table:table-cell>
          <table:table-cell office:value-type="string">
            <text:p>0</text:p>
          </table:table-cell>
          <table:table-cell office:value-type="string">
            <text:p>https://github.com/unfoldingWord-dev/nagios_plugins</text:p>
          </table:table-cell>
          <table:table-cell office:value-type="string">
            <text:p>2023-01-28T16:19:07Z</text:p>
          </table:table-cell>
        </table:table-row>
        <table:table-row>
          <table:table-cell office:value-type="string">
            <text:p>uwadmin</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30T18:10:25Z</text:p>
          </table:table-cell>
          <table:table-cell office:value-type="string">
            <text:p>2015-07-30T18:10:25Z</text:p>
          </table:table-cell>
          <table:table-cell office:value-type="string">
            <text:p/>
          </table:table-cell>
          <table:table-cell office:value-type="string">
            <text:p>0</text:p>
          </table:table-cell>
          <table:table-cell office:value-type="string">
            <text:p>0</text:p>
          </table:table-cell>
          <table:table-cell office:value-type="string">
            <text:p>8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ltman, swilcox, root, jag3773</text:p>
          </table:table-cell>
          <table:table-cell office:value-type="string">
            <text:p>0</text:p>
          </table:table-cell>
          <table:table-cell office:value-type="string">
            <text:p>0</text:p>
          </table:table-cell>
          <table:table-cell office:value-type="string">
            <text:p>https://github.com/unfoldingWord-dev/uwadmin</text:p>
          </table:table-cell>
          <table:table-cell office:value-type="string">
            <text:p>2023-01-28T16:19:07Z</text:p>
          </table:table-cell>
        </table:table-row>
        <table:table-row>
          <table:table-cell office:value-type="string">
            <text:p>ts-serv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4-09-23T19:33:20Z</text:p>
          </table:table-cell>
          <table:table-cell office:value-type="string">
            <text:p>2014-09-23T19:33:17Z</text:p>
          </table:table-cell>
          <table:table-cell office:value-type="string">
            <text:p/>
          </table:table-cell>
          <table:table-cell office:value-type="string">
            <text:p>9</text:p>
          </table:table-cell>
          <table:table-cell office:value-type="string">
            <text:p>0</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root</text:p>
          </table:table-cell>
          <table:table-cell office:value-type="string">
            <text:p>0</text:p>
          </table:table-cell>
          <table:table-cell office:value-type="string">
            <text:p>0</text:p>
          </table:table-cell>
          <table:table-cell office:value-type="string">
            <text:p>https://github.com/unfoldingWord-dev/ts-server</text:p>
          </table:table-cell>
          <table:table-cell office:value-type="string">
            <text:p>2023-01-28T16:19:07Z</text:p>
          </table:table-cell>
        </table:table-row>
        <table:table-row>
          <table:table-cell office:value-type="string">
            <text:p>translationdb-tools</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5-06-23T21:33:38Z</text:p>
          </table:table-cell>
          <table:table-cell office:value-type="string">
            <text:p>2015-06-23T21:33:37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ve Pearce, jag3773</text:p>
          </table:table-cell>
          <table:table-cell office:value-type="string">
            <text:p>0</text:p>
          </table:table-cell>
          <table:table-cell office:value-type="string">
            <text:p>0</text:p>
          </table:table-cell>
          <table:table-cell office:value-type="string">
            <text:p>https://github.com/unfoldingWord-dev/translationdb-tools</text:p>
          </table:table-cell>
          <table:table-cell office:value-type="string">
            <text:p>2023-01-28T16:19:07Z</text:p>
          </table:table-cell>
        </table:table-row>
        <table:table-row>
          <table:table-cell office:value-type="string">
            <text:p>translationKeyboardWeb</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11T20:15:34Z</text:p>
          </table:table-cell>
          <table:table-cell office:value-type="string">
            <text:p>2015-07-11T20:15:35Z</text:p>
          </table:table-cell>
          <table:table-cell office:value-type="string">
            <text:p/>
          </table:table-cell>
          <table:table-cell office:value-type="string">
            <text:p>7</text:p>
          </table:table-cell>
          <table:table-cell office:value-type="string">
            <text:p>0</text:p>
          </table:table-cell>
          <table:table-cell office:value-type="string">
            <text:p>18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0</text:p>
          </table:table-cell>
          <table:table-cell office:value-type="string">
            <text:p>0</text:p>
          </table:table-cell>
          <table:table-cell office:value-type="string">
            <text:p>https://github.com/unfoldingWord-dev/translationKeyboardWeb</text:p>
          </table:table-cell>
          <table:table-cell office:value-type="string">
            <text:p>2023-01-28T16:19:07Z</text:p>
          </table:table-cell>
        </table:table-row>
        <table:table-row>
          <table:table-cell office:value-type="string">
            <text:p>md-export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4-06-16T18:55:44Z</text:p>
          </table:table-cell>
          <table:table-cell office:value-type="string">
            <text:p>2014-06-16T18:55:35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dev/md-exports</text:p>
          </table:table-cell>
          <table:table-cell office:value-type="string">
            <text:p>2023-01-28T16:19:07Z</text:p>
          </table:table-cell>
        </table:table-row>
        <table:table-row>
          <table:table-cell office:value-type="string">
            <text:p>OBS-Translation-App</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6-08-31T14:37:46Z</text:p>
          </table:table-cell>
          <table:table-cell office:value-type="string">
            <text:p>2014-06-02T15:19:24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BoronNeotreks, jag3773, Tim, Distant Shores Media, yvonnel098</text:p>
          </table:table-cell>
          <table:table-cell office:value-type="string">
            <text:p>0</text:p>
          </table:table-cell>
          <table:table-cell office:value-type="string">
            <text:p>0</text:p>
          </table:table-cell>
          <table:table-cell office:value-type="string">
            <text:p>https://github.com/unfoldingWord-dev/OBS-Translation-App</text:p>
          </table:table-cell>
          <table:table-cell office:value-type="string">
            <text:p>2023-01-28T16:19:07Z</text:p>
          </table:table-cell>
        </table:table-row>
        <table:table-row>
          <table:table-cell office:value-type="string">
            <text:p>OBS-iO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3-07-11T18:05:53Z</text:p>
          </table:table-cell>
          <table:table-cell office:value-type="string">
            <text:p>2013-07-11T18:05:53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text:p>
          </table:table-cell>
          <table:table-cell office:value-type="string">
            <text:p>0</text:p>
          </table:table-cell>
          <table:table-cell office:value-type="string">
            <text:p>0</text:p>
          </table:table-cell>
          <table:table-cell office:value-type="string">
            <text:p>https://github.com/unfoldingWord-dev/OBS-iOS</text:p>
          </table:table-cell>
          <table:table-cell office:value-type="string">
            <text:p>2023-01-28T16:19:06Z</text:p>
          </table:table-cell>
        </table:table-row>
        <table:table-row>
          <table:table-cell office:value-type="string">
            <text:p>OBS-Android</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3-07-11T18:03:21Z</text:p>
          </table:table-cell>
          <table:table-cell office:value-type="string">
            <text:p>2013-07-11T18:03:21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text:p>
          </table:table-cell>
          <table:table-cell office:value-type="string">
            <text:p>0</text:p>
          </table:table-cell>
          <table:table-cell office:value-type="string">
            <text:p>0</text:p>
          </table:table-cell>
          <table:table-cell office:value-type="string">
            <text:p>https://github.com/unfoldingWord-dev/OBS-Android</text:p>
          </table:table-cell>
          <table:table-cell office:value-type="string">
            <text:p>2023-01-28T16:19:06Z</text:p>
          </table:table-cell>
        </table:table-row>
        <table:table-row>
          <table:table-cell office:value-type="string">
            <text:p>OBS-Mobi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7-29T21:22:13Z</text:p>
          </table:table-cell>
          <table:table-cell office:value-type="string">
            <text:p>2012-07-29T21:21:55Z</text:p>
          </table:table-cell>
          <table:table-cell office:value-type="string">
            <text:p/>
          </table:table-cell>
          <table:table-cell office:value-type="string">
            <text:p>2</text:p>
          </table:table-cell>
          <table:table-cell office:value-type="string">
            <text:p>0</text:p>
          </table:table-cell>
          <table:table-cell office:value-type="string">
            <text:p>9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negap/phonegap-start</text:p>
          </table:table-cell>
          <table:table-cell office:value-type="string">
            <text:p>Bob Wadholm, alunny, ryanbetts, Andrew Lunny, Dan Silivestru, Dave Johnson</text:p>
          </table:table-cell>
          <table:table-cell office:value-type="string">
            <text:p>0</text:p>
          </table:table-cell>
          <table:table-cell office:value-type="string">
            <text:p>0</text:p>
          </table:table-cell>
          <table:table-cell office:value-type="string">
            <text:p>https://github.com/unfoldingWord-dev/OBS-Mobile</text:p>
          </table:table-cell>
          <table:table-cell office:value-type="string">
            <text:p>2023-01-28T16:19:06Z</text:p>
          </table:table-cell>
        </table:table-row>
        <table:table-row>
          <table:table-cell office:value-type="string">
            <text:p>Bootstrap43</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2-22T18:31:57Z</text:p>
          </table:table-cell>
          <table:table-cell office:value-type="string">
            <text:p>2012-02-22T18:31:53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aronpk/Bootstrap-Skin</text:p>
          </table:table-cell>
          <table:table-cell office:value-type="string">
            <text:p>aaronpk, reidab</text:p>
          </table:table-cell>
          <table:table-cell office:value-type="string">
            <text:p>0</text:p>
          </table:table-cell>
          <table:table-cell office:value-type="string">
            <text:p>0</text:p>
          </table:table-cell>
          <table:table-cell office:value-type="string">
            <text:p>https://github.com/unfoldingWord-dev/Bootstrap43</text:p>
          </table:table-cell>
          <table:table-cell office:value-type="string">
            <text:p>2023-01-28T16:19:06Z</text:p>
          </table:table-cell>
        </table:table-row>
        <table:table-row>
          <table:table-cell office:value-type="string">
            <text:p>Mobile-JWiki</text:p>
          </table:table-cell>
          <table:table-cell office:value-type="string">
            <text:p>unfoldingWord-dev</text:p>
          </table:table-cell>
          <table:table-cell office:value-type="string">
            <text:p>PHP</text:p>
          </table:table-cell>
          <table:table-cell office:value-type="string">
            <text:p>True</text:p>
          </table:table-cell>
          <table:table-cell office:value-type="string">
            <text:p>True</text:p>
          </table:table-cell>
          <table:table-cell office:value-type="string">
            <text:p>2011-09-19T17:33:58Z</text:p>
          </table:table-cell>
          <table:table-cell office:value-type="string">
            <text:p>2011-09-19T17:33:5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wadholm/Mobile-JWiki</text:p>
          </table:table-cell>
          <table:table-cell office:value-type="string">
            <text:p>Bob Wadholm</text:p>
          </table:table-cell>
          <table:table-cell office:value-type="string">
            <text:p>0</text:p>
          </table:table-cell>
          <table:table-cell office:value-type="string">
            <text:p>0</text:p>
          </table:table-cell>
          <table:table-cell office:value-type="string">
            <text:p>https://github.com/unfoldingWord-dev/Mobile-JWiki</text:p>
          </table:table-cell>
          <table:table-cell office:value-type="string">
            <text:p>2023-01-28T16:19:06Z</text:p>
          </table:table-cell>
        </table:table-row>
        <table:table-row>
          <table:table-cell office:value-type="string">
            <text:p>etherpad-lit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1-09-23T18:20:05Z</text:p>
          </table:table-cell>
          <table:table-cell office:value-type="string">
            <text:p>2011-09-02T22:45:35Z</text:p>
          </table:table-cell>
          <table:table-cell office:value-type="string">
            <text:p/>
          </table:table-cell>
          <table:table-cell office:value-type="string">
            <text:p>0</text:p>
          </table:table-cell>
          <table:table-cell office:value-type="string">
            <text:p>0</text:p>
          </table:table-cell>
          <table:table-cell office:value-type="string">
            <text:p>576</text:p>
          </table:table-cell>
          <table:table-cell office:value-type="string">
            <text:p/>
          </table:table-cell>
          <table:table-cell office:value-type="string">
            <text:p>etherpad-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er/etherpad</text:p>
          </table:table-cell>
          <table:table-cell office:value-type="string">
            <text:p>Pita, JohnMcLear, Robin Buse, Robin, hanspinckaers, Lukas Martini, adrianheine, garrett, Patrick Pfeiffer, Randy, erlendfh, chapel, Pita Poison, root, snarkyMcSnark</text:p>
          </table:table-cell>
          <table:table-cell office:value-type="string">
            <text:p>0</text:p>
          </table:table-cell>
          <table:table-cell office:value-type="string">
            <text:p>0</text:p>
          </table:table-cell>
          <table:table-cell office:value-type="string">
            <text:p>https://github.com/unfoldingWord-dev/etherpad-lite</text:p>
          </table:table-cell>
          <table:table-cell office:value-type="string">
            <text:p>2023-01-28T16:19:06Z</text:p>
          </table:table-cell>
        </table:table-row>
        <table:table-row>
          <table:table-cell office:value-type="string">
            <text:p>TheCompassionateFatherApp</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1-04-27T22:43:14Z</text:p>
          </table:table-cell>
          <table:table-cell office:value-type="string">
            <text:p>2011-04-27T22:42:54Z</text:p>
          </table:table-cell>
          <table:table-cell office:value-type="string">
            <text:p/>
          </table:table-cell>
          <table:table-cell office:value-type="string">
            <text:p>1</text:p>
          </table:table-cell>
          <table:table-cell office:value-type="string">
            <text:p>0</text:p>
          </table:table-cell>
          <table:table-cell office:value-type="string">
            <text:p>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SM, DSM Mobile, Tim Jore</text:p>
          </table:table-cell>
          <table:table-cell office:value-type="string">
            <text:p>0</text:p>
          </table:table-cell>
          <table:table-cell office:value-type="string">
            <text:p>0</text:p>
          </table:table-cell>
          <table:table-cell office:value-type="string">
            <text:p>https://github.com/unfoldingWord-dev/TheCompassionateFatherApp</text:p>
          </table:table-cell>
          <table:table-cell office:value-type="string">
            <text:p>2023-01-28T16:19:06Z</text:p>
          </table:table-cell>
        </table:table-row>
        <table:table-row>
          <table:table-cell office:value-type="string">
            <text:p>ResourceChecker</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20-05-19T19:57:08Z</text:p>
          </table:table-cell>
          <table:table-cell office:value-type="string">
            <text:p>2020-05-19T19:56:49Z</text:p>
          </table:table-cell>
          <table:table-cell office:value-type="string">
            <text:p/>
          </table:table-cell>
          <table:table-cell office:value-type="string">
            <text:p>0</text:p>
          </table:table-cell>
          <table:table-cell office:value-type="string">
            <text:p>0</text:p>
          </table:table-cell>
          <table:table-cell office:value-type="string">
            <text:p>64</text:p>
          </table:table-cell>
          <table:table-cell office:value-type="string">
            <text:p/>
          </table:table-cell>
          <table:table-cell office:value-type="string">
            <text:p>resource-che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gitea-react-toolkit, scripture-resources-rcl, markdown-translatable</text:p>
          </table:table-cell>
          <table:table-cell office:value-type="string">
            <text:p>unfoldingWord/uw-word-count</text:p>
          </table:table-cell>
          <table:table-cell office:value-type="string">
            <text:p>mandolyte, RobH123, jag3773</text:p>
          </table:table-cell>
          <table:table-cell office:value-type="string">
            <text:p>0</text:p>
          </table:table-cell>
          <table:table-cell office:value-type="string">
            <text:p>0</text:p>
          </table:table-cell>
          <table:table-cell office:value-type="string">
            <text:p>https://github.com/unfoldingWord-dev/ResourceChecker</text:p>
          </table:table-cell>
          <table:table-cell office:value-type="string">
            <text:p>2023-01-28T14:29:30Z</text:p>
          </table:table-cell>
        </table:table-row>
        <table:table-row>
          <table:table-cell office:value-type="string">
            <text:p>node-dcs-api-client</text:p>
          </table:table-cell>
          <table:table-cell office:value-type="string">
            <text:p>unfoldingWord-dev</text:p>
          </table:table-cell>
          <table:table-cell office:value-type="string">
            <text:p>TypeScript</text:p>
          </table:table-cell>
          <table:table-cell office:value-type="string">
            <text:p>True</text:p>
          </table:table-cell>
          <table:table-cell office:value-type="string">
            <text:p>False</text:p>
          </table:table-cell>
          <table:table-cell office:value-type="string">
            <text:p>2022-04-22T11:32:53Z</text:p>
          </table:table-cell>
          <table:table-cell office:value-type="string">
            <text:p>2022-04-22T11:31:46Z</text:p>
          </table:table-cell>
          <table:table-cell office:value-type="string">
            <text:p>2022-04-22T11:32:54Z</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dcs_api_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3</text:p>
          </table:table-cell>
          <table:table-cell office:value-type="string">
            <text:p>0</text:p>
          </table:table-cell>
          <table:table-cell office:value-type="string">
            <text:p>https://github.com/unfoldingWord-dev/node-dcs-api-client</text:p>
          </table:table-cell>
          <table:table-cell office:value-type="string">
            <text:p>2023-01-27T20:32:30Z</text:p>
          </table:table-cell>
        </table:table-row>
        <table:table-row>
          <table:table-cell office:value-type="string">
            <text:p>dokuwiki-slack-invite</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8-11-02T14:11:36Z</text:p>
          </table:table-cell>
          <table:table-cell office:value-type="string">
            <text:p>2018-11-02T14:11:35Z</text:p>
          </table:table-cell>
          <table:table-cell office:value-type="string">
            <text:p/>
          </table:table-cell>
          <table:table-cell office:value-type="string">
            <text:p>0</text:p>
          </table:table-cell>
          <table:table-cell office:value-type="string">
            <text:p>0</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tejMecka, jag3773, Matej Plavevski, Richard Mahn, Saksham-Katiyar, yvonnel098</text:p>
          </table:table-cell>
          <table:table-cell office:value-type="string">
            <text:p>0</text:p>
          </table:table-cell>
          <table:table-cell office:value-type="string">
            <text:p>0</text:p>
          </table:table-cell>
          <table:table-cell office:value-type="string">
            <text:p>https://github.com/unfoldingWord-dev/dokuwiki-slack-invite</text:p>
          </table:table-cell>
          <table:table-cell office:value-type="string">
            <text:p>2023-01-27T20:30:22Z</text:p>
          </table:table-cell>
        </table:table-row>
        <table:table-row>
          <table:table-cell office:value-type="string">
            <text:p>Dokuwiki-USFMTag</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6-01-28T15:18:48Z</text:p>
          </table:table-cell>
          <table:table-cell office:value-type="string">
            <text:p>2016-01-28T15:18:47Z</text:p>
          </table:table-cell>
          <table:table-cell office:value-type="string">
            <text:p/>
          </table:table-cell>
          <table:table-cell office:value-type="string">
            <text:p>0</text:p>
          </table:table-cell>
          <table:table-cell office:value-type="string">
            <text:p>0</text:p>
          </table:table-cell>
          <table:table-cell office:value-type="string">
            <text:p>3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MediaWiki-USFMTag</text:p>
          </table:table-cell>
          <table:table-cell office:value-type="string">
            <text:p>yvonnel098, Distant Shores Media, jag3773, root, Door43, Phil Hopper, phillip-hopper, Richard Mahn, richmahn</text:p>
          </table:table-cell>
          <table:table-cell office:value-type="string">
            <text:p>0</text:p>
          </table:table-cell>
          <table:table-cell office:value-type="string">
            <text:p>0</text:p>
          </table:table-cell>
          <table:table-cell office:value-type="string">
            <text:p>https://github.com/unfoldingWord-dev/Dokuwiki-USFMTag</text:p>
          </table:table-cell>
          <table:table-cell office:value-type="string">
            <text:p>2022-07-27T07:42:16Z</text:p>
          </table:table-cell>
        </table:table-row>
        <table:table-row>
          <table:table-cell office:value-type="string">
            <text:p>gogs_auto_scaling</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2-05-20T10:45:38Z</text:p>
          </table:table-cell>
          <table:table-cell office:value-type="string">
            <text:p>2022-05-20T10:45:38Z</text:p>
          </table:table-cell>
          <table:table-cell office:value-type="string">
            <text:p/>
          </table:table-cell>
          <table:table-cell office:value-type="string">
            <text:p>0</text:p>
          </table:table-cell>
          <table:table-cell office:value-type="string">
            <text:p>0</text:p>
          </table:table-cell>
          <table:table-cell office:value-type="string">
            <text:p>1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oot, yakob-aleksandrovich</text:p>
          </table:table-cell>
          <table:table-cell office:value-type="string">
            <text:p>0</text:p>
          </table:table-cell>
          <table:table-cell office:value-type="string">
            <text:p>0</text:p>
          </table:table-cell>
          <table:table-cell office:value-type="string">
            <text:p>https://github.com/unfoldingWord-dev/gogs_auto_scaling</text:p>
          </table:table-cell>
          <table:table-cell office:value-type="string">
            <text:p>2022-05-20T10:45:41Z</text:p>
          </table:table-cell>
        </table:table-row>
        <table:table-row>
          <table:table-cell office:value-type="string">
            <text:p>proskomma-render-preview</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2-03-23T16:51:37Z</text:p>
          </table:table-cell>
          <table:table-cell office:value-type="string">
            <text:p>2021-10-19T09:03:07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roskomma/proskomma-render-pdf</text:p>
          </table:table-cell>
          <table:table-cell office:value-type="string">
            <text:p>mvahowe</text:p>
          </table:table-cell>
          <table:table-cell office:value-type="string">
            <text:p>0</text:p>
          </table:table-cell>
          <table:table-cell office:value-type="string">
            <text:p>0</text:p>
          </table:table-cell>
          <table:table-cell office:value-type="string">
            <text:p>https://github.com/unfoldingWord-dev/proskomma-render-preview</text:p>
          </table:table-cell>
          <table:table-cell office:value-type="string">
            <text:p>2022-03-22T12:58:28Z</text:p>
          </table:table-cell>
        </table:table-row>
        <table:table-row>
          <table:table-cell office:value-type="string">
            <text:p>ts-stat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1-08-10T11:28:50Z</text:p>
          </table:table-cell>
          <table:table-cell office:value-type="string">
            <text:p>2021-08-10T11:28:46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ts-stats</text:p>
          </table:table-cell>
          <table:table-cell office:value-type="string">
            <text:p>2021-08-10T11:28:53Z</text:p>
          </table:table-cell>
        </table:table-row>
        <table:table-row>
          <table:table-cell office:value-type="string">
            <text:p>tx-dev-door43</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1-07-12T22:01:02Z</text:p>
          </table:table-cell>
          <table:table-cell office:value-type="string">
            <text:p>2021-07-12T21:58:40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tx-dev-door43</text:p>
          </table:table-cell>
          <table:table-cell office:value-type="string">
            <text:p>2021-07-12T21:58:43Z</text:p>
          </table:table-cell>
        </table:table-row>
        <table:table-row>
          <table:table-cell office:value-type="string">
            <text:p>obsidian-uw-rc-link-opener</text:p>
          </table:table-cell>
          <table:table-cell office:value-type="string">
            <text:p>unfoldingWord-dev</text:p>
          </table:table-cell>
          <table:table-cell office:value-type="string">
            <text:p>TypeScript</text:p>
          </table:table-cell>
          <table:table-cell office:value-type="string">
            <text:p>False</text:p>
          </table:table-cell>
          <table:table-cell office:value-type="string">
            <text:p>False</text:p>
          </table:table-cell>
          <table:table-cell office:value-type="string">
            <text:p>2021-06-08T17:40:36Z</text:p>
          </table:table-cell>
          <table:table-cell office:value-type="string">
            <text:p>2021-06-08T17:40:33Z</text:p>
          </table:table-cell>
          <table:table-cell office:value-type="string">
            <text:p>2021-06-07T19:26:06Z</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uw-rc-link-ope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1</text:p>
          </table:table-cell>
          <table:table-cell office:value-type="string">
            <text:p>8</text:p>
          </table:table-cell>
          <table:table-cell office:value-type="string">
            <text:p>https://github.com/unfoldingWord-dev/obsidian-uw-rc-link-opener</text:p>
          </table:table-cell>
          <table:table-cell office:value-type="string">
            <text:p>2021-06-08T17:40:39Z</text:p>
          </table:table-cell>
        </table:table-row>
        <table:table-row>
          <table:table-cell office:value-type="string">
            <text:p>uw-pdf-conversion-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3-03-05T13:06:26Z</text:p>
          </table:table-cell>
          <table:table-cell office:value-type="string">
            <text:p>2021-06-03T20:21:45Z</text:p>
          </table:table-cell>
          <table:table-cell office:value-type="string">
            <text:p/>
          </table:table-cell>
          <table:table-cell office:value-type="string">
            <text:p>4</text:p>
          </table:table-cell>
          <table:table-cell office:value-type="string">
            <text:p>4</text:p>
          </table:table-cell>
          <table:table-cell office:value-type="string">
            <text:p>30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ichard Mahn</text:p>
          </table:table-cell>
          <table:table-cell office:value-type="string">
            <text:p>0</text:p>
          </table:table-cell>
          <table:table-cell office:value-type="string">
            <text:p>0</text:p>
          </table:table-cell>
          <table:table-cell office:value-type="string">
            <text:p>https://github.com/unfoldingWord-dev/uw-pdf-conversion-tools</text:p>
          </table:table-cell>
          <table:table-cell office:value-type="string">
            <text:p>2021-06-03T20:21:52Z</text:p>
          </table:table-cell>
        </table:table-row>
        <table:table-row>
          <table:table-cell office:value-type="string">
            <text:p>dcs-dock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5-13T21:16:12Z</text:p>
          </table:table-cell>
          <table:table-cell office:value-type="string">
            <text:p>2021-05-13T21:16:06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git@github.com:unfoldingWord-dev/dcs-profile-default.git, git@github.com:unfoldingword-dev/dcs-profile-blank.git, git@github.com:unfoldingWord-dev/dcs-profile-unfoldingword-mirrored.git</text:p>
          </table:table-cell>
          <table:table-cell office:value-type="string">
            <text:p>dcs-do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docker</text:p>
          </table:table-cell>
          <table:table-cell office:value-type="string">
            <text:p>2021-05-13T21:16:14Z</text:p>
          </table:table-cell>
        </table:table-row>
        <table:table-row>
          <table:table-cell office:value-type="string">
            <text:p>dcs-profile-unfoldingword</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1:28:28Z</text:p>
          </table:table-cell>
          <table:table-cell office:value-type="string">
            <text:p>2021-05-11T21:04:58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profile-unfoldingword</text:p>
          </table:table-cell>
          <table:table-cell office:value-type="string">
            <text:p>2021-05-11T21:28:35Z</text:p>
          </table:table-cell>
        </table:table-row>
        <table:table-row>
          <table:table-cell office:value-type="string">
            <text:p>dcs-profile-blank</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1:05:04Z</text:p>
          </table:table-cell>
          <table:table-cell office:value-type="string">
            <text:p>2021-05-11T21:04:58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profile-blank</text:p>
          </table:table-cell>
          <table:table-cell office:value-type="string">
            <text:p>2021-05-11T21:05:08Z</text:p>
          </table:table-cell>
        </table:table-row>
        <table:table-row>
          <table:table-cell office:value-type="string">
            <text:p>dcs-profile-unfoldingword-mirrored</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0:44:48Z</text:p>
          </table:table-cell>
          <table:table-cell office:value-type="string">
            <text:p>2021-05-06T17:19:29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profile-unfoldingword-mirrored</text:p>
          </table:table-cell>
          <table:table-cell office:value-type="string">
            <text:p>2021-05-11T20:44:52Z</text:p>
          </table:table-cell>
        </table:table-row>
        <table:table-row>
          <table:table-cell office:value-type="string">
            <text:p>dcs-migrate-org-repos</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1-05-02T18:04:55Z</text:p>
          </table:table-cell>
          <table:table-cell office:value-type="string">
            <text:p>2021-01-11T22:27:35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edle/mirror-to-gitea</text:p>
          </table:table-cell>
          <table:table-cell office:value-type="string">
            <text:p>jaedle, Dennis Jekubczyk, derhuerst, nilp0inter, dependabot[bot]</text:p>
          </table:table-cell>
          <table:table-cell office:value-type="string">
            <text:p>0</text:p>
          </table:table-cell>
          <table:table-cell office:value-type="string">
            <text:p>0</text:p>
          </table:table-cell>
          <table:table-cell office:value-type="string">
            <text:p>https://github.com/unfoldingWord-dev/dcs-migrate-org-repos</text:p>
          </table:table-cell>
          <table:table-cell office:value-type="string">
            <text:p>2021-05-10T13:39:48Z</text:p>
          </table:table-cell>
        </table:table-row>
        <table:table-row>
          <table:table-cell office:value-type="string">
            <text:p>dcs-api-resolve-conflicts-poc</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0-11-13T22:23:24Z</text:p>
          </table:table-cell>
          <table:table-cell office:value-type="string">
            <text:p>2020-11-13T22:23:18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api-resolve-conflicts-poc</text:p>
          </table:table-cell>
          <table:table-cell office:value-type="string">
            <text:p>2020-11-13T22:23:27Z</text:p>
          </table:table-cell>
        </table:table-row>
        <table:table-row>
          <table:table-cell office:value-type="string">
            <text:p>dcs-api-merge-poc</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1-01-06T21:01:02Z</text:p>
          </table:table-cell>
          <table:table-cell office:value-type="string">
            <text:p>2020-11-09T17:00:59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ttury</text:p>
          </table:table-cell>
          <table:table-cell office:value-type="string">
            <text:p>0</text:p>
          </table:table-cell>
          <table:table-cell office:value-type="string">
            <text:p>0</text:p>
          </table:table-cell>
          <table:table-cell office:value-type="string">
            <text:p>https://github.com/unfoldingWord-dev/dcs-api-merge-poc</text:p>
          </table:table-cell>
          <table:table-cell office:value-type="string">
            <text:p>2020-11-09T17:01:06Z</text:p>
          </table:table-cell>
        </table:table-row>
        <table:table-row>
          <table:table-cell office:value-type="string">
            <text:p>uw-web</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17-03-25T14:53:13Z</text:p>
          </table:table-cell>
          <table:table-cell office:value-type="string">
            <text:p>2017-03-25T14:53:08Z</text:p>
          </table:table-cell>
          <table:table-cell office:value-type="string">
            <text:p/>
          </table:table-cell>
          <table:table-cell office:value-type="string">
            <text:p>2</text:p>
          </table:table-cell>
          <table:table-cell office:value-type="string">
            <text:p>0</text:p>
          </table:table-cell>
          <table:table-cell office:value-type="string">
            <text:p>1261</text:p>
          </table:table-cell>
          <table:table-cell office:value-type="string">
            <text:p/>
          </table:table-cell>
          <table:table-cell office:value-type="string">
            <text:p>BrowserBib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gitalbiblesociety/browserbible-3</text:p>
          </table:table-cell>
          <table:table-cell office: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text:p>0</text:p>
          </table:table-cell>
          <table:table-cell office:value-type="string">
            <text:p>0</text:p>
          </table:table-cell>
          <table:table-cell office:value-type="string">
            <text:p>https://github.com/unfoldingWord-dev/uw-web</text:p>
          </table:table-cell>
          <table:table-cell office:value-type="string">
            <text:p>2020-09-11T14:39:54Z</text:p>
          </table:table-cell>
        </table:table-row>
        <table:table-row>
          <table:table-cell office:value-type="string">
            <text:p>HebrewLexicon</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0-01-03T16:24:58Z</text:p>
          </table:table-cell>
          <table:table-cell office:value-type="string">
            <text:p>2020-01-03T16:24:57Z</text:p>
          </table:table-cell>
          <table:table-cell office:value-type="string">
            <text:p/>
          </table:table-cell>
          <table:table-cell office:value-type="string">
            <text:p>0</text:p>
          </table:table-cell>
          <table:table-cell office:value-type="string">
            <text:p>0</text:p>
          </table:table-cell>
          <table:table-cell office:value-type="string">
            <text:p>373</text:p>
          </table:table-cell>
          <table:table-cell office:value-type="string">
            <text:p/>
          </table:table-cell>
          <table:table-cell office:value-type="string">
            <text:p>strongs-par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HebrewLexicon</text:p>
          </table:table-cell>
          <table:table-cell office:value-type="string">
            <text:p>joeldruark, DavidTroidl, dowens76, PhotoNomad0, scruffian, destatez, sinri</text:p>
          </table:table-cell>
          <table:table-cell office:value-type="string">
            <text:p>0</text:p>
          </table:table-cell>
          <table:table-cell office:value-type="string">
            <text:p>0</text:p>
          </table:table-cell>
          <table:table-cell office:value-type="string">
            <text:p>https://github.com/unfoldingWord-dev/HebrewLexicon</text:p>
          </table:table-cell>
          <table:table-cell office:value-type="string">
            <text:p>2020-01-03T16:25:13Z</text:p>
          </table:table-cell>
        </table:table-row>
        <table:table-row>
          <table:table-cell office:value-type="string">
            <text:p>node-door43-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2-12-08T17:04:23Z</text:p>
          </table:table-cell>
          <table:table-cell office:value-type="string">
            <text:p>2019-11-06T17:32:07Z</text:p>
          </table:table-cell>
          <table:table-cell office:value-type="string">
            <text:p>2019-11-06T17:30:48Z</text:p>
          </table:table-cell>
          <table:table-cell office:value-type="string">
            <text:p>13</text:p>
          </table:table-cell>
          <table:table-cell office:value-type="string">
            <text:p>13</text:p>
          </table:table-cell>
          <table:table-cell office:value-type="string">
            <text:p>214</text:p>
          </table:table-cell>
          <table:table-cell office:value-type="string">
            <text:p/>
          </table:table-cell>
          <table:table-cell office:value-type="string">
            <text:p>door43-client</text:p>
          </table:table-cell>
          <table:table-cell office:value-type="string">
            <text:p>False</text:p>
          </table:table-cell>
          <table:table-cell office:value-type="string">
            <text:p>1621</text:p>
          </table:table-cell>
          <table:table-cell office:value-type="string">
            <text:p>2019-11-06T17:33:42.928Z</text:p>
          </table:table-cell>
          <table:table-cell office:value-type="string">
            <text:p/>
          </table:table-cell>
          <table:table-cell office:value-type="string">
            <text:p>resource-container</text:p>
          </table:table-cell>
          <table:table-cell office:value-type="string">
            <text:p>Bible-Translation-Tools/BTT-Writer-Desktop, WycliffeAssociates/BTT_Writer_Resource_Updater, unfoldingWord-dev/ts-desktop</text:p>
          </table:table-cell>
          <table:table-cell office:value-type="string">
            <text:p>da1nerd</text:p>
          </table:table-cell>
          <table:table-cell office:value-type="string">
            <text:p>1</text:p>
          </table:table-cell>
          <table:table-cell office:value-type="string">
            <text:p>0</text:p>
          </table:table-cell>
          <table:table-cell office:value-type="string">
            <text:p>https://github.com/unfoldingWord-dev/node-door43-client</text:p>
          </table:table-cell>
          <table:table-cell office:value-type="string">
            <text:p>2019-11-06T17:32:34Z</text:p>
          </table:table-cell>
        </table:table-row>
        <table:table-row>
          <table:table-cell office:value-type="string">
            <text:p>Autographa</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5:21Z</text:p>
          </table:table-cell>
          <table:table-cell office:value-type="string">
            <text:p>2019-04-15T16:35:18Z</text:p>
          </table:table-cell>
          <table:table-cell office:value-type="string">
            <text:p/>
          </table:table-cell>
          <table:table-cell office:value-type="string">
            <text:p>12</text:p>
          </table:table-cell>
          <table:table-cell office:value-type="string">
            <text:p>0</text:p>
          </table:table-cell>
          <table:table-cell office:value-type="string">
            <text:p>58</text:p>
          </table:table-cell>
          <table:table-cell office:value-type="string">
            <text:p/>
          </table:table-cell>
          <table:table-cell office:value-type="string">
            <text:p>Autograph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bajpai9, ayushnig, sandeeponrails, klappy, ImgBotApp, mannycolon</text:p>
          </table:table-cell>
          <table:table-cell office:value-type="string">
            <text:p>0</text:p>
          </table:table-cell>
          <table:table-cell office:value-type="string">
            <text:p>0</text:p>
          </table:table-cell>
          <table:table-cell office:value-type="string">
            <text:p>https://github.com/unfoldingWord-dev/Autographa</text:p>
          </table:table-cell>
          <table:table-cell office:value-type="string">
            <text:p>2019-10-22T20:35:02Z</text:p>
          </table:table-cell>
        </table:table-row>
        <table:table-row>
          <table:table-cell office:value-type="string">
            <text:p>checkingRubric_tool</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28:23Z</text:p>
          </table:table-cell>
          <table:table-cell office:value-type="string">
            <text:p>2019-04-15T16:28:18Z</text:p>
          </table:table-cell>
          <table:table-cell office:value-type="string">
            <text:p/>
          </table:table-cell>
          <table:table-cell office:value-type="string">
            <text:p>0</text:p>
          </table:table-cell>
          <table:table-cell office:value-type="string">
            <text:p>0</text:p>
          </table:table-cell>
          <table:table-cell office:value-type="string">
            <text:p>75</text:p>
          </table:table-cell>
          <table:table-cell office:value-type="string">
            <text:p/>
          </table:table-cell>
          <table:table-cell office:value-type="string">
            <text:p>checkingRubric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ImgBotApp</text:p>
          </table:table-cell>
          <table:table-cell office:value-type="string">
            <text:p>0</text:p>
          </table:table-cell>
          <table:table-cell office:value-type="string">
            <text:p>0</text:p>
          </table:table-cell>
          <table:table-cell office:value-type="string">
            <text:p>https://github.com/unfoldingWord-dev/checkingRubric_tool</text:p>
          </table:table-cell>
          <table:table-cell office:value-type="string">
            <text:p>2019-10-22T19:40:10Z</text:p>
          </table:table-cell>
        </table:table-row>
        <table:table-row>
          <table:table-cell office:value-type="string">
            <text:p>toolTemplat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4:11Z</text:p>
          </table:table-cell>
          <table:table-cell office:value-type="string">
            <text:p>2019-04-15T16:34:0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tool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c-tool</text:p>
          </table:table-cell>
          <table:table-cell office:value-type="string">
            <text:p/>
          </table:table-cell>
          <table:table-cell office:value-type="string">
            <text:p>klappy, da1nerd, ImgBotApp, mannycolon</text:p>
          </table:table-cell>
          <table:table-cell office:value-type="string">
            <text:p>0</text:p>
          </table:table-cell>
          <table:table-cell office:value-type="string">
            <text:p>0</text:p>
          </table:table-cell>
          <table:table-cell office:value-type="string">
            <text:p>https://github.com/unfoldingWord-dev/toolTemplate</text:p>
          </table:table-cell>
          <table:table-cell office:value-type="string">
            <text:p>2019-10-22T19:38:20Z</text:p>
          </table:table-cell>
        </table:table-row>
        <table:table-row>
          <table:table-cell office:value-type="string">
            <text:p>comment_box</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3-13T15:21:35Z</text:p>
          </table:table-cell>
          <table:table-cell office:value-type="string">
            <text:p>2017-03-13T15:19:36Z</text:p>
          </table:table-cell>
          <table:table-cell office:value-type="string">
            <text:p/>
          </table:table-cell>
          <table:table-cell office:value-type="string">
            <text:p>0</text:p>
          </table:table-cell>
          <table:table-cell office:value-type="string">
            <text:p>0</text:p>
          </table:table-cell>
          <table:table-cell office:value-type="string">
            <text:p>40</text:p>
          </table:table-cell>
          <table:table-cell office:value-type="string">
            <text:p/>
          </table:table-cell>
          <table:table-cell office:value-type="string">
            <text:p>CommentBo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comment_box</text:p>
          </table:table-cell>
          <table:table-cell office:value-type="string">
            <text:p>2019-10-22T19:37:22Z</text:p>
          </table:table-cell>
        </table:table-row>
        <table:table-row>
          <table:table-cell office:value-type="string">
            <text:p>t_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09T21:08:27Z</text:p>
          </table:table-cell>
          <table:table-cell office:value-type="string">
            <text:p>2016-11-17T09:19:42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T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mannycolon, RoyalSix</text:p>
          </table:table-cell>
          <table:table-cell office:value-type="string">
            <text:p>0</text:p>
          </table:table-cell>
          <table:table-cell office:value-type="string">
            <text:p>0</text:p>
          </table:table-cell>
          <table:table-cell office:value-type="string">
            <text:p>https://github.com/unfoldingWord-dev/t_pane</text:p>
          </table:table-cell>
          <table:table-cell office:value-type="string">
            <text:p>2019-10-22T19:34:26Z</text:p>
          </table:table-cell>
        </table:table-row>
        <table:table-row>
          <table:table-cell office:value-type="string">
            <text:p>android-http</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4-26T20:08:26Z</text:p>
          </table:table-cell>
          <table:table-cell office:value-type="string">
            <text:p>2019-04-26T20:06:51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http</text:p>
          </table:table-cell>
          <table:table-cell office:value-type="string">
            <text:p>2019-04-26T20:08:03Z</text:p>
          </table:table-cell>
        </table:table-row>
        <table:table-row>
          <table:table-cell office:value-type="string">
            <text:p>noto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7-04-15T13:09:18Z</text:p>
          </table:table-cell>
          <table:table-cell office:value-type="string">
            <text:p>2017-04-06T20:18:34Z</text:p>
          </table:table-cell>
          <table:table-cell office:value-type="string">
            <text:p/>
          </table:table-cell>
          <table:table-cell office:value-type="string">
            <text:p>0</text:p>
          </table:table-cell>
          <table:table-cell office:value-type="string">
            <text:p>0</text:p>
          </table:table-cell>
          <table:table-cell office:value-type="string">
            <text:p>124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otofonts/nototools</text:p>
          </table:table-cell>
          <table:table-cell office:value-type="string">
            <text:p>dougfelt, roozbehp, James Godfrey-Kittle, jamesgk, behdad, thaths, zjusbo, jungshik, Kanjilearner817, davelab6, adrientetar, moyogo, marekjez86, iverg, khaledhosny, m4rc1e, Marek Jeziorek, n7s, No Author</text:p>
          </table:table-cell>
          <table:table-cell office:value-type="string">
            <text:p>0</text:p>
          </table:table-cell>
          <table:table-cell office:value-type="string">
            <text:p>0</text:p>
          </table:table-cell>
          <table:table-cell office:value-type="string">
            <text:p>https://github.com/unfoldingWord-dev/nototools</text:p>
          </table:table-cell>
          <table:table-cell office:value-type="string">
            <text:p>2019-04-16T02:34:59Z</text:p>
          </table:table-cell>
        </table:table-row>
        <table:table-row>
          <table:table-cell office:value-type="string">
            <text:p>pages</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4-10-21T15:55:23Z</text:p>
          </table:table-cell>
          <table:table-cell office:value-type="string">
            <text:p>2014-10-21T15:55:20Z</text:p>
          </table:table-cell>
          <table:table-cell office:value-type="string">
            <text:p/>
          </table:table-cell>
          <table:table-cell office:value-type="string">
            <text:p>0</text:p>
          </table:table-cell>
          <table:table-cell office:value-type="string">
            <text:p>0</text:p>
          </table:table-cell>
          <table:table-cell office:value-type="string">
            <text:p>545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istant Shores Media, Jesse A. Griffin, root</text:p>
          </table:table-cell>
          <table:table-cell office:value-type="string">
            <text:p>0</text:p>
          </table:table-cell>
          <table:table-cell office:value-type="string">
            <text:p>0</text:p>
          </table:table-cell>
          <table:table-cell office:value-type="string">
            <text:p>https://github.com/unfoldingWord-dev/pages</text:p>
          </table:table-cell>
          <table:table-cell office:value-type="string">
            <text:p>2019-02-28T03:39:24Z</text:p>
          </table:table-cell>
        </table:table-row>
        <table:table-row>
          <table:table-cell office:value-type="string">
            <text:p>tx-usfm2html</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09-23T01:36:55Z</text:p>
          </table:table-cell>
          <table:table-cell office:value-type="string">
            <text:p>2016-09-23T01:36:50Z</text:p>
          </table:table-cell>
          <table:table-cell office:value-type="string">
            <text:p/>
          </table:table-cell>
          <table:table-cell office:value-type="string">
            <text:p>0</text:p>
          </table:table-cell>
          <table:table-cell office:value-type="string">
            <text:p>0</text:p>
          </table:table-cell>
          <table:table-cell office:value-type="string">
            <text:p>2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text:p>
          </table:table-cell>
          <table:table-cell office:value-type="string">
            <text:p>0</text:p>
          </table:table-cell>
          <table:table-cell office:value-type="string">
            <text:p>0</text:p>
          </table:table-cell>
          <table:table-cell office:value-type="string">
            <text:p>https://github.com/unfoldingWord-dev/tx-usfm2html</text:p>
          </table:table-cell>
          <table:table-cell office:value-type="string">
            <text:p>2019-02-19T12:45:43Z</text:p>
          </table:table-cell>
        </table:table-row>
        <table:table-row>
          <table:table-cell office:value-type="string">
            <text:p>webhook-relay</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8-01-22T23:48:40Z</text:p>
          </table:table-cell>
          <table:table-cell office:value-type="string">
            <text:p>2018-01-22T23:48:0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scsoft/webhook-relay</text:p>
          </table:table-cell>
          <table:table-cell office:value-type="string">
            <text:p>tpdownes</text:p>
          </table:table-cell>
          <table:table-cell office:value-type="string">
            <text:p>0</text:p>
          </table:table-cell>
          <table:table-cell office:value-type="string">
            <text:p>0</text:p>
          </table:table-cell>
          <table:table-cell office:value-type="string">
            <text:p>https://github.com/unfoldingWord-dev/webhook-relay</text:p>
          </table:table-cell>
          <table:table-cell office:value-type="string">
            <text:p>2018-06-06T20:21:12Z</text:p>
          </table:table-cell>
        </table:table-row>
        <table:table-row>
          <table:table-cell office:value-type="string">
            <text:p>obs-dat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3-24T13:00:10Z</text:p>
          </table:table-cell>
          <table:table-cell office:value-type="string">
            <text:p>2018-03-24T12:59:58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obs-data</text:p>
          </table:table-cell>
          <table:table-cell office:value-type="string">
            <text:p>2018-03-24T13:00:11Z</text:p>
          </table:table-cell>
        </table:table-row>
        <table:table-row>
          <table:table-cell office:value-type="string">
            <text:p>PublishingBlockchain</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12-22T23:26:11Z</text:p>
          </table:table-cell>
          <table:table-cell office:value-type="string">
            <text:p>2015-12-22T23:26:11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dev/PublishingBlockchain</text:p>
          </table:table-cell>
          <table:table-cell office:value-type="string">
            <text:p>2018-03-11T20:57:04Z</text:p>
          </table:table-cell>
        </table:table-row>
        <table:table-row>
          <table:table-cell office:value-type="string">
            <text:p>python-aws-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6-30T18:36:54Z</text:p>
          </table:table-cell>
          <table:table-cell office:value-type="string">
            <text:p>2017-06-30T18:36:02Z</text:p>
          </table:table-cell>
          <table:table-cell office:value-type="string">
            <text:p/>
          </table:table-cell>
          <table:table-cell office:value-type="string">
            <text:p>0</text:p>
          </table:table-cell>
          <table:table-cell office:value-type="string">
            <text:p>0</text:p>
          </table:table-cell>
          <table:table-cell office:value-type="string">
            <text:p>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python-aws-tools</text:p>
          </table:table-cell>
          <table:table-cell office:value-type="string">
            <text:p>2017-08-23T22:31:23Z</text:p>
          </table:table-cell>
        </table:table-row>
        <table:table-row>
          <table:table-cell office:value-type="string">
            <text:p>tw_consistency</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8-22T12:10:23Z</text:p>
          </table:table-cell>
          <table:table-cell office:value-type="string">
            <text:p>2017-08-22T12:10:13Z</text:p>
          </table:table-cell>
          <table:table-cell office:value-type="string">
            <text:p/>
          </table:table-cell>
          <table:table-cell office:value-type="string">
            <text:p>0</text:p>
          </table:table-cell>
          <table:table-cell office:value-type="string">
            <text:p>0</text:p>
          </table:table-cell>
          <table:table-cell office:value-type="string">
            <text:p>2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dev/tw_consistency</text:p>
          </table:table-cell>
          <table:table-cell office:value-type="string">
            <text:p>2017-06-16T19:00:44Z</text:p>
          </table:table-cell>
        </table:table-row>
        <table:table-row>
          <table:table-cell office:value-type="string">
            <text:p>python-resource-container</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2-05T23:06:00Z</text:p>
          </table:table-cell>
          <table:table-cell office:value-type="string">
            <text:p>2018-02-05T23:05:15Z</text:p>
          </table:table-cell>
          <table:table-cell office:value-type="string">
            <text:p/>
          </table:table-cell>
          <table:table-cell office:value-type="string">
            <text:p>0</text:p>
          </table:table-cell>
          <table:table-cell office:value-type="string">
            <text:p>0</text:p>
          </table:table-cell>
          <table:table-cell office:value-type="string">
            <text:p>5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eremymlane</text:p>
          </table:table-cell>
          <table:table-cell office:value-type="string">
            <text:p>0</text:p>
          </table:table-cell>
          <table:table-cell office:value-type="string">
            <text:p>0</text:p>
          </table:table-cell>
          <table:table-cell office:value-type="string">
            <text:p>https://github.com/unfoldingWord-dev/python-resource-container</text:p>
          </table:table-cell>
          <table:table-cell office:value-type="string">
            <text:p>2017-05-04T19:55:10Z</text:p>
          </table:table-cell>
        </table:table-row>
        <table:table-row>
          <table:table-cell office:value-type="string">
            <text:p>slack-lambd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5-23T16:07:31Z</text:p>
          </table:table-cell>
          <table:table-cell office:value-type="string">
            <text:p>2017-05-23T15:38:49Z</text:p>
          </table:table-cell>
          <table:table-cell office:value-type="string">
            <text:p/>
          </table:table-cell>
          <table:table-cell office:value-type="string">
            <text:p>0</text:p>
          </table:table-cell>
          <table:table-cell office:value-type="string">
            <text:p>0</text:p>
          </table:table-cell>
          <table:table-cell office:value-type="string">
            <text:p>6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 PhotoNomad0, jag3773, richmahn</text:p>
          </table:table-cell>
          <table:table-cell office:value-type="string">
            <text:p>0</text:p>
          </table:table-cell>
          <table:table-cell office:value-type="string">
            <text:p>0</text:p>
          </table:table-cell>
          <table:table-cell office:value-type="string">
            <text:p>https://github.com/unfoldingWord-dev/slack-lambda</text:p>
          </table:table-cell>
          <table:table-cell office:value-type="string">
            <text:p>2017-03-15T16:22:01Z</text:p>
          </table:table-cell>
        </table:table-row>
        <table:table-row>
          <table:table-cell office:value-type="string">
            <text:p>node-resource-contain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5-08T20:11:54Z</text:p>
          </table:table-cell>
          <table:table-cell office:value-type="string">
            <text:p>2017-01-04T01:13:31Z</text:p>
          </table:table-cell>
          <table:table-cell office:value-type="string">
            <text:p/>
          </table:table-cell>
          <table:table-cell office:value-type="string">
            <text:p>1</text:p>
          </table:table-cell>
          <table:table-cell office:value-type="string">
            <text:p>0</text:p>
          </table:table-cell>
          <table:table-cell office:value-type="string">
            <text:p>82</text:p>
          </table:table-cell>
          <table:table-cell office:value-type="string">
            <text:p/>
          </table:table-cell>
          <table:table-cell office:value-type="string">
            <text:p>resource-container</text:p>
          </table:table-cell>
          <table:table-cell office:value-type="string">
            <text:p>False</text:p>
          </table:table-cell>
          <table:table-cell office:value-type="string">
            <text:p>3253</text:p>
          </table:table-cell>
          <table:table-cell office:value-type="string">
            <text:p>2017-02-28T01:01:07.451Z</text:p>
          </table:table-cell>
          <table:table-cell office:value-type="string">
            <text:p>door43-client</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resource-container</text:p>
          </table:table-cell>
          <table:table-cell office:value-type="string">
            <text:p>2017-03-07T23:45:06Z</text:p>
          </table:table-cell>
        </table:table-row>
        <table:table-row>
          <table:table-cell office:value-type="string">
            <text:p>android-resource-contain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05T23:48:40Z</text:p>
          </table:table-cell>
          <table:table-cell office:value-type="string">
            <text:p>2016-12-29T08:05:21Z</text:p>
          </table:table-cell>
          <table:table-cell office:value-type="string">
            <text:p/>
          </table:table-cell>
          <table:table-cell office:value-type="string">
            <text:p>0</text:p>
          </table:table-cell>
          <table:table-cell office:value-type="string">
            <text:p>0</text:p>
          </table:table-cell>
          <table:table-cell office:value-type="string">
            <text:p>6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resource-container</text:p>
          </table:table-cell>
          <table:table-cell office:value-type="string">
            <text:p>2017-03-07T23:44:50Z</text:p>
          </table:table-cell>
        </table:table-row>
        <table:table-row>
          <table:table-cell office:value-type="string">
            <text:p>android-foregroun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2-23T18:30:54Z</text:p>
          </table:table-cell>
          <table:table-cell office:value-type="string">
            <text:p>2017-02-23T18:30:46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foreground</text:p>
          </table:table-cell>
          <table:table-cell office:value-type="string">
            <text:p>2017-02-10T22:11:12Z</text:p>
          </table:table-cell>
        </table:table-row>
        <table:table-row>
          <table:table-cell office:value-type="string">
            <text:p>old-tx-manager-lambd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12-19T15:13:30Z</text:p>
          </table:table-cell>
          <table:table-cell office:value-type="string">
            <text:p>2016-12-19T15:13:25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0</text:p>
          </table:table-cell>
          <table:table-cell office:value-type="string">
            <text:p>0</text:p>
          </table:table-cell>
          <table:table-cell office:value-type="string">
            <text:p>https://github.com/unfoldingWord-dev/old-tx-manager-lambda</text:p>
          </table:table-cell>
          <table:table-cell office:value-type="string">
            <text:p>2017-01-23T14:56:14Z</text:p>
          </table:table-cell>
        </table:table-row>
        <table:table-row>
          <table:table-cell office:value-type="string">
            <text:p>android-event-buff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2-07T23:36:28Z</text:p>
          </table:table-cell>
          <table:table-cell office:value-type="string">
            <text:p>2017-02-07T23:35:53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event-buffer</text:p>
          </table:table-cell>
          <table:table-cell office:value-type="string">
            <text:p>2017-01-05T01:22:50Z</text:p>
          </table:table-cell>
        </table:table-row>
        <table:table-row>
          <table:table-cell office:value-type="string">
            <text:p>tx-sample-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12-20T05:54:47Z</text:p>
          </table:table-cell>
          <table:table-cell office:value-type="string">
            <text:p>2016-12-20T05:54:3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text:p>
          </table:table-cell>
          <table:table-cell office:value-type="string">
            <text:p>0</text:p>
          </table:table-cell>
          <table:table-cell office:value-type="string">
            <text:p>0</text:p>
          </table:table-cell>
          <table:table-cell office:value-type="string">
            <text:p>https://github.com/unfoldingWord-dev/tx-sample-client</text:p>
          </table:table-cell>
          <table:table-cell office:value-type="string">
            <text:p>2016-12-19T15:14:47Z</text:p>
          </table:table-cell>
        </table:table-row>
        <table:table-row>
          <table:table-cell office:value-type="string">
            <text:p>tx-md2html</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2-05T00:42:08Z</text:p>
          </table:table-cell>
          <table:table-cell office:value-type="string">
            <text:p>2017-01-18T18:02:48Z</text:p>
          </table:table-cell>
          <table:table-cell office:value-type="string">
            <text:p/>
          </table:table-cell>
          <table:table-cell office:value-type="string">
            <text:p>0</text:p>
          </table:table-cell>
          <table:table-cell office:value-type="string">
            <text:p>0</text:p>
          </table:table-cell>
          <table:table-cell office:value-type="string">
            <text:p>5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il Hopper, phillip-hopper, Gogs</text:p>
          </table:table-cell>
          <table:table-cell office:value-type="string">
            <text:p>1</text:p>
          </table:table-cell>
          <table:table-cell office:value-type="string">
            <text:p>0</text:p>
          </table:table-cell>
          <table:table-cell office:value-type="string">
            <text:p>https://github.com/unfoldingWord-dev/tx-md2html</text:p>
          </table:table-cell>
          <table:table-cell office:value-type="string">
            <text:p>2016-12-19T15:03:41Z</text:p>
          </table:table-cell>
        </table:table-row>
        <table:table-row>
          <table:table-cell office:value-type="string">
            <text:p>tx-html2pdf</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20T05:32:39Z</text:p>
          </table:table-cell>
          <table:table-cell office:value-type="string">
            <text:p>2016-12-20T05:32:32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0</text:p>
          </table:table-cell>
          <table:table-cell office:value-type="string">
            <text:p>0</text:p>
          </table:table-cell>
          <table:table-cell office:value-type="string">
            <text:p>https://github.com/unfoldingWord-dev/tx-html2pdf</text:p>
          </table:table-cell>
          <table:table-cell office:value-type="string">
            <text:p>2016-12-19T14:55:26Z</text:p>
          </table:table-cell>
        </table:table-row>
        <table:table-row>
          <table:table-cell office:value-type="string">
            <text:p>ugnt-app</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6-12-12T16:32:12Z</text:p>
          </table:table-cell>
          <table:table-cell office:value-type="string">
            <text:p>2016-12-12T16:30:59Z</text:p>
          </table:table-cell>
          <table:table-cell office:value-type="string">
            <text:p/>
          </table:table-cell>
          <table:table-cell office:value-type="string">
            <text:p>5</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text:p>
          </table:table-cell>
          <table:table-cell office:value-type="string">
            <text:p>0</text:p>
          </table:table-cell>
          <table:table-cell office:value-type="string">
            <text:p>0</text:p>
          </table:table-cell>
          <table:table-cell office:value-type="string">
            <text:p>https://github.com/unfoldingWord-dev/ugnt-app</text:p>
          </table:table-cell>
          <table:table-cell office:value-type="string">
            <text:p>2016-12-12T16:32:16Z</text:p>
          </table:table-cell>
        </table:table-row>
        <table:table-row>
          <table:table-cell office:value-type="string">
            <text:p>ts-requirements</text:p>
          </table:table-cell>
          <table:table-cell office:value-type="string">
            <text:p>unfoldingWord-dev</text:p>
          </table:table-cell>
          <table:table-cell office:value-type="string">
            <text:p>Cucumber</text:p>
          </table:table-cell>
          <table:table-cell office:value-type="string">
            <text:p>False</text:p>
          </table:table-cell>
          <table:table-cell office:value-type="string">
            <text:p>False</text:p>
          </table:table-cell>
          <table:table-cell office:value-type="string">
            <text:p>2016-03-25T20:23:25Z</text:p>
          </table:table-cell>
          <table:table-cell office:value-type="string">
            <text:p>2016-03-25T20:23:25Z</text:p>
          </table:table-cell>
          <table:table-cell office:value-type="string">
            <text:p/>
          </table:table-cell>
          <table:table-cell office:value-type="string">
            <text:p>131</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RRohrssen</text:p>
          </table:table-cell>
          <table:table-cell office:value-type="string">
            <text:p>0</text:p>
          </table:table-cell>
          <table:table-cell office:value-type="string">
            <text:p>0</text:p>
          </table:table-cell>
          <table:table-cell office:value-type="string">
            <text:p>https://github.com/unfoldingWord-dev/ts-requirements</text:p>
          </table:table-cell>
          <table:table-cell office:value-type="string">
            <text:p>2016-12-07T22:47:45Z</text:p>
          </table:table-cell>
        </table:table-row>
        <table:table-row>
          <table:table-cell office:value-type="string">
            <text:p>hubot</text:p>
          </table:table-cell>
          <table:table-cell office:value-type="string">
            <text:p>unfoldingWord-dev</text:p>
          </table:table-cell>
          <table:table-cell office:value-type="string">
            <text:p>CoffeeScript</text:p>
          </table:table-cell>
          <table:table-cell office:value-type="string">
            <text:p>False</text:p>
          </table:table-cell>
          <table:table-cell office:value-type="string">
            <text:p>False</text:p>
          </table:table-cell>
          <table:table-cell office:value-type="string">
            <text:p>2016-12-01T19:40:08Z</text:p>
          </table:table-cell>
          <table:table-cell office:value-type="string">
            <text:p>2016-12-01T19:40:00Z</text:p>
          </table:table-cell>
          <table:table-cell office:value-type="string">
            <text:p/>
          </table:table-cell>
          <table:table-cell office:value-type="string">
            <text:p>25</text:p>
          </table:table-cell>
          <table:table-cell office:value-type="string">
            <text:p>0</text:p>
          </table:table-cell>
          <table:table-cell office:value-type="string">
            <text:p>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superdav42, Simi Shonowo, root, Richard Mahn, richmahn, hubot, markalolo, richmahn@gmail.com</text:p>
          </table:table-cell>
          <table:table-cell office:value-type="string">
            <text:p>0</text:p>
          </table:table-cell>
          <table:table-cell office:value-type="string">
            <text:p>0</text:p>
          </table:table-cell>
          <table:table-cell office:value-type="string">
            <text:p>https://github.com/unfoldingWord-dev/hubot</text:p>
          </table:table-cell>
          <table:table-cell office:value-type="string">
            <text:p>2016-12-01T19:33:07Z</text:p>
          </table:table-cell>
        </table:table-row>
        <table:table-row>
          <table:table-cell office:value-type="string">
            <text:p>uw_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6-04T01:18:15Z</text:p>
          </table:table-cell>
          <table:table-cell office:value-type="string">
            <text:p>2017-01-06T18:38:25Z</text:p>
          </table:table-cell>
          <table:table-cell office:value-type="string">
            <text:p/>
          </table:table-cell>
          <table:table-cell office:value-type="string">
            <text:p>0</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Richard Mahn, richmahn</text:p>
          </table:table-cell>
          <table:table-cell office:value-type="string">
            <text:p>0</text:p>
          </table:table-cell>
          <table:table-cell office:value-type="string">
            <text:p>0</text:p>
          </table:table-cell>
          <table:table-cell office:value-type="string">
            <text:p>https://github.com/unfoldingWord-dev/uw_tools</text:p>
          </table:table-cell>
          <table:table-cell office:value-type="string">
            <text:p>2016-11-02T15:14:26Z</text:p>
          </table:table-cell>
        </table:table-row>
        <table:table-row>
          <table:table-cell office:value-type="string">
            <text:p>uw-api</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7-07-24T12:47:59Z</text:p>
          </table:table-cell>
          <table:table-cell office:value-type="string">
            <text:p>2017-07-24T12:47:28Z</text:p>
          </table:table-cell>
          <table:table-cell office:value-type="string">
            <text:p/>
          </table:table-cell>
          <table:table-cell office:value-type="string">
            <text:p>0</text:p>
          </table:table-cell>
          <table:table-cell office:value-type="string">
            <text:p>0</text:p>
          </table:table-cell>
          <table:table-cell office:value-type="string">
            <text:p>3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uw-api</text:p>
          </table:table-cell>
          <table:table-cell office:value-type="string">
            <text:p>2016-11-02T15:00:23Z</text:p>
          </table:table-cell>
        </table:table-row>
        <table:table-row>
          <table:table-cell office:value-type="string">
            <text:p>uW-mobile-app</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5-03-09T22:15:57Z</text:p>
          </table:table-cell>
          <table:table-cell office:value-type="string">
            <text:p>2015-03-09T22:15:57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ever2ice, jag3773, timjore</text:p>
          </table:table-cell>
          <table:table-cell office:value-type="string">
            <text:p>0</text:p>
          </table:table-cell>
          <table:table-cell office:value-type="string">
            <text:p>0</text:p>
          </table:table-cell>
          <table:table-cell office:value-type="string">
            <text:p>https://github.com/unfoldingWord-dev/uW-mobile-app</text:p>
          </table:table-cell>
          <table:table-cell office:value-type="string">
            <text:p>2016-09-26T09:51:13Z</text:p>
          </table:table-cell>
        </table:table-row>
        <table:table-row>
          <table:table-cell office:value-type="string">
            <text:p>dokuwiki-to-rc</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9-29T23:38:30Z</text:p>
          </table:table-cell>
          <table:table-cell office:value-type="string">
            <text:p>2016-12-20T20:45:22Z</text:p>
          </table:table-cell>
          <table:table-cell office:value-type="string">
            <text:p/>
          </table:table-cell>
          <table:table-cell office:value-type="string">
            <text:p>1</text:p>
          </table:table-cell>
          <table:table-cell office:value-type="string">
            <text:p>1</text:p>
          </table:table-cell>
          <table:table-cell office:value-type="string">
            <text:p>1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text:p>
          </table:table-cell>
          <table:table-cell office:value-type="string">
            <text:p>0</text:p>
          </table:table-cell>
          <table:table-cell office:value-type="string">
            <text:p>0</text:p>
          </table:table-cell>
          <table:table-cell office:value-type="string">
            <text:p>https://github.com/unfoldingWord-dev/dokuwiki-to-rc</text:p>
          </table:table-cell>
          <table:table-cell office:value-type="string">
            <text:p>2016-09-24T19:55:06Z</text:p>
          </table:table-cell>
        </table:table-row>
        <table:table-row>
          <table:table-cell office:value-type="string">
            <text:p>tx-webhook-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1-18T18:00:19Z</text:p>
          </table:table-cell>
          <table:table-cell office:value-type="string">
            <text:p>2017-01-18T18:00:15Z</text:p>
          </table:table-cell>
          <table:table-cell office:value-type="string">
            <text:p/>
          </table:table-cell>
          <table:table-cell office:value-type="string">
            <text:p>0</text:p>
          </table:table-cell>
          <table:table-cell office:value-type="string">
            <text:p>0</text:p>
          </table:table-cell>
          <table:table-cell office:value-type="string">
            <text:p>4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Gogs, Phil Hopper, phillip-hopper</text:p>
          </table:table-cell>
          <table:table-cell office:value-type="string">
            <text:p>0</text:p>
          </table:table-cell>
          <table:table-cell office:value-type="string">
            <text:p>0</text:p>
          </table:table-cell>
          <table:table-cell office:value-type="string">
            <text:p>https://github.com/unfoldingWord-dev/tx-webhook-client</text:p>
          </table:table-cell>
          <table:table-cell office:value-type="string">
            <text:p>2016-09-22T16:25:43Z</text:p>
          </table:table-cell>
        </table:table-row>
        <table:table-row>
          <table:table-cell office:value-type="string">
            <text:p>tx-shared-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1-18T14:19:33Z</text:p>
          </table:table-cell>
          <table:table-cell office:value-type="string">
            <text:p>2017-01-18T14:19:20Z</text:p>
          </table:table-cell>
          <table:table-cell office:value-type="string">
            <text:p/>
          </table:table-cell>
          <table:table-cell office:value-type="string">
            <text:p>0</text:p>
          </table:table-cell>
          <table:table-cell office:value-type="string">
            <text:p>0</text:p>
          </table:table-cell>
          <table:table-cell office:value-type="string">
            <text:p>8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ethantkoenig, Phil Hopper, Gogs, bspidel, phillip-hopper</text:p>
          </table:table-cell>
          <table:table-cell office:value-type="string">
            <text:p>0</text:p>
          </table:table-cell>
          <table:table-cell office:value-type="string">
            <text:p>0</text:p>
          </table:table-cell>
          <table:table-cell office:value-type="string">
            <text:p>https://github.com/unfoldingWord-dev/tx-shared-tools</text:p>
          </table:table-cell>
          <table:table-cell office:value-type="string">
            <text:p>2016-09-06T13:14:39Z</text:p>
          </table:table-cell>
        </table:table-row>
        <table:table-row>
          <table:table-cell office:value-type="string">
            <text:p>android-door43-client</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05T23:50:09Z</text:p>
          </table:table-cell>
          <table:table-cell office:value-type="string">
            <text:p>2017-04-05T23:50:01Z</text:p>
          </table:table-cell>
          <table:table-cell office:value-type="string">
            <text:p/>
          </table:table-cell>
          <table:table-cell office:value-type="string">
            <text:p>0</text:p>
          </table:table-cell>
          <table:table-cell office:value-type="string">
            <text:p>0</text:p>
          </table:table-cell>
          <table:table-cell office:value-type="string">
            <text:p>22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andreradroid</text:p>
          </table:table-cell>
          <table:table-cell office:value-type="string">
            <text:p>0</text:p>
          </table:table-cell>
          <table:table-cell office:value-type="string">
            <text:p>0</text:p>
          </table:table-cell>
          <table:table-cell office:value-type="string">
            <text:p>https://github.com/unfoldingWord-dev/android-door43-client</text:p>
          </table:table-cell>
          <table:table-cell office:value-type="string">
            <text:p>2016-08-30T17:57:37Z</text:p>
          </table:table-cell>
        </table:table-row>
        <table:table-row>
          <table:table-cell office:value-type="string">
            <text:p>uw-publisher</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5-08-29T05:28:04Z</text:p>
          </table:table-cell>
          <table:table-cell office:value-type="string">
            <text:p>2015-08-29T05:28:03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codemis</text:p>
          </table:table-cell>
          <table:table-cell office:value-type="string">
            <text:p>0</text:p>
          </table:table-cell>
          <table:table-cell office:value-type="string">
            <text:p>0</text:p>
          </table:table-cell>
          <table:table-cell office:value-type="string">
            <text:p>https://github.com/unfoldingWord-dev/uw-publisher</text:p>
          </table:table-cell>
          <table:table-cell office:value-type="string">
            <text:p>2016-08-30T09:37:59Z</text:p>
          </table:table-cell>
        </table:table-row>
        <table:table-row>
          <table:table-cell office:value-type="string">
            <text:p>obs_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6-04T11:48:14Z</text:p>
          </table:table-cell>
          <table:table-cell office:value-type="string">
            <text:p>2016-12-20T14:11:44Z</text:p>
          </table:table-cell>
          <table:table-cell office:value-type="string">
            <text:p/>
          </table:table-cell>
          <table:table-cell office:value-type="string">
            <text:p>0</text:p>
          </table:table-cell>
          <table:table-cell office:value-type="string">
            <text:p>0</text:p>
          </table:table-cell>
          <table:table-cell office:value-type="string">
            <text:p>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obs_tools</text:p>
          </table:table-cell>
          <table:table-cell office:value-type="string">
            <text:p>2016-08-29T19:48:09Z</text:p>
          </table:table-cell>
        </table:table-row>
        <table:table-row>
          <table:table-cell office:value-type="string">
            <text:p>node-door43-rc</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8-30T17:28:52Z</text:p>
          </table:table-cell>
          <table:table-cell office:value-type="string">
            <text:p>2016-08-30T17:28:49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oor43-rc</text:p>
          </table:table-cell>
          <table:table-cell office:value-type="string">
            <text:p>True</text:p>
          </table:table-cell>
          <table:table-cell office:value-type="string">
            <text:p>1535</text:p>
          </table:table-cell>
          <table:table-cell office:value-type="string">
            <text:p>2016-09-01T18:35:44.393Z</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door43-rc</text:p>
          </table:table-cell>
          <table:table-cell office:value-type="string">
            <text:p>2016-08-25T18:39:16Z</text:p>
          </table:table-cell>
        </table:table-row>
        <table:table-row>
          <table:table-cell office:value-type="string">
            <text:p>ExampleCheckingApp-tC</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6-08-15T16:27:50Z</text:p>
          </table:table-cell>
          <table:table-cell office:value-type="string">
            <text:p>2016-08-15T16:27:50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ExampleCheckingApp-tC</text:p>
          </table:table-cell>
          <table:table-cell office:value-type="string">
            <text:p>2016-08-15T16:27:49Z</text:p>
          </table:table-cell>
        </table:table-row>
        <table:table-row>
          <table:table-cell office:value-type="string">
            <text:p>translationWords-tC</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6-08-15T19:12:57Z</text:p>
          </table:table-cell>
          <table:table-cell office:value-type="string">
            <text:p>2016-08-15T16:26:13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Words-tC</text:p>
          </table:table-cell>
          <table:table-cell office:value-type="string">
            <text:p>2016-08-15T16:26:26Z</text:p>
          </table:table-cell>
        </table:table-row>
        <table:table-row>
          <table:table-cell office:value-type="string">
            <text:p>tx-webhook</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09-06T19:14:09Z</text:p>
          </table:table-cell>
          <table:table-cell office:value-type="string">
            <text:p>2016-09-06T19:13:03Z</text:p>
          </table:table-cell>
          <table:table-cell office:value-type="string">
            <text:p/>
          </table:table-cell>
          <table:table-cell office:value-type="string">
            <text:p>0</text:p>
          </table:table-cell>
          <table:table-cell office:value-type="string">
            <text:p>0</text:p>
          </table:table-cell>
          <table:table-cell office:value-type="string">
            <text:p>16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Test, richmahn, Richard Mahn, bspidel, jag3773</text:p>
          </table:table-cell>
          <table:table-cell office:value-type="string">
            <text:p>0</text:p>
          </table:table-cell>
          <table:table-cell office:value-type="string">
            <text:p>0</text:p>
          </table:table-cell>
          <table:table-cell office:value-type="string">
            <text:p>https://github.com/unfoldingWord-dev/tx-webhook</text:p>
          </table:table-cell>
          <table:table-cell office:value-type="string">
            <text:p>2016-08-08T20:49:12Z</text:p>
          </table:table-cell>
        </table:table-row>
        <table:table-row>
          <table:table-cell office:value-type="string">
            <text:p>android-task-manag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3-21T21:14:27Z</text:p>
          </table:table-cell>
          <table:table-cell office:value-type="string">
            <text:p>2017-03-21T21:14:14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task-manager</text:p>
          </table:table-cell>
          <table:table-cell office:value-type="string">
            <text:p>2016-06-15T00:18:45Z</text:p>
          </table:table-cell>
        </table:table-row>
        <table:table-row>
          <table:table-cell office:value-type="string">
            <text:p>pi-collab</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5-05-24T20:40:08Z</text:p>
          </table:table-cell>
          <table:table-cell office:value-type="string">
            <text:p>2015-05-24T20:40:01Z</text:p>
          </table:table-cell>
          <table:table-cell office:value-type="string">
            <text:p/>
          </table:table-cell>
          <table:table-cell office:value-type="string">
            <text:p>3</text:p>
          </table:table-cell>
          <table:table-cell office:value-type="string">
            <text:p>0</text:p>
          </table:table-cell>
          <table:table-cell office:value-type="string">
            <text:p>3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nutsenm, Jesse A. Griffin, jag3773, Shay Hayes</text:p>
          </table:table-cell>
          <table:table-cell office:value-type="string">
            <text:p>0</text:p>
          </table:table-cell>
          <table:table-cell office:value-type="string">
            <text:p>0</text:p>
          </table:table-cell>
          <table:table-cell office:value-type="string">
            <text:p>https://github.com/unfoldingWord-dev/pi-collab</text:p>
          </table:table-cell>
          <table:table-cell office:value-type="string">
            <text:p>2016-04-22T10:55:48Z</text:p>
          </table:table-cell>
        </table:table-row>
        <table:table-row>
          <table:table-cell office:value-type="string">
            <text:p>go-gogs-client</text:p>
          </table:table-cell>
          <table:table-cell office:value-type="string">
            <text:p>unfoldingWord-dev</text:p>
          </table:table-cell>
          <table:table-cell office:value-type="string">
            <text:p>Go</text:p>
          </table:table-cell>
          <table:table-cell office:value-type="string">
            <text:p>False</text:p>
          </table:table-cell>
          <table:table-cell office:value-type="string">
            <text:p>True</text:p>
          </table:table-cell>
          <table:table-cell office:value-type="string">
            <text:p>2016-09-22T23:17:57Z</text:p>
          </table:table-cell>
          <table:table-cell office:value-type="string">
            <text:p>2016-08-30T18:12:39Z</text:p>
          </table:table-cell>
          <table:table-cell office:value-type="string">
            <text:p/>
          </table:table-cell>
          <table:table-cell office:value-type="string">
            <text:p>0</text:p>
          </table:table-cell>
          <table:table-cell office:value-type="string">
            <text:p>0</text:p>
          </table:table-cell>
          <table:table-cell office:value-type="string">
            <text:p>8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go-gogs-client</text:p>
          </table:table-cell>
          <table:table-cell office:value-type="string">
            <text:p>unknwon, Richard Mahn, lstahlman, sapk, roblabla, iwanbk, kmadel, richmahn, rubenv, xmonader, compressed, Josh Frye, bkcsoft</text:p>
          </table:table-cell>
          <table:table-cell office:value-type="string">
            <text:p>0</text:p>
          </table:table-cell>
          <table:table-cell office:value-type="string">
            <text:p>0</text:p>
          </table:table-cell>
          <table:table-cell office:value-type="string">
            <text:p>https://github.com/unfoldingWord-dev/go-gogs-client</text:p>
          </table:table-cell>
          <table:table-cell office:value-type="string">
            <text:p>2016-04-11T22:10:33Z</text:p>
          </table:table-cell>
        </table:table-row>
        <table:table-row>
          <table:table-cell office:value-type="string">
            <text:p>dw-gitcommit</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6-04-08T17:34:08Z</text:p>
          </table:table-cell>
          <table:table-cell office:value-type="string">
            <text:p>2016-04-08T17:34:07Z</text:p>
          </table:table-cell>
          <table:table-cell office:value-type="string">
            <text:p/>
          </table:table-cell>
          <table:table-cell office:value-type="string">
            <text:p>0</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woolfg, danny0838, root, richmahn, birkirb, Dave Pearce</text:p>
          </table:table-cell>
          <table:table-cell office:value-type="string">
            <text:p>0</text:p>
          </table:table-cell>
          <table:table-cell office:value-type="string">
            <text:p>0</text:p>
          </table:table-cell>
          <table:table-cell office:value-type="string">
            <text:p>https://github.com/unfoldingWord-dev/dw-gitcommit</text:p>
          </table:table-cell>
          <table:table-cell office:value-type="string">
            <text:p>2016-04-08T13:55:39Z</text:p>
          </table:table-cell>
        </table:table-row>
        <table:table-row>
          <table:table-cell office:value-type="string">
            <text:p>flask-github-webhook</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6-04-01T16:14:45Z</text:p>
          </table:table-cell>
          <table:table-cell office:value-type="string">
            <text:p>2016-04-01T16:14:44Z</text:p>
          </table:table-cell>
          <table:table-cell office:value-type="string">
            <text:p/>
          </table:table-cell>
          <table:table-cell office:value-type="string">
            <text:p>1</text:p>
          </table:table-cell>
          <table:table-cell office:value-type="string">
            <text:p>0</text:p>
          </table:table-cell>
          <table:table-cell office:value-type="string">
            <text:p>3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azius/github-webhook-handler</text:p>
          </table:table-cell>
          <table:table-cell office:value-type="string">
            <text:p>razius, kcirtapw, root, Jesse A. Griffin, blha303, richmahn</text:p>
          </table:table-cell>
          <table:table-cell office:value-type="string">
            <text:p>0</text:p>
          </table:table-cell>
          <table:table-cell office:value-type="string">
            <text:p>0</text:p>
          </table:table-cell>
          <table:table-cell office:value-type="string">
            <text:p>https://github.com/unfoldingWord-dev/flask-github-webhook</text:p>
          </table:table-cell>
          <table:table-cell office:value-type="string">
            <text:p>2016-04-01T16:14:45Z</text:p>
          </table:table-cell>
        </table:table-row>
        <table:table-row>
          <table:table-cell office:value-type="string">
            <text:p>android-logg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19T22:57:41Z</text:p>
          </table:table-cell>
          <table:table-cell office:value-type="string">
            <text:p>2017-04-19T22:57:33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sarabia</text:p>
          </table:table-cell>
          <table:table-cell office:value-type="string">
            <text:p>0</text:p>
          </table:table-cell>
          <table:table-cell office:value-type="string">
            <text:p>0</text:p>
          </table:table-cell>
          <table:table-cell office:value-type="string">
            <text:p>https://github.com/unfoldingWord-dev/android-logger</text:p>
          </table:table-cell>
          <table:table-cell office:value-type="string">
            <text:p>2016-02-27T02:27:42Z</text:p>
          </table:table-cell>
        </table:table-row>
        <table:table-row>
          <table:table-cell office:value-type="string">
            <text:p>s3_list-zip</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2-19T22:47:48Z</text:p>
          </table:table-cell>
          <table:table-cell office:value-type="string">
            <text:p>2016-02-19T22:47:37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odemis</text:p>
          </table:table-cell>
          <table:table-cell office:value-type="string">
            <text:p>0</text:p>
          </table:table-cell>
          <table:table-cell office:value-type="string">
            <text:p>0</text:p>
          </table:table-cell>
          <table:table-cell office:value-type="string">
            <text:p>https://github.com/unfoldingWord-dev/s3_list-zip</text:p>
          </table:table-cell>
          <table:table-cell office:value-type="string">
            <text:p>2016-02-19T21:11:59Z</text:p>
          </table:table-cell>
        </table:table-row>
        <table:table-row>
          <table:table-cell office:value-type="string">
            <text:p>dokuwiki-enhancedindex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6-01-15T12:01:11Z</text:p>
          </table:table-cell>
          <table:table-cell office:value-type="string">
            <text:p>2016-01-15T12:01:04Z</text:p>
          </table:table-cell>
          <table:table-cell office:value-type="string">
            <text:p/>
          </table:table-cell>
          <table:table-cell office:value-type="string">
            <text:p>0</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superdav42, Phil Hopper, jag3773</text:p>
          </table:table-cell>
          <table:table-cell office:value-type="string">
            <text:p>0</text:p>
          </table:table-cell>
          <table:table-cell office:value-type="string">
            <text:p>0</text:p>
          </table:table-cell>
          <table:table-cell office:value-type="string">
            <text:p>https://github.com/unfoldingWord-dev/dokuwiki-enhancedindexer</text:p>
          </table:table-cell>
          <table:table-cell office:value-type="string">
            <text:p>2016-01-14T18:53:56Z</text:p>
          </table:table-cell>
        </table:table-row>
        <table:table-row>
          <table:table-cell office:value-type="string">
            <text:p>pagequery</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5-06-22T18:41:28Z</text:p>
          </table:table-cell>
          <table:table-cell office:value-type="string">
            <text:p>2015-06-22T18:41:23Z</text:p>
          </table:table-cell>
          <table:table-cell office:value-type="string">
            <text:p/>
          </table:table-cell>
          <table:table-cell office:value-type="string">
            <text:p>0</text:p>
          </table:table-cell>
          <table:table-cell office:value-type="string">
            <text:p>0</text:p>
          </table:table-cell>
          <table:table-cell office:value-type="string">
            <text:p>6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pagequery</text:p>
          </table:table-cell>
          <table:table-cell office:value-type="string">
            <text:p>MrBertie, superdav42, gamma, mprins, glensc, topical, sawachan</text:p>
          </table:table-cell>
          <table:table-cell office:value-type="string">
            <text:p>0</text:p>
          </table:table-cell>
          <table:table-cell office:value-type="string">
            <text:p>0</text:p>
          </table:table-cell>
          <table:table-cell office:value-type="string">
            <text:p>https://github.com/unfoldingWord-dev/pagequery</text:p>
          </table:table-cell>
          <table:table-cell office:value-type="string">
            <text:p>2015-12-11T18:59:22Z</text:p>
          </table:table-cell>
        </table:table-row>
        <table:table-row>
          <table:table-cell office:value-type="string">
            <text:p>uW-Bible-Map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11-18T15:24:04Z</text:p>
          </table:table-cell>
          <table:table-cell office:value-type="string">
            <text:p/>
          </table:table-cell>
          <table:table-cell office:value-type="string">
            <text:p/>
          </table:table-cell>
          <table:table-cell office:value-type="string">
            <text:p>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dev/uW-Bible-Maps</text:p>
          </table:table-cell>
          <table:table-cell office:value-type="string">
            <text:p>2015-11-18T15:24:04Z</text:p>
          </table:table-cell>
        </table:table-row>
        <table:table-row>
          <table:table-cell office:value-type="string">
            <text:p>tr-requiremen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06-24T21:33:04Z</text:p>
          </table:table-cell>
          <table:table-cell office:value-type="string">
            <text:p>2015-06-24T21:33:02Z</text:p>
          </table:table-cell>
          <table:table-cell office:value-type="string">
            <text:p/>
          </table:table-cell>
          <table:table-cell office:value-type="string">
            <text:p>3</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jag3773</text:p>
          </table:table-cell>
          <table:table-cell office:value-type="string">
            <text:p>0</text:p>
          </table:table-cell>
          <table:table-cell office:value-type="string">
            <text:p>0</text:p>
          </table:table-cell>
          <table:table-cell office:value-type="string">
            <text:p>https://github.com/unfoldingWord-dev/tr-requirements</text:p>
          </table:table-cell>
          <table:table-cell office:value-type="string">
            <text:p>2015-06-24T21:29:18Z</text:p>
          </table:table-cell>
        </table:table-row>
        <table:table-row>
          <table:table-cell office:value-type="string">
            <text:p>nsmsg</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2-24T19:58:22Z</text:p>
          </table:table-cell>
          <table:table-cell office:value-type="string">
            <text:p>2015-02-24T19:55:32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vonnel098</text:p>
          </table:table-cell>
          <table:table-cell office:value-type="string">
            <text:p>0</text:p>
          </table:table-cell>
          <table:table-cell office:value-type="string">
            <text:p>0</text:p>
          </table:table-cell>
          <table:table-cell office:value-type="string">
            <text:p>https://github.com/unfoldingWord-dev/nsmsg</text:p>
          </table:table-cell>
          <table:table-cell office:value-type="string">
            <text:p>2015-06-23T21:40:04Z</text:p>
          </table:table-cell>
        </table:table-row>
        <table:table-row>
          <table:table-cell office:value-type="string">
            <text:p>ts-expor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6-13T20:29:55Z</text:p>
          </table:table-cell>
          <table:table-cell office:value-type="string">
            <text:p>2014-06-13T20:29:49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dev/ts-exports</text:p>
          </table:table-cell>
          <table:table-cell office:value-type="string">
            <text:p>2015-06-23T21:38:46Z</text:p>
          </table:table-cell>
        </table:table-row>
        <table:table-row>
          <table:table-cell office:value-type="string">
            <text:p>expor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8-05T19:30:09Z</text:p>
          </table:table-cell>
          <table:table-cell office:value-type="string">
            <text:p>2014-08-05T19:30:05Z</text:p>
          </table:table-cell>
          <table:table-cell office:value-type="string">
            <text:p/>
          </table:table-cell>
          <table:table-cell office:value-type="string">
            <text:p>0</text:p>
          </table:table-cell>
          <table:table-cell office:value-type="string">
            <text:p>0</text:p>
          </table:table-cell>
          <table:table-cell office:value-type="string">
            <text:p>78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smedia, root</text:p>
          </table:table-cell>
          <table:table-cell office:value-type="string">
            <text:p>0</text:p>
          </table:table-cell>
          <table:table-cell office:value-type="string">
            <text:p>0</text:p>
          </table:table-cell>
          <table:table-cell office:value-type="string">
            <text:p>https://github.com/unfoldingWord-dev/exports</text:p>
          </table:table-cell>
          <table:table-cell office:value-type="string">
            <text:p>2015-06-23T21:38:19Z</text:p>
          </table:table-cell>
        </table:table-row>
        <table:table-row>
          <table:table-cell office:value-type="string">
            <text:p>media</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7-28T19:30:07Z</text:p>
          </table:table-cell>
          <table:table-cell office:value-type="string">
            <text:p>2014-07-28T19:30:04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istant Shores Media, root</text:p>
          </table:table-cell>
          <table:table-cell office:value-type="string">
            <text:p>0</text:p>
          </table:table-cell>
          <table:table-cell office:value-type="string">
            <text:p>0</text:p>
          </table:table-cell>
          <table:table-cell office:value-type="string">
            <text:p>https://github.com/unfoldingWord-dev/media</text:p>
          </table:table-cell>
          <table:table-cell office:value-type="string">
            <text:p>2015-06-23T21:37:51Z</text:p>
          </table:table-cell>
        </table:table-row>
        <table:table-row>
          <table:table-cell office:value-type="string">
            <text:p>dokuwiki-plugin-translation</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5-06-16T20:44:56Z</text:p>
          </table:table-cell>
          <table:table-cell office:value-type="string">
            <text:p>2015-06-16T20:44:54Z</text:p>
          </table:table-cell>
          <table:table-cell office:value-type="string">
            <text:p/>
          </table:table-cell>
          <table:table-cell office:value-type="string">
            <text:p>0</text:p>
          </table:table-cell>
          <table:table-cell office:value-type="string">
            <text:p>0</text:p>
          </table:table-cell>
          <table:table-cell office:value-type="string">
            <text:p>15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plitbrain/dokuwiki-plugin-translation</text:p>
          </table:table-cell>
          <table:table-cell office: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text:p>0</text:p>
          </table:table-cell>
          <table:table-cell office:value-type="string">
            <text:p>0</text:p>
          </table:table-cell>
          <table:table-cell office:value-type="string">
            <text:p>https://github.com/unfoldingWord-dev/dokuwiki-plugin-translation</text:p>
          </table:table-cell>
          <table:table-cell office:value-type="string">
            <text:p>2015-06-23T19:08:59Z</text:p>
          </table:table-cell>
        </table:table-row>
        <table:table-row>
          <table:table-cell office:value-type="string">
            <text:p>dokuwiki-usfm-import</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11T18:33:11Z</text:p>
          </table:table-cell>
          <table:table-cell office:value-type="string">
            <text:p>2015-05-11T18:31:01Z</text:p>
          </table:table-cell>
          <table:table-cell office:value-type="string">
            <text:p/>
          </table:table-cell>
          <table:table-cell office:value-type="string">
            <text:p>4</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vonnel098</text:p>
          </table:table-cell>
          <table:table-cell office:value-type="string">
            <text:p>0</text:p>
          </table:table-cell>
          <table:table-cell office:value-type="string">
            <text:p>0</text:p>
          </table:table-cell>
          <table:table-cell office:value-type="string">
            <text:p>https://github.com/unfoldingWord-dev/dokuwiki-usfm-import</text:p>
          </table:table-cell>
          <table:table-cell office:value-type="string">
            <text:p>2015-06-23T19:07:28Z</text:p>
          </table:table-cell>
        </table:table-row>
        <table:table-row>
          <table:table-cell office:value-type="string">
            <text:p>dokuwiki-plugin-obs</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23T18:35:18Z</text:p>
          </table:table-cell>
          <table:table-cell office:value-type="string">
            <text:p>2015-05-23T18:26:14Z</text:p>
          </table:table-cell>
          <table:table-cell office:value-type="string">
            <text:p/>
          </table:table-cell>
          <table:table-cell office:value-type="string">
            <text:p>0</text:p>
          </table:table-cell>
          <table:table-cell office:value-type="string">
            <text:p>0</text:p>
          </table:table-cell>
          <table:table-cell office:value-type="string">
            <text:p>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Jesse A. Griffin, Apache</text:p>
          </table:table-cell>
          <table:table-cell office:value-type="string">
            <text:p>0</text:p>
          </table:table-cell>
          <table:table-cell office:value-type="string">
            <text:p>0</text:p>
          </table:table-cell>
          <table:table-cell office:value-type="string">
            <text:p>https://github.com/unfoldingWord-dev/dokuwiki-plugin-obs</text:p>
          </table:table-cell>
          <table:table-cell office:value-type="string">
            <text:p>2015-06-23T18:57:35Z</text:p>
          </table:table-cell>
        </table:table-row>
        <table:table-row>
          <table:table-cell office:value-type="string">
            <text:p>dokuwiki-plugin-shared</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10T19:50:16Z</text:p>
          </table:table-cell>
          <table:table-cell office:value-type="string">
            <text:p>2015-06-10T19:50:15Z</text:p>
          </table:table-cell>
          <table:table-cell office:value-type="string">
            <text:p/>
          </table:table-cell>
          <table:table-cell office:value-type="string">
            <text:p>0</text:p>
          </table:table-cell>
          <table:table-cell office:value-type="string">
            <text:p>0</text:p>
          </table:table-cell>
          <table:table-cell office:value-type="string">
            <text:p>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text:p>
          </table:table-cell>
          <table:table-cell office:value-type="string">
            <text:p>0</text:p>
          </table:table-cell>
          <table:table-cell office:value-type="string">
            <text:p>0</text:p>
          </table:table-cell>
          <table:table-cell office:value-type="string">
            <text:p>https://github.com/unfoldingWord-dev/dokuwiki-plugin-shared</text:p>
          </table:table-cell>
          <table:table-cell office:value-type="string">
            <text:p>2015-06-04T20:09:16Z</text:p>
          </table:table-cell>
        </table:table-row>
        <table:table-row>
          <table:table-cell office:value-type="string">
            <text:p>dokuwiki-obs-compar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23T01:03:31Z</text:p>
          </table:table-cell>
          <table:table-cell office:value-type="string">
            <text:p>2015-06-02T01:42:21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okuwiki-obs-comparer</text:p>
          </table:table-cell>
          <table:table-cell office:value-type="string">
            <text:p>2015-05-29T18:20:26Z</text:p>
          </table:table-cell>
        </table:table-row>
        <table:table-row>
          <table:table-cell office:value-type="string">
            <text:p>dw-zipodt</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05-28T21:07:47Z</text:p>
          </table:table-cell>
          <table:table-cell office:value-type="string">
            <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dev/dw-zipodt</text:p>
          </table:table-cell>
          <table:table-cell office:value-type="string">
            <text:p>2015-05-28T21:07:46Z</text:p>
          </table:table-cell>
        </table:table-row>
        <table:table-row>
          <table:table-cell office:value-type="string">
            <text:p>dokuwiki-plugin-obs-review</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10T19:51:00Z</text:p>
          </table:table-cell>
          <table:table-cell office:value-type="string">
            <text:p>2015-06-10T19:50:59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obs-review</text:p>
          </table:table-cell>
          <table:table-cell office:value-type="string">
            <text:p>2015-04-13T19:33:48Z</text:p>
          </table:table-cell>
        </table:table-row>
        <table:table-row>
          <table:table-cell office:value-type="string">
            <text:p>obs-compar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4-11T06:23:30Z</text:p>
          </table:table-cell>
          <table:table-cell office:value-type="string">
            <text:p>2015-04-11T06:23:34Z</text:p>
          </table:table-cell>
          <table:table-cell office:value-type="string">
            <text:p/>
          </table:table-cell>
          <table:table-cell office:value-type="string">
            <text:p>1</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obs-comparer</text:p>
          </table:table-cell>
          <table:table-cell office:value-type="string">
            <text:p>2015-04-11T06:23:30Z</text:p>
          </table:table-cell>
        </table:table-row>
        <table:table-row>
          <table:table-cell office:value-type="string">
            <text:p>sigadd</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5-04-01T22:00:27Z</text:p>
          </table:table-cell>
          <table:table-cell office:value-type="string">
            <text:p>2015-04-01T22:00:25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esse A. Griffin, root</text:p>
          </table:table-cell>
          <table:table-cell office:value-type="string">
            <text:p>0</text:p>
          </table:table-cell>
          <table:table-cell office:value-type="string">
            <text:p>0</text:p>
          </table:table-cell>
          <table:table-cell office:value-type="string">
            <text:p>https://github.com/unfoldingWord-dev/sigadd</text:p>
          </table:table-cell>
          <table:table-cell office:value-type="string">
            <text:p>2015-04-01T22:00:28Z</text:p>
          </table:table-cell>
        </table:table-row>
        <table:table-row>
          <table:table-cell office:value-type="string">
            <text:p>dokuwiki-plugin-obs-audio-upload</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5-05-23T17:13:24Z</text:p>
          </table:table-cell>
          <table:table-cell office:value-type="string">
            <text:p>2015-05-23T17:13:23Z</text:p>
          </table:table-cell>
          <table:table-cell office:value-type="string">
            <text:p/>
          </table:table-cell>
          <table:table-cell office:value-type="string">
            <text:p>3</text:p>
          </table:table-cell>
          <table:table-cell office:value-type="string">
            <text:p>0</text:p>
          </table:table-cell>
          <table:table-cell office:value-type="string">
            <text:p>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obs-audio-upload</text:p>
          </table:table-cell>
          <table:table-cell office:value-type="string">
            <text:p>2015-03-19T19:30:11Z</text:p>
          </table:table-cell>
        </table:table-row>
        <table:table-row>
          <table:table-cell office:value-type="string">
            <text:p>dokuwiki-plugin-regist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23T16:59:10Z</text:p>
          </table:table-cell>
          <table:table-cell office:value-type="string">
            <text:p>2015-05-23T16:59:09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register</text:p>
          </table:table-cell>
          <table:table-cell office:value-type="string">
            <text:p>2015-03-12T19:17:46Z</text:p>
          </table:table-cell>
        </table:table-row>
        <table:table-row>
          <table:table-cell office:value-type="string">
            <text:p>obs-reader</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5-09-24T19:15:38Z</text:p>
          </table:table-cell>
          <table:table-cell office:value-type="string">
            <text:p>2015-09-24T19:15:36Z</text:p>
          </table:table-cell>
          <table:table-cell office:value-type="string">
            <text:p/>
          </table:table-cell>
          <table:table-cell office:value-type="string">
            <text:p>0</text:p>
          </table:table-cell>
          <table:table-cell office:value-type="string">
            <text:p>0</text:p>
          </table:table-cell>
          <table:table-cell office:value-type="string">
            <text:p>1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ewmanr19, jag3773, phillip-hopper, root, Phil Hopper</text:p>
          </table:table-cell>
          <table:table-cell office:value-type="string">
            <text:p>0</text:p>
          </table:table-cell>
          <table:table-cell office:value-type="string">
            <text:p>0</text:p>
          </table:table-cell>
          <table:table-cell office:value-type="string">
            <text:p>https://github.com/unfoldingWord-dev/obs-reader</text:p>
          </table:table-cell>
          <table:table-cell office:value-type="string">
            <text:p>2015-03-09T22:06:24Z</text:p>
          </table:table-cell>
        </table:table-row>
        <table:table-row>
          <table:table-cell office:value-type="string">
            <text:p>RepoLis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True</text:p>
          </table:table-cell>
          <table:table-cell office:value-type="string">
            <text:p>2026-06-23T11:58:36Z</text:p>
          </table:table-cell>
          <table:table-cell office:value-type="string">
            <text:p>2026-06-23T11:58:34Z</text:p>
          </table:table-cell>
          <table:table-cell office:value-type="string">
            <text:p/>
          </table:table-cell>
          <table:table-cell office:value-type="string">
            <text:p>0</text:p>
          </table:table-cell>
          <table:table-cell office:value-type="string">
            <text:p>0</text:p>
          </table:table-cell>
          <table:table-cell office:value-type="string">
            <text:p>9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RepoList</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RepoList</text:p>
          </table:table-cell>
          <table:table-cell office:value-type="string">
            <text:p>2026-06-23T11:58:40Z</text:p>
          </table:table-cell>
        </table:table-row>
        <table:table-row>
          <table:table-cell office:value-type="string">
            <text:p>admin-app-old</text:p>
          </table:table-cell>
          <table:table-cell office:value-type="string">
            <text:p>unfoldingWord-box3</text:p>
          </table:table-cell>
          <table:table-cell office:value-type="string">
            <text:p>JavaScript</text:p>
          </table:table-cell>
          <table:table-cell office:value-type="string">
            <text:p>True</text:p>
          </table:table-cell>
          <table:table-cell office:value-type="string">
            <text:p>True</text:p>
          </table:table-cell>
          <table:table-cell office:value-type="string">
            <text:p>2021-03-10T14:23:06Z</text:p>
          </table:table-cell>
          <table:table-cell office:value-type="string">
            <text:p>2021-03-09T18:47:30Z</text:p>
          </table:table-cell>
          <table:table-cell office:value-type="string">
            <text:p/>
          </table:table-cell>
          <table:table-cell office:value-type="string">
            <text:p>0</text:p>
          </table:table-cell>
          <table:table-cell office:value-type="string">
            <text:p>0</text:p>
          </table:table-cell>
          <table:table-cell office:value-type="string">
            <text:p>239</text:p>
          </table:table-cell>
          <table:table-cell office:value-type="string">
            <text:p/>
          </table:table-cell>
          <table:table-cell office:value-type="string">
            <text:p>create-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ranslation-helps-rcl</text:p>
          </table:table-cell>
          <table:table-cell office:value-type="string">
            <text:p>unfoldingWord/gateway-edit</text:p>
          </table:table-cell>
          <table:table-cell office:value-type="string">
            <text:p>mannycolon, PhotoNomad0, mandolyte</text:p>
          </table:table-cell>
          <table:table-cell office:value-type="string">
            <text:p>0</text:p>
          </table:table-cell>
          <table:table-cell office:value-type="string">
            <text:p>0</text:p>
          </table:table-cell>
          <table:table-cell office:value-type="string">
            <text:p>https://github.com/unfoldingWord-box3/admin-app-old</text:p>
          </table:table-cell>
          <table:table-cell office:value-type="string">
            <text:p>2026-06-22T18:20:15Z</text:p>
          </table:table-cell>
        </table:table-row>
        <table:table-row>
          <table:table-cell office:value-type="string">
            <text:p>wordMAP-mt</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5-11-03T19:05:27Z</text:p>
          </table:table-cell>
          <table:table-cell office:value-type="string">
            <text:p>2025-11-03T19:05:27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wordmap-m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wordmap, wordmap-lexer</text:p>
          </table:table-cell>
          <table:table-cell office:value-type="string">
            <text:p/>
          </table:table-cell>
          <table:table-cell office:value-type="string">
            <text:p>da1nerd, yakob-aleksandrovich</text:p>
          </table:table-cell>
          <table:table-cell office:value-type="string">
            <text:p>0</text:p>
          </table:table-cell>
          <table:table-cell office:value-type="string">
            <text:p>0</text:p>
          </table:table-cell>
          <table:table-cell office:value-type="string">
            <text:p>https://github.com/unfoldingWord-box3/wordMAP-mt</text:p>
          </table:table-cell>
          <table:table-cell office:value-type="string">
            <text:p>2026-06-17T19:27:07Z</text:p>
          </table:table-cell>
        </table:table-row>
        <table:table-row>
          <table:table-cell office:value-type="string">
            <text:p>word-aligner-extension</text:p>
          </table:table-cell>
          <table:table-cell office:value-type="string">
            <text:p>unfoldingWord-box3</text:p>
          </table:table-cell>
          <table:table-cell office:value-type="string">
            <text:p>JavaScript</text:p>
          </table:table-cell>
          <table:table-cell office:value-type="string">
            <text:p>True</text:p>
          </table:table-cell>
          <table:table-cell office:value-type="string">
            <text:p>False</text:p>
          </table:table-cell>
          <table:table-cell office:value-type="string">
            <text:p>2024-01-17T18:59:55Z</text:p>
          </table:table-cell>
          <table:table-cell office:value-type="string">
            <text:p>2024-01-17T18:59:48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word-aligner-react-v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word-aligner-extension</text:p>
          </table:table-cell>
          <table:table-cell office:value-type="string">
            <text:p>2026-06-17T19:22:57Z</text:p>
          </table:table-cell>
        </table:table-row>
        <table:table-row>
          <table:table-cell office:value-type="string">
            <text:p>MultiplatformFrameworks</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2-11-10T17:20:33Z</text:p>
          </table:table-cell>
          <table:table-cell office:value-type="string">
            <text:p>2020-03-16T14:26:24Z</text:p>
          </table:table-cell>
          <table:table-cell office:value-type="string">
            <text:p/>
          </table:table-cell>
          <table:table-cell office:value-type="string">
            <text:p>5</text:p>
          </table:table-cell>
          <table:table-cell office:value-type="string">
            <text:p>5</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MultiplatformFrameworks</text:p>
          </table:table-cell>
          <table:table-cell office:value-type="string">
            <text:p>2025-12-03T19:52:51Z</text:p>
          </table:table-cell>
        </table:table-row>
        <table:table-row>
          <table:table-cell office:value-type="string">
            <text:p>ta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19:01:07Z</text:p>
          </table:table-cell>
          <table:table-cell office:value-type="string">
            <text:p>2025-11-03T19:01:07Z</text:p>
          </table:table-cell>
          <table:table-cell office:value-type="string">
            <text:p/>
          </table:table-cell>
          <table:table-cell office:value-type="string">
            <text:p>24</text:p>
          </table:table-cell>
          <table:table-cell office:value-type="string">
            <text:p>1</text:p>
          </table:table-cell>
          <table:table-cell office:value-type="string">
            <text:p>75</text:p>
          </table:table-cell>
          <table:table-cell office:value-type="string">
            <text:p/>
          </table:table-cell>
          <table:table-cell office:value-type="string">
            <text:p>t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raymoonlight/CRBank, magistrigusti/Dominum_DOM, singhyash05/BitTonica, jubbslineu/contract-test</text:p>
          </table:table-cell>
          <table:table-cell office:value-type="string">
            <text:p>klappy, yakob-aleksandrovich</text:p>
          </table:table-cell>
          <table:table-cell office:value-type="string">
            <text:p>0</text:p>
          </table:table-cell>
          <table:table-cell office:value-type="string">
            <text:p>0</text:p>
          </table:table-cell>
          <table:table-cell office:value-type="string">
            <text:p>https://github.com/unfoldingWord-box3/tact</text:p>
          </table:table-cell>
          <table:table-cell office:value-type="string">
            <text:p>2025-11-03T19:01:10Z</text:p>
          </table:table-cell>
        </table:table-row>
        <table:table-row>
          <table:table-cell office:value-type="string">
            <text:p>checking-extensio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5-10-16T15:12:47Z</text:p>
          </table:table-cell>
          <table:table-cell office:value-type="string">
            <text:p>2025-10-16T15:12:47Z</text:p>
          </table:table-cell>
          <table:table-cell office:value-type="string">
            <text:p/>
          </table:table-cell>
          <table:table-cell office:value-type="string">
            <text:p>2</text:p>
          </table:table-cell>
          <table:table-cell office:value-type="string">
            <text:p>2</text:p>
          </table:table-cell>
          <table:table-cell office:value-type="string">
            <text:p>160</text:p>
          </table:table-cell>
          <table:table-cell office:value-type="string">
            <text:p/>
          </table:table-cell>
          <table:table-cell office:value-type="string">
            <text:p>checking-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string-punctuation-tokenizer, tc-source-content-updater, tsv-groupdata-parser, usfm-js, uw-tsv-parser</text:p>
          </table:table-cell>
          <table:table-cell office:value-type="string">
            <text:p>kintsoogi/translation-notes-extension</text:p>
          </table:table-cell>
          <table:table-cell office:value-type="string">
            <text:p>PhotoNomad0, kintsoogi</text:p>
          </table:table-cell>
          <table:table-cell office:value-type="string">
            <text:p>4</text:p>
          </table:table-cell>
          <table:table-cell office:value-type="string">
            <text:p>66</text:p>
          </table:table-cell>
          <table:table-cell office:value-type="string">
            <text:p>https://github.com/unfoldingWord-box3/checking-extension</text:p>
          </table:table-cell>
          <table:table-cell office:value-type="string">
            <text:p>2025-10-16T15:12:53Z</text:p>
          </table:table-cell>
        </table:table-row>
        <table:table-row>
          <table:table-cell office:value-type="string">
            <text:p>translation-help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5T02:36:16Z</text:p>
          </table:table-cell>
          <table:table-cell office:value-type="string">
            <text:p>2022-11-09T09:01:02Z</text:p>
          </table:table-cell>
          <table:table-cell office:value-type="string">
            <text:p/>
          </table:table-cell>
          <table:table-cell office:value-type="string">
            <text:p>0</text:p>
          </table:table-cell>
          <table:table-cell office:value-type="string">
            <text:p>0</text:p>
          </table:table-cell>
          <table:table-cell office:value-type="string">
            <text:p>212</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klappy, yakob-aleksandrovich</text:p>
          </table:table-cell>
          <table:table-cell office:value-type="string">
            <text:p>1</text:p>
          </table:table-cell>
          <table:table-cell office:value-type="string">
            <text:p>14</text:p>
          </table:table-cell>
          <table:table-cell office:value-type="string">
            <text:p>https://github.com/unfoldingWord-box3/translation-helps</text:p>
          </table:table-cell>
          <table:table-cell office:value-type="string">
            <text:p>2025-10-02T14:12:21Z</text:p>
          </table:table-cell>
        </table:table-row>
        <table:table-row>
          <table:table-cell office:value-type="string">
            <text:p>tq-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7-28T12:54:36Z</text:p>
          </table:table-cell>
          <table:table-cell office:value-type="string">
            <text:p>2025-07-28T12:54:32Z</text:p>
          </table:table-cell>
          <table:table-cell office:value-type="string">
            <text:p/>
          </table:table-cell>
          <table:table-cell office:value-type="string">
            <text:p>6</text:p>
          </table:table-cell>
          <table:table-cell office:value-type="string">
            <text:p>0</text:p>
          </table:table-cell>
          <table:table-cell office:value-type="string">
            <text:p>3</text:p>
          </table:table-cell>
          <table:table-cell office:value-type="string">
            <text:p/>
          </table:table-cell>
          <table:table-cell office:value-type="string">
            <text:p>qa-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tq-app</text:p>
          </table:table-cell>
          <table:table-cell office:value-type="string">
            <text:p>2025-07-30T15:49:01Z</text:p>
          </table:table-cell>
        </table:table-row>
        <table:table-row>
          <table:table-cell office:value-type="string">
            <text:p>desktop-app-template</text:p>
          </table:table-cell>
          <table:table-cell office:value-type="string">
            <text:p>unfoldingWord-box3</text:p>
          </table:table-cell>
          <table:table-cell office:value-type="string">
            <text:p>Shell</text:p>
          </table:table-cell>
          <table:table-cell office:value-type="string">
            <text:p>False</text:p>
          </table:table-cell>
          <table:table-cell office:value-type="string">
            <text:p>True</text:p>
          </table:table-cell>
          <table:table-cell office:value-type="string">
            <text:p>2025-10-29T20:07:04Z</text:p>
          </table:table-cell>
          <table:table-cell office:value-type="string">
            <text:p>2025-07-20T10:57:14Z</text:p>
          </table:table-cell>
          <table:table-cell office:value-type="string">
            <text:p/>
          </table:table-cell>
          <table:table-cell office:value-type="string">
            <text:p>0</text:p>
          </table:table-cell>
          <table:table-cell office:value-type="string">
            <text:p>0</text:p>
          </table:table-cell>
          <table:table-cell office:value-type="string">
            <text:p>14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nkosmia/desktop-app-template</text:p>
          </table:table-cell>
          <table:table-cell office:value-type="string">
            <text:p>RUN-Projects, PhotoNomad0, mcleanb, mvahowe</text:p>
          </table:table-cell>
          <table:table-cell office:value-type="string">
            <text:p>0</text:p>
          </table:table-cell>
          <table:table-cell office:value-type="string">
            <text:p>0</text:p>
          </table:table-cell>
          <table:table-cell office:value-type="string">
            <text:p>https://github.com/unfoldingWord-box3/desktop-app-template</text:p>
          </table:table-cell>
          <table:table-cell office:value-type="string">
            <text:p>2025-07-20T10:57:23Z</text:p>
          </table:table-cell>
        </table:table-row>
        <table:table-row>
          <table:table-cell office:value-type="string">
            <text:p>suggesting-word-aligner</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6-17T13:49:01Z</text:p>
          </table:table-cell>
          <table:table-cell office:value-type="string">
            <text:p>2025-06-17T13:49:01Z</text:p>
          </table:table-cell>
          <table:table-cell office:value-type="string">
            <text:p/>
          </table:table-cell>
          <table:table-cell office:value-type="string">
            <text:p>0</text:p>
          </table:table-cell>
          <table:table-cell office:value-type="string">
            <text:p>0</text:p>
          </table:table-cell>
          <table:table-cell office:value-type="string">
            <text:p>9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alignment-transferer</text:p>
          </table:table-cell>
          <table:table-cell office:value-type="string">
            <text:p>Joshua Lansford, JEdward7777</text:p>
          </table:table-cell>
          <table:table-cell office:value-type="string">
            <text:p>0</text:p>
          </table:table-cell>
          <table:table-cell office:value-type="string">
            <text:p>0</text:p>
          </table:table-cell>
          <table:table-cell office:value-type="string">
            <text:p>https://github.com/unfoldingWord-box3/suggesting-word-aligner</text:p>
          </table:table-cell>
          <table:table-cell office:value-type="string">
            <text:p>2025-06-19T19:45:56Z</text:p>
          </table:table-cell>
        </table:table-row>
        <table:table-row>
          <table:table-cell office:value-type="string">
            <text:p>passage-record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6-11T15:50:11Z</text:p>
          </table:table-cell>
          <table:table-cell office:value-type="string">
            <text:p>2025-06-11T15:49:10Z</text:p>
          </table:table-cell>
          <table:table-cell office:value-type="string">
            <text:p/>
          </table:table-cell>
          <table:table-cell office:value-type="string">
            <text:p>1</text:p>
          </table:table-cell>
          <table:table-cell office:value-type="string">
            <text:p>1</text:p>
          </table:table-cell>
          <table:table-cell office:value-type="string">
            <text:p>10</text:p>
          </table:table-cell>
          <table:table-cell office:value-type="string">
            <text:p/>
          </table:table-cell>
          <table:table-cell office:value-type="string">
            <text:p>scripture-simple-recor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passage-recorder-app</text:p>
          </table:table-cell>
          <table:table-cell office:value-type="string">
            <text:p>2025-06-11T16:03:07Z</text:p>
          </table:table-cell>
        </table:table-row>
        <table:table-row>
          <table:table-cell office:value-type="string">
            <text:p>simple-text-edito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6T21:09:12Z</text:p>
          </table:table-cell>
          <table:table-cell office:value-type="string">
            <text:p>2025-06-06T21:09:10Z</text:p>
          </table:table-cell>
          <table:table-cell office:value-type="string">
            <text:p/>
          </table:table-cell>
          <table:table-cell office:value-type="string">
            <text:p>5</text:p>
          </table:table-cell>
          <table:table-cell office:value-type="string">
            <text:p>1</text:p>
          </table:table-cell>
          <table:table-cell office:value-type="string">
            <text:p>240</text:p>
          </table:table-cell>
          <table:table-cell office:value-type="string">
            <text:p/>
          </table:table-cell>
          <table:table-cell office:value-type="string">
            <text:p>simple-text-editor-rcl</text:p>
          </table:table-cell>
          <table:table-cell office:value-type="string">
            <text:p>False</text:p>
          </table:table-cell>
          <table:table-cell office:value-type="string">
            <text:p>3893</text:p>
          </table:table-cell>
          <table:table-cell office:value-type="string">
            <text:p>2022-06-09T23:15:38.322Z</text:p>
          </table:table-cell>
          <table:table-cell office:value-type="string">
            <text:p>simple-text-editor-app</text:p>
          </table:table-cell>
          <table:table-cell office:value-type="string">
            <text:p>@unfoldingword/eslint-config</text:p>
          </table:table-cell>
          <table:table-cell office:value-type="string">
            <text:p>md-jishan-ansari/Editors, RUN-Collaborations/translatable, klappy/scripture-puzzle-game-poc</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rcl</text:p>
          </table:table-cell>
          <table:table-cell office:value-type="string">
            <text:p>2025-06-06T21:09:14Z</text:p>
          </table:table-cell>
        </table:table-row>
        <table:table-row>
          <table:table-cell office:value-type="string">
            <text:p>desktop-app-limina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7-15T13:09:17Z</text:p>
          </table:table-cell>
          <table:table-cell office:value-type="string">
            <text:p>2025-05-13T00:55:06Z</text:p>
          </table:table-cell>
          <table:table-cell office:value-type="string">
            <text:p/>
          </table:table-cell>
          <table:table-cell office:value-type="string">
            <text:p>2</text:p>
          </table:table-cell>
          <table:table-cell office:value-type="string">
            <text:p>2</text:p>
          </table:table-cell>
          <table:table-cell office:value-type="string">
            <text:p>58</text:p>
          </table:table-cell>
          <table:table-cell office:value-type="string">
            <text:p/>
          </table:table-cell>
          <table:table-cell office:value-type="string">
            <text:p>pankosmia-app-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UN-Projects, mvahowe, PhotoNomad0, yakob-aleksandrovich</text:p>
          </table:table-cell>
          <table:table-cell office:value-type="string">
            <text:p>0</text:p>
          </table:table-cell>
          <table:table-cell office:value-type="string">
            <text:p>0</text:p>
          </table:table-cell>
          <table:table-cell office:value-type="string">
            <text:p>https://github.com/unfoldingWord-box3/desktop-app-liminal</text:p>
          </table:table-cell>
          <table:table-cell office:value-type="string">
            <text:p>2025-05-14T14:59:15Z</text:p>
          </table:table-cell>
        </table:table-row>
        <table:table-row>
          <table:table-cell office:value-type="string">
            <text:p>pankosmia-web</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5-07T12:53:06Z</text:p>
          </table:table-cell>
          <table:table-cell office:value-type="string">
            <text:p>2025-05-04T16:46:45Z</text:p>
          </table:table-cell>
          <table:table-cell office:value-type="string">
            <text:p/>
          </table:table-cell>
          <table:table-cell office:value-type="string">
            <text:p>0</text:p>
          </table:table-cell>
          <table:table-cell office:value-type="string">
            <text:p>0</text:p>
          </table:table-cell>
          <table:table-cell office:value-type="string">
            <text:p>17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nkosmia/pankosmia-web</text:p>
          </table:table-cell>
          <table:table-cell office:value-type="string">
            <text:p>mvahowe, RUN-Projects, lmeline</text:p>
          </table:table-cell>
          <table:table-cell office:value-type="string">
            <text:p>0</text:p>
          </table:table-cell>
          <table:table-cell office:value-type="string">
            <text:p>0</text:p>
          </table:table-cell>
          <table:table-cell office:value-type="string">
            <text:p>https://github.com/unfoldingWord-box3/pankosmia-web</text:p>
          </table:table-cell>
          <table:table-cell office:value-type="string">
            <text:p>2025-05-05T03:19:17Z</text:p>
          </table:table-cell>
        </table:table-row>
        <table:table-row>
          <table:table-cell office:value-type="string">
            <text:p>aquifer-to-dcs</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5-03-29T15:49:00Z</text:p>
          </table:table-cell>
          <table:table-cell office:value-type="string">
            <text:p>2025-03-29T15:48:56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aquifer-to-dcs</text:p>
          </table:table-cell>
          <table:table-cell office:value-type="string">
            <text:p>2025-03-29T15:49:03Z</text:p>
          </table:table-cell>
        </table:table-row>
        <table:table-row>
          <table:table-cell office:value-type="string">
            <text:p>checking-app-theia</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SplitAudioByTex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5-03-06T20:43:08Z</text:p>
          </table:table-cell>
          <table:table-cell office:value-type="string">
            <text:p>2025-03-06T20:43:03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SplitAudioByText</text:p>
          </table:table-cell>
          <table:table-cell office:value-type="string">
            <text:p>2025-03-06T20:43:12Z</text:p>
          </table:table-cell>
        </table:table-row>
        <table:table-row>
          <table:table-cell office:value-type="string">
            <text:p>StableTTS_Editing</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3-07T13:20:53Z</text:p>
          </table:table-cell>
          <table:table-cell office:value-type="string">
            <text:p>2025-03-06T13:50:35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StableTTS_Editing</text:p>
          </table:table-cell>
          <table:table-cell office:value-type="string">
            <text:p>Joshua Lansford, KdaiP</text:p>
          </table:table-cell>
          <table:table-cell office:value-type="string">
            <text:p>0</text:p>
          </table:table-cell>
          <table:table-cell office:value-type="string">
            <text:p>0</text:p>
          </table:table-cell>
          <table:table-cell office:value-type="string">
            <text:p>https://github.com/unfoldingWord-box3/StableTTS_Editing</text:p>
          </table:table-cell>
          <table:table-cell office:value-type="string">
            <text:p>2025-03-06T14:31:54Z</text:p>
          </table:table-cell>
        </table:table-row>
        <table:table-row>
          <table:table-cell office:value-type="string">
            <text:p>dcs-vanilla</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5-01-25T15:47:26Z</text:p>
          </table:table-cell>
          <table:table-cell office:value-type="string">
            <text:p>2025-01-25T15:47:11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dcs-vanilla</text:p>
          </table:table-cell>
          <table:table-cell office:value-type="string">
            <text:p>2025-01-25T15:47:15Z</text:p>
          </table:table-cell>
        </table:table-row>
        <table:table-row>
          <table:table-cell office:value-type="string">
            <text:p>theia-examples</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codex-sb-handle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12-03T13:53:27Z</text:p>
          </table:table-cell>
          <table:table-cell office:value-type="string">
            <text:p>2024-12-03T13:53:27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sb-handler-s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codex-sb-handler</text:p>
          </table:table-cell>
          <table:table-cell office:value-type="string">
            <text:p>2024-12-03T13:57:40Z</text:p>
          </table:table-cell>
        </table:table-row>
        <table:table-row>
          <table:table-cell office:value-type="string">
            <text:p>uw-proskomma</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10-10T15:27:48Z</text:p>
          </table:table-cell>
          <table:table-cell office:value-type="string">
            <text:p>2024-10-10T15:27:44Z</text:p>
          </table:table-cell>
          <table:table-cell office:value-type="string">
            <text:p/>
          </table:table-cell>
          <table:table-cell office:value-type="string">
            <text:p>1</text:p>
          </table:table-cell>
          <table:table-cell office:value-type="string">
            <text:p>1</text:p>
          </table:table-cell>
          <table:table-cell office:value-type="string">
            <text:p>104</text:p>
          </table:table-cell>
          <table:table-cell office:value-type="string">
            <text:p/>
          </table:table-cell>
          <table:table-cell office:value-type="string">
            <text:p>uw-proskomma</text:p>
          </table:table-cell>
          <table:table-cell office:value-type="string">
            <text:p>False</text:p>
          </table:table-cell>
          <table:table-cell office:value-type="string">
            <text:p>2359</text:p>
          </table:table-cell>
          <table:table-cell office:value-type="string">
            <text:p>2022-07-13T12:06:56.761Z</text:p>
          </table:table-cell>
          <table:table-cell office:value-type="string">
            <text:p>epitelete-html, proskomma-scripture-resources-rcl</text:p>
          </table:table-cell>
          <table:table-cell office:value-type="string">
            <text:p/>
          </table:table-cell>
          <table:table-cell office: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text:p>mvahowe, mandolyte, jag3773, richmahn</text:p>
          </table:table-cell>
          <table:table-cell office:value-type="string">
            <text:p>0</text:p>
          </table:table-cell>
          <table:table-cell office:value-type="string">
            <text:p>0</text:p>
          </table:table-cell>
          <table:table-cell office:value-type="string">
            <text:p>https://github.com/unfoldingWord-box3/uw-proskomma</text:p>
          </table:table-cell>
          <table:table-cell office:value-type="string">
            <text:p>2024-10-10T15:27:53Z</text:p>
          </table:table-cell>
        </table:table-row>
        <table:table-row>
          <table:table-cell office:value-type="string">
            <text:p>mini-sb-handl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9-12T09:53:14Z</text:p>
          </table:table-cell>
          <table:table-cell office:value-type="string">
            <text:p>2024-09-12T09:53:09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mini-sb-handler</text:p>
          </table:table-cell>
          <table:table-cell office:value-type="string">
            <text:p>2024-09-12T09:53:19Z</text:p>
          </table:table-cell>
        </table:table-row>
        <table:table-row>
          <table:table-cell office:value-type="string">
            <text:p>Simplif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15T20:16:37Z</text:p>
          </table:table-cell>
          <table:table-cell office:value-type="string">
            <text:p>2024-08-15T20:16:37Z</text:p>
          </table:table-cell>
          <table:table-cell office:value-type="string">
            <text:p/>
          </table:table-cell>
          <table:table-cell office:value-type="string">
            <text:p>0</text:p>
          </table:table-cell>
          <table:table-cell office:value-type="string">
            <text:p>0</text:p>
          </table:table-cell>
          <table:table-cell office:value-type="string">
            <text:p>5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Simplify</text:p>
          </table:table-cell>
          <table:table-cell office:value-type="string">
            <text:p>2024-08-15T20:16:40Z</text:p>
          </table:table-cell>
        </table:table-row>
        <table:table-row>
          <table:table-cell office:value-type="string">
            <text:p>beta-bibel-demo</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08T14:50:24Z</text:p>
          </table:table-cell>
          <table:table-cell office:value-type="string">
            <text:p>2024-07-26T16:13:53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beta-bibel-wik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beta-bibel-demo</text:p>
          </table:table-cell>
          <table:table-cell office:value-type="string">
            <text:p>2024-08-08T16:43:06Z</text:p>
          </table:table-cell>
        </table:table-row>
        <table:table-row>
          <table:table-cell office:value-type="string">
            <text:p>obs-audio-naviga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7-05T11:05:54Z</text:p>
          </table:table-cell>
          <table:table-cell office:value-type="string">
            <text:p>2024-07-05T11:05:54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obs-audio-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obs-audio-navigation</text:p>
          </table:table-cell>
          <table:table-cell office:value-type="string">
            <text:p>2024-07-05T11:13:09Z</text:p>
          </table:table-cell>
        </table:table-row>
        <table:table-row>
          <table:table-cell office:value-type="string">
            <text:p>gl-database-visualization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6-27T04:38:12Z</text:p>
          </table:table-cell>
          <table:table-cell office:value-type="string">
            <text:p>2024-06-27T04:38:09Z</text:p>
          </table:table-cell>
          <table:table-cell office:value-type="string">
            <text:p/>
          </table:table-cell>
          <table:table-cell office:value-type="string">
            <text:p>0</text:p>
          </table:table-cell>
          <table:table-cell office:value-type="string">
            <text:p>0</text:p>
          </table:table-cell>
          <table:table-cell office:value-type="string">
            <text:p>7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u-alexander, jag3773</text:p>
          </table:table-cell>
          <table:table-cell office:value-type="string">
            <text:p>0</text:p>
          </table:table-cell>
          <table:table-cell office:value-type="string">
            <text:p>0</text:p>
          </table:table-cell>
          <table:table-cell office:value-type="string">
            <text:p>https://github.com/unfoldingWord-box3/gl-database-visualizations</text:p>
          </table:table-cell>
          <table:table-cell office:value-type="string">
            <text:p>2024-06-27T04:38:16Z</text:p>
          </table:table-cell>
        </table:table-row>
        <table:table-row>
          <table:table-cell office:value-type="string">
            <text:p>obs-stud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6-25T11:20:36Z</text:p>
          </table:table-cell>
          <table:table-cell office:value-type="string">
            <text:p>2024-06-20T09:34:16Z</text:p>
          </table:table-cell>
          <table:table-cell office:value-type="string">
            <text:p/>
          </table:table-cell>
          <table:table-cell office:value-type="string">
            <text:p>0</text:p>
          </table:table-cell>
          <table:table-cell office:value-type="string">
            <text:p>0</text:p>
          </table:table-cell>
          <table:table-cell office:value-type="string">
            <text:p>4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diomaspuentes/obs-study</text:p>
          </table:table-cell>
          <table:table-cell office:value-type="string">
            <text:p>abelpz, eliaspinero, ilich valbuena, Jordani77, larsgson</text:p>
          </table:table-cell>
          <table:table-cell office:value-type="string">
            <text:p>0</text:p>
          </table:table-cell>
          <table:table-cell office:value-type="string">
            <text:p>0</text:p>
          </table:table-cell>
          <table:table-cell office:value-type="string">
            <text:p>https://github.com/unfoldingWord-box3/obs-study</text:p>
          </table:table-cell>
          <table:table-cell office:value-type="string">
            <text:p>2024-06-20T09:34:41Z</text:p>
          </table:table-cell>
        </table:table-row>
        <table:table-row>
          <table:table-cell office:value-type="string">
            <text:p>translation-project</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20T17:43:25Z</text:p>
          </table:table-cell>
          <table:table-cell office:value-type="string">
            <text:p>2024-03-20T17:43:20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yderwishart/translation-project</text:p>
          </table:table-cell>
          <table:table-cell office:value-type="string">
            <text:p>ryderwishart</text:p>
          </table:table-cell>
          <table:table-cell office:value-type="string">
            <text:p>0</text:p>
          </table:table-cell>
          <table:table-cell office:value-type="string">
            <text:p>0</text:p>
          </table:table-cell>
          <table:table-cell office:value-type="string">
            <text:p>https://github.com/unfoldingWord-box3/translation-project</text:p>
          </table:table-cell>
          <table:table-cell office:value-type="string">
            <text:p>2024-06-10T15:22:27Z</text:p>
          </table:table-cell>
        </table:table-row>
        <table:table-row>
          <table:table-cell office:value-type="string">
            <text:p>translation-notes-extension</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27T18:28:19Z</text:p>
          </table:table-cell>
          <table:table-cell office:value-type="string">
            <text:p>2024-03-27T18:28:00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translation-notes-extension</text:p>
          </table:table-cell>
          <table:table-cell office:value-type="string">
            <text:p>kintsoogi</text:p>
          </table:table-cell>
          <table:table-cell office:value-type="string">
            <text:p>0</text:p>
          </table:table-cell>
          <table:table-cell office:value-type="string">
            <text:p>0</text:p>
          </table:table-cell>
          <table:table-cell office:value-type="string">
            <text:p>https://github.com/unfoldingWord-box3/translation-notes-extension</text:p>
          </table:table-cell>
          <table:table-cell office:value-type="string">
            <text:p>2024-06-10T15:18:59Z</text:p>
          </table:table-cell>
        </table:table-row>
        <table:table-row>
          <table:table-cell office:value-type="string">
            <text:p>twin-ahk</text:p>
          </table:table-cell>
          <table:table-cell office:value-type="string">
            <text:p>unfoldingWord-box3</text:p>
          </table:table-cell>
          <table:table-cell office:value-type="string">
            <text:p>AutoHotkey</text:p>
          </table:table-cell>
          <table:table-cell office:value-type="string">
            <text:p>False</text:p>
          </table:table-cell>
          <table:table-cell office:value-type="string">
            <text:p>False</text:p>
          </table:table-cell>
          <table:table-cell office:value-type="string">
            <text:p>2024-05-21T01:35:50Z</text:p>
          </table:table-cell>
          <table:table-cell office:value-type="string">
            <text:p>2024-05-21T01:35:50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twin-ahk</text:p>
          </table:table-cell>
          <table:table-cell office:value-type="string">
            <text:p>2024-05-21T01:35:54Z</text:p>
          </table:table-cell>
        </table:table-row>
        <table:table-row>
          <table:table-cell office:value-type="string">
            <text:p>uw-codex-editor</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26T20:54:08Z</text:p>
          </table:table-cell>
          <table:table-cell office:value-type="string">
            <text:p>2024-03-26T20:53:58Z</text:p>
          </table:table-cell>
          <table:table-cell office:value-type="string">
            <text:p/>
          </table:table-cell>
          <table:table-cell office:value-type="string">
            <text:p>0</text:p>
          </table:table-cell>
          <table:table-cell office:value-type="string">
            <text:p>0</text:p>
          </table:table-cell>
          <table:table-cell office:value-type="string">
            <text:p>73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enesis-ai-dev/codex-editor</text:p>
          </table:table-cell>
          <table:table-cell office:value-type="string">
            <text:p>ryderwishart, BenjaminScholtens, Daniel Losey, dadukhankevin, brianineza01, kintsoogi, CalJosKos, Kalisa11, PhotoNomad0, samueljd</text:p>
          </table:table-cell>
          <table:table-cell office:value-type="string">
            <text:p>0</text:p>
          </table:table-cell>
          <table:table-cell office:value-type="string">
            <text:p>0</text:p>
          </table:table-cell>
          <table:table-cell office:value-type="string">
            <text:p>https://github.com/unfoldingWord-box3/uw-codex-editor</text:p>
          </table:table-cell>
          <table:table-cell office:value-type="string">
            <text:p>2024-03-28T07:20:52Z</text:p>
          </table:table-cell>
        </table:table-row>
        <table:table-row>
          <table:table-cell office:value-type="string">
            <text:p>SpeechToTex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4-03-14T13:49:53Z</text:p>
          </table:table-cell>
          <table:table-cell office:value-type="string">
            <text:p>2024-03-14T13:49:41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SpeechToText</text:p>
          </table:table-cell>
          <table:table-cell office:value-type="string">
            <text:p>2024-03-13T21:24:03Z</text:p>
          </table:table-cell>
        </table:table-row>
        <table:table-row>
          <table:table-cell office:value-type="string">
            <text:p>vscode-speech-to-text</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07T15:31:48Z</text:p>
          </table:table-cell>
          <table:table-cell office:value-type="string">
            <text:p>2022-04-04T07:52:29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lefjaerestad/vscode-speech-to-text</text:p>
          </table:table-cell>
          <table:table-cell office:value-type="string">
            <text:p>olefjaerestad, dependabot[bot]</text:p>
          </table:table-cell>
          <table:table-cell office:value-type="string">
            <text:p>0</text:p>
          </table:table-cell>
          <table:table-cell office:value-type="string">
            <text:p>0</text:p>
          </table:table-cell>
          <table:table-cell office:value-type="string">
            <text:p>https://github.com/unfoldingWord-box3/vscode-speech-to-text</text:p>
          </table:table-cell>
          <table:table-cell office:value-type="string">
            <text:p>2024-03-07T15:14:34Z</text:p>
          </table:table-cell>
        </table:table-row>
        <table:table-row>
          <table:table-cell office:value-type="string">
            <text:p>audio-obs-navigato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8T13:58:29Z</text:p>
          </table:table-cell>
          <table:table-cell office:value-type="string">
            <text:p>2024-03-08T12:08:48Z</text:p>
          </table:table-cell>
          <table:table-cell office:value-type="string">
            <text:p/>
          </table:table-cell>
          <table:table-cell office:value-type="string">
            <text:p>1</text:p>
          </table:table-cell>
          <table:table-cell office:value-type="string">
            <text:p>1</text:p>
          </table:table-cell>
          <table:table-cell office:value-type="string">
            <text:p>17</text:p>
          </table:table-cell>
          <table:table-cell office:value-type="string">
            <text:p/>
          </table:table-cell>
          <table:table-cell office:value-type="string">
            <text:p>audio-obs-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 blm, bspidel</text:p>
          </table:table-cell>
          <table:table-cell office:value-type="string">
            <text:p>0</text:p>
          </table:table-cell>
          <table:table-cell office:value-type="string">
            <text:p>0</text:p>
          </table:table-cell>
          <table:table-cell office:value-type="string">
            <text:p>https://github.com/unfoldingWord-box3/audio-obs-navigator</text:p>
          </table:table-cell>
          <table:table-cell office:value-type="string">
            <text:p>2024-03-05T18:54:24Z</text:p>
          </table:table-cell>
        </table:table-row>
        <table:table-row>
          <table:table-cell office:value-type="string">
            <text:p>RecordVoice</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6T14:13:55Z</text:p>
          </table:table-cell>
          <table:table-cell office:value-type="string">
            <text:p>2024-03-06T14:13:51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record-voi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lm</text:p>
          </table:table-cell>
          <table:table-cell office:value-type="string">
            <text:p>0</text:p>
          </table:table-cell>
          <table:table-cell office:value-type="string">
            <text:p>0</text:p>
          </table:table-cell>
          <table:table-cell office:value-type="string">
            <text:p>https://github.com/unfoldingWord-box3/RecordVoice</text:p>
          </table:table-cell>
          <table:table-cell office:value-type="string">
            <text:p>2024-03-05T16:10:13Z</text:p>
          </table:table-cell>
        </table:table-row>
        <table:table-row>
          <table:table-cell office:value-type="string">
            <text:p>audio-quiz</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9T13:55:01Z</text:p>
          </table:table-cell>
          <table:table-cell office:value-type="string">
            <text:p>2024-01-19T13:53:4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audio-quiz</text:p>
          </table:table-cell>
          <table:table-cell office:value-type="string">
            <text:p>2024-02-28T16:05:13Z</text:p>
          </table:table-cell>
        </table:table-row>
        <table:table-row>
          <table:table-cell office:value-type="string">
            <text:p>VscUsfmEditAlig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15T14:05:55Z</text:p>
          </table:table-cell>
          <table:table-cell office:value-type="string">
            <text:p>2024-02-13T19:43:46Z</text:p>
          </table:table-cell>
          <table:table-cell office:value-type="string">
            <text:p/>
          </table:table-cell>
          <table:table-cell office:value-type="string">
            <text:p>0</text:p>
          </table:table-cell>
          <table:table-cell office:value-type="string">
            <text:p>0</text:p>
          </table:table-cell>
          <table:table-cell office:value-type="string">
            <text:p>46</text:p>
          </table:table-cell>
          <table:table-cell office:value-type="string">
            <text:p/>
          </table:table-cell>
          <table:table-cell office:value-type="string">
            <text:p>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VsCodeUsfmAligner</text:p>
          </table:table-cell>
          <table:table-cell office:value-type="string">
            <text:p>Joshua Lansford, PhotoNomad0, blm</text:p>
          </table:table-cell>
          <table:table-cell office:value-type="string">
            <text:p>0</text:p>
          </table:table-cell>
          <table:table-cell office:value-type="string">
            <text:p>0</text:p>
          </table:table-cell>
          <table:table-cell office:value-type="string">
            <text:p>https://github.com/unfoldingWord-box3/VscUsfmEditAlign</text:p>
          </table:table-cell>
          <table:table-cell office:value-type="string">
            <text:p>2024-02-15T14:03:06Z</text:p>
          </table:table-cell>
        </table:table-row>
        <table:table-row>
          <table:table-cell office:value-type="string">
            <text:p>VscOceUsfmEd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02T13:44:52Z</text:p>
          </table:table-cell>
          <table:table-cell office:value-type="string">
            <text:p>2024-02-02T13:44:52Z</text:p>
          </table:table-cell>
          <table:table-cell office:value-type="string">
            <text:p/>
          </table:table-cell>
          <table:table-cell office:value-type="string">
            <text:p>0</text:p>
          </table:table-cell>
          <table:table-cell office:value-type="string">
            <text:p>0</text:p>
          </table:table-cell>
          <table:table-cell office:value-type="string">
            <text:p>42</text:p>
          </table:table-cell>
          <table:table-cell office:value-type="string">
            <text:p/>
          </table:table-cell>
          <table:table-cell office:value-type="string">
            <text:p>oce-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x3/VscUsfmEditAlign</text:p>
          </table:table-cell>
          <table:table-cell office:value-type="string">
            <text:p>Joshua Lansford, larsgson, PhotoNomad0, blm</text:p>
          </table:table-cell>
          <table:table-cell office:value-type="string">
            <text:p>0</text:p>
          </table:table-cell>
          <table:table-cell office:value-type="string">
            <text:p>0</text:p>
          </table:table-cell>
          <table:table-cell office:value-type="string">
            <text:p>https://github.com/unfoldingWord-box3/VscOceUsfmEdit</text:p>
          </table:table-cell>
          <table:table-cell office:value-type="string">
            <text:p>2024-02-02T13:45:00Z</text:p>
          </table:table-cell>
        </table:table-row>
        <table:table-row>
          <table:table-cell office:value-type="string">
            <text:p>td</text:p>
          </table:table-cell>
          <table:table-cell office:value-type="string">
            <text:p>unfoldingWord-box3</text:p>
          </table:table-cell>
          <table:table-cell office:value-type="string">
            <text:p>HTML</text:p>
          </table:table-cell>
          <table:table-cell office:value-type="string">
            <text:p>True</text:p>
          </table:table-cell>
          <table:table-cell office:value-type="string">
            <text:p>False</text:p>
          </table:table-cell>
          <table:table-cell office:value-type="string">
            <text:p>2019-09-17T14:39:19Z</text:p>
          </table:table-cell>
          <table:table-cell office:value-type="string">
            <text:p>2019-09-17T14:39:18Z</text:p>
          </table:table-cell>
          <table:table-cell office:value-type="string">
            <text:p/>
          </table:table-cell>
          <table:table-cell office:value-type="string">
            <text:p>20</text:p>
          </table:table-cell>
          <table:table-cell office:value-type="string">
            <text:p>0</text:p>
          </table:table-cell>
          <table:table-cell office:value-type="string">
            <text:p>3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 jag3773, Tim J</text:p>
          </table:table-cell>
          <table:table-cell office:value-type="string">
            <text:p>0</text:p>
          </table:table-cell>
          <table:table-cell office:value-type="string">
            <text:p>0</text:p>
          </table:table-cell>
          <table:table-cell office:value-type="string">
            <text:p>https://github.com/unfoldingWord-box3/td</text:p>
          </table:table-cell>
          <table:table-cell office:value-type="string">
            <text:p>2023-12-05T16:03:25Z</text:p>
          </table:table-cell>
        </table:table-row>
        <table:table-row>
          <table:table-cell office:value-type="string">
            <text:p>NotionImport</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3-10-23T20:23:28Z</text:p>
          </table:table-cell>
          <table:table-cell office:value-type="string">
            <text:p>2023-10-23T20:23:28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NotionImport</text:p>
          </table:table-cell>
          <table:table-cell office:value-type="string">
            <text:p>2023-10-23T20:12:59Z</text:p>
          </table:table-cell>
        </table:table-row>
        <table:table-row>
          <table:table-cell office:value-type="string">
            <text:p>tx-redis-poc</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3-10-20T13:53:17Z</text:p>
          </table:table-cell>
          <table:table-cell office:value-type="string">
            <text:p>2023-10-20T13:53:14Z</text:p>
          </table:table-cell>
          <table:table-cell office:value-type="string">
            <text:p/>
          </table:table-cell>
          <table:table-cell office:value-type="string">
            <text:p>0</text:p>
          </table:table-cell>
          <table:table-cell office:value-type="string">
            <text:p>0</text:p>
          </table:table-cell>
          <table:table-cell office:value-type="string">
            <text:p>4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tx-redis-poc</text:p>
          </table:table-cell>
          <table:table-cell office:value-type="string">
            <text:p>2023-10-12T20:54:09Z</text:p>
          </table:table-cell>
        </table:table-row>
        <table:table-row>
          <table:table-cell office:value-type="string">
            <text:p>bible-preview-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10-11T10:48:37Z</text:p>
          </table:table-cell>
          <table:table-cell office:value-type="string">
            <text:p>2023-10-11T10:45:25Z</text:p>
          </table:table-cell>
          <table:table-cell office:value-type="string">
            <text:p/>
          </table:table-cell>
          <table:table-cell office:value-type="string">
            <text:p>0</text:p>
          </table:table-cell>
          <table:table-cell office:value-type="string">
            <text:p>0</text:p>
          </table:table-cell>
          <table:table-cell office:value-type="string">
            <text:p>63</text:p>
          </table:table-cell>
          <table:table-cell office:value-type="string">
            <text:p/>
          </table:table-cell>
          <table:table-cell office:value-type="string">
            <text:p>bible-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text:p>
          </table:table-cell>
          <table:table-cell office:value-type="string">
            <text:p/>
          </table:table-cell>
          <table:table-cell office:value-type="string">
            <text:p>richmahn, mandolyte</text:p>
          </table:table-cell>
          <table:table-cell office:value-type="string">
            <text:p>0</text:p>
          </table:table-cell>
          <table:table-cell office:value-type="string">
            <text:p>0</text:p>
          </table:table-cell>
          <table:table-cell office:value-type="string">
            <text:p>https://github.com/unfoldingWord-box3/bible-preview-app</text:p>
          </table:table-cell>
          <table:table-cell office:value-type="string">
            <text:p>2023-08-01T17:31:54Z</text:p>
          </table:table-cell>
        </table:table-row>
        <table:table-row>
          <table:table-cell office:value-type="string">
            <text:p>SIL_API_loader</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3-06-29T18:35:44Z</text:p>
          </table:table-cell>
          <table:table-cell office:value-type="string">
            <text:p>2023-06-29T18:35:34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box3/SIL_API_loader</text:p>
          </table:table-cell>
          <table:table-cell office:value-type="string">
            <text:p>2023-06-29T15:32:27Z</text:p>
          </table:table-cell>
        </table:table-row>
        <table:table-row>
          <table:table-cell office:value-type="string">
            <text:p>translate-markdown-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03T17:34:50Z</text:p>
          </table:table-cell>
          <table:table-cell office:value-type="string">
            <text:p>2019-04-03T17:22:30Z</text:p>
          </table:table-cell>
          <table:table-cell office:value-type="string">
            <text:p/>
          </table:table-cell>
          <table:table-cell office:value-type="string">
            <text:p>0</text:p>
          </table:table-cell>
          <table:table-cell office:value-type="string">
            <text:p>0</text:p>
          </table:table-cell>
          <table:table-cell office:value-type="string">
            <text:p>67</text:p>
          </table:table-cell>
          <table:table-cell office:value-type="string">
            <text:p/>
          </table:table-cell>
          <table:table-cell office:value-type="string">
            <text:p>translate-markdow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e-markdown-poc</text:p>
          </table:table-cell>
          <table:table-cell office:value-type="string">
            <text:p>2023-05-20T15:31:34Z</text:p>
          </table:table-cell>
        </table:table-row>
        <table:table-row>
          <table:table-cell office:value-type="string">
            <text:p>dcs-logi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06T18:17:54Z</text:p>
          </table:table-cell>
          <table:table-cell office:value-type="string">
            <text:p>2023-04-06T18:17:50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dcs-log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dcs-login</text:p>
          </table:table-cell>
          <table:table-cell office:value-type="string">
            <text:p>2023-04-04T15:43:56Z</text:p>
          </table:table-cell>
        </table:table-row>
        <table:table-row>
          <table:table-cell office:value-type="string">
            <text:p>wordmap-seed-app</text:p>
          </table:table-cell>
          <table:table-cell office:value-type="string">
            <text:p>unfoldingWord-box3</text:p>
          </table:table-cell>
          <table:table-cell office:value-type="string">
            <text:p>CSS</text:p>
          </table:table-cell>
          <table:table-cell office:value-type="string">
            <text:p>False</text:p>
          </table:table-cell>
          <table:table-cell office:value-type="string">
            <text:p>False</text:p>
          </table:table-cell>
          <table:table-cell office:value-type="string">
            <text:p>2023-02-23T22:52:06Z</text:p>
          </table:table-cell>
          <table:table-cell office:value-type="string">
            <text:p>2023-02-23T22:52:03Z</text:p>
          </table:table-cell>
          <table:table-cell office:value-type="string">
            <text:p/>
          </table:table-cell>
          <table:table-cell office:value-type="string">
            <text:p>0</text:p>
          </table:table-cell>
          <table:table-cell office:value-type="string">
            <text:p>0</text:p>
          </table:table-cell>
          <table:table-cell office:value-type="string">
            <text:p>5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 klappy, themikejr, bspidel</text:p>
          </table:table-cell>
          <table:table-cell office:value-type="string">
            <text:p>0</text:p>
          </table:table-cell>
          <table:table-cell office:value-type="string">
            <text:p>0</text:p>
          </table:table-cell>
          <table:table-cell office:value-type="string">
            <text:p>https://github.com/unfoldingWord-box3/wordmap-seed-app</text:p>
          </table:table-cell>
          <table:table-cell office:value-type="string">
            <text:p>2023-02-23T22:52:12Z</text:p>
          </table:table-cell>
        </table:table-row>
        <table:table-row>
          <table:table-cell office:value-type="string">
            <text:p>react-library-start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6T23:27:40Z</text:p>
          </table:table-cell>
          <table:table-cell office:value-type="string">
            <text:p>2023-02-16T23:27:40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my-li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react-library</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react-library-starter</text:p>
          </table:table-cell>
          <table:table-cell office:value-type="string">
            <text:p>2023-02-16T14:47:55Z</text:p>
          </table:table-cell>
        </table:table-row>
        <table:table-row>
          <table:table-cell office:value-type="string">
            <text:p>alignment-playgroun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0T18:39:36Z</text:p>
          </table:table-cell>
          <table:table-cell office:value-type="string">
            <text:p>2023-01-30T14:47:20Z</text:p>
          </table:table-cell>
          <table:table-cell office:value-type="string">
            <text:p/>
          </table:table-cell>
          <table:table-cell office:value-type="string">
            <text:p>0</text:p>
          </table:table-cell>
          <table:table-cell office:value-type="string">
            <text:p>0</text:p>
          </table:table-cell>
          <table:table-cell office:value-type="string">
            <text:p>25</text:p>
          </table:table-cell>
          <table:table-cell office:value-type="string">
            <text:p/>
          </table:table-cell>
          <table:table-cell office:value-type="string">
            <text:p>alignment-playgroun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tc-ui-toolkit, usfm-js, word-aligner, wordmap-lexer</text:p>
          </table:table-cell>
          <table:table-cell office:value-type="string">
            <text:p>PhotoNomad0/alignment-playground</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alignment-playground</text:p>
          </table:table-cell>
          <table:table-cell office:value-type="string">
            <text:p>2023-01-30T13:00:02Z</text:p>
          </table:table-cell>
        </table:table-row>
        <table:table-row>
          <table:table-cell office:value-type="string">
            <text:p>electron</text:p>
          </table:table-cell>
          <table:table-cell office:value-type="string">
            <text:p>unfoldingWord-box3</text:p>
          </table:table-cell>
          <table:table-cell office:value-type="string">
            <text:p/>
          </table:table-cell>
          <table:table-cell office:value-type="string">
            <text:p>True</text:p>
          </table:table-cell>
          <table:table-cell office:value-type="string">
            <text:p>True</text:p>
          </table:table-cell>
          <table:table-cell office:value-type="string">
            <text:p>2022-04-17T01:34:51Z</text:p>
          </table:table-cell>
          <table:table-cell office:value-type="string">
            <text:p>2022-04-12T13:43:01Z</text:p>
          </table:table-cell>
          <table:table-cell office:value-type="string">
            <text:p/>
          </table:table-cell>
          <table:table-cell office:value-type="string">
            <text:p>0</text:p>
          </table:table-cell>
          <table:table-cell office:value-type="string">
            <text:p>0</text:p>
          </table:table-cell>
          <table:table-cell office:value-type="string">
            <text:p>2598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electron</text:p>
          </table:table-cell>
          <table:table-cell office: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text:p>0</text:p>
          </table:table-cell>
          <table:table-cell office:value-type="string">
            <text:p>0</text:p>
          </table:table-cell>
          <table:table-cell office:value-type="string">
            <text:p>https://github.com/unfoldingWord-box3/electron</text:p>
          </table:table-cell>
          <table:table-cell office:value-type="string">
            <text:p>2023-01-28T00:48:49Z</text:p>
          </table:table-cell>
        </table:table-row>
        <table:table-row>
          <table:table-cell office:value-type="string">
            <text:p>chamilo2obsidian</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2-12-13T23:30:29Z</text:p>
          </table:table-cell>
          <table:table-cell office:value-type="string">
            <text:p>2022-12-13T23:30:24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chamilo2obsidian</text:p>
          </table:table-cell>
          <table:table-cell office:value-type="string">
            <text:p>2022-12-12T20:50:51Z</text:p>
          </table:table-cell>
        </table:table-row>
        <table:table-row>
          <table:table-cell office:value-type="string">
            <text:p>viewer-app-cordova</text:p>
          </table:table-cell>
          <table:table-cell office:value-type="string">
            <text:p>unfoldingWord-box3</text:p>
          </table:table-cell>
          <table:table-cell office:value-type="string">
            <text:p>Objective-C</text:p>
          </table:table-cell>
          <table:table-cell office:value-type="string">
            <text:p>False</text:p>
          </table:table-cell>
          <table:table-cell office:value-type="string">
            <text:p>False</text:p>
          </table:table-cell>
          <table:table-cell office:value-type="string">
            <text:p>2022-11-09T09:01:35Z</text:p>
          </table:table-cell>
          <table:table-cell office:value-type="string">
            <text:p>2022-11-09T09:01:35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yakob-aleksandrovich</text:p>
          </table:table-cell>
          <table:table-cell office:value-type="string">
            <text:p>1</text:p>
          </table:table-cell>
          <table:table-cell office:value-type="string">
            <text:p>21</text:p>
          </table:table-cell>
          <table:table-cell office:value-type="string">
            <text:p>https://github.com/unfoldingWord-box3/viewer-app-cordova</text:p>
          </table:table-cell>
          <table:table-cell office:value-type="string">
            <text:p>2022-11-09T09:01:40Z</text:p>
          </table:table-cell>
        </table:table-row>
        <table:table-row>
          <table:table-cell office:value-type="string">
            <text:p>populate-gl-quote-rcl</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2-09-23T16:15:56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box3/populate-gl-quote-rcl</text:p>
          </table:table-cell>
          <table:table-cell office:value-type="string">
            <text:p>2022-09-23T16:15:55Z</text:p>
          </table:table-cell>
        </table:table-row>
        <table:table-row>
          <table:table-cell office:value-type="string">
            <text:p>dcs-file-version-diff-too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22T17:56:46Z</text:p>
          </table:table-cell>
          <table:table-cell office:value-type="string">
            <text:p>2022-08-19T21:40:58Z</text:p>
          </table:table-cell>
          <table:table-cell office:value-type="string">
            <text:p/>
          </table:table-cell>
          <table:table-cell office:value-type="string">
            <text:p>7</text:p>
          </table:table-cell>
          <table:table-cell office:value-type="string">
            <text:p>2</text:p>
          </table:table-cell>
          <table:table-cell office:value-type="string">
            <text:p>27</text:p>
          </table:table-cell>
          <table:table-cell office:value-type="string">
            <text:p/>
          </table:table-cell>
          <table:table-cell office:value-type="string">
            <text:p>dcs-file-version-diff-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danielklapp, jincypjose</text:p>
          </table:table-cell>
          <table:table-cell office:value-type="string">
            <text:p>0</text:p>
          </table:table-cell>
          <table:table-cell office:value-type="string">
            <text:p>0</text:p>
          </table:table-cell>
          <table:table-cell office:value-type="string">
            <text:p>https://github.com/unfoldingWord-box3/dcs-file-version-diff-tool</text:p>
          </table:table-cell>
          <table:table-cell office:value-type="string">
            <text:p>2022-08-20T00:16:31Z</text:p>
          </table:table-cell>
        </table:table-row>
        <table:table-row>
          <table:table-cell office:value-type="string">
            <text:p>wordmap-react-toolk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3-01-07T10:58:07Z</text:p>
          </table:table-cell>
          <table:table-cell office:value-type="string">
            <text:p>2019-11-07T08:12:31Z</text:p>
          </table:table-cell>
          <table:table-cell office:value-type="string">
            <text:p/>
          </table:table-cell>
          <table:table-cell office:value-type="string">
            <text:p>25</text:p>
          </table:table-cell>
          <table:table-cell office:value-type="string">
            <text:p>25</text:p>
          </table:table-cell>
          <table:table-cell office:value-type="string">
            <text:p>45</text:p>
          </table:table-cell>
          <table:table-cell office:value-type="string">
            <text:p/>
          </table:table-cell>
          <table:table-cell office:value-type="string">
            <text:p>wordmap-react-toolkit</text:p>
          </table:table-cell>
          <table:table-cell office:value-type="string">
            <text:p>False</text:p>
          </table:table-cell>
          <table:table-cell office:value-type="string">
            <text:p>242</text:p>
          </table:table-cell>
          <table:table-cell office:value-type="string">
            <text:p>2019-11-07T08:13:01.981Z</text:p>
          </table:table-cell>
          <table:table-cell office:value-type="string">
            <text:p/>
          </table:table-cell>
          <table:table-cell office:value-type="string">
            <text:p>wordmap, wordmap-lexer</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box3/wordmap-react-toolkit</text:p>
          </table:table-cell>
          <table:table-cell office:value-type="string">
            <text:p>2022-06-17T15:47:04Z</text:p>
          </table:table-cell>
        </table:table-row>
        <table:table-row>
          <table:table-cell office:value-type="string">
            <text:p>next-js-template</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9-26T15:07:50Z</text:p>
          </table:table-cell>
          <table:table-cell office:value-type="string">
            <text:p>2022-09-26T15:07:50Z</text:p>
          </table:table-cell>
          <table:table-cell office:value-type="string">
            <text:p/>
          </table:table-cell>
          <table:table-cell office:value-type="string">
            <text:p>20</text:p>
          </table:table-cell>
          <table:table-cell office:value-type="string">
            <text:p>0</text:p>
          </table:table-cell>
          <table:table-cell office:value-type="string">
            <text:p>42</text:p>
          </table:table-cell>
          <table:table-cell office:value-type="string">
            <text:p/>
          </table:table-cell>
          <table:table-cell office:value-type="string">
            <text:p>next-js-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resource-workspace-rcl, scripture-resources-rcl, single-scripture-rcl, tc-ui-toolkit, translation-helps-rcl, word-aligner</text:p>
          </table:table-cell>
          <table:table-cell office:value-type="string">
            <text:p/>
          </table:table-cell>
          <table:table-cell office:value-type="string">
            <text:p>mandolyte, superdav42, mannycolon, abelpz</text:p>
          </table:table-cell>
          <table:table-cell office:value-type="string">
            <text:p>0</text:p>
          </table:table-cell>
          <table:table-cell office:value-type="string">
            <text:p>0</text:p>
          </table:table-cell>
          <table:table-cell office:value-type="string">
            <text:p>https://github.com/unfoldingWord-box3/next-js-template</text:p>
          </table:table-cell>
          <table:table-cell office:value-type="string">
            <text:p>2022-06-17T15:46:29Z</text:p>
          </table:table-cell>
        </table:table-row>
        <table:table-row>
          <table:table-cell office:value-type="string">
            <text:p>translation-helps-print-preview</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6-20T21:25:08Z</text:p>
          </table:table-cell>
          <table:table-cell office:value-type="string">
            <text:p>2022-06-20T21:25:06Z</text:p>
          </table:table-cell>
          <table:table-cell office:value-type="string">
            <text:p/>
          </table:table-cell>
          <table:table-cell office:value-type="string">
            <text:p>7</text:p>
          </table:table-cell>
          <table:table-cell office:value-type="string">
            <text:p>0</text:p>
          </table:table-cell>
          <table:table-cell office:value-type="string">
            <text:p>5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abelpz, richmahn, birchamp</text:p>
          </table:table-cell>
          <table:table-cell office:value-type="string">
            <text:p>0</text:p>
          </table:table-cell>
          <table:table-cell office:value-type="string">
            <text:p>0</text:p>
          </table:table-cell>
          <table:table-cell office:value-type="string">
            <text:p>https://github.com/unfoldingWord-box3/translation-helps-print-preview</text:p>
          </table:table-cell>
          <table:table-cell office:value-type="string">
            <text:p>2022-06-17T15:46:05Z</text:p>
          </table:table-cell>
        </table:table-row>
        <table:table-row>
          <table:table-cell office:value-type="string">
            <text:p>hello-world-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07:49:26Z</text:p>
          </table:table-cell>
          <table:table-cell office:value-type="string">
            <text:p>2022-02-23T21:09:04Z</text:p>
          </table:table-cell>
          <table:table-cell office:value-type="string">
            <text:p/>
          </table:table-cell>
          <table:table-cell office:value-type="string">
            <text:p>32</text:p>
          </table:table-cell>
          <table:table-cell office:value-type="string">
            <text:p>27</text:p>
          </table:table-cell>
          <table:table-cell office:value-type="string">
            <text:p>23</text:p>
          </table:table-cell>
          <table:table-cell office:value-type="string">
            <text:p/>
          </table:table-cell>
          <table:table-cell office:value-type="string">
            <text:p>hello-world-react-component-library</text:p>
          </table:table-cell>
          <table:table-cell office:value-type="string">
            <text:p>False</text:p>
          </table:table-cell>
          <table:table-cell office:value-type="string">
            <text:p>199</text:p>
          </table:table-cell>
          <table:table-cell office:value-type="string">
            <text:p>2019-09-25T16:00:59.747Z</text:p>
          </table:table-cell>
          <table:table-cell office:value-type="string">
            <text:p/>
          </table:table-cell>
          <table:table-cell office:value-type="string">
            <text:p/>
          </table:table-cell>
          <table:table-cell office:value-type="string">
            <text:p/>
          </table:table-cell>
          <table:table-cell office:value-type="string">
            <text:p>klappy, RoyalSix, Sterling (Jay) Scott</text:p>
          </table:table-cell>
          <table:table-cell office:value-type="string">
            <text:p>0</text:p>
          </table:table-cell>
          <table:table-cell office:value-type="string">
            <text:p>0</text:p>
          </table:table-cell>
          <table:table-cell office:value-type="string">
            <text:p>https://github.com/unfoldingWord-box3/hello-world-react-component-library</text:p>
          </table:table-cell>
          <table:table-cell office:value-type="string">
            <text:p>2022-06-14T15:18:39Z</text:p>
          </table:table-cell>
        </table:table-row>
        <table:table-row>
          <table:table-cell office:value-type="string">
            <text:p>resource-containe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06:31:27Z</text:p>
          </table:table-cell>
          <table:table-cell office:value-type="string">
            <text:p>2021-03-10T16:03:18Z</text:p>
          </table:table-cell>
          <table:table-cell office:value-type="string">
            <text:p/>
          </table:table-cell>
          <table:table-cell office:value-type="string">
            <text:p>23</text:p>
          </table:table-cell>
          <table:table-cell office:value-type="string">
            <text:p>23</text:p>
          </table:table-cell>
          <table:table-cell office:value-type="string">
            <text:p>23</text:p>
          </table:table-cell>
          <table:table-cell office:value-type="string">
            <text:p/>
          </table:table-cell>
          <table:table-cell office:value-type="string">
            <text:p>resource-containe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resource-container-rcl</text:p>
          </table:table-cell>
          <table:table-cell office:value-type="string">
            <text:p>2022-06-14T15:16:49Z</text:p>
          </table:table-cell>
        </table:table-row>
        <table:table-row>
          <table:table-cell office:value-type="string">
            <text:p>door43-preview-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20T16:57:57Z</text:p>
          </table:table-cell>
          <table:table-cell office:value-type="string">
            <text:p>2020-10-20T16:57:17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pdf-genera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door43-preview-rcl</text:p>
          </table:table-cell>
          <table:table-cell office:value-type="string">
            <text:p>2022-06-14T15:16:13Z</text:p>
          </table:table-cell>
        </table:table-row>
        <table:table-row>
          <table:table-cell office:value-type="string">
            <text:p>proskomma-scripture-resources-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4-29T14:02:08Z</text:p>
          </table:table-cell>
          <table:table-cell office:value-type="string">
            <text:p>2021-02-05T16:34:09Z</text:p>
          </table:table-cell>
          <table:table-cell office:value-type="string">
            <text:p/>
          </table:table-cell>
          <table:table-cell office:value-type="string">
            <text:p>0</text:p>
          </table:table-cell>
          <table:table-cell office:value-type="string">
            <text:p>0</text:p>
          </table:table-cell>
          <table:table-cell office:value-type="string">
            <text:p>30</text:p>
          </table:table-cell>
          <table:table-cell office:value-type="string">
            <text:p/>
          </table:table-cell>
          <table:table-cell office:value-type="string">
            <text:p>proskomma-scripture-resources-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proskomma</text:p>
          </table:table-cell>
          <table:table-cell office:value-type="string">
            <text:p/>
          </table:table-cell>
          <table:table-cell office:value-type="string">
            <text:p>mvahowe, mannycolon</text:p>
          </table:table-cell>
          <table:table-cell office:value-type="string">
            <text:p>0</text:p>
          </table:table-cell>
          <table:table-cell office:value-type="string">
            <text:p>0</text:p>
          </table:table-cell>
          <table:table-cell office:value-type="string">
            <text:p>https://github.com/unfoldingWord-box3/proskomma-scripture-resources-rcl</text:p>
          </table:table-cell>
          <table:table-cell office:value-type="string">
            <text:p>2022-06-14T15:15:43Z</text:p>
          </table:table-cell>
        </table:table-row>
        <table:table-row>
          <table:table-cell office:value-type="string">
            <text:p>alignment-editor-rc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1-06-24T05:19:56Z</text:p>
          </table:table-cell>
          <table:table-cell office:value-type="string">
            <text:p>2021-06-21T20:30:54Z</text:p>
          </table:table-cell>
          <table:table-cell office:value-type="string">
            <text:p/>
          </table:table-cell>
          <table:table-cell office:value-type="string">
            <text:p>0</text:p>
          </table:table-cell>
          <table:table-cell office:value-type="string">
            <text:p>0</text:p>
          </table:table-cell>
          <table:table-cell office:value-type="string">
            <text:p>176</text:p>
          </table:table-cell>
          <table:table-cell office:value-type="string">
            <text:p/>
          </table:table-cell>
          <table:table-cell office:value-type="string">
            <text:p>alignment-editor-rcl</text:p>
          </table:table-cell>
          <table:table-cell office:value-type="string">
            <text:p/>
          </table:table-cell>
          <table:table-cell office:value-type="string">
            <text:p/>
          </table:table-cell>
          <table:table-cell office:value-type="string">
            <text:p/>
          </table:table-cell>
          <table:table-cell office:value-type="string">
            <text:p>anchor-alignment-poc</text:p>
          </table:table-cell>
          <table:table-cell office:value-type="string">
            <text:p/>
          </table:table-cell>
          <table:table-cell office:value-type="string">
            <text:p>gbin-org/alignment-editor-rcl</text:p>
          </table:table-cell>
          <table:table-cell office:value-type="string">
            <text:p>themikejr, ancientTexts-net</text:p>
          </table:table-cell>
          <table:table-cell office:value-type="string">
            <text:p>0</text:p>
          </table:table-cell>
          <table:table-cell office:value-type="string">
            <text:p>0</text:p>
          </table:table-cell>
          <table:table-cell office:value-type="string">
            <text:p>https://github.com/unfoldingWord-box3/alignment-editor-rcl</text:p>
          </table:table-cell>
          <table:table-cell office:value-type="string">
            <text:p>2022-06-14T15:15:26Z</text:p>
          </table:table-cell>
        </table:table-row>
        <table:table-row>
          <table:table-cell office:value-type="string">
            <text:p>hello-dcs-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27T00:47:55Z</text:p>
          </table:table-cell>
          <table:table-cell office:value-type="string">
            <text:p>2022-12-16T08:48:26Z</text:p>
          </table:table-cell>
          <table:table-cell office:value-type="string">
            <text:p/>
          </table:table-cell>
          <table:table-cell office:value-type="string">
            <text:p>6</text:p>
          </table:table-cell>
          <table:table-cell office:value-type="string">
            <text:p>6</text:p>
          </table:table-cell>
          <table:table-cell office:value-type="string">
            <text:p>6</text:p>
          </table:table-cell>
          <table:table-cell office:value-type="string">
            <text:p/>
          </table:table-cell>
          <table:table-cell office:value-type="string">
            <text:p>hello-dcs-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 dependabot[bot], yakob-aleksandrovich</text:p>
          </table:table-cell>
          <table:table-cell office:value-type="string">
            <text:p>0</text:p>
          </table:table-cell>
          <table:table-cell office:value-type="string">
            <text:p>0</text:p>
          </table:table-cell>
          <table:table-cell office:value-type="string">
            <text:p>https://github.com/unfoldingWord-box3/hello-dcs-react-component-library</text:p>
          </table:table-cell>
          <table:table-cell office:value-type="string">
            <text:p>2022-06-14T15:15:13Z</text:p>
          </table:table-cell>
        </table:table-row>
        <table:table-row>
          <table:table-cell office:value-type="string">
            <text:p>org-language-resource-hook</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2-06-14T06:26:31Z</text:p>
          </table:table-cell>
          <table:table-cell office:value-type="string">
            <text:p>2022-06-14T06:26:31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incypjose</text:p>
          </table:table-cell>
          <table:table-cell office:value-type="string">
            <text:p>0</text:p>
          </table:table-cell>
          <table:table-cell office:value-type="string">
            <text:p>0</text:p>
          </table:table-cell>
          <table:table-cell office:value-type="string">
            <text:p>https://github.com/unfoldingWord-box3/org-language-resource-hook</text:p>
          </table:table-cell>
          <table:table-cell office:value-type="string">
            <text:p>2022-06-14T06:26:30Z</text:p>
          </table:table-cell>
        </table:table-row>
        <table:table-row>
          <table:table-cell office:value-type="string">
            <text:p>bible-ref-pk-demo</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2-11-10T17:40:23Z</text:p>
          </table:table-cell>
          <table:table-cell office:value-type="string">
            <text:p>2022-11-10T17:40:19Z</text:p>
          </table:table-cell>
          <table:table-cell office:value-type="string">
            <text:p/>
          </table:table-cell>
          <table:table-cell office:value-type="string">
            <text:p>0</text:p>
          </table:table-cell>
          <table:table-cell office:value-type="string">
            <text:p>0</text:p>
          </table:table-cell>
          <table:table-cell office:value-type="string">
            <text:p>2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bible-ref-pk-demo</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bible-ref-pk-demo</text:p>
          </table:table-cell>
          <table:table-cell office:value-type="string">
            <text:p>2022-04-09T14:05:23Z</text:p>
          </table:table-cell>
        </table:table-row>
        <table:table-row>
          <table:table-cell office:value-type="string">
            <text:p>gutenberg-proje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3-01T21:14:08Z</text:p>
          </table:table-cell>
          <table:table-cell office:value-type="string">
            <text:p>2022-03-01T21:14:05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gutenberg-project</text:p>
          </table:table-cell>
          <table:table-cell office:value-type="string">
            <text:p>2022-03-01T21:05:23Z</text:p>
          </table:table-cell>
        </table:table-row>
        <table:table-row>
          <table:table-cell office:value-type="string">
            <text:p>pdf-splitter</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2-02-24T13:19:57Z</text:p>
          </table:table-cell>
          <table:table-cell office:value-type="string">
            <text:p>2022-02-24T13:19:55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pdf-splitter</text:p>
          </table:table-cell>
          <table:table-cell office:value-type="string">
            <text:p>2022-02-24T13:17:52Z</text:p>
          </table:table-cell>
        </table:table-row>
        <table:table-row>
          <table:table-cell office:value-type="string">
            <text:p>md-converte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2-20T19:28:22Z</text:p>
          </table:table-cell>
          <table:table-cell office:value-type="string">
            <text:p>2021-12-20T19:28:22Z</text:p>
          </table:table-cell>
          <table:table-cell office:value-type="string">
            <text:p/>
          </table:table-cell>
          <table:table-cell office:value-type="string">
            <text:p>30</text:p>
          </table:table-cell>
          <table:table-cell office:value-type="string">
            <text:p>0</text:p>
          </table:table-cell>
          <table:table-cell office:value-type="string">
            <text:p>213</text:p>
          </table:table-cell>
          <table:table-cell office:value-type="string">
            <text:p/>
          </table:table-cell>
          <table:table-cell office:value-type="string">
            <text:p>md-tsv-convert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mannycolon, PhotoNomad0, ImgBotApp</text:p>
          </table:table-cell>
          <table:table-cell office:value-type="string">
            <text:p>0</text:p>
          </table:table-cell>
          <table:table-cell office:value-type="string">
            <text:p>0</text:p>
          </table:table-cell>
          <table:table-cell office:value-type="string">
            <text:p>https://github.com/unfoldingWord-box3/md-converter-app</text:p>
          </table:table-cell>
          <table:table-cell office:value-type="string">
            <text:p>2021-12-20T19:28:57Z</text:p>
          </table:table-cell>
        </table:table-row>
        <table:table-row>
          <table:table-cell office:value-type="string">
            <text:p>tc-creat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7-05T17:42:04Z</text:p>
          </table:table-cell>
          <table:table-cell office:value-type="string">
            <text:p>2021-07-05T17:41:59Z</text:p>
          </table:table-cell>
          <table:table-cell office:value-type="string">
            <text:p/>
          </table:table-cell>
          <table:table-cell office:value-type="string">
            <text:p>0</text:p>
          </table:table-cell>
          <table:table-cell office:value-type="string">
            <text:p>0</text:p>
          </table:table-cell>
          <table:table-cell office:value-type="string">
            <text:p>948</text:p>
          </table:table-cell>
          <table:table-cell office:value-type="string">
            <text:p/>
          </table:table-cell>
          <table:table-cell office:value-type="string">
            <text:p>tc-create-app</text:p>
          </table:table-cell>
          <table:table-cell office:value-type="string">
            <text:p>False</text:p>
          </table:table-cell>
          <table:table-cell office:value-type="string">
            <text:p>71</text:p>
          </table:table-cell>
          <table:table-cell office:value-type="string">
            <text:p>2022-02-22T21:12:10.659Z</text:p>
          </table:table-cell>
          <table:table-cell office:value-type="string">
            <text:p/>
          </table:table-cell>
          <table:table-cell office:value-type="string">
            <text:p>datatable-translatable, gitea-react-toolkit, markdown-translatable, scripture-resources-rcl, usfm-js, uw-content-validation, @unfoldingword/eslint-config</text:p>
          </table:table-cell>
          <table:table-cell office:value-type="string">
            <text:p>unfoldingWord/tc-create-app</text:p>
          </table:table-cell>
          <table:table-cell office:value-type="string">
            <text:p>ancientTexts-net, RoyalSix, klappy, dependabot[bot], mandolyte, Sterling (Jay) Scott, actions-user, dependabot-preview[bot], jag3773, PhotoNomad0, birchamp</text:p>
          </table:table-cell>
          <table:table-cell office:value-type="string">
            <text:p>0</text:p>
          </table:table-cell>
          <table:table-cell office:value-type="string">
            <text:p>0</text:p>
          </table:table-cell>
          <table:table-cell office:value-type="string">
            <text:p>https://github.com/unfoldingWord-box3/tc-create-poc</text:p>
          </table:table-cell>
          <table:table-cell office:value-type="string">
            <text:p>2021-12-03T15:55:03Z</text:p>
          </table:table-cell>
        </table:table-row>
        <table:table-row>
          <table:table-cell office:value-type="string">
            <text:p>uw-data-tools</text:p>
          </table:table-cell>
          <table:table-cell office:value-type="string">
            <text:p>unfoldingWord-box3</text:p>
          </table:table-cell>
          <table:table-cell office:value-type="string">
            <text:p>Jupyter Notebook</text:p>
          </table:table-cell>
          <table:table-cell office:value-type="string">
            <text:p>False</text:p>
          </table:table-cell>
          <table:table-cell office:value-type="string">
            <text:p>False</text:p>
          </table:table-cell>
          <table:table-cell office:value-type="string">
            <text:p>2021-11-30T10:14:35Z</text:p>
          </table:table-cell>
          <table:table-cell office:value-type="string">
            <text:p>2021-11-30T10:14:19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text:p>
          </table:table-cell>
          <table:table-cell office:value-type="string">
            <text:p>0</text:p>
          </table:table-cell>
          <table:table-cell office:value-type="string">
            <text:p>0</text:p>
          </table:table-cell>
          <table:table-cell office:value-type="string">
            <text:p>https://github.com/unfoldingWord-box3/uw-data-tools</text:p>
          </table:table-cell>
          <table:table-cell office:value-type="string">
            <text:p>2021-11-30T10:14:38Z</text:p>
          </table:table-cell>
        </table:table-row>
        <table:table-row>
          <table:table-cell office:value-type="string">
            <text:p>simple-text-edito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23:50:37Z</text:p>
          </table:table-cell>
          <table:table-cell office:value-type="string">
            <text:p>2022-05-09T18:19:08Z</text:p>
          </table:table-cell>
          <table:table-cell office:value-type="string">
            <text:p/>
          </table:table-cell>
          <table:table-cell office:value-type="string">
            <text:p>1</text:p>
          </table:table-cell>
          <table:table-cell office:value-type="string">
            <text:p>0</text:p>
          </table:table-cell>
          <table:table-cell office:value-type="string">
            <text:p>21</text:p>
          </table:table-cell>
          <table:table-cell office:value-type="string">
            <text:p/>
          </table:table-cell>
          <table:table-cell office:value-type="string">
            <text:p>simple-text-edito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imple-text-editor-rcl</text:p>
          </table:table-cell>
          <table:table-cell office:value-type="string">
            <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app</text:p>
          </table:table-cell>
          <table:table-cell office:value-type="string">
            <text:p>2021-11-29T20:26:55Z</text:p>
          </table:table-cell>
        </table:table-row>
        <table:table-row>
          <table:table-cell office:value-type="string">
            <text:p>gateway-edi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1-22T13:29:02Z</text:p>
          </table:table-cell>
          <table:table-cell office:value-type="string">
            <text:p>2021-11-22T13:29:02Z</text:p>
          </table:table-cell>
          <table:table-cell office:value-type="string">
            <text:p/>
          </table:table-cell>
          <table:table-cell office:value-type="string">
            <text:p>2</text:p>
          </table:table-cell>
          <table:table-cell office:value-type="string">
            <text:p>0</text:p>
          </table:table-cell>
          <table:table-cell office:value-type="string">
            <text:p>852</text:p>
          </table:table-cell>
          <table:table-cell office:value-type="string">
            <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c-ui-toolkit, translation-helps-rcl, word-aligner</text:p>
          </table:table-cell>
          <table:table-cell office:value-type="string">
            <text:p/>
          </table:table-cell>
          <table:table-cell office:value-type="string">
            <text:p>PhotoNomad0, mannycolon, Joel-C-Johnson, jincypjose</text:p>
          </table:table-cell>
          <table:table-cell office:value-type="string">
            <text:p>0</text:p>
          </table:table-cell>
          <table:table-cell office:value-type="string">
            <text:p>0</text:p>
          </table:table-cell>
          <table:table-cell office:value-type="string">
            <text:p>https://github.com/unfoldingWord-box3/gateway-edit-POC</text:p>
          </table:table-cell>
          <table:table-cell office:value-type="string">
            <text:p>2021-11-22T13:29:05Z</text:p>
          </table:table-cell>
        </table:table-row>
        <table:table-row>
          <table:table-cell office:value-type="string">
            <text:p>obs-pdf-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26T01:31:57Z</text:p>
          </table:table-cell>
          <table:table-cell office:value-type="string">
            <text:p>2023-04-26T01:31:54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obs-pdf-poc</text:p>
          </table:table-cell>
          <table:table-cell office:value-type="string">
            <text:p>2021-11-03T19:29:18Z</text:p>
          </table:table-cell>
        </table:table-row>
        <table:table-row>
          <table:table-cell office:value-type="string">
            <text:p>lexicon-poc</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1-10-20T10:56:21Z</text:p>
          </table:table-cell>
          <table:table-cell office:value-type="string">
            <text:p>2021-10-20T10:56:06Z</text:p>
          </table:table-cell>
          <table:table-cell office:value-type="string">
            <text:p/>
          </table:table-cell>
          <table:table-cell office:value-type="string">
            <text:p>0</text:p>
          </table:table-cell>
          <table:table-cell office:value-type="string">
            <text:p>0</text:p>
          </table:table-cell>
          <table:table-cell office:value-type="string">
            <text:p>13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text:p>
          </table:table-cell>
          <table:table-cell office:value-type="string">
            <text:p>0</text:p>
          </table:table-cell>
          <table:table-cell office:value-type="string">
            <text:p>0</text:p>
          </table:table-cell>
          <table:table-cell office:value-type="string">
            <text:p>https://github.com/unfoldingWord-box3/lexicon-poc</text:p>
          </table:table-cell>
          <table:table-cell office:value-type="string">
            <text:p>2021-10-20T10:56:31Z</text:p>
          </table:table-cell>
        </table:table-row>
        <table:table-row>
          <table:table-cell office:value-type="string">
            <text:p>anchor-alignmen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7-21T18:55:52Z</text:p>
          </table:table-cell>
          <table:table-cell office:value-type="string">
            <text:p>2021-07-06T04:48:26Z</text:p>
          </table:table-cell>
          <table:table-cell office:value-type="string">
            <text:p/>
          </table:table-cell>
          <table:table-cell office:value-type="string">
            <text:p>2</text:p>
          </table:table-cell>
          <table:table-cell office:value-type="string">
            <text:p>2</text:p>
          </table:table-cell>
          <table:table-cell office:value-type="string">
            <text:p>23</text:p>
          </table:table-cell>
          <table:table-cell office:value-type="string">
            <text:p/>
          </table:table-cell>
          <table:table-cell office:value-type="string">
            <text:p>anchor-alignment-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ignment-editor-rcl, bible-reference-rcl, gitea-react-toolkit, string-punctuation-tokenizer</text:p>
          </table:table-cell>
          <table:table-cell office:value-type="string">
            <text:p/>
          </table:table-cell>
          <table:table-cell office:value-type="string">
            <text:p>ancientTexts-net, klappy, themikejr</text:p>
          </table:table-cell>
          <table:table-cell office:value-type="string">
            <text:p>0</text:p>
          </table:table-cell>
          <table:table-cell office:value-type="string">
            <text:p>0</text:p>
          </table:table-cell>
          <table:table-cell office:value-type="string">
            <text:p>https://github.com/unfoldingWord-box3/anchor-alignment-poc</text:p>
          </table:table-cell>
          <table:table-cell office:value-type="string">
            <text:p>2021-08-09T17:50:41Z</text:p>
          </table:table-cell>
        </table:table-row>
        <table:table-row>
          <table:table-cell office:value-type="string">
            <text:p>graphql-catalog-nex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6-08T15:35:33Z</text:p>
          </table:table-cell>
          <table:table-cell office:value-type="string">
            <text:p>2021-06-08T15:35:20Z</text:p>
          </table:table-cell>
          <table:table-cell office:value-type="string">
            <text:p/>
          </table:table-cell>
          <table:table-cell office:value-type="string">
            <text:p>3</text:p>
          </table:table-cell>
          <table:table-cell office:value-type="string">
            <text:p>0</text:p>
          </table:table-cell>
          <table:table-cell office:value-type="string">
            <text:p>8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kavitharaju, abelpz</text:p>
          </table:table-cell>
          <table:table-cell office:value-type="string">
            <text:p>0</text:p>
          </table:table-cell>
          <table:table-cell office:value-type="string">
            <text:p>0</text:p>
          </table:table-cell>
          <table:table-cell office:value-type="string">
            <text:p>https://github.com/unfoldingWord-box3/graphql-catalog-next</text:p>
          </table:table-cell>
          <table:table-cell office:value-type="string">
            <text:p>2021-06-08T15:35:23Z</text:p>
          </table:table-cell>
        </table:table-row>
        <table:table-row>
          <table:table-cell office:value-type="string">
            <text:p>content-validatio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29T11:54:08Z</text:p>
          </table:table-cell>
          <table:table-cell office:value-type="string">
            <text:p>2021-03-29T11:54:05Z</text:p>
          </table:table-cell>
          <table:table-cell office:value-type="string">
            <text:p/>
          </table:table-cell>
          <table:table-cell office:value-type="string">
            <text:p>8</text:p>
          </table:table-cell>
          <table:table-cell office:value-type="string">
            <text:p>0</text:p>
          </table:table-cell>
          <table:table-cell office:value-type="string">
            <text:p>88</text:p>
          </table:table-cell>
          <table:table-cell office:value-type="string">
            <text:p/>
          </table:table-cell>
          <table:table-cell office:value-type="string">
            <text:p>content-validation-app</text:p>
          </table:table-cell>
          <table:table-cell office:value-type="string">
            <text:p>False</text:p>
          </table:table-cell>
          <table:table-cell office:value-type="string">
            <text:p>187</text:p>
          </table:table-cell>
          <table:table-cell office:value-type="string">
            <text:p>2020-09-16T21:52:51.640Z</text:p>
          </table:table-cell>
          <table:table-cell office:value-type="string">
            <text:p/>
          </table:table-cell>
          <table:table-cell office:value-type="string">
            <text:p>uw-content-validation</text:p>
          </table:table-cell>
          <table:table-cell office:value-type="string">
            <text:p/>
          </table:table-cell>
          <table:table-cell office:value-type="string">
            <text:p>PhotoNomad0, mandolyte</text:p>
          </table:table-cell>
          <table:table-cell office:value-type="string">
            <text:p>0</text:p>
          </table:table-cell>
          <table:table-cell office:value-type="string">
            <text:p>0</text:p>
          </table:table-cell>
          <table:table-cell office:value-type="string">
            <text:p>https://github.com/unfoldingWord-box3/content-validation-app</text:p>
          </table:table-cell>
          <table:table-cell office:value-type="string">
            <text:p>2021-03-29T11:54:10Z</text:p>
          </table:table-cell>
        </table:table-row>
        <table:table-row>
          <table:table-cell office:value-type="string">
            <text:p>admi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12T02:03:11Z</text:p>
          </table:table-cell>
          <table:table-cell office:value-type="string">
            <text:p>2021-03-12T02:03:07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admi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translation-helps-rcl, resource-workspace-rcl</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admin-app</text:p>
          </table:table-cell>
          <table:table-cell office:value-type="string">
            <text:p>2021-03-12T02:03:10Z</text:p>
          </table:table-cell>
        </table:table-row>
        <table:table-row>
          <table:table-cell office:value-type="string">
            <text:p>greek-apparatus-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2-18T21:03:03Z</text:p>
          </table:table-cell>
          <table:table-cell office:value-type="string">
            <text:p>2020-12-14T15:55:47Z</text:p>
          </table:table-cell>
          <table:table-cell office:value-type="string">
            <text:p/>
          </table:table-cell>
          <table:table-cell office:value-type="string">
            <text:p>21</text:p>
          </table:table-cell>
          <table:table-cell office:value-type="string">
            <text:p>0</text:p>
          </table:table-cell>
          <table:table-cell office:value-type="string">
            <text:p>95</text:p>
          </table:table-cell>
          <table:table-cell office:value-type="string">
            <text:p/>
          </table:table-cell>
          <table:table-cell office:value-type="string">
            <text:p>greek-apparatus-app</text:p>
          </table:table-cell>
          <table:table-cell office:value-type="string">
            <text:p>False</text:p>
          </table:table-cell>
          <table:table-cell office:value-type="string">
            <text:p>70</text:p>
          </table:table-cell>
          <table:table-cell office:value-type="string">
            <text:p>2020-12-11T16:05:46.321Z</text:p>
          </table:table-cell>
          <table:table-cell office:value-type="string">
            <text:p/>
          </table:table-cell>
          <table:table-cell office:value-type="string">
            <text:p>bible-reference-rcl, datatable-translatable, gitea-react-toolkit, scripture-resources-rcl, string-punctuation-tokenizer, usfm-js</text:p>
          </table:table-cell>
          <table:table-cell office:value-type="string">
            <text:p/>
          </table:table-cell>
          <table:table-cell office:value-type="string">
            <text:p>richmahn, mannycolon, ancientTexts-net</text:p>
          </table:table-cell>
          <table:table-cell office:value-type="string">
            <text:p>0</text:p>
          </table:table-cell>
          <table:table-cell office:value-type="string">
            <text:p>0</text:p>
          </table:table-cell>
          <table:table-cell office:value-type="string">
            <text:p>https://github.com/unfoldingWord-box3/greek-apparatus-app</text:p>
          </table:table-cell>
          <table:table-cell office:value-type="string">
            <text:p>2021-02-11T13:51:27Z</text:p>
          </table:table-cell>
        </table:table-row>
        <table:table-row>
          <table:table-cell office:value-type="string">
            <text:p>alignment-ml</text:p>
          </table:table-cell>
          <table:table-cell office:value-type="string">
            <text:p>unfoldingWord-box3</text:p>
          </table:table-cell>
          <table:table-cell office:value-type="string">
            <text:p>Jupyter Notebook</text:p>
          </table:table-cell>
          <table:table-cell office:value-type="string">
            <text:p>False</text:p>
          </table:table-cell>
          <table:table-cell office:value-type="string">
            <text:p>True</text:p>
          </table:table-cell>
          <table:table-cell office:value-type="string">
            <text:p>2021-01-08T22:57:49Z</text:p>
          </table:table-cell>
          <table:table-cell office:value-type="string">
            <text:p>2021-01-08T22:57:38Z</text:p>
          </table:table-cell>
          <table:table-cell office:value-type="string">
            <text:p/>
          </table:table-cell>
          <table:table-cell office:value-type="string">
            <text:p>0</text:p>
          </table:table-cell>
          <table:table-cell office:value-type="string">
            <text:p>0</text:p>
          </table:table-cell>
          <table:table-cell office:value-type="string">
            <text:p>13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alignment-ml</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alignment-ml</text:p>
          </table:table-cell>
          <table:table-cell office:value-type="string">
            <text:p>2021-01-08T22:57:52Z</text:p>
          </table:table-cell>
        </table:table-row>
        <table:table-row>
          <table:table-cell office:value-type="string">
            <text:p>book-package-view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19T16:22:36Z</text:p>
          </table:table-cell>
          <table:table-cell office:value-type="string">
            <text:p>2020-10-19T16:21:53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book-package-viewer-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book-package-viewer-poc</text:p>
          </table:table-cell>
          <table:table-cell office:value-type="string">
            <text:p>2020-10-21T20:48:29Z</text:p>
          </table:table-cell>
        </table:table-row>
        <table:table-row>
          <table:table-cell office:value-type="string">
            <text:p>pdf-genera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09T16:44:00Z</text:p>
          </table:table-cell>
          <table:table-cell office:value-type="string">
            <text:p>2020-10-09T16:43:56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pdf-gener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cripture-resources-rcl, string-punctuation-tokenizer, tc-source-content-updater, tsv-groupdata-parse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pdf-generator</text:p>
          </table:table-cell>
          <table:table-cell office:value-type="string">
            <text:p>2020-10-09T16:44:02Z</text:p>
          </table:table-cell>
        </table:table-row>
        <table:table-row>
          <table:table-cell office:value-type="string">
            <text:p>gitea-offlin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13:35:32Z</text:p>
          </table:table-cell>
          <table:table-cell office:value-type="string">
            <text:p>2020-08-12T19:36:04Z</text:p>
          </table:table-cell>
          <table:table-cell office:value-type="string">
            <text:p/>
          </table:table-cell>
          <table:table-cell office:value-type="string">
            <text:p>20</text:p>
          </table:table-cell>
          <table:table-cell office:value-type="string">
            <text:p>20</text:p>
          </table:table-cell>
          <table:table-cell office:value-type="string">
            <text:p>2</text:p>
          </table:table-cell>
          <table:table-cell office:value-type="string">
            <text:p/>
          </table:table-cell>
          <table:table-cell office:value-type="string">
            <text:p>gitea-offlin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unfoldingword/eslint-config, markdown-translatable</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gitea-offline-poc</text:p>
          </table:table-cell>
          <table:table-cell office:value-type="string">
            <text:p>2020-08-12T19:36:13Z</text:p>
          </table:table-cell>
        </table:table-row>
        <table:table-row>
          <table:table-cell office:value-type="string">
            <text:p>sample-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07-28T16:44:35Z</text:p>
          </table:table-cell>
          <table:table-cell office:value-type="string">
            <text:p>2020-07-28T16:43:21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sample-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0</text:p>
          </table:table-cell>
          <table:table-cell office:value-type="string">
            <text:p>0</text:p>
          </table:table-cell>
          <table:table-cell office:value-type="string">
            <text:p>https://github.com/unfoldingWord-box3/sample-react-component-library</text:p>
          </table:table-cell>
          <table:table-cell office:value-type="string">
            <text:p>2020-07-28T16:44:37Z</text:p>
          </table:table-cell>
        </table:table-row>
        <table:table-row>
          <table:table-cell office:value-type="string">
            <text:p>scripture-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30T20:47:55Z</text:p>
          </table:table-cell>
          <table:table-cell office:value-type="string">
            <text:p>2020-07-22T12:31:01Z</text:p>
          </table:table-cell>
          <table:table-cell office:value-type="string">
            <text:p/>
          </table:table-cell>
          <table:table-cell office:value-type="string">
            <text:p>10</text:p>
          </table:table-cell>
          <table:table-cell office:value-type="string">
            <text:p>10</text:p>
          </table:table-cell>
          <table:table-cell office:value-type="string">
            <text:p>73</text:p>
          </table:table-cell>
          <table:table-cell office:value-type="string">
            <text:p/>
          </table:table-cell>
          <table:table-cell office:value-type="string">
            <text:p>scripture-as-grap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mvahowe, jag3773</text:p>
          </table:table-cell>
          <table:table-cell office:value-type="string">
            <text:p>0</text:p>
          </table:table-cell>
          <table:table-cell office:value-type="string">
            <text:p>0</text:p>
          </table:table-cell>
          <table:table-cell office:value-type="string">
            <text:p>https://github.com/unfoldingWord-box3/scripture-as-graph</text:p>
          </table:table-cell>
          <table:table-cell office:value-type="string">
            <text:p>2020-07-22T12:31:12Z</text:p>
          </table:table-cell>
        </table:table-row>
        <table:table-row>
          <table:table-cell office:value-type="string">
            <text:p>lang-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5T01:22:08Z</text:p>
          </table:table-cell>
          <table:table-cell office:value-type="string">
            <text:p>2020-07-21T13:00:01Z</text:p>
          </table:table-cell>
          <table:table-cell office:value-type="string">
            <text:p/>
          </table:table-cell>
          <table:table-cell office:value-type="string">
            <text:p>5</text:p>
          </table:table-cell>
          <table:table-cell office:value-type="string">
            <text:p>5</text:p>
          </table:table-cell>
          <table:table-cell office:value-type="string">
            <text:p>22</text:p>
          </table:table-cell>
          <table:table-cell office:value-type="string">
            <text:p/>
          </table:table-cell>
          <table:table-cell office:value-type="string">
            <text:p>language-databas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vanmhale, jag3773</text:p>
          </table:table-cell>
          <table:table-cell office:value-type="string">
            <text:p>0</text:p>
          </table:table-cell>
          <table:table-cell office:value-type="string">
            <text:p>0</text:p>
          </table:table-cell>
          <table:table-cell office:value-type="string">
            <text:p>https://github.com/unfoldingWord-box3/lang-as-graph</text:p>
          </table:table-cell>
          <table:table-cell office:value-type="string">
            <text:p>2020-07-21T13:00:12Z</text:p>
          </table:table-cell>
        </table:table-row>
        <table:table-row>
          <table:table-cell office:value-type="string">
            <text:p>uw-metadata-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0T17:08:07Z</text:p>
          </table:table-cell>
          <table:table-cell office:value-type="string">
            <text:p>2020-05-07T19:30:02Z</text:p>
          </table:table-cell>
          <table:table-cell office:value-type="string">
            <text:p/>
          </table:table-cell>
          <table:table-cell office:value-type="string">
            <text:p>5</text:p>
          </table:table-cell>
          <table:table-cell office:value-type="string">
            <text:p>5</text:p>
          </table:table-cell>
          <table:table-cell office:value-type="string">
            <text:p>12</text:p>
          </table:table-cell>
          <table:table-cell office:value-type="string">
            <text:p/>
          </table:table-cell>
          <table:table-cell office:value-type="string">
            <text:p>scripture-burrito-react-jsonschema-for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uw-metadata-react-component-library</text:p>
          </table:table-cell>
          <table:table-cell office:value-type="string">
            <text:p>2020-05-07T19:30:12Z</text:p>
          </table:table-cell>
        </table:table-row>
        <table:table-row>
          <table:table-cell office:value-type="string">
            <text:p>react-to-electron-ac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18T19:24:40Z</text:p>
          </table:table-cell>
          <table:table-cell office:value-type="string">
            <text:p>2020-05-06T12:37:26Z</text:p>
          </table:table-cell>
          <table:table-cell office:value-type="string">
            <text:p/>
          </table:table-cell>
          <table:table-cell office:value-type="string">
            <text:p>2</text:p>
          </table:table-cell>
          <table:table-cell office:value-type="string">
            <text:p>2</text:p>
          </table:table-cell>
          <table:table-cell office:value-type="string">
            <text:p>29</text:p>
          </table:table-cell>
          <table:table-cell office:value-type="string">
            <text:p/>
          </table:table-cell>
          <table:table-cell office:value-type="string">
            <text:p>react-to-electron-a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ok-package-app, mandolyte/rrouter</text:p>
          </table:table-cell>
          <table:table-cell office:value-type="string">
            <text:p>mandolyte, dependabot[bot]</text:p>
          </table:table-cell>
          <table:table-cell office:value-type="string">
            <text:p>0</text:p>
          </table:table-cell>
          <table:table-cell office:value-type="string">
            <text:p>0</text:p>
          </table:table-cell>
          <table:table-cell office:value-type="string">
            <text:p>https://github.com/unfoldingWord-box3/react-to-electron-action</text:p>
          </table:table-cell>
          <table:table-cell office:value-type="string">
            <text:p>2020-05-06T12:37:30Z</text:p>
          </table:table-cell>
        </table:table-row>
        <table:table-row>
          <table:table-cell office:value-type="string">
            <text:p>translation-manag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11T11:37:33Z</text:p>
          </table:table-cell>
          <table:table-cell office:value-type="string">
            <text:p>2020-01-28T22:33:18Z</text:p>
          </table:table-cell>
          <table:table-cell office:value-type="string">
            <text:p/>
          </table:table-cell>
          <table:table-cell office:value-type="string">
            <text:p>24</text:p>
          </table:table-cell>
          <table:table-cell office:value-type="string">
            <text:p>24</text:p>
          </table:table-cell>
          <table:table-cell office:value-type="string">
            <text:p>5</text:p>
          </table:table-cell>
          <table:table-cell office:value-type="string">
            <text:p/>
          </table:table-cell>
          <table:table-cell office:value-type="string">
            <text:p>translation-manager-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translation-manager-poc</text:p>
          </table:table-cell>
          <table:table-cell office:value-type="string">
            <text:p>2020-01-28T22:33:45Z</text:p>
          </table:table-cell>
        </table:table-row>
        <table:table-row>
          <table:table-cell office:value-type="string">
            <text:p>td-neo4j-poc</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19-04-25T18:44:28Z</text:p>
          </table:table-cell>
          <table:table-cell office:value-type="string">
            <text:p>2019-04-25T18:44:27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box3/td-neo4j-poc</text:p>
          </table:table-cell>
          <table:table-cell office:value-type="string">
            <text:p>2019-04-25T18:44:29Z</text:p>
          </table:table-cell>
        </table:table-row>
        <table:table-row>
          <table:table-cell office:value-type="string">
            <text:p>tsv-edi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10T00:13:59Z</text:p>
          </table:table-cell>
          <table:table-cell office:value-type="string">
            <text:p>2019-04-10T00:12:52Z</text:p>
          </table:table-cell>
          <table:table-cell office:value-type="string">
            <text:p/>
          </table:table-cell>
          <table:table-cell office:value-type="string">
            <text:p>0</text:p>
          </table:table-cell>
          <table:table-cell office:value-type="string">
            <text:p>0</text:p>
          </table:table-cell>
          <table:table-cell office:value-type="string">
            <text:p>36</text:p>
          </table:table-cell>
          <table:table-cell office:value-type="string">
            <text:p/>
          </table:table-cell>
          <table:table-cell office:value-type="string">
            <text:p>tsv-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sv-editor</text:p>
          </table:table-cell>
          <table:table-cell office:value-type="string">
            <text:p>2019-04-10T00:14:01Z</text:p>
          </table:table-cell>
        </table:table-row>
        <table:table-row>
          <table:table-cell office:value-type="string">
            <text:p>translation-proces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3-22T14:32:16Z</text:p>
          </table:table-cell>
          <table:table-cell office:value-type="string">
            <text:p>2019-03-22T14:30:55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translation-proces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ion-process</text:p>
          </table:table-cell>
          <table:table-cell office:value-type="string">
            <text:p>2019-03-22T14:32:18Z</text:p>
          </table:table-cell>
        </table:table-row>
        <table:table-row>
          <table:table-cell office:value-type="string">
            <text:p>tc-study/bible-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ible-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linked-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linked-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mobi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mob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toolkit/resource-down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toolkit/resource-down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resource-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resource-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tc-stud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oc-gener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toc-gener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che-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che-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che-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manag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door43-ap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door43-ap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linked-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linked-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naviga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engin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builder-engi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c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sta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st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orkflow</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workflo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storag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stor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ssage-sets-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ssage-se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ction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acti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dapt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adapt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bundl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bundl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ch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ca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talog</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catalo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rs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pars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elec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sele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igna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signa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typ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cripture-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hared</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hare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tudy-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tudy-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oc-generator-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oc-generator-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academy-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academy-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note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note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question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question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ink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words-link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word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i-contro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ui-contr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nified-catalog-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unified-catalog-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sfm-processo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usfm-process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oce-editor-tools/@oce-editor-tools/bas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base-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base</text:p>
          </table:table-cell>
          <table:table-cell office:value-type="string">
            <text:p/>
          </table:table-cell>
          <table:table-cell office:value-type="string">
            <text:p>1870</text:p>
          </table:table-cell>
          <table:table-cell office:value-type="string">
            <text:p>2024-01-10T09:41:28.021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core</text:p>
          </table:table-cell>
          <table:table-cell office:value-type="string">
            <text:p/>
          </table:table-cell>
          <table:table-cell office:value-type="string">
            <text:p>426</text:p>
          </table:table-cell>
          <table:table-cell office:value-type="string">
            <text:p>2024-01-10T09:45:57.004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pk</text:p>
          </table:table-cell>
          <table:table-cell office:value-type="string">
            <text:p/>
          </table:table-cell>
          <table:table-cell office:value-type="string">
            <text:p>134</text:p>
          </table:table-cell>
          <table:table-cell office:value-type="string">
            <text:p>2024-01-10T09:47:45.958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core</text:p>
          </table:table-cell>
          <table:table-cell office:value-type="string">
            <text:p/>
          </table:table-cell>
          <table:table-cell office:value-type="string">
            <text:p>665</text:p>
          </table:table-cell>
          <table:table-cell office:value-type="string">
            <text:p>2024-01-10T09:42:28.55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pk</text:p>
          </table:table-cell>
          <table:table-cell office:value-type="string">
            <text:p/>
          </table:table-cell>
          <table:table-cell office:value-type="string">
            <text:p>354</text:p>
          </table:table-cell>
          <table:table-cell office:value-type="string">
            <text:p>2024-01-10T09:45:17.176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simp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simple</text:p>
          </table:table-cell>
          <table:table-cell office:value-type="string">
            <text:p/>
          </table:table-cell>
          <table:table-cell office:value-type="string">
            <text:p>401</text:p>
          </table:table-cell>
          <table:table-cell office:value-type="string">
            <text:p>2024-01-10T09:45:39.01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pk-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pk-alig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 string-punctuation-tokenizer, word-aligner-rc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verse-m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verse-mapper</text:p>
          </table:table-cell>
          <table:table-cell office:value-type="string">
            <text:p/>
          </table:table-cell>
          <table:table-cell office:value-type="string">
            <text:p>100</text:p>
          </table:table-cell>
          <table:table-cell office:value-type="string">
            <text:p>2024-01-10T09:46:28.087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findr/@findr/mu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mu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perf</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perf</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rea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re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tex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dcs-packages/dcs-js-examp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js-ex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js</text:p>
          </table:table-cell>
          <table:table-cell office:value-type="string">
            <text:p/>
          </table:table-cell>
          <table:table-cell office:value-type="string">
            <text:p>784</text:p>
          </table:table-cell>
          <table:table-cell office:value-type="string">
            <text:p>2022-11-02T13:18:25.384Z</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vite-proje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vite-proje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checking-app-theia/Checking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Checking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CheckingToo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Checking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startChecking</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star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lectron-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mpty</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emp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
      <table:table table:name="JavaScript TypeScript">
        <table:table-row>
          <table:table-cell office:value-type="string">
            <text:p>repo name</text:p>
          </table:table-cell>
          <table:table-cell office:value-type="string">
            <text:p>organization name</text:p>
          </table:table-cell>
          <table:table-cell office:value-type="string">
            <text:p>language</text:p>
          </table:table-cell>
          <table:table-cell office:value-type="string">
            <text:p>archived</text:p>
          </table:table-cell>
          <table:table-cell office:value-type="string">
            <text:p>is fork</text:p>
          </table:table-cell>
          <table:table-cell office:value-type="string">
            <text:p>pushed at</text:p>
          </table:table-cell>
          <table:table-cell office:value-type="string">
            <text:p>last commit date</text:p>
          </table:table-cell>
          <table:table-cell office:value-type="string">
            <text:p>last release date</text:p>
          </table:table-cell>
          <table:table-cell office:value-type="string">
            <text:p>open issues count</text:p>
          </table:table-cell>
          <table:table-cell office:value-type="string">
            <text:p>open prs count</text:p>
          </table:table-cell>
          <table:table-cell office:value-type="string">
            <text:p>commit count</text:p>
          </table:table-cell>
          <table:table-cell office:value-type="string">
            <text:p>git submodules</text:p>
          </table:table-cell>
          <table:table-cell office:value-type="string">
            <text:p>npmjs package name</text:p>
          </table:table-cell>
          <table:table-cell office:value-type="string">
            <text:p>npm is deprecated</text:p>
          </table:table-cell>
          <table:table-cell office:value-type="string">
            <text:p>npmjs downloads last year</text:p>
          </table:table-cell>
          <table:table-cell office:value-type="string">
            <text:p>npmjs last published</text:p>
          </table:table-cell>
          <table:table-cell office:value-type="string">
            <text:p>npmjs used by</text:p>
          </table:table-cell>
          <table:table-cell office:value-type="string">
            <text:p>npmjs uses</text:p>
          </table:table-cell>
          <table:table-cell office:value-type="string">
            <text:p>github dependents</text:p>
          </table:table-cell>
          <table:table-cell office:value-type="string">
            <text:p>github contributors</text:p>
          </table:table-cell>
          <table:table-cell office:value-type="string">
            <text:p>github release count</text:p>
          </table:table-cell>
          <table:table-cell office:value-type="string">
            <text:p>github downloads</text:p>
          </table:table-cell>
          <table:table-cell office:value-type="string">
            <text:p>repo url</text:p>
          </table:table-cell>
          <table:table-cell office:value-type="string">
            <text:p>last edit date</text:p>
          </table:table-cell>
        </table:table-row>
        <table:table-row>
          <table:table-cell office:value-type="string">
            <text:p>wordMAP-usfm</text:p>
          </table:table-cell>
          <table:table-cell office:value-type="string">
            <text:p>unfoldingWord</text:p>
          </table:table-cell>
          <table:table-cell office:value-type="string">
            <text:p>TypeScript</text:p>
          </table:table-cell>
          <table:table-cell office:value-type="string">
            <text:p>True</text:p>
          </table:table-cell>
          <table:table-cell office:value-type="string">
            <text:p>False</text:p>
          </table:table-cell>
          <table:table-cell office:value-type="string">
            <text:p>2019-03-05T21:01:50Z</text:p>
          </table:table-cell>
          <table:table-cell office:value-type="string">
            <text:p>2019-03-05T21:01:16Z</text:p>
          </table:table-cell>
          <table:table-cell office:value-type="string">
            <text:p/>
          </table:table-cell>
          <table:table-cell office:value-type="string">
            <text:p>0</text:p>
          </table:table-cell>
          <table:table-cell office:value-type="string">
            <text:p>0</text:p>
          </table:table-cell>
          <table:table-cell office:value-type="string">
            <text:p>85</text:p>
          </table:table-cell>
          <table:table-cell office:value-type="string">
            <text:p/>
          </table:table-cell>
          <table:table-cell office:value-type="string">
            <text:p>wordmap-usf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wordmap-lexer</text:p>
          </table:table-cell>
          <table:table-cell office:value-type="string">
            <text:p/>
          </table:table-cell>
          <table:table-cell office:value-type="string">
            <text:p>da1nerd, klappy, mannycolon, dependabot-support, bspidel</text:p>
          </table:table-cell>
          <table:table-cell office:value-type="string">
            <text:p>0</text:p>
          </table:table-cell>
          <table:table-cell office:value-type="string">
            <text:p>0</text:p>
          </table:table-cell>
          <table:table-cell office:value-type="string">
            <text:p>https://github.com/unfoldingWord/wordMAP-usfm</text:p>
          </table:table-cell>
          <table:table-cell office:value-type="string">
            <text:p>2026-06-23T11:19:16Z</text:p>
          </table:table-cell>
        </table:table-row>
        <table:table-row>
          <table:table-cell office:value-type="string">
            <text:p>bp-assistant-skil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20:24:02Z</text:p>
          </table:table-cell>
          <table:table-cell office:value-type="string">
            <text:p>2026-06-22T20:24:00Z</text:p>
          </table:table-cell>
          <table:table-cell office:value-type="string">
            <text:p/>
          </table:table-cell>
          <table:table-cell office:value-type="string">
            <text:p>1</text:p>
          </table:table-cell>
          <table:table-cell office:value-type="string">
            <text:p>0</text:p>
          </table:table-cell>
          <table:table-cell office:value-type="string">
            <text:p>428</text:p>
          </table:table-cell>
          <table:table-cell office:value-type="string">
            <text:p/>
          </table:table-cell>
          <table:table-cell office:value-type="string">
            <text:p>cskillbp-prompt-over-cod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W Bot, deferredreward, benjamin-test, stephenwunrow, Nightly Issue Bot</text:p>
          </table:table-cell>
          <table:table-cell office:value-type="string">
            <text:p>0</text:p>
          </table:table-cell>
          <table:table-cell office:value-type="string">
            <text:p>0</text:p>
          </table:table-cell>
          <table:table-cell office:value-type="string">
            <text:p>https://github.com/unfoldingWord/bp-assistant-skills</text:p>
          </table:table-cell>
          <table:table-cell office:value-type="string">
            <text:p>2026-06-22T20:24:25Z</text:p>
          </table:table-cell>
        </table:table-row>
        <table:table-row>
          <table:table-cell office:value-type="string">
            <text:p>translation-helps-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23T00:29:35Z</text:p>
          </table:table-cell>
          <table:table-cell office:value-type="string">
            <text:p>2026-06-22T15:03:05Z</text:p>
          </table:table-cell>
          <table:table-cell office:value-type="string">
            <text:p/>
          </table:table-cell>
          <table:table-cell office:value-type="string">
            <text:p>12</text:p>
          </table:table-cell>
          <table:table-cell office:value-type="string">
            <text:p>2</text:p>
          </table:table-cell>
          <table:table-cell office:value-type="string">
            <text:p>839</text:p>
          </table:table-cell>
          <table:table-cell office:value-type="string">
            <text:p/>
          </table:table-cell>
          <table:table-cell office:value-type="string">
            <text:p>translation-helps-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ranslation-helps-mcp</text:p>
          </table:table-cell>
          <table:table-cell office:value-type="string">
            <text:p>klappy, azrasgdc, abelpz, cursoragent, ILindsley, IanLindsley</text:p>
          </table:table-cell>
          <table:table-cell office:value-type="string">
            <text:p>0</text:p>
          </table:table-cell>
          <table:table-cell office:value-type="string">
            <text:p>0</text:p>
          </table:table-cell>
          <table:table-cell office:value-type="string">
            <text:p>https://github.com/unfoldingWord/translation-helps-mcp</text:p>
          </table:table-cell>
          <table:table-cell office:value-type="string">
            <text:p>2026-06-22T15:05:22Z</text:p>
          </table:table-cell>
        </table:table-row>
        <table:table-row>
          <table:table-cell office:value-type="string">
            <text:p>gateway-admi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04:03:54Z</text:p>
          </table:table-cell>
          <table:table-cell office:value-type="string">
            <text:p>2026-06-22T04:03:48Z</text:p>
          </table:table-cell>
          <table:table-cell office:value-type="string">
            <text:p>2024-10-21T20:57:32Z</text:p>
          </table:table-cell>
          <table:table-cell office:value-type="string">
            <text:p>43</text:p>
          </table:table-cell>
          <table:table-cell office:value-type="string">
            <text:p>0</text:p>
          </table:table-cell>
          <table:table-cell office:value-type="string">
            <text:p>347</text:p>
          </table:table-cell>
          <table:table-cell office:value-type="string">
            <text:p/>
          </table:table-cell>
          <table:table-cell office:value-type="string">
            <text:p>gateway-adm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branch-merger, gitea-react-toolkit, markdown-translatable, resource-workspace-rcl, scripture-resources-rcl, single-scripture-rcl, tc-ui-toolkit, translation-helps-rcl, uw-content-validation, uw-tsv-parser, word-aligner</text:p>
          </table:table-cell>
          <table:table-cell office:value-type="string">
            <text:p/>
          </table:table-cell>
          <table:table-cell office:value-type="string">
            <text:p>mandolyte, richmahn, superdav42, theNerd247, mannycolon, birchamp, abelpz, Joel-C-Johnson, PhotoNomad0</text:p>
          </table:table-cell>
          <table:table-cell office:value-type="string">
            <text:p>7</text:p>
          </table:table-cell>
          <table:table-cell office:value-type="string">
            <text:p>0</text:p>
          </table:table-cell>
          <table:table-cell office:value-type="string">
            <text:p>https://github.com/unfoldingWord/gateway-admin</text:p>
          </table:table-cell>
          <table:table-cell office:value-type="string">
            <text:p>2026-06-22T04:03:58Z</text:p>
          </table:table-cell>
        </table:table-row>
        <table:table-row>
          <table:table-cell office:value-type="string">
            <text:p>uw-content-validati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04:01:57Z</text:p>
          </table:table-cell>
          <table:table-cell office:value-type="string">
            <text:p>2026-06-22T03:57:41Z</text:p>
          </table:table-cell>
          <table:table-cell office:value-type="string">
            <text:p/>
          </table:table-cell>
          <table:table-cell office:value-type="string">
            <text:p>81</text:p>
          </table:table-cell>
          <table:table-cell office:value-type="string">
            <text:p>3</text:p>
          </table:table-cell>
          <table:table-cell office:value-type="string">
            <text:p>699</text:p>
          </table:table-cell>
          <table:table-cell office:value-type="string">
            <text:p/>
          </table:table-cell>
          <table:table-cell office:value-type="string">
            <text:p>uw-content-validation</text:p>
          </table:table-cell>
          <table:table-cell office:value-type="string">
            <text:p>False</text:p>
          </table:table-cell>
          <table:table-cell office:value-type="string">
            <text:p>2264</text:p>
          </table:table-cell>
          <table:table-cell office:value-type="string">
            <text:p>2026-06-22T04:01:52.034Z</text:p>
          </table:table-cell>
          <table:table-cell office:value-type="string">
            <text:p>gateway-admin, tc-create-app, catalog-next-toolkit, content-validation-app</text:p>
          </table:table-cell>
          <table:table-cell office:value-type="string">
            <text:p>usfm-js</text:p>
          </table:table-cell>
          <table:table-cell office:value-type="string">
            <text:p>unfoldingWord/gateway-admin, unfoldingWord/tc-create-app</text:p>
          </table:table-cell>
          <table:table-cell office:value-type="string">
            <text:p>RobH123, mandolyte, PhotoNomad0, richmahn, dependabot[bot], jag3773, ancientTexts-net</text:p>
          </table:table-cell>
          <table:table-cell office:value-type="string">
            <text:p>0</text:p>
          </table:table-cell>
          <table:table-cell office:value-type="string">
            <text:p>0</text:p>
          </table:table-cell>
          <table:table-cell office:value-type="string">
            <text:p>https://github.com/unfoldingWord/uw-content-validation</text:p>
          </table:table-cell>
          <table:table-cell office:value-type="string">
            <text:p>2026-06-22T03:58:05Z</text:p>
          </table:table-cell>
        </table:table-row>
        <table:table-row>
          <table:table-cell office:value-type="string">
            <text:p>bp-assista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0T16:42:10Z</text:p>
          </table:table-cell>
          <table:table-cell office:value-type="string">
            <text:p>2026-06-20T16:42:10Z</text:p>
          </table:table-cell>
          <table:table-cell office:value-type="string">
            <text:p/>
          </table:table-cell>
          <table:table-cell office:value-type="string">
            <text:p>0</text:p>
          </table:table-cell>
          <table:table-cell office:value-type="string">
            <text:p>0</text:p>
          </table:table-cell>
          <table:table-cell office:value-type="string">
            <text:p>507</text:p>
          </table:table-cell>
          <table:table-cell office:value-type="string">
            <text:p/>
          </table:table-cell>
          <table:table-cell office:value-type="string">
            <text:p>zulip-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enjamin-test, deferredreward, stephenwunrow, dependabot[bot], claude, bp-assistant bot</text:p>
          </table:table-cell>
          <table:table-cell office:value-type="string">
            <text:p>0</text:p>
          </table:table-cell>
          <table:table-cell office:value-type="string">
            <text:p>0</text:p>
          </table:table-cell>
          <table:table-cell office:value-type="string">
            <text:p>https://github.com/unfoldingWord/bp-assistant</text:p>
          </table:table-cell>
          <table:table-cell office:value-type="string">
            <text:p>2026-06-20T16:42:15Z</text:p>
          </table:table-cell>
        </table:table-row>
        <table:table-row>
          <table:table-cell office:value-type="string">
            <text:p>bt-servan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8T15:02:07Z</text:p>
          </table:table-cell>
          <table:table-cell office:value-type="string">
            <text:p>2026-06-18T15:01:38Z</text:p>
          </table:table-cell>
          <table:table-cell office:value-type="string">
            <text:p/>
          </table:table-cell>
          <table:table-cell office:value-type="string">
            <text:p>105</text:p>
          </table:table-cell>
          <table:table-cell office:value-type="string">
            <text:p>9</text:p>
          </table:table-cell>
          <table:table-cell office:value-type="string">
            <text:p>238</text:p>
          </table:table-cell>
          <table:table-cell office:value-type="string">
            <text:p/>
          </table:table-cell>
          <table:table-cell office:value-type="string">
            <text:p>bt-servan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 deferredreward, sethstoll3</text:p>
          </table:table-cell>
          <table:table-cell office:value-type="string">
            <text:p>0</text:p>
          </table:table-cell>
          <table:table-cell office:value-type="string">
            <text:p>0</text:p>
          </table:table-cell>
          <table:table-cell office:value-type="string">
            <text:p>https://github.com/unfoldingWord/bt-servant-worker</text:p>
          </table:table-cell>
          <table:table-cell office:value-type="string">
            <text:p>2026-06-18T15:03:36Z</text:p>
          </table:table-cell>
        </table:table-row>
        <table:table-row>
          <table:table-cell office:value-type="string">
            <text:p>bt-servant-web-clien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8T14:44:49Z</text:p>
          </table:table-cell>
          <table:table-cell office:value-type="string">
            <text:p>2026-06-18T14:44:06Z</text:p>
          </table:table-cell>
          <table:table-cell office:value-type="string">
            <text:p/>
          </table:table-cell>
          <table:table-cell office:value-type="string">
            <text:p>7</text:p>
          </table:table-cell>
          <table:table-cell office:value-type="string">
            <text:p>1</text:p>
          </table:table-cell>
          <table:table-cell office:value-type="string">
            <text:p>153</text:p>
          </table:table-cell>
          <table:table-cell office:value-type="string">
            <text:p/>
          </table:table-cell>
          <table:table-cell office:value-type="string">
            <text:p>bt-servant-web-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 sethstoll3</text:p>
          </table:table-cell>
          <table:table-cell office:value-type="string">
            <text:p>0</text:p>
          </table:table-cell>
          <table:table-cell office:value-type="string">
            <text:p>0</text:p>
          </table:table-cell>
          <table:table-cell office:value-type="string">
            <text:p>https://github.com/unfoldingWord/bt-servant-web-client</text:p>
          </table:table-cell>
          <table:table-cell office:value-type="string">
            <text:p>2026-06-18T14:44:48Z</text:p>
          </table:table-cell>
        </table:table-row>
        <table:table-row>
          <table:table-cell office:value-type="string">
            <text:p>bt-servant-telegram-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17T21:02:59Z</text:p>
          </table:table-cell>
          <table:table-cell office:value-type="string">
            <text:p>2026-06-17T21:01:39Z</text:p>
          </table:table-cell>
          <table:table-cell office:value-type="string">
            <text:p/>
          </table:table-cell>
          <table:table-cell office:value-type="string">
            <text:p>2</text:p>
          </table:table-cell>
          <table:table-cell office:value-type="string">
            <text:p>0</text:p>
          </table:table-cell>
          <table:table-cell office:value-type="string">
            <text:p>47</text:p>
          </table:table-cell>
          <table:table-cell office:value-type="string">
            <text:p/>
          </table:table-cell>
          <table:table-cell office:value-type="string">
            <text:p>bt-servant-telegram-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nisArger/bt-servant-telegram-gateway</text:p>
          </table:table-cell>
          <table:table-cell office:value-type="string">
            <text:p>DenisArger, IanLindsley, claude, ILindsley</text:p>
          </table:table-cell>
          <table:table-cell office:value-type="string">
            <text:p>0</text:p>
          </table:table-cell>
          <table:table-cell office:value-type="string">
            <text:p>0</text:p>
          </table:table-cell>
          <table:table-cell office:value-type="string">
            <text:p>https://github.com/unfoldingWord/bt-servant-telegram-gateway</text:p>
          </table:table-cell>
          <table:table-cell office:value-type="string">
            <text:p>2026-06-17T21:01:45Z</text:p>
          </table:table-cell>
        </table:table-row>
        <table:table-row>
          <table:table-cell office:value-type="string">
            <text:p>tc-tsv-convert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6-06-17T19:19:57Z</text:p>
          </table:table-cell>
          <table:table-cell office:value-type="string">
            <text:p>2026-06-17T19:19:57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tsv-conver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tsv-converter</text:p>
          </table:table-cell>
          <table:table-cell office:value-type="string">
            <text:p>2026-06-17T19:20:15Z</text:p>
          </table:table-cell>
        </table:table-row>
        <table:table-row>
          <table:table-cell office:value-type="string">
            <text:p>bt-servant-whatsapp-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7T17:56:52Z</text:p>
          </table:table-cell>
          <table:table-cell office:value-type="string">
            <text:p>2026-06-17T17:56:48Z</text:p>
          </table:table-cell>
          <table:table-cell office:value-type="string">
            <text:p/>
          </table:table-cell>
          <table:table-cell office:value-type="string">
            <text:p>9</text:p>
          </table:table-cell>
          <table:table-cell office:value-type="string">
            <text:p>0</text:p>
          </table:table-cell>
          <table:table-cell office:value-type="string">
            <text:p>40</text:p>
          </table:table-cell>
          <table:table-cell office:value-type="string">
            <text:p/>
          </table:table-cell>
          <table:table-cell office:value-type="string">
            <text:p>bt-servant-whatsapp-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0</text:p>
          </table:table-cell>
          <table:table-cell office:value-type="string">
            <text:p>0</text:p>
          </table:table-cell>
          <table:table-cell office:value-type="string">
            <text:p>https://github.com/unfoldingWord/bt-servant-whatsapp-gateway</text:p>
          </table:table-cell>
          <table:table-cell office:value-type="string">
            <text:p>2026-06-17T18:00:01Z</text:p>
          </table:table-cell>
        </table:table-row>
        <table:table-row>
          <table:table-cell office:value-type="string">
            <text:p>tsv-quote-convert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7T06:45:29Z</text:p>
          </table:table-cell>
          <table:table-cell office:value-type="string">
            <text:p>2026-06-17T06:45:25Z</text:p>
          </table:table-cell>
          <table:table-cell office:value-type="string">
            <text:p/>
          </table:table-cell>
          <table:table-cell office:value-type="string">
            <text:p>0</text:p>
          </table:table-cell>
          <table:table-cell office:value-type="string">
            <text:p>0</text:p>
          </table:table-cell>
          <table:table-cell office:value-type="string">
            <text:p>61</text:p>
          </table:table-cell>
          <table:table-cell office:value-type="string">
            <text:p/>
          </table:table-cell>
          <table:table-cell office:value-type="string">
            <text:p>tsv-quote-converters</text:p>
          </table:table-cell>
          <table:table-cell office:value-type="string">
            <text:p/>
          </table:table-cell>
          <table:table-cell office:value-type="string">
            <text:p/>
          </table:table-cell>
          <table:table-cell office:value-type="string">
            <text:p/>
          </table:table-cell>
          <table:table-cell office:value-type="string">
            <text:p>twl-generator, tsv-twl-creation-app, tsv7-tn-cleanup-app, add-gl-quotes-to-tsv-files</text:p>
          </table:table-cell>
          <table:table-cell office:value-type="string">
            <text:p>string-punctuation-tokenizer</text:p>
          </table:table-cell>
          <table:table-cell office:value-type="string">
            <text:p>unfoldingWord/node-cli-add-gl-quotes-to-tsv-files, unfoldingWord/tsv7-tn-cleanup-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quote-converters</text:p>
          </table:table-cell>
          <table:table-cell office:value-type="string">
            <text:p>2026-06-17T06:45:34Z</text:p>
          </table:table-cell>
        </table:table-row>
        <table:table-row>
          <table:table-cell office:value-type="string">
            <text:p>node-twl-gener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21:44:49Z</text:p>
          </table:table-cell>
          <table:table-cell office:value-type="string">
            <text:p>2026-06-16T21:44:35Z</text:p>
          </table:table-cell>
          <table:table-cell office:value-type="string">
            <text:p/>
          </table:table-cell>
          <table:table-cell office:value-type="string">
            <text:p>0</text:p>
          </table:table-cell>
          <table:table-cell office:value-type="string">
            <text:p>0</text:p>
          </table:table-cell>
          <table:table-cell office:value-type="string">
            <text:p>47</text:p>
          </table:table-cell>
          <table:table-cell office:value-type="string">
            <text:p/>
          </table:table-cell>
          <table:table-cell office:value-type="string">
            <text:p>twl-generator</text:p>
          </table:table-cell>
          <table:table-cell office:value-type="string">
            <text:p>False</text:p>
          </table:table-cell>
          <table:table-cell office:value-type="string">
            <text:p>5667</text:p>
          </table:table-cell>
          <table:table-cell office:value-type="string">
            <text:p>2026-06-16T10:00:58.589Z</text:p>
          </table:table-cell>
          <table:table-cell office:value-type="string">
            <text:p>tsv-twl-creation-app</text:p>
          </table:table-cell>
          <table:table-cell office:value-type="string">
            <text:p>tsv-quote-converters, usfm-alignment-remover</text:p>
          </table:table-cell>
          <table:table-cell office:value-type="string">
            <text:p/>
          </table:table-cell>
          <table:table-cell office:value-type="string">
            <text:p>richmahn, rich.mahn@unfoldingword.org</text:p>
          </table:table-cell>
          <table:table-cell office:value-type="string">
            <text:p>0</text:p>
          </table:table-cell>
          <table:table-cell office:value-type="string">
            <text:p>0</text:p>
          </table:table-cell>
          <table:table-cell office:value-type="string">
            <text:p>https://github.com/unfoldingWord/node-twl-generator</text:p>
          </table:table-cell>
          <table:table-cell office:value-type="string">
            <text:p>2026-06-16T21:45:05Z</text:p>
          </table:table-cell>
        </table:table-row>
        <table:table-row>
          <table:table-cell office:value-type="string">
            <text:p>tsv-twl-creation-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10:51:14Z</text:p>
          </table:table-cell>
          <table:table-cell office:value-type="string">
            <text:p>2026-06-16T10:50:55Z</text:p>
          </table:table-cell>
          <table:table-cell office:value-type="string">
            <text:p/>
          </table:table-cell>
          <table:table-cell office:value-type="string">
            <text:p>1</text:p>
          </table:table-cell>
          <table:table-cell office:value-type="string">
            <text:p>0</text:p>
          </table:table-cell>
          <table:table-cell office:value-type="string">
            <text:p>163</text:p>
          </table:table-cell>
          <table:table-cell office:value-type="string">
            <text:p/>
          </table:table-cell>
          <table:table-cell office:value-type="string">
            <text:p>tsv-twl-creati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 twl-generato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twl-creation-app</text:p>
          </table:table-cell>
          <table:table-cell office:value-type="string">
            <text:p>2026-06-16T10:51:18Z</text:p>
          </table:table-cell>
        </table:table-row>
        <table:table-row>
          <table:table-cell office:value-type="string">
            <text:p>bt-servant-admin-porta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3T22:11:43Z</text:p>
          </table:table-cell>
          <table:table-cell office:value-type="string">
            <text:p>2026-06-13T22:11:43Z</text:p>
          </table:table-cell>
          <table:table-cell office:value-type="string">
            <text:p/>
          </table:table-cell>
          <table:table-cell office:value-type="string">
            <text:p>56</text:p>
          </table:table-cell>
          <table:table-cell office:value-type="string">
            <text:p>0</text:p>
          </table:table-cell>
          <table:table-cell office:value-type="string">
            <text:p>144</text:p>
          </table:table-cell>
          <table:table-cell office:value-type="string">
            <text:p/>
          </table:table-cell>
          <table:table-cell office:value-type="string">
            <text:p>bt-servant-admin-porta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sethstoll3, IanLindsley, ILindsley, deferredreward</text:p>
          </table:table-cell>
          <table:table-cell office:value-type="string">
            <text:p>0</text:p>
          </table:table-cell>
          <table:table-cell office:value-type="string">
            <text:p>0</text:p>
          </table:table-cell>
          <table:table-cell office:value-type="string">
            <text:p>https://github.com/unfoldingWord/bt-servant-admin-portal</text:p>
          </table:table-cell>
          <table:table-cell office:value-type="string">
            <text:p>2026-06-13T22:11:48Z</text:p>
          </table:table-cell>
        </table:table-row>
        <table:table-row>
          <table:table-cell office:value-type="string">
            <text:p>translation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3T19:05:56Z</text:p>
          </table:table-cell>
          <table:table-cell office:value-type="string">
            <text:p>2026-06-13T19:05:56Z</text:p>
          </table:table-cell>
          <table:table-cell office:value-type="string">
            <text:p>2026-01-12T14:46:30Z</text:p>
          </table:table-cell>
          <table:table-cell office:value-type="string">
            <text:p>642</text:p>
          </table:table-cell>
          <table:table-cell office:value-type="string">
            <text:p>13</text:p>
          </table:table-cell>
          <table:table-cell office:value-type="string">
            <text:p>13287</text:p>
          </table:table-cell>
          <table:table-cell office:value-type="string">
            <text:p>https://github.com/unfoldingWord/translationWords.git, https://github.com/unfoldingWord/wordAlignment.git, https://github.com/unfoldingWord/translationNotes.git</text:p>
          </table:table-cell>
          <table:table-cell office:value-type="string">
            <text:p>translation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text:p/>
          </table:table-cell>
          <table:table-cell office: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text:p>89</text:p>
          </table:table-cell>
          <table:table-cell office:value-type="string">
            <text:p>13588</text:p>
          </table:table-cell>
          <table:table-cell office:value-type="string">
            <text:p>https://github.com/unfoldingWord/translationCore</text:p>
          </table:table-cell>
          <table:table-cell office:value-type="string">
            <text:p>2026-06-13T19:06:00Z</text:p>
          </table:table-cell>
        </table:table-row>
        <table:table-row>
          <table:table-cell office:value-type="string">
            <text:p>translationNot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2:38Z</text:p>
          </table:table-cell>
          <table:table-cell office:value-type="string">
            <text:p>2026-06-12T12:12:38Z</text:p>
          </table:table-cell>
          <table:table-cell office:value-type="string">
            <text:p/>
          </table:table-cell>
          <table:table-cell office:value-type="string">
            <text:p>16</text:p>
          </table:table-cell>
          <table:table-cell office:value-type="string">
            <text:p>15</text:p>
          </table:table-cell>
          <table:table-cell office:value-type="string">
            <text:p>523</text:p>
          </table:table-cell>
          <table:table-cell office:value-type="string">
            <text:p/>
          </table:table-cell>
          <table:table-cell office:value-type="string">
            <text:p>translationNot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ihoegen, RoyalSix, PhotoNomad0, klappy, cdwhitfield73, Sterling (Jay) Scott, EllDoubleYew, dependabot[bot], ImgBotApp, jag3773, richmahn</text:p>
          </table:table-cell>
          <table:table-cell office:value-type="string">
            <text:p>0</text:p>
          </table:table-cell>
          <table:table-cell office:value-type="string">
            <text:p>0</text:p>
          </table:table-cell>
          <table:table-cell office:value-type="string">
            <text:p>https://github.com/unfoldingWord/translationNotes</text:p>
          </table:table-cell>
          <table:table-cell office:value-type="string">
            <text:p>2026-06-12T12:12:56Z</text:p>
          </table:table-cell>
        </table:table-row>
        <table:table-row>
          <table:table-cell office:value-type="string">
            <text:p>translationWord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1:06Z</text:p>
          </table:table-cell>
          <table:table-cell office:value-type="string">
            <text:p>2026-06-12T12:11:06Z</text:p>
          </table:table-cell>
          <table:table-cell office:value-type="string">
            <text:p>2019-02-06T21:36:33Z</text:p>
          </table:table-cell>
          <table:table-cell office:value-type="string">
            <text:p>17</text:p>
          </table:table-cell>
          <table:table-cell office:value-type="string">
            <text:p>16</text:p>
          </table:table-cell>
          <table:table-cell office:value-type="string">
            <text:p>1113</text:p>
          </table:table-cell>
          <table:table-cell office:value-type="string">
            <text:p/>
          </table:table-cell>
          <table:table-cell office:value-type="string">
            <text:p>translationWo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RoyalSix, PhotoNomad0, ihoegen, klappy, Sterling (Jay) Scott, cdwhitfield73, richmahn, Richard Mahn, dependabot-support, EllDoubleYew, dependabot[bot], bspidel, ImgBotApp, jag3773</text:p>
          </table:table-cell>
          <table:table-cell office:value-type="string">
            <text:p>5</text:p>
          </table:table-cell>
          <table:table-cell office:value-type="string">
            <text:p>0</text:p>
          </table:table-cell>
          <table:table-cell office:value-type="string">
            <text:p>https://github.com/unfoldingWord/translationWords</text:p>
          </table:table-cell>
          <table:table-cell office:value-type="string">
            <text:p>2026-06-12T12:11:14Z</text:p>
          </table:table-cell>
        </table:table-row>
        <table:table-row>
          <table:table-cell office:value-type="string">
            <text:p>wordAlignme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09:25Z</text:p>
          </table:table-cell>
          <table:table-cell office:value-type="string">
            <text:p>2026-06-12T12:09:25Z</text:p>
          </table:table-cell>
          <table:table-cell office:value-type="string">
            <text:p>2019-02-06T21:37:06Z</text:p>
          </table:table-cell>
          <table:table-cell office:value-type="string">
            <text:p>15</text:p>
          </table:table-cell>
          <table:table-cell office:value-type="string">
            <text:p>13</text:p>
          </table:table-cell>
          <table:table-cell office:value-type="string">
            <text:p>1497</text:p>
          </table:table-cell>
          <table:table-cell office:value-type="string">
            <text:p/>
          </table:table-cell>
          <table:table-cell office:value-type="string">
            <text:p>wordAlignm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client, selections, tc-tool, tc-ui-toolkit, usfm-js, word-aligner, wordmap, wordmap-lexer</text:p>
          </table:table-cell>
          <table:table-cell office:value-type="string">
            <text:p/>
          </table:table-cell>
          <table:table-cell office:value-type="string">
            <text:p>da1nerd, mannycolon, PhotoNomad0, RoyalSix, richmahn, klappy, dependabot-support, Sterling (Jay) Scott, Richard Mahn, bspidel, ImgBotApp</text:p>
          </table:table-cell>
          <table:table-cell office:value-type="string">
            <text:p>2</text:p>
          </table:table-cell>
          <table:table-cell office:value-type="string">
            <text:p>0</text:p>
          </table:table-cell>
          <table:table-cell office:value-type="string">
            <text:p>https://github.com/unfoldingWord/wordAlignment</text:p>
          </table:table-cell>
          <table:table-cell office:value-type="string">
            <text:p>2026-06-12T12:09:39Z</text:p>
          </table:table-cell>
        </table:table-row>
        <table:table-row>
          <table:table-cell office:value-type="string">
            <text:p>bt-servant-telemet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0T14:16:52Z</text:p>
          </table:table-cell>
          <table:table-cell office:value-type="string">
            <text:p>2026-06-10T14:14:55Z</text:p>
          </table:table-cell>
          <table:table-cell office:value-type="string">
            <text:p/>
          </table:table-cell>
          <table:table-cell office:value-type="string">
            <text:p>8</text:p>
          </table:table-cell>
          <table:table-cell office:value-type="string">
            <text:p>0</text:p>
          </table:table-cell>
          <table:table-cell office:value-type="string">
            <text:p>28</text:p>
          </table:table-cell>
          <table:table-cell office:value-type="string">
            <text:p/>
          </table:table-cell>
          <table:table-cell office:value-type="string">
            <text:p>bt-servant-telemet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 ILindsley</text:p>
          </table:table-cell>
          <table:table-cell office:value-type="string">
            <text:p>0</text:p>
          </table:table-cell>
          <table:table-cell office:value-type="string">
            <text:p>0</text:p>
          </table:table-cell>
          <table:table-cell office:value-type="string">
            <text:p>https://github.com/unfoldingWord/bt-servant-telemetry</text:p>
          </table:table-cell>
          <table:table-cell office:value-type="string">
            <text:p>2026-06-10T14:19:53Z</text:p>
          </table:table-cell>
        </table:table-row>
        <table:table-row>
          <table:table-cell office:value-type="string">
            <text:p>door43-preview-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6T13:21:54Z</text:p>
          </table:table-cell>
          <table:table-cell office:value-type="string">
            <text:p>2026-06-06T13:21:08Z</text:p>
          </table:table-cell>
          <table:table-cell office:value-type="string">
            <text:p>2026-06-06T13:21:54Z</text:p>
          </table:table-cell>
          <table:table-cell office:value-type="string">
            <text:p>5</text:p>
          </table:table-cell>
          <table:table-cell office:value-type="string">
            <text:p>0</text:p>
          </table:table-cell>
          <table:table-cell office:value-type="string">
            <text:p>530</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usfm-alignment-remover, usfm-js, uw-quote-helpers, word-aligner-rcl</text:p>
          </table:table-cell>
          <table:table-cell office:value-type="string">
            <text:p/>
          </table:table-cell>
          <table:table-cell office:value-type="string">
            <text:p>richmahn, larsgson, PhotoNomad0</text:p>
          </table:table-cell>
          <table:table-cell office:value-type="string">
            <text:p>26</text:p>
          </table:table-cell>
          <table:table-cell office:value-type="string">
            <text:p>0</text:p>
          </table:table-cell>
          <table:table-cell office:value-type="string">
            <text:p>https://github.com/unfoldingWord/door43-preview-app</text:p>
          </table:table-cell>
          <table:table-cell office:value-type="string">
            <text:p>2026-06-06T13:21:13Z</text:p>
          </table:table-cell>
        </table:table-row>
        <table:table-row>
          <table:table-cell office:value-type="string">
            <text:p>gateway-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0T16:31:52Z</text:p>
          </table:table-cell>
          <table:table-cell office:value-type="string">
            <text:p>2026-06-04T14:54:50Z</text:p>
          </table:table-cell>
          <table:table-cell office:value-type="string">
            <text:p>2026-06-10T15:30:42Z</text:p>
          </table:table-cell>
          <table:table-cell office:value-type="string">
            <text:p>152</text:p>
          </table:table-cell>
          <table:table-cell office:value-type="string">
            <text:p>11</text:p>
          </table:table-cell>
          <table:table-cell office:value-type="string">
            <text:p>1532</text:p>
          </table:table-cell>
          <table:table-cell office:value-type="string">
            <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text:p/>
          </table:table-cell>
          <table:table-cell office:value-type="string">
            <text:p>PhotoNomad0, mannycolon, kintsoogi, abelpz, Joel-C-Johnson, richmahn, theNerd247, benjamin-test, jincypjose, larsgson, mandolyte, claude, elsylambert</text:p>
          </table:table-cell>
          <table:table-cell office:value-type="string">
            <text:p>20</text:p>
          </table:table-cell>
          <table:table-cell office:value-type="string">
            <text:p>2</text:p>
          </table:table-cell>
          <table:table-cell office:value-type="string">
            <text:p>https://github.com/unfoldingWord/gateway-edit</text:p>
          </table:table-cell>
          <table:table-cell office:value-type="string">
            <text:p>2026-06-04T14:55:14Z</text:p>
          </table:table-cell>
        </table:table-row>
        <table:table-row>
          <table:table-cell office:value-type="string">
            <text:p>dcs-catalog-accordion-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4T14:08:03Z</text:p>
          </table:table-cell>
          <table:table-cell office:value-type="string">
            <text:p>2026-06-04T14:02:01Z</text:p>
          </table:table-cell>
          <table:table-cell office:value-type="string">
            <text:p/>
          </table:table-cell>
          <table:table-cell office:value-type="string">
            <text:p>0</text:p>
          </table:table-cell>
          <table:table-cell office:value-type="string">
            <text:p>0</text:p>
          </table:table-cell>
          <table:table-cell office:value-type="string">
            <text:p>25</text:p>
          </table:table-cell>
          <table:table-cell office:value-type="string">
            <text:p/>
          </table:table-cell>
          <table:table-cell office:value-type="string">
            <text:p>dcs-catalog-accordion-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catalog-accordion-rcl</text:p>
          </table:table-cell>
          <table:table-cell office:value-type="string">
            <text:p>2026-06-04T14:09:25Z</text:p>
          </table:table-cell>
        </table:table-row>
        <table:table-row>
          <table:table-cell office:value-type="string">
            <text:p>enhanced-word-aligner-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02T13:31:12Z</text:p>
          </table:table-cell>
          <table:table-cell office:value-type="string">
            <text:p>2026-06-02T13:31:12Z</text:p>
          </table:table-cell>
          <table:table-cell office:value-type="string">
            <text:p/>
          </table:table-cell>
          <table:table-cell office:value-type="string">
            <text:p>1</text:p>
          </table:table-cell>
          <table:table-cell office:value-type="string">
            <text:p>1</text:p>
          </table:table-cell>
          <table:table-cell office:value-type="string">
            <text:p>336</text:p>
          </table:table-cell>
          <table:table-cell office:value-type="string">
            <text:p/>
          </table:table-cell>
          <table:table-cell office:value-type="string">
            <text:p>enhanced-word-aligner-rcl</text:p>
          </table:table-cell>
          <table:table-cell office:value-type="string">
            <text:p>False</text:p>
          </table:table-cell>
          <table:table-cell office:value-type="string">
            <text:p>24893</text:p>
          </table:table-cell>
          <table:table-cell office:value-type="string">
            <text:p>2026-06-02T13:32:18.685Z</text:p>
          </table:table-cell>
          <table:table-cell office:value-type="string">
            <text:p>gateway-edit</text:p>
          </table:table-cell>
          <table:table-cell office:value-type="string">
            <text:p>bible-reference-range, uw-wordmapbooster, @unfoldingword/eslint-config, usfm-js, word-aligner-rcl</text:p>
          </table:table-cell>
          <table:table-cell office:value-type="string">
            <text:p>unfoldingWord/gateway-edit</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enhanced-word-aligner-rcl</text:p>
          </table:table-cell>
          <table:table-cell office:value-type="string">
            <text:p>2026-06-02T13:31:41Z</text:p>
          </table:table-cell>
        </table:table-row>
        <table:table-row>
          <table:table-cell office:value-type="string">
            <text:p>tc-create-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04:04:35Z</text:p>
          </table:table-cell>
          <table:table-cell office:value-type="string">
            <text:p>2026-05-28T16:04:14Z</text:p>
          </table:table-cell>
          <table:table-cell office:value-type="string">
            <text:p>2026-06-10T15:01:15Z</text:p>
          </table:table-cell>
          <table:table-cell office:value-type="string">
            <text:p>291</text:p>
          </table:table-cell>
          <table:table-cell office:value-type="string">
            <text:p>20</text:p>
          </table:table-cell>
          <table:table-cell office:value-type="string">
            <text:p>1637</text:p>
          </table:table-cell>
          <table:table-cell office:value-type="string">
            <text:p/>
          </table:table-cell>
          <table:table-cell office:value-type="string">
            <text:p>tc-create-app</text:p>
          </table:table-cell>
          <table:table-cell office:value-type="string">
            <text:p>False</text:p>
          </table:table-cell>
          <table:table-cell office:value-type="string">
            <text:p>71</text:p>
          </table:table-cell>
          <table:table-cell office:value-type="string">
            <text:p>2022-02-22T21:12:10.659Z</text:p>
          </table:table-cell>
          <table:table-cell office:value-type="string">
            <text:p/>
          </table:table-cell>
          <table:table-cell office: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text:p/>
          </table:table-cell>
          <table:table-cell office: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text:p>36</text:p>
          </table:table-cell>
          <table:table-cell office:value-type="string">
            <text:p>0</text:p>
          </table:table-cell>
          <table:table-cell office:value-type="string">
            <text:p>https://github.com/unfoldingWord/tc-create-app</text:p>
          </table:table-cell>
          <table:table-cell office:value-type="string">
            <text:p>2026-05-28T16:04:51Z</text:p>
          </table:table-cell>
        </table:table-row>
        <table:table-row>
          <table:table-cell office:value-type="string">
            <text:p>uw-languag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8T16:01:39Z</text:p>
          </table:table-cell>
          <table:table-cell office:value-type="string">
            <text:p>2026-05-28T16:00:29Z</text:p>
          </table:table-cell>
          <table:table-cell office:value-type="string">
            <text:p/>
          </table:table-cell>
          <table:table-cell office:value-type="string">
            <text:p>15</text:p>
          </table:table-cell>
          <table:table-cell office:value-type="string">
            <text:p>12</text:p>
          </table:table-cell>
          <table:table-cell office:value-type="string">
            <text:p>77</text:p>
          </table:table-cell>
          <table:table-cell office:value-type="string">
            <text:p/>
          </table:table-cell>
          <table:table-cell office:value-type="string">
            <text:p>uw-languages-rcl</text:p>
          </table:table-cell>
          <table:table-cell office:value-type="string">
            <text:p>False</text:p>
          </table:table-cell>
          <table:table-cell office:value-type="string">
            <text:p>1219</text:p>
          </table:table-cell>
          <table:table-cell office:value-type="string">
            <text:p>2026-05-28T16:01:32.183Z</text:p>
          </table:table-cell>
          <table:table-cell office:value-type="string">
            <text:p>tc-create-app, dcs-react-hooks</text:p>
          </table:table-cell>
          <table:table-cell office:value-type="string">
            <text:p/>
          </table:table-cell>
          <table:table-cell office:value-type="string">
            <text:p>nishantshah-me/docusaurus, unfoldingWord/gateway-translate, unfoldingWord/tc-create-app</text:p>
          </table:table-cell>
          <table:table-cell office:value-type="string">
            <text:p>mandolyte, dependabot[bot], abelpz, PhotoNomad0</text:p>
          </table:table-cell>
          <table:table-cell office:value-type="string">
            <text:p>0</text:p>
          </table:table-cell>
          <table:table-cell office:value-type="string">
            <text:p>0</text:p>
          </table:table-cell>
          <table:table-cell office:value-type="string">
            <text:p>https://github.com/unfoldingWord/uw-languages-rcl</text:p>
          </table:table-cell>
          <table:table-cell office:value-type="string">
            <text:p>2026-05-28T16:01:18Z</text:p>
          </table:table-cell>
        </table:table-row>
        <table:table-row>
          <table:table-cell office:value-type="string">
            <text:p>string-punctuation-tokeniz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8-09T14:35:40Z</text:p>
          </table:table-cell>
          <table:table-cell office:value-type="string">
            <text:p>2021-08-25T21:53:55Z</text:p>
          </table:table-cell>
          <table:table-cell office:value-type="string">
            <text:p>2021-08-25T21:56:43Z</text:p>
          </table:table-cell>
          <table:table-cell office:value-type="string">
            <text:p>21</text:p>
          </table:table-cell>
          <table:table-cell office:value-type="string">
            <text:p>18</text:p>
          </table:table-cell>
          <table:table-cell office:value-type="string">
            <text:p>146</text:p>
          </table:table-cell>
          <table:table-cell office:value-type="string">
            <text:p/>
          </table:table-cell>
          <table:table-cell office:value-type="string">
            <text:p>string-punctuation-tokenizer</text:p>
          </table:table-cell>
          <table:table-cell office:value-type="string">
            <text:p>False</text:p>
          </table:table-cell>
          <table:table-cell office:value-type="string">
            <text:p>101614</text:p>
          </table:table-cell>
          <table:table-cell office:value-type="string">
            <text:p>2021-08-25T21:55:46.406Z</text:p>
          </table:table-cell>
          <table:table-cell office:value-type="string">
            <text:p>tsv-quote-converters, translationCore, string-punctuation-tokenizer, word-aligner-rcl, word-aligner-lib, word-aligner, scripture-resources-rcl, uw-quote-helpers, tsv-groupdata-parser, tc-source-content-updater, checking-tool-rcl, tc-ui-toolkit, checking-tool-wrapper, wordmap-lexer, ScripturePane, checking-extension, anchor-alignment-poc, greek-apparatus-app, pdf-generator, @oce-editor-tools/pk-aligner</text:p>
          </table:table-cell>
          <table:table-cell office:value-type="string">
            <text:p>string-punctuation-tokenizer, wordmap-lexer</text:p>
          </table:table-cell>
          <table:table-cell office: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office:value-type="string">
            <text:p>mannycolon, klappy, ancientTexts-net, dependabot-support, PhotoNomad0, RoyalSix, da1nerd, richmahn, mandolyte, bspidel, Sterling (Jay) Scott, birchamp</text:p>
          </table:table-cell>
          <table:table-cell office:value-type="string">
            <text:p>3</text:p>
          </table:table-cell>
          <table:table-cell office:value-type="string">
            <text:p>0</text:p>
          </table:table-cell>
          <table:table-cell office:value-type="string">
            <text:p>https://github.com/unfoldingWord/string-punctuation-tokenizer</text:p>
          </table:table-cell>
          <table:table-cell office:value-type="string">
            <text:p>2026-05-27T23:23:55Z</text:p>
          </table:table-cell>
        </table:table-row>
        <table:table-row>
          <table:table-cell office:value-type="string">
            <text:p>word-aligner-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3:03:21Z</text:p>
          </table:table-cell>
          <table:table-cell office:value-type="string">
            <text:p>2026-05-24T23:02:05Z</text:p>
          </table:table-cell>
          <table:table-cell office:value-type="string">
            <text:p/>
          </table:table-cell>
          <table:table-cell office:value-type="string">
            <text:p>5</text:p>
          </table:table-cell>
          <table:table-cell office:value-type="string">
            <text:p>2</text:p>
          </table:table-cell>
          <table:table-cell office:value-type="string">
            <text:p>188</text:p>
          </table:table-cell>
          <table:table-cell office:value-type="string">
            <text:p/>
          </table:table-cell>
          <table:table-cell office:value-type="string">
            <text:p>word-aligner-rcl</text:p>
          </table:table-cell>
          <table:table-cell office:value-type="string">
            <text:p>False</text:p>
          </table:table-cell>
          <table:table-cell office:value-type="string">
            <text:p>16604</text:p>
          </table:table-cell>
          <table:table-cell office:value-type="string">
            <text:p>2026-05-24T23:03:19.258Z</text:p>
          </table:table-cell>
          <table:table-cell office:value-type="string">
            <text:p>door43-preview-app, gateway-edit, enhanced-word-aligner-rcl, single-scripture-rcl, @oce-editor-tools/pk-aligner</text:p>
          </table:table-cell>
          <table:table-cell office:value-type="string">
            <text:p>bible-reference-range, string-punctuation-tokenizer, usfm-js, word-aligner, word-aligner-lib, wordmap, wordmap-lexer, uw-tsv-parser</text:p>
          </table:table-cell>
          <table:table-cell office:value-type="string">
            <text:p>unfoldingWord/word-aligner, unfoldingWord/single-scripture-rcl, unfoldingWord/gateway-edit, unfoldingWord/door43-preview-app, unfoldingWord/oce-editor-tools</text:p>
          </table:table-cell>
          <table:table-cell office:value-type="string">
            <text:p>PhotoNomad0, Joshua Lansford, jincypjose</text:p>
          </table:table-cell>
          <table:table-cell office:value-type="string">
            <text:p>0</text:p>
          </table:table-cell>
          <table:table-cell office:value-type="string">
            <text:p>0</text:p>
          </table:table-cell>
          <table:table-cell office:value-type="string">
            <text:p>https://github.com/unfoldingWord/word-aligner-rcl</text:p>
          </table:table-cell>
          <table:table-cell office:value-type="string">
            <text:p>2026-05-24T23:02:10Z</text:p>
          </table:table-cell>
        </table:table-row>
        <table:table-row>
          <table:table-cell office:value-type="string">
            <text:p>word-aligner-li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2:38:03Z</text:p>
          </table:table-cell>
          <table:table-cell office:value-type="string">
            <text:p>2026-05-24T22:36:14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word-aligner-lib</text:p>
          </table:table-cell>
          <table:table-cell office:value-type="string">
            <text:p>False</text:p>
          </table:table-cell>
          <table:table-cell office:value-type="string">
            <text:p>5512</text:p>
          </table:table-cell>
          <table:table-cell office:value-type="string">
            <text:p>2026-05-24T22:38:01.649Z</text:p>
          </table:table-cell>
          <table:table-cell office:value-type="string">
            <text:p>word-aligner-rcl, checking-tool-rcl</text:p>
          </table:table-cell>
          <table:table-cell office:value-type="string">
            <text:p>string-punctuation-tokenizer, tc-strings, usfm-js, word-aligner, wordmap-lexer, bible-reference-range</text:p>
          </table:table-cell>
          <table:table-cell office:value-type="string">
            <text:p>unfoldingWord/word-aligner, unfoldingWord/door43-preview-app, unfoldingWord/gateway-edit, unfoldingWord/single-scripture-rcl, unfoldingWord/word-aligner-rcl</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word-aligner-lib</text:p>
          </table:table-cell>
          <table:table-cell office:value-type="string">
            <text:p>2026-05-24T22:36:18Z</text:p>
          </table:table-cell>
        </table:table-row>
        <table:table-row>
          <table:table-cell office:value-type="string">
            <text:p>word-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1:22:15Z</text:p>
          </table:table-cell>
          <table:table-cell office:value-type="string">
            <text:p>2026-05-24T21:16:40Z</text:p>
          </table:table-cell>
          <table:table-cell office:value-type="string">
            <text:p>2019-02-06T21:43:28Z</text:p>
          </table:table-cell>
          <table:table-cell office:value-type="string">
            <text:p>0</text:p>
          </table:table-cell>
          <table:table-cell office:value-type="string">
            <text:p>0</text:p>
          </table:table-cell>
          <table:table-cell office:value-type="string">
            <text:p>206</text:p>
          </table:table-cell>
          <table:table-cell office:value-type="string">
            <text:p/>
          </table:table-cell>
          <table:table-cell office:value-type="string">
            <text:p>word-aligner</text:p>
          </table:table-cell>
          <table:table-cell office:value-type="string">
            <text:p>False</text:p>
          </table:table-cell>
          <table:table-cell office:value-type="string">
            <text:p>45454</text:p>
          </table:table-cell>
          <table:table-cell office:value-type="string">
            <text:p>2026-05-24T21:22:13.663Z</text:p>
          </table:table-cell>
          <table:table-cell office:value-type="string">
            <text:p>gateway-admin, translationCore, wordAlignment, gateway-edit, tc-create-app, word-aligner-rcl, word-aligner-lib, single-scripture-rcl, translation-helps-rcl, scripture-resources-rcl, bsa, checking-tool-rcl, tc-ui-toolkit, checking-tool-wrapper, alignment-playground, next-js-template</text:p>
          </table:table-cell>
          <table:table-cell office:value-type="string">
            <text:p>string-punctuation-tokenizer, usfm-js</text:p>
          </table:table-cell>
          <table:table-cell office:value-type="string">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text:p>PhotoNomad0, mannycolon, RoyalSix, richmahn, dependabot-support, Sterling (Jay) Scott, da1nerd, bspidel</text:p>
          </table:table-cell>
          <table:table-cell office:value-type="string">
            <text:p>6</text:p>
          </table:table-cell>
          <table:table-cell office:value-type="string">
            <text:p>0</text:p>
          </table:table-cell>
          <table:table-cell office:value-type="string">
            <text:p>https://github.com/unfoldingWord/word-aligner</text:p>
          </table:table-cell>
          <table:table-cell office:value-type="string">
            <text:p>2026-05-24T21:16:44Z</text:p>
          </table:table-cell>
        </table:table-row>
        <table:table-row>
          <table:table-cell office:value-type="string">
            <text:p>usfm-j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5-23T23:11:20Z</text:p>
          </table:table-cell>
          <table:table-cell office:value-type="string">
            <text:p>2026-05-23T23:09:13Z</text:p>
          </table:table-cell>
          <table:table-cell office:value-type="string">
            <text:p>2018-11-05T12:47:58Z</text:p>
          </table:table-cell>
          <table:table-cell office:value-type="string">
            <text:p>3</text:p>
          </table:table-cell>
          <table:table-cell office:value-type="string">
            <text:p>0</text:p>
          </table:table-cell>
          <table:table-cell office:value-type="string">
            <text:p>420</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
          </table:table-cell>
          <table:table-cell office:value-type="string">
            <text:p>wordmap-usfm, cskillbp-prompt-over-code, uw-content-validation, zulip-bot, tsv-twl-creation-app, translationCore, wordAlignment, door43-preview-app, enhanced-word-aligner-rcl, tc-create-app, word-aligner-rcl, word-aligner-lib, word-aligner, single-scripture-rcl, scripture-resources-rcl, uw-quote-helpers, uw-wordmapbooster, door43-preview-renderers, usfm-alignment-remover, tc-source-content-updater, checking-tool-rcl, tc-ui-toolkit, checking-tool-wrapper, uw-bible-parser, book-package-rcl, uw-word-count, usfm-js-wrapper, ScripturePane, tc_resources, VerseCheck, resource-checker, checking-extension, translation-helps, qa-app, alignment-playground, greek-apparatus-app, pdf-generator, scripture-as-graph, @bt-synergy/mobile, tc-study, @bt-synergy/resource-parsers, @bt-synergy/usfm-processor</text:p>
          </table:table-cell>
          <table:table-cell office:value-type="string">
            <text:p/>
          </table:table-cell>
          <table:table-cell office: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text:p>PhotoNomad0, RoyalSix, mannycolon, klappy, Sterling (Jay) Scott, ihoegen, da1nerd, dependabot-support, richmahn, bspidel</text:p>
          </table:table-cell>
          <table:table-cell office:value-type="string">
            <text:p>4</text:p>
          </table:table-cell>
          <table:table-cell office:value-type="string">
            <text:p>0</text:p>
          </table:table-cell>
          <table:table-cell office:value-type="string">
            <text:p>https://github.com/unfoldingWord/usfm-js</text:p>
          </table:table-cell>
          <table:table-cell office:value-type="string">
            <text:p>2026-05-23T23:09:18Z</text:p>
          </table:table-cell>
        </table:table-row>
        <table:table-row>
          <table:table-cell office:value-type="string">
            <text:p>node-usfm2html-cli</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4T23:44:52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node-usfm2html-cli</text:p>
          </table:table-cell>
          <table:table-cell office:value-type="string">
            <text:p>2026-05-14T23:44:56Z</text:p>
          </table:table-cell>
        </table:table-row>
        <table:table-row>
          <table:table-cell office:value-type="string">
            <text:p>gitea-react-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2T13:12:04Z</text:p>
          </table:table-cell>
          <table:table-cell office:value-type="string">
            <text:p>2026-05-12T13:12:04Z</text:p>
          </table:table-cell>
          <table:table-cell office:value-type="string">
            <text:p>2020-04-23T14:49:23Z</text:p>
          </table:table-cell>
          <table:table-cell office:value-type="string">
            <text:p>27</text:p>
          </table:table-cell>
          <table:table-cell office:value-type="string">
            <text:p>21</text:p>
          </table:table-cell>
          <table:table-cell office:value-type="string">
            <text:p>922</text:p>
          </table:table-cell>
          <table:table-cell office:value-type="string">
            <text:p/>
          </table:table-cell>
          <table:table-cell office:value-type="string">
            <text:p>gitea-react-toolkit</text:p>
          </table:table-cell>
          <table:table-cell office:value-type="string">
            <text:p>False</text:p>
          </table:table-cell>
          <table:table-cell office:value-type="string">
            <text:p>17632</text:p>
          </table:table-cell>
          <table:table-cell office:value-type="string">
            <text:p>2026-05-12T13:15:42.563Z</text:p>
          </table:table-cell>
          <table:table-cell office:value-type="string">
            <text:p>gateway-admin, gateway-edit, tc-create-app, single-scripture-rcl, translation-helps-rcl, scripture-resources-rcl, resource-workspace-rcl, resource-checker, create-app, next-js-template, resource-container-rcl, pdf-generator-rcl, hello-dcs-react-component-library, md-tsv-converter-app, anchor-alignment-poc, admin-app, greek-apparatus-app, book-package-viewer-poc, gitea-offline-poc, scripture-burrito-react-jsonschema-form</text:p>
          </table:table-cell>
          <table:table-cell office:value-type="string">
            <text:p>markdown-translatable, @unfoldingword/eslint-config</text:p>
          </table:table-cell>
          <table:table-cell office: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text:p>klappy, RoyalSix, ancientTexts-net, mannycolon, actions-user, PhotoNomad0, mandolyte, Sterling (Jay) Scott, superdav42, Joel-C-Johnson, jincypjose, kintsoogi, richmahn, rady-ben</text:p>
          </table:table-cell>
          <table:table-cell office:value-type="string">
            <text:p>2</text:p>
          </table:table-cell>
          <table:table-cell office:value-type="string">
            <text:p>0</text:p>
          </table:table-cell>
          <table:table-cell office:value-type="string">
            <text:p>https://github.com/unfoldingWord/gitea-react-toolkit</text:p>
          </table:table-cell>
          <table:table-cell office:value-type="string">
            <text:p>2026-05-12T13:17:57Z</text:p>
          </table:table-cell>
        </table:table-row>
        <table:table-row>
          <table:table-cell office:value-type="string">
            <text:p>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fred-zulip-bo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9T16:01:39Z</text:p>
          </table:table-cell>
          <table:table-cell office:value-type="string">
            <text:p>2026-05-09T16:01:39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fred-zulip-bo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text:p>
          </table:table-cell>
          <table:table-cell office:value-type="string">
            <text:p>0</text:p>
          </table:table-cell>
          <table:table-cell office:value-type="string">
            <text:p>0</text:p>
          </table:table-cell>
          <table:table-cell office:value-type="string">
            <text:p>https://github.com/unfoldingWord/fred-zulip-bot-worker</text:p>
          </table:table-cell>
          <table:table-cell office:value-type="string">
            <text:p>2026-05-09T16:01:43Z</text:p>
          </table:table-cell>
        </table:table-row>
        <table:table-row>
          <table:table-cell office:value-type="string">
            <text:p>obs-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5T15:14:30Z</text:p>
          </table:table-cell>
          <table:table-cell office:value-type="string">
            <text:p>2026-05-05T15:14:21Z</text:p>
          </table:table-cell>
          <table:table-cell office:value-type="string">
            <text:p>2025-06-03T04:28:11Z</text:p>
          </table:table-cell>
          <table:table-cell office:value-type="string">
            <text:p>7</text:p>
          </table:table-cell>
          <table:table-cell office:value-type="string">
            <text:p>0</text:p>
          </table:table-cell>
          <table:table-cell office:value-type="string">
            <text:p>101</text:p>
          </table:table-cell>
          <table:table-cell office:value-type="string">
            <text:p/>
          </table:table-cell>
          <table:table-cell office:value-type="string">
            <text:p>obs-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eliaspinero</text:p>
          </table:table-cell>
          <table:table-cell office:value-type="string">
            <text:p>1</text:p>
          </table:table-cell>
          <table:table-cell office:value-type="string">
            <text:p>2</text:p>
          </table:table-cell>
          <table:table-cell office:value-type="string">
            <text:p>https://github.com/unfoldingWord/obs-app</text:p>
          </table:table-cell>
          <table:table-cell office:value-type="string">
            <text:p>2026-05-05T15:16:31Z</text:p>
          </table:table-cell>
        </table:table-row>
        <table:table-row>
          <table:table-cell office:value-type="string">
            <text:p>baruch</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20T22:23:08Z</text:p>
          </table:table-cell>
          <table:table-cell office:value-type="string">
            <text:p>2026-04-20T22:22:00Z</text:p>
          </table:table-cell>
          <table:table-cell office:value-type="string">
            <text:p/>
          </table:table-cell>
          <table:table-cell office:value-type="string">
            <text:p>6</text:p>
          </table:table-cell>
          <table:table-cell office:value-type="string">
            <text:p>1</text:p>
          </table:table-cell>
          <table:table-cell office:value-type="string">
            <text:p>23</text:p>
          </table:table-cell>
          <table:table-cell office:value-type="string">
            <text:p/>
          </table:table-cell>
          <table:table-cell office:value-type="string">
            <text:p>baruc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 claude</text:p>
          </table:table-cell>
          <table:table-cell office:value-type="string">
            <text:p>0</text:p>
          </table:table-cell>
          <table:table-cell office:value-type="string">
            <text:p>0</text:p>
          </table:table-cell>
          <table:table-cell office:value-type="string">
            <text:p>https://github.com/unfoldingWord/baruch</text:p>
          </table:table-cell>
          <table:table-cell office:value-type="string">
            <text:p>2026-04-20T22:22:05Z</text:p>
          </table:table-cell>
        </table:table-row>
        <table:table-row>
          <table:table-cell office:value-type="string">
            <text:p>single-scripture-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16T17:24:40Z</text:p>
          </table:table-cell>
          <table:table-cell office:value-type="string">
            <text:p>2026-04-16T17:24:40Z</text:p>
          </table:table-cell>
          <table:table-cell office:value-type="string">
            <text:p/>
          </table:table-cell>
          <table:table-cell office:value-type="string">
            <text:p>3</text:p>
          </table:table-cell>
          <table:table-cell office:value-type="string">
            <text:p>3</text:p>
          </table:table-cell>
          <table:table-cell office:value-type="string">
            <text:p>639</text:p>
          </table:table-cell>
          <table:table-cell office:value-type="string">
            <text:p/>
          </table:table-cell>
          <table:table-cell office:value-type="string">
            <text:p>single-scripture-rcl</text:p>
          </table:table-cell>
          <table:table-cell office:value-type="string">
            <text:p>False</text:p>
          </table:table-cell>
          <table:table-cell office:value-type="string">
            <text:p>10071</text:p>
          </table:table-cell>
          <table:table-cell office:value-type="string">
            <text:p>2026-04-16T17:29:58.529Z</text:p>
          </table:table-cell>
          <table:table-cell office:value-type="string">
            <text:p>gateway-admin, gateway-edit, create-app, next-js-template</text:p>
          </table:table-cell>
          <table:table-cell office:value-type="string">
            <text:p>@unfoldingword/eslint-config, bible-reference-range, gitea-react-toolkit, scripture-resources-rcl, tc-ui-toolkit, translation-helps-rcl, usfm-js, uw-quote-helpers, word-aligner, word-aligner-rcl</text:p>
          </table:table-cell>
          <table:table-cell office:value-type="string">
            <text:p>unfoldingWord/gateway-edit, unfoldingWord/gateway-translate, unfoldingWord/gateway-admin</text:p>
          </table:table-cell>
          <table:table-cell office:value-type="string">
            <text:p>PhotoNomad0, kintsoogi, mannycolon, Joel-C-Johnson, jincypjose, abelpz, RoyalSix, theNerd247, Sterling (Jay) Scott, richmahn</text:p>
          </table:table-cell>
          <table:table-cell office:value-type="string">
            <text:p>0</text:p>
          </table:table-cell>
          <table:table-cell office:value-type="string">
            <text:p>0</text:p>
          </table:table-cell>
          <table:table-cell office:value-type="string">
            <text:p>https://github.com/unfoldingWord/single-scripture-rcl</text:p>
          </table:table-cell>
          <table:table-cell office:value-type="string">
            <text:p>2026-04-16T17:24:46Z</text:p>
          </table:table-cell>
        </table:table-row>
        <table:table-row>
          <table:table-cell office:value-type="string">
            <text:p>orthography-app-B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4-08-06T11:57:29Z</text:p>
          </table:table-cell>
          <table:table-cell office:value-type="string">
            <text:p>2024-08-06T11:57:27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orthoapp_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Stephen0272</text:p>
          </table:table-cell>
          <table:table-cell office:value-type="string">
            <text:p>0</text:p>
          </table:table-cell>
          <table:table-cell office:value-type="string">
            <text:p>0</text:p>
          </table:table-cell>
          <table:table-cell office:value-type="string">
            <text:p>https://github.com/unfoldingWord/orthography-app-BE</text:p>
          </table:table-cell>
          <table:table-cell office:value-type="string">
            <text:p>2026-04-16T08:07:38Z</text:p>
          </table:table-cell>
        </table:table-row>
        <table:table-row>
          <table:table-cell office:value-type="string">
            <text:p>translation-help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7T22:01:48Z</text:p>
          </table:table-cell>
          <table:table-cell office:value-type="string">
            <text:p>2026-03-27T22:00:54Z</text:p>
          </table:table-cell>
          <table:table-cell office:value-type="string">
            <text:p/>
          </table:table-cell>
          <table:table-cell office:value-type="string">
            <text:p>8</text:p>
          </table:table-cell>
          <table:table-cell office:value-type="string">
            <text:p>2</text:p>
          </table:table-cell>
          <table:table-cell office:value-type="string">
            <text:p>829</text:p>
          </table:table-cell>
          <table:table-cell office:value-type="string">
            <text:p/>
          </table:table-cell>
          <table:table-cell office:value-type="string">
            <text:p>translation-helps-rcl</text:p>
          </table:table-cell>
          <table:table-cell office:value-type="string">
            <text:p>False</text:p>
          </table:table-cell>
          <table:table-cell office:value-type="string">
            <text:p>16090</text:p>
          </table:table-cell>
          <table:table-cell office:value-type="string">
            <text:p>2026-03-27T22:01:47.002Z</text:p>
          </table:table-cell>
          <table:table-cell office:value-type="string">
            <text:p>gateway-admin, gateway-edit, single-scripture-rcl, bsa, gateway-translate, uw-editor, resource-workspace-rcl, create-app, next-js-template, admin-app</text:p>
          </table:table-cell>
          <table:table-cell office:value-type="string">
            <text:p>bible-reference-range, dcs-branch-merger, gitea-react-toolkit, markdown-translatable, scripture-resources-rcl, tc-ui-toolkit, word-aligner</text:p>
          </table:table-cell>
          <table:table-cell office: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text:p>mannycolon, PhotoNomad0, kintsoogi, superdav42, larsgson, abelpz, jincypjose, theNerd247, Joel-C-Johnson, richmahn, klappy, RoyalSix, mandolyte</text:p>
          </table:table-cell>
          <table:table-cell office:value-type="string">
            <text:p>0</text:p>
          </table:table-cell>
          <table:table-cell office:value-type="string">
            <text:p>0</text:p>
          </table:table-cell>
          <table:table-cell office:value-type="string">
            <text:p>https://github.com/unfoldingWord/translation-helps-rcl</text:p>
          </table:table-cell>
          <table:table-cell office:value-type="string">
            <text:p>2026-03-27T22:00:59Z</text:p>
          </table:table-cell>
        </table:table-row>
        <table:table-row>
          <table:table-cell office:value-type="string">
            <text:p>dcs-branch-merg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8T01:12:51Z</text:p>
          </table:table-cell>
          <table:table-cell office:value-type="string">
            <text:p>2026-03-27T21:56:40Z</text:p>
          </table:table-cell>
          <table:table-cell office:value-type="string">
            <text:p/>
          </table:table-cell>
          <table:table-cell office:value-type="string">
            <text:p>6</text:p>
          </table:table-cell>
          <table:table-cell office:value-type="string">
            <text:p>0</text:p>
          </table:table-cell>
          <table:table-cell office:value-type="string">
            <text:p>53</text:p>
          </table:table-cell>
          <table:table-cell office:value-type="string">
            <text:p/>
          </table:table-cell>
          <table:table-cell office:value-type="string">
            <text:p>dcs-branch-merger</text:p>
          </table:table-cell>
          <table:table-cell office:value-type="string">
            <text:p>False</text:p>
          </table:table-cell>
          <table:table-cell office:value-type="string">
            <text:p>3577</text:p>
          </table:table-cell>
          <table:table-cell office:value-type="string">
            <text:p>2026-03-27T21:57:39.012Z</text:p>
          </table:table-cell>
          <table:table-cell office:value-type="string">
            <text:p>gateway-admin, tc-create-app, translation-helps-rcl</text:p>
          </table:table-cell>
          <table:table-cell office:value-type="string">
            <text:p>dcs-js</text:p>
          </table:table-cell>
          <table:table-cell office: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text:p>mandolyte, richmahn, theNerd247, PhotoNomad0</text:p>
          </table:table-cell>
          <table:table-cell office:value-type="string">
            <text:p>0</text:p>
          </table:table-cell>
          <table:table-cell office:value-type="string">
            <text:p>0</text:p>
          </table:table-cell>
          <table:table-cell office:value-type="string">
            <text:p>https://github.com/unfoldingWord/dcs-branch-merger</text:p>
          </table:table-cell>
          <table:table-cell office:value-type="string">
            <text:p>2026-03-27T21:56:46Z</text:p>
          </table:table-cell>
        </table:table-row>
        <table:table-row>
          <table:table-cell office:value-type="string">
            <text:p>scripture-resourc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9T13:23:22Z</text:p>
          </table:table-cell>
          <table:table-cell office:value-type="string">
            <text:p>2026-03-19T13:23:22Z</text:p>
          </table:table-cell>
          <table:table-cell office:value-type="string">
            <text:p/>
          </table:table-cell>
          <table:table-cell office:value-type="string">
            <text:p>14</text:p>
          </table:table-cell>
          <table:table-cell office:value-type="string">
            <text:p>6</text:p>
          </table:table-cell>
          <table:table-cell office:value-type="string">
            <text:p>817</text:p>
          </table:table-cell>
          <table:table-cell office:value-type="string">
            <text:p/>
          </table:table-cell>
          <table:table-cell office:value-type="string">
            <text:p>scripture-resources-rcl</text:p>
          </table:table-cell>
          <table:table-cell office:value-type="string">
            <text:p>False</text:p>
          </table:table-cell>
          <table:table-cell office:value-type="string">
            <text:p>16923</text:p>
          </table:table-cell>
          <table:table-cell office:value-type="string">
            <text:p>2026-03-19T13:24:25.124Z</text:p>
          </table:table-cell>
          <table:table-cell office:value-type="string">
            <text:p>gateway-admin, gateway-edit, tc-create-app, single-scripture-rcl, translation-helps-rcl, bsa, gateway-translate, resource-workspace-rcl, resource-checker, create-app, next-js-template, pdf-generator-rcl, greek-apparatus-app, book-package-viewer-poc, pdf-generator</text:p>
          </table:table-cell>
          <table:table-cell office:value-type="string">
            <text:p>bible-reference-range, gitea-react-toolkit, markdown-translatable, string-punctuation-tokenizer, tc-ui-toolkit, usfm-js, uw-quote-helpers, word-aligner, @unfoldingword/eslint-config</text:p>
          </table:table-cell>
          <table:table-cell office: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text:p>klappy, ancientTexts-net, PhotoNomad0, RoyalSix, mandolyte, mannycolon, larsgson, Joel-C-Johnson, abelpz, jincypjose, Sterling (Jay) Scott, superdav42, actions-user, dependabot[bot], Christopher Klapp, richmahn, kintsoogi</text:p>
          </table:table-cell>
          <table:table-cell office:value-type="string">
            <text:p>0</text:p>
          </table:table-cell>
          <table:table-cell office:value-type="string">
            <text:p>0</text:p>
          </table:table-cell>
          <table:table-cell office:value-type="string">
            <text:p>https://github.com/unfoldingWord/scripture-resources-rcl</text:p>
          </table:table-cell>
          <table:table-cell office:value-type="string">
            <text:p>2026-03-19T13:23:28Z</text:p>
          </table:table-cell>
        </table:table-row>
        <table:table-row>
          <table:table-cell office:value-type="string">
            <text:p>ob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3-18T18:36:38Z</text:p>
          </table:table-cell>
          <table:table-cell office:value-type="string">
            <text:p>2026-03-18T14:39:13Z</text:p>
          </table:table-cell>
          <table:table-cell office:value-type="string">
            <text:p>2026-03-18T14:44:36Z</text:p>
          </table:table-cell>
          <table:table-cell office:value-type="string">
            <text:p>10</text:p>
          </table:table-cell>
          <table:table-cell office:value-type="string">
            <text:p>0</text:p>
          </table:table-cell>
          <table:table-cell office:value-type="string">
            <text:p>1534</text:p>
          </table:table-cell>
          <table:table-cell office:value-type="string">
            <text:p/>
          </table:table-cell>
          <table:table-cell office:value-type="string">
            <text:p>bs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resource-workspace-rcl, scripture-resources-rcl, tc-ui-toolkit, translation-helps-rcl, word-aligner</text:p>
          </table:table-cell>
          <table:table-cell office:value-type="string">
            <text:p>hiscoder-com/obt</text:p>
          </table:table-cell>
          <table:table-cell office:value-type="string">
            <text:p>foxprogs, Valyukhov, Vorobushec, Pavel064, Birch Champeon, dimanya, abelpz, ancientTexts-net, birchamp, DenisArger, gecraft</text:p>
          </table:table-cell>
          <table:table-cell office:value-type="string">
            <text:p>1</text:p>
          </table:table-cell>
          <table:table-cell office:value-type="string">
            <text:p>0</text:p>
          </table:table-cell>
          <table:table-cell office:value-type="string">
            <text:p>https://github.com/unfoldingWord/obt</text:p>
          </table:table-cell>
          <table:table-cell office:value-type="string">
            <text:p>2026-03-18T14:39:46Z</text:p>
          </table:table-cell>
        </table:table-row>
        <table:table-row>
          <table:table-cell office:value-type="string">
            <text:p>door43.or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4T16:02:14Z</text:p>
          </table:table-cell>
          <table:table-cell office:value-type="string">
            <text:p>2024-04-11T03:45:41Z</text:p>
          </table:table-cell>
          <table:table-cell office:value-type="string">
            <text:p/>
          </table:table-cell>
          <table:table-cell office:value-type="string">
            <text:p>103</text:p>
          </table:table-cell>
          <table:table-cell office:value-type="string">
            <text:p>18</text:p>
          </table:table-cell>
          <table:table-cell office:value-type="string">
            <text:p>644</text:p>
          </table:table-cell>
          <table:table-cell office:value-type="string">
            <text:p/>
          </table:table-cell>
          <table:table-cell office:value-type="string">
            <text:p>door43.or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jag3773, RobH123, PhotoNomad0, Phil Hopper, codemis, Richard Mahn, phillip-hopper, dependabot[bot], yakob-aleksandrovich, bspidel, ethantkoenig, dependabot-preview[bot]</text:p>
          </table:table-cell>
          <table:table-cell office:value-type="string">
            <text:p>0</text:p>
          </table:table-cell>
          <table:table-cell office:value-type="string">
            <text:p>0</text:p>
          </table:table-cell>
          <table:table-cell office:value-type="string">
            <text:p>https://github.com/unfoldingWord/door43.org</text:p>
          </table:table-cell>
          <table:table-cell office:value-type="string">
            <text:p>2026-03-15T03:14:46Z</text:p>
          </table:table-cell>
        </table:table-row>
        <table:table-row>
          <table:table-cell office:value-type="string">
            <text:p>fia-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3-11T19:28:14Z</text:p>
          </table:table-cell>
          <table:table-cell office:value-type="string">
            <text:p>2026-03-11T19:28:02Z</text:p>
          </table:table-cell>
          <table:table-cell office:value-type="string">
            <text:p/>
          </table:table-cell>
          <table:table-cell office:value-type="string">
            <text:p>1</text:p>
          </table:table-cell>
          <table:table-cell office:value-type="string">
            <text:p>0</text:p>
          </table:table-cell>
          <table:table-cell office:value-type="string">
            <text:p>5</text:p>
          </table:table-cell>
          <table:table-cell office:value-type="string">
            <text:p/>
          </table:table-cell>
          <table:table-cell office:value-type="string">
            <text:p>fia-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text:p>
          </table:table-cell>
          <table:table-cell office:value-type="string">
            <text:p>0</text:p>
          </table:table-cell>
          <table:table-cell office:value-type="string">
            <text:p>0</text:p>
          </table:table-cell>
          <table:table-cell office:value-type="string">
            <text:p>https://github.com/unfoldingWord/fia-mcp</text:p>
          </table:table-cell>
          <table:table-cell office:value-type="string">
            <text:p>2026-03-11T19:28:18Z</text:p>
          </table:table-cell>
        </table:table-row>
        <table:table-row>
          <table:table-cell office:value-type="string">
            <text:p>uw-quote-help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0T00:05:49Z</text:p>
          </table:table-cell>
          <table:table-cell office:value-type="string">
            <text:p>2026-03-10T00:05:49Z</text:p>
          </table:table-cell>
          <table:table-cell office:value-type="string">
            <text:p/>
          </table:table-cell>
          <table:table-cell office:value-type="string">
            <text:p>0</text:p>
          </table:table-cell>
          <table:table-cell office:value-type="string">
            <text:p>0</text:p>
          </table:table-cell>
          <table:table-cell office:value-type="string">
            <text:p>62</text:p>
          </table:table-cell>
          <table:table-cell office:value-type="string">
            <text:p/>
          </table:table-cell>
          <table:table-cell office:value-type="string">
            <text:p>uw-quote-helpers</text:p>
          </table:table-cell>
          <table:table-cell office:value-type="string">
            <text:p>False</text:p>
          </table:table-cell>
          <table:table-cell office:value-type="string">
            <text:p>3121</text:p>
          </table:table-cell>
          <table:table-cell office:value-type="string">
            <text:p>2025-01-17T14:55:12.819Z</text:p>
          </table:table-cell>
          <table:table-cell office:value-type="string">
            <text:p>door43-preview-app, single-scripture-rcl, scripture-resources-rcl</text:p>
          </table:table-cell>
          <table:table-cell office:value-type="string">
            <text:p>bible-reference-range, string-punctuation-tokenizer, tsv-groupdata-parser, usfm-js, uw-bible-parser</text:p>
          </table:table-cell>
          <table:table-cell office: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text:p>abelpz, PhotoNomad0, richmahn, Mookth789</text:p>
          </table:table-cell>
          <table:table-cell office:value-type="string">
            <text:p>0</text:p>
          </table:table-cell>
          <table:table-cell office:value-type="string">
            <text:p>0</text:p>
          </table:table-cell>
          <table:table-cell office:value-type="string">
            <text:p>https://github.com/unfoldingWord/uw-quote-helpers</text:p>
          </table:table-cell>
          <table:table-cell office:value-type="string">
            <text:p>2026-03-10T00:05:55Z</text:p>
          </table:table-cell>
        </table:table-row>
        <table:table-row>
          <table:table-cell office:value-type="string">
            <text:p>wordmapboost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3-09T13:39:10Z</text:p>
          </table:table-cell>
          <table:table-cell office:value-type="string">
            <text:p>2026-03-09T13:39:10Z</text:p>
          </table:table-cell>
          <table:table-cell office:value-type="string">
            <text:p/>
          </table:table-cell>
          <table:table-cell office:value-type="string">
            <text:p>0</text:p>
          </table:table-cell>
          <table:table-cell office:value-type="string">
            <text:p>0</text:p>
          </table:table-cell>
          <table:table-cell office:value-type="string">
            <text:p>45</text:p>
          </table:table-cell>
          <table:table-cell office:value-type="string">
            <text:p/>
          </table:table-cell>
          <table:table-cell office:value-type="string">
            <text:p>uw-wordmapbooster</text:p>
          </table:table-cell>
          <table:table-cell office:value-type="string">
            <text:p/>
          </table:table-cell>
          <table:table-cell office:value-type="string">
            <text:p/>
          </table:table-cell>
          <table:table-cell office:value-type="string">
            <text:p/>
          </table:table-cell>
          <table:table-cell office:value-type="string">
            <text:p>enhanced-word-aligner-rcl</text:p>
          </table:table-cell>
          <table:table-cell office:value-type="string">
            <text:p>usfm-js, wordmap, wordmap-lexer</text:p>
          </table:table-cell>
          <table:table-cell office:value-type="string">
            <text:p>JEdward7777/wordmapbooster</text:p>
          </table:table-cell>
          <table:table-cell office:value-type="string">
            <text:p>Joshua Lansford, PhotoNomad0</text:p>
          </table:table-cell>
          <table:table-cell office:value-type="string">
            <text:p>0</text:p>
          </table:table-cell>
          <table:table-cell office:value-type="string">
            <text:p>0</text:p>
          </table:table-cell>
          <table:table-cell office:value-type="string">
            <text:p>https://github.com/unfoldingWord/wordmapbooster</text:p>
          </table:table-cell>
          <table:table-cell office:value-type="string">
            <text:p>2026-03-09T13:39:14Z</text:p>
          </table:table-cell>
        </table:table-row>
        <table:table-row>
          <table:table-cell office:value-type="string">
            <text:p>datatable-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05T15:19:12Z</text:p>
          </table:table-cell>
          <table:table-cell office:value-type="string">
            <text:p>2026-03-04T13:44:54Z</text:p>
          </table:table-cell>
          <table:table-cell office:value-type="string">
            <text:p/>
          </table:table-cell>
          <table:table-cell office:value-type="string">
            <text:p>10</text:p>
          </table:table-cell>
          <table:table-cell office:value-type="string">
            <text:p>9</text:p>
          </table:table-cell>
          <table:table-cell office:value-type="string">
            <text:p>447</text:p>
          </table:table-cell>
          <table:table-cell office:value-type="string">
            <text:p/>
          </table:table-cell>
          <table:table-cell office:value-type="string">
            <text:p>datatable-translatable</text:p>
          </table:table-cell>
          <table:table-cell office:value-type="string">
            <text:p>False</text:p>
          </table:table-cell>
          <table:table-cell office:value-type="string">
            <text:p>3510</text:p>
          </table:table-cell>
          <table:table-cell office:value-type="string">
            <text:p>2026-02-02T16:12:05.648Z</text:p>
          </table:table-cell>
          <table:table-cell office:value-type="string">
            <text:p>tc-create-app, greek-apparatus-app</text:p>
          </table:table-cell>
          <table:table-cell office:value-type="string">
            <text:p>markdown-translatable, @unfoldingword/eslint-config</text:p>
          </table:table-cell>
          <table:table-cell office:value-type="string">
            <text:p>Bridgeconn/tc-create-offline, RevantCI/uw-lab, unfoldingWord-box3/greek-apparatus-app, unfoldingWord/tc-create-app</text:p>
          </table:table-cell>
          <table:table-cell office:value-type="string">
            <text:p>ancientTexts-net, mandolyte, Joel-C-Johnson, klappy, RoyalSix, superdav42, jincypjose, abelpz, Sterling (Jay) Scott, dependabot[bot], Dave, eliaspinero</text:p>
          </table:table-cell>
          <table:table-cell office:value-type="string">
            <text:p>0</text:p>
          </table:table-cell>
          <table:table-cell office:value-type="string">
            <text:p>0</text:p>
          </table:table-cell>
          <table:table-cell office:value-type="string">
            <text:p>https://github.com/unfoldingWord/datatable-translatable</text:p>
          </table:table-cell>
          <table:table-cell office:value-type="string">
            <text:p>2026-03-04T13:45:00Z</text:p>
          </table:table-cell>
        </table:table-row>
        <table:table-row>
          <table:table-cell office:value-type="string">
            <text:p>door43-preview-render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2-11T16:15:26Z</text:p>
          </table:table-cell>
          <table:table-cell office:value-type="string">
            <text:p>2026-02-11T16:15:23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door43-preview-render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alignment-remove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or43-preview-renderers</text:p>
          </table:table-cell>
          <table:table-cell office:value-type="string">
            <text:p>2026-02-11T16:15:30Z</text:p>
          </table:table-cell>
        </table:table-row>
        <table:table-row>
          <table:table-cell office:value-type="string">
            <text:p>usfm-alignment-remover-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17:08Z</text:p>
          </table:table-cell>
          <table:table-cell office:value-type="string">
            <text:p>2026-01-21T23:17:06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usfm-alignment-remover</text:p>
          </table:table-cell>
          <table:table-cell office:value-type="string">
            <text:p/>
          </table:table-cell>
          <table:table-cell office:value-type="string">
            <text:p/>
          </table:table-cell>
          <table:table-cell office:value-type="string">
            <text:p/>
          </table:table-cell>
          <table:table-cell office:value-type="string">
            <text:p>twl-generator, door43-preview-app, door43-preview-renderers</text:p>
          </table:table-cell>
          <table:table-cell office:value-type="string">
            <text:p>usfm-js</text:p>
          </table:table-cell>
          <table:table-cell office:value-type="string">
            <text:p>unfoldingWord/door43-preview-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usfm-alignment-remover-app</text:p>
          </table:table-cell>
          <table:table-cell office:value-type="string">
            <text:p>2026-01-21T23:17:11Z</text:p>
          </table:table-cell>
        </table:table-row>
        <table:table-row>
          <table:table-cell office:value-type="string">
            <text:p>tsv7-tn-cleanup-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11T23:11:16Z</text:p>
          </table:table-cell>
          <table:table-cell office:value-type="string">
            <text:p>2025-12-11T23:11:14Z</text:p>
          </table:table-cell>
          <table:table-cell office:value-type="string">
            <text:p/>
          </table:table-cell>
          <table:table-cell office:value-type="string">
            <text:p>1</text:p>
          </table:table-cell>
          <table:table-cell office:value-type="string">
            <text:p>0</text:p>
          </table:table-cell>
          <table:table-cell office:value-type="string">
            <text:p>95</text:p>
          </table:table-cell>
          <table:table-cell office:value-type="string">
            <text:p/>
          </table:table-cell>
          <table:table-cell office:value-type="string">
            <text:p>tsv7-tn-cleanup-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7-tn-cleanup-app</text:p>
          </table:table-cell>
          <table:table-cell office:value-type="string">
            <text:p>2025-12-11T23:11:20Z</text:p>
          </table:table-cell>
        </table:table-row>
        <table:table-row>
          <table:table-cell office:value-type="string">
            <text:p>websit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5-05-31T15:07:2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oryi, jeremymoore, kellyvivancox, aagraston, richmahn, yakob-aleksandrovich, sethstoll3, jag3773, generosityx</text:p>
          </table:table-cell>
          <table:table-cell office:value-type="string">
            <text:p>0</text:p>
          </table:table-cell>
          <table:table-cell office:value-type="string">
            <text:p>0</text:p>
          </table:table-cell>
          <table:table-cell office:value-type="string">
            <text:p>https://github.com/unfoldingWord/website</text:p>
          </table:table-cell>
          <table:table-cell office:value-type="string">
            <text:p>2025-12-03T19:14:44Z</text:p>
          </table:table-cell>
        </table:table-row>
        <table:table-row>
          <table:table-cell office:value-type="string">
            <text:p>tsv-groupdata-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01T15:56:28Z</text:p>
          </table:table-cell>
          <table:table-cell office:value-type="string">
            <text:p>2025-12-01T15:18:56Z</text:p>
          </table:table-cell>
          <table:table-cell office:value-type="string">
            <text:p>2021-08-27T21:03:12Z</text:p>
          </table:table-cell>
          <table:table-cell office:value-type="string">
            <text:p>7</text:p>
          </table:table-cell>
          <table:table-cell office:value-type="string">
            <text:p>7</text:p>
          </table:table-cell>
          <table:table-cell office:value-type="string">
            <text:p>284</text:p>
          </table:table-cell>
          <table:table-cell office:value-type="string">
            <text:p/>
          </table:table-cell>
          <table:table-cell office:value-type="string">
            <text:p>tsv-groupdata-parser</text:p>
          </table:table-cell>
          <table:table-cell office:value-type="string">
            <text:p>False</text:p>
          </table:table-cell>
          <table:table-cell office:value-type="string">
            <text:p>6516</text:p>
          </table:table-cell>
          <table:table-cell office:value-type="string">
            <text:p>2024-10-16T17:43:33.516Z</text:p>
          </table:table-cell>
          <table:table-cell office:value-type="string">
            <text:p>translationCore, uw-quote-helpers, tc-source-content-updater, checking-tool-rcl, checking-extension, pdf-generator</text:p>
          </table:table-cell>
          <table:table-cell office:value-type="string">
            <text:p>bible-reference-range, uw-tsv-parser, string-punctuation-tokenizer</text:p>
          </table:table-cell>
          <table:table-cell office: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text:p>mannycolon, PhotoNomad0, da1nerd, richmahn, RoyalSix, mandolyte, Sterling (Jay) Scott, yakob-aleksandrovich</text:p>
          </table:table-cell>
          <table:table-cell office:value-type="string">
            <text:p>1</text:p>
          </table:table-cell>
          <table:table-cell office:value-type="string">
            <text:p>0</text:p>
          </table:table-cell>
          <table:table-cell office:value-type="string">
            <text:p>https://github.com/unfoldingWord/tsv-groupdata-parser</text:p>
          </table:table-cell>
          <table:table-cell office:value-type="string">
            <text:p>2025-12-01T15:19:13Z</text:p>
          </table:table-cell>
        </table:table-row>
        <table:table-row>
          <table:table-cell office:value-type="string">
            <text:p>node-cli-add-gl-quotes-to-tsv-fil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22:53:14Z</text:p>
          </table:table-cell>
          <table:table-cell office:value-type="string">
            <text:p>2025-11-03T22:53:12Z</text:p>
          </table:table-cell>
          <table:table-cell office:value-type="string">
            <text:p>2025-04-23T20:48:30Z</text:p>
          </table:table-cell>
          <table:table-cell office:value-type="string">
            <text:p>0</text:p>
          </table:table-cell>
          <table:table-cell office:value-type="string">
            <text:p>0</text:p>
          </table:table-cell>
          <table:table-cell office:value-type="string">
            <text:p>29</text:p>
          </table:table-cell>
          <table:table-cell office:value-type="string">
            <text:p/>
          </table:table-cell>
          <table:table-cell office:value-type="string">
            <text:p>add-gl-quotes-to-tsv-fil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1</text:p>
          </table:table-cell>
          <table:table-cell office:value-type="string">
            <text:p>0</text:p>
          </table:table-cell>
          <table:table-cell office:value-type="string">
            <text:p>https://github.com/unfoldingWord/node-cli-add-gl-quotes-to-tsv-files</text:p>
          </table:table-cell>
          <table:table-cell office:value-type="string">
            <text:p>2025-11-03T22:53:18Z</text:p>
          </table:table-cell>
        </table:table-row>
        <table:table-row>
          <table:table-cell office:value-type="string">
            <text:p>tc-source-content-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0-28T18:40:43Z</text:p>
          </table:table-cell>
          <table:table-cell office:value-type="string">
            <text:p>2025-10-28T18:14:38Z</text:p>
          </table:table-cell>
          <table:table-cell office:value-type="string">
            <text:p>2021-08-27T21:43:21Z</text:p>
          </table:table-cell>
          <table:table-cell office:value-type="string">
            <text:p>0</text:p>
          </table:table-cell>
          <table:table-cell office:value-type="string">
            <text:p>0</text:p>
          </table:table-cell>
          <table:table-cell office:value-type="string">
            <text:p>721</text:p>
          </table:table-cell>
          <table:table-cell office:value-type="string">
            <text:p/>
          </table:table-cell>
          <table:table-cell office:value-type="string">
            <text:p>tc-source-content-updater</text:p>
          </table:table-cell>
          <table:table-cell office:value-type="string">
            <text:p>False</text:p>
          </table:table-cell>
          <table:table-cell office:value-type="string">
            <text:p>7859</text:p>
          </table:table-cell>
          <table:table-cell office:value-type="string">
            <text:p>2025-10-28T18:16:22.466Z</text:p>
          </table:table-cell>
          <table:table-cell office:value-type="string">
            <text:p>translationCore, checking-tool-rcl, checking-extension, pdf-generator</text:p>
          </table:table-cell>
          <table:table-cell office:value-type="string">
            <text:p>string-punctuation-tokenizer, tsv-groupdata-parser, usfm-js</text:p>
          </table:table-cell>
          <table:table-cell office:value-type="string">
            <text:p>FoustAndrew/wordAlignment, unfoldingWord/tx-job-handler, unfoldingWord/wordAlignment, unfoldingWord/checking-tool-wrapper, unfoldingWord-dev/uw-pdf-conversion-tools, unfoldingWord-dev/tools, unfoldingWord/translationCore</text:p>
          </table:table-cell>
          <table:table-cell office:value-type="string">
            <text:p>PhotoNomad0, mannycolon, richmahn, RoyalSix, dependabot-support, Sterling (Jay) Scott, da1nerd, bspidel</text:p>
          </table:table-cell>
          <table:table-cell office:value-type="string">
            <text:p>2</text:p>
          </table:table-cell>
          <table:table-cell office:value-type="string">
            <text:p>0</text:p>
          </table:table-cell>
          <table:table-cell office:value-type="string">
            <text:p>https://github.com/unfoldingWord/tc-source-content-updater</text:p>
          </table:table-cell>
          <table:table-cell office:value-type="string">
            <text:p>2025-10-28T18:14:43Z</text:p>
          </table:table-cell>
        </table:table-row>
        <table:table-row>
          <table:table-cell office:value-type="string">
            <text:p>checking-tool-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5-10-30T11:33:32Z</text:p>
          </table:table-cell>
          <table:table-cell office:value-type="string">
            <text:p>2025-10-20T15:57:27Z</text:p>
          </table:table-cell>
          <table:table-cell office:value-type="string">
            <text:p/>
          </table:table-cell>
          <table:table-cell office:value-type="string">
            <text:p>15</text:p>
          </table:table-cell>
          <table:table-cell office:value-type="string">
            <text:p>4</text:p>
          </table:table-cell>
          <table:table-cell office:value-type="string">
            <text:p>108</text:p>
          </table:table-cell>
          <table:table-cell office:value-type="string">
            <text:p/>
          </table:table-cell>
          <table:table-cell office:value-type="string">
            <text:p>checking-tool-rcl</text:p>
          </table:table-cell>
          <table:table-cell office:value-type="string">
            <text:p>False</text:p>
          </table:table-cell>
          <table:table-cell office:value-type="string">
            <text:p>6065</text:p>
          </table:table-cell>
          <table:table-cell office:value-type="string">
            <text:p>2025-10-20T15:58:23.259Z</text:p>
          </table:table-cell>
          <table:table-cell office:value-type="string">
            <text:p/>
          </table:table-cell>
          <table:table-cell office:value-type="string">
            <text:p>bible-reference-range, string-punctuation-tokenizer, tc-strings, usfm-js, uw-tsv-parser, word-aligner, word-aligner-lib, wordmap-lexer, tc-source-content-updater, tsv-groupdata-parser</text:p>
          </table:table-cell>
          <table:table-cell office:value-type="string">
            <text:p>unfoldingWord/word-aligner-rcl</text:p>
          </table:table-cell>
          <table:table-cell office:value-type="string">
            <text:p>PhotoNomad0, jincypjose</text:p>
          </table:table-cell>
          <table:table-cell office:value-type="string">
            <text:p>0</text:p>
          </table:table-cell>
          <table:table-cell office:value-type="string">
            <text:p>0</text:p>
          </table:table-cell>
          <table:table-cell office:value-type="string">
            <text:p>https://github.com/unfoldingWord/checking-tool-rcl</text:p>
          </table:table-cell>
          <table:table-cell office:value-type="string">
            <text:p>2025-10-20T15:57:32Z</text:p>
          </table:table-cell>
        </table:table-row>
        <table:table-row>
          <table:table-cell office:value-type="string">
            <text:p>unfoldingWord.github.io-ol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18-11-28T20:38:37Z</text:p>
          </table:table-cell>
          <table:table-cell office:value-type="string">
            <text:p>2018-11-28T20:31:56Z</text:p>
          </table:table-cell>
          <table:table-cell office:value-type="string">
            <text:p/>
          </table:table-cell>
          <table:table-cell office:value-type="string">
            <text:p>0</text:p>
          </table:table-cell>
          <table:table-cell office:value-type="string">
            <text:p>0</text:p>
          </table:table-cell>
          <table:table-cell office:value-type="string">
            <text:p>105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phillip-hopper, Tim, codemis, Jesse A. Griffin, Tim J, benjore, Phil Hopper, root, jesse@unfoldingword.org, timjore, Apache, Richard Mahn, toddlprice, Gogs, russp41</text:p>
          </table:table-cell>
          <table:table-cell office:value-type="string">
            <text:p>0</text:p>
          </table:table-cell>
          <table:table-cell office:value-type="string">
            <text:p>0</text:p>
          </table:table-cell>
          <table:table-cell office:value-type="string">
            <text:p>https://github.com/unfoldingWord/unfoldingWord.github.io-old</text:p>
          </table:table-cell>
          <table:table-cell office:value-type="string">
            <text:p>2025-10-02T14:12:10Z</text:p>
          </table:table-cell>
        </table:table-row>
        <table:table-row>
          <table:table-cell office:value-type="string">
            <text:p>door43-preview-serv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True</text:p>
          </table:table-cell>
          <table:table-cell office:value-type="string">
            <text:p>2024-05-23T13:53:24Z</text:p>
          </table:table-cell>
          <table:table-cell office:value-type="string">
            <text:p>2024-05-23T13:53:22Z</text:p>
          </table:table-cell>
          <table:table-cell office:value-type="string">
            <text:p>2024-05-22T20:17:13Z</text:p>
          </table:table-cell>
          <table:table-cell office:value-type="string">
            <text:p>0</text:p>
          </table:table-cell>
          <table:table-cell office:value-type="string">
            <text:p>0</text:p>
          </table:table-cell>
          <table:table-cell office:value-type="string">
            <text:p>85</text:p>
          </table:table-cell>
          <table:table-cell office:value-type="string">
            <text:p/>
          </table:table-cell>
          <table:table-cell office:value-type="string">
            <text:p>door43-preview-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jmne/puppeteer-html2pdf</text:p>
          </table:table-cell>
          <table:table-cell office:value-type="string">
            <text:p>ccjmne, richmahn, bmestanov, redbaron-gt</text:p>
          </table:table-cell>
          <table:table-cell office:value-type="string">
            <text:p>1</text:p>
          </table:table-cell>
          <table:table-cell office:value-type="string">
            <text:p>0</text:p>
          </table:table-cell>
          <table:table-cell office:value-type="string">
            <text:p>https://github.com/unfoldingWord/door43-preview-server</text:p>
          </table:table-cell>
          <table:table-cell office:value-type="string">
            <text:p>2025-09-09T09:17:22Z</text:p>
          </table:table-cell>
        </table:table-row>
        <table:table-row>
          <table:table-cell office:value-type="string">
            <text:p>wordMA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2-18T15:24:32Z</text:p>
          </table:table-cell>
          <table:table-cell office:value-type="string">
            <text:p>2020-07-20T13:09:49Z</text:p>
          </table:table-cell>
          <table:table-cell office:value-type="string">
            <text:p>2020-01-21T15:05:54Z</text:p>
          </table:table-cell>
          <table:table-cell office:value-type="string">
            <text:p>20</text:p>
          </table:table-cell>
          <table:table-cell office:value-type="string">
            <text:p>14</text:p>
          </table:table-cell>
          <table:table-cell office:value-type="string">
            <text:p>329</text:p>
          </table:table-cell>
          <table:table-cell office:value-type="string">
            <text:p/>
          </table:table-cell>
          <table:table-cell office:value-type="string">
            <text:p>wordmap</text:p>
          </table:table-cell>
          <table:table-cell office:value-type="string">
            <text:p/>
          </table:table-cell>
          <table:table-cell office:value-type="string">
            <text:p/>
          </table:table-cell>
          <table:table-cell office:value-type="string">
            <text:p/>
          </table:table-cell>
          <table:table-cell office:value-type="string">
            <text:p>translationCore, wordAlignment, word-aligner-rcl, uw-wordmapbooster, wordmap-mt, wordmap-react-toolkit</text:p>
          </table:table-cell>
          <table:table-cell office:value-type="string">
            <text:p>wordmap-lexer</text:p>
          </table:table-cell>
          <table:table-cell office: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text:p>da1nerd, mannycolon, RoyalSix, dependabot-support, PhotoNomad0, klappy, dependabot[bot], bspidel, jag3773, Sterling (Jay) Scott</text:p>
          </table:table-cell>
          <table:table-cell office:value-type="string">
            <text:p>10</text:p>
          </table:table-cell>
          <table:table-cell office:value-type="string">
            <text:p>0</text:p>
          </table:table-cell>
          <table:table-cell office:value-type="string">
            <text:p>https://github.com/unfoldingWord/wordMAP</text:p>
          </table:table-cell>
          <table:table-cell office:value-type="string">
            <text:p>2025-08-25T16:40:45Z</text:p>
          </table:table-cell>
        </table:table-row>
        <table:table-row>
          <table:table-cell office:value-type="string">
            <text:p>discourse-mermai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3-07-26T14:38:59Z</text:p>
          </table:table-cell>
          <table:table-cell office:value-type="string">
            <text:p>2023-07-26T14:38:59Z</text:p>
          </table:table-cell>
          <table:table-cell office:value-type="string">
            <text:p/>
          </table:table-cell>
          <table:table-cell office:value-type="string">
            <text:p>4</text:p>
          </table:table-cell>
          <table:table-cell office:value-type="string">
            <text:p>2</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ishabhlakhotia, jjaffeux</text:p>
          </table:table-cell>
          <table:table-cell office:value-type="string">
            <text:p>0</text:p>
          </table:table-cell>
          <table:table-cell office:value-type="string">
            <text:p>0</text:p>
          </table:table-cell>
          <table:table-cell office:value-type="string">
            <text:p>https://github.com/unfoldingWord/discourse-mermaid</text:p>
          </table:table-cell>
          <table:table-cell office:value-type="string">
            <text:p>2025-05-13T01:56:41Z</text:p>
          </table:table-cell>
        </table:table-row>
        <table:table-row>
          <table:table-cell office:value-type="string">
            <text:p>markdown-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4-04T20:57:49Z</text:p>
          </table:table-cell>
          <table:table-cell office:value-type="string">
            <text:p>2023-03-08T14:57:07Z</text:p>
          </table:table-cell>
          <table:table-cell office:value-type="string">
            <text:p/>
          </table:table-cell>
          <table:table-cell office:value-type="string">
            <text:p>20</text:p>
          </table:table-cell>
          <table:table-cell office:value-type="string">
            <text:p>20</text:p>
          </table:table-cell>
          <table:table-cell office:value-type="string">
            <text:p>333</text:p>
          </table:table-cell>
          <table:table-cell office:value-type="string">
            <text:p/>
          </table:table-cell>
          <table:table-cell office:value-type="string">
            <text:p>markdown-translatable</text:p>
          </table:table-cell>
          <table:table-cell office:value-type="string">
            <text:p>False</text:p>
          </table:table-cell>
          <table:table-cell office:value-type="string">
            <text:p>19649</text:p>
          </table:table-cell>
          <table:table-cell office:value-type="string">
            <text:p>2023-03-07T15:00:29.476Z</text:p>
          </table:table-cell>
          <table:table-cell office:value-type="string">
            <text:p>gateway-admin, gateway-edit, tc-create-app, gitea-react-toolkit, translation-helps-rcl, scripture-resources-rcl, datatable-translatable, resource-workspace-rcl, resource-checker, create-app, next-js-template, resource-container-rcl, pdf-generator-rcl, hello-dcs-react-component-library, obs-pdf-poc, md-tsv-converter-app, book-package-viewer-poc, gitea-offline-poc, scripture-burrito-react-jsonschema-form, tsv-editor</text:p>
          </table:table-cell>
          <table:table-cell office:value-type="string">
            <text:p>@unfoldingword/eslint-config</text:p>
          </table:table-cell>
          <table:table-cell office: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text:p>klappy, ancientTexts-net, RoyalSix, mannycolon, mandolyte, superdav42, Joel-C-Johnson, Sterling (Jay) Scott, jincypjose, dependabot[bot], PhotoNomad0, larsgson</text:p>
          </table:table-cell>
          <table:table-cell office:value-type="string">
            <text:p>0</text:p>
          </table:table-cell>
          <table:table-cell office:value-type="string">
            <text:p>0</text:p>
          </table:table-cell>
          <table:table-cell office:value-type="string">
            <text:p>https://github.com/unfoldingWord/markdown-translatable</text:p>
          </table:table-cell>
          <table:table-cell office:value-type="string">
            <text:p>2025-04-03T14:40:01Z</text:p>
          </table:table-cell>
        </table:table-row>
        <table:table-row>
          <table:table-cell office:value-type="string">
            <text:p>open-langu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5-02-06T18:22:40Z</text:p>
          </table:table-cell>
          <table:table-cell office:value-type="string">
            <text:p>2025-02-06T18:22:33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openlangu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amueljd</text:p>
          </table:table-cell>
          <table:table-cell office:value-type="string">
            <text:p>0</text:p>
          </table:table-cell>
          <table:table-cell office:value-type="string">
            <text:p>0</text:p>
          </table:table-cell>
          <table:table-cell office:value-type="string">
            <text:p>https://github.com/unfoldingWord/open-languages</text:p>
          </table:table-cell>
          <table:table-cell office:value-type="string">
            <text:p>2025-02-06T18:22:44Z</text:p>
          </table:table-cell>
        </table:table-row>
        <table:table-row>
          <table:table-cell office:value-type="string">
            <text:p>tc-ui-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2-31T18:53:36Z</text:p>
          </table:table-cell>
          <table:table-cell office:value-type="string">
            <text:p>2024-12-31T18:52:39Z</text:p>
          </table:table-cell>
          <table:table-cell office:value-type="string">
            <text:p>2019-02-06T21:38:09Z</text:p>
          </table:table-cell>
          <table:table-cell office:value-type="string">
            <text:p>34</text:p>
          </table:table-cell>
          <table:table-cell office:value-type="string">
            <text:p>33</text:p>
          </table:table-cell>
          <table:table-cell office:value-type="string">
            <text:p>1973</text:p>
          </table:table-cell>
          <table:table-cell office:value-type="string">
            <text:p/>
          </table:table-cell>
          <table:table-cell office:value-type="string">
            <text:p>tc-ui-toolkit</text:p>
          </table:table-cell>
          <table:table-cell office:value-type="string">
            <text:p>False</text:p>
          </table:table-cell>
          <table:table-cell office:value-type="string">
            <text:p>29580</text:p>
          </table:table-cell>
          <table:table-cell office:value-type="string">
            <text:p>2024-12-31T18:53:34.752Z</text:p>
          </table:table-cell>
          <table:table-cell office:value-type="string">
            <text:p>gateway-admin, translationCore, wordAlignment, gateway-edit, tc-create-app, single-scripture-rcl, translation-helps-rcl, scripture-resources-rcl, bsa, checking-tool-wrapper, alignment-playground, next-js-template</text:p>
          </table:table-cell>
          <table:table-cell office:value-type="string">
            <text:p>string-punctuation-tokenizer, word-aligner, usfm-js</text:p>
          </table:table-cell>
          <table:table-cell office: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text:p>mannycolon, PhotoNomad0, RoyalSix, da1nerd, richmahn, Sterling (Jay) Scott, bspidel, dependabot-support</text:p>
          </table:table-cell>
          <table:table-cell office:value-type="string">
            <text:p>9</text:p>
          </table:table-cell>
          <table:table-cell office:value-type="string">
            <text:p>0</text:p>
          </table:table-cell>
          <table:table-cell office:value-type="string">
            <text:p>https://github.com/unfoldingWord/tc-ui-toolkit</text:p>
          </table:table-cell>
          <table:table-cell office:value-type="string">
            <text:p>2024-12-31T18:52:44Z</text:p>
          </table:table-cell>
        </table:table-row>
        <table:table-row>
          <table:table-cell office:value-type="string">
            <text:p>checking-tool-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48:38Z</text:p>
          </table:table-cell>
          <table:table-cell office:value-type="string">
            <text:p>2024-12-06T22:02:10Z</text:p>
          </table:table-cell>
          <table:table-cell office:value-type="string">
            <text:p>2021-06-29T21:55:08Z</text:p>
          </table:table-cell>
          <table:table-cell office:value-type="string">
            <text:p>18</text:p>
          </table:table-cell>
          <table:table-cell office:value-type="string">
            <text:p>18</text:p>
          </table:table-cell>
          <table:table-cell office:value-type="string">
            <text:p>1251</text:p>
          </table:table-cell>
          <table:table-cell office:value-type="string">
            <text:p/>
          </table:table-cell>
          <table:table-cell office:value-type="string">
            <text:p>checking-tool-wrapper</text:p>
          </table:table-cell>
          <table:table-cell office:value-type="string">
            <text:p/>
          </table:table-cell>
          <table:table-cell office:value-type="string">
            <text:p/>
          </table:table-cell>
          <table:table-cell office:value-type="string">
            <text:p/>
          </table:table-cell>
          <table:table-cell office:value-type="string">
            <text:p>translationCore, translationNotes, translationWords</text:p>
          </table:table-cell>
          <table:table-cell office:value-type="string">
            <text:p>gogs-client, selections, string-punctuation-tokenizer, tc-tool, tc-ui-toolkit, usfm-js, word-aligner</text:p>
          </table:table-cell>
          <table:table-cell office:value-type="string">
            <text:p/>
          </table:table-cell>
          <table:table-cell office:value-type="string">
            <text:p>mannycolon, PhotoNomad0, RoyalSix, da1nerd, richmahn, Sterling (Jay) Scott, dependabot[bot]</text:p>
          </table:table-cell>
          <table:table-cell office:value-type="string">
            <text:p>2</text:p>
          </table:table-cell>
          <table:table-cell office:value-type="string">
            <text:p>0</text:p>
          </table:table-cell>
          <table:table-cell office:value-type="string">
            <text:p>https://github.com/unfoldingWord/checking-tool-wrapper</text:p>
          </table:table-cell>
          <table:table-cell office:value-type="string">
            <text:p>2024-12-06T22:02:15Z</text:p>
          </table:table-cell>
        </table:table-row>
        <table:table-row>
          <table:table-cell office:value-type="string">
            <text:p>world-language-map-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0-13T01:07:52Z</text:p>
          </table:table-cell>
          <table:table-cell office:value-type="string">
            <text:p>2024-10-13T01:07:50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world-language-map-rcl</text:p>
          </table:table-cell>
          <table:table-cell office:value-type="string">
            <text:p>False</text:p>
          </table:table-cell>
          <table:table-cell office:value-type="string">
            <text:p>117</text:p>
          </table:table-cell>
          <table:table-cell office:value-type="string">
            <text:p>2024-10-13T01:08:01.943Z</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world-language-map-rcl</text:p>
          </table:table-cell>
          <table:table-cell office:value-type="string">
            <text:p>2024-10-13T01:07:56Z</text:p>
          </table:table-cell>
        </table:table-row>
        <table:table-row>
          <table:table-cell office:value-type="string">
            <text:p>salesforc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8T14:52:21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rRosewood, dhallsim, g-reichert, kmace16, UW-MountainPoint, MPkadarby1, atrancandoris, hallienicholas, Derek Hall, Jeff Clark, jag3773</text:p>
          </table:table-cell>
          <table:table-cell office:value-type="string">
            <text:p>0</text:p>
          </table:table-cell>
          <table:table-cell office:value-type="string">
            <text:p>0</text:p>
          </table:table-cell>
          <table:table-cell office:value-type="string">
            <text:p>https://github.com/unfoldingWord/salesforce-core</text:p>
          </table:table-cell>
          <table:table-cell office:value-type="string">
            <text:p>2024-08-28T14:52:21Z</text:p>
          </table:table-cell>
        </table:table-row>
        <table:table-row>
          <table:table-cell office:value-type="string">
            <text:p>oce-editor-too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bible-referen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6-04T12:41:01Z</text:p>
          </table:table-cell>
          <table:table-cell office:value-type="string">
            <text:p>2024-06-04T12:38:41Z</text:p>
          </table:table-cell>
          <table:table-cell office:value-type="string">
            <text:p>2024-06-06T22:07:09Z</text:p>
          </table:table-cell>
          <table:table-cell office:value-type="string">
            <text:p>6</text:p>
          </table:table-cell>
          <table:table-cell office:value-type="string">
            <text:p>0</text:p>
          </table:table-cell>
          <table:table-cell office:value-type="string">
            <text:p>124</text:p>
          </table:table-cell>
          <table:table-cell office:value-type="string">
            <text:p/>
          </table:table-cell>
          <table:table-cell office:value-type="string">
            <text:p>bible-reference-rcl</text:p>
          </table:table-cell>
          <table:table-cell office:value-type="string">
            <text:p>False</text:p>
          </table:table-cell>
          <table:table-cell office:value-type="string">
            <text:p>5169</text:p>
          </table:table-cell>
          <table:table-cell office:value-type="string">
            <text:p>2024-06-04T12:40:10.075Z</text:p>
          </table:table-cell>
          <table:table-cell office:value-type="string">
            <text:p>door43-preview-app, gateway-edit, bsa, scripture-tsv, gateway-translate, create-app, bible-preview-app, anchor-alignment-poc, greek-apparatus-app, @oce-editor-tools/joy-pk, @oce-editor-tools/mui-pk</text:p>
          </table:table-cell>
          <table:table-cell office:value-type="string">
            <text:p>bible-reference-range</text:p>
          </table:table-cell>
          <table:table-cell office:value-type="string">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text:p>PhotoNomad0, mannycolon, foxprogs, Joel-C-Johnson, kintsoogi, richmahn</text:p>
          </table:table-cell>
          <table:table-cell office:value-type="string">
            <text:p>2</text:p>
          </table:table-cell>
          <table:table-cell office:value-type="string">
            <text:p>0</text:p>
          </table:table-cell>
          <table:table-cell office:value-type="string">
            <text:p>https://github.com/unfoldingWord/bible-reference-rcl</text:p>
          </table:table-cell>
          <table:table-cell office:value-type="string">
            <text:p>2024-06-04T12:38:45Z</text:p>
          </table:table-cell>
        </table:table-row>
        <table:table-row>
          <table:table-cell office:value-type="string">
            <text:p>open-components-hackathon-website</text:p>
          </table:table-cell>
          <table:table-cell office:value-type="string">
            <text:p>unfoldingWord</text:p>
          </table:table-cell>
          <table:table-cell office:value-type="string">
            <text:p>TypeScript</text:p>
          </table:table-cell>
          <table:table-cell office:value-type="string">
            <text:p>True</text:p>
          </table:table-cell>
          <table:table-cell office:value-type="string">
            <text:p>True</text:p>
          </table:table-cell>
          <table:table-cell office:value-type="string">
            <text:p>2022-01-05T02:52:31Z</text:p>
          </table:table-cell>
          <table:table-cell office:value-type="string">
            <text:p>2022-01-05T02:52:31Z</text:p>
          </table:table-cell>
          <table:table-cell office:value-type="string">
            <text:p/>
          </table:table-cell>
          <table:table-cell office:value-type="string">
            <text:p>4</text:p>
          </table:table-cell>
          <table:table-cell office:value-type="string">
            <text:p>0</text:p>
          </table:table-cell>
          <table:table-cell office:value-type="string">
            <text:p>130</text:p>
          </table:table-cell>
          <table:table-cell office:value-type="string">
            <text:p/>
          </table:table-cell>
          <table:table-cell office:value-type="string">
            <text:p>virtual-event-starter-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ercel/virtual-event-starter-kit</text:p>
          </table:table-cell>
          <table:table-cell office:value-type="string">
            <text:p>mannycolon, chibicode, leerob, goncy, levimykel, fofiu, Deep-Codes, enesakar, erikras, irahopkinson, marionott, matheuss, richmahn, hugefunwoo, lisilinhart</text:p>
          </table:table-cell>
          <table:table-cell office:value-type="string">
            <text:p>0</text:p>
          </table:table-cell>
          <table:table-cell office:value-type="string">
            <text:p>0</text:p>
          </table:table-cell>
          <table:table-cell office:value-type="string">
            <text:p>https://github.com/unfoldingWord/open-components-hackathon-website</text:p>
          </table:table-cell>
          <table:table-cell office:value-type="string">
            <text:p>2024-05-22T10:11:28Z</text:p>
          </table:table-cell>
        </table:table-row>
        <table:table-row>
          <table:table-cell office:value-type="string">
            <text:p>scripture-tsv</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8T19:09:17Z</text:p>
          </table:table-cell>
          <table:table-cell office:value-type="string">
            <text:p>2024-05-07T12:40:32Z</text:p>
          </table:table-cell>
          <table:table-cell office:value-type="string">
            <text:p>2024-05-08T19:09:17Z</text:p>
          </table:table-cell>
          <table:table-cell office:value-type="string">
            <text:p>2</text:p>
          </table:table-cell>
          <table:table-cell office:value-type="string">
            <text:p>0</text:p>
          </table:table-cell>
          <table:table-cell office:value-type="string">
            <text:p>51</text:p>
          </table:table-cell>
          <table:table-cell office:value-type="string">
            <text:p/>
          </table:table-cell>
          <table:table-cell office:value-type="string">
            <text:p>scripture-tsv</text:p>
          </table:table-cell>
          <table:table-cell office:value-type="string">
            <text:p>False</text:p>
          </table:table-cell>
          <table:table-cell office:value-type="string">
            <text:p>2660</text:p>
          </table:table-cell>
          <table:table-cell office:value-type="string">
            <text:p>2024-05-02T21:03:03.412Z</text:p>
          </table:table-cell>
          <table:table-cell office:value-type="string">
            <text:p>gateway-edit</text:p>
          </table:table-cell>
          <table:table-cell office:value-type="string">
            <text:p>bible-reference-range, bible-reference-rcl</text:p>
          </table:table-cell>
          <table:table-cell office:value-type="string">
            <text:p>unfoldingWord/gateway-edit, kintsoogi/translation-notes-extension</text:p>
          </table:table-cell>
          <table:table-cell office:value-type="string">
            <text:p>kintsoogi, PhotoNomad0</text:p>
          </table:table-cell>
          <table:table-cell office:value-type="string">
            <text:p>2</text:p>
          </table:table-cell>
          <table:table-cell office:value-type="string">
            <text:p>0</text:p>
          </table:table-cell>
          <table:table-cell office:value-type="string">
            <text:p>https://github.com/unfoldingWord/scripture-tsv</text:p>
          </table:table-cell>
          <table:table-cell office:value-type="string">
            <text:p>2024-05-07T12:40:37Z</text:p>
          </table:table-cell>
        </table:table-row>
        <table:table-row>
          <table:table-cell office:value-type="string">
            <text:p>oce-oak-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07:56:18Z</text:p>
          </table:table-cell>
          <table:table-cell office:value-type="string">
            <text:p>2024-01-11T12:01:38Z</text:p>
          </table:table-cell>
          <table:table-cell office:value-type="string">
            <text:p/>
          </table:table-cell>
          <table:table-cell office:value-type="string">
            <text:p>0</text:p>
          </table:table-cell>
          <table:table-cell office:value-type="string">
            <text:p>0</text:p>
          </table:table-cell>
          <table:table-cell office:value-type="string">
            <text:p>17</text:p>
          </table:table-cell>
          <table:table-cell office:value-type="string">
            <text:p/>
          </table:table-cell>
          <table:table-cell office:value-type="string">
            <text:p>OCE Oak 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kintsoogi</text:p>
          </table:table-cell>
          <table:table-cell office:value-type="string">
            <text:p>0</text:p>
          </table:table-cell>
          <table:table-cell office:value-type="string">
            <text:p>0</text:p>
          </table:table-cell>
          <table:table-cell office:value-type="string">
            <text:p>https://github.com/unfoldingWord/oce-oak-edit</text:p>
          </table:table-cell>
          <table:table-cell office:value-type="string">
            <text:p>2023-09-18T05:39:45Z</text:p>
          </table:table-cell>
        </table:table-row>
        <table:table-row>
          <table:table-cell office:value-type="string">
            <text:p>oce-oak-rend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14:27:05Z</text:p>
          </table:table-cell>
          <table:table-cell office:value-type="string">
            <text:p>2024-01-12T14:27:05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oce-oak-ren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PhotoNomad0</text:p>
          </table:table-cell>
          <table:table-cell office:value-type="string">
            <text:p>0</text:p>
          </table:table-cell>
          <table:table-cell office:value-type="string">
            <text:p>0</text:p>
          </table:table-cell>
          <table:table-cell office:value-type="string">
            <text:p>https://github.com/unfoldingWord/oce-oak-render</text:p>
          </table:table-cell>
          <table:table-cell office:value-type="string">
            <text:p>2023-09-13T16:01:45Z</text:p>
          </table:table-cell>
        </table:table-row>
        <table:table-row>
          <table:table-cell office:value-type="string">
            <text:p>find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bible-reference-ran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12-07T19:15:38Z</text:p>
          </table:table-cell>
          <table:table-cell office:value-type="string">
            <text:p>2023-12-07T18:20:14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bible-reference-range</text:p>
          </table:table-cell>
          <table:table-cell office:value-type="string">
            <text:p>False</text:p>
          </table:table-cell>
          <table:table-cell office:value-type="string">
            <text:p>16689</text:p>
          </table:table-cell>
          <table:table-cell office:value-type="string">
            <text:p>2023-12-07T19:15:35.590Z</text:p>
          </table:table-cell>
          <table:table-cell office:value-type="string">
            <text:p>translationCore, enhanced-word-aligner-rcl, tc-create-app, word-aligner-rcl, word-aligner-lib, single-scripture-rcl, translation-helps-rcl, scripture-resources-rcl, uw-quote-helpers, tsv-groupdata-parser, checking-tool-rcl, bible-reference-rcl, scripture-tsv, uw-bible-parser, checking-extension, alignment-playground</text:p>
          </table:table-cell>
          <table:table-cell office:value-type="string">
            <text:p/>
          </table:table-cell>
          <table:table-cell office:value-type="string">
            <text:p/>
          </table:table-cell>
          <table:table-cell office:value-type="string">
            <text:p>Joel-C-Johnson, PhotoNomad0, kintsoogi, jincypjose</text:p>
          </table:table-cell>
          <table:table-cell office:value-type="string">
            <text:p>0</text:p>
          </table:table-cell>
          <table:table-cell office:value-type="string">
            <text:p>0</text:p>
          </table:table-cell>
          <table:table-cell office:value-type="string">
            <text:p>https://github.com/unfoldingWord/bible-reference-range</text:p>
          </table:table-cell>
          <table:table-cell office:value-type="string">
            <text:p>2023-07-19T04:20:40Z</text:p>
          </table:table-cell>
        </table:table-row>
        <table:table-row>
          <table:table-cell office:value-type="string">
            <text:p>uw-tsv-pars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6-05T15:16:07Z</text:p>
          </table:table-cell>
          <table:table-cell office:value-type="string">
            <text:p>2023-05-31T22:28:26Z</text:p>
          </table:table-cell>
          <table:table-cell office:value-type="string">
            <text:p/>
          </table:table-cell>
          <table:table-cell office:value-type="string">
            <text:p>1</text:p>
          </table:table-cell>
          <table:table-cell office:value-type="string">
            <text:p>1</text:p>
          </table:table-cell>
          <table:table-cell office:value-type="string">
            <text:p>35</text:p>
          </table:table-cell>
          <table:table-cell office:value-type="string">
            <text:p/>
          </table:table-cell>
          <table:table-cell office:value-type="string">
            <text:p>uw-tsv-parser</text:p>
          </table:table-cell>
          <table:table-cell office:value-type="string">
            <text:p>False</text:p>
          </table:table-cell>
          <table:table-cell office:value-type="string">
            <text:p>4616</text:p>
          </table:table-cell>
          <table:table-cell office:value-type="string">
            <text:p>2022-02-02T14:06:17.344Z</text:p>
          </table:table-cell>
          <table:table-cell office:value-type="string">
            <text:p>gateway-admin, tc-create-app, word-aligner-rcl, tsv-groupdata-parser, checking-tool-rcl, checking-extension</text:p>
          </table:table-cell>
          <table:table-cell office:value-type="string">
            <text:p/>
          </table:table-cell>
          <table:table-cell office: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text:p>mandolyte, PhotoNomad0, ancientTexts-net, mannycolon</text:p>
          </table:table-cell>
          <table:table-cell office:value-type="string">
            <text:p>0</text:p>
          </table:table-cell>
          <table:table-cell office:value-type="string">
            <text:p>0</text:p>
          </table:table-cell>
          <table:table-cell office:value-type="string">
            <text:p>https://github.com/unfoldingWord/uw-tsv-parser</text:p>
          </table:table-cell>
          <table:table-cell office:value-type="string">
            <text:p>2023-05-31T22:28:33Z</text:p>
          </table:table-cell>
        </table:table-row>
        <table:table-row>
          <table:table-cell office:value-type="string">
            <text:p>uw-scripture-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03-16T00:50:58Z</text:p>
          </table:table-cell>
          <table:table-cell office:value-type="string">
            <text:p>2023-03-16T00:49:47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uw-bible-parser</text:p>
          </table:table-cell>
          <table:table-cell office:value-type="string">
            <text:p/>
          </table:table-cell>
          <table:table-cell office:value-type="string">
            <text:p/>
          </table:table-cell>
          <table:table-cell office:value-type="string">
            <text:p/>
          </table:table-cell>
          <table:table-cell office:value-type="string">
            <text:p>uw-quote-helpers</text:p>
          </table:table-cell>
          <table:table-cell office:value-type="string">
            <text:p>bible-reference-range, usfm-js</text:p>
          </table:table-cell>
          <table:table-cell office:value-type="string">
            <text:p>abelpz/oce-library-starter</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uw-scripture-parser</text:p>
          </table:table-cell>
          <table:table-cell office:value-type="string">
            <text:p>2023-03-15T02:11:57Z</text:p>
          </table:table-cell>
        </table:table-row>
        <table:table-row>
          <table:table-cell office:value-type="string">
            <text:p>epitelete-htm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4-18T13:52:37Z</text:p>
          </table:table-cell>
          <table:table-cell office:value-type="string">
            <text:p>2023-02-03T17:24:52Z</text:p>
          </table:table-cell>
          <table:table-cell office:value-type="string">
            <text:p/>
          </table:table-cell>
          <table:table-cell office:value-type="string">
            <text:p>4</text:p>
          </table:table-cell>
          <table:table-cell office:value-type="string">
            <text:p>3</text:p>
          </table:table-cell>
          <table:table-cell office:value-type="string">
            <text:p>136</text:p>
          </table:table-cell>
          <table:table-cell office:value-type="string">
            <text:p/>
          </table:table-cell>
          <table:table-cell office:value-type="string">
            <text:p>epitelete-html</text:p>
          </table:table-cell>
          <table:table-cell office:value-type="string">
            <text:p>False</text:p>
          </table:table-cell>
          <table:table-cell office:value-type="string">
            <text:p>10391</text:p>
          </table:table-cell>
          <table:table-cell office:value-type="string">
            <text:p>2023-07-16T00:28:17.570Z</text:p>
          </table:table-cell>
          <table:table-cell office:value-type="string">
            <text:p>OCE Oak Edit, oce-oak-render, uw-editor, beta-bibel-wiki, @oce-editor-tools/base-core, @oce-editor-tools/joy-core, @oce-editor-tools/joy-pk, @oce-editor-tools/mui-core, @oce-editor-tools/mui-pk, @oce-editor-tools/mui-simple, @oce-editor-tools/pk-aligner</text:p>
          </table:table-cell>
          <table:table-cell office:value-type="string">
            <text:p>uw-proskomma</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text:p>abelpz, mvahowe, mandolyte, samueljd, klappy</text:p>
          </table:table-cell>
          <table:table-cell office:value-type="string">
            <text:p>0</text:p>
          </table:table-cell>
          <table:table-cell office:value-type="string">
            <text:p>0</text:p>
          </table:table-cell>
          <table:table-cell office:value-type="string">
            <text:p>https://github.com/unfoldingWord/epitelete-html</text:p>
          </table:table-cell>
          <table:table-cell office:value-type="string">
            <text:p>2023-02-02T13:14:15Z</text:p>
          </table:table-cell>
        </table:table-row>
        <table:table-row>
          <table:table-cell office:value-type="string">
            <text:p>gateway-translat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08:42:40Z</text:p>
          </table:table-cell>
          <table:table-cell office:value-type="string">
            <text:p>2024-01-10T13:38:37Z</text:p>
          </table:table-cell>
          <table:table-cell office:value-type="string">
            <text:p>2024-01-12T13:59:58Z</text:p>
          </table:table-cell>
          <table:table-cell office:value-type="string">
            <text:p>35</text:p>
          </table:table-cell>
          <table:table-cell office:value-type="string">
            <text:p>5</text:p>
          </table:table-cell>
          <table:table-cell office:value-type="string">
            <text:p>352</text:p>
          </table:table-cell>
          <table:table-cell office:value-type="string">
            <text:p/>
          </table:table-cell>
          <table:table-cell office:value-type="string">
            <text:p>gateway-trans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 resource-workspace-rcl, scripture-resources-rcl, translation-helps-rcl</text:p>
          </table:table-cell>
          <table:table-cell office:value-type="string">
            <text:p/>
          </table:table-cell>
          <table:table-cell office:value-type="string">
            <text:p>mandolyte, larsgson, superdav42, abelpz, theNerd247, richmahn, elsylambert, jincypjose</text:p>
          </table:table-cell>
          <table:table-cell office:value-type="string">
            <text:p>3</text:p>
          </table:table-cell>
          <table:table-cell office:value-type="string">
            <text:p>0</text:p>
          </table:table-cell>
          <table:table-cell office:value-type="string">
            <text:p>https://github.com/unfoldingWord/gateway-translate</text:p>
          </table:table-cell>
          <table:table-cell office:value-type="string">
            <text:p>2023-01-21T16:44:36Z</text:p>
          </table:table-cell>
        </table:table-row>
        <table:table-row>
          <table:table-cell office:value-type="string">
            <text:p>uw-pdf-preview</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2-22T16:08:39Z</text:p>
          </table:table-cell>
          <table:table-cell office:value-type="string">
            <text:p>2022-11-08T16:01:20Z</text:p>
          </table:table-cell>
          <table:table-cell office:value-type="string">
            <text:p/>
          </table:table-cell>
          <table:table-cell office:value-type="string">
            <text:p>0</text:p>
          </table:table-cell>
          <table:table-cell office:value-type="string">
            <text:p>0</text:p>
          </table:table-cell>
          <table:table-cell office:value-type="string">
            <text:p>74</text:p>
          </table:table-cell>
          <table:table-cell office:value-type="string">
            <text:p/>
          </table:table-cell>
          <table:table-cell office:value-type="string">
            <text:p>uw-pdf-previe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 mandolyte, larsgson</text:p>
          </table:table-cell>
          <table:table-cell office:value-type="string">
            <text:p>0</text:p>
          </table:table-cell>
          <table:table-cell office:value-type="string">
            <text:p>0</text:p>
          </table:table-cell>
          <table:table-cell office:value-type="string">
            <text:p>https://github.com/unfoldingWord/uw-pdf-preview</text:p>
          </table:table-cell>
          <table:table-cell office:value-type="string">
            <text:p>2022-11-08T15:51:52Z</text:p>
          </table:table-cell>
        </table:table-row>
        <table:table-row>
          <table:table-cell office:value-type="string">
            <text:p>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1T04:09:41Z</text:p>
          </table:table-cell>
          <table:table-cell office:value-type="string">
            <text:p>2022-11-02T13:14:23Z</text:p>
          </table:table-cell>
          <table:table-cell office:value-type="string">
            <text:p>2022-10-29T20:10:49Z</text:p>
          </table:table-cell>
          <table:table-cell office:value-type="string">
            <text:p>0</text:p>
          </table:table-cell>
          <table:table-cell office:value-type="string">
            <text:p>0</text:p>
          </table:table-cell>
          <table:table-cell office:value-type="string">
            <text:p>59</text:p>
          </table:table-cell>
          <table:table-cell office:value-type="string">
            <text:p/>
          </table:table-cell>
          <table:table-cell office:value-type="string">
            <text:p>dcs-js</text:p>
          </table:table-cell>
          <table:table-cell office:value-type="string">
            <text:p>False</text:p>
          </table:table-cell>
          <table:table-cell office:value-type="string">
            <text:p>784</text:p>
          </table:table-cell>
          <table:table-cell office:value-type="string">
            <text:p>2022-11-02T13:18:25.384Z</text:p>
          </table:table-cell>
          <table:table-cell office:value-type="string">
            <text:p>dcs-branch-merger, gateway-translate, dcs-react-hooks, bible-preview-app, dcs-login, dcs-js-example</text:p>
          </table:table-cell>
          <table:table-cell office:value-type="string">
            <text:p/>
          </table:table-cell>
          <table:table-cell office:value-type="string">
            <text:p>nishantshah-me/docusaurus, unfoldingWord/dcs-branch-merger, unfoldingWord-box3/bible-preview-app, unfoldingWord/gateway-translate</text:p>
          </table:table-cell>
          <table:table-cell office:value-type="string">
            <text:p>abelpz, richmahn</text:p>
          </table:table-cell>
          <table:table-cell office:value-type="string">
            <text:p>3</text:p>
          </table:table-cell>
          <table:table-cell office:value-type="string">
            <text:p>0</text:p>
          </table:table-cell>
          <table:table-cell office:value-type="string">
            <text:p>https://github.com/unfoldingWord/dcs-js</text:p>
          </table:table-cell>
          <table:table-cell office:value-type="string">
            <text:p>2022-10-29T01:30:37Z</text:p>
          </table:table-cell>
        </table:table-row>
        <table:table-row>
          <table:table-cell office:value-type="string">
            <text:p>uw-edi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9-12T15:49:20Z</text:p>
          </table:table-cell>
          <table:table-cell office:value-type="string">
            <text:p>2023-09-12T15:49:12Z</text:p>
          </table:table-cell>
          <table:table-cell office:value-type="string">
            <text:p/>
          </table:table-cell>
          <table:table-cell office:value-type="string">
            <text:p>5</text:p>
          </table:table-cell>
          <table:table-cell office:value-type="string">
            <text:p>3</text:p>
          </table:table-cell>
          <table:table-cell office:value-type="string">
            <text:p>175</text:p>
          </table:table-cell>
          <table:table-cell office:value-type="string">
            <text:p/>
          </table:table-cell>
          <table:table-cell office:value-type="string">
            <text:p>uw-editor</text:p>
          </table:table-cell>
          <table:table-cell office:value-type="string">
            <text:p>True</text:p>
          </table:table-cell>
          <table:table-cell office:value-type="string">
            <text:p>1181</text:p>
          </table:table-cell>
          <table:table-cell office:value-type="string">
            <text:p>2023-03-21T14:43:38.471Z</text:p>
          </table:table-cell>
          <table:table-cell office:value-type="string">
            <text:p/>
          </table:table-cell>
          <table:table-cell office:value-type="string">
            <text:p>epitelete-html, translation-helps-rcl</text:p>
          </table:table-cell>
          <table:table-cell office:value-type="string">
            <text:p>unfoldingWord/gateway-translate</text:p>
          </table:table-cell>
          <table:table-cell office:value-type="string">
            <text:p>larsgson, mandolyte, superdav42, abelpz, irahopkinson</text:p>
          </table:table-cell>
          <table:table-cell office:value-type="string">
            <text:p>0</text:p>
          </table:table-cell>
          <table:table-cell office:value-type="string">
            <text:p>0</text:p>
          </table:table-cell>
          <table:table-cell office:value-type="string">
            <text:p>https://github.com/unfoldingWord/uw-editor</text:p>
          </table:table-cell>
          <table:table-cell office:value-type="string">
            <text:p>2022-10-19T03:29:50Z</text:p>
          </table:table-cell>
        </table:table-row>
        <table:table-row>
          <table:table-cell office:value-type="string">
            <text:p>dcs-pack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pack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react-hook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6-24T00:19:28Z</text:p>
          </table:table-cell>
          <table:table-cell office:value-type="string">
            <text:p>2022-06-23T20:16:40Z</text:p>
          </table:table-cell>
          <table:table-cell office:value-type="string">
            <text:p/>
          </table:table-cell>
          <table:table-cell office:value-type="string">
            <text:p>5</text:p>
          </table:table-cell>
          <table:table-cell office:value-type="string">
            <text:p>1</text:p>
          </table:table-cell>
          <table:table-cell office:value-type="string">
            <text:p>79</text:p>
          </table:table-cell>
          <table:table-cell office:value-type="string">
            <text:p/>
          </table:table-cell>
          <table:table-cell office:value-type="string">
            <text:p>dcs-react-hooks</text:p>
          </table:table-cell>
          <table:table-cell office:value-type="string">
            <text:p>False</text:p>
          </table:table-cell>
          <table:table-cell office:value-type="string">
            <text:p>177</text:p>
          </table:table-cell>
          <table:table-cell office:value-type="string">
            <text:p>2022-08-19T12:33:49.976Z</text:p>
          </table:table-cell>
          <table:table-cell office:value-type="string">
            <text:p/>
          </table:table-cell>
          <table:table-cell office:value-type="string">
            <text:p>dcs-js, uw-languages-rcl, @unfoldingword/eslint-config</text:p>
          </table:table-cell>
          <table:table-cell office:value-type="string">
            <text:p>nishantshah-me/docusaurus, unfoldingWord/gateway-translate</text:p>
          </table:table-cell>
          <table:table-cell office:value-type="string">
            <text:p>abelpz, mandolyte</text:p>
          </table:table-cell>
          <table:table-cell office:value-type="string">
            <text:p>0</text:p>
          </table:table-cell>
          <table:table-cell office:value-type="string">
            <text:p>0</text:p>
          </table:table-cell>
          <table:table-cell office:value-type="string">
            <text:p>https://github.com/unfoldingWord/dcs-react-hooks</text:p>
          </table:table-cell>
          <table:table-cell office:value-type="string">
            <text:p>2022-06-17T15:48:50Z</text:p>
          </table:table-cell>
        </table:table-row>
        <table:table-row>
          <table:table-cell office:value-type="string">
            <text:p>book-packag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2T13:43:17Z</text:p>
          </table:table-cell>
          <table:table-cell office:value-type="string">
            <text:p>2023-01-02T13:22:57Z</text:p>
          </table:table-cell>
          <table:table-cell office:value-type="string">
            <text:p/>
          </table:table-cell>
          <table:table-cell office:value-type="string">
            <text:p>10</text:p>
          </table:table-cell>
          <table:table-cell office:value-type="string">
            <text:p>8</text:p>
          </table:table-cell>
          <table:table-cell office:value-type="string">
            <text:p>184</text:p>
          </table:table-cell>
          <table:table-cell office:value-type="string">
            <text:p/>
          </table:table-cell>
          <table:table-cell office:value-type="string">
            <text:p>book-package-rcl</text:p>
          </table:table-cell>
          <table:table-cell office:value-type="string">
            <text:p>False</text:p>
          </table:table-cell>
          <table:table-cell office:value-type="string">
            <text:p>2216</text:p>
          </table:table-cell>
          <table:table-cell office:value-type="string">
            <text:p>2023-01-02T13:16:20.145Z</text:p>
          </table:table-cell>
          <table:table-cell office:value-type="string">
            <text:p>book-package-app</text:p>
          </table:table-cell>
          <table:table-cell office:value-type="string">
            <text:p>usfm-js, uw-word-count</text:p>
          </table:table-cell>
          <table:table-cell office:value-type="string">
            <text:p>unfoldingWord/book-package-app</text:p>
          </table:table-cell>
          <table:table-cell office:value-type="string">
            <text:p>mandolyte, abelpz, dependabot[bot]</text:p>
          </table:table-cell>
          <table:table-cell office:value-type="string">
            <text:p>0</text:p>
          </table:table-cell>
          <table:table-cell office:value-type="string">
            <text:p>0</text:p>
          </table:table-cell>
          <table:table-cell office:value-type="string">
            <text:p>https://github.com/unfoldingWord/book-package-rcl</text:p>
          </table:table-cell>
          <table:table-cell office:value-type="string">
            <text:p>2022-06-14T14:25:45Z</text:p>
          </table:table-cell>
        </table:table-row>
        <table:table-row>
          <table:table-cell office:value-type="string">
            <text:p>resource-workspa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6-13T13:45:24Z</text:p>
          </table:table-cell>
          <table:table-cell office:value-type="string">
            <text:p>2023-06-13T13:45:21Z</text:p>
          </table:table-cell>
          <table:table-cell office:value-type="string">
            <text:p/>
          </table:table-cell>
          <table:table-cell office:value-type="string">
            <text:p>3</text:p>
          </table:table-cell>
          <table:table-cell office:value-type="string">
            <text:p>0</text:p>
          </table:table-cell>
          <table:table-cell office:value-type="string">
            <text:p>159</text:p>
          </table:table-cell>
          <table:table-cell office:value-type="string">
            <text:p/>
          </table:table-cell>
          <table:table-cell office:value-type="string">
            <text:p>resource-workspace-rcl</text:p>
          </table:table-cell>
          <table:table-cell office:value-type="string">
            <text:p>False</text:p>
          </table:table-cell>
          <table:table-cell office:value-type="string">
            <text:p>3174</text:p>
          </table:table-cell>
          <table:table-cell office:value-type="string">
            <text:p>2023-06-13T13:51:03.803Z</text:p>
          </table:table-cell>
          <table:table-cell office:value-type="string">
            <text:p>gateway-admin, gateway-edit, bsa, gateway-translate, create-app, next-js-template, admin-app</text:p>
          </table:table-cell>
          <table:table-cell office:value-type="string">
            <text:p>@unfoldingword/eslint-config, gitea-react-toolkit, markdown-translatable, scripture-resources-rcl, translation-helps-rcl</text:p>
          </table:table-cell>
          <table:table-cell office:value-type="string">
            <text:p>unfoldingWord/obt, unfoldingWord/gateway-edit, unfoldingWord/gateway-translate, unfoldingWord/gateway-admin, hiscoder-com/obt</text:p>
          </table:table-cell>
          <table:table-cell office:value-type="string">
            <text:p>mannycolon, RoyalSix, PhotoNomad0, Sterling (Jay) Scott, foxprogs, mandolyte, Joel-C-Johnson</text:p>
          </table:table-cell>
          <table:table-cell office:value-type="string">
            <text:p>0</text:p>
          </table:table-cell>
          <table:table-cell office:value-type="string">
            <text:p>0</text:p>
          </table:table-cell>
          <table:table-cell office:value-type="string">
            <text:p>https://github.com/unfoldingWord/resource-workspace-rcl</text:p>
          </table:table-cell>
          <table:table-cell office:value-type="string">
            <text:p>2022-06-01T15:53:36Z</text:p>
          </table:table-cell>
        </table:table-row>
        <table:table-row>
          <table:table-cell office:value-type="string">
            <text:p>book-package-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6T02:24:43Z</text:p>
          </table:table-cell>
          <table:table-cell office:value-type="string">
            <text:p>2023-01-02T13:23:19Z</text:p>
          </table:table-cell>
          <table:table-cell office:value-type="string">
            <text:p>2020-03-30T14:42:12Z</text:p>
          </table:table-cell>
          <table:table-cell office:value-type="string">
            <text:p>24</text:p>
          </table:table-cell>
          <table:table-cell office:value-type="string">
            <text:p>17</text:p>
          </table:table-cell>
          <table:table-cell office:value-type="string">
            <text:p>176</text:p>
          </table:table-cell>
          <table:table-cell office:value-type="string">
            <text:p/>
          </table:table-cell>
          <table:table-cell office:value-type="string">
            <text:p>book-package-app</text:p>
          </table:table-cell>
          <table:table-cell office:value-type="string">
            <text:p>False</text:p>
          </table:table-cell>
          <table:table-cell office:value-type="string">
            <text:p>112</text:p>
          </table:table-cell>
          <table:table-cell office:value-type="string">
            <text:p>2020-07-15T14:29:05.613Z</text:p>
          </table:table-cell>
          <table:table-cell office:value-type="string">
            <text:p/>
          </table:table-cell>
          <table:table-cell office:value-type="string">
            <text:p>book-package-rcl</text:p>
          </table:table-cell>
          <table:table-cell office:value-type="string">
            <text:p/>
          </table:table-cell>
          <table:table-cell office:value-type="string">
            <text:p>mandolyte, dependabot[bot], jag3773</text:p>
          </table:table-cell>
          <table:table-cell office:value-type="string">
            <text:p>7</text:p>
          </table:table-cell>
          <table:table-cell office:value-type="string">
            <text:p>55</text:p>
          </table:table-cell>
          <table:table-cell office:value-type="string">
            <text:p>https://github.com/unfoldingWord/book-package-app</text:p>
          </table:table-cell>
          <table:table-cell office:value-type="string">
            <text:p>2021-12-17T13:15:30Z</text:p>
          </table:table-cell>
        </table:table-row>
        <table:table-row>
          <table:table-cell office:value-type="string">
            <text:p>catalog-next-toolki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1-06-15T13:39:30Z</text:p>
          </table:table-cell>
          <table:table-cell office:value-type="string">
            <text:p>2021-06-15T13:39:27Z</text:p>
          </table:table-cell>
          <table:table-cell office:value-type="string">
            <text:p/>
          </table:table-cell>
          <table:table-cell office:value-type="string">
            <text:p>1</text:p>
          </table:table-cell>
          <table:table-cell office:value-type="string">
            <text:p>0</text:p>
          </table:table-cell>
          <table:table-cell office:value-type="string">
            <text:p>5</text:p>
          </table:table-cell>
          <table:table-cell office:value-type="string">
            <text:p/>
          </table:table-cell>
          <table:table-cell office:value-type="string">
            <text:p>catalog-next-tool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content-validation</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catalog-next-toolkit</text:p>
          </table:table-cell>
          <table:table-cell office:value-type="string">
            <text:p>2021-06-15T13:39:33Z</text:p>
          </table:table-cell>
        </table:table-row>
        <table:table-row>
          <table:table-cell office:value-type="string">
            <text:p>eslint-confi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7T20:47:13Z</text:p>
          </table:table-cell>
          <table:table-cell office:value-type="string">
            <text:p>2020-12-15T23:29:03Z</text:p>
          </table:table-cell>
          <table:table-cell office:value-type="string">
            <text:p/>
          </table:table-cell>
          <table:table-cell office:value-type="string">
            <text:p>7</text:p>
          </table:table-cell>
          <table:table-cell office:value-type="string">
            <text:p>6</text:p>
          </table:table-cell>
          <table:table-cell office:value-type="string">
            <text:p>23</text:p>
          </table:table-cell>
          <table:table-cell office:value-type="string">
            <text:p/>
          </table:table-cell>
          <table:table-cell office:value-type="string">
            <text:p>@unfoldingword/eslint-config</text:p>
          </table:table-cell>
          <table:table-cell office:value-type="string">
            <text:p/>
          </table:table-cell>
          <table:table-cell office:value-type="string">
            <text:p/>
          </table:table-cell>
          <table:table-cell office:value-type="string">
            <text:p/>
          </table:table-cell>
          <table:table-cell office:value-type="string">
            <text:p>enhanced-word-aligner-rcl, tc-create-app, gitea-react-toolkit, single-scripture-rcl, scripture-resources-rcl, datatable-translatable, markdown-translatable, dcs-react-hooks, resource-workspace-rcl, simple-text-editor-rcl, gitea-offline-poc</text:p>
          </table:table-cell>
          <table:table-cell office:value-type="string">
            <text:p/>
          </table:table-cell>
          <table:table-cell office:value-type="string">
            <text:p/>
          </table:table-cell>
          <table:table-cell office:value-type="string">
            <text:p>RoyalSix, Sterling (Jay) Scott</text:p>
          </table:table-cell>
          <table:table-cell office:value-type="string">
            <text:p>0</text:p>
          </table:table-cell>
          <table:table-cell office:value-type="string">
            <text:p>0</text:p>
          </table:table-cell>
          <table:table-cell office:value-type="string">
            <text:p>https://github.com/unfoldingWord/eslint-config</text:p>
          </table:table-cell>
          <table:table-cell office:value-type="string">
            <text:p>2020-12-15T23:29:10Z</text:p>
          </table:table-cell>
        </table:table-row>
        <table:table-row>
          <table:table-cell office:value-type="string">
            <text:p>uw-word-cou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5T03:16:29Z</text:p>
          </table:table-cell>
          <table:table-cell office:value-type="string">
            <text:p>2020-08-11T13:41:51Z</text:p>
          </table:table-cell>
          <table:table-cell office:value-type="string">
            <text:p/>
          </table:table-cell>
          <table:table-cell office:value-type="string">
            <text:p>29</text:p>
          </table:table-cell>
          <table:table-cell office:value-type="string">
            <text:p>25</text:p>
          </table:table-cell>
          <table:table-cell office:value-type="string">
            <text:p>71</text:p>
          </table:table-cell>
          <table:table-cell office:value-type="string">
            <text:p/>
          </table:table-cell>
          <table:table-cell office:value-type="string">
            <text:p>uw-word-count</text:p>
          </table:table-cell>
          <table:table-cell office:value-type="string">
            <text:p>False</text:p>
          </table:table-cell>
          <table:table-cell office:value-type="string">
            <text:p>362</text:p>
          </table:table-cell>
          <table:table-cell office:value-type="string">
            <text:p>2020-07-15T14:01:25.409Z</text:p>
          </table:table-cell>
          <table:table-cell office:value-type="string">
            <text:p>book-package-rcl</text:p>
          </table:table-cell>
          <table:table-cell office:value-type="string">
            <text:p>usfm-js</text:p>
          </table:table-cell>
          <table:table-cell office:value-type="string">
            <text:p>unfoldingWord/book-package-app, unfoldingWord/book-package-rcl</text:p>
          </table:table-cell>
          <table:table-cell office:value-type="string">
            <text:p>mandolyte, dependabot[bot], jag3773</text:p>
          </table:table-cell>
          <table:table-cell office:value-type="string">
            <text:p>0</text:p>
          </table:table-cell>
          <table:table-cell office:value-type="string">
            <text:p>0</text:p>
          </table:table-cell>
          <table:table-cell office:value-type="string">
            <text:p>https://github.com/unfoldingWord/uw-word-count</text:p>
          </table:table-cell>
          <table:table-cell office:value-type="string">
            <text:p>2020-08-11T13:41:55Z</text:p>
          </table:table-cell>
        </table:table-row>
        <table:table-row>
          <table:table-cell office:value-type="string">
            <text:p>usfm-js-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5-26T18:46:35Z</text:p>
          </table:table-cell>
          <table:table-cell office:value-type="string">
            <text:p>2020-05-26T18:45:20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usfm-js-wrapp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RobH123</text:p>
          </table:table-cell>
          <table:table-cell office:value-type="string">
            <text:p>0</text:p>
          </table:table-cell>
          <table:table-cell office:value-type="string">
            <text:p>0</text:p>
          </table:table-cell>
          <table:table-cell office:value-type="string">
            <text:p>https://github.com/unfoldingWord/usfm-js-wrapper</text:p>
          </table:table-cell>
          <table:table-cell office:value-type="string">
            <text:p>2020-05-26T20:17:20Z</text:p>
          </table:table-cell>
        </table:table-row>
        <table:table-row>
          <table:table-cell office:value-type="string">
            <text:p>wordMAP-lex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0-08-11T15:37:37Z</text:p>
          </table:table-cell>
          <table:table-cell office:value-type="string">
            <text:p>2020-04-22T13:11:59Z</text:p>
          </table:table-cell>
          <table:table-cell office:value-type="string">
            <text:p/>
          </table:table-cell>
          <table:table-cell office:value-type="string">
            <text:p>0</text:p>
          </table:table-cell>
          <table:table-cell office:value-type="string">
            <text:p>0</text:p>
          </table:table-cell>
          <table:table-cell office:value-type="string">
            <text:p>39</text:p>
          </table:table-cell>
          <table:table-cell office:value-type="string">
            <text:p/>
          </table:table-cell>
          <table:table-cell office:value-type="string">
            <text:p>wordmap-lexer</text:p>
          </table:table-cell>
          <table:table-cell office:value-type="string">
            <text:p/>
          </table:table-cell>
          <table:table-cell office:value-type="string">
            <text:p/>
          </table:table-cell>
          <table:table-cell office:value-type="string">
            <text:p/>
          </table:table-cell>
          <table:table-cell office:value-type="string">
            <text:p>wordmap-usfm, translationCore, wordAlignment, string-punctuation-tokenizer, word-aligner-rcl, word-aligner-lib, uw-wordmapbooster, checking-tool-rcl, wordmap, wordmap-mt, alignment-playground, wordmap-react-toolkit</text:p>
          </table:table-cell>
          <table:table-cell office:value-type="string">
            <text:p>string-punctuation-tokenizer</text:p>
          </table:table-cell>
          <table:table-cell office:value-type="string">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text:p>
          </table:table-cell>
          <table:table-cell office:value-type="string">
            <text:p>da1nerd, mannycolon, dependabot-support, RoyalSix, PhotoNomad0, Sterling (Jay) Scott, bspidel</text:p>
          </table:table-cell>
          <table:table-cell office:value-type="string">
            <text:p>0</text:p>
          </table:table-cell>
          <table:table-cell office:value-type="string">
            <text:p>0</text:p>
          </table:table-cell>
          <table:table-cell office:value-type="string">
            <text:p>https://github.com/unfoldingWord/wordMAP-lexer</text:p>
          </table:table-cell>
          <table:table-cell office:value-type="string">
            <text:p>2020-04-22T13:12:03Z</text:p>
          </table:table-cell>
        </table:table-row>
        <table:table-row>
          <table:table-cell office:value-type="string">
            <text:p>tc-too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8-11T15:36:38Z</text:p>
          </table:table-cell>
          <table:table-cell office:value-type="string">
            <text:p>2020-04-16T01:20:11Z</text:p>
          </table:table-cell>
          <table:table-cell office:value-type="string">
            <text:p>2019-01-10T06:26:02Z</text:p>
          </table:table-cell>
          <table:table-cell office:value-type="string">
            <text:p>0</text:p>
          </table:table-cell>
          <table:table-cell office:value-type="string">
            <text:p>0</text:p>
          </table:table-cell>
          <table:table-cell office:value-type="string">
            <text:p>180</text:p>
          </table:table-cell>
          <table:table-cell office:value-type="string">
            <text:p/>
          </table:table-cell>
          <table:table-cell office:value-type="string">
            <text:p>tc-tool</text:p>
          </table:table-cell>
          <table:table-cell office:value-type="string">
            <text:p/>
          </table:table-cell>
          <table:table-cell office:value-type="string">
            <text:p/>
          </table:table-cell>
          <table:table-cell office:value-type="string">
            <text:p/>
          </table:table-cell>
          <table:table-cell office:value-type="string">
            <text:p>translationCore, translationNotes, translationWords, wordAlignment, checking-tool-wrapper, ScripturePane, VerseCheck, toolTemplate</text:p>
          </table:table-cell>
          <table:table-cell office:value-type="string">
            <text:p/>
          </table:table-cell>
          <table:table-cell office:value-type="string">
            <text:p>FoustAndrew/wordAlignment, unfoldingWord/checking-tool-wrapper, unfoldingWord/translationNotes, unfoldingWord/translationWords, unfoldingWord/wordAlignment, unfoldingWord/translationCore</text:p>
          </table:table-cell>
          <table:table-cell office:value-type="string">
            <text:p>da1nerd, mannycolon, dependabot-support, PhotoNomad0, RoyalSix, bspidel</text:p>
          </table:table-cell>
          <table:table-cell office:value-type="string">
            <text:p>3</text:p>
          </table:table-cell>
          <table:table-cell office:value-type="string">
            <text:p>0</text:p>
          </table:table-cell>
          <table:table-cell office:value-type="string">
            <text:p>https://github.com/unfoldingWord/tc-tool</text:p>
          </table:table-cell>
          <table:table-cell office:value-type="string">
            <text:p>2020-04-16T01:20:15Z</text:p>
          </table:table-cell>
        </table:table-row>
        <table:table-row>
          <table:table-cell office:value-type="string">
            <text:p>t-core-submodule-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19-10-22T20:22:22Z</text:p>
          </table:table-cell>
          <table:table-cell office:value-type="string">
            <text:p>2019-10-22T20:22:20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tc-submodule-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translationCore-submodule-updater</text:p>
          </table:table-cell>
          <table:table-cell office:value-type="string">
            <text:p>ihoegen, mannycolon</text:p>
          </table:table-cell>
          <table:table-cell office:value-type="string">
            <text:p>0</text:p>
          </table:table-cell>
          <table:table-cell office:value-type="string">
            <text:p>0</text:p>
          </table:table-cell>
          <table:table-cell office:value-type="string">
            <text:p>https://github.com/unfoldingWord/t-core-submodule-updater</text:p>
          </table:table-cell>
          <table:table-cell office:value-type="string">
            <text:p>2019-10-22T20:22:23Z</text:p>
          </table:table-cell>
        </table:table-row>
        <table:table-row>
          <table:table-cell office:value-type="string">
            <text:p>tc-string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5:11Z</text:p>
          </table:table-cell>
          <table:table-cell office:value-type="string">
            <text:p>2018-05-03T21:25:02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tc-strings</text:p>
          </table:table-cell>
          <table:table-cell office:value-type="string">
            <text:p/>
          </table:table-cell>
          <table:table-cell office:value-type="string">
            <text:p/>
          </table:table-cell>
          <table:table-cell office:value-type="string">
            <text:p/>
          </table:table-cell>
          <table:table-cell office:value-type="string">
            <text:p>translationCore, word-aligner-lib, checking-tool-rcl, selections, VerseCheck</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c-strings</text:p>
          </table:table-cell>
          <table:table-cell office:value-type="string">
            <text:p>2019-10-22T19:46:14Z</text:p>
          </table:table-cell>
        </table:table-row>
        <table:table-row>
          <table:table-cell office:value-type="string">
            <text:p>selection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3:33Z</text:p>
          </table:table-cell>
          <table:table-cell office:value-type="string">
            <text:p>2018-05-03T21:23:29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selections</text:p>
          </table:table-cell>
          <table:table-cell office:value-type="string">
            <text:p/>
          </table:table-cell>
          <table:table-cell office:value-type="string">
            <text:p/>
          </table:table-cell>
          <table:table-cell office:value-type="string">
            <text:p/>
          </table:table-cell>
          <table:table-cell office:value-type="string">
            <text:p>translationCore, wordAlignment, checking-tool-wrapper, VerseCheck</text:p>
          </table:table-cell>
          <table:table-cell office:value-type="string">
            <text:p>tc-strings</text:p>
          </table:table-cell>
          <table:table-cell office:value-type="string">
            <text:p>FoustAndrew/wordAlignment, unfoldingWord/wordAlignment, unfoldingWord/checking-tool-wrapper, unfoldingWord/translationNotes, unfoldingWord/translationWords, unfoldingWord/translationCore</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selections</text:p>
          </table:table-cell>
          <table:table-cell office:value-type="string">
            <text:p>2019-10-22T19:45:39Z</text:p>
          </table:table-cell>
        </table:table-row>
        <table:table-row>
          <table:table-cell office:value-type="string">
            <text:p>ScripturePan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7T19:59:54Z</text:p>
          </table:table-cell>
          <table:table-cell office:value-type="string">
            <text:p>2018-05-17T19:59:53Z</text:p>
          </table:table-cell>
          <table:table-cell office:value-type="string">
            <text:p/>
          </table:table-cell>
          <table:table-cell office:value-type="string">
            <text:p>0</text:p>
          </table:table-cell>
          <table:table-cell office:value-type="string">
            <text:p>0</text:p>
          </table:table-cell>
          <table:table-cell office:value-type="string">
            <text:p>450</text:p>
          </table:table-cell>
          <table:table-cell office:value-type="string">
            <text:p/>
          </table:table-cell>
          <table:table-cell office:value-type="string">
            <text:p>Scripture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ring-punctuation-tokenizer, tc-tool, usfm-js</text:p>
          </table:table-cell>
          <table:table-cell office:value-type="string">
            <text:p/>
          </table:table-cell>
          <table:table-cell office:value-type="string">
            <text:p>mannycolon, PhotoNomad0, da1nerd, klappy, RoyalSix, EllDoubleYew, cdwhitfield73, Sterling (Jay) Scott, ihoegen, richmahn, bspidel, Richard Mahn</text:p>
          </table:table-cell>
          <table:table-cell office:value-type="string">
            <text:p>0</text:p>
          </table:table-cell>
          <table:table-cell office:value-type="string">
            <text:p>0</text:p>
          </table:table-cell>
          <table:table-cell office:value-type="string">
            <text:p>https://github.com/unfoldingWord-dev/ScripturePane</text:p>
          </table:table-cell>
          <table:table-cell office:value-type="string">
            <text:p>2026-06-18T18:23:13Z</text:p>
          </table:table-cell>
        </table:table-row>
        <table:table-row>
          <table:table-cell office:value-type="string">
            <text:p>node-gogs-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4-19T16:22:58Z</text:p>
          </table:table-cell>
          <table:table-cell office:value-type="string">
            <text:p>2018-09-12T17:40:36Z</text:p>
          </table:table-cell>
          <table:table-cell office:value-type="string">
            <text:p>2018-06-05T18:06:48Z</text:p>
          </table:table-cell>
          <table:table-cell office:value-type="string">
            <text:p>1</text:p>
          </table:table-cell>
          <table:table-cell office:value-type="string">
            <text:p>1</text:p>
          </table:table-cell>
          <table:table-cell office:value-type="string">
            <text:p>64</text:p>
          </table:table-cell>
          <table:table-cell office:value-type="string">
            <text:p/>
          </table:table-cell>
          <table:table-cell office:value-type="string">
            <text:p>gogs-client</text:p>
          </table:table-cell>
          <table:table-cell office:value-type="string">
            <text:p>False</text:p>
          </table:table-cell>
          <table:table-cell office:value-type="string">
            <text:p>6739</text:p>
          </table:table-cell>
          <table:table-cell office:value-type="string">
            <text:p>2016-07-13T00:07:45.833Z</text:p>
          </table:table-cell>
          <table:table-cell office:value-type="string">
            <text:p>translationCore, wordAlignment, checking-tool-wrapper</text:p>
          </table:table-cell>
          <table:table-cell office:value-type="string">
            <text:p/>
          </table:table-cell>
          <table:table-cell office: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text:p>da1nerd, Thomas Klemz, jonasof</text:p>
          </table:table-cell>
          <table:table-cell office:value-type="string">
            <text:p>1</text:p>
          </table:table-cell>
          <table:table-cell office:value-type="string">
            <text:p>0</text:p>
          </table:table-cell>
          <table:table-cell office:value-type="string">
            <text:p>https://github.com/unfoldingWord-dev/node-gogs-client</text:p>
          </table:table-cell>
          <table:table-cell office:value-type="string">
            <text:p>2024-06-21T17:58:57Z</text:p>
          </table:table-cell>
        </table:table-row>
        <table:table-row>
          <table:table-cell office:value-type="string">
            <text:p>electronite-packag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3:47:10Z</text:p>
          </table:table-cell>
          <table:table-cell office:value-type="string">
            <text:p>2020-03-23T11:56:26Z</text:p>
          </table:table-cell>
          <table:table-cell office:value-type="string">
            <text:p/>
          </table:table-cell>
          <table:table-cell office:value-type="string">
            <text:p>0</text:p>
          </table:table-cell>
          <table:table-cell office:value-type="string">
            <text:p>0</text:p>
          </table:table-cell>
          <table:table-cell office:value-type="string">
            <text:p>1043</text:p>
          </table:table-cell>
          <table:table-cell office:value-type="string">
            <text:p/>
          </table:table-cell>
          <table:table-cell office:value-type="string">
            <text:p>electron-pack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ckybars/atom-shell-packager, unfoldingWord/gateway-edit, Proskomma/proskomma-legacy-projects, gbin-org/alignment-editor-rcl-poc, unfoldingWord/translationCore, mannycolon/electronite-poc-app</text:p>
          </table:table-cell>
          <table:table-cell office: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text:p>0</text:p>
          </table:table-cell>
          <table:table-cell office:value-type="string">
            <text:p>0</text:p>
          </table:table-cell>
          <table:table-cell office:value-type="string">
            <text:p>https://github.com/unfoldingWord-dev/electronite-packager</text:p>
          </table:table-cell>
          <table:table-cell office:value-type="string">
            <text:p>2023-09-18T17:18:06Z</text:p>
          </table:table-cell>
        </table:table-row>
        <table:table-row>
          <table:table-cell office:value-type="string">
            <text:p>electronite-cli</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6-01-22T20:59:24Z</text:p>
          </table:table-cell>
          <table:table-cell office:value-type="string">
            <text:p>2022-05-15T19:25:29Z</text:p>
          </table:table-cell>
          <table:table-cell office:value-type="string">
            <text:p>2026-01-08T18:38:22Z</text:p>
          </table:table-cell>
          <table:table-cell office:value-type="string">
            <text:p>0</text:p>
          </table:table-cell>
          <table:table-cell office:value-type="string">
            <text:p>0</text:p>
          </table:table-cell>
          <table:table-cell office:value-type="string">
            <text:p>27</text:p>
          </table:table-cell>
          <table:table-cell office:value-type="string">
            <text:p/>
          </table:table-cell>
          <table:table-cell office:value-type="string">
            <text:p>electronite</text:p>
          </table:table-cell>
          <table:table-cell office:value-type="string">
            <text:p>False</text:p>
          </table:table-cell>
          <table:table-cell office:value-type="string">
            <text:p>2606</text:p>
          </table:table-cell>
          <table:table-cell office:value-type="string">
            <text:p>2026-01-22T21:05:02.866Z</text:p>
          </table:table-cell>
          <table:table-cell office:value-type="string">
            <text:p>translationCore</text:p>
          </table:table-cell>
          <table:table-cell office:value-type="string">
            <text:p/>
          </table:table-cell>
          <table:table-cell office:value-type="string">
            <text:p>unfoldingWord/gateway-edit, Bridgeconn/tc-create-offline, Proskomma/proskomma-legacy-projects, friendsofagape/autographa, gbin-org/alignment-editor-rcl-poc, unfoldingWord/translationCore, mannycolon/electronite-poc-app</text:p>
          </table:table-cell>
          <table:table-cell office:value-type="string">
            <text:p>da1nerd, PhotoNomad0</text:p>
          </table:table-cell>
          <table:table-cell office:value-type="string">
            <text:p>32</text:p>
          </table:table-cell>
          <table:table-cell office:value-type="string">
            <text:p>0</text:p>
          </table:table-cell>
          <table:table-cell office:value-type="string">
            <text:p>https://github.com/unfoldingWord-dev/electronite-cli</text:p>
          </table:table-cell>
          <table:table-cell office:value-type="string">
            <text:p>2023-09-04T12:03:41Z</text:p>
          </table:table-cell>
        </table:table-row>
        <table:table-row>
          <table:table-cell office:value-type="string">
            <text:p>translationHelp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3-12T17:46:51Z</text:p>
          </table:table-cell>
          <table:table-cell office:value-type="string">
            <text:p>2018-03-12T17:46:50Z</text:p>
          </table:table-cell>
          <table:table-cell office:value-type="string">
            <text:p/>
          </table:table-cell>
          <table:table-cell office:value-type="string">
            <text:p>0</text:p>
          </table:table-cell>
          <table:table-cell office:value-type="string">
            <text:p>0</text:p>
          </table:table-cell>
          <table:table-cell office:value-type="string">
            <text:p>136</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EllDoubleYew, Richard Mahn, klappy, ihoegen, cdwhitfield73, RoyalSix, da1nerd, Sterling (Jay) Scott, Audrey Mahn, PhotoNomad0</text:p>
          </table:table-cell>
          <table:table-cell office:value-type="string">
            <text:p>0</text:p>
          </table:table-cell>
          <table:table-cell office:value-type="string">
            <text:p>0</text:p>
          </table:table-cell>
          <table:table-cell office:value-type="string">
            <text:p>https://github.com/unfoldingWord-dev/translationHelps</text:p>
          </table:table-cell>
          <table:table-cell office:value-type="string">
            <text:p>2023-01-28T16:52:06Z</text:p>
          </table:table-cell>
        </table:table-row>
        <table:table-row>
          <table:table-cell office:value-type="string">
            <text:p>example_tool</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6-12-09T21:07:14Z</text:p>
          </table:table-cell>
          <table:table-cell office:value-type="string">
            <text:p>2016-10-20T07:35:23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Example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text:p>
          </table:table-cell>
          <table:table-cell office:value-type="string">
            <text:p>0</text:p>
          </table:table-cell>
          <table:table-cell office:value-type="string">
            <text:p>0</text:p>
          </table:table-cell>
          <table:table-cell office:value-type="string">
            <text:p>https://github.com/unfoldingWord-dev/example_tool</text:p>
          </table:table-cell>
          <table:table-cell office:value-type="string">
            <text:p>2023-01-28T16:52:06Z</text:p>
          </table:table-cell>
        </table:table-row>
        <table:table-row>
          <table:table-cell office:value-type="string">
            <text:p>tC_Resource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9-09T10:57:36Z</text:p>
          </table:table-cell>
          <table:table-cell office:value-type="string">
            <text:p>2018-08-06T15:39:55Z</text:p>
          </table:table-cell>
          <table:table-cell office:value-type="string">
            <text:p/>
          </table:table-cell>
          <table:table-cell office:value-type="string">
            <text:p>0</text:p>
          </table:table-cell>
          <table:table-cell office:value-type="string">
            <text:p>0</text:p>
          </table:table-cell>
          <table:table-cell office:value-type="string">
            <text:p>183</text:p>
          </table:table-cell>
          <table:table-cell office:value-type="string">
            <text:p/>
          </table:table-cell>
          <table:table-cell office:value-type="string">
            <text:p>tc_resourc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PhotoNomad0, richmahn, mannycolon, Richard Mahn, klappy, RoyalSix, da1nerd, Sterling (Jay) Scott</text:p>
          </table:table-cell>
          <table:table-cell office:value-type="string">
            <text:p>0</text:p>
          </table:table-cell>
          <table:table-cell office:value-type="string">
            <text:p>0</text:p>
          </table:table-cell>
          <table:table-cell office:value-type="string">
            <text:p>https://github.com/unfoldingWord-dev/tC_Resources</text:p>
          </table:table-cell>
          <table:table-cell office:value-type="string">
            <text:p>2023-01-28T16:35:42Z</text:p>
          </table:table-cell>
        </table:table-row>
        <table:table-row>
          <table:table-cell office:value-type="string">
            <text:p>VerseCheck</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8T14:29:02Z</text:p>
          </table:table-cell>
          <table:table-cell office:value-type="string">
            <text:p>2018-05-17T20:00:13Z</text:p>
          </table:table-cell>
          <table:table-cell office:value-type="string">
            <text:p/>
          </table:table-cell>
          <table:table-cell office:value-type="string">
            <text:p>1</text:p>
          </table:table-cell>
          <table:table-cell office:value-type="string">
            <text:p>0</text:p>
          </table:table-cell>
          <table:table-cell office:value-type="string">
            <text:p>381</text:p>
          </table:table-cell>
          <table:table-cell office:value-type="string">
            <text:p/>
          </table:table-cell>
          <table:table-cell office:value-type="string">
            <text:p>VerseChe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lections, tc-strings, tc-tool, usfm-js</text:p>
          </table:table-cell>
          <table:table-cell office:value-type="string">
            <text:p/>
          </table:table-cell>
          <table:table-cell office:value-type="string">
            <text:p>mannycolon, klappy, RoyalSix, cdwhitfield73, Richard Mahn, ihoegen, EllDoubleYew, da1nerd, Sterling (Jay) Scott, richmahn, bspidel, PhotoNomad0</text:p>
          </table:table-cell>
          <table:table-cell office:value-type="string">
            <text:p>0</text:p>
          </table:table-cell>
          <table:table-cell office:value-type="string">
            <text:p>0</text:p>
          </table:table-cell>
          <table:table-cell office:value-type="string">
            <text:p>https://github.com/unfoldingWord-dev/VerseCheck</text:p>
          </table:table-cell>
          <table:table-cell office:value-type="string">
            <text:p>2023-01-28T16:35:42Z</text:p>
          </table:table-cell>
        </table:table-row>
        <table:table-row>
          <table:table-cell office:value-type="string">
            <text:p>translation_academy</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24Z</text:p>
          </table:table-cell>
          <table:table-cell office:value-type="string">
            <text:p>2017-03-14T20:52:36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TranslationAcade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klappy</text:p>
          </table:table-cell>
          <table:table-cell office:value-type="string">
            <text:p>0</text:p>
          </table:table-cell>
          <table:table-cell office:value-type="string">
            <text:p>0</text:p>
          </table:table-cell>
          <table:table-cell office:value-type="string">
            <text:p>https://github.com/unfoldingWord-dev/translation_academy</text:p>
          </table:table-cell>
          <table:table-cell office:value-type="string">
            <text:p>2023-01-28T16:19:09Z</text:p>
          </table:table-cell>
        </table:table-row>
        <table:table-row>
          <table:table-cell office:value-type="string">
            <text:p>proposed_changes_modu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13Z</text:p>
          </table:table-cell>
          <table:table-cell office:value-type="string">
            <text:p>2017-03-13T15:22:06Z</text:p>
          </table:table-cell>
          <table:table-cell office:value-type="string">
            <text:p/>
          </table:table-cell>
          <table:table-cell office:value-type="string">
            <text:p>0</text:p>
          </table:table-cell>
          <table:table-cell office:value-type="string">
            <text:p>0</text:p>
          </table:table-cell>
          <table:table-cell office:value-type="string">
            <text:p>33</text:p>
          </table:table-cell>
          <table:table-cell office:value-type="string">
            <text:p/>
          </table:table-cell>
          <table:table-cell office:value-type="string">
            <text:p>ProposedChan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proposed_changes_module</text:p>
          </table:table-cell>
          <table:table-cell office:value-type="string">
            <text:p>2023-01-28T16:19:09Z</text:p>
          </table:table-cell>
        </table:table-row>
        <table:table-row>
          <table:table-cell office:value-type="string">
            <text:p>translationCore-PoC</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7-06T20:17:32Z</text:p>
          </table:table-cell>
          <table:table-cell office:value-type="string">
            <text:p>2018-07-06T20:17:31Z</text:p>
          </table:table-cell>
          <table:table-cell office:value-type="string">
            <text:p/>
          </table:table-cell>
          <table:table-cell office:value-type="string">
            <text:p>40</text:p>
          </table:table-cell>
          <table:table-cell office:value-type="string">
            <text:p>0</text:p>
          </table:table-cell>
          <table:table-cell office:value-type="string">
            <text:p>6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Core-PoC</text:p>
          </table:table-cell>
          <table:table-cell office:value-type="string">
            <text:p>2023-01-28T16:19:08Z</text:p>
          </table:table-cell>
        </table:table-row>
        <table:table-row>
          <table:table-cell office:value-type="string">
            <text:p>uwadmin</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30T18:10:25Z</text:p>
          </table:table-cell>
          <table:table-cell office:value-type="string">
            <text:p>2015-07-30T18:10:25Z</text:p>
          </table:table-cell>
          <table:table-cell office:value-type="string">
            <text:p/>
          </table:table-cell>
          <table:table-cell office:value-type="string">
            <text:p>0</text:p>
          </table:table-cell>
          <table:table-cell office:value-type="string">
            <text:p>0</text:p>
          </table:table-cell>
          <table:table-cell office:value-type="string">
            <text:p>8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ltman, swilcox, root, jag3773</text:p>
          </table:table-cell>
          <table:table-cell office:value-type="string">
            <text:p>0</text:p>
          </table:table-cell>
          <table:table-cell office:value-type="string">
            <text:p>0</text:p>
          </table:table-cell>
          <table:table-cell office:value-type="string">
            <text:p>https://github.com/unfoldingWord-dev/uwadmin</text:p>
          </table:table-cell>
          <table:table-cell office:value-type="string">
            <text:p>2023-01-28T16:19:07Z</text:p>
          </table:table-cell>
        </table:table-row>
        <table:table-row>
          <table:table-cell office:value-type="string">
            <text:p>translationKeyboardWeb</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11T20:15:34Z</text:p>
          </table:table-cell>
          <table:table-cell office:value-type="string">
            <text:p>2015-07-11T20:15:35Z</text:p>
          </table:table-cell>
          <table:table-cell office:value-type="string">
            <text:p/>
          </table:table-cell>
          <table:table-cell office:value-type="string">
            <text:p>7</text:p>
          </table:table-cell>
          <table:table-cell office:value-type="string">
            <text:p>0</text:p>
          </table:table-cell>
          <table:table-cell office:value-type="string">
            <text:p>18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0</text:p>
          </table:table-cell>
          <table:table-cell office:value-type="string">
            <text:p>0</text:p>
          </table:table-cell>
          <table:table-cell office:value-type="string">
            <text:p>https://github.com/unfoldingWord-dev/translationKeyboardWeb</text:p>
          </table:table-cell>
          <table:table-cell office:value-type="string">
            <text:p>2023-01-28T16:19:07Z</text:p>
          </table:table-cell>
        </table:table-row>
        <table:table-row>
          <table:table-cell office:value-type="string">
            <text:p>OBS-Mobi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7-29T21:22:13Z</text:p>
          </table:table-cell>
          <table:table-cell office:value-type="string">
            <text:p>2012-07-29T21:21:55Z</text:p>
          </table:table-cell>
          <table:table-cell office:value-type="string">
            <text:p/>
          </table:table-cell>
          <table:table-cell office:value-type="string">
            <text:p>2</text:p>
          </table:table-cell>
          <table:table-cell office:value-type="string">
            <text:p>0</text:p>
          </table:table-cell>
          <table:table-cell office:value-type="string">
            <text:p>9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negap/phonegap-start</text:p>
          </table:table-cell>
          <table:table-cell office:value-type="string">
            <text:p>Bob Wadholm, alunny, ryanbetts, Andrew Lunny, Dan Silivestru, Dave Johnson</text:p>
          </table:table-cell>
          <table:table-cell office:value-type="string">
            <text:p>0</text:p>
          </table:table-cell>
          <table:table-cell office:value-type="string">
            <text:p>0</text:p>
          </table:table-cell>
          <table:table-cell office:value-type="string">
            <text:p>https://github.com/unfoldingWord-dev/OBS-Mobile</text:p>
          </table:table-cell>
          <table:table-cell office:value-type="string">
            <text:p>2023-01-28T16:19:06Z</text:p>
          </table:table-cell>
        </table:table-row>
        <table:table-row>
          <table:table-cell office:value-type="string">
            <text:p>Bootstrap43</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2-22T18:31:57Z</text:p>
          </table:table-cell>
          <table:table-cell office:value-type="string">
            <text:p>2012-02-22T18:31:53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aronpk/Bootstrap-Skin</text:p>
          </table:table-cell>
          <table:table-cell office:value-type="string">
            <text:p>aaronpk, reidab</text:p>
          </table:table-cell>
          <table:table-cell office:value-type="string">
            <text:p>0</text:p>
          </table:table-cell>
          <table:table-cell office:value-type="string">
            <text:p>0</text:p>
          </table:table-cell>
          <table:table-cell office:value-type="string">
            <text:p>https://github.com/unfoldingWord-dev/Bootstrap43</text:p>
          </table:table-cell>
          <table:table-cell office:value-type="string">
            <text:p>2023-01-28T16:19:06Z</text:p>
          </table:table-cell>
        </table:table-row>
        <table:table-row>
          <table:table-cell office:value-type="string">
            <text:p>etherpad-lit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1-09-23T18:20:05Z</text:p>
          </table:table-cell>
          <table:table-cell office:value-type="string">
            <text:p>2011-09-02T22:45:35Z</text:p>
          </table:table-cell>
          <table:table-cell office:value-type="string">
            <text:p/>
          </table:table-cell>
          <table:table-cell office:value-type="string">
            <text:p>0</text:p>
          </table:table-cell>
          <table:table-cell office:value-type="string">
            <text:p>0</text:p>
          </table:table-cell>
          <table:table-cell office:value-type="string">
            <text:p>576</text:p>
          </table:table-cell>
          <table:table-cell office:value-type="string">
            <text:p/>
          </table:table-cell>
          <table:table-cell office:value-type="string">
            <text:p>etherpad-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er/etherpad</text:p>
          </table:table-cell>
          <table:table-cell office:value-type="string">
            <text:p>Pita, JohnMcLear, Robin Buse, Robin, hanspinckaers, Lukas Martini, adrianheine, garrett, Patrick Pfeiffer, Randy, erlendfh, chapel, Pita Poison, root, snarkyMcSnark</text:p>
          </table:table-cell>
          <table:table-cell office:value-type="string">
            <text:p>0</text:p>
          </table:table-cell>
          <table:table-cell office:value-type="string">
            <text:p>0</text:p>
          </table:table-cell>
          <table:table-cell office:value-type="string">
            <text:p>https://github.com/unfoldingWord-dev/etherpad-lite</text:p>
          </table:table-cell>
          <table:table-cell office:value-type="string">
            <text:p>2023-01-28T16:19:06Z</text:p>
          </table:table-cell>
        </table:table-row>
        <table:table-row>
          <table:table-cell office:value-type="string">
            <text:p>ResourceChecker</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20-05-19T19:57:08Z</text:p>
          </table:table-cell>
          <table:table-cell office:value-type="string">
            <text:p>2020-05-19T19:56:49Z</text:p>
          </table:table-cell>
          <table:table-cell office:value-type="string">
            <text:p/>
          </table:table-cell>
          <table:table-cell office:value-type="string">
            <text:p>0</text:p>
          </table:table-cell>
          <table:table-cell office:value-type="string">
            <text:p>0</text:p>
          </table:table-cell>
          <table:table-cell office:value-type="string">
            <text:p>64</text:p>
          </table:table-cell>
          <table:table-cell office:value-type="string">
            <text:p/>
          </table:table-cell>
          <table:table-cell office:value-type="string">
            <text:p>resource-che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gitea-react-toolkit, scripture-resources-rcl, markdown-translatable</text:p>
          </table:table-cell>
          <table:table-cell office:value-type="string">
            <text:p>unfoldingWord/uw-word-count</text:p>
          </table:table-cell>
          <table:table-cell office:value-type="string">
            <text:p>mandolyte, RobH123, jag3773</text:p>
          </table:table-cell>
          <table:table-cell office:value-type="string">
            <text:p>0</text:p>
          </table:table-cell>
          <table:table-cell office:value-type="string">
            <text:p>0</text:p>
          </table:table-cell>
          <table:table-cell office:value-type="string">
            <text:p>https://github.com/unfoldingWord-dev/ResourceChecker</text:p>
          </table:table-cell>
          <table:table-cell office:value-type="string">
            <text:p>2023-01-28T14:29:30Z</text:p>
          </table:table-cell>
        </table:table-row>
        <table:table-row>
          <table:table-cell office:value-type="string">
            <text:p>node-dcs-api-client</text:p>
          </table:table-cell>
          <table:table-cell office:value-type="string">
            <text:p>unfoldingWord-dev</text:p>
          </table:table-cell>
          <table:table-cell office:value-type="string">
            <text:p>TypeScript</text:p>
          </table:table-cell>
          <table:table-cell office:value-type="string">
            <text:p>True</text:p>
          </table:table-cell>
          <table:table-cell office:value-type="string">
            <text:p>False</text:p>
          </table:table-cell>
          <table:table-cell office:value-type="string">
            <text:p>2022-04-22T11:32:53Z</text:p>
          </table:table-cell>
          <table:table-cell office:value-type="string">
            <text:p>2022-04-22T11:31:46Z</text:p>
          </table:table-cell>
          <table:table-cell office:value-type="string">
            <text:p>2022-04-22T11:32:54Z</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dcs_api_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3</text:p>
          </table:table-cell>
          <table:table-cell office:value-type="string">
            <text:p>0</text:p>
          </table:table-cell>
          <table:table-cell office:value-type="string">
            <text:p>https://github.com/unfoldingWord-dev/node-dcs-api-client</text:p>
          </table:table-cell>
          <table:table-cell office:value-type="string">
            <text:p>2023-01-27T20:32:30Z</text:p>
          </table:table-cell>
        </table:table-row>
        <table:table-row>
          <table:table-cell office:value-type="string">
            <text:p>obsidian-uw-rc-link-opener</text:p>
          </table:table-cell>
          <table:table-cell office:value-type="string">
            <text:p>unfoldingWord-dev</text:p>
          </table:table-cell>
          <table:table-cell office:value-type="string">
            <text:p>TypeScript</text:p>
          </table:table-cell>
          <table:table-cell office:value-type="string">
            <text:p>False</text:p>
          </table:table-cell>
          <table:table-cell office:value-type="string">
            <text:p>False</text:p>
          </table:table-cell>
          <table:table-cell office:value-type="string">
            <text:p>2021-06-08T17:40:36Z</text:p>
          </table:table-cell>
          <table:table-cell office:value-type="string">
            <text:p>2021-06-08T17:40:33Z</text:p>
          </table:table-cell>
          <table:table-cell office:value-type="string">
            <text:p>2021-06-07T19:26:06Z</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uw-rc-link-ope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1</text:p>
          </table:table-cell>
          <table:table-cell office:value-type="string">
            <text:p>8</text:p>
          </table:table-cell>
          <table:table-cell office:value-type="string">
            <text:p>https://github.com/unfoldingWord-dev/obsidian-uw-rc-link-opener</text:p>
          </table:table-cell>
          <table:table-cell office:value-type="string">
            <text:p>2021-06-08T17:40:39Z</text:p>
          </table:table-cell>
        </table:table-row>
        <table:table-row>
          <table:table-cell office:value-type="string">
            <text:p>dcs-dock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5-13T21:16:12Z</text:p>
          </table:table-cell>
          <table:table-cell office:value-type="string">
            <text:p>2021-05-13T21:16:06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git@github.com:unfoldingWord-dev/dcs-profile-default.git, git@github.com:unfoldingword-dev/dcs-profile-blank.git, git@github.com:unfoldingWord-dev/dcs-profile-unfoldingword-mirrored.git</text:p>
          </table:table-cell>
          <table:table-cell office:value-type="string">
            <text:p>dcs-do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docker</text:p>
          </table:table-cell>
          <table:table-cell office:value-type="string">
            <text:p>2021-05-13T21:16:14Z</text:p>
          </table:table-cell>
        </table:table-row>
        <table:table-row>
          <table:table-cell office:value-type="string">
            <text:p>uw-web</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17-03-25T14:53:13Z</text:p>
          </table:table-cell>
          <table:table-cell office:value-type="string">
            <text:p>2017-03-25T14:53:08Z</text:p>
          </table:table-cell>
          <table:table-cell office:value-type="string">
            <text:p/>
          </table:table-cell>
          <table:table-cell office:value-type="string">
            <text:p>2</text:p>
          </table:table-cell>
          <table:table-cell office:value-type="string">
            <text:p>0</text:p>
          </table:table-cell>
          <table:table-cell office:value-type="string">
            <text:p>1261</text:p>
          </table:table-cell>
          <table:table-cell office:value-type="string">
            <text:p/>
          </table:table-cell>
          <table:table-cell office:value-type="string">
            <text:p>BrowserBib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gitalbiblesociety/browserbible-3</text:p>
          </table:table-cell>
          <table:table-cell office: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text:p>0</text:p>
          </table:table-cell>
          <table:table-cell office:value-type="string">
            <text:p>0</text:p>
          </table:table-cell>
          <table:table-cell office:value-type="string">
            <text:p>https://github.com/unfoldingWord-dev/uw-web</text:p>
          </table:table-cell>
          <table:table-cell office:value-type="string">
            <text:p>2020-09-11T14:39:54Z</text:p>
          </table:table-cell>
        </table:table-row>
        <table:table-row>
          <table:table-cell office:value-type="string">
            <text:p>HebrewLexicon</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0-01-03T16:24:58Z</text:p>
          </table:table-cell>
          <table:table-cell office:value-type="string">
            <text:p>2020-01-03T16:24:57Z</text:p>
          </table:table-cell>
          <table:table-cell office:value-type="string">
            <text:p/>
          </table:table-cell>
          <table:table-cell office:value-type="string">
            <text:p>0</text:p>
          </table:table-cell>
          <table:table-cell office:value-type="string">
            <text:p>0</text:p>
          </table:table-cell>
          <table:table-cell office:value-type="string">
            <text:p>373</text:p>
          </table:table-cell>
          <table:table-cell office:value-type="string">
            <text:p/>
          </table:table-cell>
          <table:table-cell office:value-type="string">
            <text:p>strongs-par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HebrewLexicon</text:p>
          </table:table-cell>
          <table:table-cell office:value-type="string">
            <text:p>joeldruark, DavidTroidl, dowens76, PhotoNomad0, scruffian, destatez, sinri</text:p>
          </table:table-cell>
          <table:table-cell office:value-type="string">
            <text:p>0</text:p>
          </table:table-cell>
          <table:table-cell office:value-type="string">
            <text:p>0</text:p>
          </table:table-cell>
          <table:table-cell office:value-type="string">
            <text:p>https://github.com/unfoldingWord-dev/HebrewLexicon</text:p>
          </table:table-cell>
          <table:table-cell office:value-type="string">
            <text:p>2020-01-03T16:25:13Z</text:p>
          </table:table-cell>
        </table:table-row>
        <table:table-row>
          <table:table-cell office:value-type="string">
            <text:p>node-door43-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2-12-08T17:04:23Z</text:p>
          </table:table-cell>
          <table:table-cell office:value-type="string">
            <text:p>2019-11-06T17:32:07Z</text:p>
          </table:table-cell>
          <table:table-cell office:value-type="string">
            <text:p>2019-11-06T17:30:48Z</text:p>
          </table:table-cell>
          <table:table-cell office:value-type="string">
            <text:p>13</text:p>
          </table:table-cell>
          <table:table-cell office:value-type="string">
            <text:p>13</text:p>
          </table:table-cell>
          <table:table-cell office:value-type="string">
            <text:p>214</text:p>
          </table:table-cell>
          <table:table-cell office:value-type="string">
            <text:p/>
          </table:table-cell>
          <table:table-cell office:value-type="string">
            <text:p>door43-client</text:p>
          </table:table-cell>
          <table:table-cell office:value-type="string">
            <text:p>False</text:p>
          </table:table-cell>
          <table:table-cell office:value-type="string">
            <text:p>1621</text:p>
          </table:table-cell>
          <table:table-cell office:value-type="string">
            <text:p>2019-11-06T17:33:42.928Z</text:p>
          </table:table-cell>
          <table:table-cell office:value-type="string">
            <text:p/>
          </table:table-cell>
          <table:table-cell office:value-type="string">
            <text:p>resource-container</text:p>
          </table:table-cell>
          <table:table-cell office:value-type="string">
            <text:p>Bible-Translation-Tools/BTT-Writer-Desktop, WycliffeAssociates/BTT_Writer_Resource_Updater, unfoldingWord-dev/ts-desktop</text:p>
          </table:table-cell>
          <table:table-cell office:value-type="string">
            <text:p>da1nerd</text:p>
          </table:table-cell>
          <table:table-cell office:value-type="string">
            <text:p>1</text:p>
          </table:table-cell>
          <table:table-cell office:value-type="string">
            <text:p>0</text:p>
          </table:table-cell>
          <table:table-cell office:value-type="string">
            <text:p>https://github.com/unfoldingWord-dev/node-door43-client</text:p>
          </table:table-cell>
          <table:table-cell office:value-type="string">
            <text:p>2019-11-06T17:32:34Z</text:p>
          </table:table-cell>
        </table:table-row>
        <table:table-row>
          <table:table-cell office:value-type="string">
            <text:p>Autographa</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5:21Z</text:p>
          </table:table-cell>
          <table:table-cell office:value-type="string">
            <text:p>2019-04-15T16:35:18Z</text:p>
          </table:table-cell>
          <table:table-cell office:value-type="string">
            <text:p/>
          </table:table-cell>
          <table:table-cell office:value-type="string">
            <text:p>12</text:p>
          </table:table-cell>
          <table:table-cell office:value-type="string">
            <text:p>0</text:p>
          </table:table-cell>
          <table:table-cell office:value-type="string">
            <text:p>58</text:p>
          </table:table-cell>
          <table:table-cell office:value-type="string">
            <text:p/>
          </table:table-cell>
          <table:table-cell office:value-type="string">
            <text:p>Autograph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bajpai9, ayushnig, sandeeponrails, klappy, ImgBotApp, mannycolon</text:p>
          </table:table-cell>
          <table:table-cell office:value-type="string">
            <text:p>0</text:p>
          </table:table-cell>
          <table:table-cell office:value-type="string">
            <text:p>0</text:p>
          </table:table-cell>
          <table:table-cell office:value-type="string">
            <text:p>https://github.com/unfoldingWord-dev/Autographa</text:p>
          </table:table-cell>
          <table:table-cell office:value-type="string">
            <text:p>2019-10-22T20:35:02Z</text:p>
          </table:table-cell>
        </table:table-row>
        <table:table-row>
          <table:table-cell office:value-type="string">
            <text:p>checkingRubric_tool</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28:23Z</text:p>
          </table:table-cell>
          <table:table-cell office:value-type="string">
            <text:p>2019-04-15T16:28:18Z</text:p>
          </table:table-cell>
          <table:table-cell office:value-type="string">
            <text:p/>
          </table:table-cell>
          <table:table-cell office:value-type="string">
            <text:p>0</text:p>
          </table:table-cell>
          <table:table-cell office:value-type="string">
            <text:p>0</text:p>
          </table:table-cell>
          <table:table-cell office:value-type="string">
            <text:p>75</text:p>
          </table:table-cell>
          <table:table-cell office:value-type="string">
            <text:p/>
          </table:table-cell>
          <table:table-cell office:value-type="string">
            <text:p>checkingRubric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ImgBotApp</text:p>
          </table:table-cell>
          <table:table-cell office:value-type="string">
            <text:p>0</text:p>
          </table:table-cell>
          <table:table-cell office:value-type="string">
            <text:p>0</text:p>
          </table:table-cell>
          <table:table-cell office:value-type="string">
            <text:p>https://github.com/unfoldingWord-dev/checkingRubric_tool</text:p>
          </table:table-cell>
          <table:table-cell office:value-type="string">
            <text:p>2019-10-22T19:40:10Z</text:p>
          </table:table-cell>
        </table:table-row>
        <table:table-row>
          <table:table-cell office:value-type="string">
            <text:p>toolTemplat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4:11Z</text:p>
          </table:table-cell>
          <table:table-cell office:value-type="string">
            <text:p>2019-04-15T16:34:0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tool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c-tool</text:p>
          </table:table-cell>
          <table:table-cell office:value-type="string">
            <text:p/>
          </table:table-cell>
          <table:table-cell office:value-type="string">
            <text:p>klappy, da1nerd, ImgBotApp, mannycolon</text:p>
          </table:table-cell>
          <table:table-cell office:value-type="string">
            <text:p>0</text:p>
          </table:table-cell>
          <table:table-cell office:value-type="string">
            <text:p>0</text:p>
          </table:table-cell>
          <table:table-cell office:value-type="string">
            <text:p>https://github.com/unfoldingWord-dev/toolTemplate</text:p>
          </table:table-cell>
          <table:table-cell office:value-type="string">
            <text:p>2019-10-22T19:38:20Z</text:p>
          </table:table-cell>
        </table:table-row>
        <table:table-row>
          <table:table-cell office:value-type="string">
            <text:p>comment_box</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3-13T15:21:35Z</text:p>
          </table:table-cell>
          <table:table-cell office:value-type="string">
            <text:p>2017-03-13T15:19:36Z</text:p>
          </table:table-cell>
          <table:table-cell office:value-type="string">
            <text:p/>
          </table:table-cell>
          <table:table-cell office:value-type="string">
            <text:p>0</text:p>
          </table:table-cell>
          <table:table-cell office:value-type="string">
            <text:p>0</text:p>
          </table:table-cell>
          <table:table-cell office:value-type="string">
            <text:p>40</text:p>
          </table:table-cell>
          <table:table-cell office:value-type="string">
            <text:p/>
          </table:table-cell>
          <table:table-cell office:value-type="string">
            <text:p>CommentBo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comment_box</text:p>
          </table:table-cell>
          <table:table-cell office:value-type="string">
            <text:p>2019-10-22T19:37:22Z</text:p>
          </table:table-cell>
        </table:table-row>
        <table:table-row>
          <table:table-cell office:value-type="string">
            <text:p>t_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09T21:08:27Z</text:p>
          </table:table-cell>
          <table:table-cell office:value-type="string">
            <text:p>2016-11-17T09:19:42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T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mannycolon, RoyalSix</text:p>
          </table:table-cell>
          <table:table-cell office:value-type="string">
            <text:p>0</text:p>
          </table:table-cell>
          <table:table-cell office:value-type="string">
            <text:p>0</text:p>
          </table:table-cell>
          <table:table-cell office:value-type="string">
            <text:p>https://github.com/unfoldingWord-dev/t_pane</text:p>
          </table:table-cell>
          <table:table-cell office:value-type="string">
            <text:p>2019-10-22T19:34:26Z</text:p>
          </table:table-cell>
        </table:table-row>
        <table:table-row>
          <table:table-cell office:value-type="string">
            <text:p>node-resource-contain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5-08T20:11:54Z</text:p>
          </table:table-cell>
          <table:table-cell office:value-type="string">
            <text:p>2017-01-04T01:13:31Z</text:p>
          </table:table-cell>
          <table:table-cell office:value-type="string">
            <text:p/>
          </table:table-cell>
          <table:table-cell office:value-type="string">
            <text:p>1</text:p>
          </table:table-cell>
          <table:table-cell office:value-type="string">
            <text:p>0</text:p>
          </table:table-cell>
          <table:table-cell office:value-type="string">
            <text:p>82</text:p>
          </table:table-cell>
          <table:table-cell office:value-type="string">
            <text:p/>
          </table:table-cell>
          <table:table-cell office:value-type="string">
            <text:p>resource-container</text:p>
          </table:table-cell>
          <table:table-cell office:value-type="string">
            <text:p>False</text:p>
          </table:table-cell>
          <table:table-cell office:value-type="string">
            <text:p>3253</text:p>
          </table:table-cell>
          <table:table-cell office:value-type="string">
            <text:p>2017-02-28T01:01:07.451Z</text:p>
          </table:table-cell>
          <table:table-cell office:value-type="string">
            <text:p>door43-client</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resource-container</text:p>
          </table:table-cell>
          <table:table-cell office:value-type="string">
            <text:p>2017-03-07T23:45:06Z</text:p>
          </table:table-cell>
        </table:table-row>
        <table:table-row>
          <table:table-cell office:value-type="string">
            <text:p>tx-html2pdf</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20T05:32:39Z</text:p>
          </table:table-cell>
          <table:table-cell office:value-type="string">
            <text:p>2016-12-20T05:32:32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0</text:p>
          </table:table-cell>
          <table:table-cell office:value-type="string">
            <text:p>0</text:p>
          </table:table-cell>
          <table:table-cell office:value-type="string">
            <text:p>https://github.com/unfoldingWord-dev/tx-html2pdf</text:p>
          </table:table-cell>
          <table:table-cell office:value-type="string">
            <text:p>2016-12-19T14:55:26Z</text:p>
          </table:table-cell>
        </table:table-row>
        <table:table-row>
          <table:table-cell office:value-type="string">
            <text:p>node-door43-rc</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8-30T17:28:52Z</text:p>
          </table:table-cell>
          <table:table-cell office:value-type="string">
            <text:p>2016-08-30T17:28:49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oor43-rc</text:p>
          </table:table-cell>
          <table:table-cell office:value-type="string">
            <text:p>True</text:p>
          </table:table-cell>
          <table:table-cell office:value-type="string">
            <text:p>1535</text:p>
          </table:table-cell>
          <table:table-cell office:value-type="string">
            <text:p>2016-09-01T18:35:44.393Z</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door43-rc</text:p>
          </table:table-cell>
          <table:table-cell office:value-type="string">
            <text:p>2016-08-25T18:39:16Z</text:p>
          </table:table-cell>
        </table:table-row>
        <table:table-row>
          <table:table-cell office:value-type="string">
            <text:p>s3_list-zip</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2-19T22:47:48Z</text:p>
          </table:table-cell>
          <table:table-cell office:value-type="string">
            <text:p>2016-02-19T22:47:37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odemis</text:p>
          </table:table-cell>
          <table:table-cell office:value-type="string">
            <text:p>0</text:p>
          </table:table-cell>
          <table:table-cell office:value-type="string">
            <text:p>0</text:p>
          </table:table-cell>
          <table:table-cell office:value-type="string">
            <text:p>https://github.com/unfoldingWord-dev/s3_list-zip</text:p>
          </table:table-cell>
          <table:table-cell office:value-type="string">
            <text:p>2016-02-19T21:11:59Z</text:p>
          </table:table-cell>
        </table:table-row>
        <table:table-row>
          <table:table-cell office:value-type="string">
            <text:p>dokuwiki-plugin-obs-audio-upload</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5-05-23T17:13:24Z</text:p>
          </table:table-cell>
          <table:table-cell office:value-type="string">
            <text:p>2015-05-23T17:13:23Z</text:p>
          </table:table-cell>
          <table:table-cell office:value-type="string">
            <text:p/>
          </table:table-cell>
          <table:table-cell office:value-type="string">
            <text:p>3</text:p>
          </table:table-cell>
          <table:table-cell office:value-type="string">
            <text:p>0</text:p>
          </table:table-cell>
          <table:table-cell office:value-type="string">
            <text:p>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obs-audio-upload</text:p>
          </table:table-cell>
          <table:table-cell office:value-type="string">
            <text:p>2015-03-19T19:30:11Z</text:p>
          </table:table-cell>
        </table:table-row>
        <table:table-row>
          <table:table-cell office:value-type="string">
            <text:p>admin-app-old</text:p>
          </table:table-cell>
          <table:table-cell office:value-type="string">
            <text:p>unfoldingWord-box3</text:p>
          </table:table-cell>
          <table:table-cell office:value-type="string">
            <text:p>JavaScript</text:p>
          </table:table-cell>
          <table:table-cell office:value-type="string">
            <text:p>True</text:p>
          </table:table-cell>
          <table:table-cell office:value-type="string">
            <text:p>True</text:p>
          </table:table-cell>
          <table:table-cell office:value-type="string">
            <text:p>2021-03-10T14:23:06Z</text:p>
          </table:table-cell>
          <table:table-cell office:value-type="string">
            <text:p>2021-03-09T18:47:30Z</text:p>
          </table:table-cell>
          <table:table-cell office:value-type="string">
            <text:p/>
          </table:table-cell>
          <table:table-cell office:value-type="string">
            <text:p>0</text:p>
          </table:table-cell>
          <table:table-cell office:value-type="string">
            <text:p>0</text:p>
          </table:table-cell>
          <table:table-cell office:value-type="string">
            <text:p>239</text:p>
          </table:table-cell>
          <table:table-cell office:value-type="string">
            <text:p/>
          </table:table-cell>
          <table:table-cell office:value-type="string">
            <text:p>create-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ranslation-helps-rcl</text:p>
          </table:table-cell>
          <table:table-cell office:value-type="string">
            <text:p>unfoldingWord/gateway-edit</text:p>
          </table:table-cell>
          <table:table-cell office:value-type="string">
            <text:p>mannycolon, PhotoNomad0, mandolyte</text:p>
          </table:table-cell>
          <table:table-cell office:value-type="string">
            <text:p>0</text:p>
          </table:table-cell>
          <table:table-cell office:value-type="string">
            <text:p>0</text:p>
          </table:table-cell>
          <table:table-cell office:value-type="string">
            <text:p>https://github.com/unfoldingWord-box3/admin-app-old</text:p>
          </table:table-cell>
          <table:table-cell office:value-type="string">
            <text:p>2026-06-22T18:20:15Z</text:p>
          </table:table-cell>
        </table:table-row>
        <table:table-row>
          <table:table-cell office:value-type="string">
            <text:p>wordMAP-mt</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5-11-03T19:05:27Z</text:p>
          </table:table-cell>
          <table:table-cell office:value-type="string">
            <text:p>2025-11-03T19:05:27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wordmap-m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wordmap, wordmap-lexer</text:p>
          </table:table-cell>
          <table:table-cell office:value-type="string">
            <text:p/>
          </table:table-cell>
          <table:table-cell office:value-type="string">
            <text:p>da1nerd, yakob-aleksandrovich</text:p>
          </table:table-cell>
          <table:table-cell office:value-type="string">
            <text:p>0</text:p>
          </table:table-cell>
          <table:table-cell office:value-type="string">
            <text:p>0</text:p>
          </table:table-cell>
          <table:table-cell office:value-type="string">
            <text:p>https://github.com/unfoldingWord-box3/wordMAP-mt</text:p>
          </table:table-cell>
          <table:table-cell office:value-type="string">
            <text:p>2026-06-17T19:27:07Z</text:p>
          </table:table-cell>
        </table:table-row>
        <table:table-row>
          <table:table-cell office:value-type="string">
            <text:p>word-aligner-extension</text:p>
          </table:table-cell>
          <table:table-cell office:value-type="string">
            <text:p>unfoldingWord-box3</text:p>
          </table:table-cell>
          <table:table-cell office:value-type="string">
            <text:p>JavaScript</text:p>
          </table:table-cell>
          <table:table-cell office:value-type="string">
            <text:p>True</text:p>
          </table:table-cell>
          <table:table-cell office:value-type="string">
            <text:p>False</text:p>
          </table:table-cell>
          <table:table-cell office:value-type="string">
            <text:p>2024-01-17T18:59:55Z</text:p>
          </table:table-cell>
          <table:table-cell office:value-type="string">
            <text:p>2024-01-17T18:59:48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word-aligner-react-v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word-aligner-extension</text:p>
          </table:table-cell>
          <table:table-cell office:value-type="string">
            <text:p>2026-06-17T19:22:57Z</text:p>
          </table:table-cell>
        </table:table-row>
        <table:table-row>
          <table:table-cell office:value-type="string">
            <text:p>MultiplatformFrameworks</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2-11-10T17:20:33Z</text:p>
          </table:table-cell>
          <table:table-cell office:value-type="string">
            <text:p>2020-03-16T14:26:24Z</text:p>
          </table:table-cell>
          <table:table-cell office:value-type="string">
            <text:p/>
          </table:table-cell>
          <table:table-cell office:value-type="string">
            <text:p>5</text:p>
          </table:table-cell>
          <table:table-cell office:value-type="string">
            <text:p>5</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MultiplatformFrameworks</text:p>
          </table:table-cell>
          <table:table-cell office:value-type="string">
            <text:p>2025-12-03T19:52:51Z</text:p>
          </table:table-cell>
        </table:table-row>
        <table:table-row>
          <table:table-cell office:value-type="string">
            <text:p>ta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19:01:07Z</text:p>
          </table:table-cell>
          <table:table-cell office:value-type="string">
            <text:p>2025-11-03T19:01:07Z</text:p>
          </table:table-cell>
          <table:table-cell office:value-type="string">
            <text:p/>
          </table:table-cell>
          <table:table-cell office:value-type="string">
            <text:p>24</text:p>
          </table:table-cell>
          <table:table-cell office:value-type="string">
            <text:p>1</text:p>
          </table:table-cell>
          <table:table-cell office:value-type="string">
            <text:p>75</text:p>
          </table:table-cell>
          <table:table-cell office:value-type="string">
            <text:p/>
          </table:table-cell>
          <table:table-cell office:value-type="string">
            <text:p>t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raymoonlight/CRBank, magistrigusti/Dominum_DOM, singhyash05/BitTonica, jubbslineu/contract-test</text:p>
          </table:table-cell>
          <table:table-cell office:value-type="string">
            <text:p>klappy, yakob-aleksandrovich</text:p>
          </table:table-cell>
          <table:table-cell office:value-type="string">
            <text:p>0</text:p>
          </table:table-cell>
          <table:table-cell office:value-type="string">
            <text:p>0</text:p>
          </table:table-cell>
          <table:table-cell office:value-type="string">
            <text:p>https://github.com/unfoldingWord-box3/tact</text:p>
          </table:table-cell>
          <table:table-cell office:value-type="string">
            <text:p>2025-11-03T19:01:10Z</text:p>
          </table:table-cell>
        </table:table-row>
        <table:table-row>
          <table:table-cell office:value-type="string">
            <text:p>checking-extensio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5-10-16T15:12:47Z</text:p>
          </table:table-cell>
          <table:table-cell office:value-type="string">
            <text:p>2025-10-16T15:12:47Z</text:p>
          </table:table-cell>
          <table:table-cell office:value-type="string">
            <text:p/>
          </table:table-cell>
          <table:table-cell office:value-type="string">
            <text:p>2</text:p>
          </table:table-cell>
          <table:table-cell office:value-type="string">
            <text:p>2</text:p>
          </table:table-cell>
          <table:table-cell office:value-type="string">
            <text:p>160</text:p>
          </table:table-cell>
          <table:table-cell office:value-type="string">
            <text:p/>
          </table:table-cell>
          <table:table-cell office:value-type="string">
            <text:p>checking-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string-punctuation-tokenizer, tc-source-content-updater, tsv-groupdata-parser, usfm-js, uw-tsv-parser</text:p>
          </table:table-cell>
          <table:table-cell office:value-type="string">
            <text:p>kintsoogi/translation-notes-extension</text:p>
          </table:table-cell>
          <table:table-cell office:value-type="string">
            <text:p>PhotoNomad0, kintsoogi</text:p>
          </table:table-cell>
          <table:table-cell office:value-type="string">
            <text:p>4</text:p>
          </table:table-cell>
          <table:table-cell office:value-type="string">
            <text:p>66</text:p>
          </table:table-cell>
          <table:table-cell office:value-type="string">
            <text:p>https://github.com/unfoldingWord-box3/checking-extension</text:p>
          </table:table-cell>
          <table:table-cell office:value-type="string">
            <text:p>2025-10-16T15:12:53Z</text:p>
          </table:table-cell>
        </table:table-row>
        <table:table-row>
          <table:table-cell office:value-type="string">
            <text:p>translation-help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5T02:36:16Z</text:p>
          </table:table-cell>
          <table:table-cell office:value-type="string">
            <text:p>2022-11-09T09:01:02Z</text:p>
          </table:table-cell>
          <table:table-cell office:value-type="string">
            <text:p/>
          </table:table-cell>
          <table:table-cell office:value-type="string">
            <text:p>0</text:p>
          </table:table-cell>
          <table:table-cell office:value-type="string">
            <text:p>0</text:p>
          </table:table-cell>
          <table:table-cell office:value-type="string">
            <text:p>212</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klappy, yakob-aleksandrovich</text:p>
          </table:table-cell>
          <table:table-cell office:value-type="string">
            <text:p>1</text:p>
          </table:table-cell>
          <table:table-cell office:value-type="string">
            <text:p>14</text:p>
          </table:table-cell>
          <table:table-cell office:value-type="string">
            <text:p>https://github.com/unfoldingWord-box3/translation-helps</text:p>
          </table:table-cell>
          <table:table-cell office:value-type="string">
            <text:p>2025-10-02T14:12:21Z</text:p>
          </table:table-cell>
        </table:table-row>
        <table:table-row>
          <table:table-cell office:value-type="string">
            <text:p>tq-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7-28T12:54:36Z</text:p>
          </table:table-cell>
          <table:table-cell office:value-type="string">
            <text:p>2025-07-28T12:54:32Z</text:p>
          </table:table-cell>
          <table:table-cell office:value-type="string">
            <text:p/>
          </table:table-cell>
          <table:table-cell office:value-type="string">
            <text:p>6</text:p>
          </table:table-cell>
          <table:table-cell office:value-type="string">
            <text:p>0</text:p>
          </table:table-cell>
          <table:table-cell office:value-type="string">
            <text:p>3</text:p>
          </table:table-cell>
          <table:table-cell office:value-type="string">
            <text:p/>
          </table:table-cell>
          <table:table-cell office:value-type="string">
            <text:p>qa-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tq-app</text:p>
          </table:table-cell>
          <table:table-cell office:value-type="string">
            <text:p>2025-07-30T15:49:01Z</text:p>
          </table:table-cell>
        </table:table-row>
        <table:table-row>
          <table:table-cell office:value-type="string">
            <text:p>passage-record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6-11T15:50:11Z</text:p>
          </table:table-cell>
          <table:table-cell office:value-type="string">
            <text:p>2025-06-11T15:49:10Z</text:p>
          </table:table-cell>
          <table:table-cell office:value-type="string">
            <text:p/>
          </table:table-cell>
          <table:table-cell office:value-type="string">
            <text:p>1</text:p>
          </table:table-cell>
          <table:table-cell office:value-type="string">
            <text:p>1</text:p>
          </table:table-cell>
          <table:table-cell office:value-type="string">
            <text:p>10</text:p>
          </table:table-cell>
          <table:table-cell office:value-type="string">
            <text:p/>
          </table:table-cell>
          <table:table-cell office:value-type="string">
            <text:p>scripture-simple-recor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passage-recorder-app</text:p>
          </table:table-cell>
          <table:table-cell office:value-type="string">
            <text:p>2025-06-11T16:03:07Z</text:p>
          </table:table-cell>
        </table:table-row>
        <table:table-row>
          <table:table-cell office:value-type="string">
            <text:p>simple-text-edito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6T21:09:12Z</text:p>
          </table:table-cell>
          <table:table-cell office:value-type="string">
            <text:p>2025-06-06T21:09:10Z</text:p>
          </table:table-cell>
          <table:table-cell office:value-type="string">
            <text:p/>
          </table:table-cell>
          <table:table-cell office:value-type="string">
            <text:p>5</text:p>
          </table:table-cell>
          <table:table-cell office:value-type="string">
            <text:p>1</text:p>
          </table:table-cell>
          <table:table-cell office:value-type="string">
            <text:p>240</text:p>
          </table:table-cell>
          <table:table-cell office:value-type="string">
            <text:p/>
          </table:table-cell>
          <table:table-cell office:value-type="string">
            <text:p>simple-text-editor-rcl</text:p>
          </table:table-cell>
          <table:table-cell office:value-type="string">
            <text:p>False</text:p>
          </table:table-cell>
          <table:table-cell office:value-type="string">
            <text:p>3893</text:p>
          </table:table-cell>
          <table:table-cell office:value-type="string">
            <text:p>2022-06-09T23:15:38.322Z</text:p>
          </table:table-cell>
          <table:table-cell office:value-type="string">
            <text:p>simple-text-editor-app</text:p>
          </table:table-cell>
          <table:table-cell office:value-type="string">
            <text:p>@unfoldingword/eslint-config</text:p>
          </table:table-cell>
          <table:table-cell office:value-type="string">
            <text:p>md-jishan-ansari/Editors, RUN-Collaborations/translatable, klappy/scripture-puzzle-game-poc</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rcl</text:p>
          </table:table-cell>
          <table:table-cell office:value-type="string">
            <text:p>2025-06-06T21:09:14Z</text:p>
          </table:table-cell>
        </table:table-row>
        <table:table-row>
          <table:table-cell office:value-type="string">
            <text:p>desktop-app-limina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7-15T13:09:17Z</text:p>
          </table:table-cell>
          <table:table-cell office:value-type="string">
            <text:p>2025-05-13T00:55:06Z</text:p>
          </table:table-cell>
          <table:table-cell office:value-type="string">
            <text:p/>
          </table:table-cell>
          <table:table-cell office:value-type="string">
            <text:p>2</text:p>
          </table:table-cell>
          <table:table-cell office:value-type="string">
            <text:p>2</text:p>
          </table:table-cell>
          <table:table-cell office:value-type="string">
            <text:p>58</text:p>
          </table:table-cell>
          <table:table-cell office:value-type="string">
            <text:p/>
          </table:table-cell>
          <table:table-cell office:value-type="string">
            <text:p>pankosmia-app-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UN-Projects, mvahowe, PhotoNomad0, yakob-aleksandrovich</text:p>
          </table:table-cell>
          <table:table-cell office:value-type="string">
            <text:p>0</text:p>
          </table:table-cell>
          <table:table-cell office:value-type="string">
            <text:p>0</text:p>
          </table:table-cell>
          <table:table-cell office:value-type="string">
            <text:p>https://github.com/unfoldingWord-box3/desktop-app-liminal</text:p>
          </table:table-cell>
          <table:table-cell office:value-type="string">
            <text:p>2025-05-14T14:59:15Z</text:p>
          </table:table-cell>
        </table:table-row>
        <table:table-row>
          <table:table-cell office:value-type="string">
            <text:p>checking-app-theia</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codex-sb-handle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12-03T13:53:27Z</text:p>
          </table:table-cell>
          <table:table-cell office:value-type="string">
            <text:p>2024-12-03T13:53:27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sb-handler-s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codex-sb-handler</text:p>
          </table:table-cell>
          <table:table-cell office:value-type="string">
            <text:p>2024-12-03T13:57:40Z</text:p>
          </table:table-cell>
        </table:table-row>
        <table:table-row>
          <table:table-cell office:value-type="string">
            <text:p>uw-proskomma</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10-10T15:27:48Z</text:p>
          </table:table-cell>
          <table:table-cell office:value-type="string">
            <text:p>2024-10-10T15:27:44Z</text:p>
          </table:table-cell>
          <table:table-cell office:value-type="string">
            <text:p/>
          </table:table-cell>
          <table:table-cell office:value-type="string">
            <text:p>1</text:p>
          </table:table-cell>
          <table:table-cell office:value-type="string">
            <text:p>1</text:p>
          </table:table-cell>
          <table:table-cell office:value-type="string">
            <text:p>104</text:p>
          </table:table-cell>
          <table:table-cell office:value-type="string">
            <text:p/>
          </table:table-cell>
          <table:table-cell office:value-type="string">
            <text:p>uw-proskomma</text:p>
          </table:table-cell>
          <table:table-cell office:value-type="string">
            <text:p>False</text:p>
          </table:table-cell>
          <table:table-cell office:value-type="string">
            <text:p>2359</text:p>
          </table:table-cell>
          <table:table-cell office:value-type="string">
            <text:p>2022-07-13T12:06:56.761Z</text:p>
          </table:table-cell>
          <table:table-cell office:value-type="string">
            <text:p>epitelete-html, proskomma-scripture-resources-rcl</text:p>
          </table:table-cell>
          <table:table-cell office:value-type="string">
            <text:p/>
          </table:table-cell>
          <table:table-cell office: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text:p>mvahowe, mandolyte, jag3773, richmahn</text:p>
          </table:table-cell>
          <table:table-cell office:value-type="string">
            <text:p>0</text:p>
          </table:table-cell>
          <table:table-cell office:value-type="string">
            <text:p>0</text:p>
          </table:table-cell>
          <table:table-cell office:value-type="string">
            <text:p>https://github.com/unfoldingWord-box3/uw-proskomma</text:p>
          </table:table-cell>
          <table:table-cell office:value-type="string">
            <text:p>2024-10-10T15:27:53Z</text:p>
          </table:table-cell>
        </table:table-row>
        <table:table-row>
          <table:table-cell office:value-type="string">
            <text:p>mini-sb-handl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9-12T09:53:14Z</text:p>
          </table:table-cell>
          <table:table-cell office:value-type="string">
            <text:p>2024-09-12T09:53:09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mini-sb-handler</text:p>
          </table:table-cell>
          <table:table-cell office:value-type="string">
            <text:p>2024-09-12T09:53:19Z</text:p>
          </table:table-cell>
        </table:table-row>
        <table:table-row>
          <table:table-cell office:value-type="string">
            <text:p>Simplif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15T20:16:37Z</text:p>
          </table:table-cell>
          <table:table-cell office:value-type="string">
            <text:p>2024-08-15T20:16:37Z</text:p>
          </table:table-cell>
          <table:table-cell office:value-type="string">
            <text:p/>
          </table:table-cell>
          <table:table-cell office:value-type="string">
            <text:p>0</text:p>
          </table:table-cell>
          <table:table-cell office:value-type="string">
            <text:p>0</text:p>
          </table:table-cell>
          <table:table-cell office:value-type="string">
            <text:p>5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Simplify</text:p>
          </table:table-cell>
          <table:table-cell office:value-type="string">
            <text:p>2024-08-15T20:16:40Z</text:p>
          </table:table-cell>
        </table:table-row>
        <table:table-row>
          <table:table-cell office:value-type="string">
            <text:p>beta-bibel-demo</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08T14:50:24Z</text:p>
          </table:table-cell>
          <table:table-cell office:value-type="string">
            <text:p>2024-07-26T16:13:53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beta-bibel-wik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beta-bibel-demo</text:p>
          </table:table-cell>
          <table:table-cell office:value-type="string">
            <text:p>2024-08-08T16:43:06Z</text:p>
          </table:table-cell>
        </table:table-row>
        <table:table-row>
          <table:table-cell office:value-type="string">
            <text:p>obs-audio-naviga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7-05T11:05:54Z</text:p>
          </table:table-cell>
          <table:table-cell office:value-type="string">
            <text:p>2024-07-05T11:05:54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obs-audio-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obs-audio-navigation</text:p>
          </table:table-cell>
          <table:table-cell office:value-type="string">
            <text:p>2024-07-05T11:13:09Z</text:p>
          </table:table-cell>
        </table:table-row>
        <table:table-row>
          <table:table-cell office:value-type="string">
            <text:p>gl-database-visualization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6-27T04:38:12Z</text:p>
          </table:table-cell>
          <table:table-cell office:value-type="string">
            <text:p>2024-06-27T04:38:09Z</text:p>
          </table:table-cell>
          <table:table-cell office:value-type="string">
            <text:p/>
          </table:table-cell>
          <table:table-cell office:value-type="string">
            <text:p>0</text:p>
          </table:table-cell>
          <table:table-cell office:value-type="string">
            <text:p>0</text:p>
          </table:table-cell>
          <table:table-cell office:value-type="string">
            <text:p>7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u-alexander, jag3773</text:p>
          </table:table-cell>
          <table:table-cell office:value-type="string">
            <text:p>0</text:p>
          </table:table-cell>
          <table:table-cell office:value-type="string">
            <text:p>0</text:p>
          </table:table-cell>
          <table:table-cell office:value-type="string">
            <text:p>https://github.com/unfoldingWord-box3/gl-database-visualizations</text:p>
          </table:table-cell>
          <table:table-cell office:value-type="string">
            <text:p>2024-06-27T04:38:16Z</text:p>
          </table:table-cell>
        </table:table-row>
        <table:table-row>
          <table:table-cell office:value-type="string">
            <text:p>obs-stud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6-25T11:20:36Z</text:p>
          </table:table-cell>
          <table:table-cell office:value-type="string">
            <text:p>2024-06-20T09:34:16Z</text:p>
          </table:table-cell>
          <table:table-cell office:value-type="string">
            <text:p/>
          </table:table-cell>
          <table:table-cell office:value-type="string">
            <text:p>0</text:p>
          </table:table-cell>
          <table:table-cell office:value-type="string">
            <text:p>0</text:p>
          </table:table-cell>
          <table:table-cell office:value-type="string">
            <text:p>4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diomaspuentes/obs-study</text:p>
          </table:table-cell>
          <table:table-cell office:value-type="string">
            <text:p>abelpz, eliaspinero, ilich valbuena, Jordani77, larsgson</text:p>
          </table:table-cell>
          <table:table-cell office:value-type="string">
            <text:p>0</text:p>
          </table:table-cell>
          <table:table-cell office:value-type="string">
            <text:p>0</text:p>
          </table:table-cell>
          <table:table-cell office:value-type="string">
            <text:p>https://github.com/unfoldingWord-box3/obs-study</text:p>
          </table:table-cell>
          <table:table-cell office:value-type="string">
            <text:p>2024-06-20T09:34:41Z</text:p>
          </table:table-cell>
        </table:table-row>
        <table:table-row>
          <table:table-cell office:value-type="string">
            <text:p>audio-obs-navigato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8T13:58:29Z</text:p>
          </table:table-cell>
          <table:table-cell office:value-type="string">
            <text:p>2024-03-08T12:08:48Z</text:p>
          </table:table-cell>
          <table:table-cell office:value-type="string">
            <text:p/>
          </table:table-cell>
          <table:table-cell office:value-type="string">
            <text:p>1</text:p>
          </table:table-cell>
          <table:table-cell office:value-type="string">
            <text:p>1</text:p>
          </table:table-cell>
          <table:table-cell office:value-type="string">
            <text:p>17</text:p>
          </table:table-cell>
          <table:table-cell office:value-type="string">
            <text:p/>
          </table:table-cell>
          <table:table-cell office:value-type="string">
            <text:p>audio-obs-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 blm, bspidel</text:p>
          </table:table-cell>
          <table:table-cell office:value-type="string">
            <text:p>0</text:p>
          </table:table-cell>
          <table:table-cell office:value-type="string">
            <text:p>0</text:p>
          </table:table-cell>
          <table:table-cell office:value-type="string">
            <text:p>https://github.com/unfoldingWord-box3/audio-obs-navigator</text:p>
          </table:table-cell>
          <table:table-cell office:value-type="string">
            <text:p>2024-03-05T18:54:24Z</text:p>
          </table:table-cell>
        </table:table-row>
        <table:table-row>
          <table:table-cell office:value-type="string">
            <text:p>RecordVoice</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6T14:13:55Z</text:p>
          </table:table-cell>
          <table:table-cell office:value-type="string">
            <text:p>2024-03-06T14:13:51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record-voi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lm</text:p>
          </table:table-cell>
          <table:table-cell office:value-type="string">
            <text:p>0</text:p>
          </table:table-cell>
          <table:table-cell office:value-type="string">
            <text:p>0</text:p>
          </table:table-cell>
          <table:table-cell office:value-type="string">
            <text:p>https://github.com/unfoldingWord-box3/RecordVoice</text:p>
          </table:table-cell>
          <table:table-cell office:value-type="string">
            <text:p>2024-03-05T16:10:13Z</text:p>
          </table:table-cell>
        </table:table-row>
        <table:table-row>
          <table:table-cell office:value-type="string">
            <text:p>audio-quiz</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9T13:55:01Z</text:p>
          </table:table-cell>
          <table:table-cell office:value-type="string">
            <text:p>2024-01-19T13:53:4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audio-quiz</text:p>
          </table:table-cell>
          <table:table-cell office:value-type="string">
            <text:p>2024-02-28T16:05:13Z</text:p>
          </table:table-cell>
        </table:table-row>
        <table:table-row>
          <table:table-cell office:value-type="string">
            <text:p>VscUsfmEditAlig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15T14:05:55Z</text:p>
          </table:table-cell>
          <table:table-cell office:value-type="string">
            <text:p>2024-02-13T19:43:46Z</text:p>
          </table:table-cell>
          <table:table-cell office:value-type="string">
            <text:p/>
          </table:table-cell>
          <table:table-cell office:value-type="string">
            <text:p>0</text:p>
          </table:table-cell>
          <table:table-cell office:value-type="string">
            <text:p>0</text:p>
          </table:table-cell>
          <table:table-cell office:value-type="string">
            <text:p>46</text:p>
          </table:table-cell>
          <table:table-cell office:value-type="string">
            <text:p/>
          </table:table-cell>
          <table:table-cell office:value-type="string">
            <text:p>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VsCodeUsfmAligner</text:p>
          </table:table-cell>
          <table:table-cell office:value-type="string">
            <text:p>Joshua Lansford, PhotoNomad0, blm</text:p>
          </table:table-cell>
          <table:table-cell office:value-type="string">
            <text:p>0</text:p>
          </table:table-cell>
          <table:table-cell office:value-type="string">
            <text:p>0</text:p>
          </table:table-cell>
          <table:table-cell office:value-type="string">
            <text:p>https://github.com/unfoldingWord-box3/VscUsfmEditAlign</text:p>
          </table:table-cell>
          <table:table-cell office:value-type="string">
            <text:p>2024-02-15T14:03:06Z</text:p>
          </table:table-cell>
        </table:table-row>
        <table:table-row>
          <table:table-cell office:value-type="string">
            <text:p>VscOceUsfmEd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02T13:44:52Z</text:p>
          </table:table-cell>
          <table:table-cell office:value-type="string">
            <text:p>2024-02-02T13:44:52Z</text:p>
          </table:table-cell>
          <table:table-cell office:value-type="string">
            <text:p/>
          </table:table-cell>
          <table:table-cell office:value-type="string">
            <text:p>0</text:p>
          </table:table-cell>
          <table:table-cell office:value-type="string">
            <text:p>0</text:p>
          </table:table-cell>
          <table:table-cell office:value-type="string">
            <text:p>42</text:p>
          </table:table-cell>
          <table:table-cell office:value-type="string">
            <text:p/>
          </table:table-cell>
          <table:table-cell office:value-type="string">
            <text:p>oce-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x3/VscUsfmEditAlign</text:p>
          </table:table-cell>
          <table:table-cell office:value-type="string">
            <text:p>Joshua Lansford, larsgson, PhotoNomad0, blm</text:p>
          </table:table-cell>
          <table:table-cell office:value-type="string">
            <text:p>0</text:p>
          </table:table-cell>
          <table:table-cell office:value-type="string">
            <text:p>0</text:p>
          </table:table-cell>
          <table:table-cell office:value-type="string">
            <text:p>https://github.com/unfoldingWord-box3/VscOceUsfmEdit</text:p>
          </table:table-cell>
          <table:table-cell office:value-type="string">
            <text:p>2024-02-02T13:45:00Z</text:p>
          </table:table-cell>
        </table:table-row>
        <table:table-row>
          <table:table-cell office:value-type="string">
            <text:p>bible-preview-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10-11T10:48:37Z</text:p>
          </table:table-cell>
          <table:table-cell office:value-type="string">
            <text:p>2023-10-11T10:45:25Z</text:p>
          </table:table-cell>
          <table:table-cell office:value-type="string">
            <text:p/>
          </table:table-cell>
          <table:table-cell office:value-type="string">
            <text:p>0</text:p>
          </table:table-cell>
          <table:table-cell office:value-type="string">
            <text:p>0</text:p>
          </table:table-cell>
          <table:table-cell office:value-type="string">
            <text:p>63</text:p>
          </table:table-cell>
          <table:table-cell office:value-type="string">
            <text:p/>
          </table:table-cell>
          <table:table-cell office:value-type="string">
            <text:p>bible-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text:p>
          </table:table-cell>
          <table:table-cell office:value-type="string">
            <text:p/>
          </table:table-cell>
          <table:table-cell office:value-type="string">
            <text:p>richmahn, mandolyte</text:p>
          </table:table-cell>
          <table:table-cell office:value-type="string">
            <text:p>0</text:p>
          </table:table-cell>
          <table:table-cell office:value-type="string">
            <text:p>0</text:p>
          </table:table-cell>
          <table:table-cell office:value-type="string">
            <text:p>https://github.com/unfoldingWord-box3/bible-preview-app</text:p>
          </table:table-cell>
          <table:table-cell office:value-type="string">
            <text:p>2023-08-01T17:31:54Z</text:p>
          </table:table-cell>
        </table:table-row>
        <table:table-row>
          <table:table-cell office:value-type="string">
            <text:p>translate-markdown-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03T17:34:50Z</text:p>
          </table:table-cell>
          <table:table-cell office:value-type="string">
            <text:p>2019-04-03T17:22:30Z</text:p>
          </table:table-cell>
          <table:table-cell office:value-type="string">
            <text:p/>
          </table:table-cell>
          <table:table-cell office:value-type="string">
            <text:p>0</text:p>
          </table:table-cell>
          <table:table-cell office:value-type="string">
            <text:p>0</text:p>
          </table:table-cell>
          <table:table-cell office:value-type="string">
            <text:p>67</text:p>
          </table:table-cell>
          <table:table-cell office:value-type="string">
            <text:p/>
          </table:table-cell>
          <table:table-cell office:value-type="string">
            <text:p>translate-markdow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e-markdown-poc</text:p>
          </table:table-cell>
          <table:table-cell office:value-type="string">
            <text:p>2023-05-20T15:31:34Z</text:p>
          </table:table-cell>
        </table:table-row>
        <table:table-row>
          <table:table-cell office:value-type="string">
            <text:p>dcs-logi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06T18:17:54Z</text:p>
          </table:table-cell>
          <table:table-cell office:value-type="string">
            <text:p>2023-04-06T18:17:50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dcs-log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dcs-login</text:p>
          </table:table-cell>
          <table:table-cell office:value-type="string">
            <text:p>2023-04-04T15:43:56Z</text:p>
          </table:table-cell>
        </table:table-row>
        <table:table-row>
          <table:table-cell office:value-type="string">
            <text:p>react-library-start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6T23:27:40Z</text:p>
          </table:table-cell>
          <table:table-cell office:value-type="string">
            <text:p>2023-02-16T23:27:40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my-li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react-library</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react-library-starter</text:p>
          </table:table-cell>
          <table:table-cell office:value-type="string">
            <text:p>2023-02-16T14:47:55Z</text:p>
          </table:table-cell>
        </table:table-row>
        <table:table-row>
          <table:table-cell office:value-type="string">
            <text:p>alignment-playgroun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0T18:39:36Z</text:p>
          </table:table-cell>
          <table:table-cell office:value-type="string">
            <text:p>2023-01-30T14:47:20Z</text:p>
          </table:table-cell>
          <table:table-cell office:value-type="string">
            <text:p/>
          </table:table-cell>
          <table:table-cell office:value-type="string">
            <text:p>0</text:p>
          </table:table-cell>
          <table:table-cell office:value-type="string">
            <text:p>0</text:p>
          </table:table-cell>
          <table:table-cell office:value-type="string">
            <text:p>25</text:p>
          </table:table-cell>
          <table:table-cell office:value-type="string">
            <text:p/>
          </table:table-cell>
          <table:table-cell office:value-type="string">
            <text:p>alignment-playgroun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tc-ui-toolkit, usfm-js, word-aligner, wordmap-lexer</text:p>
          </table:table-cell>
          <table:table-cell office:value-type="string">
            <text:p>PhotoNomad0/alignment-playground</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alignment-playground</text:p>
          </table:table-cell>
          <table:table-cell office:value-type="string">
            <text:p>2023-01-30T13:00:02Z</text:p>
          </table:table-cell>
        </table:table-row>
        <table:table-row>
          <table:table-cell office:value-type="string">
            <text:p>dcs-file-version-diff-too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22T17:56:46Z</text:p>
          </table:table-cell>
          <table:table-cell office:value-type="string">
            <text:p>2022-08-19T21:40:58Z</text:p>
          </table:table-cell>
          <table:table-cell office:value-type="string">
            <text:p/>
          </table:table-cell>
          <table:table-cell office:value-type="string">
            <text:p>7</text:p>
          </table:table-cell>
          <table:table-cell office:value-type="string">
            <text:p>2</text:p>
          </table:table-cell>
          <table:table-cell office:value-type="string">
            <text:p>27</text:p>
          </table:table-cell>
          <table:table-cell office:value-type="string">
            <text:p/>
          </table:table-cell>
          <table:table-cell office:value-type="string">
            <text:p>dcs-file-version-diff-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danielklapp, jincypjose</text:p>
          </table:table-cell>
          <table:table-cell office:value-type="string">
            <text:p>0</text:p>
          </table:table-cell>
          <table:table-cell office:value-type="string">
            <text:p>0</text:p>
          </table:table-cell>
          <table:table-cell office:value-type="string">
            <text:p>https://github.com/unfoldingWord-box3/dcs-file-version-diff-tool</text:p>
          </table:table-cell>
          <table:table-cell office:value-type="string">
            <text:p>2022-08-20T00:16:31Z</text:p>
          </table:table-cell>
        </table:table-row>
        <table:table-row>
          <table:table-cell office:value-type="string">
            <text:p>wordmap-react-toolk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3-01-07T10:58:07Z</text:p>
          </table:table-cell>
          <table:table-cell office:value-type="string">
            <text:p>2019-11-07T08:12:31Z</text:p>
          </table:table-cell>
          <table:table-cell office:value-type="string">
            <text:p/>
          </table:table-cell>
          <table:table-cell office:value-type="string">
            <text:p>25</text:p>
          </table:table-cell>
          <table:table-cell office:value-type="string">
            <text:p>25</text:p>
          </table:table-cell>
          <table:table-cell office:value-type="string">
            <text:p>45</text:p>
          </table:table-cell>
          <table:table-cell office:value-type="string">
            <text:p/>
          </table:table-cell>
          <table:table-cell office:value-type="string">
            <text:p>wordmap-react-toolkit</text:p>
          </table:table-cell>
          <table:table-cell office:value-type="string">
            <text:p>False</text:p>
          </table:table-cell>
          <table:table-cell office:value-type="string">
            <text:p>242</text:p>
          </table:table-cell>
          <table:table-cell office:value-type="string">
            <text:p>2019-11-07T08:13:01.981Z</text:p>
          </table:table-cell>
          <table:table-cell office:value-type="string">
            <text:p/>
          </table:table-cell>
          <table:table-cell office:value-type="string">
            <text:p>wordmap, wordmap-lexer</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box3/wordmap-react-toolkit</text:p>
          </table:table-cell>
          <table:table-cell office:value-type="string">
            <text:p>2022-06-17T15:47:04Z</text:p>
          </table:table-cell>
        </table:table-row>
        <table:table-row>
          <table:table-cell office:value-type="string">
            <text:p>next-js-template</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9-26T15:07:50Z</text:p>
          </table:table-cell>
          <table:table-cell office:value-type="string">
            <text:p>2022-09-26T15:07:50Z</text:p>
          </table:table-cell>
          <table:table-cell office:value-type="string">
            <text:p/>
          </table:table-cell>
          <table:table-cell office:value-type="string">
            <text:p>20</text:p>
          </table:table-cell>
          <table:table-cell office:value-type="string">
            <text:p>0</text:p>
          </table:table-cell>
          <table:table-cell office:value-type="string">
            <text:p>42</text:p>
          </table:table-cell>
          <table:table-cell office:value-type="string">
            <text:p/>
          </table:table-cell>
          <table:table-cell office:value-type="string">
            <text:p>next-js-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resource-workspace-rcl, scripture-resources-rcl, single-scripture-rcl, tc-ui-toolkit, translation-helps-rcl, word-aligner</text:p>
          </table:table-cell>
          <table:table-cell office:value-type="string">
            <text:p/>
          </table:table-cell>
          <table:table-cell office:value-type="string">
            <text:p>mandolyte, superdav42, mannycolon, abelpz</text:p>
          </table:table-cell>
          <table:table-cell office:value-type="string">
            <text:p>0</text:p>
          </table:table-cell>
          <table:table-cell office:value-type="string">
            <text:p>0</text:p>
          </table:table-cell>
          <table:table-cell office:value-type="string">
            <text:p>https://github.com/unfoldingWord-box3/next-js-template</text:p>
          </table:table-cell>
          <table:table-cell office:value-type="string">
            <text:p>2022-06-17T15:46:29Z</text:p>
          </table:table-cell>
        </table:table-row>
        <table:table-row>
          <table:table-cell office:value-type="string">
            <text:p>translation-helps-print-preview</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6-20T21:25:08Z</text:p>
          </table:table-cell>
          <table:table-cell office:value-type="string">
            <text:p>2022-06-20T21:25:06Z</text:p>
          </table:table-cell>
          <table:table-cell office:value-type="string">
            <text:p/>
          </table:table-cell>
          <table:table-cell office:value-type="string">
            <text:p>7</text:p>
          </table:table-cell>
          <table:table-cell office:value-type="string">
            <text:p>0</text:p>
          </table:table-cell>
          <table:table-cell office:value-type="string">
            <text:p>5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abelpz, richmahn, birchamp</text:p>
          </table:table-cell>
          <table:table-cell office:value-type="string">
            <text:p>0</text:p>
          </table:table-cell>
          <table:table-cell office:value-type="string">
            <text:p>0</text:p>
          </table:table-cell>
          <table:table-cell office:value-type="string">
            <text:p>https://github.com/unfoldingWord-box3/translation-helps-print-preview</text:p>
          </table:table-cell>
          <table:table-cell office:value-type="string">
            <text:p>2022-06-17T15:46:05Z</text:p>
          </table:table-cell>
        </table:table-row>
        <table:table-row>
          <table:table-cell office:value-type="string">
            <text:p>hello-world-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07:49:26Z</text:p>
          </table:table-cell>
          <table:table-cell office:value-type="string">
            <text:p>2022-02-23T21:09:04Z</text:p>
          </table:table-cell>
          <table:table-cell office:value-type="string">
            <text:p/>
          </table:table-cell>
          <table:table-cell office:value-type="string">
            <text:p>32</text:p>
          </table:table-cell>
          <table:table-cell office:value-type="string">
            <text:p>27</text:p>
          </table:table-cell>
          <table:table-cell office:value-type="string">
            <text:p>23</text:p>
          </table:table-cell>
          <table:table-cell office:value-type="string">
            <text:p/>
          </table:table-cell>
          <table:table-cell office:value-type="string">
            <text:p>hello-world-react-component-library</text:p>
          </table:table-cell>
          <table:table-cell office:value-type="string">
            <text:p>False</text:p>
          </table:table-cell>
          <table:table-cell office:value-type="string">
            <text:p>199</text:p>
          </table:table-cell>
          <table:table-cell office:value-type="string">
            <text:p>2019-09-25T16:00:59.747Z</text:p>
          </table:table-cell>
          <table:table-cell office:value-type="string">
            <text:p/>
          </table:table-cell>
          <table:table-cell office:value-type="string">
            <text:p/>
          </table:table-cell>
          <table:table-cell office:value-type="string">
            <text:p/>
          </table:table-cell>
          <table:table-cell office:value-type="string">
            <text:p>klappy, RoyalSix, Sterling (Jay) Scott</text:p>
          </table:table-cell>
          <table:table-cell office:value-type="string">
            <text:p>0</text:p>
          </table:table-cell>
          <table:table-cell office:value-type="string">
            <text:p>0</text:p>
          </table:table-cell>
          <table:table-cell office:value-type="string">
            <text:p>https://github.com/unfoldingWord-box3/hello-world-react-component-library</text:p>
          </table:table-cell>
          <table:table-cell office:value-type="string">
            <text:p>2022-06-14T15:18:39Z</text:p>
          </table:table-cell>
        </table:table-row>
        <table:table-row>
          <table:table-cell office:value-type="string">
            <text:p>resource-containe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06:31:27Z</text:p>
          </table:table-cell>
          <table:table-cell office:value-type="string">
            <text:p>2021-03-10T16:03:18Z</text:p>
          </table:table-cell>
          <table:table-cell office:value-type="string">
            <text:p/>
          </table:table-cell>
          <table:table-cell office:value-type="string">
            <text:p>23</text:p>
          </table:table-cell>
          <table:table-cell office:value-type="string">
            <text:p>23</text:p>
          </table:table-cell>
          <table:table-cell office:value-type="string">
            <text:p>23</text:p>
          </table:table-cell>
          <table:table-cell office:value-type="string">
            <text:p/>
          </table:table-cell>
          <table:table-cell office:value-type="string">
            <text:p>resource-containe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resource-container-rcl</text:p>
          </table:table-cell>
          <table:table-cell office:value-type="string">
            <text:p>2022-06-14T15:16:49Z</text:p>
          </table:table-cell>
        </table:table-row>
        <table:table-row>
          <table:table-cell office:value-type="string">
            <text:p>door43-preview-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20T16:57:57Z</text:p>
          </table:table-cell>
          <table:table-cell office:value-type="string">
            <text:p>2020-10-20T16:57:17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pdf-genera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door43-preview-rcl</text:p>
          </table:table-cell>
          <table:table-cell office:value-type="string">
            <text:p>2022-06-14T15:16:13Z</text:p>
          </table:table-cell>
        </table:table-row>
        <table:table-row>
          <table:table-cell office:value-type="string">
            <text:p>proskomma-scripture-resources-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4-29T14:02:08Z</text:p>
          </table:table-cell>
          <table:table-cell office:value-type="string">
            <text:p>2021-02-05T16:34:09Z</text:p>
          </table:table-cell>
          <table:table-cell office:value-type="string">
            <text:p/>
          </table:table-cell>
          <table:table-cell office:value-type="string">
            <text:p>0</text:p>
          </table:table-cell>
          <table:table-cell office:value-type="string">
            <text:p>0</text:p>
          </table:table-cell>
          <table:table-cell office:value-type="string">
            <text:p>30</text:p>
          </table:table-cell>
          <table:table-cell office:value-type="string">
            <text:p/>
          </table:table-cell>
          <table:table-cell office:value-type="string">
            <text:p>proskomma-scripture-resources-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proskomma</text:p>
          </table:table-cell>
          <table:table-cell office:value-type="string">
            <text:p/>
          </table:table-cell>
          <table:table-cell office:value-type="string">
            <text:p>mvahowe, mannycolon</text:p>
          </table:table-cell>
          <table:table-cell office:value-type="string">
            <text:p>0</text:p>
          </table:table-cell>
          <table:table-cell office:value-type="string">
            <text:p>0</text:p>
          </table:table-cell>
          <table:table-cell office:value-type="string">
            <text:p>https://github.com/unfoldingWord-box3/proskomma-scripture-resources-rcl</text:p>
          </table:table-cell>
          <table:table-cell office:value-type="string">
            <text:p>2022-06-14T15:15:43Z</text:p>
          </table:table-cell>
        </table:table-row>
        <table:table-row>
          <table:table-cell office:value-type="string">
            <text:p>alignment-editor-rc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1-06-24T05:19:56Z</text:p>
          </table:table-cell>
          <table:table-cell office:value-type="string">
            <text:p>2021-06-21T20:30:54Z</text:p>
          </table:table-cell>
          <table:table-cell office:value-type="string">
            <text:p/>
          </table:table-cell>
          <table:table-cell office:value-type="string">
            <text:p>0</text:p>
          </table:table-cell>
          <table:table-cell office:value-type="string">
            <text:p>0</text:p>
          </table:table-cell>
          <table:table-cell office:value-type="string">
            <text:p>176</text:p>
          </table:table-cell>
          <table:table-cell office:value-type="string">
            <text:p/>
          </table:table-cell>
          <table:table-cell office:value-type="string">
            <text:p>alignment-editor-rcl</text:p>
          </table:table-cell>
          <table:table-cell office:value-type="string">
            <text:p/>
          </table:table-cell>
          <table:table-cell office:value-type="string">
            <text:p/>
          </table:table-cell>
          <table:table-cell office:value-type="string">
            <text:p/>
          </table:table-cell>
          <table:table-cell office:value-type="string">
            <text:p>anchor-alignment-poc</text:p>
          </table:table-cell>
          <table:table-cell office:value-type="string">
            <text:p/>
          </table:table-cell>
          <table:table-cell office:value-type="string">
            <text:p>gbin-org/alignment-editor-rcl</text:p>
          </table:table-cell>
          <table:table-cell office:value-type="string">
            <text:p>themikejr, ancientTexts-net</text:p>
          </table:table-cell>
          <table:table-cell office:value-type="string">
            <text:p>0</text:p>
          </table:table-cell>
          <table:table-cell office:value-type="string">
            <text:p>0</text:p>
          </table:table-cell>
          <table:table-cell office:value-type="string">
            <text:p>https://github.com/unfoldingWord-box3/alignment-editor-rcl</text:p>
          </table:table-cell>
          <table:table-cell office:value-type="string">
            <text:p>2022-06-14T15:15:26Z</text:p>
          </table:table-cell>
        </table:table-row>
        <table:table-row>
          <table:table-cell office:value-type="string">
            <text:p>hello-dcs-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27T00:47:55Z</text:p>
          </table:table-cell>
          <table:table-cell office:value-type="string">
            <text:p>2022-12-16T08:48:26Z</text:p>
          </table:table-cell>
          <table:table-cell office:value-type="string">
            <text:p/>
          </table:table-cell>
          <table:table-cell office:value-type="string">
            <text:p>6</text:p>
          </table:table-cell>
          <table:table-cell office:value-type="string">
            <text:p>6</text:p>
          </table:table-cell>
          <table:table-cell office:value-type="string">
            <text:p>6</text:p>
          </table:table-cell>
          <table:table-cell office:value-type="string">
            <text:p/>
          </table:table-cell>
          <table:table-cell office:value-type="string">
            <text:p>hello-dcs-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 dependabot[bot], yakob-aleksandrovich</text:p>
          </table:table-cell>
          <table:table-cell office:value-type="string">
            <text:p>0</text:p>
          </table:table-cell>
          <table:table-cell office:value-type="string">
            <text:p>0</text:p>
          </table:table-cell>
          <table:table-cell office:value-type="string">
            <text:p>https://github.com/unfoldingWord-box3/hello-dcs-react-component-library</text:p>
          </table:table-cell>
          <table:table-cell office:value-type="string">
            <text:p>2022-06-14T15:15:13Z</text:p>
          </table:table-cell>
        </table:table-row>
        <table:table-row>
          <table:table-cell office:value-type="string">
            <text:p>gutenberg-proje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3-01T21:14:08Z</text:p>
          </table:table-cell>
          <table:table-cell office:value-type="string">
            <text:p>2022-03-01T21:14:05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gutenberg-project</text:p>
          </table:table-cell>
          <table:table-cell office:value-type="string">
            <text:p>2022-03-01T21:05:23Z</text:p>
          </table:table-cell>
        </table:table-row>
        <table:table-row>
          <table:table-cell office:value-type="string">
            <text:p>md-converte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2-20T19:28:22Z</text:p>
          </table:table-cell>
          <table:table-cell office:value-type="string">
            <text:p>2021-12-20T19:28:22Z</text:p>
          </table:table-cell>
          <table:table-cell office:value-type="string">
            <text:p/>
          </table:table-cell>
          <table:table-cell office:value-type="string">
            <text:p>30</text:p>
          </table:table-cell>
          <table:table-cell office:value-type="string">
            <text:p>0</text:p>
          </table:table-cell>
          <table:table-cell office:value-type="string">
            <text:p>213</text:p>
          </table:table-cell>
          <table:table-cell office:value-type="string">
            <text:p/>
          </table:table-cell>
          <table:table-cell office:value-type="string">
            <text:p>md-tsv-convert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mannycolon, PhotoNomad0, ImgBotApp</text:p>
          </table:table-cell>
          <table:table-cell office:value-type="string">
            <text:p>0</text:p>
          </table:table-cell>
          <table:table-cell office:value-type="string">
            <text:p>0</text:p>
          </table:table-cell>
          <table:table-cell office:value-type="string">
            <text:p>https://github.com/unfoldingWord-box3/md-converter-app</text:p>
          </table:table-cell>
          <table:table-cell office:value-type="string">
            <text:p>2021-12-20T19:28:57Z</text:p>
          </table:table-cell>
        </table:table-row>
        <table:table-row>
          <table:table-cell office:value-type="string">
            <text:p>tc-creat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7-05T17:42:04Z</text:p>
          </table:table-cell>
          <table:table-cell office:value-type="string">
            <text:p>2021-07-05T17:41:59Z</text:p>
          </table:table-cell>
          <table:table-cell office:value-type="string">
            <text:p/>
          </table:table-cell>
          <table:table-cell office:value-type="string">
            <text:p>0</text:p>
          </table:table-cell>
          <table:table-cell office:value-type="string">
            <text:p>0</text:p>
          </table:table-cell>
          <table:table-cell office:value-type="string">
            <text:p>948</text:p>
          </table:table-cell>
          <table:table-cell office:value-type="string">
            <text:p/>
          </table:table-cell>
          <table:table-cell office:value-type="string">
            <text:p>tc-create-app</text:p>
          </table:table-cell>
          <table:table-cell office:value-type="string">
            <text:p>False</text:p>
          </table:table-cell>
          <table:table-cell office:value-type="string">
            <text:p>71</text:p>
          </table:table-cell>
          <table:table-cell office:value-type="string">
            <text:p>2022-02-22T21:12:10.659Z</text:p>
          </table:table-cell>
          <table:table-cell office:value-type="string">
            <text:p/>
          </table:table-cell>
          <table:table-cell office:value-type="string">
            <text:p>datatable-translatable, gitea-react-toolkit, markdown-translatable, scripture-resources-rcl, usfm-js, uw-content-validation, @unfoldingword/eslint-config</text:p>
          </table:table-cell>
          <table:table-cell office:value-type="string">
            <text:p>unfoldingWord/tc-create-app</text:p>
          </table:table-cell>
          <table:table-cell office:value-type="string">
            <text:p>ancientTexts-net, RoyalSix, klappy, dependabot[bot], mandolyte, Sterling (Jay) Scott, actions-user, dependabot-preview[bot], jag3773, PhotoNomad0, birchamp</text:p>
          </table:table-cell>
          <table:table-cell office:value-type="string">
            <text:p>0</text:p>
          </table:table-cell>
          <table:table-cell office:value-type="string">
            <text:p>0</text:p>
          </table:table-cell>
          <table:table-cell office:value-type="string">
            <text:p>https://github.com/unfoldingWord-box3/tc-create-poc</text:p>
          </table:table-cell>
          <table:table-cell office:value-type="string">
            <text:p>2021-12-03T15:55:03Z</text:p>
          </table:table-cell>
        </table:table-row>
        <table:table-row>
          <table:table-cell office:value-type="string">
            <text:p>simple-text-edito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23:50:37Z</text:p>
          </table:table-cell>
          <table:table-cell office:value-type="string">
            <text:p>2022-05-09T18:19:08Z</text:p>
          </table:table-cell>
          <table:table-cell office:value-type="string">
            <text:p/>
          </table:table-cell>
          <table:table-cell office:value-type="string">
            <text:p>1</text:p>
          </table:table-cell>
          <table:table-cell office:value-type="string">
            <text:p>0</text:p>
          </table:table-cell>
          <table:table-cell office:value-type="string">
            <text:p>21</text:p>
          </table:table-cell>
          <table:table-cell office:value-type="string">
            <text:p/>
          </table:table-cell>
          <table:table-cell office:value-type="string">
            <text:p>simple-text-edito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imple-text-editor-rcl</text:p>
          </table:table-cell>
          <table:table-cell office:value-type="string">
            <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app</text:p>
          </table:table-cell>
          <table:table-cell office:value-type="string">
            <text:p>2021-11-29T20:26:55Z</text:p>
          </table:table-cell>
        </table:table-row>
        <table:table-row>
          <table:table-cell office:value-type="string">
            <text:p>gateway-edi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1-22T13:29:02Z</text:p>
          </table:table-cell>
          <table:table-cell office:value-type="string">
            <text:p>2021-11-22T13:29:02Z</text:p>
          </table:table-cell>
          <table:table-cell office:value-type="string">
            <text:p/>
          </table:table-cell>
          <table:table-cell office:value-type="string">
            <text:p>2</text:p>
          </table:table-cell>
          <table:table-cell office:value-type="string">
            <text:p>0</text:p>
          </table:table-cell>
          <table:table-cell office:value-type="string">
            <text:p>852</text:p>
          </table:table-cell>
          <table:table-cell office:value-type="string">
            <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c-ui-toolkit, translation-helps-rcl, word-aligner</text:p>
          </table:table-cell>
          <table:table-cell office:value-type="string">
            <text:p/>
          </table:table-cell>
          <table:table-cell office:value-type="string">
            <text:p>PhotoNomad0, mannycolon, Joel-C-Johnson, jincypjose</text:p>
          </table:table-cell>
          <table:table-cell office:value-type="string">
            <text:p>0</text:p>
          </table:table-cell>
          <table:table-cell office:value-type="string">
            <text:p>0</text:p>
          </table:table-cell>
          <table:table-cell office:value-type="string">
            <text:p>https://github.com/unfoldingWord-box3/gateway-edit-POC</text:p>
          </table:table-cell>
          <table:table-cell office:value-type="string">
            <text:p>2021-11-22T13:29:05Z</text:p>
          </table:table-cell>
        </table:table-row>
        <table:table-row>
          <table:table-cell office:value-type="string">
            <text:p>obs-pdf-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26T01:31:57Z</text:p>
          </table:table-cell>
          <table:table-cell office:value-type="string">
            <text:p>2023-04-26T01:31:54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obs-pdf-poc</text:p>
          </table:table-cell>
          <table:table-cell office:value-type="string">
            <text:p>2021-11-03T19:29:18Z</text:p>
          </table:table-cell>
        </table:table-row>
        <table:table-row>
          <table:table-cell office:value-type="string">
            <text:p>anchor-alignmen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7-21T18:55:52Z</text:p>
          </table:table-cell>
          <table:table-cell office:value-type="string">
            <text:p>2021-07-06T04:48:26Z</text:p>
          </table:table-cell>
          <table:table-cell office:value-type="string">
            <text:p/>
          </table:table-cell>
          <table:table-cell office:value-type="string">
            <text:p>2</text:p>
          </table:table-cell>
          <table:table-cell office:value-type="string">
            <text:p>2</text:p>
          </table:table-cell>
          <table:table-cell office:value-type="string">
            <text:p>23</text:p>
          </table:table-cell>
          <table:table-cell office:value-type="string">
            <text:p/>
          </table:table-cell>
          <table:table-cell office:value-type="string">
            <text:p>anchor-alignment-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ignment-editor-rcl, bible-reference-rcl, gitea-react-toolkit, string-punctuation-tokenizer</text:p>
          </table:table-cell>
          <table:table-cell office:value-type="string">
            <text:p/>
          </table:table-cell>
          <table:table-cell office:value-type="string">
            <text:p>ancientTexts-net, klappy, themikejr</text:p>
          </table:table-cell>
          <table:table-cell office:value-type="string">
            <text:p>0</text:p>
          </table:table-cell>
          <table:table-cell office:value-type="string">
            <text:p>0</text:p>
          </table:table-cell>
          <table:table-cell office:value-type="string">
            <text:p>https://github.com/unfoldingWord-box3/anchor-alignment-poc</text:p>
          </table:table-cell>
          <table:table-cell office:value-type="string">
            <text:p>2021-08-09T17:50:41Z</text:p>
          </table:table-cell>
        </table:table-row>
        <table:table-row>
          <table:table-cell office:value-type="string">
            <text:p>graphql-catalog-nex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6-08T15:35:33Z</text:p>
          </table:table-cell>
          <table:table-cell office:value-type="string">
            <text:p>2021-06-08T15:35:20Z</text:p>
          </table:table-cell>
          <table:table-cell office:value-type="string">
            <text:p/>
          </table:table-cell>
          <table:table-cell office:value-type="string">
            <text:p>3</text:p>
          </table:table-cell>
          <table:table-cell office:value-type="string">
            <text:p>0</text:p>
          </table:table-cell>
          <table:table-cell office:value-type="string">
            <text:p>8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kavitharaju, abelpz</text:p>
          </table:table-cell>
          <table:table-cell office:value-type="string">
            <text:p>0</text:p>
          </table:table-cell>
          <table:table-cell office:value-type="string">
            <text:p>0</text:p>
          </table:table-cell>
          <table:table-cell office:value-type="string">
            <text:p>https://github.com/unfoldingWord-box3/graphql-catalog-next</text:p>
          </table:table-cell>
          <table:table-cell office:value-type="string">
            <text:p>2021-06-08T15:35:23Z</text:p>
          </table:table-cell>
        </table:table-row>
        <table:table-row>
          <table:table-cell office:value-type="string">
            <text:p>content-validatio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29T11:54:08Z</text:p>
          </table:table-cell>
          <table:table-cell office:value-type="string">
            <text:p>2021-03-29T11:54:05Z</text:p>
          </table:table-cell>
          <table:table-cell office:value-type="string">
            <text:p/>
          </table:table-cell>
          <table:table-cell office:value-type="string">
            <text:p>8</text:p>
          </table:table-cell>
          <table:table-cell office:value-type="string">
            <text:p>0</text:p>
          </table:table-cell>
          <table:table-cell office:value-type="string">
            <text:p>88</text:p>
          </table:table-cell>
          <table:table-cell office:value-type="string">
            <text:p/>
          </table:table-cell>
          <table:table-cell office:value-type="string">
            <text:p>content-validation-app</text:p>
          </table:table-cell>
          <table:table-cell office:value-type="string">
            <text:p>False</text:p>
          </table:table-cell>
          <table:table-cell office:value-type="string">
            <text:p>187</text:p>
          </table:table-cell>
          <table:table-cell office:value-type="string">
            <text:p>2020-09-16T21:52:51.640Z</text:p>
          </table:table-cell>
          <table:table-cell office:value-type="string">
            <text:p/>
          </table:table-cell>
          <table:table-cell office:value-type="string">
            <text:p>uw-content-validation</text:p>
          </table:table-cell>
          <table:table-cell office:value-type="string">
            <text:p/>
          </table:table-cell>
          <table:table-cell office:value-type="string">
            <text:p>PhotoNomad0, mandolyte</text:p>
          </table:table-cell>
          <table:table-cell office:value-type="string">
            <text:p>0</text:p>
          </table:table-cell>
          <table:table-cell office:value-type="string">
            <text:p>0</text:p>
          </table:table-cell>
          <table:table-cell office:value-type="string">
            <text:p>https://github.com/unfoldingWord-box3/content-validation-app</text:p>
          </table:table-cell>
          <table:table-cell office:value-type="string">
            <text:p>2021-03-29T11:54:10Z</text:p>
          </table:table-cell>
        </table:table-row>
        <table:table-row>
          <table:table-cell office:value-type="string">
            <text:p>admi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12T02:03:11Z</text:p>
          </table:table-cell>
          <table:table-cell office:value-type="string">
            <text:p>2021-03-12T02:03:07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admi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translation-helps-rcl, resource-workspace-rcl</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admin-app</text:p>
          </table:table-cell>
          <table:table-cell office:value-type="string">
            <text:p>2021-03-12T02:03:10Z</text:p>
          </table:table-cell>
        </table:table-row>
        <table:table-row>
          <table:table-cell office:value-type="string">
            <text:p>greek-apparatus-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2-18T21:03:03Z</text:p>
          </table:table-cell>
          <table:table-cell office:value-type="string">
            <text:p>2020-12-14T15:55:47Z</text:p>
          </table:table-cell>
          <table:table-cell office:value-type="string">
            <text:p/>
          </table:table-cell>
          <table:table-cell office:value-type="string">
            <text:p>21</text:p>
          </table:table-cell>
          <table:table-cell office:value-type="string">
            <text:p>0</text:p>
          </table:table-cell>
          <table:table-cell office:value-type="string">
            <text:p>95</text:p>
          </table:table-cell>
          <table:table-cell office:value-type="string">
            <text:p/>
          </table:table-cell>
          <table:table-cell office:value-type="string">
            <text:p>greek-apparatus-app</text:p>
          </table:table-cell>
          <table:table-cell office:value-type="string">
            <text:p>False</text:p>
          </table:table-cell>
          <table:table-cell office:value-type="string">
            <text:p>70</text:p>
          </table:table-cell>
          <table:table-cell office:value-type="string">
            <text:p>2020-12-11T16:05:46.321Z</text:p>
          </table:table-cell>
          <table:table-cell office:value-type="string">
            <text:p/>
          </table:table-cell>
          <table:table-cell office:value-type="string">
            <text:p>bible-reference-rcl, datatable-translatable, gitea-react-toolkit, scripture-resources-rcl, string-punctuation-tokenizer, usfm-js</text:p>
          </table:table-cell>
          <table:table-cell office:value-type="string">
            <text:p/>
          </table:table-cell>
          <table:table-cell office:value-type="string">
            <text:p>richmahn, mannycolon, ancientTexts-net</text:p>
          </table:table-cell>
          <table:table-cell office:value-type="string">
            <text:p>0</text:p>
          </table:table-cell>
          <table:table-cell office:value-type="string">
            <text:p>0</text:p>
          </table:table-cell>
          <table:table-cell office:value-type="string">
            <text:p>https://github.com/unfoldingWord-box3/greek-apparatus-app</text:p>
          </table:table-cell>
          <table:table-cell office:value-type="string">
            <text:p>2021-02-11T13:51:27Z</text:p>
          </table:table-cell>
        </table:table-row>
        <table:table-row>
          <table:table-cell office:value-type="string">
            <text:p>book-package-view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19T16:22:36Z</text:p>
          </table:table-cell>
          <table:table-cell office:value-type="string">
            <text:p>2020-10-19T16:21:53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book-package-viewer-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book-package-viewer-poc</text:p>
          </table:table-cell>
          <table:table-cell office:value-type="string">
            <text:p>2020-10-21T20:48:29Z</text:p>
          </table:table-cell>
        </table:table-row>
        <table:table-row>
          <table:table-cell office:value-type="string">
            <text:p>pdf-genera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09T16:44:00Z</text:p>
          </table:table-cell>
          <table:table-cell office:value-type="string">
            <text:p>2020-10-09T16:43:56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pdf-gener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cripture-resources-rcl, string-punctuation-tokenizer, tc-source-content-updater, tsv-groupdata-parse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pdf-generator</text:p>
          </table:table-cell>
          <table:table-cell office:value-type="string">
            <text:p>2020-10-09T16:44:02Z</text:p>
          </table:table-cell>
        </table:table-row>
        <table:table-row>
          <table:table-cell office:value-type="string">
            <text:p>gitea-offlin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13:35:32Z</text:p>
          </table:table-cell>
          <table:table-cell office:value-type="string">
            <text:p>2020-08-12T19:36:04Z</text:p>
          </table:table-cell>
          <table:table-cell office:value-type="string">
            <text:p/>
          </table:table-cell>
          <table:table-cell office:value-type="string">
            <text:p>20</text:p>
          </table:table-cell>
          <table:table-cell office:value-type="string">
            <text:p>20</text:p>
          </table:table-cell>
          <table:table-cell office:value-type="string">
            <text:p>2</text:p>
          </table:table-cell>
          <table:table-cell office:value-type="string">
            <text:p/>
          </table:table-cell>
          <table:table-cell office:value-type="string">
            <text:p>gitea-offlin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unfoldingword/eslint-config, markdown-translatable</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gitea-offline-poc</text:p>
          </table:table-cell>
          <table:table-cell office:value-type="string">
            <text:p>2020-08-12T19:36:13Z</text:p>
          </table:table-cell>
        </table:table-row>
        <table:table-row>
          <table:table-cell office:value-type="string">
            <text:p>sample-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07-28T16:44:35Z</text:p>
          </table:table-cell>
          <table:table-cell office:value-type="string">
            <text:p>2020-07-28T16:43:21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sample-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0</text:p>
          </table:table-cell>
          <table:table-cell office:value-type="string">
            <text:p>0</text:p>
          </table:table-cell>
          <table:table-cell office:value-type="string">
            <text:p>https://github.com/unfoldingWord-box3/sample-react-component-library</text:p>
          </table:table-cell>
          <table:table-cell office:value-type="string">
            <text:p>2020-07-28T16:44:37Z</text:p>
          </table:table-cell>
        </table:table-row>
        <table:table-row>
          <table:table-cell office:value-type="string">
            <text:p>scripture-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30T20:47:55Z</text:p>
          </table:table-cell>
          <table:table-cell office:value-type="string">
            <text:p>2020-07-22T12:31:01Z</text:p>
          </table:table-cell>
          <table:table-cell office:value-type="string">
            <text:p/>
          </table:table-cell>
          <table:table-cell office:value-type="string">
            <text:p>10</text:p>
          </table:table-cell>
          <table:table-cell office:value-type="string">
            <text:p>10</text:p>
          </table:table-cell>
          <table:table-cell office:value-type="string">
            <text:p>73</text:p>
          </table:table-cell>
          <table:table-cell office:value-type="string">
            <text:p/>
          </table:table-cell>
          <table:table-cell office:value-type="string">
            <text:p>scripture-as-grap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mvahowe, jag3773</text:p>
          </table:table-cell>
          <table:table-cell office:value-type="string">
            <text:p>0</text:p>
          </table:table-cell>
          <table:table-cell office:value-type="string">
            <text:p>0</text:p>
          </table:table-cell>
          <table:table-cell office:value-type="string">
            <text:p>https://github.com/unfoldingWord-box3/scripture-as-graph</text:p>
          </table:table-cell>
          <table:table-cell office:value-type="string">
            <text:p>2020-07-22T12:31:12Z</text:p>
          </table:table-cell>
        </table:table-row>
        <table:table-row>
          <table:table-cell office:value-type="string">
            <text:p>lang-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5T01:22:08Z</text:p>
          </table:table-cell>
          <table:table-cell office:value-type="string">
            <text:p>2020-07-21T13:00:01Z</text:p>
          </table:table-cell>
          <table:table-cell office:value-type="string">
            <text:p/>
          </table:table-cell>
          <table:table-cell office:value-type="string">
            <text:p>5</text:p>
          </table:table-cell>
          <table:table-cell office:value-type="string">
            <text:p>5</text:p>
          </table:table-cell>
          <table:table-cell office:value-type="string">
            <text:p>22</text:p>
          </table:table-cell>
          <table:table-cell office:value-type="string">
            <text:p/>
          </table:table-cell>
          <table:table-cell office:value-type="string">
            <text:p>language-databas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vanmhale, jag3773</text:p>
          </table:table-cell>
          <table:table-cell office:value-type="string">
            <text:p>0</text:p>
          </table:table-cell>
          <table:table-cell office:value-type="string">
            <text:p>0</text:p>
          </table:table-cell>
          <table:table-cell office:value-type="string">
            <text:p>https://github.com/unfoldingWord-box3/lang-as-graph</text:p>
          </table:table-cell>
          <table:table-cell office:value-type="string">
            <text:p>2020-07-21T13:00:12Z</text:p>
          </table:table-cell>
        </table:table-row>
        <table:table-row>
          <table:table-cell office:value-type="string">
            <text:p>uw-metadata-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0T17:08:07Z</text:p>
          </table:table-cell>
          <table:table-cell office:value-type="string">
            <text:p>2020-05-07T19:30:02Z</text:p>
          </table:table-cell>
          <table:table-cell office:value-type="string">
            <text:p/>
          </table:table-cell>
          <table:table-cell office:value-type="string">
            <text:p>5</text:p>
          </table:table-cell>
          <table:table-cell office:value-type="string">
            <text:p>5</text:p>
          </table:table-cell>
          <table:table-cell office:value-type="string">
            <text:p>12</text:p>
          </table:table-cell>
          <table:table-cell office:value-type="string">
            <text:p/>
          </table:table-cell>
          <table:table-cell office:value-type="string">
            <text:p>scripture-burrito-react-jsonschema-for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uw-metadata-react-component-library</text:p>
          </table:table-cell>
          <table:table-cell office:value-type="string">
            <text:p>2020-05-07T19:30:12Z</text:p>
          </table:table-cell>
        </table:table-row>
        <table:table-row>
          <table:table-cell office:value-type="string">
            <text:p>react-to-electron-ac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18T19:24:40Z</text:p>
          </table:table-cell>
          <table:table-cell office:value-type="string">
            <text:p>2020-05-06T12:37:26Z</text:p>
          </table:table-cell>
          <table:table-cell office:value-type="string">
            <text:p/>
          </table:table-cell>
          <table:table-cell office:value-type="string">
            <text:p>2</text:p>
          </table:table-cell>
          <table:table-cell office:value-type="string">
            <text:p>2</text:p>
          </table:table-cell>
          <table:table-cell office:value-type="string">
            <text:p>29</text:p>
          </table:table-cell>
          <table:table-cell office:value-type="string">
            <text:p/>
          </table:table-cell>
          <table:table-cell office:value-type="string">
            <text:p>react-to-electron-a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ok-package-app, mandolyte/rrouter</text:p>
          </table:table-cell>
          <table:table-cell office:value-type="string">
            <text:p>mandolyte, dependabot[bot]</text:p>
          </table:table-cell>
          <table:table-cell office:value-type="string">
            <text:p>0</text:p>
          </table:table-cell>
          <table:table-cell office:value-type="string">
            <text:p>0</text:p>
          </table:table-cell>
          <table:table-cell office:value-type="string">
            <text:p>https://github.com/unfoldingWord-box3/react-to-electron-action</text:p>
          </table:table-cell>
          <table:table-cell office:value-type="string">
            <text:p>2020-05-06T12:37:30Z</text:p>
          </table:table-cell>
        </table:table-row>
        <table:table-row>
          <table:table-cell office:value-type="string">
            <text:p>translation-manag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11T11:37:33Z</text:p>
          </table:table-cell>
          <table:table-cell office:value-type="string">
            <text:p>2020-01-28T22:33:18Z</text:p>
          </table:table-cell>
          <table:table-cell office:value-type="string">
            <text:p/>
          </table:table-cell>
          <table:table-cell office:value-type="string">
            <text:p>24</text:p>
          </table:table-cell>
          <table:table-cell office:value-type="string">
            <text:p>24</text:p>
          </table:table-cell>
          <table:table-cell office:value-type="string">
            <text:p>5</text:p>
          </table:table-cell>
          <table:table-cell office:value-type="string">
            <text:p/>
          </table:table-cell>
          <table:table-cell office:value-type="string">
            <text:p>translation-manager-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translation-manager-poc</text:p>
          </table:table-cell>
          <table:table-cell office:value-type="string">
            <text:p>2020-01-28T22:33:45Z</text:p>
          </table:table-cell>
        </table:table-row>
        <table:table-row>
          <table:table-cell office:value-type="string">
            <text:p>tsv-edi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10T00:13:59Z</text:p>
          </table:table-cell>
          <table:table-cell office:value-type="string">
            <text:p>2019-04-10T00:12:52Z</text:p>
          </table:table-cell>
          <table:table-cell office:value-type="string">
            <text:p/>
          </table:table-cell>
          <table:table-cell office:value-type="string">
            <text:p>0</text:p>
          </table:table-cell>
          <table:table-cell office:value-type="string">
            <text:p>0</text:p>
          </table:table-cell>
          <table:table-cell office:value-type="string">
            <text:p>36</text:p>
          </table:table-cell>
          <table:table-cell office:value-type="string">
            <text:p/>
          </table:table-cell>
          <table:table-cell office:value-type="string">
            <text:p>tsv-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sv-editor</text:p>
          </table:table-cell>
          <table:table-cell office:value-type="string">
            <text:p>2019-04-10T00:14:01Z</text:p>
          </table:table-cell>
        </table:table-row>
        <table:table-row>
          <table:table-cell office:value-type="string">
            <text:p>translation-proces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3-22T14:32:16Z</text:p>
          </table:table-cell>
          <table:table-cell office:value-type="string">
            <text:p>2019-03-22T14:30:55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translation-proces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ion-process</text:p>
          </table:table-cell>
          <table:table-cell office:value-type="string">
            <text:p>2019-03-22T14:32:18Z</text:p>
          </table:table-cell>
        </table:table-row>
        <table:table-row>
          <table:table-cell office:value-type="string">
            <text:p>tc-study/bible-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ible-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linked-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linked-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mobi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mob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toolkit/resource-down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toolkit/resource-down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resource-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resource-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tc-stud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oc-gener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toc-gener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che-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che-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che-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manag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door43-ap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door43-ap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linked-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linked-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naviga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engin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builder-engi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c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sta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st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orkflow</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workflo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storag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stor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ssage-sets-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ssage-se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ction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acti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dapt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adapt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bundl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bundl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ch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ca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talog</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catalo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rs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pars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elec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sele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igna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signa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typ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cripture-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hared</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hare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tudy-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tudy-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oc-generator-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oc-generator-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academy-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academy-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note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note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question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question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ink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words-link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word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i-contro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ui-contr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nified-catalog-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unified-catalog-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sfm-processo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usfm-process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oce-editor-tools/@oce-editor-tools/bas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base-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base</text:p>
          </table:table-cell>
          <table:table-cell office:value-type="string">
            <text:p/>
          </table:table-cell>
          <table:table-cell office:value-type="string">
            <text:p>1870</text:p>
          </table:table-cell>
          <table:table-cell office:value-type="string">
            <text:p>2024-01-10T09:41:28.021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core</text:p>
          </table:table-cell>
          <table:table-cell office:value-type="string">
            <text:p/>
          </table:table-cell>
          <table:table-cell office:value-type="string">
            <text:p>426</text:p>
          </table:table-cell>
          <table:table-cell office:value-type="string">
            <text:p>2024-01-10T09:45:57.004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pk</text:p>
          </table:table-cell>
          <table:table-cell office:value-type="string">
            <text:p/>
          </table:table-cell>
          <table:table-cell office:value-type="string">
            <text:p>134</text:p>
          </table:table-cell>
          <table:table-cell office:value-type="string">
            <text:p>2024-01-10T09:47:45.958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core</text:p>
          </table:table-cell>
          <table:table-cell office:value-type="string">
            <text:p/>
          </table:table-cell>
          <table:table-cell office:value-type="string">
            <text:p>665</text:p>
          </table:table-cell>
          <table:table-cell office:value-type="string">
            <text:p>2024-01-10T09:42:28.55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pk</text:p>
          </table:table-cell>
          <table:table-cell office:value-type="string">
            <text:p/>
          </table:table-cell>
          <table:table-cell office:value-type="string">
            <text:p>354</text:p>
          </table:table-cell>
          <table:table-cell office:value-type="string">
            <text:p>2024-01-10T09:45:17.176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simp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simple</text:p>
          </table:table-cell>
          <table:table-cell office:value-type="string">
            <text:p/>
          </table:table-cell>
          <table:table-cell office:value-type="string">
            <text:p>401</text:p>
          </table:table-cell>
          <table:table-cell office:value-type="string">
            <text:p>2024-01-10T09:45:39.01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pk-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pk-alig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 string-punctuation-tokenizer, word-aligner-rc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verse-m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verse-mapper</text:p>
          </table:table-cell>
          <table:table-cell office:value-type="string">
            <text:p/>
          </table:table-cell>
          <table:table-cell office:value-type="string">
            <text:p>100</text:p>
          </table:table-cell>
          <table:table-cell office:value-type="string">
            <text:p>2024-01-10T09:46:28.087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findr/@findr/mu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mu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perf</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perf</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rea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re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tex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dcs-packages/dcs-js-examp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js-ex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js</text:p>
          </table:table-cell>
          <table:table-cell office:value-type="string">
            <text:p/>
          </table:table-cell>
          <table:table-cell office:value-type="string">
            <text:p>784</text:p>
          </table:table-cell>
          <table:table-cell office:value-type="string">
            <text:p>2022-11-02T13:18:25.384Z</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vite-proje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vite-proje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checking-app-theia/Checking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Checking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CheckingToo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Checking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startChecking</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star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lectron-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mpty</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emp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
    </office:spreadsheet>
  </office:body>
</office:document-content>
</file>