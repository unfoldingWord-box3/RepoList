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756in"/>
    </style:style>
    <style:style style:name="co2" style:family="table-column">
      <style:table-column-properties fo:break-before="auto" style:column-width="1.6591in"/>
    </style:style>
    <style:style style:name="co3" style:family="table-column">
      <style:table-column-properties fo:break-before="auto" style:column-width="0.9736in"/>
    </style:style>
    <style:style style:name="co4" style:family="table-column">
      <style:table-column-properties fo:break-before="auto" style:column-width="0.8409in"/>
    </style:style>
    <style:style style:name="co5" style:family="table-column">
      <style:table-column-properties fo:break-before="auto" style:column-width="0.7319in"/>
    </style:style>
    <style:style style:name="co6" style:family="table-column">
      <style:table-column-properties fo:break-before="auto" style:column-width="1.7516in"/>
    </style:style>
    <style:style style:name="co7" style:family="table-column">
      <style:table-column-properties fo:break-before="auto" style:column-width="1.3362in"/>
    </style:style>
    <style:style style:name="co8" style:family="table-column">
      <style:table-column-properties fo:break-before="auto" style:column-width="1.1374in"/>
    </style:style>
    <style:style style:name="co9" style:family="table-column">
      <style:table-column-properties fo:break-before="auto" style:column-width="2.0283in"/>
    </style:style>
    <style:style style:name="co10" style:family="table-column">
      <style:table-column-properties fo:break-before="auto" style:column-width="0.889in"/>
    </style:style>
    <style:style style:name="co11" style:family="table-column">
      <style:table-column-properties fo:break-before="auto" style:column-width="1.0882in"/>
    </style:style>
    <style:style style:name="co12" style:family="table-column">
      <style:table-column-properties fo:break-before="auto" style:column-width="2.9783in"/>
    </style:style>
    <style:style style:name="co13" style:family="table-column">
      <style:table-column-properties fo:break-before="auto" style:column-width="1.8902in"/>
    </style:style>
    <style:style style:name="co14" style:family="table-column">
      <style:table-column-properties fo:break-before="auto" style:column-width="1.6028in"/>
    </style:style>
    <style:style style:name="co15" style:family="table-column">
      <style:table-column-properties fo:break-before="auto" style:column-width="3.6917in"/>
    </style:style>
    <style:style style:name="co16" style:family="table-column">
      <style:table-column-properties fo:break-before="auto" style:column-width="1.9in"/>
    </style:style>
    <style:style style:name="co17" style:family="table-column">
      <style:table-column-properties fo:break-before="auto" style:column-width="6.6409in"/>
    </style:style>
    <style:style style:name="co18" style:family="table-column">
      <style:table-column-properties fo:break-before="auto" style:column-width="2.4543in"/>
    </style:style>
    <style:style style:name="co19" style:family="table-column">
      <style:table-column-properties fo:break-before="auto" style:column-width="6.4035in"/>
    </style:style>
    <style:style style:name="ro1" style:family="table-row">
      <style:table-row-properties style:row-height="0.178in" fo:break-before="auto" style:use-optimal-row-height="true"/>
    </style:style>
    <style:style style:name="ro2" style:family="table-row">
      <style:table-row-properties style:row-height="0.7035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89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7" table:default-cell-style-name="ce3"/>
        <table:table-column table:style-name="co8" table:default-cell-style-name="ce3"/>
        <table:table-column table:style-name="co9" table:default-cell-style-name="Default"/>
        <table:table-column table:style-name="co10" table:number-columns-repeated="4" table:default-cell-style-name="Default"/>
        <table:table-column table:style-name="co11" table:default-cell-style-name="Default"/>
        <table:table-column table:style-name="co10" table:default-cell-style-name="Default"/>
        <table:table-column table:style-name="co12" table:default-cell-style-name="Default"/>
        <table:table-column table:style-name="co10" table:number-columns-repeated="2" table:default-cell-style-name="ce3"/>
        <table:table-column table:style-name="co13" table:default-cell-style-name="Default"/>
        <table:table-column table:style-name="co14" table:default-cell-style-name="ce3"/>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0" table:number-columns-repeated="16357" table:default-cell-style-name="Default"/>
        <table:table-row table:style-name="ro1">
          <table:table-cell table:style-name="ce1" office:value-type="string" calcext:value-type="string">
            <text:p>repo name</text:p>
          </table:table-cell>
          <table:table-cell table:style-name="ce2" office:value-type="string" calcext:value-type="string">
            <text:p>organization name</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2" office:value-type="string" calcext:value-type="string">
            <text:p>github release count</text:p>
          </table:table-cell>
          <table:table-cell table:style-name="ce2" office:value-type="string" calcext:value-type="string">
            <text:p>github downloads</text:p>
          </table:table-cell>
          <table:table-cell table:style-name="ce1" office:value-type="string" calcext:value-type="string">
            <text:p>repo url</text:p>
          </table:table-cell>
          <table:table-cell table:style-name="ce2" office:value-type="string" calcext:value-type="string">
            <text:p>last edit date</text:p>
          </table:table-cell>
          <table:table-cell table:style-name="ce1" office:value-type="string" calcext:value-type="string">
            <text:p>repo full name</text:p>
          </table:table-cell>
          <table:table-cell table:style-name="ce1" office:value-type="string" calcext:value-type="string">
            <text:p>classification</text:p>
          </table:table-cell>
          <table:table-cell table:style-name="ce1" office:value-type="string" calcext:value-type="string">
            <text:p>classification reason</text:p>
          </table:table-cell>
          <table:table-cell table:style-name="ce1" office:value-type="string" calcext:value-type="string">
            <text:p>npmjs classification</text:p>
          </table:table-cell>
          <table:table-cell table:style-name="ce1" office:value-type="string" calcext:value-type="string">
            <text:p>npmjs classification reason</text:p>
          </table:table-cell>
          <table:table-cell table:style-name="ce1" table:number-columns-repeated="16357"/>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office:value-type="string" calcext:value-type="string">
            <text:p>unfoldingWord-box3/admin-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office:value-type="string" calcext:value-type="string">
            <text:p>unfoldingWord-box3/anchor-alignment-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office:value-type="string" calcext:value-type="string">
            <text:p>unfoldingWord-box3/audio-obs-navigat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office:value-type="string" calcext:value-type="string">
            <text:p>unfoldingWord-box3/audio-qui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office:value-type="string" calcext:value-type="string">
            <text:p>unfoldingWord-dev/Autographa</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office:value-type="string" calcext:value-type="string">
            <text:p>unfoldingWord/baruch</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office:value-type="string" calcext:value-type="string">
            <text:p>unfoldingWord-box3/beta-bibel-demo</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office:value-type="string" calcext:value-type="string">
            <text:p>unfoldingWord-box3/bible-preview-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office:value-type="string" calcext:value-type="string">
            <text:p>unfoldingWord-box3/book-package-viewer-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47:17Z</text:p>
          </table:table-cell>
          <table:table-cell office:value-type="string" calcext:value-type="string">
            <text:p>2026-06-10T12:47: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0T12:47:23Z</text:p>
          </table:table-cell>
          <table:table-cell office:value-type="string" calcext:value-type="string">
            <text:p>unfoldingWord/bp-assistan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58:52Z</text:p>
          </table:table-cell>
          <table:table-cell office:value-type="string" calcext:value-type="string">
            <text:p>2026-06-10T12:58:5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0T12:59:00Z</text:p>
          </table:table-cell>
          <table:table-cell office:value-type="string" calcext:value-type="string">
            <text:p>unfoldingWord/bp-assistant-skill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brows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Checking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CheckingTool</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startChecking</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office:value-type="string" calcext:value-type="string">
            <text:p>unfoldingWord-dev/checkingRubric_tool</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office:value-type="string" calcext:value-type="string">
            <text:p>unfoldingWord-box3/codex-sb-handl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office:value-type="string" calcext:value-type="string">
            <text:p>unfoldingWord-dev/comment_box</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9</text:p>
          </table:table-cell>
          <table:table-cell office:value-type="string" calcext:value-type="string">
            <text:p>https://github.com/unfoldingWord/dbbackupr2</text:p>
          </table:table-cell>
          <table:table-cell office:value-type="string" calcext:value-type="string">
            <text:p>2025-11-27T12:19:25Z</text:p>
          </table:table-cell>
          <table:table-cell office:value-type="string" calcext:value-type="string">
            <text:p>unfoldingWord/dbbackupr2</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office:value-type="string" calcext:value-type="string">
            <text:p>unfoldingWord-box3/desktop-app-liminal</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office:value-type="string" calcext:value-type="string">
            <text:p>unfoldingWord/fia-mc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office:value-type="string" calcext:value-type="string">
            <text:p>unfoldingWord/fred-zulip-bot-work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office:value-type="string" calcext:value-type="string">
            <text:p>unfoldingWord-box3/gitea-offline-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office:value-type="string" calcext:value-type="string">
            <text:p>unfoldingWord-box3/gutenberg-projec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6-06-04T15:11:14Z</text:p>
          </table:table-cell>
          <table:table-cell office:value-type="string" calcext:value-type="string">
            <text:p>unfoldingWord/keybase_git_backup</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office:value-type="string" calcext:value-type="string">
            <text:p>unfoldingWord-box3/lang-as-graph</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office:value-type="string" calcext:value-type="string">
            <text:p>unfoldingWord-box3/md-convert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office:value-type="string" calcext:value-type="string">
            <text:p>unfoldingWord-box3/next-js-templa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office:value-type="string" calcext:value-type="string">
            <text:p>unfoldingWord/node-cli-add-gl-quotes-to-tsv-file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office:value-type="string" calcext:value-type="string">
            <text:p>unfoldingWord-box3/obs-audio-navigation</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office:value-type="string" calcext:value-type="string">
            <text:p>unfoldingWord-box3/obs-pdf-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office:value-type="string" calcext:value-type="string">
            <text:p>unfoldingWord-dev/obsidian-uw-rc-link-open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office:value-type="string" calcext:value-type="string">
            <text:p>unfoldingWord/oce-oak-edi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office:value-type="string" calcext:value-type="string">
            <text:p>unfoldingWord/oce-oak-ren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cell office:value-type="string" calcext:value-type="string">
            <text:p>unfoldingWord-dev/old-tx-manager-lambda</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office:value-type="string" calcext:value-type="string">
            <text:p>unfoldingWord/open-language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office:value-type="string" calcext:value-type="string">
            <text:p>unfoldingWord-box3/passage-record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office:value-type="string" calcext:value-type="string">
            <text:p>unfoldingWord-box3/pdf-generat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office:value-type="string" calcext:value-type="string">
            <text:p>unfoldingWord-box3/RecordVoic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office:value-type="string" calcext:value-type="string">
            <text:p>unfoldingWord-box3/sample-react-component-librar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office:value-type="string" calcext:value-type="string">
            <text:p>unfoldingWord-box3/simple-text-edito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office:value-type="string" calcext:value-type="string">
            <text:p>unfoldingWord-dev/t_pan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che-adapter-indexedd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che-adapter-memor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che-adapter-sqli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linked-panel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mobil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navigation</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buil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builder-engin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cor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sta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we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workflow</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storag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ssage-set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ssage-sets-cli</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hared</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tudy-stor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oc-generator-cli</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academy-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note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question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words-link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word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ui-control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usfm-process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ible-we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linked-panels-spik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tc-stud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toc-generator-we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cell office:value-type="string" calcext:value-type="string">
            <text:p>unfoldingWord/tc-tsv-convert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cell office:value-type="string" calcext:value-type="string">
            <text:p>unfoldingWord/td-legacy</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brows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electron-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empt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office:value-type="string" calcext:value-type="string">
            <text:p>unfoldingWord-dev/toolTempla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office:value-type="string" calcext:value-type="string">
            <text:p>unfoldingWord-box3/tq-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office:value-type="string" calcext:value-type="string">
            <text:p>unfoldingWord-box3/translate-markdown-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office:value-type="string" calcext:value-type="string">
            <text:p>unfoldingWord-box3/translation-help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office:value-type="string" calcext:value-type="string">
            <text:p>unfoldingWord-box3/translation-manager-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office:value-type="string" calcext:value-type="string">
            <text:p>unfoldingWord-box3/translation-proces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cell office:value-type="string" calcext:value-type="string">
            <text:p>unfoldingWord/translationNote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cell office:value-type="string" calcext:value-type="string">
            <text:p>unfoldingWord/translationWord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office:value-type="string" calcext:value-type="string">
            <text:p>unfoldingWord-box3/tsv-edit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20:04:13Z</text:p>
          </table:table-cell>
          <table:table-cell office:value-type="string" calcext:value-type="string">
            <text:p>2026-06-05T20:04:1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05T20:04:17Z</text:p>
          </table:table-cell>
          <table:table-cell office:value-type="string" calcext:value-type="string">
            <text:p>unfoldingWord/tsv-twl-creation-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office:value-type="string" calcext:value-type="string">
            <text:p>unfoldingWord/tsv7-tn-cleanup-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cell office:value-type="string" calcext:value-type="string">
            <text:p>unfoldingWord/unfoldingWord</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office:value-type="string" calcext:value-type="string">
            <text:p>unfoldingWord/usfm-js-wrapp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office:value-type="string" calcext:value-type="string">
            <text:p>unfoldingWord-box3/uw-metadata-react-component-librar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office:value-type="string" calcext:value-type="string">
            <text:p>unfoldingWord/uw-pdf-preview</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cell office:value-type="string" calcext:value-type="string">
            <text:p>unfoldingWord-box3/word-aligner-extension</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cell office:value-type="string" calcext:value-type="string">
            <text:p>unfoldingWord/wordAlignmen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cell office:value-type="string" calcext:value-type="string">
            <text:p>unfoldingWord-box3/wordMAP-m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office:value-type="string" calcext:value-type="string">
            <text:p>unfoldingWord/wordMAP-usfm</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office:value-type="string" calcext:value-type="string">
            <text:p>unfoldingWord-box3/admin-app-old</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cell office:value-type="string" calcext:value-type="string">
            <text:p>unfoldingWord-box3/alignment-ml</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office:value-type="string" calcext:value-type="string">
            <text:p>unfoldingWord-box3/alignment-playground</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cell office:value-type="string" calcext:value-type="string">
            <text:p>unfoldingWord-dev/alignment-transfer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cell office:value-type="string" calcext:value-type="string">
            <text:p>unfoldingWord-box3/bible-ref-pk-demo</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office:value-type="string" calcext:value-type="string">
            <text:p>unfoldingWord-dev/Bootstrap43</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3T18:25:41Z</text:p>
          </table:table-cell>
          <table:table-cell office:value-type="string" calcext:value-type="string">
            <text:p>2026-06-03T18:25:3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03T18:25:59Z</text:p>
          </table:table-cell>
          <table:table-cell office:value-type="string" calcext:value-type="string">
            <text:p>unfoldingWord/bt-servant-telegram-gatewa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cell office:value-type="string" calcext:value-type="string">
            <text:p>unfoldingWord-box3/checking-extens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8</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office:value-type="string" calcext:value-type="string">
            <text:p>unfoldingWord/checking-tool-rcl</text:p>
          </table:table-cell>
          <table:table-cell office:value-type="string" calcext:value-type="string">
            <text:p>Keep - externally used</text:p>
          </table:table-cell>
          <table:table-cell office:value-type="string" calcext:value-type="string">
            <text:p>Repository has GitHub dependents or at least 1,000 npm downloads in the last year (58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898 downloads in the last year).</text:p>
          </table:table-cell>
          <table:table-cell table:number-columns-repeated="16357"/>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cell office:value-type="string" calcext:value-type="string">
            <text:p>unfoldingWord-dev/concourse-pipelin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cell office:value-type="string" calcext:value-type="string">
            <text:p>unfoldingWord-dev/dcs-migrate-org-repo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79</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office:value-type="string" calcext:value-type="string">
            <text:p>unfoldingWord/dcs-react-hooks</text:p>
          </table:table-cell>
          <table:table-cell office:value-type="string" calcext:value-type="string">
            <text:p>Keep - externally used</text:p>
          </table:table-cell>
          <table:table-cell office:value-type="string" calcext:value-type="string">
            <text:p>Repository has GitHub dependents or at least 1,000 npm downloads in the last year (17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9 downloads in the last year).</text:p>
          </table:table-cell>
          <table:table-cell table:number-columns-repeated="16357"/>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cell office:value-type="string" calcext:value-type="string">
            <text:p>unfoldingWord-box3/desktop-app-templa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cell office:value-type="string" calcext:value-type="string">
            <text:p>unfoldingWord-dev/dokuwiki-plugin-translat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cell office:value-type="string" calcext:value-type="string">
            <text:p>unfoldingWord-dev/Dokuwiki-USFMTag</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cell office:value-type="string" calcext:value-type="string">
            <text:p>unfoldingWord/door43-enqueue-jo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cell office:value-type="string" calcext:value-type="string">
            <text:p>unfoldingWord/door43-enqueue-job-tes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cell office:value-type="string" calcext:value-type="string">
            <text:p>unfoldingWord/door43-librar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office:value-type="string" calcext:value-type="string">
            <text:p>unfoldingWord/door43-preview-serv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cell office:value-type="string" calcext:value-type="string">
            <text:p>unfoldingWord-dev/door43-project-page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2">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cell office:value-type="string" calcext:value-type="string">
            <text:p>unfoldingWord-box3/electr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2">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976</text:p>
          </table:table-cell>
          <table:table-cell office:value-type="string" calcext:value-type="string">
            <text:p>https://github.com/unfoldingWord/electronite</text:p>
          </table:table-cell>
          <table:table-cell office:value-type="string" calcext:value-type="string">
            <text:p>2026-02-15T19:31:44Z</text:p>
          </table:table-cell>
          <table:table-cell office:value-type="string" calcext:value-type="string">
            <text:p>unfoldingWord/electroni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3">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cell office:value-type="string" calcext:value-type="string">
            <text:p>unfoldingWord-dev/electronite-build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cell office:value-type="string" calcext:value-type="string">
            <text:p>unfoldingWord/electronite-forg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office:value-type="string" calcext:value-type="string">
            <text:p>unfoldingWord-dev/electronite-packag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office:value-type="string" calcext:value-type="string">
            <text:p>unfoldingWord-dev/etherpad-li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mui</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perf</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reac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tex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cell office:value-type="string" calcext:value-type="string">
            <text:p>unfoldingWord-dev/flask-github-webhook</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cell office:value-type="string" calcext:value-type="string">
            <text:p>unfoldingWord-dev/go-gogs-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cell office:value-type="string" calcext:value-type="string">
            <text:p>unfoldingWord/go-rc2s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cell office:value-type="string" calcext:value-type="string">
            <text:p>unfoldingWord-dev/hackathon-zpp</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office:value-type="string" calcext:value-type="string">
            <text:p>unfoldingWord-dev/HebrewLexic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cell office:value-type="string" calcext:value-type="string">
            <text:p>unfoldingWord-dev/Mobile-JWiki</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office:value-type="string" calcext:value-type="string">
            <text:p>unfoldingWord-dev/node-door43-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1556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4</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office:value-type="string" calcext:value-type="string">
            <text:p>unfoldingWord-dev/node-door43-rc</text:p>
          </table:table-cell>
          <table:table-cell office:value-type="string" calcext:value-type="string">
            <text:p>Keep - externally used</text:p>
          </table:table-cell>
          <table:table-cell office:value-type="string" calcext:value-type="string">
            <text:p>Repository has GitHub dependents or at least 1,000 npm downloads in the last year (1504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number-columns-repeated="16357"/>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cell office:value-type="string" calcext:value-type="string">
            <text:p>unfoldingWord-dev/nototool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office:value-type="string" calcext:value-type="string">
            <text:p>unfoldingWord-dev/OBS-Mobil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office:value-type="string" calcext:value-type="string">
            <text:p>unfoldingWord-box3/obs-stud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office:value-type="string" calcext:value-type="string">
            <text:p>unfoldingWord/ob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2</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base</text:p>
          </table:table-cell>
          <table:table-cell office:value-type="string" calcext:value-type="string">
            <text:p>Keep - externally used</text:p>
          </table:table-cell>
          <table:table-cell office:value-type="string" calcext:value-type="string">
            <text:p>Repository has GitHub dependents or at least 1,000 npm downloads in the last year (185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52 downloads in the last year).</text:p>
          </table:table-cell>
          <table:table-cell table:number-columns-repeated="16357"/>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base-cor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5</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joy-core</text:p>
          </table:table-cell>
          <table:table-cell office:value-type="string" calcext:value-type="string">
            <text:p>Keep - externally used</text:p>
          </table:table-cell>
          <table:table-cell office:value-type="string" calcext:value-type="string">
            <text:p>Repository has GitHub dependents or at least 1,000 npm downloads in the last year (40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5 downloads in the last year).</text:p>
          </table:table-cell>
          <table:table-cell table:number-columns-repeated="16357"/>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29</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joy-pk</text:p>
          </table:table-cell>
          <table:table-cell office:value-type="string" calcext:value-type="string">
            <text:p>Keep - externally used</text:p>
          </table:table-cell>
          <table:table-cell office:value-type="string" calcext:value-type="string">
            <text:p>Repository has GitHub dependents or at least 1,000 npm downloads in the last year (12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9 downloads in the last year).</text:p>
          </table:table-cell>
          <table:table-cell table:number-columns-repeated="16357"/>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joy-verse-navigato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1</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core</text:p>
          </table:table-cell>
          <table:table-cell office:value-type="string" calcext:value-type="string">
            <text:p>Keep - externally used</text:p>
          </table:table-cell>
          <table:table-cell office:value-type="string" calcext:value-type="string">
            <text:p>Repository has GitHub dependents or at least 1,000 npm downloads in the last year (64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1 downloads in the last year).</text:p>
          </table:table-cell>
          <table:table-cell table:number-columns-repeated="16357"/>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5</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pk</text:p>
          </table:table-cell>
          <table:table-cell office:value-type="string" calcext:value-type="string">
            <text:p>Keep - externally used</text:p>
          </table:table-cell>
          <table:table-cell office:value-type="string" calcext:value-type="string">
            <text:p>Repository has GitHub dependents or at least 1,000 npm downloads in the last year (33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5 downloads in the last year).</text:p>
          </table:table-cell>
          <table:table-cell table:number-columns-repeated="16357"/>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simple</text:p>
          </table:table-cell>
          <table:table-cell office:value-type="string" calcext:value-type="string">
            <text:p>Keep - externally used</text:p>
          </table:table-cell>
          <table:table-cell office:value-type="string" calcext:value-type="string">
            <text:p>Repository has GitHub dependents or at least 1,000 npm downloads in the last year (3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71 downloads in the last year).</text:p>
          </table:table-cell>
          <table:table-cell table:number-columns-repeated="16357"/>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verse-navigato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pk-align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verse-mapper</text:p>
          </table:table-cell>
          <table:table-cell office:value-type="string" calcext:value-type="string">
            <text:p>Keep - externally used</text:p>
          </table:table-cell>
          <table:table-cell office:value-type="string" calcext:value-type="string">
            <text:p>Repository has GitHub dependents or at least 1,000 npm downloads in the last year (9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96 downloads in the last year).</text:p>
          </table:table-cell>
          <table:table-cell table:number-columns-repeated="16357"/>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office:value-type="string" calcext:value-type="string">
            <text:p>unfoldingWord/open-components-hackathon-websi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cell office:value-type="string" calcext:value-type="string">
            <text:p>unfoldingWord-dev/pagequer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cell office:value-type="string" calcext:value-type="string">
            <text:p>unfoldingWord-box3/pankosmia-we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cell office:value-type="string" calcext:value-type="string">
            <text:p>unfoldingWord/proskomma-react-hook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cell office:value-type="string" calcext:value-type="string">
            <text:p>unfoldingWord-dev/proskomma-render-preview</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cell office:value-type="string" calcext:value-type="string">
            <text:p>unfoldingWord/python-dcs-api-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cell office:value-type="string" calcext:value-type="string">
            <text:p>unfoldingWord/python-dcs-catalog-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office:value-type="string" calcext:value-type="string">
            <text:p>unfoldingWord-box3/react-library-start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office:value-type="string" calcext:value-type="string">
            <text:p>unfoldingWord-box3/react-to-electron-act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office:value-type="string" calcext:value-type="string">
            <text:p>unfoldingWord-dev/ResourceCheck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cell office:value-type="string" calcext:value-type="string">
            <text:p>unfoldingWord-box3/StableTTS_Editing</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cell office:value-type="string" calcext:value-type="string">
            <text:p>unfoldingWord-box3/suggesting-word-align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office:value-type="string" calcext:value-type="string">
            <text:p>unfoldingWord/t-core-submodule-updat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office:value-type="string" calcext:value-type="string">
            <text:p>unfoldingWord-box3/tac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office:value-type="string" calcext:value-type="string">
            <text:p>unfoldingWord-box3/tc-create-poc</text:p>
          </table:table-cell>
          <table:table-cell office:value-type="string" calcext:value-type="string">
            <text:p>Keep - externally used</text:p>
          </table:table-cell>
          <table:table-cell office:value-type="string" calcext:value-type="string">
            <text:p>Repository has GitHub dependents or at least 1,000 npm downloads in the last year (7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4 downloads in the last year).</text:p>
          </table:table-cell>
          <table:table-cell table:number-columns-repeated="16357"/>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cell office:value-type="string" calcext:value-type="string">
            <text:p>unfoldingWord/tc-electron-env</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6T05:40:18Z</text:p>
          </table:table-cell>
          <table:table-cell office:value-type="string" calcext:value-type="string">
            <text:p>2026-05-05T16:33:43Z</text:p>
          </table:table-cell>
          <table:table-cell office:value-type="string" calcext:value-type="string">
            <text:p/>
          </table:table-cell>
          <table:table-cell office:value-type="string" calcext:value-type="string">
            <text:p>9</text:p>
          </table:table-cell>
          <table:table-cell office:value-type="string" calcext:value-type="string">
            <text:p>1</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cell office:value-type="string" calcext:value-type="string">
            <text:p>unfoldingWord/translation-helps-mcp</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office:value-type="string" calcext:value-type="string">
            <text:p>unfoldingWord-box3/translation-notes-extens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cell office:value-type="string" calcext:value-type="string">
            <text:p>unfoldingWord-box3/translation-projec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cell office:value-type="string" calcext:value-type="string">
            <text:p>unfoldingWord-dev/USFM-Tool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cell office:value-type="string" calcext:value-type="string">
            <text:p>unfoldingWord-box3/uw-codex-edito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163</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office:value-type="string" calcext:value-type="string">
            <text:p>unfoldingWord/uw-editor</text:p>
          </table:table-cell>
          <table:table-cell office:value-type="string" calcext:value-type="string">
            <text:p>Keep - externally used</text:p>
          </table:table-cell>
          <table:table-cell office:value-type="string" calcext:value-type="string">
            <text:p>Repository has GitHub dependents or at least 1,000 npm downloads in the last year (1163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number-columns-repeated="16357"/>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office:value-type="string" calcext:value-type="string">
            <text:p>unfoldingWord-dev/uw-we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office:value-type="string" calcext:value-type="string">
            <text:p>unfoldingWord-box3/VscOceUsfmEdi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cell office:value-type="string" calcext:value-type="string">
            <text:p>unfoldingWord-box3/vscode-speech-to-tex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office:value-type="string" calcext:value-type="string">
            <text:p>unfoldingWord-box3/VscUsfmEditAlig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cell office:value-type="string" calcext:value-type="string">
            <text:p>unfoldingWord-dev/webhook-rela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office:value-type="string" calcext:value-type="string">
            <text:p>unfoldingWord-box3/alignment-edito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574</text:p>
          </table:table-cell>
          <table:table-cell office:value-type="string" calcext:value-type="string">
            <text:p>2023-12-07T19:15:35.590Z</text:p>
          </table:table-cell>
          <table:table-cell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office:value-type="string" calcext:value-type="string">
            <text:p>unfoldingWord/bible-reference-range</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6574 downloads in the last year).</text:p>
          </table:table-cell>
          <table:table-cell table:number-columns-repeated="16357"/>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2</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office:value-type="string" calcext:value-type="string">
            <text:p>unfoldingWord/bible-referenc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142 downloads in the last year).</text:p>
          </table:table-cell>
          <table:table-cell table:number-columns-repeated="16357"/>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office:value-type="string" calcext:value-type="string">
            <text:p>unfoldingWord/book-packag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255 downloads in the last year).</text:p>
          </table:table-cell>
          <table:table-cell table:number-columns-repeated="16357"/>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office:value-type="string" calcext:value-type="string">
            <text:p>unfoldingWord/checking-tool-wrapp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office:value-type="string" calcext:value-type="string">
            <text:p>unfoldingWord/datatable-translatable</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397 downloads in the last year).</text:p>
          </table:table-cell>
          <table:table-cell table:number-columns-repeated="16357"/>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4</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office:value-type="string" calcext:value-type="string">
            <text:p>unfoldingWord/dcs-branch-merg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614 downloads in the last year).</text:p>
          </table:table-cell>
          <table:table-cell table:number-columns-repeated="16357"/>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607</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office:value-type="string" calcext:value-type="string">
            <text:p>unfoldingWord/dcs-j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607 downloads in the last year).</text:p>
          </table:table-cell>
          <table:table-cell table:number-columns-repeated="16357"/>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60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office:value-type="string" calcext:value-type="string">
            <text:p>unfoldingWord-dev/electronite-cli</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2</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cell office:value-type="string" calcext:value-type="string">
            <text:p>unfoldingWord/enhanced-word-aligne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4652 downloads in the last year).</text:p>
          </table:table-cell>
          <table:table-cell table:number-columns-repeated="16357"/>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9613</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office:value-type="string" calcext:value-type="string">
            <text:p>unfoldingWord/epitelete-htm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9613 downloads in the last year).</text:p>
          </table:table-cell>
          <table:table-cell table:number-columns-repeated="16357"/>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office:value-type="string" calcext:value-type="string">
            <text:p>unfoldingWord/eslint-config</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6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office:value-type="string" calcext:value-type="string">
            <text:p>unfoldingWord/gitea-react-toolki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7468 downloads in the last year).</text:p>
          </table:table-cell>
          <table:table-cell table:number-columns-repeated="16357"/>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50</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office:value-type="string" calcext:value-type="string">
            <text:p>unfoldingWord/markdown-translatable</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8050 downloads in the last year).</text:p>
          </table:table-cell>
          <table:table-cell table:number-columns-repeated="16357"/>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26</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office:value-type="string" calcext:value-type="string">
            <text:p>unfoldingWord-dev/node-gogs-clien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07</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office:value-type="string" calcext:value-type="string">
            <text:p>unfoldingWord-dev/node-resource-contain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107 downloads in the last year).</text:p>
          </table:table-cell>
          <table:table-cell table:number-columns-repeated="16357"/>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53:21Z</text:p>
          </table:table-cell>
          <table:table-cell office:value-type="string" calcext:value-type="string">
            <text:p>2026-06-05T07:53: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434</text:p>
          </table:table-cell>
          <table:table-cell office:value-type="string" calcext:value-type="string">
            <text:p>2026-06-05T07:54:21.337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05T07:53:25Z</text:p>
          </table:table-cell>
          <table:table-cell office:value-type="string" calcext:value-type="string">
            <text:p>unfoldingWord/node-twl-generato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434 downloads in the last year).</text:p>
          </table:table-cell>
          <table:table-cell table:number-columns-repeated="16357"/>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783</text:p>
          </table:table-cell>
          <table:table-cell office:value-type="string" calcext:value-type="string">
            <text:p>2023-06-13T13:51:03.803Z</text:p>
          </table:table-cell>
          <table:table-cell office:value-type="string" calcext:value-type="string">
            <text:p>['next-js-template', 'gateway-edit', 'admin-app', 'create-app', 'gateway-admin', 'bsa',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office:value-type="string" calcext:value-type="string">
            <text:p>unfoldingWord/resource-workspac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783 downloads in the last year).</text:p>
          </table:table-cell>
          <table:table-cell table:number-columns-repeated="16357"/>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217</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office:value-type="string" calcext:value-type="string">
            <text:p>unfoldingWord/scripture-resources-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5217 downloads in the last year).</text:p>
          </table:table-cell>
          <table:table-cell table:number-columns-repeated="16357"/>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648</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office:value-type="string" calcext:value-type="string">
            <text:p>unfoldingWord/scripture-tsv</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648 downloads in the last year).</text:p>
          </table:table-cell>
          <table:table-cell table:number-columns-repeated="16357"/>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office:value-type="string" calcext:value-type="string">
            <text:p>unfoldingWord/selection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96</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office:value-type="string" calcext:value-type="string">
            <text:p>unfoldingWord-box3/simple-text-edito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896 downloads in the last year).</text:p>
          </table:table-cell>
          <table:table-cell table:number-columns-repeated="16357"/>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56</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office:value-type="string" calcext:value-type="string">
            <text:p>unfoldingWord/single-scriptur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9756 downloads in the last year).</text:p>
          </table:table-cell>
          <table:table-cell table:number-columns-repeated="16357"/>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7848</text:p>
          </table:table-cell>
          <table:table-cell office:value-type="string" calcext:value-type="string">
            <text:p>2021-08-25T21:55:46.406Z</text:p>
          </table:table-cell>
          <table:table-cell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cell office:value-type="string" calcext:value-type="string">
            <text:p>unfoldingWord/string-punctuation-tokeniz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47</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office:value-type="string" calcext:value-type="string">
            <text:p>unfoldingWord/tc-source-content-updat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7747 downloads in the last year).</text:p>
          </table:table-cell>
          <table:table-cell table:number-columns-repeated="16357"/>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office:value-type="string" calcext:value-type="string">
            <text:p>unfoldingWord/tc-string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translationNotes', 'translationWords', 'wordAlignment',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office:value-type="string" calcext:value-type="string">
            <text:p>unfoldingWord/tc-too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95</text:p>
          </table:table-cell>
          <table:table-cell office:value-type="string" calcext:value-type="string">
            <text:p>2024-12-31T18:53:34.752Z</text:p>
          </table:table-cell>
          <table:table-cell office:value-type="string" calcext:value-type="string">
            <text:p>['alignment-playground', 'next-js-template', 'gateway-edit', 'translationCore', 'wordAlignment', 'gateway-admin', 'tc-create-app', 'single-scripture-rcl', 'translation-helps-rcl', 'scripture-resources-rcl', 'bsa',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office:value-type="string" calcext:value-type="string">
            <text:p>unfoldingWord/tc-ui-toolki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9495 downloads in the last year).</text:p>
          </table:table-cell>
          <table:table-cell table:number-columns-repeated="16357"/>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4995</text:p>
          </table:table-cell>
          <table:table-cell office:value-type="string" calcext:value-type="string">
            <text:p>2026-03-27T22:01:47.002Z</text:p>
          </table:table-cell>
          <table:table-cell office:value-type="string" calcext:value-type="string">
            <text:p>['next-js-template', 'gateway-edit', 'admin-app', 'create-app', 'gateway-admin', 'single-scripture-rcl', 'bsa',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office:value-type="string" calcext:value-type="string">
            <text:p>unfoldingWord/translation-helps-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4995 downloads in the last year).</text:p>
          </table:table-cell>
          <table:table-cell table:number-columns-repeated="16357"/>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398</text:p>
          </table:table-cell>
          <table:table-cell office:value-type="string" calcext:value-type="string">
            <text:p>2024-10-16T17:43:33.516Z</text:p>
          </table:table-cell>
          <table:table-cell office:value-type="string" calcext:value-type="string">
            <text:p>['checking-extension', 'pdf-generator', 'translationCore', 'uw-quote-helpers',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office:value-type="string" calcext:value-type="string">
            <text:p>unfoldingWord/tsv-groupdata-pars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6398 downloads in the last year).</text:p>
          </table:table-cell>
          <table:table-cell table:number-columns-repeated="16357"/>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47:31Z</text:p>
          </table:table-cell>
          <table:table-cell office:value-type="string" calcext:value-type="string">
            <text:p>2026-06-05T07:47: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05T07:47:35Z</text:p>
          </table:table-cell>
          <table:table-cell office:value-type="string" calcext:value-type="string">
            <text:p>unfoldingWord/tsv-quote-converter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office:value-type="string" calcext:value-type="string">
            <text:p>unfoldingWord/usfm-alignment-remover-app</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cell office:value-type="string" calcext:value-type="string">
            <text:p>unfoldingWord/usfm-j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52</text:p>
          </table:table-cell>
          <table:table-cell office:value-type="string" calcext:value-type="string">
            <text:p>2026-06-07T09:30:48.45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cell office:value-type="string" calcext:value-type="string">
            <text:p>unfoldingWord/uw-content-validation</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052 downloads in the last year).</text:p>
          </table:table-cell>
          <table:table-cell table:number-columns-repeated="16357"/>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1201</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cell office:value-type="string" calcext:value-type="string">
            <text:p>unfoldingWord/uw-languages-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201 downloads in the last year).</text:p>
          </table:table-cell>
          <table:table-cell table:number-columns-repeated="16357"/>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345</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office:value-type="string" calcext:value-type="string">
            <text:p>unfoldingWord-box3/uw-proskomma</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345 downloads in the last year).</text:p>
          </table:table-cell>
          <table:table-cell table:number-columns-repeated="16357"/>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office:value-type="string" calcext:value-type="string">
            <text:p>unfoldingWord/uw-quote-helper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135 downloads in the last year).</text:p>
          </table:table-cell>
          <table:table-cell table:number-columns-repeated="16357"/>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office:value-type="string" calcext:value-type="string">
            <text:p>unfoldingWord/uw-scripture-pars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4593</text:p>
          </table:table-cell>
          <table:table-cell office:value-type="string" calcext:value-type="string">
            <text:p>2022-02-02T14:06:17.344Z</text:p>
          </table:table-cell>
          <table:table-cell office:value-type="string" calcext:value-type="string">
            <text:p>['checking-extension', 'gateway-admin', 'tc-create-app', 'word-aligner-rcl', 'tsv-groupdata-parser', 'checking-tool-rcl']</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office:value-type="string" calcext:value-type="string">
            <text:p>unfoldingWord/uw-tsv-pars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593 downloads in the last year).</text:p>
          </table:table-cell>
          <table:table-cell table:number-columns-repeated="16357"/>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45</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office:value-type="string" calcext:value-type="string">
            <text:p>unfoldingWord/uw-word-coun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45 downloads in the last year).</text:p>
          </table:table-cell>
          <table:table-cell table:number-columns-repeated="16357"/>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4656</text:p>
          </table:table-cell>
          <table:table-cell office:value-type="string" calcext:value-type="string">
            <text:p>2026-05-24T21:22:13.663Z</text:p>
          </table:table-cell>
          <table:table-cell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cell office:value-type="string" calcext:value-type="string">
            <text:p>unfoldingWord/word-align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4656 downloads in the last year).</text:p>
          </table:table-cell>
          <table:table-cell table:number-columns-repeated="16357"/>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730</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cell office:value-type="string" calcext:value-type="string">
            <text:p>unfoldingWord/word-aligner-lib</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730 downloads in the last year).</text:p>
          </table:table-cell>
          <table:table-cell table:number-columns-repeated="16357"/>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07</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word-aligner', '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cell office:value-type="string" calcext:value-type="string">
            <text:p>unfoldingWord/word-aligne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6507 downloads in the last year).</text:p>
          </table:table-cell>
          <table:table-cell table:number-columns-repeated="16357"/>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translationCore', 'wordAlignment', 'word-aligner-rcl', 'uw-wordmapbooster']</text:p>
          </table:table-cell>
          <table:table-cell office:value-type="string" calcext:value-type="string">
            <text:p>wordmap-lexer</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office:value-type="string" calcext:value-type="string">
            <text:p>unfoldingWord/wordMAP</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translationCore', 'wordAlignment', 'string-punctuation-tokenizer', 'word-aligner-rcl', 'word-aligner-lib', 'uw-wordmapbooster', 'checking-tool-rcl', 'wordmap', 'wordmap-usfm']</text:p>
          </table:table-cell>
          <table:table-cell office:value-type="string" calcext:value-type="string">
            <text:p>string-punctuation-tokenizer</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office:value-type="string" calcext:value-type="string">
            <text:p>unfoldingWord/wordMAP-lex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office:value-type="string" calcext:value-type="string">
            <text:p>unfoldingWord/wordmapboost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cell office:value-type="string" calcext:value-type="string">
            <text:p>unfoldingWord-dev/android-door43-client</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cell office:value-type="string" calcext:value-type="string">
            <text:p>unfoldingWord-dev/android-resource-contain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cell office:value-type="string" calcext:value-type="string">
            <text:p>unfoldingWord-box3/aquifer-to-d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cell office:value-type="string" calcext:value-type="string">
            <text:p>unfoldingWord/bt-servant-admin-porta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cell office:value-type="string" calcext:value-type="string">
            <text:p>unfoldingWord/bt-servant-engine</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cell office:value-type="string" calcext:value-type="string">
            <text:p>unfoldingWord/bt-servant-engine-data-loader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cell office:value-type="string" calcext:value-type="string">
            <text:p>unfoldingWord/bt-servant-kb-work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cell office:value-type="string" calcext:value-type="string">
            <text:p>unfoldingWord/bt-servant-log-view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cell office:value-type="string" calcext:value-type="string">
            <text:p>unfoldingWord/bt-servant-message-brok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cell office:value-type="string" calcext:value-type="string">
            <text:p>unfoldingWord/bt-servant-report-send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16T19:38:38Z</text:p>
          </table:table-cell>
          <table:table-cell office:value-type="string" calcext:value-type="string">
            <text:p>unfoldingWord/bt-servant-site</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cell office:value-type="string" calcext:value-type="string">
            <text:p>unfoldingWord/bt-servant-telemetr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3T17:48:59Z</text:p>
          </table:table-cell>
          <table:table-cell office:value-type="string" calcext:value-type="string">
            <text:p>2026-06-13T17:48:58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3T17:49:02Z</text:p>
          </table:table-cell>
          <table:table-cell office:value-type="string" calcext:value-type="string">
            <text:p>unfoldingWord/bt-servant-web-clien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cell office:value-type="string" calcext:value-type="string">
            <text:p>unfoldingWord/bt-servant-whatsapp-gatewa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8:26:02Z</text:p>
          </table:table-cell>
          <table:table-cell office:value-type="string" calcext:value-type="string">
            <text:p>2026-05-28T15:55:55Z</text:p>
          </table:table-cell>
          <table:table-cell office:value-type="string" calcext:value-type="string">
            <text:p/>
          </table:table-cell>
          <table:table-cell office:value-type="string" calcext:value-type="string">
            <text:p>89</text:p>
          </table:table-cell>
          <table:table-cell office:value-type="string" calcext:value-type="string">
            <text:p>9</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28T15:56:00Z</text:p>
          </table:table-cell>
          <table:table-cell office:value-type="string" calcext:value-type="string">
            <text:p>unfoldingWord/bt-servant-work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office:value-type="string" calcext:value-type="string">
            <text:p>unfoldingWord/catalog-next-toolki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office:value-type="string" calcext:value-type="string">
            <text:p>unfoldingWord-box3/content-validation-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86 downloads in the last year) and no detected local consumers.</text:p>
          </table:table-cell>
          <table:table-cell table:number-columns-repeated="16357"/>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cell office:value-type="string" calcext:value-type="string">
            <text:p>unfoldingWord-dev/d43-catalog</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4">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4</text:p>
          </table:table-cell>
          <table:table-cell office:value-type="string" calcext:value-type="string">
            <text:p>1040</text:p>
          </table:table-cell>
          <table:table-cell office:value-type="string" calcext:value-type="string">
            <text:p>https://github.com/unfoldingWord/dcs</text:p>
          </table:table-cell>
          <table:table-cell office:value-type="string" calcext:value-type="string">
            <text:p>2026-04-19T02:36:49Z</text:p>
          </table:table-cell>
          <table:table-cell office:value-type="string" calcext:value-type="string">
            <text:p>unfoldingWord/d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cell office:value-type="string" calcext:value-type="string">
            <text:p>unfoldingWord-dev/dcs-api-merge-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cell office:value-type="string" calcext:value-type="string">
            <text:p>unfoldingWord-dev/dcs-api-resolve-conflicts-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cell office:value-type="string" calcext:value-type="string">
            <text:p>unfoldingWord/dcs-catalog-accordion-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office:value-type="string" calcext:value-type="string">
            <text:p>unfoldingWord-dev/dcs-dock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cell office:value-type="string" calcext:value-type="string">
            <text:p>unfoldingWord/dcs-do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office:value-type="string" calcext:value-type="string">
            <text:p>unfoldingWord-box3/dcs-file-version-diff-too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cell office:value-type="string" calcext:value-type="string">
            <text:p>unfoldingWord/dcs-home-page-old</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6-06-03T16:04:29Z</text:p>
          </table:table-cell>
          <table:table-cell office:value-type="string" calcext:value-type="string">
            <text:p>unfoldingWord/dcs-homepage</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cell office:value-type="string" calcext:value-type="string">
            <text:p>unfoldingWord/dcs-local</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office:value-type="string" calcext:value-type="string">
            <text:p>unfoldingWord-box3/dcs-login</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07</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dcs-j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607 downloads in the last year) and no detected local consumers.</text:p>
          </table:table-cell>
          <table:table-cell table:number-columns-repeated="16357"/>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dcs-js-exampl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dcs-t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vite-projec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cell office:value-type="string" calcext:value-type="string">
            <text:p>unfoldingWord-dev/dcs-profile-blank</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cell office:value-type="string" calcext:value-type="string">
            <text:p>unfoldingWord-dev/dcs-profile-unfoldingword</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office:value-type="string" calcext:value-type="string">
            <text:p>unfoldingWord-dev/dcs-profile-unfoldingword-mirrored</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cell office:value-type="string" calcext:value-type="string">
            <text:p>unfoldingWord/dcs-template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cell office:value-type="string" calcext:value-type="string">
            <text:p>unfoldingWord-box3/dcs-vanilla</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cell office:value-type="string" calcext:value-type="string">
            <text:p>unfoldingWord-dev/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cell office:value-type="string" calcext:value-type="string">
            <text:p>unfoldingWord-dev/door43-acceptance-test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cell office:value-type="string" calcext:value-type="string">
            <text:p>unfoldingWord/door43-catalog-job-handl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cell office:value-type="string" calcext:value-type="string">
            <text:p>unfoldingWord/door43-job-handl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cell office:value-type="string" calcext:value-type="string">
            <text:p>unfoldingWord/door43-preview-action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cell office:value-type="string" calcext:value-type="string">
            <text:p>unfoldingWord/door43-preview-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office:value-type="string" calcext:value-type="string">
            <text:p>unfoldingWord-box3/door43-preview-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office:value-type="string" calcext:value-type="string">
            <text:p>unfoldingWord/door43-preview-renderer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office:value-type="string" calcext:value-type="string">
            <text:p>unfoldingWord/door43.org</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cell office:value-type="string" calcext:value-type="string">
            <text:p>unfoldingWord/gateway-admin</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cell office:value-type="string" calcext:value-type="string">
            <text:p>unfoldingWord/gateway-edi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office:value-type="string" calcext:value-type="string">
            <text:p>unfoldingWord-box3/gateway-edit-POC</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office:value-type="string" calcext:value-type="string">
            <text:p>unfoldingWord/gateway-translat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office:value-type="string" calcext:value-type="string">
            <text:p>unfoldingWord-box3/graphql-catalog-next</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office:value-type="string" calcext:value-type="string">
            <text:p>unfoldingWord-box3/hello-dcs-react-component-librar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cell office:value-type="string" calcext:value-type="string">
            <text:p>unfoldingWord/Katalon-gatewayEdit-Elsy</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cell office:value-type="string" calcext:value-type="string">
            <text:p>unfoldingWord/Katalon-gatewayEdit-Ko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office:value-type="string" calcext:value-type="string">
            <text:p>unfoldingWord-dev/node-dcs-api-clien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office:value-type="string" calcext:value-type="string">
            <text:p>unfoldingWord/obs-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cell office:value-type="string" calcext:value-type="string">
            <text:p>unfoldingWord-dev/obs-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cell office:value-type="string" calcext:value-type="string">
            <text:p>unfoldingWord-box3/org-language-resource-hook</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office:value-type="string" calcext:value-type="string">
            <text:p>unfoldingWord-box3/proskomma-scripture-resources-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cell office:value-type="string" calcext:value-type="string">
            <text:p>unfoldingWord-dev/python-resource-contain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cell office:value-type="string" calcext:value-type="string">
            <text:p>unfoldingWord-dev/Resource-Contain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office:value-type="string" calcext:value-type="string">
            <text:p>unfoldingWord-box3/resource-container-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office:value-type="string" calcext:value-type="string">
            <text:p>unfoldingWord-box3/scripture-as-graph</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cell office:value-type="string" calcext:value-type="string">
            <text:p>unfoldingWord-dev/ScripturePan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create-2-poc</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create-2-poc</text:p>
          </table:table-cell>
          <table:table-cell office:value-type="string" calcext:value-type="string">
            <text:p>2020-12-17T16:24:38Z</text:p>
          </table:table-cell>
          <table:table-cell office:value-type="string" calcext:value-type="string">
            <text:p>unfoldingWord/tc-create-2-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cell office:value-type="string" calcext:value-type="string">
            <text:p>unfoldingWord/tc-create-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74 downloads in the last year) and no detected local consumers.</text:p>
          </table:table-cell>
          <table:table-cell table:number-columns-repeated="16357"/>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adapter-indexeddb</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adapter-memor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adapter-sqlit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cli</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manag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door43-api</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action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adapter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bundl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cach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catalog</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cli</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package-build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panel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parser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selection</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signal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type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cripture-load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unified-catalog-stor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toolkit/resource-download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resource-panels-spik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office:value-type="string" calcext:value-type="string">
            <text:p>unfoldingWord-dev/tC_Resource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cell office:value-type="string" calcext:value-type="string">
            <text:p>unfoldingWord-dev/tn_add_scripture_link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cell office:value-type="string" calcext:value-type="string">
            <text:p>unfoldingWord/translationCor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office:value-type="string" calcext:value-type="string">
            <text:p>unfoldingWord-dev/translationCore-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cell office:value-type="string" calcext:value-type="string">
            <text:p>unfoldingWord-dev/ts-android</text:p>
          </table:table-cell>
          <table:table-cell office:value-type="string" calcext:value-type="string">
            <text:p>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97</text:p>
          </table:table-cell>
          <table:table-cell office:value-type="string" calcext:value-type="string">
            <text:p>https://github.com/unfoldingWord-dev/ts-desktop</text:p>
          </table:table-cell>
          <table:table-cell office:value-type="string" calcext:value-type="string">
            <text:p>2026-04-22T14:46:49Z</text:p>
          </table:table-cell>
          <table:table-cell office:value-type="string" calcext:value-type="string">
            <text:p>unfoldingWord-dev/ts-desktop</text:p>
          </table:table-cell>
          <table:table-cell office:value-type="string" calcext:value-type="string">
            <text:p>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cell office:value-type="string" calcext:value-type="string">
            <text:p>unfoldingWord-dev/ts-requirements</text:p>
          </table:table-cell>
          <table:table-cell office:value-type="string" calcext:value-type="string">
            <text:p>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cell office:value-type="string" calcext:value-type="string">
            <text:p>unfoldingWord/ts-v2-catalog-backport</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cell office:value-type="string" calcext:value-type="string">
            <text:p>unfoldingWord/tx-dev-d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cell office:value-type="string" calcext:value-type="string">
            <text:p>unfoldingWord-dev/tx-dev-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cell office:value-type="string" calcext:value-type="string">
            <text:p>unfoldingWord-dev/tx-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cell office:value-type="string" calcext:value-type="string">
            <text:p>unfoldingWord/tx-enqueue-job</text:p>
          </table:table-cell>
          <table:table-cell office:value-type="string" calcext:value-type="string">
            <text:p>Manual review</text:p>
          </table:table-cell>
          <table:table-cell office:value-type="string" calcext:value-type="string">
            <text:p>Repository has significant release history or GitHub downloads (20 releases,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cell office:value-type="string" calcext:value-type="string">
            <text:p>unfoldingWord/tx-job-handl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2</text:p>
          </table:table-cell>
          <table:table-cell office:value-type="string" calcext:value-type="string">
            <text:p>https://github.com/unfoldingWord-dev/uw-android</text:p>
          </table:table-cell>
          <table:table-cell office:value-type="string" calcext:value-type="string">
            <text:p>2025-10-02T14:11:55Z</text:p>
          </table:table-cell>
          <table:table-cell office:value-type="string" calcext:value-type="string">
            <text:p>unfoldingWord-dev/uw-android</text:p>
          </table:table-cell>
          <table:table-cell office:value-type="string" calcext:value-type="string">
            <text:p>Manual review</text:p>
          </table:table-cell>
          <table:table-cell office:value-type="string" calcext:value-type="string">
            <text:p>Repository has significant release history or GitHub downloads (44 releases, 2302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office:value-type="string" calcext:value-type="string">
            <text:p>unfoldingWord/uw-website-resource-version-updat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cell office:value-type="string" calcext:value-type="string">
            <text:p>unfoldingWord/.githu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cell office:value-type="string" calcext:value-type="string">
            <text:p>unfoldingWord-dev/android-event-buff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cell office:value-type="string" calcext:value-type="string">
            <text:p>unfoldingWord-dev/android-foregroun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cell office:value-type="string" calcext:value-type="string">
            <text:p>unfoldingWord-dev/android-gogs-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cell office:value-type="string" calcext:value-type="string">
            <text:p>unfoldingWord-dev/android-htt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cell office:value-type="string" calcext:value-type="string">
            <text:p>unfoldingWord-dev/android-logg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cell office:value-type="string" calcext:value-type="string">
            <text:p>unfoldingWord-dev/android-task-manag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cell office:value-type="string" calcext:value-type="string">
            <text:p>unfoldingWord-dev/api-index</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cell office:value-type="string" calcext:value-type="string">
            <text:p>unfoldingWord/blank-project-templa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4</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office:value-type="string" calcext:value-type="string">
            <text:p>unfoldingWord/book-package-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14 downloads in the last year) and no detected local consumers.</text:p>
          </table:table-cell>
          <table:table-cell table:number-columns-repeated="16357"/>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5-17T13:44:58Z</text:p>
          </table:table-cell>
          <table:table-cell office:value-type="string" calcext:value-type="string">
            <text:p>unfoldingWord/Brown-Driver-Briggs-Enhance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udget-report</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udget-report</text:p>
          </table:table-cell>
          <table:table-cell office:value-type="string" calcext:value-type="string">
            <text:p>2026-06-02T19:21:17Z</text:p>
          </table:table-cell>
          <table:table-cell office:value-type="string" calcext:value-type="string">
            <text:p>unfoldingWord/budget-re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cell office:value-type="string" calcext:value-type="string">
            <text:p>unfoldingWord-box3/chamilo2obsidia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laude-skill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7T17:00: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claude-skills</text:p>
          </table:table-cell>
          <table:table-cell office:value-type="string" calcext:value-type="string">
            <text:p>2026-05-07T17:00:32Z</text:p>
          </table:table-cell>
          <table:table-cell office:value-type="string" calcext:value-type="string">
            <text:p>unfoldingWord/claude-skil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5-22T15:02:16Z</text:p>
          </table:table-cell>
          <table:table-cell office:value-type="string" calcext:value-type="string">
            <text:p>unfoldingWord/claude_security_sentine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6-06-03T15:57:01Z</text:p>
          </table:table-cell>
          <table:table-cell office:value-type="string" calcext:value-type="string">
            <text:p>unfoldingWord/cloudfront_logprocesso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yber-security-re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09:29:35Z</text:p>
          </table:table-cell>
          <table:table-cell office:value-type="string" calcext:value-type="string">
            <text:p>2026-06-03T09:2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yber-security-report</text:p>
          </table:table-cell>
          <table:table-cell office:value-type="string" calcext:value-type="string">
            <text:p>2026-06-03T09:29:39Z</text:p>
          </table:table-cell>
          <table:table-cell office:value-type="string" calcext:value-type="string">
            <text:p>unfoldingWord/cyber-security-re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cell office:value-type="string" calcext:value-type="string">
            <text:p>unfoldingWord/data_tracking_im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cell office:value-type="string" calcext:value-type="string">
            <text:p>unfoldingWord/data_tracking_wrangl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cell office:value-type="string" calcext:value-type="string">
            <text:p>unfoldingWord-dev/dokuwiki-enhancedindex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cell office:value-type="string" calcext:value-type="string">
            <text:p>unfoldingWord-dev/dokuwiki-obs-compar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cell office:value-type="string" calcext:value-type="string">
            <text:p>unfoldingWord-dev/dokuwiki-plugin-ob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office:value-type="string" calcext:value-type="string">
            <text:p>unfoldingWord-dev/dokuwiki-plugin-obs-audio-uploa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cell office:value-type="string" calcext:value-type="string">
            <text:p>unfoldingWord-dev/dokuwiki-plugin-obs-review</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cell office:value-type="string" calcext:value-type="string">
            <text:p>unfoldingWord-dev/dokuwiki-plugin-regist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cell office:value-type="string" calcext:value-type="string">
            <text:p>unfoldingWord-dev/dokuwiki-plugin-share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cell office:value-type="string" calcext:value-type="string">
            <text:p>unfoldingWord-dev/dokuwiki-to-r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cell office:value-type="string" calcext:value-type="string">
            <text:p>unfoldingWord-dev/dokuwiki-usfm-im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cell office:value-type="string" calcext:value-type="string">
            <text:p>unfoldingWord/download-link-track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cell office:value-type="string" calcext:value-type="string">
            <text:p>unfoldingWord-dev/dw-gitcommi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cell office:value-type="string" calcext:value-type="string">
            <text:p>unfoldingWord-dev/dw-zipod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cell office:value-type="string" calcext:value-type="string">
            <text:p>unfoldingWord/dw_redirec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cell office:value-type="string" calcext:value-type="string">
            <text:p>unfoldingWord/en_obs_tf</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ngineering-practic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office:value-type="string" calcext:value-type="string">
            <text:p>https://github.com/unfoldingWord/engineering-practices</text:p>
          </table:table-cell>
          <table:table-cell office:value-type="string" calcext:value-type="string">
            <text:p>2026-05-06T21:10:18Z</text:p>
          </table:table-cell>
          <table:table-cell office:value-type="string" calcext:value-type="string">
            <text:p>unfoldingWord/engineering-practic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cell office:value-type="string" calcext:value-type="string">
            <text:p>unfoldingWord-dev/ExampleCheckingApp-t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cell office:value-type="string" calcext:value-type="string">
            <text:p>unfoldingWord-dev/expor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cell office:value-type="string" calcext:value-type="string">
            <text:p>unfoldingWord/fia-k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cell office:value-type="string" calcext:value-type="string">
            <text:p>unfoldingWord/fred-mc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cell office:value-type="string" calcext:value-type="string">
            <text:p>unfoldingWord/fred-zulip-bo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office:value-type="string" calcext:value-type="string">
            <text:p>unfoldingWord-box3/gl-database-visualization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cell office:value-type="string" calcext:value-type="string">
            <text:p>unfoldingWord/gl_databas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cell office:value-type="string" calcext:value-type="string">
            <text:p>unfoldingWord/gl_database_cod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_database_priva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office:value-type="string" calcext:value-type="string">
            <text:p>https://github.com/unfoldingWord/gl_database_private</text:p>
          </table:table-cell>
          <table:table-cell office:value-type="string" calcext:value-type="string">
            <text:p>2021-12-15T21:34:33Z</text:p>
          </table:table-cell>
          <table:table-cell office:value-type="string" calcext:value-type="string">
            <text:p>unfoldingWord/gl_database_priva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cell office:value-type="string" calcext:value-type="string">
            <text:p>unfoldingWord-dev/gogs-custom</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cell office:value-type="string" calcext:value-type="string">
            <text:p>unfoldingWord-dev/gogs_auto_scaling</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office:value-type="string" calcext:value-type="string">
            <text:p>unfoldingWord-box3/greek-apparatus-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71 downloads in the last year) and no detected local consumers.</text:p>
          </table:table-cell>
          <table:table-cell table:number-columns-repeated="16357"/>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cell office:value-type="string" calcext:value-type="string">
            <text:p>unfoldingWord/GWE-Tes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office:value-type="string" calcext:value-type="string">
            <text:p>unfoldingWord-box3/hello-world-react-component-library</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99 downloads in the last year) and no detected local consumers.</text:p>
          </table:table-cell>
          <table:table-cell table:number-columns-repeated="16357"/>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cell office:value-type="string" calcext:value-type="string">
            <text:p>unfoldingWord-dev/hubo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cell office:value-type="string" calcext:value-type="string">
            <text:p>unfoldingWord/inventorys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cell office:value-type="string" calcext:value-type="string">
            <text:p>unfoldingWord/Katalon_MD-TSV_Converter_Ko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cell office:value-type="string" calcext:value-type="string">
            <text:p>unfoldingWord/Katalon_tC_Crea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cell office:value-type="string" calcext:value-type="string">
            <text:p>unfoldingWord/kr1-data-scrip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cell office:value-type="string" calcext:value-type="string">
            <text:p>unfoldingWord/lambda-tw-strongs-list-generato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cell office:value-type="string" calcext:value-type="string">
            <text:p>unfoldingWord/language-search</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cell office:value-type="string" calcext:value-type="string">
            <text:p>unfoldingWord-box3/lexicon-po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cell office:value-type="string" calcext:value-type="string">
            <text:p>unfoldingWord/loki-export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cell office:value-type="string" calcext:value-type="string">
            <text:p>unfoldingWord-dev/medi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cell office:value-type="string" calcext:value-type="string">
            <text:p>unfoldingWord/metric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office:value-type="string" calcext:value-type="string">
            <text:p>unfoldingWord-box3/mini-sb-handl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6-06-03T16:02:34Z</text:p>
          </table:table-cell>
          <table:table-cell office:value-type="string" calcext:value-type="string">
            <text:p>unfoldingWord/minitrack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cell office:value-type="string" calcext:value-type="string">
            <text:p>unfoldingWord/node-usfm2html-cli</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cell office:value-type="string" calcext:value-type="string">
            <text:p>unfoldingWord-box3/NotionIm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cell office:value-type="string" calcext:value-type="string">
            <text:p>unfoldingWord-dev/nsmsg</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cell office:value-type="string" calcext:value-type="string">
            <text:p>unfoldingWord-dev/obs-compar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cell office:value-type="string" calcext:value-type="string">
            <text:p>unfoldingWord-dev/obs-dat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cell office:value-type="string" calcext:value-type="string">
            <text:p>unfoldingWord-dev/obs-read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cell office:value-type="string" calcext:value-type="string">
            <text:p>unfoldingWord/obs-we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cell office:value-type="string" calcext:value-type="string">
            <text:p>unfoldingWord-dev/obs_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cell office:value-type="string" calcext:value-type="string">
            <text:p>unfoldingWord/oce-print-preview-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cell office:value-type="string" calcext:value-type="string">
            <text:p>unfoldingWord/odd-claude-plugi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cell office:value-type="string" calcext:value-type="string">
            <text:p>unfoldingWord-dev/pag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cell office:value-type="string" calcext:value-type="string">
            <text:p>unfoldingWord-box3/pdf-splitt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cell office:value-type="string" calcext:value-type="string">
            <text:p>unfoldingWord-dev/pi-colla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cell office:value-type="string" calcext:value-type="string">
            <text:p>unfoldingWord-box3/populate-gl-quote-rc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cell office:value-type="string" calcext:value-type="string">
            <text:p>unfoldingWord-dev/PublishingBlockchai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cell office:value-type="string" calcext:value-type="string">
            <text:p>unfoldingWord-dev/python-aws-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cell office:value-type="string" calcext:value-type="string">
            <text:p>unfoldingWord-dev/python-gitea-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cell office:value-type="string" calcext:value-type="string">
            <text:p>unfoldingWord/rc-schem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office:value-type="string" calcext:value-type="string">
            <text:p>unfoldingWord-dev/s3_list-zi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aplos-integration</text:p>
          </table:table-cell>
          <table:table-cell office:value-type="string" calcext:value-type="string">
            <text:p>unfoldingWord</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office:value-type="string" calcext:value-type="string">
            <text:p>https://github.com/unfoldingWord/salesforce-aplos-integration</text:p>
          </table:table-cell>
          <table:table-cell office:value-type="string" calcext:value-type="string">
            <text:p>2023-08-29T19:51:55Z</text:p>
          </table:table-cell>
          <table:table-cell office:value-type="string" calcext:value-type="string">
            <text:p>unfoldingWord/salesforce-aplos-integratio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cell office:value-type="string" calcext:value-type="string">
            <text:p>unfoldingWord/salesforce-cor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donation-page-package-cor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ore</text:p>
          </table:table-cell>
          <table:table-cell office:value-type="string" calcext:value-type="string">
            <text:p>2020-05-11T18:43:28Z</text:p>
          </table:table-cell>
          <table:table-cell office:value-type="string" calcext:value-type="string">
            <text:p>unfoldingWord/salesforce-donation-page-package-cor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donation-page-package-customization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ustomizations</text:p>
          </table:table-cell>
          <table:table-cell office:value-type="string" calcext:value-type="string">
            <text:p>2020-05-11T18:43:58Z</text:p>
          </table:table-cell>
          <table:table-cell office:value-type="string" calcext:value-type="string">
            <text:p>unfoldingWord/salesforce-donation-page-package-customization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hiny-app-outputs-report</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shiny-app-outputs-report</text:p>
          </table:table-cell>
          <table:table-cell office:value-type="string" calcext:value-type="string">
            <text:p>2024-01-29T17:00:31Z</text:p>
          </table:table-cell>
          <table:table-cell office:value-type="string" calcext:value-type="string">
            <text:p>unfoldingWord/shiny-app-outputs-re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cell office:value-type="string" calcext:value-type="string">
            <text:p>unfoldingWord-dev/sigad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cell office:value-type="string" calcext:value-type="string">
            <text:p>unfoldingWord-box3/SIL_API_load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office:value-type="string" calcext:value-type="string">
            <text:p>unfoldingWord-box3/Simplify</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cell office:value-type="string" calcext:value-type="string">
            <text:p>unfoldingWord-dev/slack-lambd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cell office:value-type="string" calcext:value-type="string">
            <text:p>unfoldingWord-box3/SpeechToTex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cell office:value-type="string" calcext:value-type="string">
            <text:p>unfoldingWord-box3/SplitAudioByTex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cell office:value-type="string" calcext:value-type="string">
            <text:p>unfoldingWord/tc-helps-skil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web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office:value-type="string" calcext:value-type="string">
            <text:p>https://github.com/unfoldingWord/tc-website</text:p>
          </table:table-cell>
          <table:table-cell office:value-type="string" calcext:value-type="string">
            <text:p>2026-04-17T14:27:01Z</text:p>
          </table:table-cell>
          <table:table-cell office:value-type="string" calcext:value-type="string">
            <text:p>unfoldingWord/tc-websi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cell office:value-type="string" calcext:value-type="string">
            <text:p>unfoldingWord/tCCreateQA-Danie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cell office:value-type="string" calcext:value-type="string">
            <text:p>unfoldingWord/tcCreateQA-elsy</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cell office:value-type="string" calcext:value-type="string">
            <text:p>unfoldingWord-box3/td-neo4j-po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erraform</text:p>
          </table:table-cell>
          <table:table-cell office:value-type="string" calcext:value-type="string">
            <text:p>unfoldingWord</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erraform</text:p>
          </table:table-cell>
          <table:table-cell office:value-type="string" calcext:value-type="string">
            <text:p>2023-07-04T15:33:16Z</text:p>
          </table:table-cell>
          <table:table-cell office:value-type="string" calcext:value-type="string">
            <text:p>unfoldingWord/terraform</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cell office:value-type="string" calcext:value-type="string">
            <text:p>unfoldingWord/tn-tsv7-to-tsv8</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cell office:value-type="string" calcext:value-type="string">
            <text:p>unfoldingWord-dev/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cell office:value-type="string" calcext:value-type="string">
            <text:p>unfoldingWord-dev/tr-requiremen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office:value-type="string" calcext:value-type="string">
            <text:p>unfoldingWord-box3/translation-helps-print-preview</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cell office:value-type="string" calcext:value-type="string">
            <text:p>unfoldingWord-dev/translationNot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cell office:value-type="string" calcext:value-type="string">
            <text:p>unfoldingWord-dev/translationRecorder-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cell office:value-type="string" calcext:value-type="string">
            <text:p>unfoldingWord-dev/translationStudio-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cell office:value-type="string" calcext:value-type="string">
            <text:p>unfoldingWord-dev/translationWords-t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cell office:value-type="string" calcext:value-type="string">
            <text:p>unfoldingWord-dev/ts-expor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cell office:value-type="string" calcext:value-type="string">
            <text:p>unfoldingWord-dev/ts-sta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cell office:value-type="string" calcext:value-type="string">
            <text:p>unfoldingWord-dev/tw_consistency</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cell office:value-type="string" calcext:value-type="string">
            <text:p>unfoldingWord-box3/twin-ahk</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cell office:value-type="string" calcext:value-type="string">
            <text:p>unfoldingWord-dev/tx</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cell office:value-type="string" calcext:value-type="string">
            <text:p>unfoldingWord/tx-dev</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office:value-type="string" calcext:value-type="string">
            <text:p>unfoldingWord-dev/tx-html2pdf</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cell office:value-type="string" calcext:value-type="string">
            <text:p>unfoldingWord-dev/tx-md2htm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cell office:value-type="string" calcext:value-type="string">
            <text:p>unfoldingWord-box3/tx-redis-po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cell office:value-type="string" calcext:value-type="string">
            <text:p>unfoldingWord-dev/tx-sample-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cell office:value-type="string" calcext:value-type="string">
            <text:p>unfoldingWord-dev/tx-shared-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cell office:value-type="string" calcext:value-type="string">
            <text:p>unfoldingWord-dev/tx-usfm2htm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cell office:value-type="string" calcext:value-type="string">
            <text:p>unfoldingWord-dev/tx-webhook</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cell office:value-type="string" calcext:value-type="string">
            <text:p>unfoldingWord-dev/tx-webhook-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f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office:value-type="string" calcext:value-type="string">
            <text:p>https://github.com/unfoldingWord/ufw_redirects</text:p>
          </table:table-cell>
          <table:table-cell office:value-type="string" calcext:value-type="string">
            <text:p>2026-06-02T19:41:33Z</text:p>
          </table:table-cell>
          <table:table-cell office:value-type="string" calcext:value-type="string">
            <text:p>unfoldingWord/ufw_redirec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cell office:value-type="string" calcext:value-type="string">
            <text:p>unfoldingWord-dev/ugnt-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office:value-type="string" calcext:value-type="string">
            <text:p>unfoldingWord-dev/Unlocked-Bible-Commentary-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cell office:value-type="string" calcext:value-type="string">
            <text:p>unfoldingWord-dev/Unlocked-Bible-Notes-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cell office:value-type="string" calcext:value-type="string">
            <text:p>unfoldingWord-dev/Unlocked-Grammar-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cell office:value-type="string" calcext:value-type="string">
            <text:p>unfoldingWord-dev/Unlocked-Greek-Lexicon-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cell office:value-type="string" calcext:value-type="string">
            <text:p>unfoldingWord-dev/USFM-Uti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cell office:value-type="string" calcext:value-type="string">
            <text:p>unfoldingWord-dev/uw-api</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cell office:value-type="string" calcext:value-type="string">
            <text:p>unfoldingWord-dev/uW-Bible-Map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cell office:value-type="string" calcext:value-type="string">
            <text:p>unfoldingWord-box3/uw-data-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dev-skill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office:value-type="string" calcext:value-type="string">
            <text:p>https://github.com/unfoldingWord/uw-dev-skills</text:p>
          </table:table-cell>
          <table:table-cell office:value-type="string" calcext:value-type="string">
            <text:p>2026-05-11T16:50:29Z</text:p>
          </table:table-cell>
          <table:table-cell office:value-type="string" calcext:value-type="string">
            <text:p>unfoldingWord/uw-dev-skil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cell office:value-type="string" calcext:value-type="string">
            <text:p>unfoldingWord-dev/uw-io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cell office:value-type="string" calcext:value-type="string">
            <text:p>unfoldingWord-dev/uW-mobile-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cell office:value-type="string" calcext:value-type="string">
            <text:p>unfoldingWord-dev/uw-pdf-conversion-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cell office:value-type="string" calcext:value-type="string">
            <text:p>unfoldingWord-dev/uw-publish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cell office:value-type="string" calcext:value-type="string">
            <text:p>unfoldingWord/uW-Tools-Colla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zulip-mc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2"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akougkas', 'nlightcc', 'sethstoll3', 'sethstoll', 'yakob-aleksandrovich', 'klutchell']</text:p>
          </table:table-cell>
          <table:table-cell table:number-columns-repeated="2" office:value-type="string" calcext:value-type="string">
            <text:p>0</text:p>
          </table:table-cell>
          <table:table-cell office:value-type="string" calcext:value-type="string">
            <text:p>https://github.com/unfoldingWord/uw-zulip-mcp</text:p>
          </table:table-cell>
          <table:table-cell office:value-type="string" calcext:value-type="string">
            <text:p>2026-05-29T15:06:34Z</text:p>
          </table:table-cell>
          <table:table-cell office:value-type="string" calcext:value-type="string">
            <text:p>unfoldingWord/uw-zulip-mc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cell office:value-type="string" calcext:value-type="string">
            <text:p>unfoldingWord-dev/uw_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21</text:p>
          </table:table-cell>
          <table:table-cell office:value-type="string" calcext:value-type="string">
            <text:p>https://github.com/unfoldingWord-box3/viewer-app-cordova</text:p>
          </table:table-cell>
          <table:table-cell office:value-type="string" calcext:value-type="string">
            <text:p>2022-11-09T09:01:40Z</text:p>
          </table:table-cell>
          <table:table-cell office:value-type="string" calcext:value-type="string">
            <text:p>unfoldingWord-box3/viewer-app-cordov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25</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office:value-type="string" calcext:value-type="string">
            <text:p>unfoldingWord-box3/wordmap-react-toolkit</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225 downloads in the last year) and no detected local consumers.</text:p>
          </table:table-cell>
          <table:table-cell table:number-columns-repeated="16357"/>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cell office:value-type="string" calcext:value-type="string">
            <text:p>unfoldingWord-box3/wordmap-seed-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6</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office:value-type="string" calcext:value-type="string">
            <text:p>unfoldingWord/world-language-map-rcl</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16 downloads in the last year) and no detected local consumers.</text:p>
          </table:table-cell>
          <table:table-cell table:number-columns-repeated="16357"/>
        </table:table-row>
        <table:table-row table:style-name="ro1">
          <table:table-cell office:value-type="string" calcext:value-type="string">
            <text:p>zulip-file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2"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nlightcc</text:p>
          </table:table-cell>
          <table:table-cell table:number-columns-repeated="2" office:value-type="string" calcext:value-type="string">
            <text:p>0</text:p>
          </table:table-cell>
          <table:table-cell office:value-type="string" calcext:value-type="string">
            <text:p>https://github.com/unfoldingWord/zulip-files</text:p>
          </table:table-cell>
          <table:table-cell office:value-type="string" calcext:value-type="string">
            <text:p>2026-02-21T13:15:10Z</text:p>
          </table:table-cell>
          <table:table-cell office:value-type="string" calcext:value-type="string">
            <text:p>unfoldingWord/zulip-fil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cell office:value-type="string" calcext:value-type="string">
            <text:p>unfoldingWord/avd-a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cell office:value-type="string" calcext:value-type="string">
            <text:p>unfoldingWord-dev/desig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office:value-type="string" calcext:value-type="string">
            <text:p>unfoldingWord/discourse-mermai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cell office:value-type="string" calcext:value-type="string">
            <text:p>unfoldingWord-dev/dokuwiki-slack-invit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office:value-type="string" calcext:value-type="string">
            <text:p>unfoldingWord-dev/example_tool</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cell office:value-type="string" calcext:value-type="string">
            <text:p>unfoldingWord-dev/md-export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cell office:value-type="string" calcext:value-type="string">
            <text:p>unfoldingWord/MediaWiki-USFMTag</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office:value-type="string" calcext:value-type="string">
            <text:p>unfoldingWord-box3/MultiplatformFramework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cell office:value-type="string" calcext:value-type="string">
            <text:p>unfoldingWord-dev/nagios_plugin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cell office:value-type="string" calcext:value-type="string">
            <text:p>unfoldingWord/obs-am</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cell office:value-type="string" calcext:value-type="string">
            <text:p>unfoldingWord-dev/OBS-Androi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cell office:value-type="string" calcext:value-type="string">
            <text:p>unfoldingWord/obs-b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cell office:value-type="string" calcext:value-type="string">
            <text:p>unfoldingWord/obs-ceb</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cell office:value-type="string" calcext:value-type="string">
            <text:p>unfoldingWord/obs-e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cell office:value-type="string" calcext:value-type="string">
            <text:p>unfoldingWord/obs-e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cell office:value-type="string" calcext:value-type="string">
            <text:p>unfoldingWord/obs-es-419</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cell office:value-type="string" calcext:value-type="string">
            <text:p>unfoldingWord/obs-f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cell office:value-type="string" calcext:value-type="string">
            <text:p>unfoldingWord/obs-f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cell office:value-type="string" calcext:value-type="string">
            <text:p>unfoldingWord/obs-gaj-x-ymnk</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cell office:value-type="string" calcext:value-type="string">
            <text:p>unfoldingWord/obs-gof</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cell office:value-type="string" calcext:value-type="string">
            <text:p>unfoldingWord/obs-gu</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cell office:value-type="string" calcext:value-type="string">
            <text:p>unfoldingWord/obs-h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cell office:value-type="string" calcext:value-type="string">
            <text:p>unfoldingWord/obs-hi</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cell office:value-type="string" calcext:value-type="string">
            <text:p>unfoldingWord/obs-hm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cell office:value-type="string" calcext:value-type="string">
            <text:p>unfoldingWord/obs-hu</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cell office:value-type="string" calcext:value-type="string">
            <text:p>unfoldingWord-dev/OBS-iO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cell office:value-type="string" calcext:value-type="string">
            <text:p>unfoldingWord/obs-lpx</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cell office:value-type="string" calcext:value-type="string">
            <text:p>unfoldingWord/obs-m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cell office:value-type="string" calcext:value-type="string">
            <text:p>unfoldingWord/obs-n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cell office:value-type="string" calcext:value-type="string">
            <text:p>unfoldingWord/obs-o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cell office:value-type="string" calcext:value-type="string">
            <text:p>unfoldingWord/obs-p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cell office:value-type="string" calcext:value-type="string">
            <text:p>unfoldingWord/obs-pdf</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cell office:value-type="string" calcext:value-type="string">
            <text:p>unfoldingWord/obs-pt-b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cell office:value-type="string" calcext:value-type="string">
            <text:p>unfoldingWord/obs-ru</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cell office:value-type="string" calcext:value-type="string">
            <text:p>unfoldingWord/obs-sgj</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cell office:value-type="string" calcext:value-type="string">
            <text:p>unfoldingWord/obs-tdj</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cell office:value-type="string" calcext:value-type="string">
            <text:p>unfoldingWord/obs-tl</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cell office:value-type="string" calcext:value-type="string">
            <text:p>unfoldingWord/obs-tpi</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cell office:value-type="string" calcext:value-type="string">
            <text:p>unfoldingWord/obs-t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cell office:value-type="string" calcext:value-type="string">
            <text:p>unfoldingWord-dev/OBS-Translation-App</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cell office:value-type="string" calcext:value-type="string">
            <text:p>unfoldingWord/obs-u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cell office:value-type="string" calcext:value-type="string">
            <text:p>unfoldingWord/obs-vi</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cell office:value-type="string" calcext:value-type="string">
            <text:p>unfoldingWord-dev/old-tx-manage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office:value-type="string" calcext:value-type="string">
            <text:p>unfoldingWord/orthography-app-BE</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cell office:value-type="string" calcext:value-type="string">
            <text:p>unfoldingWord/orthography-app-F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office:value-type="string" calcext:value-type="string">
            <text:p>unfoldingWord-dev/proposed_changes_module</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cell office:value-type="string" calcext:value-type="string">
            <text:p>unfoldingWord-dev/pub.distantshores.org</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cell office:value-type="string" calcext:value-type="string">
            <text:p>unfoldingWord-dev/submachin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cell office:value-type="string" calcext:value-type="string">
            <text:p>unfoldingWord-box3/t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cell office:value-type="string" calcext:value-type="string">
            <text:p>unfoldingWord-dev/TheCompassionateFatherApp</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office:value-type="string" calcext:value-type="string">
            <text:p>unfoldingWord-dev/translation_academy</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cell office:value-type="string" calcext:value-type="string">
            <text:p>unfoldingWord-dev/translationDatabaseWeb</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cell office:value-type="string" calcext:value-type="string">
            <text:p>unfoldingWord-dev/translationdb-tool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office:value-type="string" calcext:value-type="string">
            <text:p>unfoldingWord-dev/translationHelps</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cell office:value-type="string" calcext:value-type="string">
            <text:p>unfoldingWord-dev/translationKeyboar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office:value-type="string" calcext:value-type="string">
            <text:p>unfoldingWord-dev/translationKeyboardWeb</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cell office:value-type="string" calcext:value-type="string">
            <text:p>unfoldingWord-dev/ts-serve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cell office:value-type="string" calcext:value-type="string">
            <text:p>unfoldingWord-dev/tx-manage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cell office:value-type="string" calcext:value-type="string">
            <text:p>unfoldingWord-dev/tx-manager-lambd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cell office:value-type="string" calcext:value-type="string">
            <text:p>unfoldingWord-dev/tx-simple-usfm2html</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cell office:value-type="string" calcext:value-type="string">
            <text:p>unfoldingWord/udb-e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cell office:value-type="string" calcext:value-type="string">
            <text:p>unfoldingWord/ulb-e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cell office:value-type="string" calcext:value-type="string">
            <text:p>unfoldingWord/ulb-pt-b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office:value-type="string" calcext:value-type="string">
            <text:p>unfoldingWord/unfoldingWord.github.io-ol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cell office:value-type="string" calcext:value-type="string">
            <text:p>unfoldingWord/Unlocked-Greek-Lexico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cell office:value-type="string" calcext:value-type="string">
            <text:p>unfoldingWord/Unlocked-Greek-New-Testament</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cell office:value-type="string" calcext:value-type="string">
            <text:p>unfoldingWord-dev/uw-publish</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office:value-type="string" calcext:value-type="string">
            <text:p>unfoldingWord-dev/uwadmi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office:value-type="string" calcext:value-type="string">
            <text:p>unfoldingWord-dev/VerseCheck</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cell office:value-type="string" calcext:value-type="string">
            <text:p>unfoldingWord/websit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number-rows-repeated="104802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6">00/00/0000</text:date>, <text:time style:data-style-name="N2" text:time-value="10:33:43.0268162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6T11:16:59.078406015</dc:date>
    <meta:editing-duration>PT41M24S</meta:editing-duration>
    <meta:editing-cycles>4</meta:editing-cycles>
    <meta:document-statistic meta:table-count="1" meta:cell-count="14742" meta:object-count="0"/>
  </office:meta>
</office:document-meta>
</file>