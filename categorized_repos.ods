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5.4228in"/>
    </style:style>
    <style:style style:name="co18" style:family="table-column">
      <style:table-column-properties fo:break-before="auto" style:column-width="1.4425in"/>
    </style:style>
    <style:style style:name="co19" style:family="table-column">
      <style:table-column-properties fo:break-before="auto" style:column-width="1.539in"/>
    </style:style>
    <style:style style:name="co20" style:family="table-column">
      <style:table-column-properties fo:break-before="auto" style:column-width="2.0681in"/>
    </style:style>
    <style:style style:name="co21" style:family="table-column">
      <style:table-column-properties fo:break-before="auto" style:column-width="1.7193in"/>
    </style:style>
    <style:style style:name="co22" style:family="table-column">
      <style:table-column-properties fo:break-before="auto" style:column-width="3.7154in"/>
    </style:style>
    <style:style style:name="co23" style:family="table-column">
      <style:table-column-properties fo:break-before="auto" style:column-width="6.7937in"/>
    </style:style>
    <style:style style:name="co24" style:family="table-column">
      <style:table-column-properties fo:break-before="auto" style:column-width="2.9575in"/>
    </style:style>
    <style:style style:name="co2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1" table:number-columns-repeated="2" table:default-cell-style-name="ce1"/>
        <table:table-column table:style-name="co2" table:default-cell-style-name="Default"/>
        <table:table-column table:style-name="co3" table:default-cell-style-name="Default"/>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0"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default-cell-style-name="Default"/>
        <table:table-column table:style-name="co25"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is submodule of">
            <text:p>is submodule of</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
            <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8T14:19:40Z">
            <text:p>2026-06-18T14:19:40Z</text:p>
          </table:table-cell>
          <table:table-cell office:value-type="string" office:string-value="2026-06-18T14:19:31Z">
            <text:p>2026-06-18T14:19: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8T14:20:38Z">
            <text:p>2026-06-18T14:20:38Z</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20:29:08Z">
            <text:p>2026-06-17T20:29:08Z</text:p>
          </table:table-cell>
          <table:table-cell office:value-type="string" office:string-value="2026-06-17T14:58:59Z">
            <text:p>2026-06-17T14:58: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7T15:03:26Z">
            <text:p>2026-06-17T15:03:26Z</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
            <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
            <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
            <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
            <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
            <text:p/>
          </table:table-cell>
          <table:table-cell office:value-type="string" office:string-value="unfoldingWord/tc-strings">
            <text:p>unfoldingWord/tc-string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
            <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
            <text:p/>
          </table:table-cell>
          <table:table-cell office:value-type="string" office:string-value="unfoldingWord/.github">
            <text:p>unfoldingWord/.githu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irch Champeon ">
            <text:p>Birch Champeon </text:p>
          </table:table-cell>
          <table:table-cell office:value-type="string" office:string-value="x">
            <text:p>x</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
            <text:p/>
          </table:table-cell>
          <table:table-cell office:value-type="string" office:string-value="book-package-app">
            <text:p>book-package-app</text:p>
          </table:table-cell>
          <table:table-cell office:value-type="string" office:string-value="False">
            <text:p>False</text:p>
          </table:table-cell>
          <table:table-cell office:value-type="string" office:string-value="115">
            <text:p>115</text:p>
          </table:table-cell>
          <table:table-cell office:value-type="string" office:string-value="2020-07-15T14:29:05.613Z">
            <text:p>2020-07-15T14:29:05.61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5 downloads in the last year) and no detected local consumers.">
            <text:p>Package has low but nonzero npm usage (11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19:11:50Z">
            <text:p>2026-06-18T19:11:50Z</text:p>
          </table:table-cell>
          <table:table-cell office:value-type="string" office:string-value="2026-06-18T19:11:15Z">
            <text:p>2026-06-18T19:11:15Z</text:p>
          </table:table-cell>
          <table:table-cell office:value-type="string" office:string-value="">
            <text:p/>
          </table:table-cell>
          <table:table-cell office:value-type="string" office:string-value="11">
            <text:p>11</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18T19:11:21Z">
            <text:p>2026-06-18T19:11:21Z</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4">
            <text:p>104</text:p>
          </table:table-cell>
          <table:table-cell office:value-type="string" office:string-value="9">
            <text:p>9</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8">
            <text:p>188</text:p>
          </table:table-cell>
          <table:table-cell office:value-type="string" office:string-value="2020-09-16T21:52:51.640Z">
            <text:p>2020-09-16T21:52:51.640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8 downloads in the last year) and no detected local consumers.">
            <text:p>Package has low but nonzero npm usage (188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18T09:01:44Z">
            <text:p>2026-06-18T09:01:44Z</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
            <text:p/>
          </table:table-cell>
          <table:table-cell office:value-type="string" office:string-value="unfoldingWord/dbbackupr2">
            <text:p>unfoldingWord/dbbackupr2</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
            <text:p/>
          </table:table-cell>
          <table:table-cell office:value-type="string" office:string-value="unfoldingWord/dcs">
            <text:p>unfoldingWord/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
            <text:p/>
          </table:table-cell>
          <table:table-cell office:value-type="string" office:string-value="unfoldingWord/dcs-docs">
            <text:p>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
            <text:p/>
          </table:table-cell>
          <table:table-cell office:value-type="string" office:string-value="unfoldingWord/dcs-local">
            <text:p>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609">
            <text:p>609</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9 downloads in the last year) and no detected local consumers.">
            <text:p>Package has low but nonzero npm usage (609 downloads in the last year) and no detected local consumers.</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unfoldingWord-dev/dcs-profile-unfoldingword-mirrored">
            <text:p>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unfoldingWord-dev/dokuwiki-enhancedindexer">
            <text:p>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unfoldingWord-dev/Dokuwiki-USFMTag">
            <text:p>unfoldingWord-dev/Dokuwiki-USFMTa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
            <text:p/>
          </table:table-cell>
          <table:table-cell office:value-type="string" office:string-value="unfoldingWord/door43.org">
            <text:p>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unfoldingWord-dev/dw-gitcommit">
            <text:p>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
            <text:p/>
          </table:table-cell>
          <table:table-cell office:value-type="string" office:string-value="unfoldingWord/en_obs_tf">
            <text:p>unfoldingWord/en_obs_t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
            <text:p/>
          </table:table-cell>
          <table:table-cell office:value-type="string" office:string-value="unfoldingWord-dev/exports">
            <text:p>unfoldingWord-dev/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
            <text:p/>
          </table:table-cell>
          <table:table-cell office:value-type="string" office:string-value="unfoldingWord/fia-kb">
            <text:p>unfoldingWord/fia-k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
            <text:p/>
          </table:table-cell>
          <table:table-cell office:value-type="string" office:string-value="unfoldingWord/fred-mcp">
            <text:p>unfoldingWord/fred-mc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
            <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
            <text:p/>
          </table:table-cell>
          <table:table-cell office:value-type="string" office:string-value="unfoldingWord/GWE-Tests">
            <text:p>unfoldingWord/GWE-Tes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
            <text:p/>
          </table:table-cell>
          <table:table-cell office:value-type="string" office:string-value="unfoldingWord-dev/hubot">
            <text:p>unfoldingWord-dev/hu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
            <text:p/>
          </table:table-cell>
          <table:table-cell office:value-type="string" office:string-value="unfoldingWord-dev/media">
            <text:p>unfoldingWord-dev/med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
            <text:p/>
          </table:table-cell>
          <table:table-cell office:value-type="string" office:string-value="unfoldingWord/metrics">
            <text:p>unfoldingWord/metric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unfoldingWord-dev/nsmsg">
            <text:p>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
            <text:p/>
          </table:table-cell>
          <table:table-cell office:value-type="string" office:string-value="unfoldingWord/obs-app">
            <text:p>unfoldingWord/obs-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
            <text:p/>
          </table:table-cell>
          <table:table-cell office:value-type="string" office:string-value="unfoldingWord-dev/obs-data">
            <text:p>unfoldingWord-dev/obs-dat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
            <text:p/>
          </table:table-cell>
          <table:table-cell office:value-type="string" office:string-value="unfoldingWord/obs-web">
            <text:p>unfoldingWord/obs-we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
            <text:p/>
          </table:table-cell>
          <table:table-cell office:value-type="string" office:string-value="unfoldingWord-dev/pages">
            <text:p>unfoldingWord-dev/p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
            <text:p/>
          </table:table-cell>
          <table:table-cell office:value-type="string" office:string-value="unfoldingWord/rc-schema">
            <text:p>unfoldingWord/rc-schem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
            <text:p/>
          </table:table-cell>
          <table:table-cell office:value-type="string" office:string-value="unfoldingWord-dev/sigadd">
            <text:p>unfoldingWord-dev/sigad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3 downloads in the last year) and no detected local consumers.">
            <text:p>Package has low but nonzero npm usage (73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
            <text:p/>
          </table:table-cell>
          <table:table-cell office:value-type="string" office:string-value="unfoldingWord/td-legacy">
            <text:p>unfoldingWord/td-lega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
            <text:p/>
          </table:table-cell>
          <table:table-cell office:value-type="string" office:string-value="unfoldingWord-dev/tools">
            <text:p>unfoldingWord-dev/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unfoldingWord/translationNotes">
            <text:p>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unfoldingWord/translationWords">
            <text:p>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
            <text:p/>
          </table:table-cell>
          <table:table-cell office:value-type="string" office:string-value="unfoldingWord-dev/ts-stats">
            <text:p>unfoldingWord-dev/ts-sta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
            <text:p/>
          </table:table-cell>
          <table:table-cell office:value-type="string" office:string-value="unfoldingWord-dev/tx">
            <text:p>unfoldingWord-dev/t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
            <text:p/>
          </table:table-cell>
          <table:table-cell office:value-type="string" office:string-value="unfoldingWord/tx-dev">
            <text:p>unfoldingWord/tx-dev</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
            <text:p/>
          </table:table-cell>
          <table:table-cell office:value-type="string" office:string-value="unfoldingWord/tx-dev-dcs">
            <text:p>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1-Manual review">
            <text:p>1-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
            <text:p/>
          </table:table-cell>
          <table:table-cell office:value-type="string" office:string-value="unfoldingWord-dev/ugnt-app">
            <text:p>unfoldingWord-dev/ugnt-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1-Manual review">
            <text:p>1-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
            <text:p/>
          </table:table-cell>
          <table:table-cell office:value-type="string" office:string-value="unfoldingWord-dev/uw-api">
            <text:p>unfoldingWord-dev/uw-api</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
            <text:p/>
          </table:table-cell>
          <table:table-cell office:value-type="string" office:string-value="unfoldingWord-dev/uw-ios">
            <text:p>unfoldingWord-dev/uw-io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unfoldingWord/wordAlignment">
            <text:p>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
            <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45">
            <text:p>245</text:p>
          </table:table-cell>
          <table:table-cell office:value-type="string" office:string-value="2019-11-07T08:13:01.981Z">
            <text:p>2019-11-07T08:13:01.98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45 downloads in the last year) and no detected local consumers.">
            <text:p>Package has low but nonzero npm usage (24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20">
            <text:p>120</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20 downloads in the last year) and no detected local consumers.">
            <text:p>Package has low but nonzero npm usage (120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7">
            <text:p>16717</text:p>
          </table:table-cell>
          <table:table-cell office:value-type="string" office:string-value="2023-12-07T19:15:35.590Z">
            <text:p>2023-12-07T19:15:35.590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717 downloads).">
            <text:p>Repository has GitHub dependents or at least 1,000 npm downloads in the last year (1671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7 downloads in the last year).">
            <text:p>Package has detected local usage, GitHub dependents, or significant npm downloads (1671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41">
            <text:p>5141</text:p>
          </table:table-cell>
          <table:table-cell office:value-type="string" office:string-value="2024-06-04T12:40:10.075Z">
            <text:p>2024-06-04T12:40:10.075Z</text:p>
          </table:table-cell>
          <table:table-cell office:value-type="string" office:string-value="">
            <text:p/>
          </table:table-cell>
          <table:table-cell office:value-type="string" office:string-value="">
            <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141 downloads).">
            <text:p>Repository has GitHub dependents or at least 1,000 npm downloads in the last year (514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1 downloads in the last year).">
            <text:p>Package has detected local usage, GitHub dependents, or significant npm downloads (514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
            <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
            <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255 downloads).">
            <text:p>Repository has GitHub dependents or at least 1,000 npm downloads in the last year (22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
            <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4">
            <text:p>5894</text:p>
          </table:table-cell>
          <table:table-cell office:value-type="string" office:string-value="2025-10-20T15:58:23.259Z">
            <text:p>2025-10-20T15:58:23.259Z</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894 downloads).">
            <text:p>Repository has GitHub dependents or at least 1,000 npm downloads in the last year (589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4 downloads in the last year).">
            <text:p>Package has detected local usage, GitHub dependents, or significant npm downloads (589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
            <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
            <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97 downloads).">
            <text:p>Repository has GitHub dependents or at least 1,000 npm downloads in the last year (339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7">
            <text:p>3617</text:p>
          </table:table-cell>
          <table:table-cell office:value-type="string" office:string-value="2026-03-27T21:57:39.012Z">
            <text:p>2026-03-27T21:57:39.012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617 downloads).">
            <text:p>Repository has GitHub dependents or at least 1,000 npm downloads in the last year (361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7 downloads in the last year).">
            <text:p>Package has detected local usage, GitHub dependents, or significant npm downloads (361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False">
            <text:p>False</text:p>
          </table:table-cell>
          <table:table-cell office:value-type="string" office:string-value="609">
            <text:p>609</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
            <text:p/>
          </table:table-cell>
          <table:table-cell office:value-type="string" office:string-value="unfoldingWord/dcs-js">
            <text:p>unfoldingWord/dcs-j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09 downloads).">
            <text:p>Repository has GitHub dependents or at least 1,000 npm downloads in the last year (60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9 downloads in the last year).">
            <text:p>Package has detected local usage, GitHub dependents, or significant npm downloads (60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dcs-react-hooks">
            <text:p>dcs-react-hooks</text:p>
          </table:table-cell>
          <table:table-cell office:value-type="string" office:string-value="False">
            <text:p>False</text:p>
          </table:table-cell>
          <table:table-cell office:value-type="string" office:string-value="178">
            <text:p>178</text:p>
          </table:table-cell>
          <table:table-cell office:value-type="string" office:string-value="2022-08-19T12:33:49.976Z">
            <text:p>2022-08-19T12:33:49.976Z</text:p>
          </table:table-cell>
          <table:table-cell office:value-type="string" office:string-value="">
            <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8 downloads).">
            <text:p>Repository has GitHub dependents or at least 1,000 npm downloads in the last year (17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8 downloads in the last year).">
            <text:p>Package has detected local usage, GitHub dependents, or significant npm downloads (17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1002">
            <text:p>21002</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ite">
            <text:p>electronite</text:p>
          </table:table-cell>
          <table:table-cell office:value-type="string" office:string-value="False">
            <text:p>False</text:p>
          </table:table-cell>
          <table:table-cell office:value-type="string" office:string-value="2604">
            <text:p>2604</text:p>
          </table:table-cell>
          <table:table-cell office:value-type="string" office:string-value="2026-01-22T21:05:02.866Z">
            <text:p>2026-01-22T21:05:02.866Z</text:p>
          </table:table-cell>
          <table:table-cell office:value-type="string" office:string-value="">
            <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604 downloads).">
            <text:p>Repository has GitHub dependents or at least 1,000 npm downloads in the last year (2604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7">
            <text:p>24657</text:p>
          </table:table-cell>
          <table:table-cell office:value-type="string" office:string-value="2026-06-02T13:32:18.685Z">
            <text:p>2026-06-02T13:32:18.685Z</text:p>
          </table:table-cell>
          <table:table-cell office:value-type="string" office:string-value="">
            <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4657 downloads).">
            <text:p>Repository has GitHub dependents or at least 1,000 npm downloads in the last year (2465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7 downloads in the last year).">
            <text:p>Package has detected local usage, GitHub dependents, or significant npm downloads (2465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
            <text:p/>
          </table:table-cell>
          <table:table-cell office:value-type="string" office:string-value="epitelete-html">
            <text:p>epitelete-html</text:p>
          </table:table-cell>
          <table:table-cell office:value-type="string" office:string-value="False">
            <text:p>False</text:p>
          </table:table-cell>
          <table:table-cell office:value-type="string" office:string-value="10131">
            <text:p>10131</text:p>
          </table:table-cell>
          <table:table-cell office:value-type="string" office:string-value="2023-07-16T00:28:17.570Z">
            <text:p>2023-07-16T00:28:17.57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0131 downloads).">
            <text:p>Repository has GitHub dependents or at least 1,000 npm downloads in the last year (10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131 downloads in the last year).">
            <text:p>Package has detected local usage, GitHub dependents, or significant npm downloads (10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
            <text:p>unfoldingWord/find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
            <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84">
            <text:p>17484</text:p>
          </table:table-cell>
          <table:table-cell office:value-type="string" office:string-value="2026-05-12T13:15:42.563Z">
            <text:p>2026-05-12T13:15:42.563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484 downloads).">
            <text:p>Repository has GitHub dependents or at least 1,000 npm downloads in the last year (1748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84 downloads in the last year).">
            <text:p>Package has detected local usage, GitHub dependents, or significant npm downloads (1748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
            <text:p/>
          </table:table-cell>
          <table:table-cell office:value-type="string" office:string-value="unfoldingWord/go-rc2sb">
            <text:p>unfoldingWord/go-rc2s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62">
            <text:p>18062</text:p>
          </table:table-cell>
          <table:table-cell office:value-type="string" office:string-value="2023-03-07T15:00:29.476Z">
            <text:p>2023-03-07T15:00:29.476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062 downloads).">
            <text:p>Repository has GitHub dependents or at least 1,000 npm downloads in the last year (180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62 downloads in the last year).">
            <text:p>Package has detected local usage, GitHub dependents, or significant npm downloads (1806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
            <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rc">
            <text:p>door43-rc</text:p>
          </table:table-cell>
          <table:table-cell office:value-type="string" office:string-value="True">
            <text:p>True</text:p>
          </table:table-cell>
          <table:table-cell office:value-type="string" office:string-value="1502">
            <text:p>1502</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2 downloads).">
            <text:p>Repository has GitHub dependents or at least 1,000 npm downloads in the last year (1502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gogs-client">
            <text:p>gogs-client</text:p>
          </table:table-cell>
          <table:table-cell office:value-type="string" office:string-value="False">
            <text:p>False</text:p>
          </table:table-cell>
          <table:table-cell office:value-type="string" office:string-value="6730">
            <text:p>6730</text:p>
          </table:table-cell>
          <table:table-cell office:value-type="string" office:string-value="2016-07-13T00:07:45.833Z">
            <text:p>2016-07-13T00:07:45.833Z</text:p>
          </table:table-cell>
          <table:table-cell office:value-type="string" office:string-value="">
            <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730 downloads).">
            <text:p>Repository has GitHub dependents or at least 1,000 npm downloads in the last year (6730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75">
            <text:p>3175</text:p>
          </table:table-cell>
          <table:table-cell office:value-type="string" office:string-value="2017-02-28T01:01:07.451Z">
            <text:p>2017-02-28T01:01:07.45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175 downloads).">
            <text:p>Repository has GitHub dependents or at least 1,000 npm downloads in the last year (317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75 downloads in the last year).">
            <text:p>Package has detected local usage, GitHub dependents, or significant npm downloads (317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wl-generator">
            <text:p>twl-generator</text:p>
          </table:table-cell>
          <table:table-cell office:value-type="string" office:string-value="False">
            <text:p>False</text:p>
          </table:table-cell>
          <table:table-cell office:value-type="string" office:string-value="5611">
            <text:p>5611</text:p>
          </table:table-cell>
          <table:table-cell office:value-type="string" office:string-value="2026-06-16T10:00:58.589Z">
            <text:p>2026-06-16T10:00:58.58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611 downloads).">
            <text:p>Repository has GitHub dependents or at least 1,000 npm downloads in the last year (561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11 downloads in the last year).">
            <text:p>Package has detected local usage, GitHub dependents, or significant npm downloads (561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
            <text:p/>
          </table:table-cell>
          <table:table-cell office:value-type="string" office:string-value="unfoldingWord/obt">
            <text:p>unfoldingWord/ob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
            <text:p>@oce-editor-tools/base</text:p>
          </table:table-cell>
          <table:table-cell office:value-type="string" office:string-value="">
            <text:p/>
          </table:table-cell>
          <table:table-cell office:value-type="string" office:string-value="1851">
            <text:p>1851</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51 downloads).">
            <text:p>Repository has GitHub dependents or at least 1,000 npm downloads in the last year (185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1 downloads in the last year).">
            <text:p>Package has detected local usage, GitHub dependents, or significant npm downloads (185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core">
            <text:p>@oce-editor-tools/joy-core</text:p>
          </table:table-cell>
          <table:table-cell office:value-type="string" office:string-value="">
            <text:p/>
          </table:table-cell>
          <table:table-cell office:value-type="string" office:string-value="407">
            <text:p>407</text:p>
          </table:table-cell>
          <table:table-cell office:value-type="string" office:string-value="2024-01-10T09:45:57.004Z">
            <text:p>2024-01-10T09:45:57.004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07 downloads).">
            <text:p>Repository has GitHub dependents or at least 1,000 npm downloads in the last year (40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7 downloads in the last year).">
            <text:p>Package has detected local usage, GitHub dependents, or significant npm downloads (4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pk">
            <text:p>@oce-editor-tools/joy-pk</text:p>
          </table:table-cell>
          <table:table-cell office:value-type="string" office:string-value="">
            <text:p/>
          </table:table-cell>
          <table:table-cell office:value-type="string" office:string-value="131">
            <text:p>131</text:p>
          </table:table-cell>
          <table:table-cell office:value-type="string" office:string-value="2024-01-10T09:47:45.958Z">
            <text:p>2024-01-10T09:47:45.958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31 downloads).">
            <text:p>Repository has GitHub dependents or at least 1,000 npm downloads in the last year (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1 downloads in the last year).">
            <text:p>Package has detected local usage, GitHub dependents, or significant npm downloads (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core">
            <text:p>@oce-editor-tools/mui-core</text:p>
          </table:table-cell>
          <table:table-cell office:value-type="string" office:string-value="">
            <text:p/>
          </table:table-cell>
          <table:table-cell office:value-type="string" office:string-value="645">
            <text:p>645</text:p>
          </table:table-cell>
          <table:table-cell office:value-type="string" office:string-value="2024-01-10T09:42:28.550Z">
            <text:p>2024-01-10T09:42:28.55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5 downloads).">
            <text:p>Repository has GitHub dependents or at least 1,000 npm downloads in the last year (64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5 downloads in the last year).">
            <text:p>Package has detected local usage, GitHub dependents, or significant npm downloads (6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pk">
            <text:p>@oce-editor-tools/mui-pk</text:p>
          </table:table-cell>
          <table:table-cell office:value-type="string" office:string-value="">
            <text:p/>
          </table:table-cell>
          <table:table-cell office:value-type="string" office:string-value="337">
            <text:p>337</text:p>
          </table:table-cell>
          <table:table-cell office:value-type="string" office:string-value="2024-01-10T09:45:17.176Z">
            <text:p>2024-01-10T09:45:17.176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7 downloads).">
            <text:p>Repository has GitHub dependents or at least 1,000 npm downloads in the last year (33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7 downloads in the last year).">
            <text:p>Package has detected local usage, GitHub dependents, or significant npm downloads (33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3">
            <text:p>373</text:p>
          </table:table-cell>
          <table:table-cell office:value-type="string" office:string-value="2024-01-10T09:45:39.010Z">
            <text:p>2024-01-10T09:45:39.01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73 downloads).">
            <text:p>Repository has GitHub dependents or at least 1,000 npm downloads in the last year (3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3 downloads in the last year).">
            <text:p>Package has detected local usage, GitHub dependents, or significant npm downloads (3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7">
            <text:p>97</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7 downloads).">
            <text:p>Repository has GitHub dependents or at least 1,000 npm downloads in the last year (9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 downloads in the last year).">
            <text:p>Package has detected local usage, GitHub dependents, or significant npm downloads (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8T18:47:28Z">
            <text:p>2026-06-18T18:47:28Z</text:p>
          </table:table-cell>
          <table:table-cell office:value-type="string" office:string-value="2026-06-18T18:47:25Z">
            <text:p>2026-06-18T18:47: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18T18:47:33Z">
            <text:p>2026-06-18T18:47:33Z</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4">
            <text:p>2804</text:p>
          </table:table-cell>
          <table:table-cell office:value-type="string" office:string-value="2023-06-13T13:51:03.803Z">
            <text:p>2023-06-13T13:51:03.803Z</text:p>
          </table:table-cell>
          <table:table-cell office:value-type="string" office:string-value="">
            <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804 downloads).">
            <text:p>Repository has GitHub dependents or at least 1,000 npm downloads in the last year (280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4 downloads in the last year).">
            <text:p>Package has detected local usage, GitHub dependents, or significant npm downloads (280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
            <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096">
            <text:p>15096</text:p>
          </table:table-cell>
          <table:table-cell office:value-type="string" office:string-value="2026-03-19T13:24:25.124Z">
            <text:p>2026-03-19T13:24:25.124Z</text:p>
          </table:table-cell>
          <table:table-cell office:value-type="string" office:string-value="">
            <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96 downloads).">
            <text:p>Repository has GitHub dependents or at least 1,000 npm downloads in the last year (150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96 downloads in the last year).">
            <text:p>Package has detected local usage, GitHub dependents, or significant npm downloads (1509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scripture-tsv">
            <text:p>scripture-tsv</text:p>
          </table:table-cell>
          <table:table-cell office:value-type="string" office:string-value="False">
            <text:p>False</text:p>
          </table:table-cell>
          <table:table-cell office:value-type="string" office:string-value="2668">
            <text:p>2668</text:p>
          </table:table-cell>
          <table:table-cell office:value-type="string" office:string-value="2024-05-02T21:03:03.412Z">
            <text:p>2024-05-02T21:03:03.412Z</text:p>
          </table:table-cell>
          <table:table-cell office:value-type="string" office:string-value="">
            <text:p/>
          </table:table-cell>
          <table:table-cell office:value-type="string" office:string-value="">
            <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668 downloads).">
            <text:p>Repository has GitHub dependents or at least 1,000 npm downloads in the last year (266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8 downloads in the last year).">
            <text:p>Package has detected local usage, GitHub dependents, or significant npm downloads (266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
            <text:p/>
          </table:table-cell>
          <table:table-cell office:value-type="string" office:string-value="unfoldingWord/selections">
            <text:p>unfoldingWord/selection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26">
            <text:p>3826</text:p>
          </table:table-cell>
          <table:table-cell office:value-type="string" office:string-value="2022-06-09T23:15:38.322Z">
            <text:p>2022-06-09T23:15:38.322Z</text:p>
          </table:table-cell>
          <table:table-cell office:value-type="string" office:string-value="">
            <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826 downloads).">
            <text:p>Repository has GitHub dependents or at least 1,000 npm downloads in the last year (382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26 downloads in the last year).">
            <text:p>Package has detected local usage, GitHub dependents, or significant npm downloads (382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
            <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72">
            <text:p>9772</text:p>
          </table:table-cell>
          <table:table-cell office:value-type="string" office:string-value="2026-04-16T17:29:58.529Z">
            <text:p>2026-04-16T17:29:58.529Z</text:p>
          </table:table-cell>
          <table:table-cell office:value-type="string" office:string-value="">
            <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772 downloads).">
            <text:p>Repository has GitHub dependents or at least 1,000 npm downloads in the last year (977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72 downloads in the last year).">
            <text:p>Package has detected local usage, GitHub dependents, or significant npm downloads (977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8531">
            <text:p>98531</text:p>
          </table:table-cell>
          <table:table-cell office:value-type="string" office:string-value="2021-08-25T21:55:46.406Z">
            <text:p>2021-08-25T21:55:46.406Z</text:p>
          </table:table-cell>
          <table:table-cell office:value-type="string" office:string-value="">
            <text:p/>
          </table:table-cell>
          <table:table-cell office:value-type="string" office:string-value="">
            <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8531 downloads).">
            <text:p>Repository has GitHub dependents or at least 1,000 npm downloads in the last year (98531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
            <text:p/>
          </table:table-cell>
          <table:table-cell office:value-type="string" office:string-value="unfoldingWord-box3/tact">
            <text:p>unfoldingWord-box3/t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3 downloads).">
            <text:p>Repository has GitHub dependents or at least 1,000 npm downloads in the last year (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3 downloads in the last year).">
            <text:p>Package has detected local usage, GitHub dependents, or significant npm downloads (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77">
            <text:p>7777</text:p>
          </table:table-cell>
          <table:table-cell office:value-type="string" office:string-value="2025-10-28T18:16:22.466Z">
            <text:p>2025-10-28T18:16:22.466Z</text:p>
          </table:table-cell>
          <table:table-cell office:value-type="string" office:string-value="">
            <text:p/>
          </table:table-cell>
          <table:table-cell office:value-type="string" office:string-value="">
            <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777 downloads).">
            <text:p>Repository has GitHub dependents or at least 1,000 npm downloads in the last year (77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77 downloads in the last year).">
            <text:p>Package has detected local usage, GitHub dependents, or significant npm downloads (777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
            <text:p/>
          </table:table-cell>
          <table:table-cell office:value-type="string" office:string-value="unfoldingWord/tc-tool">
            <text:p>unfoldingWord/tc-too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
            <text:p/>
          </table:table-cell>
          <table:table-cell office:value-type="string" office:string-value="tc-ui-toolkit">
            <text:p>tc-ui-toolkit</text:p>
          </table:table-cell>
          <table:table-cell office:value-type="string" office:string-value="False">
            <text:p>False</text:p>
          </table:table-cell>
          <table:table-cell office:value-type="string" office:string-value="29501">
            <text:p>29501</text:p>
          </table:table-cell>
          <table:table-cell office:value-type="string" office:string-value="2024-12-31T18:53:34.752Z">
            <text:p>2024-12-31T18:53:34.752Z</text:p>
          </table:table-cell>
          <table:table-cell office:value-type="string" office:string-value="">
            <text:p/>
          </table:table-cell>
          <table:table-cell office:value-type="string" office:string-value="">
            <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9501 downloads).">
            <text:p>Repository has GitHub dependents or at least 1,000 npm downloads in the last year (2950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01 downloads in the last year).">
            <text:p>Package has detected local usage, GitHub dependents, or significant npm downloads (2950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8T19:10:38Z">
            <text:p>2026-06-18T19:10:38Z</text:p>
          </table:table-cell>
          <table:table-cell office:value-type="string" office:string-value="2026-05-05T16:33:43Z">
            <text:p>2026-05-05T16:33:43Z</text:p>
          </table:table-cell>
          <table:table-cell office:value-type="string" office:string-value="">
            <text:p/>
          </table:table-cell>
          <table:table-cell office:value-type="string" office:string-value="11">
            <text:p>11</text:p>
          </table:table-cell>
          <table:table-cell office:value-type="string" office:string-value="2">
            <text:p>2</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
            <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6081">
            <text:p>16081</text:p>
          </table:table-cell>
          <table:table-cell office:value-type="string" office:string-value="2026-03-27T22:01:47.002Z">
            <text:p>2026-03-27T22:01:47.002Z</text:p>
          </table:table-cell>
          <table:table-cell office:value-type="string" office:string-value="">
            <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081 downloads).">
            <text:p>Repository has GitHub dependents or at least 1,000 npm downloads in the last year (1608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81 downloads in the last year).">
            <text:p>Package has detected local usage, GitHub dependents, or significant npm downloads (1608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
            <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9">
            <text:p>6419</text:p>
          </table:table-cell>
          <table:table-cell office:value-type="string" office:string-value="2024-10-16T17:43:33.516Z">
            <text:p>2024-10-16T17:43:33.516Z</text:p>
          </table:table-cell>
          <table:table-cell office:value-type="string" office:string-value="">
            <text:p/>
          </table:table-cell>
          <table:table-cell office:value-type="string" office:string-value="">
            <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19 downloads).">
            <text:p>Repository has GitHub dependents or at least 1,000 npm downloads in the last year (641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9 downloads in the last year).">
            <text:p>Package has detected local usage, GitHub dependents, or significant npm downloads (641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
            <text:p/>
          </table:table-cell>
          <table:table-cell office:value-type="string" office:string-value="unfoldingWord/usfm-js">
            <text:p>unfoldingWord/usfm-j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
            <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67">
            <text:p>2067</text:p>
          </table:table-cell>
          <table:table-cell office:value-type="string" office:string-value="2026-06-07T09:30:48.456Z">
            <text:p>2026-06-07T09:30:48.456Z</text:p>
          </table:table-cell>
          <table:table-cell office:value-type="string" office:string-value="">
            <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067 downloads).">
            <text:p>Repository has GitHub dependents or at least 1,000 npm downloads in the last year (20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67 downloads in the last year).">
            <text:p>Package has detected local usage, GitHub dependents, or significant npm downloads (206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
            <text:p/>
          </table:table-cell>
          <table:table-cell office:value-type="string" office:string-value="uw-editor">
            <text:p>uw-editor</text:p>
          </table:table-cell>
          <table:table-cell office:value-type="string" office:string-value="True">
            <text:p>True</text:p>
          </table:table-cell>
          <table:table-cell office:value-type="string" office:string-value="1183">
            <text:p>1183</text:p>
          </table:table-cell>
          <table:table-cell office:value-type="string" office:string-value="2023-03-21T14:43:38.471Z">
            <text:p>2023-03-21T14:43:38.471Z</text:p>
          </table:table-cell>
          <table:table-cell office:value-type="string" office:string-value="">
            <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
            <text:p/>
          </table:table-cell>
          <table:table-cell office:value-type="string" office:string-value="unfoldingWord/uw-editor">
            <text:p>unfoldingWord/uw-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183 downloads).">
            <text:p>Repository has GitHub dependents or at least 1,000 npm downloads in the last year (118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
            <text:p/>
          </table:table-cell>
          <table:table-cell office:value-type="string" office:string-value="uw-languages-rcl">
            <text:p>uw-languages-rcl</text:p>
          </table:table-cell>
          <table:table-cell office:value-type="string" office:string-value="False">
            <text:p>False</text:p>
          </table:table-cell>
          <table:table-cell office:value-type="string" office:string-value="1220">
            <text:p>1220</text:p>
          </table:table-cell>
          <table:table-cell office:value-type="string" office:string-value="2026-05-28T16:01:32.183Z">
            <text:p>2026-05-28T16:01:32.183Z</text:p>
          </table:table-cell>
          <table:table-cell office:value-type="string" office:string-value="">
            <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220 downloads).">
            <text:p>Repository has GitHub dependents or at least 1,000 npm downloads in the last year (122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20 downloads in the last year).">
            <text:p>Package has detected local usage, GitHub dependents, or significant npm downloads (122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proskomma">
            <text:p>uw-proskomma</text:p>
          </table:table-cell>
          <table:table-cell office:value-type="string" office:string-value="False">
            <text:p>False</text:p>
          </table:table-cell>
          <table:table-cell office:value-type="string" office:string-value="2362">
            <text:p>2362</text:p>
          </table:table-cell>
          <table:table-cell office:value-type="string" office:string-value="2022-07-13T12:06:56.761Z">
            <text:p>2022-07-13T12:06:56.761Z</text:p>
          </table:table-cell>
          <table:table-cell office:value-type="string" office:string-value="">
            <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362 downloads).">
            <text:p>Repository has GitHub dependents or at least 1,000 npm downloads in the last year (2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62 downloads in the last year).">
            <text:p>Package has detected local usage, GitHub dependents, or significant npm downloads (236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quote-helpers">
            <text:p>uw-quote-helpers</text:p>
          </table:table-cell>
          <table:table-cell office:value-type="string" office:string-value="False">
            <text:p>False</text:p>
          </table:table-cell>
          <table:table-cell office:value-type="string" office:string-value="3132">
            <text:p>3132</text:p>
          </table:table-cell>
          <table:table-cell office:value-type="string" office:string-value="2025-01-17T14:55:12.819Z">
            <text:p>2025-01-17T14:55:12.819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132 downloads).">
            <text:p>Repository has GitHub dependents or at least 1,000 npm downloads in the last year (31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32 downloads in the last year).">
            <text:p>Package has detected local usage, GitHub dependents, or significant npm downloads (313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tsv-parser">
            <text:p>uw-tsv-parser</text:p>
          </table:table-cell>
          <table:table-cell office:value-type="string" office:string-value="False">
            <text:p>False</text:p>
          </table:table-cell>
          <table:table-cell office:value-type="string" office:string-value="4621">
            <text:p>4621</text:p>
          </table:table-cell>
          <table:table-cell office:value-type="string" office:string-value="2022-02-02T14:06:17.344Z">
            <text:p>2022-02-02T14:06:17.344Z</text:p>
          </table:table-cell>
          <table:table-cell office:value-type="string" office:string-value="">
            <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621 downloads).">
            <text:p>Repository has GitHub dependents or at least 1,000 npm downloads in the last year (46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21 downloads in the last year).">
            <text:p>Package has detected local usage, GitHub dependents, or significant npm downloads (462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
            <text:p/>
          </table:table-cell>
          <table:table-cell office:value-type="string" office:string-value="unfoldingWord-dev/uw-web">
            <text:p>unfoldingWord-dev/uw-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
            <text:p/>
          </table:table-cell>
          <table:table-cell office:value-type="string" office:string-value="uw-word-count">
            <text:p>uw-word-count</text:p>
          </table:table-cell>
          <table:table-cell office:value-type="string" office:string-value="False">
            <text:p>False</text:p>
          </table:table-cell>
          <table:table-cell office:value-type="string" office:string-value="365">
            <text:p>365</text:p>
          </table:table-cell>
          <table:table-cell office:value-type="string" office:string-value="2020-07-15T14:01:25.409Z">
            <text:p>2020-07-15T14:01:25.409Z</text:p>
          </table:table-cell>
          <table:table-cell office:value-type="string" office:string-value="">
            <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65 downloads).">
            <text:p>Repository has GitHub dependents or at least 1,000 npm downloads in the last year (3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5 downloads in the last year).">
            <text:p>Package has detected local usage, GitHub dependents, or significant npm downloads (3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
            <text:p>word-aligner</text:p>
          </table:table-cell>
          <table:table-cell office:value-type="string" office:string-value="False">
            <text:p>False</text:p>
          </table:table-cell>
          <table:table-cell office:value-type="string" office:string-value="44815">
            <text:p>44815</text:p>
          </table:table-cell>
          <table:table-cell office:value-type="string" office:string-value="2026-05-24T21:22:13.663Z">
            <text:p>2026-05-24T21:22:13.663Z</text:p>
          </table:table-cell>
          <table:table-cell office:value-type="string" office:string-value="">
            <text:p/>
          </table:table-cell>
          <table:table-cell office:value-type="string" office:string-value="">
            <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4815 downloads).">
            <text:p>Repository has GitHub dependents or at least 1,000 npm downloads in the last year (4481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815 downloads in the last year).">
            <text:p>Package has detected local usage, GitHub dependents, or significant npm downloads (4481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lib">
            <text:p>word-aligner-lib</text:p>
          </table:table-cell>
          <table:table-cell office:value-type="string" office:string-value="False">
            <text:p>False</text:p>
          </table:table-cell>
          <table:table-cell office:value-type="string" office:string-value="4867">
            <text:p>4867</text:p>
          </table:table-cell>
          <table:table-cell office:value-type="string" office:string-value="2026-05-24T22:38:01.649Z">
            <text:p>2026-05-24T22:38:01.649Z</text:p>
          </table:table-cell>
          <table:table-cell office:value-type="string" office:string-value="">
            <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867 downloads).">
            <text:p>Repository has GitHub dependents or at least 1,000 npm downloads in the last year (48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867 downloads in the last year).">
            <text:p>Package has detected local usage, GitHub dependents, or significant npm downloads (486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
            <text:p/>
          </table:table-cell>
          <table:table-cell office:value-type="string" office:string-value="word-aligner-rcl">
            <text:p>word-aligner-rcl</text:p>
          </table:table-cell>
          <table:table-cell office:value-type="string" office:string-value="False">
            <text:p>False</text:p>
          </table:table-cell>
          <table:table-cell office:value-type="string" office:string-value="16552">
            <text:p>16552</text:p>
          </table:table-cell>
          <table:table-cell office:value-type="string" office:string-value="2026-05-24T23:03:19.258Z">
            <text:p>2026-05-24T23:03:19.258Z</text:p>
          </table:table-cell>
          <table:table-cell office:value-type="string" office:string-value="">
            <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552 downloads).">
            <text:p>Repository has GitHub dependents or at least 1,000 npm downloads in the last year (165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52 downloads in the last year).">
            <text:p>Package has detected local usage, GitHub dependents, or significant npm downloads (165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
            <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
            <text:p/>
          </table:table-cell>
          <table:table-cell office:value-type="string" office:string-value="unfoldingWord/wordMAP">
            <text:p>unfoldingWord/wordMA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
            <text:p/>
          </table:table-cell>
          <table:table-cell office:value-type="string" office:string-value="unfoldingWord/avd-ar">
            <text:p>unfoldingWord/avd-a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esign">
            <text:p>unfoldingWord-dev/desig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
            <text:p/>
          </table:table-cell>
          <table:table-cell office:value-type="string" office:string-value="unfoldingWord-dev/Door43">
            <text:p>unfoldingWord-dev/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am">
            <text:p>unfoldingWord/obs-am</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bn">
            <text:p>unfoldingWord/obs-b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ceb">
            <text:p>unfoldingWord/obs-c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en">
            <text:p>unfoldingWord/obs-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es">
            <text:p>unfoldingWord/obs-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es-419">
            <text:p>unfoldingWord/obs-es-419</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fa">
            <text:p>unfoldingWord/obs-f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fr">
            <text:p>unfoldingWord/obs-f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gof">
            <text:p>unfoldingWord/obs-go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gu">
            <text:p>unfoldingWord/obs-g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ha">
            <text:p>unfoldingWord/obs-h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i">
            <text:p>unfoldingWord/obs-h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mr">
            <text:p>unfoldingWord/obs-h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hu">
            <text:p>unfoldingWord/obs-h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iOS">
            <text:p>unfoldingWord-dev/OBS-iO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lpx">
            <text:p>unfoldingWord/obs-lpx</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mr">
            <text:p>unfoldingWord/obs-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ne">
            <text:p>unfoldingWord/obs-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
            <text:p/>
          </table:table-cell>
          <table:table-cell office:value-type="string" office:string-value="unfoldingWord/obs-or">
            <text:p>unfoldingWord/obs-o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a">
            <text:p>unfoldingWord/obs-p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
            <text:p/>
          </table:table-cell>
          <table:table-cell office:value-type="string" office:string-value="unfoldingWord/obs-pdf">
            <text:p>unfoldingWord/obs-pd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t-br">
            <text:p>unfoldingWord/obs-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ru">
            <text:p>unfoldingWord/obs-r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
            <text:p/>
          </table:table-cell>
          <table:table-cell office:value-type="string" office:string-value="unfoldingWord/obs-sgj">
            <text:p>unfoldingWord/obs-sg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dj">
            <text:p>unfoldingWord/obs-td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l">
            <text:p>unfoldingWord/obs-t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pi">
            <text:p>unfoldingWord/obs-tp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r">
            <text:p>unfoldingWord/obs-t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ur">
            <text:p>unfoldingWord/obs-u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vi">
            <text:p>unfoldingWord/obs-v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
            <text:p/>
          </table:table-cell>
          <table:table-cell office:value-type="string" office:string-value="unfoldingWord-box3/td">
            <text:p>unfoldingWord-box3/t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26-06-18T17:34:51Z">
            <text:p>2026-06-18T17:34:51Z</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
            <text:p/>
          </table:table-cell>
          <table:table-cell office:value-type="string" office:string-value="unfoldingWord/udb-en">
            <text:p>unfoldingWord/ud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
            <text:p/>
          </table:table-cell>
          <table:table-cell office:value-type="string" office:string-value="unfoldingWord/ulb-en">
            <text:p>unfoldingWord/ul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
            <text:p/>
          </table:table-cell>
          <table:table-cell office:value-type="string" office:string-value="unfoldingWord/ulb-pt-br">
            <text:p>unfoldingWord/ulb-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uwadmin">
            <text:p>unfoldingWord-dev/uwadmi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
            <text:p/>
          </table:table-cell>
          <table:table-cell office:value-type="string" office:string-value="unfoldingWord/website">
            <text:p>unfoldingWord/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18T13:45:31Z">
            <text:p>2026-06-18T13:45:3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https://github.com/unfoldingWord/meeting-issues">
            <text:p>https://github.com/unfoldingWord/meeting-issues</text:p>
          </table:table-cell>
          <table:table-cell office:value-type="string" office:string-value="2026-06-18T13:46:29Z">
            <text:p>2026-06-18T13:46:29Z</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
            <text:p/>
          </table:table-cell>
          <table:table-cell office:value-type="string" office:string-value="unfoldingWord/tc-website">
            <text:p>unfoldingWord/tc-websi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
            <text:p/>
          </table:table-cell>
          <table:table-cell office:value-type="string" office:string-value="unfoldingWord/terraform">
            <text:p>unfoldingWord/terraform</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
            <text:p/>
          </table:table-cell>
          <table:table-cell office:value-type="string" office:string-value="unfoldingWord/uw-zulip-mcp">
            <text:p>unfoldingWord/uw-zulip-mcp</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
            <text:p/>
          </table:table-cell>
          <table:table-cell office:value-type="string" office:string-value="unfoldingWord/zulip-files">
            <text:p>unfoldingWord/zulip-fil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 style:data-style-name="N2" text:time-value="17:48:04.8573780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8T18:03:09.950073255</dc:date>
    <meta:editing-duration>PT20H17M48S</meta:editing-duration>
    <meta:editing-cycles>18</meta:editing-cycles>
    <meta:document-statistic meta:table-count="1" meta:cell-count="17536" meta:object-count="0"/>
  </office:meta>
</office:document-meta>
</file>