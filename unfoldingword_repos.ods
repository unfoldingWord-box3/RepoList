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npmjs package name</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simple-text-editor-rcl</text:p>
          </table:table-cell>
          <table:table-cell office:value-type="string">
            <text:p>3852</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uw-proskomma</text:p>
          </table:table-cell>
          <table:table-cell office:value-type="string">
            <text:p>2241</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wordmap-react-toolkit</text:p>
          </table:table-cell>
          <table:table-cell office:value-type="string">
            <text:p>216</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hello-world-react-component-library</text:p>
          </table:table-cell>
          <table:table-cell office:value-type="string">
            <text:p>15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alignment-editor-rcl</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tc-create-app</text:p>
          </table:table-cell>
          <table:table-cell office:value-type="string">
            <text:p>48</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content-validation-app</text:p>
          </table:table-cell>
          <table:table-cell office:value-type="string">
            <text:p>164</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greek-apparatus-app</text:p>
          </table:table-cell>
          <table:table-cell office:value-type="string">
            <text:p>54</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https://github.com/unfoldingWord/door43-preview-app</text:p>
          </table:table-cell>
          <table:table-cell office:value-type="string">
            <text:p>2026-05-15T11:50:32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Nightly Issue Bot, stephenwunrow</text:p>
          </table:table-cell>
          <table:table-cell office:value-type="string">
            <text:p>https://github.com/unfoldingWord/bp-assistant-skills</text:p>
          </table:table-cell>
          <table:table-cell office:value-type="string">
            <text:p>2026-05-14T22:38:3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bp-assistant bot</text:p>
          </table:table-cell>
          <table:table-cell office:value-type="string">
            <text:p>https://github.com/unfoldingWord/bp-assistant</text:p>
          </table:table-cell>
          <table:table-cell office:value-type="string">
            <text:p>2026-05-14T22:38:27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text:p>
          </table:table-cell>
          <table:table-cell office:value-type="string">
            <text:p>https://github.com/unfoldingWord/bt-servant-telegram-gateway</text:p>
          </table:table-cell>
          <table:table-cell office:value-type="string">
            <text:p>2026-05-14T16:23:27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https://github.com/unfoldingWord/bt-servant-telemetry</text:p>
          </table:table-cell>
          <table:table-cell office:value-type="string">
            <text:p>2026-05-14T15:32:27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text:p>
          </table:table-cell>
          <table:table-cell office:value-type="string">
            <text:p>https://github.com/unfoldingWord/bt-servant-worker</text:p>
          </table:table-cell>
          <table:table-cell office:value-type="string">
            <text:p>2026-05-13T20:18:00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https://github.com/unfoldingWord/bt-servant-admin-portal</text:p>
          </table:table-cell>
          <table:table-cell office:value-type="string">
            <text:p>2026-05-13T19:48:50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tc-create-app</text:p>
          </table:table-cell>
          <table:table-cell office:value-type="string">
            <text:p>48</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https://github.com/unfoldingWord/tc-create-app</text:p>
          </table:table-cell>
          <table:table-cell office:value-type="string">
            <text:p>2026-05-13T18:47:17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uw-content-validation</text:p>
          </table:table-cell>
          <table:table-cell office:value-type="string">
            <text:p>1834</text:p>
          </table:table-cell>
          <table:table-cell office:value-type="string">
            <text:p>2023-01-11T14:47:58.31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https://github.com/unfoldingWord/uw-content-validation</text:p>
          </table:table-cell>
          <table:table-cell office:value-type="string">
            <text:p>2026-05-12T16:11:32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gitea-react-toolkit</text:p>
          </table:table-cell>
          <table:table-cell office:value-type="string">
            <text:p>15937</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https://github.com/unfoldingWord/gitea-react-toolkit</text:p>
          </table:table-cell>
          <table:table-cell office:value-type="string">
            <text:p>2026-05-12T13:17:57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eb-client</text:p>
          </table:table-cell>
          <table:table-cell office:value-type="string">
            <text:p>2026-05-12T05:52:39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https://github.com/unfoldingWord/gateway-edit</text:p>
          </table:table-cell>
          <table:table-cell office:value-type="string">
            <text:p>2026-05-11T20:47:56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obsidian-headless-sync-docker</text:p>
          </table:table-cell>
          <table:table-cell office:value-type="string">
            <text:p>unfoldingWord</text:p>
          </table:table-cell>
          <table:table-cell office:value-type="string">
            <text:p>Dockerf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elphemur/obsidian-headless-sync-docker</text:p>
          </table:table-cell>
          <table:table-cell office:value-type="string">
            <text:p>Copilot, crosbyh, yakob-aleksandrovich, Belphemur</text:p>
          </table:table-cell>
          <table:table-cell office:value-type="string">
            <text:p>https://github.com/unfoldingWord/obsidian-headless-sync-docker</text:p>
          </table:table-cell>
          <table:table-cell office:value-type="string">
            <text:p>2026-05-11T13:25:14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https://github.com/unfoldingWord/fred-zulip-bot-worker</text:p>
          </table:table-cell>
          <table:table-cell office:value-type="string">
            <text:p>2026-05-09T16:01:43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https://github.com/unfoldingWord/loki-exporter</text:p>
          </table:table-cell>
          <table:table-cell office:value-type="string">
            <text:p>2026-05-08T16:01:37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https://github.com/unfoldingWord/fred-mcp</text:p>
          </table:table-cell>
          <table:table-cell office:value-type="string">
            <text:p>2026-05-07T01:50:40Z</text:p>
          </table:table-cell>
        </table:table-row>
        <table:table-row>
          <table:table-cell office:value-type="string">
            <text:p>bt-servant-site</text:p>
          </table:table-cell>
          <table:table-cell office:value-type="string">
            <text:p>unfoldingWord</text:p>
          </table:table-cell>
          <table:table-cell office:value-type="string">
            <text:p>C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text:p>
          </table:table-cell>
          <table:table-cell office:value-type="string">
            <text:p>https://github.com/unfoldingWord/bt-servant-site</text:p>
          </table:table-cell>
          <table:table-cell office:value-type="string">
            <text:p>2026-05-05T20:52:0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utomation, abelpz, cursoragent</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https://github.com/unfoldingWord/dcs</text:p>
          </table:table-cell>
          <table:table-cell office:value-type="string">
            <text:p>2026-04-19T02:36:49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single-scripture-rcl</text:p>
          </table:table-cell>
          <table:table-cell office:value-type="string">
            <text:p>9267</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https://github.com/unfoldingWord/orthography-app-BE</text:p>
          </table:table-cell>
          <table:table-cell office:value-type="string">
            <text:p>2026-04-16T08:07:38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https://github.com/unfoldingWord/tsv-twl-creation-app</text:p>
          </table:table-cell>
          <table:table-cell office:value-type="string">
            <text:p>2026-04-12T12:21:52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tsv-quote-converters</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https://github.com/unfoldingWord/tsv-quote-converters</text:p>
          </table:table-cell>
          <table:table-cell office:value-type="string">
            <text:p>2026-04-12T12:12:3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twl-generator</text:p>
          </table:table-cell>
          <table:table-cell office:value-type="string">
            <text:p>5138</text:p>
          </table:table-cell>
          <table:table-cell office:value-type="string">
            <text:p>2026-04-09T20:31:44.832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https://github.com/unfoldingWord/node-twl-generator</text:p>
          </table:table-cell>
          <table:table-cell office:value-type="string">
            <text:p>2026-04-09T20:31:43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translation-helps-rcl</text:p>
          </table:table-cell>
          <table:table-cell office:value-type="string">
            <text:p>13730</text:p>
          </table:table-cell>
          <table:table-cell office:value-type="string">
            <text:p>2026-03-27T22:01:47.002Z</text:p>
          </table:table-cell>
          <table:table-cell office:value-type="string">
            <text:p>next-js-template, gateway-edit, admin-app, create-app, single-scripture-rcl, bsa, gateway-admin,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dcs-branch-merger</text:p>
          </table:table-cell>
          <table:table-cell office:value-type="string">
            <text:p>3246</text:p>
          </table:table-cell>
          <table:table-cell office:value-type="string">
            <text:p>2026-03-27T21:57:39.012Z</text:p>
          </table:table-cell>
          <table:table-cell office:value-type="string">
            <text:p>tc-create-app, translation-helps-rcl, gateway-admin</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https://github.com/unfoldingWord/dcs-branch-merger</text:p>
          </table:table-cell>
          <table:table-cell office:value-type="string">
            <text:p>2026-03-27T21:56:46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enhanced-word-aligner-rcl</text:p>
          </table:table-cell>
          <table:table-cell office:value-type="string">
            <text:p>23441</text:p>
          </table:table-cell>
          <table:table-cell office:value-type="string">
            <text:p>2026-03-24T14:38:54.31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https://github.com/unfoldingWord/enhanced-word-aligner-rcl</text:p>
          </table:table-cell>
          <table:table-cell office:value-type="string">
            <text:p>2026-03-24T14:39:30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scripture-resources-rcl</text:p>
          </table:table-cell>
          <table:table-cell office:value-type="string">
            <text:p>14415</text:p>
          </table:table-cell>
          <table:table-cell office:value-type="string">
            <text:p>2026-03-19T13:24:25.124Z</text:p>
          </table:table-cell>
          <table:table-cell office: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word-aligner-rcl</text:p>
          </table:table-cell>
          <table:table-cell office:value-type="string">
            <text:p>15055</text:p>
          </table:table-cell>
          <table:table-cell office:value-type="string">
            <text:p>2026-03-19T13:16:17.575Z</text:p>
          </table:table-cell>
          <table:table-cell office:value-type="string">
            <text:p>door43-preview-app, gateway-edit, single-scripture-rcl, enhanced-word-aligner-rcl, @oce-editor-tools/pk-aligner</text:p>
          </table:table-cell>
          <table:table-cell office:value-type="string">
            <text:p>bible-reference-range, string-punctuation-tokenizer, usfm-js, word-aligner, word-aligner-lib, wordmap, wordmap-lexer, uw-tsv-parser</text:p>
          </table:table-cell>
          <table:table-cell office:value-type="string">
            <text:p>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https://github.com/unfoldingWord/word-aligner-rcl</text:p>
          </table:table-cell>
          <table:table-cell office:value-type="string">
            <text:p>2026-03-19T13:15:19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https://github.com/unfoldingWord/fia-mcp</text:p>
          </table:table-cell>
          <table:table-cell office:value-type="string">
            <text:p>2026-03-11T19:28:18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https://github.com/unfoldingWord/Brown-Driver-Briggs-Enhanced</text:p>
          </table:table-cell>
          <table:table-cell office:value-type="string">
            <text:p>2026-03-10T18:58:39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uw-quote-helpers</text:p>
          </table:table-cell>
          <table:table-cell office:value-type="string">
            <text:p>2769</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uw-wordmapbooster</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datatable-translatable</text:p>
          </table:table-cell>
          <table:table-cell office:value-type="string">
            <text:p>3166</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claude_security_sentinel</text:p>
          </table:table-cell>
          <table:table-cell office:value-type="string">
            <text:p>2026-03-02T19:57:47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https://github.com/unfoldingWord/MediaWiki-USFMTag</text:p>
          </table:table-cell>
          <table:table-cell office:value-type="string">
            <text:p>2026-02-23T14:45:18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usfm-alignment-remover</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https://github.com/unfoldingWord/translationCore</text:p>
          </table:table-cell>
          <table:table-cell office:value-type="string">
            <text:p>2026-01-06T21:26:25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usfm-js</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https://github.com/unfoldingWord/usfm-js</text:p>
          </table:table-cell>
          <table:table-cell office:value-type="string">
            <text:p>2026-01-06T16:10:55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minitracker</text:p>
          </table:table-cell>
          <table:table-cell office:value-type="string">
            <text:p>2025-12-22T15:45:45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word-aligner-lib</text:p>
          </table:table-cell>
          <table:table-cell office:value-type="string">
            <text:p>2614</text:p>
          </table:table-cell>
          <table:table-cell office:value-type="string">
            <text:p>2025-12-16T18:07:08.306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door43-preview-app, unfoldingWord/gateway-edit, unfoldingWord/single-scripture-rcl, unfoldingWord/word-aligner-rcl</text:p>
          </table:table-cell>
          <table:table-cell office:value-type="string">
            <text:p>PhotoNomad0</text:p>
          </table:table-cell>
          <table:table-cell office:value-type="string">
            <text:p>https://github.com/unfoldingWord/word-aligner-lib</text:p>
          </table:table-cell>
          <table:table-cell office:value-type="string">
            <text:p>2025-12-16T18:01:28Z</text:p>
          </table:table-cell>
        </table:table-row>
        <table:table-row>
          <table:table-cell office:value-type="string">
            <text:p>dcs-homepage</text:p>
          </table:table-cell>
          <table:table-cell office:value-type="string">
            <text:p>unfoldingWord</text:p>
          </table:table-cell>
          <table:table-cell office:value-type="string">
            <text:p>Dockerf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homepage</text:p>
          </table:table-cell>
          <table:table-cell office:value-type="string">
            <text:p>2025-12-15T15:40:12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https://github.com/unfoldingWord/ulb-en</text:p>
          </table:table-cell>
          <table:table-cell office:value-type="string">
            <text:p>2025-12-05T15:37:06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tsv-groupdata-parser</text:p>
          </table:table-cell>
          <table:table-cell office:value-type="string">
            <text:p>5908</text:p>
          </table:table-cell>
          <table:table-cell office:value-type="string">
            <text:p>2024-10-16T17:43:33.516Z</text:p>
          </table:table-cell>
          <table:table-cell office:value-type="string">
            <text:p>checking-extension, pdf-generator, uw-quote-helpers, translationCore,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tc-source-content-updater</text:p>
          </table:table-cell>
          <table:table-cell office:value-type="string">
            <text:p>7659</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checking-tool-rcl</text:p>
          </table:table-cell>
          <table:table-cell office:value-type="string">
            <text:p>5457</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word-aligner</text:p>
          </table:table-cell>
          <table:table-cell office:value-type="string">
            <text:p>41203</text:p>
          </table:table-cell>
          <table:table-cell office:value-type="string">
            <text:p>2024-08-12T21:12:18.988Z</text:p>
          </table:table-cell>
          <table:table-cell office: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https://github.com/unfoldingWord/word-aligner</text:p>
          </table:table-cell>
          <table:table-cell office:value-type="string">
            <text:p>2025-09-26T11:17:46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wordmap</text:p>
          </table:table-cell>
          <table:table-cell office:value-type="string">
            <text:p/>
          </table:table-cell>
          <table:table-cell office:value-type="string">
            <text:p/>
          </table:table-cell>
          <table:table-cell office:value-type="string">
            <text:p>wordmap-mt, wordmap-react-toolkit, word-aligner-rcl, uw-wordmapbooster, translationCore, wordAlignment</text:p>
          </table:table-cell>
          <table:table-cell office:value-type="string">
            <text:p>wordmap-lexer</text:p>
          </table:table-cell>
          <table:table-cell office: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https://github.com/unfoldingWord/wordMAP</text:p>
          </table:table-cell>
          <table:table-cell office:value-type="string">
            <text:p>2025-08-25T16:40:45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https://github.com/unfoldingWord/gateway-admin</text:p>
          </table:table-cell>
          <table:table-cell office:value-type="string">
            <text:p>2025-08-19T18:09:19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markdown-translatable</text:p>
          </table:table-cell>
          <table:table-cell office:value-type="string">
            <text:p>16332</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https://github.com/unfoldingWord/wordAlignment</text:p>
          </table:table-cell>
          <table:table-cell office:value-type="string">
            <text:p>2025-03-24T11:04:25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tc-ui-toolkit</text:p>
          </table:table-cell>
          <table:table-cell office:value-type="string">
            <text:p>29426</text:p>
          </table:table-cell>
          <table:table-cell office:value-type="string">
            <text:p>2024-12-31T18:53:34.752Z</text:p>
          </table:table-cell>
          <table:table-cell office:value-type="string">
            <text:p>alignment-playground, next-js-template, gateway-edit, tc-create-app, single-scripture-rcl, translation-helps-rcl, scripture-resources-rcl, bsa, translationCore, gateway-admin, wordAlignment,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https://github.com/unfoldingWord/tc-ui-toolkit</text:p>
          </table:table-cell>
          <table:table-cell office:value-type="string">
            <text:p>2024-12-31T18:52:44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https://github.com/unfoldingWord/translationWords</text:p>
          </table:table-cell>
          <table:table-cell office:value-type="string">
            <text:p>2024-12-10T20:41:31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https://github.com/unfoldingWord/translationNotes</text:p>
          </table:table-cell>
          <table:table-cell office:value-type="string">
            <text:p>2024-12-10T20:28:05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checking-tool-wrapper</text:p>
          </table:table-cell>
          <table:table-cell office:value-type="string">
            <text:p/>
          </table:table-cell>
          <table:table-cell office:value-type="string">
            <text:p/>
          </table:table-cell>
          <table:table-cell office:value-type="string">
            <text:p>translationCore, translationWords, translationNote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tn-tsv7-to-tsv8</text:p>
          </table:table-cell>
          <table:table-cell office:value-type="string">
            <text:p>2024-11-14T10:49:22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catalog-accordion-rcl</text:p>
          </table:table-cell>
          <table:table-cell office:value-type="string">
            <text:p>2024-10-16T18:37:47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world-language-map-rcl</text:p>
          </table:table-cell>
          <table:table-cell office:value-type="string">
            <text:p>102</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world-language-map-rcl</text:p>
          </table:table-cell>
          <table:table-cell office:value-type="string">
            <text:p>2024-10-13T01:07:56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bible-reference-rcl</text:p>
          </table:table-cell>
          <table:table-cell office:value-type="string">
            <text:p>4557</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scripture-tsv</text:p>
          </table:table-cell>
          <table:table-cell office:value-type="string">
            <text:p>2441</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https://github.com/unfoldingWord/door43-job-handler</text:p>
          </table:table-cell>
          <table:table-cell office:value-type="string">
            <text:p>2024-02-06T15:21:33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https://github.com/unfoldingWord/oce-oak-render</text:p>
          </table:table-cell>
          <table:table-cell office:value-type="string">
            <text:p>2023-09-13T16:01:45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string-punctuation-tokenizer</text:p>
          </table:table-cell>
          <table:table-cell office:value-type="string">
            <text:p>89623</text:p>
          </table:table-cell>
          <table:table-cell office:value-type="string">
            <text:p>2021-08-25T21:55:46.406Z</text:p>
          </table:table-cell>
          <table:table-cell office: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https://github.com/unfoldingWord/string-punctuation-tokenizer</text:p>
          </table:table-cell>
          <table:table-cell office:value-type="string">
            <text:p>2023-08-09T13:57:50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bible-reference-range</text:p>
          </table:table-cell>
          <table:table-cell office:value-type="string">
            <text:p>13259</text:p>
          </table:table-cell>
          <table:table-cell office:value-type="string">
            <text:p>2023-12-07T19:15:35.590Z</text:p>
          </table:table-cell>
          <table:table-cell office: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https://github.com/unfoldingWord/bible-reference-range</text:p>
          </table:table-cell>
          <table:table-cell office:value-type="string">
            <text:p>2023-07-19T04:20:40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uw-tsv-parser</text:p>
          </table:table-cell>
          <table:table-cell office:value-type="string">
            <text:p>3810</text:p>
          </table:table-cell>
          <table:table-cell office:value-type="string">
            <text:p>2022-02-02T14:06:17.344Z</text:p>
          </table:table-cell>
          <table:table-cell office:value-type="string">
            <text:p>checking-extension, tc-create-app, word-aligner-rcl, tsv-groupdata-parser, checking-tool-rcl, gateway-admin</text:p>
          </table:table-cell>
          <table:table-cell office:value-type="string">
            <text:p/>
          </table:table-cell>
          <table:table-cell office: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uw-bible-parser</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epitelete-html</text:p>
          </table:table-cell>
          <table:table-cell office:value-type="string">
            <text:p>7411</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https://github.com/unfoldingWord/tx-dev</text:p>
          </table:table-cell>
          <table:table-cell office:value-type="string">
            <text:p>2022-12-12T05:15:44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https://github.com/unfoldingWord/uw-pdf-preview</text:p>
          </table:table-cell>
          <table:table-cell office:value-type="string">
            <text:p>2022-11-08T15:51:52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https://github.com/unfoldingWord/keybase_git_backup</text:p>
          </table:table-cell>
          <table:table-cell office:value-type="string">
            <text:p>2022-10-31T10:09:39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dcs-js</text:p>
          </table:table-cell>
          <table:table-cell office:value-type="string">
            <text:p>510</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uw-editor</text:p>
          </table:table-cell>
          <table:table-cell office:value-type="string">
            <text:p>1082</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https://github.com/unfoldingWord/uw-editor</text:p>
          </table:table-cell>
          <table:table-cell office:value-type="string">
            <text:p>2022-10-19T03:29:50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text:p>
          </table:table-cell>
          <table:table-cell office:value-type="string">
            <text:p>https://github.com/unfoldingWord/cloudfront_logprocessor</text:p>
          </table:table-cell>
          <table:table-cell office:value-type="string">
            <text:p>2022-10-06T08:25:01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dcs-react-hooks</text:p>
          </table:table-cell>
          <table:table-cell office:value-type="string">
            <text:p>14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book-package-rcl</text:p>
          </table:table-cell>
          <table:table-cell office:value-type="string">
            <text:p>2168</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resource-workspace-rcl</text:p>
          </table:table-cell>
          <table:table-cell office:value-type="string">
            <text:p>2576</text:p>
          </table:table-cell>
          <table:table-cell office:value-type="string">
            <text:p>2023-06-13T13:51:03.803Z</text:p>
          </table:table-cell>
          <table:table-cell office:value-type="string">
            <text:p>next-js-template, gateway-edit, admin-app, create-app, bsa, gateway-admin,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uw-languages-rcl</text:p>
          </table:table-cell>
          <table:table-cell office:value-type="string">
            <text:p>745</text:p>
          </table:table-cell>
          <table:table-cell office:value-type="string">
            <text:p>2023-06-12T16:01:14.311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text:p>
          </table:table-cell>
          <table:table-cell office:value-type="string">
            <text:p>https://github.com/unfoldingWord/uw-languages-rcl</text:p>
          </table:table-cell>
          <table:table-cell office:value-type="string">
            <text:p>2022-06-01T12:49:38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book-package-app</text:p>
          </table:table-cell>
          <table:table-cell office:value-type="string">
            <text:p>89</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https://github.com/unfoldingWord/book-package-app</text:p>
          </table:table-cell>
          <table:table-cell office:value-type="string">
            <text:p>2021-12-17T13:15:30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gl_database</text:p>
          </table:table-cell>
          <table:table-cell office:value-type="string">
            <text:p>2021-01-21T20:44:49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unfoldingword/eslint-config</text:p>
          </table:table-cell>
          <table:table-cell office:value-type="string">
            <text:p/>
          </table:table-cell>
          <table:table-cell office:value-type="string">
            <text:p/>
          </table:table-cell>
          <table:table-cell office:value-type="string">
            <text:p>simple-text-editor-rcl, tc-create-app, gitea-offline-poc, gitea-react-toolkit, single-scripture-rcl, enhanced-word-aligner-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uw-word-count</text:p>
          </table:table-cell>
          <table:table-cell office:value-type="string">
            <text:p>329</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dw_redirects</text:p>
          </table:table-cell>
          <table:table-cell office:value-type="string">
            <text:p>2020-05-14T14:42:44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wordmap-lexer</text:p>
          </table:table-cell>
          <table:table-cell office:value-type="string">
            <text:p/>
          </table:table-cell>
          <table:table-cell office:value-type="string">
            <text:p/>
          </table:table-cell>
          <table:table-cell office:value-type="string">
            <text:p>wordmap-mt, alignment-playground, wordmap-react-toolkit, word-aligner-rcl, uw-wordmapbooster, translationCore, word-aligner-lib, checking-tool-rcl, wordmap, wordAlignment, string-punctuation-tokenizer, wordmap-usfm</text:p>
          </table:table-cell>
          <table:table-cell office:value-type="string">
            <text:p>string-punctuation-tokenizer</text:p>
          </table:table-cell>
          <table:table-cell office: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tc-tool</text:p>
          </table:table-cell>
          <table:table-cell office:value-type="string">
            <text:p/>
          </table:table-cell>
          <table:table-cell office:value-type="string">
            <text:p/>
          </table:table-cell>
          <table:table-cell office:value-type="string">
            <text:p>translationCore, wordAlignment, translationWords, translationNotes,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tc-strings</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selections</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https://github.com/unfoldingWord/selections</text:p>
          </table:table-cell>
          <table:table-cell office:value-type="string">
            <text:p>2019-10-22T19:45:39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https://github.com/unfoldingWord-dev/ts-desktop</text:p>
          </table:table-cell>
          <table:table-cell office:value-type="string">
            <text:p>2026-04-22T14:46:4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https://github.com/unfoldingWord-dev/ts-android</text:p>
          </table:table-cell>
          <table:table-cell office:value-type="string">
            <text:p>2026-04-22T14:45:07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gogs-client</text:p>
          </table:table-cell>
          <table:table-cell office:value-type="string">
            <text:p>6525</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electronite</text:p>
          </table:table-cell>
          <table:table-cell office:value-type="string">
            <text:p>2487</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door43-client</text:p>
          </table:table-cell>
          <table:table-cell office:value-type="string">
            <text:p>1384</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resource-container</text:p>
          </table:table-cell>
          <table:table-cell office:value-type="string">
            <text:p>2794</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door43-rc</text:p>
          </table:table-cell>
          <table:table-cell office:value-type="string">
            <text:p>47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door43-rc</text:p>
          </table:table-cell>
          <table:table-cell office:value-type="string">
            <text:p>2016-08-25T18:39:16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Notes</text:p>
          </table:table-cell>
          <table:table-cell office:value-type="string">
            <text:p>2016-08-15T16:29:38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https://github.com/unfoldingWord-dev/obs-reader</text:p>
          </table:table-cell>
          <table:table-cell office:value-type="string">
            <text:p>2015-03-09T22:06:24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oce-editor-tools/base</text:p>
          </table:table-cell>
          <table:table-cell office:value-type="string">
            <text:p>1593</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oce-editor-tools/joy-core</text:p>
          </table:table-cell>
          <table:table-cell office:value-type="string">
            <text:p>363</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oce-editor-tools/joy-pk</text:p>
          </table:table-cell>
          <table:table-cell office:value-type="string">
            <text:p>112</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oce-editor-tools/mui-core</text:p>
          </table:table-cell>
          <table:table-cell office:value-type="string">
            <text:p>572</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oce-editor-tools/mui-pk</text:p>
          </table:table-cell>
          <table:table-cell office:value-type="string">
            <text:p>281</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oce-editor-tools/mui-simple</text:p>
          </table:table-cell>
          <table:table-cell office:value-type="string">
            <text:p>33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oce-editor-tools/verse-mapper</text:p>
          </table:table-cell>
          <table:table-cell office:value-type="string">
            <text:p>82</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dcs-js</text:p>
          </table:table-cell>
          <table:table-cell office:value-type="string">
            <text:p>510</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npmjs package name</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simple-text-editor-rcl</text:p>
          </table:table-cell>
          <table:table-cell office:value-type="string">
            <text:p>3852</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uw-proskomma</text:p>
          </table:table-cell>
          <table:table-cell office:value-type="string">
            <text:p>2241</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wordmap-react-toolkit</text:p>
          </table:table-cell>
          <table:table-cell office:value-type="string">
            <text:p>216</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hello-world-react-component-library</text:p>
          </table:table-cell>
          <table:table-cell office:value-type="string">
            <text:p>15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alignment-editor-rcl</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tc-create-app</text:p>
          </table:table-cell>
          <table:table-cell office:value-type="string">
            <text:p>48</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content-validation-app</text:p>
          </table:table-cell>
          <table:table-cell office:value-type="string">
            <text:p>164</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greek-apparatus-app</text:p>
          </table:table-cell>
          <table:table-cell office:value-type="string">
            <text:p>54</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https://github.com/unfoldingWord/door43-preview-app</text:p>
          </table:table-cell>
          <table:table-cell office:value-type="string">
            <text:p>2026-05-15T11:50:32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Nightly Issue Bot, stephenwunrow</text:p>
          </table:table-cell>
          <table:table-cell office:value-type="string">
            <text:p>https://github.com/unfoldingWord/bp-assistant-skills</text:p>
          </table:table-cell>
          <table:table-cell office:value-type="string">
            <text:p>2026-05-14T22:38:35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bp-assistant bot</text:p>
          </table:table-cell>
          <table:table-cell office:value-type="string">
            <text:p>https://github.com/unfoldingWord/bp-assistant</text:p>
          </table:table-cell>
          <table:table-cell office:value-type="string">
            <text:p>2026-05-14T22:38:27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text:p>
          </table:table-cell>
          <table:table-cell office:value-type="string">
            <text:p>https://github.com/unfoldingWord/bt-servant-telegram-gateway</text:p>
          </table:table-cell>
          <table:table-cell office:value-type="string">
            <text:p>2026-05-14T16:23:27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https://github.com/unfoldingWord/bt-servant-telemetry</text:p>
          </table:table-cell>
          <table:table-cell office:value-type="string">
            <text:p>2026-05-14T15:32:27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text:p>
          </table:table-cell>
          <table:table-cell office:value-type="string">
            <text:p>https://github.com/unfoldingWord/bt-servant-worker</text:p>
          </table:table-cell>
          <table:table-cell office:value-type="string">
            <text:p>2026-05-13T20:18:00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https://github.com/unfoldingWord/bt-servant-admin-portal</text:p>
          </table:table-cell>
          <table:table-cell office:value-type="string">
            <text:p>2026-05-13T19:48:50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tc-create-app</text:p>
          </table:table-cell>
          <table:table-cell office:value-type="string">
            <text:p>48</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https://github.com/unfoldingWord/tc-create-app</text:p>
          </table:table-cell>
          <table:table-cell office:value-type="string">
            <text:p>2026-05-13T18:47:17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uw-content-validation</text:p>
          </table:table-cell>
          <table:table-cell office:value-type="string">
            <text:p>1834</text:p>
          </table:table-cell>
          <table:table-cell office:value-type="string">
            <text:p>2023-01-11T14:47:58.31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https://github.com/unfoldingWord/uw-content-validation</text:p>
          </table:table-cell>
          <table:table-cell office:value-type="string">
            <text:p>2026-05-12T16:11:32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gitea-react-toolkit</text:p>
          </table:table-cell>
          <table:table-cell office:value-type="string">
            <text:p>15937</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https://github.com/unfoldingWord/gitea-react-toolkit</text:p>
          </table:table-cell>
          <table:table-cell office:value-type="string">
            <text:p>2026-05-12T13:17:57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eb-client</text:p>
          </table:table-cell>
          <table:table-cell office:value-type="string">
            <text:p>2026-05-12T05:52:39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https://github.com/unfoldingWord/gateway-edit</text:p>
          </table:table-cell>
          <table:table-cell office:value-type="string">
            <text:p>2026-05-11T20:47:56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https://github.com/unfoldingWord/fred-zulip-bot-worker</text:p>
          </table:table-cell>
          <table:table-cell office:value-type="string">
            <text:p>2026-05-09T16:01:4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utomation, abelpz, cursoragent</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single-scripture-rcl</text:p>
          </table:table-cell>
          <table:table-cell office:value-type="string">
            <text:p>9267</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https://github.com/unfoldingWord/orthography-app-BE</text:p>
          </table:table-cell>
          <table:table-cell office:value-type="string">
            <text:p>2026-04-16T08:07:38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https://github.com/unfoldingWord/tsv-twl-creation-app</text:p>
          </table:table-cell>
          <table:table-cell office:value-type="string">
            <text:p>2026-04-12T12:21:52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tsv-quote-converters</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https://github.com/unfoldingWord/tsv-quote-converters</text:p>
          </table:table-cell>
          <table:table-cell office:value-type="string">
            <text:p>2026-04-12T12:12:3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twl-generator</text:p>
          </table:table-cell>
          <table:table-cell office:value-type="string">
            <text:p>5138</text:p>
          </table:table-cell>
          <table:table-cell office:value-type="string">
            <text:p>2026-04-09T20:31:44.832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https://github.com/unfoldingWord/node-twl-generator</text:p>
          </table:table-cell>
          <table:table-cell office:value-type="string">
            <text:p>2026-04-09T20:31:43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translation-helps-rcl</text:p>
          </table:table-cell>
          <table:table-cell office:value-type="string">
            <text:p>13730</text:p>
          </table:table-cell>
          <table:table-cell office:value-type="string">
            <text:p>2026-03-27T22:01:47.002Z</text:p>
          </table:table-cell>
          <table:table-cell office:value-type="string">
            <text:p>next-js-template, gateway-edit, admin-app, create-app, single-scripture-rcl, bsa, gateway-admin,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dcs-branch-merger</text:p>
          </table:table-cell>
          <table:table-cell office:value-type="string">
            <text:p>3246</text:p>
          </table:table-cell>
          <table:table-cell office:value-type="string">
            <text:p>2026-03-27T21:57:39.012Z</text:p>
          </table:table-cell>
          <table:table-cell office:value-type="string">
            <text:p>tc-create-app, translation-helps-rcl, gateway-admin</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https://github.com/unfoldingWord/dcs-branch-merger</text:p>
          </table:table-cell>
          <table:table-cell office:value-type="string">
            <text:p>2026-03-27T21:56:46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enhanced-word-aligner-rcl</text:p>
          </table:table-cell>
          <table:table-cell office:value-type="string">
            <text:p>23441</text:p>
          </table:table-cell>
          <table:table-cell office:value-type="string">
            <text:p>2026-03-24T14:38:54.31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https://github.com/unfoldingWord/enhanced-word-aligner-rcl</text:p>
          </table:table-cell>
          <table:table-cell office:value-type="string">
            <text:p>2026-03-24T14:39:30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scripture-resources-rcl</text:p>
          </table:table-cell>
          <table:table-cell office:value-type="string">
            <text:p>14415</text:p>
          </table:table-cell>
          <table:table-cell office:value-type="string">
            <text:p>2026-03-19T13:24:25.124Z</text:p>
          </table:table-cell>
          <table:table-cell office: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word-aligner-rcl</text:p>
          </table:table-cell>
          <table:table-cell office:value-type="string">
            <text:p>15055</text:p>
          </table:table-cell>
          <table:table-cell office:value-type="string">
            <text:p>2026-03-19T13:16:17.575Z</text:p>
          </table:table-cell>
          <table:table-cell office:value-type="string">
            <text:p>door43-preview-app, gateway-edit, single-scripture-rcl, enhanced-word-aligner-rcl, @oce-editor-tools/pk-aligner</text:p>
          </table:table-cell>
          <table:table-cell office:value-type="string">
            <text:p>bible-reference-range, string-punctuation-tokenizer, usfm-js, word-aligner, word-aligner-lib, wordmap, wordmap-lexer, uw-tsv-parser</text:p>
          </table:table-cell>
          <table:table-cell office:value-type="string">
            <text:p>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https://github.com/unfoldingWord/word-aligner-rcl</text:p>
          </table:table-cell>
          <table:table-cell office:value-type="string">
            <text:p>2026-03-19T13:15:19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uw-quote-helpers</text:p>
          </table:table-cell>
          <table:table-cell office:value-type="string">
            <text:p>2769</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uw-wordmapbooster</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datatable-translatable</text:p>
          </table:table-cell>
          <table:table-cell office:value-type="string">
            <text:p>3166</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usfm-alignment-remover</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https://github.com/unfoldingWord/translationCore</text:p>
          </table:table-cell>
          <table:table-cell office:value-type="string">
            <text:p>2026-01-06T21:26:25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usfm-js</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https://github.com/unfoldingWord/usfm-js</text:p>
          </table:table-cell>
          <table:table-cell office:value-type="string">
            <text:p>2026-01-06T16:10:55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word-aligner-lib</text:p>
          </table:table-cell>
          <table:table-cell office:value-type="string">
            <text:p>2614</text:p>
          </table:table-cell>
          <table:table-cell office:value-type="string">
            <text:p>2025-12-16T18:07:08.306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door43-preview-app, unfoldingWord/gateway-edit, unfoldingWord/single-scripture-rcl, unfoldingWord/word-aligner-rcl</text:p>
          </table:table-cell>
          <table:table-cell office:value-type="string">
            <text:p>PhotoNomad0</text:p>
          </table:table-cell>
          <table:table-cell office:value-type="string">
            <text:p>https://github.com/unfoldingWord/word-aligner-lib</text:p>
          </table:table-cell>
          <table:table-cell office:value-type="string">
            <text:p>2025-12-16T18:01:28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tsv7-tn-cleanup-app</text:p>
          </table:table-cell>
          <table:table-cell office:value-type="string">
            <text:p>2025-12-11T23:11:20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tsv-groupdata-parser</text:p>
          </table:table-cell>
          <table:table-cell office:value-type="string">
            <text:p>5908</text:p>
          </table:table-cell>
          <table:table-cell office:value-type="string">
            <text:p>2024-10-16T17:43:33.516Z</text:p>
          </table:table-cell>
          <table:table-cell office:value-type="string">
            <text:p>checking-extension, pdf-generator, uw-quote-helpers, translationCore,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tc-source-content-updater</text:p>
          </table:table-cell>
          <table:table-cell office:value-type="string">
            <text:p>7659</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checking-tool-rcl</text:p>
          </table:table-cell>
          <table:table-cell office:value-type="string">
            <text:p>5457</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word-aligner</text:p>
          </table:table-cell>
          <table:table-cell office:value-type="string">
            <text:p>41203</text:p>
          </table:table-cell>
          <table:table-cell office:value-type="string">
            <text:p>2024-08-12T21:12:18.988Z</text:p>
          </table:table-cell>
          <table:table-cell office: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https://github.com/unfoldingWord/word-aligner</text:p>
          </table:table-cell>
          <table:table-cell office:value-type="string">
            <text:p>2025-09-26T11:17:46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wordmap</text:p>
          </table:table-cell>
          <table:table-cell office:value-type="string">
            <text:p/>
          </table:table-cell>
          <table:table-cell office:value-type="string">
            <text:p/>
          </table:table-cell>
          <table:table-cell office:value-type="string">
            <text:p>wordmap-mt, wordmap-react-toolkit, word-aligner-rcl, uw-wordmapbooster, translationCore, wordAlignment</text:p>
          </table:table-cell>
          <table:table-cell office:value-type="string">
            <text:p>wordmap-lexer</text:p>
          </table:table-cell>
          <table:table-cell office: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https://github.com/unfoldingWord/wordMAP</text:p>
          </table:table-cell>
          <table:table-cell office:value-type="string">
            <text:p>2025-08-25T16:40:45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https://github.com/unfoldingWord/gateway-admin</text:p>
          </table:table-cell>
          <table:table-cell office:value-type="string">
            <text:p>2025-08-19T18:09:19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markdown-translatable</text:p>
          </table:table-cell>
          <table:table-cell office:value-type="string">
            <text:p>16332</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https://github.com/unfoldingWord/wordAlignment</text:p>
          </table:table-cell>
          <table:table-cell office:value-type="string">
            <text:p>2025-03-24T11:04:25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tc-ui-toolkit</text:p>
          </table:table-cell>
          <table:table-cell office:value-type="string">
            <text:p>29426</text:p>
          </table:table-cell>
          <table:table-cell office:value-type="string">
            <text:p>2024-12-31T18:53:34.752Z</text:p>
          </table:table-cell>
          <table:table-cell office:value-type="string">
            <text:p>alignment-playground, next-js-template, gateway-edit, tc-create-app, single-scripture-rcl, translation-helps-rcl, scripture-resources-rcl, bsa, translationCore, gateway-admin, wordAlignment,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https://github.com/unfoldingWord/tc-ui-toolkit</text:p>
          </table:table-cell>
          <table:table-cell office:value-type="string">
            <text:p>2024-12-31T18:52:44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https://github.com/unfoldingWord/translationWords</text:p>
          </table:table-cell>
          <table:table-cell office:value-type="string">
            <text:p>2024-12-10T20:41:31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https://github.com/unfoldingWord/translationNotes</text:p>
          </table:table-cell>
          <table:table-cell office:value-type="string">
            <text:p>2024-12-10T20:28:05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checking-tool-wrapper</text:p>
          </table:table-cell>
          <table:table-cell office:value-type="string">
            <text:p/>
          </table:table-cell>
          <table:table-cell office:value-type="string">
            <text:p/>
          </table:table-cell>
          <table:table-cell office:value-type="string">
            <text:p>translationCore, translationWords, translationNote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https://github.com/unfoldingWord/checking-tool-wrapper</text:p>
          </table:table-cell>
          <table:table-cell office:value-type="string">
            <text:p>2024-12-06T22:02:15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cs-catalog-accordion-rcl</text:p>
          </table:table-cell>
          <table:table-cell office:value-type="string">
            <text:p>2024-10-16T18:37:47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world-language-map-rcl</text:p>
          </table:table-cell>
          <table:table-cell office:value-type="string">
            <text:p>102</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world-language-map-rcl</text:p>
          </table:table-cell>
          <table:table-cell office:value-type="string">
            <text:p>2024-10-13T01:07:56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bible-reference-rcl</text:p>
          </table:table-cell>
          <table:table-cell office:value-type="string">
            <text:p>4557</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scripture-tsv</text:p>
          </table:table-cell>
          <table:table-cell office:value-type="string">
            <text:p>2441</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https://github.com/unfoldingWord/oce-oak-render</text:p>
          </table:table-cell>
          <table:table-cell office:value-type="string">
            <text:p>2023-09-13T16:01:45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string-punctuation-tokenizer</text:p>
          </table:table-cell>
          <table:table-cell office:value-type="string">
            <text:p>89623</text:p>
          </table:table-cell>
          <table:table-cell office:value-type="string">
            <text:p>2021-08-25T21:55:46.406Z</text:p>
          </table:table-cell>
          <table:table-cell office: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https://github.com/unfoldingWord/string-punctuation-tokenizer</text:p>
          </table:table-cell>
          <table:table-cell office:value-type="string">
            <text:p>2023-08-09T13:57:50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bible-reference-range</text:p>
          </table:table-cell>
          <table:table-cell office:value-type="string">
            <text:p>13259</text:p>
          </table:table-cell>
          <table:table-cell office:value-type="string">
            <text:p>2023-12-07T19:15:35.590Z</text:p>
          </table:table-cell>
          <table:table-cell office: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uw-tsv-parser</text:p>
          </table:table-cell>
          <table:table-cell office:value-type="string">
            <text:p>3810</text:p>
          </table:table-cell>
          <table:table-cell office:value-type="string">
            <text:p>2022-02-02T14:06:17.344Z</text:p>
          </table:table-cell>
          <table:table-cell office:value-type="string">
            <text:p>checking-extension, tc-create-app, word-aligner-rcl, tsv-groupdata-parser, checking-tool-rcl, gateway-admin</text:p>
          </table:table-cell>
          <table:table-cell office:value-type="string">
            <text:p/>
          </table:table-cell>
          <table:table-cell office: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uw-bible-parser</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epitelete-html</text:p>
          </table:table-cell>
          <table:table-cell office:value-type="string">
            <text:p>7411</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https://github.com/unfoldingWord/gateway-translate</text:p>
          </table:table-cell>
          <table:table-cell office:value-type="string">
            <text:p>2023-01-21T16:44:36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dcs-js</text:p>
          </table:table-cell>
          <table:table-cell office:value-type="string">
            <text:p>510</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uw-editor</text:p>
          </table:table-cell>
          <table:table-cell office:value-type="string">
            <text:p>1082</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dcs-react-hooks</text:p>
          </table:table-cell>
          <table:table-cell office:value-type="string">
            <text:p>147</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book-package-rcl</text:p>
          </table:table-cell>
          <table:table-cell office:value-type="string">
            <text:p>2168</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resource-workspace-rcl</text:p>
          </table:table-cell>
          <table:table-cell office:value-type="string">
            <text:p>2576</text:p>
          </table:table-cell>
          <table:table-cell office:value-type="string">
            <text:p>2023-06-13T13:51:03.803Z</text:p>
          </table:table-cell>
          <table:table-cell office:value-type="string">
            <text:p>next-js-template, gateway-edit, admin-app, create-app, bsa, gateway-admin,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uw-languages-rcl</text:p>
          </table:table-cell>
          <table:table-cell office:value-type="string">
            <text:p>745</text:p>
          </table:table-cell>
          <table:table-cell office:value-type="string">
            <text:p>2023-06-12T16:01:14.311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text:p>
          </table:table-cell>
          <table:table-cell office:value-type="string">
            <text:p>https://github.com/unfoldingWord/uw-languages-rcl</text:p>
          </table:table-cell>
          <table:table-cell office:value-type="string">
            <text:p>2022-06-01T12:49:38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book-package-app</text:p>
          </table:table-cell>
          <table:table-cell office:value-type="string">
            <text:p>89</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unfoldingword/eslint-config</text:p>
          </table:table-cell>
          <table:table-cell office:value-type="string">
            <text:p/>
          </table:table-cell>
          <table:table-cell office:value-type="string">
            <text:p/>
          </table:table-cell>
          <table:table-cell office:value-type="string">
            <text:p>simple-text-editor-rcl, tc-create-app, gitea-offline-poc, gitea-react-toolkit, single-scripture-rcl, enhanced-word-aligner-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uw-word-count</text:p>
          </table:table-cell>
          <table:table-cell office:value-type="string">
            <text:p>329</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wordmap-lexer</text:p>
          </table:table-cell>
          <table:table-cell office:value-type="string">
            <text:p/>
          </table:table-cell>
          <table:table-cell office:value-type="string">
            <text:p/>
          </table:table-cell>
          <table:table-cell office:value-type="string">
            <text:p>wordmap-mt, alignment-playground, wordmap-react-toolkit, word-aligner-rcl, uw-wordmapbooster, translationCore, word-aligner-lib, checking-tool-rcl, wordmap, wordAlignment, string-punctuation-tokenizer, wordmap-usfm</text:p>
          </table:table-cell>
          <table:table-cell office:value-type="string">
            <text:p>string-punctuation-tokenizer</text:p>
          </table:table-cell>
          <table:table-cell office: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tc-tool</text:p>
          </table:table-cell>
          <table:table-cell office:value-type="string">
            <text:p/>
          </table:table-cell>
          <table:table-cell office:value-type="string">
            <text:p/>
          </table:table-cell>
          <table:table-cell office:value-type="string">
            <text:p>translationCore, wordAlignment, translationWords, translationNotes,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tc-strings</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selections</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https://github.com/unfoldingWord/selections</text:p>
          </table:table-cell>
          <table:table-cell office:value-type="string">
            <text:p>2019-10-22T19:45:39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gogs-client</text:p>
          </table:table-cell>
          <table:table-cell office:value-type="string">
            <text:p>6525</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electronite</text:p>
          </table:table-cell>
          <table:table-cell office:value-type="string">
            <text:p>2487</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door43-client</text:p>
          </table:table-cell>
          <table:table-cell office:value-type="string">
            <text:p>1384</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resource-container</text:p>
          </table:table-cell>
          <table:table-cell office:value-type="string">
            <text:p>2794</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door43-rc</text:p>
          </table:table-cell>
          <table:table-cell office:value-type="string">
            <text:p>475</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oce-editor-tools/base</text:p>
          </table:table-cell>
          <table:table-cell office:value-type="string">
            <text:p>1593</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oce-editor-tools/joy-core</text:p>
          </table:table-cell>
          <table:table-cell office:value-type="string">
            <text:p>363</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oce-editor-tools/joy-pk</text:p>
          </table:table-cell>
          <table:table-cell office:value-type="string">
            <text:p>112</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oce-editor-tools/mui-core</text:p>
          </table:table-cell>
          <table:table-cell office:value-type="string">
            <text:p>572</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oce-editor-tools/mui-pk</text:p>
          </table:table-cell>
          <table:table-cell office:value-type="string">
            <text:p>281</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oce-editor-tools/mui-simple</text:p>
          </table:table-cell>
          <table:table-cell office:value-type="string">
            <text:p>33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oce-editor-tools/verse-mapper</text:p>
          </table:table-cell>
          <table:table-cell office:value-type="string">
            <text:p>82</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dcs-js</text:p>
          </table:table-cell>
          <table:table-cell office:value-type="string">
            <text:p>510</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https://github.com/unfoldingWord/dcs-packages</text:p>
          </table:table-cell>
          <table:table-cell office:value-type="string">
            <text:p>2022-08-25T21:38:49Z</text:p>
          </table:table-cell>
        </table:table-row>
      </table:table>
    </office:spreadsheet>
  </office:body>
</office:document-content>
</file>